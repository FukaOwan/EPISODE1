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5.47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954cm"/>
    </style:style>
    <style:style style:name="co11" style:family="table-column">
      <style:table-column-properties fo:break-before="auto" style:column-width="0.826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2.725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25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2" table:default-cell-style-name="ce1"/>
        <table:table-column-group>
          <table:table-column table:style-name="co8" table:number-columns-repeated="2" table:default-cell-style-name="ce1"/>
          <table:table-column table:style-name="co9" table:default-cell-style-name="ce1"/>
          <table:table-column table:style-name="co7" table:default-cell-style-name="ce1"/>
          <table:table-column table:style-name="co10" table:default-cell-style-name="ce1"/>
          <table:table-column table:style-name="co10" table:visibility="collapse" table:number-columns-repeated="2" table:default-cell-style-name="ce1"/>
        </table:table-column-group>
        <table:table-column table:style-name="co10" table:default-cell-style-name="ce1"/>
        <table:table-column table:style-name="co11" table:number-columns-repeated="3" table:default-cell-style-name="ce1"/>
        <table:table-column table:style-name="co11" table:number-columns-repeated="2" table:default-cell-style-name="ce116"/>
        <table:table-column table:style-name="co11" table:number-columns-repeated="5" table:default-cell-style-name="ce1"/>
        <table:table-column table:style-name="co11" table:default-cell-style-name="ce116"/>
        <table:table-column table:style-name="co12" table:default-cell-style-name="ce116"/>
        <table:table-column table:style-name="co11" table:number-columns-repeated="5" table:default-cell-style-name="ce1"/>
        <table:table-column table:style-name="co11" table:number-columns-repeated="2" table:default-cell-style-name="ce116"/>
        <table:table-column table:style-name="co11" table:number-columns-repeated="4" table:default-cell-style-name="ce1"/>
        <table:table-column table:style-name="co11" table:default-cell-style-name="ce145"/>
        <table:table-column table:style-name="co11" table:number-columns-repeated="2" table:default-cell-style-name="ce116"/>
        <table:table-column table:style-name="co11" table:default-cell-style-name="ce159"/>
        <table:table-column table:style-name="co11" table:number-columns-repeated="121" table:default-cell-style-name="ce1"/>
        <table:table-column table:style-name="co13" table:number-columns-repeated="855" table:default-cell-style-name="ce1"/>
        <table:table-column table:style-name="co14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5" calcext:value-type="date">
            <text:p>2026/06/05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3"/>
          <table:table-cell table:formula="of:=COUNTIF([.Q:.Q];100)" office:value-type="float" office:value="65" calcext:value-type="float">
            <text:p>65</text:p>
          </table:table-cell>
          <table:table-cell table:number-columns-repeated="3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122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27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74" office:value-type="string" calcext:value-type="string">
            <text:p>#</text:p>
          </table:table-cell>
          <table:table-cell table:style-name="ce127" office:value-type="string" calcext:value-type="string">
            <office:annotation draw:style-name="gr4" draw:text-style-name="P6" svg:width="9.804cm" svg:height="2.539cm" svg:x="17.913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74" office:value-type="string" calcext:value-type="string">
            <text:p>#</text:p>
          </table:table-cell>
          <table:table-cell table:style-name="ce127" office:value-type="string" calcext:value-type="string">
            <office:annotation draw:style-name="gr5" draw:text-style-name="P6" svg:width="7.418cm" svg:height="3.412cm" svg:x="31.046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27" office:value-type="string" calcext:value-type="string">
            <office:annotation draw:style-name="gr6" draw:text-style-name="P6" svg:width="7.101cm" svg:height="4.039cm" svg:x="31.293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27" office:value-type="string" calcext:value-type="string">
            <text:p>作業者</text:p>
          </table:table-cell>
          <table:table-cell table:style-name="ce127" office:value-type="string" calcext:value-type="string">
            <text:p>確認者</text:p>
          </table:table-cell>
          <table:table-cell table:style-name="ce127" office:value-type="string" calcext:value-type="string">
            <text:p>開始日(予定)</text:p>
          </table:table-cell>
          <table:table-cell table:style-name="ce127" office:value-type="string" calcext:value-type="string">
            <text:p>終了日(予定)</text:p>
          </table:table-cell>
          <table:table-cell table:style-name="ce127" office:value-type="string" calcext:value-type="string">
            <text:p>開始日(実績)</text:p>
          </table:table-cell>
          <table:table-cell table:style-name="ce127" office:value-type="string" calcext:value-type="string">
            <text:p>終了日(実績)</text:p>
          </table:table-cell>
          <table:table-cell table:style-name="ce194" office:value-type="string" calcext:value-type="string">
            <office:annotation draw:style-name="gr7" draw:text-style-name="P6" svg:width="5.721cm" svg:height="1.912cm" svg:x="47.11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194" office:value-type="string" calcext:value-type="string">
            <office:annotation draw:style-name="gr8" draw:text-style-name="P8" svg:width="8.141cm" svg:height="4.558cm" svg:x="49.88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194" office:value-type="string" calcext:value-type="string">
            <office:annotation draw:style-name="gr9" draw:text-style-name="P8" svg:width="6.568cm" svg:height="1.357cm" svg:x="57.23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220" office:value-type="string" calcext:value-type="string">
            <text:p>予定工数</text:p>
          </table:table-cell>
          <table:table-cell table:style-name="ce194" office:value-type="string" calcext:value-type="string">
            <text:p>実績工数</text:p>
          </table:table-cell>
          <table:table-cell table:style-name="ce225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48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48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/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/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3"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3"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3"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48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48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5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57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58"/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48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48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48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48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48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48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48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48"/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48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任意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48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6" office:value-type="string" calcext:value-type="string">
            <text:p>オリジナル機能</text:p>
          </table:table-cell>
          <table:table-cell table:style-name="ce36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36" office:value-type="string" calcext:value-type="string">
            <text:p>未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97]&lt;&gt;&quot;&quot;;NETWORKDAYS([.$L197];[.$M197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8]&lt;&gt;&quot;&quot;;NETWORKDAYS([.$L198];[.$M198];[$休日.$B$4:.$B$304]);&quot;&quot;)">
            <text:p/>
          </table:table-cell>
          <table:table-cell table:style-name="ce48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32" table:formula="of:=IF([.$H199]=&quot;&quot;;&quot;&quot;;IF([.$G198]=&quot;&quot;;1;[.$G1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9]&lt;&gt;&quot;&quot;;NETWORKDAYS([.$L199];[.$M199];[$休日.$B$4:.$B$304]);&quot;&quot;)">
            <text:p/>
          </table:table-cell>
          <table:table-cell table:style-name="ce48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0]=&quot;&quot;;&quot;&quot;;IF([.$G199]=&quot;&quot;;1;[.$G1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0]&lt;&gt;&quot;&quot;;NETWORKDAYS([.$L200];[.$M200];[$休日.$B$4:.$B$304]);&quot;&quot;)">
            <text:p/>
          </table:table-cell>
          <table:table-cell table:style-name="ce48"/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1]=&quot;&quot;;&quot;&quot;;IF([.$G200]=&quot;&quot;;1;[.$G2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1]&lt;&gt;&quot;&quot;;NETWORKDAYS([.$L201];[.$M201];[$休日.$B$4:.$B$304]);&quot;&quot;)">
            <text:p/>
          </table:table-cell>
          <table:table-cell table:style-name="ce48"/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32" table:formula="of:=IF([.$H202]=&quot;&quot;;&quot;&quot;;IF([.$G201]=&quot;&quot;;1;[.$G2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2]&lt;&gt;&quot;&quot;;NETWORKDAYS([.$L202];[.$M202];[$休日.$B$4:.$B$304]);&quot;&quot;)">
            <text:p/>
          </table:table-cell>
          <table:table-cell table:style-name="ce48"/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3]=&quot;&quot;;&quot;&quot;;IF([.$G202]=&quot;&quot;;1;[.$G2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3]&lt;&gt;&quot;&quot;;NETWORKDAYS([.$L203];[.$M203];[$休日.$B$4:.$B$304]);&quot;&quot;)">
            <text:p/>
          </table:table-cell>
          <table:table-cell table:style-name="ce48"/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4]=&quot;&quot;;&quot;&quot;;IF([.$G203]=&quot;&quot;;1;[.$G2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4]&lt;&gt;&quot;&quot;;NETWORKDAYS([.$L204];[.$M204];[$休日.$B$4:.$B$304]);&quot;&quot;)">
            <text:p/>
          </table:table-cell>
          <table:table-cell table:style-name="ce48"/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05]=&quot;&quot;;&quot;&quot;;IF([.$G204]=&quot;&quot;;1;[.$G2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5]&lt;&gt;&quot;&quot;;NETWORKDAYS([.$L205];[.$M205];[$休日.$B$4:.$B$304]);&quot;&quot;)">
            <text:p/>
          </table:table-cell>
          <table:table-cell table:style-name="ce48"/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06]=&quot;&quot;;&quot;&quot;;IF([.$G205]=&quot;&quot;;1;[.$G2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6]&lt;&gt;&quot;&quot;;NETWORKDAYS([.$L206];[.$M206];[$休日.$B$4:.$B$304]);&quot;&quot;)">
            <text:p/>
          </table:table-cell>
          <table:table-cell table:style-name="ce48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7]=&quot;&quot;;&quot;&quot;;IF([.$G206]=&quot;&quot;;1;[.$G2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7]&lt;&gt;&quot;&quot;;NETWORKDAYS([.$L207];[.$M207];[$休日.$B$4:.$B$304]);&quot;&quot;)">
            <text:p/>
          </table:table-cell>
          <table:table-cell table:style-name="ce48"/>
          <table:table-cell table:style-name="ce63" table:formula="of:=IF(OR(AND([.$N207]=&quot;&quot;;[.$L207]&lt;&gt;&quot;&quot;;[.$L207]&lt;=[.$U$1]);AND([.$M207]&lt;&gt;&quot;&quot;;[.Q207]&lt;100;[.$M207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8]=&quot;&quot;;&quot;&quot;;IF([.$G207]=&quot;&quot;;1;[.$G2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8]&lt;&gt;&quot;&quot;;NETWORKDAYS([.$L208];[.$M208];[$休日.$B$4:.$B$304]);&quot;&quot;)">
            <text:p/>
          </table:table-cell>
          <table:table-cell table:style-name="ce48"/>
          <table:table-cell table:style-name="ce63" table:formula="of:=IF(OR(AND([.$N208]=&quot;&quot;;[.$L208]&lt;&gt;&quot;&quot;;[.$L208]&lt;=[.$U$1]);AND([.$M208]&lt;&gt;&quot;&quot;;[.Q208]&lt;100;[.$M208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9]=&quot;&quot;;&quot;&quot;;IF([.$G208]=&quot;&quot;;1;[.$G2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9]&lt;&gt;&quot;&quot;;NETWORKDAYS([.$L209];[.$M209];[$休日.$B$4:.$B$304]);&quot;&quot;)">
            <text:p/>
          </table:table-cell>
          <table:table-cell table:style-name="ce48"/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0]=&quot;&quot;;&quot;&quot;;IF([.$G209]=&quot;&quot;;1;[.$G2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0]&lt;&gt;&quot;&quot;;NETWORKDAYS([.$L210];[.$M210];[$休日.$B$4:.$B$304]);&quot;&quot;)">
            <text:p/>
          </table:table-cell>
          <table:table-cell table:style-name="ce48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1]=&quot;&quot;;&quot;&quot;;IF([.$G210]=&quot;&quot;;1;[.$G2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1]&lt;&gt;&quot;&quot;;NETWORKDAYS([.$L211];[.$M211];[$休日.$B$4:.$B$304]);&quot;&quot;)">
            <text:p/>
          </table:table-cell>
          <table:table-cell table:style-name="ce48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2]&lt;&gt;&quot;&quot;;NETWORKDAYS([.$L212];[.$M212];[$休日.$B$4:.$B$304]);&quot;&quot;)">
            <text:p/>
          </table:table-cell>
          <table:table-cell table:style-name="ce48"/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13]=&quot;&quot;;&quot;&quot;;IF([.$G212]=&quot;&quot;;1;[.$G2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3]&lt;&gt;&quot;&quot;;NETWORKDAYS([.$L213];[.$M213];[$休日.$B$4:.$B$304]);&quot;&quot;)">
            <text:p/>
          </table:table-cell>
          <table:table-cell table:style-name="ce48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/>
          <table:table-cell table:style-name="ce32" table:formula="of:=IF([.$H214]=&quot;&quot;;&quot;&quot;;IF([.$G213]=&quot;&quot;;1;[.$G2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48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/>
          <table:table-cell table:style-name="ce32" table:formula="of:=IF([.$H215]=&quot;&quot;;&quot;&quot;;IF([.$G214]=&quot;&quot;;1;[.$G2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48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48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48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25:WBS.Q394 WBS.Q13:WBS.Q14 WBS.Q25:WBS.Q26 WBS.Q84:WBS.Q92 WBS.Q40:WBS.Q44 WBS.Q50:WBS.Q74 WBS.Q94:WBS.Q116 WBS.Q120:WBS.Q1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Q118:WBS.Q1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Q117:WBS.Q1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Q119:WBS.Q1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4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321"/>
        <table:table-column table:style-name="co15" table:number-columns-repeated="21"/>
        <table:table-column table:style-name="co14" table:number-columns-repeated="16358"/>
        <table:table-row table:style-name="ro1">
          <table:table-cell table:style-name="ce317" office:value-type="string" calcext:value-type="string">
            <text:p><text:span text:style-name="T9">2020/7/7</text:span><text:span text:style-name="T10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日付</text:p>
          </table:table-cell>
          <table:table-cell table:style-name="ce318" office:value-type="string" calcext:value-type="string">
            <text:p>曜日</text:p>
          </table:table-cell>
          <table:table-cell table:style-name="ce318" office:value-type="string" calcext:value-type="string">
            <text:p>名前</text:p>
          </table:table-cell>
          <table:table-cell table:style-name="ce322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7" calcext:value-type="date">
            <text:p>2023/01/07</text:p>
          </table:table-cell>
          <table:table-cell table:style-name="ce320" table:formula="of:=WEEKDAY([.B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1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1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1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1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1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03" calcext:value-type="date">
            <text:p>2020/11/03</text:p>
          </table:table-cell>
          <table:table-cell table:style-name="ce320" table:formula="of:=WEEKDAY([.B1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23" calcext:value-type="date">
            <text:p>2020/11/23</text:p>
          </table:table-cell>
          <table:table-cell table:style-name="ce320" table:formula="of:=WEEKDAY([.B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01" calcext:value-type="date">
            <text:p>2021/01/01</text:p>
          </table:table-cell>
          <table:table-cell table:style-name="ce320" table:formula="of:=WEEKDAY([.B2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11" calcext:value-type="date">
            <text:p>2021/01/11</text:p>
          </table:table-cell>
          <table:table-cell table:style-name="ce320" table:formula="of:=WEEKDAY([.B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11" calcext:value-type="date">
            <text:p>2021/02/11</text:p>
          </table:table-cell>
          <table:table-cell table:style-name="ce320" table:formula="of:=WEEKDAY([.B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23" calcext:value-type="date">
            <text:p>2021/02/23</text:p>
          </table:table-cell>
          <table:table-cell table:style-name="ce320" table:formula="of:=WEEKDAY([.B2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3-20" calcext:value-type="date">
            <text:p>2021/03/20</text:p>
          </table:table-cell>
          <table:table-cell table:style-name="ce320" table:formula="of:=WEEKDAY([.B2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4-29" calcext:value-type="date">
            <text:p>2021/04/29</text:p>
          </table:table-cell>
          <table:table-cell table:style-name="ce320" table:formula="of:=WEEKDAY([.B2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3" calcext:value-type="date">
            <text:p>2021/05/03</text:p>
          </table:table-cell>
          <table:table-cell table:style-name="ce320" table:formula="of:=WEEKDAY([.B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4" calcext:value-type="date">
            <text:p>2021/05/04</text:p>
          </table:table-cell>
          <table:table-cell table:style-name="ce320" table:formula="of:=WEEKDAY([.B2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5" calcext:value-type="date">
            <text:p>2021/05/05</text:p>
          </table:table-cell>
          <table:table-cell table:style-name="ce320" table:formula="of:=WEEKDAY([.B2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7-19" calcext:value-type="date">
            <text:p>2021/07/19</text:p>
          </table:table-cell>
          <table:table-cell table:style-name="ce320" table:formula="of:=WEEKDAY([.B2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8-11" calcext:value-type="date">
            <text:p>2021/08/11</text:p>
          </table:table-cell>
          <table:table-cell table:style-name="ce320" table:formula="of:=WEEKDAY([.B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0" calcext:value-type="date">
            <text:p>2021/09/20</text:p>
          </table:table-cell>
          <table:table-cell table:style-name="ce320" table:formula="of:=WEEKDAY([.B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3" calcext:value-type="date">
            <text:p>2021/09/23</text:p>
          </table:table-cell>
          <table:table-cell table:style-name="ce320" table:formula="of:=WEEKDAY([.B3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0-11" calcext:value-type="date">
            <text:p>2021/10/11</text:p>
          </table:table-cell>
          <table:table-cell table:style-name="ce320" table:formula="of:=WEEKDAY([.B3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03" calcext:value-type="date">
            <text:p>2021/11/03</text:p>
          </table:table-cell>
          <table:table-cell table:style-name="ce320" table:formula="of:=WEEKDAY([.B3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23" calcext:value-type="date">
            <text:p>2021/11/23</text:p>
          </table:table-cell>
          <table:table-cell table:style-name="ce320" table:formula="of:=WEEKDAY([.B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01" calcext:value-type="date">
            <text:p>2022/01/01</text:p>
          </table:table-cell>
          <table:table-cell table:style-name="ce320" table:formula="of:=WEEKDAY([.B3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10" calcext:value-type="date">
            <text:p>2022/01/10</text:p>
          </table:table-cell>
          <table:table-cell table:style-name="ce320" table:formula="of:=WEEKDAY([.B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11" calcext:value-type="date">
            <text:p>2022/02/11</text:p>
          </table:table-cell>
          <table:table-cell table:style-name="ce320" table:formula="of:=WEEKDAY([.B3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23" calcext:value-type="date">
            <text:p>2022/02/23</text:p>
          </table:table-cell>
          <table:table-cell table:style-name="ce320" table:formula="of:=WEEKDAY([.B3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3-21" calcext:value-type="date">
            <text:p>2022/03/21</text:p>
          </table:table-cell>
          <table:table-cell table:style-name="ce320" table:formula="of:=WEEKDAY([.B4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4-29" calcext:value-type="date">
            <text:p>2022/04/29</text:p>
          </table:table-cell>
          <table:table-cell table:style-name="ce320" table:formula="of:=WEEKDAY([.B4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3" calcext:value-type="date">
            <text:p>2022/05/03</text:p>
          </table:table-cell>
          <table:table-cell table:style-name="ce320" table:formula="of:=WEEKDAY([.B4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4" calcext:value-type="date">
            <text:p>2022/05/04</text:p>
          </table:table-cell>
          <table:table-cell table:style-name="ce320" table:formula="of:=WEEKDAY([.B4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5" calcext:value-type="date">
            <text:p>2022/05/05</text:p>
          </table:table-cell>
          <table:table-cell table:style-name="ce320" table:formula="of:=WEEKDAY([.B44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7-18" calcext:value-type="date">
            <text:p>2022/07/18</text:p>
          </table:table-cell>
          <table:table-cell table:style-name="ce320" table:formula="of:=WEEKDAY([.B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8-11" calcext:value-type="date">
            <text:p>2022/08/11</text:p>
          </table:table-cell>
          <table:table-cell table:style-name="ce320" table:formula="of:=WEEKDAY([.B4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19" calcext:value-type="date">
            <text:p>2022/09/19</text:p>
          </table:table-cell>
          <table:table-cell table:style-name="ce320" table:formula="of:=WEEKDAY([.B4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23" calcext:value-type="date">
            <text:p>2022/09/23</text:p>
          </table:table-cell>
          <table:table-cell table:style-name="ce320" table:formula="of:=WEEKDAY([.B4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0-10" calcext:value-type="date">
            <text:p>2022/10/10</text:p>
          </table:table-cell>
          <table:table-cell table:style-name="ce320" table:formula="of:=WEEKDAY([.B4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03" calcext:value-type="date">
            <text:p>2022/11/03</text:p>
          </table:table-cell>
          <table:table-cell table:style-name="ce320" table:formula="of:=WEEKDAY([.B5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23" calcext:value-type="date">
            <text:p>2022/11/23</text:p>
          </table:table-cell>
          <table:table-cell table:style-name="ce320" table:formula="of:=WEEKDAY([.B5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5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2" calcext:value-type="date">
            <text:p>2023/01/02</text:p>
          </table:table-cell>
          <table:table-cell table:style-name="ce320" table:formula="of:=WEEKDAY([.B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9" calcext:value-type="date">
            <text:p>2023/01/09</text:p>
          </table:table-cell>
          <table:table-cell table:style-name="ce320" table:formula="of:=WEEKDAY([.B5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5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5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5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5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5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6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6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6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6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6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6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0-09" calcext:value-type="date">
            <text:p>2023/10/09</text:p>
          </table:table-cell>
          <table:table-cell table:style-name="ce320" table:formula="of:=WEEKDAY([.B6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03" calcext:value-type="date">
            <text:p>2023/11/03</text:p>
          </table:table-cell>
          <table:table-cell table:style-name="ce320" table:formula="of:=WEEKDAY([.B6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23" calcext:value-type="date">
            <text:p>2023/11/23</text:p>
          </table:table-cell>
          <table:table-cell table:style-name="ce320" table:formula="of:=WEEKDAY([.B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1" calcext:value-type="date">
            <text:p>2024/01/01</text:p>
          </table:table-cell>
          <table:table-cell table:style-name="ce320" table:formula="of:=WEEKDAY([.B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8" calcext:value-type="date">
            <text:p>2024/01/08</text:p>
          </table:table-cell>
          <table:table-cell table:style-name="ce320" table:formula="of:=WEEKDAY([.B7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1" calcext:value-type="date">
            <text:p>2024/02/11</text:p>
          </table:table-cell>
          <table:table-cell table:style-name="ce320" table:formula="of:=WEEKDAY([.B7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2" calcext:value-type="date">
            <text:p>2024/02/12</text:p>
          </table:table-cell>
          <table:table-cell table:style-name="ce320" table:formula="of:=WEEKDAY([.B7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23" calcext:value-type="date">
            <text:p>2024/02/23</text:p>
          </table:table-cell>
          <table:table-cell table:style-name="ce320" table:formula="of:=WEEKDAY([.B7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3-20" calcext:value-type="date">
            <text:p>2024/03/20</text:p>
          </table:table-cell>
          <table:table-cell table:style-name="ce320" table:formula="of:=WEEKDAY([.B7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4-29" calcext:value-type="date">
            <text:p>2024/04/29</text:p>
          </table:table-cell>
          <table:table-cell table:style-name="ce320" table:formula="of:=WEEKDAY([.B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3" calcext:value-type="date">
            <text:p>2024/05/03</text:p>
          </table:table-cell>
          <table:table-cell table:style-name="ce320" table:formula="of:=WEEKDAY([.B7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4" calcext:value-type="date">
            <text:p>2024/05/04</text:p>
          </table:table-cell>
          <table:table-cell table:style-name="ce320" table:formula="of:=WEEKDAY([.B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5" calcext:value-type="date">
            <text:p>2024/05/05</text:p>
          </table:table-cell>
          <table:table-cell table:style-name="ce320" table:formula="of:=WEEKDAY([.B7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6" calcext:value-type="date">
            <text:p>2024/05/06</text:p>
          </table:table-cell>
          <table:table-cell table:style-name="ce320" table:formula="of:=WEEKDAY([.B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7-15" calcext:value-type="date">
            <text:p>2024/07/15</text:p>
          </table:table-cell>
          <table:table-cell table:style-name="ce320" table:formula="of:=WEEKDAY([.B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1" calcext:value-type="date">
            <text:p>2024/08/11</text:p>
          </table:table-cell>
          <table:table-cell table:style-name="ce320" table:formula="of:=WEEKDAY([.B8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2" calcext:value-type="date">
            <text:p>2024/08/12</text:p>
          </table:table-cell>
          <table:table-cell table:style-name="ce320" table:formula="of:=WEEKDAY([.B8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16" calcext:value-type="date">
            <text:p>2024/09/16</text:p>
          </table:table-cell>
          <table:table-cell table:style-name="ce320" table:formula="of:=WEEKDAY([.B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2" calcext:value-type="date">
            <text:p>2024/09/22</text:p>
          </table:table-cell>
          <table:table-cell table:style-name="ce320" table:formula="of:=WEEKDAY([.B8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3" calcext:value-type="date">
            <text:p>2024/09/23</text:p>
          </table:table-cell>
          <table:table-cell table:style-name="ce320" table:formula="of:=WEEKDAY([.B8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0-14" calcext:value-type="date">
            <text:p>2024/10/14</text:p>
          </table:table-cell>
          <table:table-cell table:style-name="ce320" table:formula="of:=WEEKDAY([.B8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3" calcext:value-type="date">
            <text:p>2024/11/03</text:p>
          </table:table-cell>
          <table:table-cell table:style-name="ce320" table:formula="of:=WEEKDAY([.B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4" calcext:value-type="date">
            <text:p>2024/11/04</text:p>
          </table:table-cell>
          <table:table-cell table:style-name="ce320" table:formula="of:=WEEKDAY([.B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23" calcext:value-type="date">
            <text:p>2024/11/23</text:p>
          </table:table-cell>
          <table:table-cell table:style-name="ce320" table:formula="of:=WEEKDAY([.B8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01" calcext:value-type="date">
            <text:p>2025/01/01</text:p>
          </table:table-cell>
          <table:table-cell table:style-name="ce320" table:formula="of:=WEEKDAY([.B9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13" calcext:value-type="date">
            <text:p>2025/01/13</text:p>
          </table:table-cell>
          <table:table-cell table:style-name="ce320" table:formula="of:=WEEKDAY([.B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11" calcext:value-type="date">
            <text:p>2025/02/11</text:p>
          </table:table-cell>
          <table:table-cell table:style-name="ce320" table:formula="of:=WEEKDAY([.B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3" calcext:value-type="date">
            <text:p>2025/02/23</text:p>
          </table:table-cell>
          <table:table-cell table:style-name="ce320" table:formula="of:=WEEKDAY([.B9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4" calcext:value-type="date">
            <text:p>2025/02/24</text:p>
          </table:table-cell>
          <table:table-cell table:style-name="ce320" table:formula="of:=WEEKDAY([.B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3-20" calcext:value-type="date">
            <text:p>2025/03/20</text:p>
          </table:table-cell>
          <table:table-cell table:style-name="ce320" table:formula="of:=WEEKDAY([.B9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4-29" calcext:value-type="date">
            <text:p>2025/04/29</text:p>
          </table:table-cell>
          <table:table-cell table:style-name="ce320" table:formula="of:=WEEKDAY([.B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3" calcext:value-type="date">
            <text:p>2025/05/03</text:p>
          </table:table-cell>
          <table:table-cell table:style-name="ce320" table:formula="of:=WEEKDAY([.B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4" calcext:value-type="date">
            <text:p>2025/05/04</text:p>
          </table:table-cell>
          <table:table-cell table:style-name="ce320" table:formula="of:=WEEKDAY([.B9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5" calcext:value-type="date">
            <text:p>2025/05/05</text:p>
          </table:table-cell>
          <table:table-cell table:style-name="ce320" table:formula="of:=WEEKDAY([.B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6" calcext:value-type="date">
            <text:p>2025/05/06</text:p>
          </table:table-cell>
          <table:table-cell table:style-name="ce320" table:formula="of:=WEEKDAY([.B1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7-21" calcext:value-type="date">
            <text:p>2025/07/21</text:p>
          </table:table-cell>
          <table:table-cell table:style-name="ce320" table:formula="of:=WEEKDAY([.B1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8-11" calcext:value-type="date">
            <text:p>2025/08/11</text:p>
          </table:table-cell>
          <table:table-cell table:style-name="ce320" table:formula="of:=WEEKDAY([.B1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15" calcext:value-type="date">
            <text:p>2025/09/15</text:p>
          </table:table-cell>
          <table:table-cell table:style-name="ce320" table:formula="of:=WEEKDAY([.B10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23" calcext:value-type="date">
            <text:p>2025/09/23</text:p>
          </table:table-cell>
          <table:table-cell table:style-name="ce320" table:formula="of:=WEEKDAY([.B1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0-13" calcext:value-type="date">
            <text:p>2025/10/13</text:p>
          </table:table-cell>
          <table:table-cell table:style-name="ce320" table:formula="of:=WEEKDAY([.B10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03" calcext:value-type="date">
            <text:p>2025/11/03</text:p>
          </table:table-cell>
          <table:table-cell table:style-name="ce320" table:formula="of:=WEEKDAY([.B10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3" calcext:value-type="date">
            <text:p>2025/11/23</text:p>
          </table:table-cell>
          <table:table-cell table:style-name="ce320" table:formula="of:=WEEKDAY([.B10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4" calcext:value-type="date">
            <text:p>2025/11/24</text:p>
          </table:table-cell>
          <table:table-cell table:style-name="ce320" table:formula="of:=WEEKDAY([.B10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01" calcext:value-type="date">
            <text:p>2026/01/01</text:p>
          </table:table-cell>
          <table:table-cell table:style-name="ce320" table:formula="of:=WEEKDAY([.B10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12" calcext:value-type="date">
            <text:p>2026/01/12</text:p>
          </table:table-cell>
          <table:table-cell table:style-name="ce320" table:formula="of:=WEEKDAY([.B1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11" calcext:value-type="date">
            <text:p>2026/02/11</text:p>
          </table:table-cell>
          <table:table-cell table:style-name="ce320" table:formula="of:=WEEKDAY([.B11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23" calcext:value-type="date">
            <text:p>2026/02/23</text:p>
          </table:table-cell>
          <table:table-cell table:style-name="ce320" table:formula="of:=WEEKDAY([.B11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3-20" calcext:value-type="date">
            <text:p>2026/03/20</text:p>
          </table:table-cell>
          <table:table-cell table:style-name="ce320" table:formula="of:=WEEKDAY([.B11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4-29" calcext:value-type="date">
            <text:p>2026/04/29</text:p>
          </table:table-cell>
          <table:table-cell table:style-name="ce320" table:formula="of:=WEEKDAY([.B11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3" calcext:value-type="date">
            <text:p>2026/05/03</text:p>
          </table:table-cell>
          <table:table-cell table:style-name="ce320" table:formula="of:=WEEKDAY([.B1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4" calcext:value-type="date">
            <text:p>2026/05/04</text:p>
          </table:table-cell>
          <table:table-cell table:style-name="ce320" table:formula="of:=WEEKDAY([.B1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5" calcext:value-type="date">
            <text:p>2026/05/05</text:p>
          </table:table-cell>
          <table:table-cell table:style-name="ce320" table:formula="of:=WEEKDAY([.B11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6" calcext:value-type="date">
            <text:p>2026/05/06</text:p>
          </table:table-cell>
          <table:table-cell table:style-name="ce320" table:formula="of:=WEEKDAY([.B11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7-20" calcext:value-type="date">
            <text:p>2026/07/20</text:p>
          </table:table-cell>
          <table:table-cell table:style-name="ce320" table:formula="of:=WEEKDAY([.B1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8-11" calcext:value-type="date">
            <text:p>2026/08/11</text:p>
          </table:table-cell>
          <table:table-cell table:style-name="ce320" table:formula="of:=WEEKDAY([.B12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1" calcext:value-type="date">
            <text:p>2026/09/21</text:p>
          </table:table-cell>
          <table:table-cell table:style-name="ce320" table:formula="of:=WEEKDAY([.B1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2" calcext:value-type="date">
            <text:p>2026/09/22</text:p>
          </table:table-cell>
          <table:table-cell table:style-name="ce320" table:formula="of:=WEEKDAY([.B12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3" calcext:value-type="date">
            <text:p>2026/09/23</text:p>
          </table:table-cell>
          <table:table-cell table:style-name="ce320" table:formula="of:=WEEKDAY([.B12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0-12" calcext:value-type="date">
            <text:p>2026/10/12</text:p>
          </table:table-cell>
          <table:table-cell table:style-name="ce320" table:formula="of:=WEEKDAY([.B12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03" calcext:value-type="date">
            <text:p>2026/11/03</text:p>
          </table:table-cell>
          <table:table-cell table:style-name="ce320" table:formula="of:=WEEKDAY([.B12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23" calcext:value-type="date">
            <text:p>2026/11/23</text:p>
          </table:table-cell>
          <table:table-cell table:style-name="ce320" table:formula="of:=WEEKDAY([.B1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01" calcext:value-type="date">
            <text:p>2027/01/01</text:p>
          </table:table-cell>
          <table:table-cell table:style-name="ce320" table:formula="of:=WEEKDAY([.B12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11" calcext:value-type="date">
            <text:p>2027/01/11</text:p>
          </table:table-cell>
          <table:table-cell table:style-name="ce320" table:formula="of:=WEEKDAY([.B1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11" calcext:value-type="date">
            <text:p>2027/02/11</text:p>
          </table:table-cell>
          <table:table-cell table:style-name="ce320" table:formula="of:=WEEKDAY([.B12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23" calcext:value-type="date">
            <text:p>2027/02/23</text:p>
          </table:table-cell>
          <table:table-cell table:style-name="ce320" table:formula="of:=WEEKDAY([.B13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1" calcext:value-type="date">
            <text:p>2027/03/21</text:p>
          </table:table-cell>
          <table:table-cell table:style-name="ce320" table:formula="of:=WEEKDAY([.B13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2" calcext:value-type="date">
            <text:p>2027/03/22</text:p>
          </table:table-cell>
          <table:table-cell table:style-name="ce320" table:formula="of:=WEEKDAY([.B13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4-29" calcext:value-type="date">
            <text:p>2027/04/29</text:p>
          </table:table-cell>
          <table:table-cell table:style-name="ce320" table:formula="of:=WEEKDAY([.B13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3" calcext:value-type="date">
            <text:p>2027/05/03</text:p>
          </table:table-cell>
          <table:table-cell table:style-name="ce320" table:formula="of:=WEEKDAY([.B13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4" calcext:value-type="date">
            <text:p>2027/05/04</text:p>
          </table:table-cell>
          <table:table-cell table:style-name="ce320" table:formula="of:=WEEKDAY([.B1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5" calcext:value-type="date">
            <text:p>2027/05/05</text:p>
          </table:table-cell>
          <table:table-cell table:style-name="ce320" table:formula="of:=WEEKDAY([.B136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7-19" calcext:value-type="date">
            <text:p>2027/07/19</text:p>
          </table:table-cell>
          <table:table-cell table:style-name="ce320" table:formula="of:=WEEKDAY([.B1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8-11" calcext:value-type="date">
            <text:p>2027/08/11</text:p>
          </table:table-cell>
          <table:table-cell table:style-name="ce320" table:formula="of:=WEEKDAY([.B13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0" calcext:value-type="date">
            <text:p>2027/09/20</text:p>
          </table:table-cell>
          <table:table-cell table:style-name="ce320" table:formula="of:=WEEKDAY([.B1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3" calcext:value-type="date">
            <text:p>2027/09/23</text:p>
          </table:table-cell>
          <table:table-cell table:style-name="ce320" table:formula="of:=WEEKDAY([.B14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0-11" calcext:value-type="date">
            <text:p>2027/10/11</text:p>
          </table:table-cell>
          <table:table-cell table:style-name="ce320" table:formula="of:=WEEKDAY([.B14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03" calcext:value-type="date">
            <text:p>2027/11/03</text:p>
          </table:table-cell>
          <table:table-cell table:style-name="ce320" table:formula="of:=WEEKDAY([.B1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23" calcext:value-type="date">
            <text:p>2027/11/23</text:p>
          </table:table-cell>
          <table:table-cell table:style-name="ce320" table:formula="of:=WEEKDAY([.B14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01" calcext:value-type="date">
            <text:p>2028/01/01</text:p>
          </table:table-cell>
          <table:table-cell table:style-name="ce320" table:formula="of:=WEEKDAY([.B14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10" calcext:value-type="date">
            <text:p>2028/01/10</text:p>
          </table:table-cell>
          <table:table-cell table:style-name="ce320" table:formula="of:=WEEKDAY([.B1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11" calcext:value-type="date">
            <text:p>2028/02/11</text:p>
          </table:table-cell>
          <table:table-cell table:style-name="ce320" table:formula="of:=WEEKDAY([.B14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23" calcext:value-type="date">
            <text:p>2028/02/23</text:p>
          </table:table-cell>
          <table:table-cell table:style-name="ce320" table:formula="of:=WEEKDAY([.B14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3-20" calcext:value-type="date">
            <text:p>2028/03/20</text:p>
          </table:table-cell>
          <table:table-cell table:style-name="ce320" table:formula="of:=WEEKDAY([.B1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4-29" calcext:value-type="date">
            <text:p>2028/04/29</text:p>
          </table:table-cell>
          <table:table-cell table:style-name="ce320" table:formula="of:=WEEKDAY([.B14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3" calcext:value-type="date">
            <text:p>2028/05/03</text:p>
          </table:table-cell>
          <table:table-cell table:style-name="ce320" table:formula="of:=WEEKDAY([.B1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4" calcext:value-type="date">
            <text:p>2028/05/04</text:p>
          </table:table-cell>
          <table:table-cell table:style-name="ce320" table:formula="of:=WEEKDAY([.B15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5" calcext:value-type="date">
            <text:p>2028/05/05</text:p>
          </table:table-cell>
          <table:table-cell table:style-name="ce320" table:formula="of:=WEEKDAY([.B15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7-17" calcext:value-type="date">
            <text:p>2028/07/17</text:p>
          </table:table-cell>
          <table:table-cell table:style-name="ce320" table:formula="of:=WEEKDAY([.B1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8-11" calcext:value-type="date">
            <text:p>2028/08/11</text:p>
          </table:table-cell>
          <table:table-cell table:style-name="ce320" table:formula="of:=WEEKDAY([.B15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18" calcext:value-type="date">
            <text:p>2028/09/18</text:p>
          </table:table-cell>
          <table:table-cell table:style-name="ce320" table:formula="of:=WEEKDAY([.B15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22" calcext:value-type="date">
            <text:p>2028/09/22</text:p>
          </table:table-cell>
          <table:table-cell table:style-name="ce320" table:formula="of:=WEEKDAY([.B15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0-09" calcext:value-type="date">
            <text:p>2028/10/09</text:p>
          </table:table-cell>
          <table:table-cell table:style-name="ce320" table:formula="of:=WEEKDAY([.B15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03" calcext:value-type="date">
            <text:p>2028/11/03</text:p>
          </table:table-cell>
          <table:table-cell table:style-name="ce320" table:formula="of:=WEEKDAY([.B15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23" calcext:value-type="date">
            <text:p>2028/11/23</text:p>
          </table:table-cell>
          <table:table-cell table:style-name="ce320" table:formula="of:=WEEKDAY([.B1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1" calcext:value-type="date">
            <text:p>2029/01/01</text:p>
          </table:table-cell>
          <table:table-cell table:style-name="ce320" table:formula="of:=WEEKDAY([.B16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8" calcext:value-type="date">
            <text:p>2029/01/08</text:p>
          </table:table-cell>
          <table:table-cell table:style-name="ce320" table:formula="of:=WEEKDAY([.B1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1" calcext:value-type="date">
            <text:p>2029/02/11</text:p>
          </table:table-cell>
          <table:table-cell table:style-name="ce320" table:formula="of:=WEEKDAY([.B16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2" calcext:value-type="date">
            <text:p>2029/02/12</text:p>
          </table:table-cell>
          <table:table-cell table:style-name="ce320" table:formula="of:=WEEKDAY([.B1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23" calcext:value-type="date">
            <text:p>2029/02/23</text:p>
          </table:table-cell>
          <table:table-cell table:style-name="ce320" table:formula="of:=WEEKDAY([.B16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3-20" calcext:value-type="date">
            <text:p>2029/03/20</text:p>
          </table:table-cell>
          <table:table-cell table:style-name="ce320" table:formula="of:=WEEKDAY([.B16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29" calcext:value-type="date">
            <text:p>2029/04/29</text:p>
          </table:table-cell>
          <table:table-cell table:style-name="ce320" table:formula="of:=WEEKDAY([.B16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30" calcext:value-type="date">
            <text:p>2029/04/30</text:p>
          </table:table-cell>
          <table:table-cell table:style-name="ce320" table:formula="of:=WEEKDAY([.B16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3" calcext:value-type="date">
            <text:p>2029/05/03</text:p>
          </table:table-cell>
          <table:table-cell table:style-name="ce320" table:formula="of:=WEEKDAY([.B1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4" calcext:value-type="date">
            <text:p>2029/05/04</text:p>
          </table:table-cell>
          <table:table-cell table:style-name="ce320" table:formula="of:=WEEKDAY([.B169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5" calcext:value-type="date">
            <text:p>2029/05/05</text:p>
          </table:table-cell>
          <table:table-cell table:style-name="ce320" table:formula="of:=WEEKDAY([.B17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7-16" calcext:value-type="date">
            <text:p>2029/07/16</text:p>
          </table:table-cell>
          <table:table-cell table:style-name="ce320" table:formula="of:=WEEKDAY([.B1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8-11" calcext:value-type="date">
            <text:p>2029/08/11</text:p>
          </table:table-cell>
          <table:table-cell table:style-name="ce320" table:formula="of:=WEEKDAY([.B17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17" calcext:value-type="date">
            <text:p>2029/09/17</text:p>
          </table:table-cell>
          <table:table-cell table:style-name="ce320" table:formula="of:=WEEKDAY([.B17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3" calcext:value-type="date">
            <text:p>2029/09/23</text:p>
          </table:table-cell>
          <table:table-cell table:style-name="ce320" table:formula="of:=WEEKDAY([.B1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4" calcext:value-type="date">
            <text:p>2029/09/24</text:p>
          </table:table-cell>
          <table:table-cell table:style-name="ce320" table:formula="of:=WEEKDAY([.B1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0-08" calcext:value-type="date">
            <text:p>2029/10/08</text:p>
          </table:table-cell>
          <table:table-cell table:style-name="ce320" table:formula="of:=WEEKDAY([.B17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03" calcext:value-type="date">
            <text:p>2029/11/03</text:p>
          </table:table-cell>
          <table:table-cell table:style-name="ce320" table:formula="of:=WEEKDAY([.B1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23" calcext:value-type="date">
            <text:p>2029/11/23</text:p>
          </table:table-cell>
          <table:table-cell table:style-name="ce320" table:formula="of:=WEEKDAY([.B17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01" calcext:value-type="date">
            <text:p>2030/01/01</text:p>
          </table:table-cell>
          <table:table-cell table:style-name="ce320" table:formula="of:=WEEKDAY([.B17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14" calcext:value-type="date">
            <text:p>2030/01/14</text:p>
          </table:table-cell>
          <table:table-cell table:style-name="ce320" table:formula="of:=WEEKDAY([.B1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11" calcext:value-type="date">
            <text:p>2030/02/11</text:p>
          </table:table-cell>
          <table:table-cell table:style-name="ce320" table:formula="of:=WEEKDAY([.B1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23" calcext:value-type="date">
            <text:p>2030/02/23</text:p>
          </table:table-cell>
          <table:table-cell table:style-name="ce320" table:formula="of:=WEEKDAY([.B18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3-20" calcext:value-type="date">
            <text:p>2030/03/20</text:p>
          </table:table-cell>
          <table:table-cell table:style-name="ce320" table:formula="of:=WEEKDAY([.B18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4-29" calcext:value-type="date">
            <text:p>2030/04/29</text:p>
          </table:table-cell>
          <table:table-cell table:style-name="ce320" table:formula="of:=WEEKDAY([.B1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3" calcext:value-type="date">
            <text:p>2030/05/03</text:p>
          </table:table-cell>
          <table:table-cell table:style-name="ce320" table:formula="of:=WEEKDAY([.B185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4" calcext:value-type="date">
            <text:p>2030/05/04</text:p>
          </table:table-cell>
          <table:table-cell table:style-name="ce320" table:formula="of:=WEEKDAY([.B18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5" calcext:value-type="date">
            <text:p>2030/05/05</text:p>
          </table:table-cell>
          <table:table-cell table:style-name="ce320" table:formula="of:=WEEKDAY([.B1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6" calcext:value-type="date">
            <text:p>2030/05/06</text:p>
          </table:table-cell>
          <table:table-cell table:style-name="ce320" table:formula="of:=WEEKDAY([.B1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7-15" calcext:value-type="date">
            <text:p>2030/07/15</text:p>
          </table:table-cell>
          <table:table-cell table:style-name="ce320" table:formula="of:=WEEKDAY([.B1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1" calcext:value-type="date">
            <text:p>2030/08/11</text:p>
          </table:table-cell>
          <table:table-cell table:style-name="ce320" table:formula="of:=WEEKDAY([.B19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2" calcext:value-type="date">
            <text:p>2030/08/12</text:p>
          </table:table-cell>
          <table:table-cell table:style-name="ce320" table:formula="of:=WEEKDAY([.B1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16" calcext:value-type="date">
            <text:p>2030/09/16</text:p>
          </table:table-cell>
          <table:table-cell table:style-name="ce320" table:formula="of:=WEEKDAY([.B19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23" calcext:value-type="date">
            <text:p>2030/09/23</text:p>
          </table:table-cell>
          <table:table-cell table:style-name="ce320" table:formula="of:=WEEKDAY([.B19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0-14" calcext:value-type="date">
            <text:p>2030/10/14</text:p>
          </table:table-cell>
          <table:table-cell table:style-name="ce320" table:formula="of:=WEEKDAY([.B1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3" calcext:value-type="date">
            <text:p>2030/11/03</text:p>
          </table:table-cell>
          <table:table-cell table:style-name="ce320" table:formula="of:=WEEKDAY([.B19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4" calcext:value-type="date">
            <text:p>2030/11/04</text:p>
          </table:table-cell>
          <table:table-cell table:style-name="ce320" table:formula="of:=WEEKDAY([.B19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23" calcext:value-type="date">
            <text:p>2030/11/23</text:p>
          </table:table-cell>
          <table:table-cell table:style-name="ce320" table:formula="of:=WEEKDAY([.B1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01" calcext:value-type="date">
            <text:p>2031/01/01</text:p>
          </table:table-cell>
          <table:table-cell table:style-name="ce320" table:formula="of:=WEEKDAY([.B19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13" calcext:value-type="date">
            <text:p>2031/01/13</text:p>
          </table:table-cell>
          <table:table-cell table:style-name="ce320" table:formula="of:=WEEKDAY([.B1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11" calcext:value-type="date">
            <text:p>2031/02/11</text:p>
          </table:table-cell>
          <table:table-cell table:style-name="ce320" table:formula="of:=WEEKDAY([.B2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3" calcext:value-type="date">
            <text:p>2031/02/23</text:p>
          </table:table-cell>
          <table:table-cell table:style-name="ce320" table:formula="of:=WEEKDAY([.B20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4" calcext:value-type="date">
            <text:p>2031/02/24</text:p>
          </table:table-cell>
          <table:table-cell table:style-name="ce320" table:formula="of:=WEEKDAY([.B2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3-21" calcext:value-type="date">
            <text:p>2031/03/21</text:p>
          </table:table-cell>
          <table:table-cell table:style-name="ce320" table:formula="of:=WEEKDAY([.B20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4-29" calcext:value-type="date">
            <text:p>2031/04/29</text:p>
          </table:table-cell>
          <table:table-cell table:style-name="ce320" table:formula="of:=WEEKDAY([.B2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3" calcext:value-type="date">
            <text:p>2031/05/03</text:p>
          </table:table-cell>
          <table:table-cell table:style-name="ce320" table:formula="of:=WEEKDAY([.B20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4" calcext:value-type="date">
            <text:p>2031/05/04</text:p>
          </table:table-cell>
          <table:table-cell table:style-name="ce320" table:formula="of:=WEEKDAY([.B20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5" calcext:value-type="date">
            <text:p>2031/05/05</text:p>
          </table:table-cell>
          <table:table-cell table:style-name="ce320" table:formula="of:=WEEKDAY([.B20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6" calcext:value-type="date">
            <text:p>2031/05/06</text:p>
          </table:table-cell>
          <table:table-cell table:style-name="ce320" table:formula="of:=WEEKDAY([.B20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7-21" calcext:value-type="date">
            <text:p>2031/07/21</text:p>
          </table:table-cell>
          <table:table-cell table:style-name="ce320" table:formula="of:=WEEKDAY([.B20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8-11" calcext:value-type="date">
            <text:p>2031/08/11</text:p>
          </table:table-cell>
          <table:table-cell table:style-name="ce320" table:formula="of:=WEEKDAY([.B2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15" calcext:value-type="date">
            <text:p>2031/09/15</text:p>
          </table:table-cell>
          <table:table-cell table:style-name="ce320" table:formula="of:=WEEKDAY([.B21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23" calcext:value-type="date">
            <text:p>2031/09/23</text:p>
          </table:table-cell>
          <table:table-cell table:style-name="ce320" table:formula="of:=WEEKDAY([.B21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0-13" calcext:value-type="date">
            <text:p>2031/10/13</text:p>
          </table:table-cell>
          <table:table-cell table:style-name="ce320" table:formula="of:=WEEKDAY([.B2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03" calcext:value-type="date">
            <text:p>2031/11/03</text:p>
          </table:table-cell>
          <table:table-cell table:style-name="ce320" table:formula="of:=WEEKDAY([.B21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3" calcext:value-type="date">
            <text:p>2031/11/23</text:p>
          </table:table-cell>
          <table:table-cell table:style-name="ce320" table:formula="of:=WEEKDAY([.B2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4" calcext:value-type="date">
            <text:p>2031/11/24</text:p>
          </table:table-cell>
          <table:table-cell table:style-name="ce320" table:formula="of:=WEEKDAY([.B2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01" calcext:value-type="date">
            <text:p>2032/01/01</text:p>
          </table:table-cell>
          <table:table-cell table:style-name="ce320" table:formula="of:=WEEKDAY([.B21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12" calcext:value-type="date">
            <text:p>2032/01/12</text:p>
          </table:table-cell>
          <table:table-cell table:style-name="ce320" table:formula="of:=WEEKDAY([.B21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11" calcext:value-type="date">
            <text:p>2032/02/11</text:p>
          </table:table-cell>
          <table:table-cell table:style-name="ce320" table:formula="of:=WEEKDAY([.B21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23" calcext:value-type="date">
            <text:p>2032/02/23</text:p>
          </table:table-cell>
          <table:table-cell table:style-name="ce320" table:formula="of:=WEEKDAY([.B22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3-20" calcext:value-type="date">
            <text:p>2032/03/20</text:p>
          </table:table-cell>
          <table:table-cell table:style-name="ce320" table:formula="of:=WEEKDAY([.B221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4-29" calcext:value-type="date">
            <text:p>2032/04/29</text:p>
          </table:table-cell>
          <table:table-cell table:style-name="ce320" table:formula="of:=WEEKDAY([.B2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3" calcext:value-type="date">
            <text:p>2032/05/03</text:p>
          </table:table-cell>
          <table:table-cell table:style-name="ce320" table:formula="of:=WEEKDAY([.B22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4" calcext:value-type="date">
            <text:p>2032/05/04</text:p>
          </table:table-cell>
          <table:table-cell table:style-name="ce320" table:formula="of:=WEEKDAY([.B22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5" calcext:value-type="date">
            <text:p>2032/05/05</text:p>
          </table:table-cell>
          <table:table-cell table:style-name="ce320" table:formula="of:=WEEKDAY([.B225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7-19" calcext:value-type="date">
            <text:p>2032/07/19</text:p>
          </table:table-cell>
          <table:table-cell table:style-name="ce320" table:formula="of:=WEEKDAY([.B2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8-11" calcext:value-type="date">
            <text:p>2032/08/11</text:p>
          </table:table-cell>
          <table:table-cell table:style-name="ce320" table:formula="of:=WEEKDAY([.B22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0" calcext:value-type="date">
            <text:p>2032/09/20</text:p>
          </table:table-cell>
          <table:table-cell table:style-name="ce320" table:formula="of:=WEEKDAY([.B2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1" calcext:value-type="date">
            <text:p>2032/09/21</text:p>
          </table:table-cell>
          <table:table-cell table:style-name="ce320" table:formula="of:=WEEKDAY([.B22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2" calcext:value-type="date">
            <text:p>2032/09/22</text:p>
          </table:table-cell>
          <table:table-cell table:style-name="ce320" table:formula="of:=WEEKDAY([.B2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0-11" calcext:value-type="date">
            <text:p>2032/10/11</text:p>
          </table:table-cell>
          <table:table-cell table:style-name="ce320" table:formula="of:=WEEKDAY([.B2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03" calcext:value-type="date">
            <text:p>2032/11/03</text:p>
          </table:table-cell>
          <table:table-cell table:style-name="ce320" table:formula="of:=WEEKDAY([.B23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23" calcext:value-type="date">
            <text:p>2032/11/23</text:p>
          </table:table-cell>
          <table:table-cell table:style-name="ce320" table:formula="of:=WEEKDAY([.B23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01" calcext:value-type="date">
            <text:p>2033/01/01</text:p>
          </table:table-cell>
          <table:table-cell table:style-name="ce320" table:formula="of:=WEEKDAY([.B23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10" calcext:value-type="date">
            <text:p>2033/01/10</text:p>
          </table:table-cell>
          <table:table-cell table:style-name="ce320" table:formula="of:=WEEKDAY([.B23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11" calcext:value-type="date">
            <text:p>2033/02/11</text:p>
          </table:table-cell>
          <table:table-cell table:style-name="ce320" table:formula="of:=WEEKDAY([.B23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23" calcext:value-type="date">
            <text:p>2033/02/23</text:p>
          </table:table-cell>
          <table:table-cell table:style-name="ce320" table:formula="of:=WEEKDAY([.B23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0" calcext:value-type="date">
            <text:p>2033/03/20</text:p>
          </table:table-cell>
          <table:table-cell table:style-name="ce320" table:formula="of:=WEEKDAY([.B23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1" calcext:value-type="date">
            <text:p>2033/03/21</text:p>
          </table:table-cell>
          <table:table-cell table:style-name="ce320" table:formula="of:=WEEKDAY([.B2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4-29" calcext:value-type="date">
            <text:p>2033/04/29</text:p>
          </table:table-cell>
          <table:table-cell table:style-name="ce320" table:formula="of:=WEEKDAY([.B24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3" calcext:value-type="date">
            <text:p>2033/05/03</text:p>
          </table:table-cell>
          <table:table-cell table:style-name="ce320" table:formula="of:=WEEKDAY([.B241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4" calcext:value-type="date">
            <text:p>2033/05/04</text:p>
          </table:table-cell>
          <table:table-cell table:style-name="ce320" table:formula="of:=WEEKDAY([.B2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5" calcext:value-type="date">
            <text:p>2033/05/05</text:p>
          </table:table-cell>
          <table:table-cell table:style-name="ce320" table:formula="of:=WEEKDAY([.B24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7-18" calcext:value-type="date">
            <text:p>2033/07/18</text:p>
          </table:table-cell>
          <table:table-cell table:style-name="ce320" table:formula="of:=WEEKDAY([.B24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8-11" calcext:value-type="date">
            <text:p>2033/08/11</text:p>
          </table:table-cell>
          <table:table-cell table:style-name="ce320" table:formula="of:=WEEKDAY([.B24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19" calcext:value-type="date">
            <text:p>2033/09/19</text:p>
          </table:table-cell>
          <table:table-cell table:style-name="ce320" table:formula="of:=WEEKDAY([.B24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23" calcext:value-type="date">
            <text:p>2033/09/23</text:p>
          </table:table-cell>
          <table:table-cell table:style-name="ce320" table:formula="of:=WEEKDAY([.B24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0-10" calcext:value-type="date">
            <text:p>2033/10/10</text:p>
          </table:table-cell>
          <table:table-cell table:style-name="ce320" table:formula="of:=WEEKDAY([.B2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03" calcext:value-type="date">
            <text:p>2033/11/03</text:p>
          </table:table-cell>
          <table:table-cell table:style-name="ce320" table:formula="of:=WEEKDAY([.B24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23" calcext:value-type="date">
            <text:p>2033/11/23</text:p>
          </table:table-cell>
          <table:table-cell table:style-name="ce320" table:formula="of:=WEEKDAY([.B2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1" calcext:value-type="date">
            <text:p>2034/01/01</text:p>
          </table:table-cell>
          <table:table-cell table:style-name="ce320" table:formula="of:=WEEKDAY([.B25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2" calcext:value-type="date">
            <text:p>2034/01/02</text:p>
          </table:table-cell>
          <table:table-cell table:style-name="ce320" table:formula="of:=WEEKDAY([.B25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9" calcext:value-type="date">
            <text:p>2034/01/09</text:p>
          </table:table-cell>
          <table:table-cell table:style-name="ce320" table:formula="of:=WEEKDAY([.B2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11" calcext:value-type="date">
            <text:p>2034/02/11</text:p>
          </table:table-cell>
          <table:table-cell table:style-name="ce320" table:formula="of:=WEEKDAY([.B25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23" calcext:value-type="date">
            <text:p>2034/02/23</text:p>
          </table:table-cell>
          <table:table-cell table:style-name="ce320" table:formula="of:=WEEKDAY([.B25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3-20" calcext:value-type="date">
            <text:p>2034/03/20</text:p>
          </table:table-cell>
          <table:table-cell table:style-name="ce320" table:formula="of:=WEEKDAY([.B25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4-29" calcext:value-type="date">
            <text:p>2034/04/29</text:p>
          </table:table-cell>
          <table:table-cell table:style-name="ce320" table:formula="of:=WEEKDAY([.B25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3" calcext:value-type="date">
            <text:p>2034/05/03</text:p>
          </table:table-cell>
          <table:table-cell table:style-name="ce320" table:formula="of:=WEEKDAY([.B25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4" calcext:value-type="date">
            <text:p>2034/05/04</text:p>
          </table:table-cell>
          <table:table-cell table:style-name="ce320" table:formula="of:=WEEKDAY([.B2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5" calcext:value-type="date">
            <text:p>2034/05/05</text:p>
          </table:table-cell>
          <table:table-cell table:style-name="ce320" table:formula="of:=WEEKDAY([.B26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7-17" calcext:value-type="date">
            <text:p>2034/07/17</text:p>
          </table:table-cell>
          <table:table-cell table:style-name="ce320" table:formula="of:=WEEKDAY([.B2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8-11" calcext:value-type="date">
            <text:p>2034/08/11</text:p>
          </table:table-cell>
          <table:table-cell table:style-name="ce320" table:formula="of:=WEEKDAY([.B26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18" calcext:value-type="date">
            <text:p>2034/09/18</text:p>
          </table:table-cell>
          <table:table-cell table:style-name="ce320" table:formula="of:=WEEKDAY([.B2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23" calcext:value-type="date">
            <text:p>2034/09/23</text:p>
          </table:table-cell>
          <table:table-cell table:style-name="ce320" table:formula="of:=WEEKDAY([.B26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0-09" calcext:value-type="date">
            <text:p>2034/10/09</text:p>
          </table:table-cell>
          <table:table-cell table:style-name="ce320" table:formula="of:=WEEKDAY([.B26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03" calcext:value-type="date">
            <text:p>2034/11/03</text:p>
          </table:table-cell>
          <table:table-cell table:style-name="ce320" table:formula="of:=WEEKDAY([.B26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23" calcext:value-type="date">
            <text:p>2034/11/23</text:p>
          </table:table-cell>
          <table:table-cell table:style-name="ce320" table:formula="of:=WEEKDAY([.B26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1" calcext:value-type="date">
            <text:p>2035/01/01</text:p>
          </table:table-cell>
          <table:table-cell table:style-name="ce320" table:formula="of:=WEEKDAY([.B26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8" calcext:value-type="date">
            <text:p>2035/01/08</text:p>
          </table:table-cell>
          <table:table-cell table:style-name="ce320" table:formula="of:=WEEKDAY([.B2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1" calcext:value-type="date">
            <text:p>2035/02/11</text:p>
          </table:table-cell>
          <table:table-cell table:style-name="ce320" table:formula="of:=WEEKDAY([.B27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2" calcext:value-type="date">
            <text:p>2035/02/12</text:p>
          </table:table-cell>
          <table:table-cell table:style-name="ce320" table:formula="of:=WEEKDAY([.B2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23" calcext:value-type="date">
            <text:p>2035/02/23</text:p>
          </table:table-cell>
          <table:table-cell table:style-name="ce320" table:formula="of:=WEEKDAY([.B27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3-21" calcext:value-type="date">
            <text:p>2035/03/21</text:p>
          </table:table-cell>
          <table:table-cell table:style-name="ce320" table:formula="of:=WEEKDAY([.B27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29" calcext:value-type="date">
            <text:p>2035/04/29</text:p>
          </table:table-cell>
          <table:table-cell table:style-name="ce320" table:formula="of:=WEEKDAY([.B2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30" calcext:value-type="date">
            <text:p>2035/04/30</text:p>
          </table:table-cell>
          <table:table-cell table:style-name="ce320" table:formula="of:=WEEKDAY([.B2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3" calcext:value-type="date">
            <text:p>2035/05/03</text:p>
          </table:table-cell>
          <table:table-cell table:style-name="ce320" table:formula="of:=WEEKDAY([.B27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4" calcext:value-type="date">
            <text:p>2035/05/04</text:p>
          </table:table-cell>
          <table:table-cell table:style-name="ce320" table:formula="of:=WEEKDAY([.B27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5" calcext:value-type="date">
            <text:p>2035/05/05</text:p>
          </table:table-cell>
          <table:table-cell table:style-name="ce320" table:formula="of:=WEEKDAY([.B27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7-16" calcext:value-type="date">
            <text:p>2035/07/16</text:p>
          </table:table-cell>
          <table:table-cell table:style-name="ce320" table:formula="of:=WEEKDAY([.B2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8-11" calcext:value-type="date">
            <text:p>2035/08/11</text:p>
          </table:table-cell>
          <table:table-cell table:style-name="ce320" table:formula="of:=WEEKDAY([.B28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17" calcext:value-type="date">
            <text:p>2035/09/17</text:p>
          </table:table-cell>
          <table:table-cell table:style-name="ce320" table:formula="of:=WEEKDAY([.B2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3" calcext:value-type="date">
            <text:p>2035/09/23</text:p>
          </table:table-cell>
          <table:table-cell table:style-name="ce320" table:formula="of:=WEEKDAY([.B28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4" calcext:value-type="date">
            <text:p>2035/09/24</text:p>
          </table:table-cell>
          <table:table-cell table:style-name="ce320" table:formula="of:=WEEKDAY([.B2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0-08" calcext:value-type="date">
            <text:p>2035/10/08</text:p>
          </table:table-cell>
          <table:table-cell table:style-name="ce320" table:formula="of:=WEEKDAY([.B2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03" calcext:value-type="date">
            <text:p>2035/11/03</text:p>
          </table:table-cell>
          <table:table-cell table:style-name="ce320" table:formula="of:=WEEKDAY([.B28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23" calcext:value-type="date">
            <text:p>2035/11/23</text:p>
          </table:table-cell>
          <table:table-cell table:style-name="ce320" table:formula="of:=WEEKDAY([.B28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01" calcext:value-type="date">
            <text:p>2036/01/01</text:p>
          </table:table-cell>
          <table:table-cell table:style-name="ce320" table:formula="of:=WEEKDAY([.B28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14" calcext:value-type="date">
            <text:p>2036/01/14</text:p>
          </table:table-cell>
          <table:table-cell table:style-name="ce320" table:formula="of:=WEEKDAY([.B2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11" calcext:value-type="date">
            <text:p>2036/02/11</text:p>
          </table:table-cell>
          <table:table-cell table:style-name="ce320" table:formula="of:=WEEKDAY([.B2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23" calcext:value-type="date">
            <text:p>2036/02/23</text:p>
          </table:table-cell>
          <table:table-cell table:style-name="ce320" table:formula="of:=WEEKDAY([.B29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3-20" calcext:value-type="date">
            <text:p>2036/03/20</text:p>
          </table:table-cell>
          <table:table-cell table:style-name="ce320" table:formula="of:=WEEKDAY([.B29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4-29" calcext:value-type="date">
            <text:p>2036/04/29</text:p>
          </table:table-cell>
          <table:table-cell table:style-name="ce320" table:formula="of:=WEEKDAY([.B2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3" calcext:value-type="date">
            <text:p>2036/05/03</text:p>
          </table:table-cell>
          <table:table-cell table:style-name="ce320" table:formula="of:=WEEKDAY([.B293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4" calcext:value-type="date">
            <text:p>2036/05/04</text:p>
          </table:table-cell>
          <table:table-cell table:style-name="ce320" table:formula="of:=WEEKDAY([.B29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5" calcext:value-type="date">
            <text:p>2036/05/05</text:p>
          </table:table-cell>
          <table:table-cell table:style-name="ce320" table:formula="of:=WEEKDAY([.B29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6" calcext:value-type="date">
            <text:p>2036/05/06</text:p>
          </table:table-cell>
          <table:table-cell table:style-name="ce320" table:formula="of:=WEEKDAY([.B2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7-21" calcext:value-type="date">
            <text:p>2036/07/21</text:p>
          </table:table-cell>
          <table:table-cell table:style-name="ce320" table:formula="of:=WEEKDAY([.B29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8-11" calcext:value-type="date">
            <text:p>2036/08/11</text:p>
          </table:table-cell>
          <table:table-cell table:style-name="ce320" table:formula="of:=WEEKDAY([.B29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15" calcext:value-type="date">
            <text:p>2036/09/15</text:p>
          </table:table-cell>
          <table:table-cell table:style-name="ce320" table:formula="of:=WEEKDAY([.B2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22" calcext:value-type="date">
            <text:p>2036/09/22</text:p>
          </table:table-cell>
          <table:table-cell table:style-name="ce320" table:formula="of:=WEEKDAY([.B30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0-13" calcext:value-type="date">
            <text:p>2036/10/13</text:p>
          </table:table-cell>
          <table:table-cell table:style-name="ce320" table:formula="of:=WEEKDAY([.B3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03" calcext:value-type="date">
            <text:p>2036/11/03</text:p>
          </table:table-cell>
          <table:table-cell table:style-name="ce320" table:formula="of:=WEEKDAY([.B3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3" calcext:value-type="date">
            <text:p>2036/11/23</text:p>
          </table:table-cell>
          <table:table-cell table:style-name="ce320" table:formula="of:=WEEKDAY([.B30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4" calcext:value-type="date">
            <text:p>2036/11/24</text:p>
          </table:table-cell>
          <table:table-cell table:style-name="ce320" table:formula="of:=WEEKDAY([.B30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0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土日一覧</text:p>
          </table:table-cell>
          <table:table-cell table:style-name="ce320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01-04" calcext:value-type="date">
            <text:p>2020/01/04</text:p>
          </table:table-cell>
          <table:table-cell table:style-name="ce320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7]+1" office:value-type="date" office:date-value="2020-01-05" calcext:value-type="date">
            <text:p>2020/01/05</text:p>
          </table:table-cell>
          <table:table-cell table:style-name="ce320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8]+6" office:value-type="date" office:date-value="2020-01-11" calcext:value-type="date">
            <text:p>2020/01/11</text:p>
          </table:table-cell>
          <table:table-cell table:style-name="ce320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9]+1" office:value-type="date" office:date-value="2020-01-12" calcext:value-type="date">
            <text:p>2020/01/12</text:p>
          </table:table-cell>
          <table:table-cell table:style-name="ce320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0]+6" office:value-type="date" office:date-value="2020-01-18" calcext:value-type="date">
            <text:p>2020/01/18</text:p>
          </table:table-cell>
          <table:table-cell table:style-name="ce320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1]+1" office:value-type="date" office:date-value="2020-01-19" calcext:value-type="date">
            <text:p>2020/01/19</text:p>
          </table:table-cell>
          <table:table-cell table:style-name="ce320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2]+6" office:value-type="date" office:date-value="2020-01-25" calcext:value-type="date">
            <text:p>2020/01/25</text:p>
          </table:table-cell>
          <table:table-cell table:style-name="ce320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3]+1" office:value-type="date" office:date-value="2020-01-26" calcext:value-type="date">
            <text:p>2020/01/26</text:p>
          </table:table-cell>
          <table:table-cell table:style-name="ce320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4]+6" office:value-type="date" office:date-value="2020-02-01" calcext:value-type="date">
            <text:p>2020/02/01</text:p>
          </table:table-cell>
          <table:table-cell table:style-name="ce320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5]+1" office:value-type="date" office:date-value="2020-02-02" calcext:value-type="date">
            <text:p>2020/02/02</text:p>
          </table:table-cell>
          <table:table-cell table:style-name="ce320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6]+6" office:value-type="date" office:date-value="2020-02-08" calcext:value-type="date">
            <text:p>2020/02/08</text:p>
          </table:table-cell>
          <table:table-cell table:style-name="ce320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7]+1" office:value-type="date" office:date-value="2020-02-09" calcext:value-type="date">
            <text:p>2020/02/09</text:p>
          </table:table-cell>
          <table:table-cell table:style-name="ce320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8]+6" office:value-type="date" office:date-value="2020-02-15" calcext:value-type="date">
            <text:p>2020/02/15</text:p>
          </table:table-cell>
          <table:table-cell table:style-name="ce320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9]+1" office:value-type="date" office:date-value="2020-02-16" calcext:value-type="date">
            <text:p>2020/02/16</text:p>
          </table:table-cell>
          <table:table-cell table:style-name="ce320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0]+6" office:value-type="date" office:date-value="2020-02-22" calcext:value-type="date">
            <text:p>2020/02/22</text:p>
          </table:table-cell>
          <table:table-cell table:style-name="ce320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1]+1" office:value-type="date" office:date-value="2020-02-23" calcext:value-type="date">
            <text:p>2020/02/23</text:p>
          </table:table-cell>
          <table:table-cell table:style-name="ce320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2]+6" office:value-type="date" office:date-value="2020-02-29" calcext:value-type="date">
            <text:p>2020/02/29</text:p>
          </table:table-cell>
          <table:table-cell table:style-name="ce320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3]+1" office:value-type="date" office:date-value="2020-03-01" calcext:value-type="date">
            <text:p>2020/03/01</text:p>
          </table:table-cell>
          <table:table-cell table:style-name="ce320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4]+6" office:value-type="date" office:date-value="2020-03-07" calcext:value-type="date">
            <text:p>2020/03/07</text:p>
          </table:table-cell>
          <table:table-cell table:style-name="ce320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5]+1" office:value-type="date" office:date-value="2020-03-08" calcext:value-type="date">
            <text:p>2020/03/08</text:p>
          </table:table-cell>
          <table:table-cell table:style-name="ce320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6]+6" office:value-type="date" office:date-value="2020-03-14" calcext:value-type="date">
            <text:p>2020/03/14</text:p>
          </table:table-cell>
          <table:table-cell table:style-name="ce320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7]+1" office:value-type="date" office:date-value="2020-03-15" calcext:value-type="date">
            <text:p>2020/03/15</text:p>
          </table:table-cell>
          <table:table-cell table:style-name="ce320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8]+6" office:value-type="date" office:date-value="2020-03-21" calcext:value-type="date">
            <text:p>2020/03/21</text:p>
          </table:table-cell>
          <table:table-cell table:style-name="ce320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9]+1" office:value-type="date" office:date-value="2020-03-22" calcext:value-type="date">
            <text:p>2020/03/22</text:p>
          </table:table-cell>
          <table:table-cell table:style-name="ce320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0]+6" office:value-type="date" office:date-value="2020-03-28" calcext:value-type="date">
            <text:p>2020/03/28</text:p>
          </table:table-cell>
          <table:table-cell table:style-name="ce320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1]+1" office:value-type="date" office:date-value="2020-03-29" calcext:value-type="date">
            <text:p>2020/03/29</text:p>
          </table:table-cell>
          <table:table-cell table:style-name="ce320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2]+6" office:value-type="date" office:date-value="2020-04-04" calcext:value-type="date">
            <text:p>2020/04/04</text:p>
          </table:table-cell>
          <table:table-cell table:style-name="ce320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3]+1" office:value-type="date" office:date-value="2020-04-05" calcext:value-type="date">
            <text:p>2020/04/05</text:p>
          </table:table-cell>
          <table:table-cell table:style-name="ce320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4]+6" office:value-type="date" office:date-value="2020-04-11" calcext:value-type="date">
            <text:p>2020/04/11</text:p>
          </table:table-cell>
          <table:table-cell table:style-name="ce320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5]+1" office:value-type="date" office:date-value="2020-04-12" calcext:value-type="date">
            <text:p>2020/04/12</text:p>
          </table:table-cell>
          <table:table-cell table:style-name="ce320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6]+6" office:value-type="date" office:date-value="2020-04-18" calcext:value-type="date">
            <text:p>2020/04/18</text:p>
          </table:table-cell>
          <table:table-cell table:style-name="ce320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7]+1" office:value-type="date" office:date-value="2020-04-19" calcext:value-type="date">
            <text:p>2020/04/19</text:p>
          </table:table-cell>
          <table:table-cell table:style-name="ce320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8]+6" office:value-type="date" office:date-value="2020-04-25" calcext:value-type="date">
            <text:p>2020/04/25</text:p>
          </table:table-cell>
          <table:table-cell table:style-name="ce320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9]+1" office:value-type="date" office:date-value="2020-04-26" calcext:value-type="date">
            <text:p>2020/04/26</text:p>
          </table:table-cell>
          <table:table-cell table:style-name="ce320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0]+6" office:value-type="date" office:date-value="2020-05-02" calcext:value-type="date">
            <text:p>2020/05/02</text:p>
          </table:table-cell>
          <table:table-cell table:style-name="ce320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1]+1" office:value-type="date" office:date-value="2020-05-03" calcext:value-type="date">
            <text:p>2020/05/03</text:p>
          </table:table-cell>
          <table:table-cell table:style-name="ce320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2]+6" office:value-type="date" office:date-value="2020-05-09" calcext:value-type="date">
            <text:p>2020/05/09</text:p>
          </table:table-cell>
          <table:table-cell table:style-name="ce320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3]+1" office:value-type="date" office:date-value="2020-05-10" calcext:value-type="date">
            <text:p>2020/05/10</text:p>
          </table:table-cell>
          <table:table-cell table:style-name="ce320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4]+6" office:value-type="date" office:date-value="2020-05-16" calcext:value-type="date">
            <text:p>2020/05/16</text:p>
          </table:table-cell>
          <table:table-cell table:style-name="ce320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5]+1" office:value-type="date" office:date-value="2020-05-17" calcext:value-type="date">
            <text:p>2020/05/17</text:p>
          </table:table-cell>
          <table:table-cell table:style-name="ce320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6]+6" office:value-type="date" office:date-value="2020-05-23" calcext:value-type="date">
            <text:p>2020/05/23</text:p>
          </table:table-cell>
          <table:table-cell table:style-name="ce320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7]+1" office:value-type="date" office:date-value="2020-05-24" calcext:value-type="date">
            <text:p>2020/05/24</text:p>
          </table:table-cell>
          <table:table-cell table:style-name="ce320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8]+6" office:value-type="date" office:date-value="2020-05-30" calcext:value-type="date">
            <text:p>2020/05/30</text:p>
          </table:table-cell>
          <table:table-cell table:style-name="ce320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9]+1" office:value-type="date" office:date-value="2020-05-31" calcext:value-type="date">
            <text:p>2020/05/31</text:p>
          </table:table-cell>
          <table:table-cell table:style-name="ce320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0]+6" office:value-type="date" office:date-value="2020-06-06" calcext:value-type="date">
            <text:p>2020/06/06</text:p>
          </table:table-cell>
          <table:table-cell table:style-name="ce320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1]+1" office:value-type="date" office:date-value="2020-06-07" calcext:value-type="date">
            <text:p>2020/06/07</text:p>
          </table:table-cell>
          <table:table-cell table:style-name="ce320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2]+6" office:value-type="date" office:date-value="2020-06-13" calcext:value-type="date">
            <text:p>2020/06/13</text:p>
          </table:table-cell>
          <table:table-cell table:style-name="ce320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3]+1" office:value-type="date" office:date-value="2020-06-14" calcext:value-type="date">
            <text:p>2020/06/14</text:p>
          </table:table-cell>
          <table:table-cell table:style-name="ce320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4]+6" office:value-type="date" office:date-value="2020-06-20" calcext:value-type="date">
            <text:p>2020/06/20</text:p>
          </table:table-cell>
          <table:table-cell table:style-name="ce320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5]+1" office:value-type="date" office:date-value="2020-06-21" calcext:value-type="date">
            <text:p>2020/06/21</text:p>
          </table:table-cell>
          <table:table-cell table:style-name="ce320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6]+6" office:value-type="date" office:date-value="2020-06-27" calcext:value-type="date">
            <text:p>2020/06/27</text:p>
          </table:table-cell>
          <table:table-cell table:style-name="ce320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7]+1" office:value-type="date" office:date-value="2020-06-28" calcext:value-type="date">
            <text:p>2020/06/28</text:p>
          </table:table-cell>
          <table:table-cell table:style-name="ce320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8]+6" office:value-type="date" office:date-value="2020-07-04" calcext:value-type="date">
            <text:p>2020/07/04</text:p>
          </table:table-cell>
          <table:table-cell table:style-name="ce320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9]+1" office:value-type="date" office:date-value="2020-07-05" calcext:value-type="date">
            <text:p>2020/07/05</text:p>
          </table:table-cell>
          <table:table-cell table:style-name="ce320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0]+6" office:value-type="date" office:date-value="2020-07-11" calcext:value-type="date">
            <text:p>2020/07/11</text:p>
          </table:table-cell>
          <table:table-cell table:style-name="ce320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1]+1" office:value-type="date" office:date-value="2020-07-12" calcext:value-type="date">
            <text:p>2020/07/12</text:p>
          </table:table-cell>
          <table:table-cell table:style-name="ce320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2]+6" office:value-type="date" office:date-value="2020-07-18" calcext:value-type="date">
            <text:p>2020/07/18</text:p>
          </table:table-cell>
          <table:table-cell table:style-name="ce320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3]+1" office:value-type="date" office:date-value="2020-07-19" calcext:value-type="date">
            <text:p>2020/07/19</text:p>
          </table:table-cell>
          <table:table-cell table:style-name="ce320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4]+6" office:value-type="date" office:date-value="2020-07-25" calcext:value-type="date">
            <text:p>2020/07/25</text:p>
          </table:table-cell>
          <table:table-cell table:style-name="ce320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5]+1" office:value-type="date" office:date-value="2020-07-26" calcext:value-type="date">
            <text:p>2020/07/26</text:p>
          </table:table-cell>
          <table:table-cell table:style-name="ce320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6]+6" office:value-type="date" office:date-value="2020-08-01" calcext:value-type="date">
            <text:p>2020/08/01</text:p>
          </table:table-cell>
          <table:table-cell table:style-name="ce320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7]+1" office:value-type="date" office:date-value="2020-08-02" calcext:value-type="date">
            <text:p>2020/08/02</text:p>
          </table:table-cell>
          <table:table-cell table:style-name="ce320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8]+6" office:value-type="date" office:date-value="2020-08-08" calcext:value-type="date">
            <text:p>2020/08/08</text:p>
          </table:table-cell>
          <table:table-cell table:style-name="ce320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9]+1" office:value-type="date" office:date-value="2020-08-09" calcext:value-type="date">
            <text:p>2020/08/09</text:p>
          </table:table-cell>
          <table:table-cell table:style-name="ce320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0]+6" office:value-type="date" office:date-value="2020-08-15" calcext:value-type="date">
            <text:p>2020/08/15</text:p>
          </table:table-cell>
          <table:table-cell table:style-name="ce320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1]+1" office:value-type="date" office:date-value="2020-08-16" calcext:value-type="date">
            <text:p>2020/08/16</text:p>
          </table:table-cell>
          <table:table-cell table:style-name="ce320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2]+6" office:value-type="date" office:date-value="2020-08-22" calcext:value-type="date">
            <text:p>2020/08/22</text:p>
          </table:table-cell>
          <table:table-cell table:style-name="ce320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3]+1" office:value-type="date" office:date-value="2020-08-23" calcext:value-type="date">
            <text:p>2020/08/23</text:p>
          </table:table-cell>
          <table:table-cell table:style-name="ce320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4]+6" office:value-type="date" office:date-value="2020-08-29" calcext:value-type="date">
            <text:p>2020/08/29</text:p>
          </table:table-cell>
          <table:table-cell table:style-name="ce320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5]+1" office:value-type="date" office:date-value="2020-08-30" calcext:value-type="date">
            <text:p>2020/08/30</text:p>
          </table:table-cell>
          <table:table-cell table:style-name="ce320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6]+6" office:value-type="date" office:date-value="2020-09-05" calcext:value-type="date">
            <text:p>2020/09/05</text:p>
          </table:table-cell>
          <table:table-cell table:style-name="ce320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7]+1" office:value-type="date" office:date-value="2020-09-06" calcext:value-type="date">
            <text:p>2020/09/06</text:p>
          </table:table-cell>
          <table:table-cell table:style-name="ce320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8]+6" office:value-type="date" office:date-value="2020-09-12" calcext:value-type="date">
            <text:p>2020/09/12</text:p>
          </table:table-cell>
          <table:table-cell table:style-name="ce320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9]+1" office:value-type="date" office:date-value="2020-09-13" calcext:value-type="date">
            <text:p>2020/09/13</text:p>
          </table:table-cell>
          <table:table-cell table:style-name="ce320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0]+6" office:value-type="date" office:date-value="2020-09-19" calcext:value-type="date">
            <text:p>2020/09/19</text:p>
          </table:table-cell>
          <table:table-cell table:style-name="ce320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1]+1" office:value-type="date" office:date-value="2020-09-20" calcext:value-type="date">
            <text:p>2020/09/20</text:p>
          </table:table-cell>
          <table:table-cell table:style-name="ce320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2]+6" office:value-type="date" office:date-value="2020-09-26" calcext:value-type="date">
            <text:p>2020/09/26</text:p>
          </table:table-cell>
          <table:table-cell table:style-name="ce320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3]+1" office:value-type="date" office:date-value="2020-09-27" calcext:value-type="date">
            <text:p>2020/09/27</text:p>
          </table:table-cell>
          <table:table-cell table:style-name="ce320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4]+6" office:value-type="date" office:date-value="2020-10-03" calcext:value-type="date">
            <text:p>2020/10/03</text:p>
          </table:table-cell>
          <table:table-cell table:style-name="ce320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5]+1" office:value-type="date" office:date-value="2020-10-04" calcext:value-type="date">
            <text:p>2020/10/04</text:p>
          </table:table-cell>
          <table:table-cell table:style-name="ce320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6]+6" office:value-type="date" office:date-value="2020-10-10" calcext:value-type="date">
            <text:p>2020/10/10</text:p>
          </table:table-cell>
          <table:table-cell table:style-name="ce320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7]+1" office:value-type="date" office:date-value="2020-10-11" calcext:value-type="date">
            <text:p>2020/10/11</text:p>
          </table:table-cell>
          <table:table-cell table:style-name="ce320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8]+6" office:value-type="date" office:date-value="2020-10-17" calcext:value-type="date">
            <text:p>2020/10/17</text:p>
          </table:table-cell>
          <table:table-cell table:style-name="ce320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9]+1" office:value-type="date" office:date-value="2020-10-18" calcext:value-type="date">
            <text:p>2020/10/18</text:p>
          </table:table-cell>
          <table:table-cell table:style-name="ce320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0]+6" office:value-type="date" office:date-value="2020-10-24" calcext:value-type="date">
            <text:p>2020/10/24</text:p>
          </table:table-cell>
          <table:table-cell table:style-name="ce320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1]+1" office:value-type="date" office:date-value="2020-10-25" calcext:value-type="date">
            <text:p>2020/10/25</text:p>
          </table:table-cell>
          <table:table-cell table:style-name="ce320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2]+6" office:value-type="date" office:date-value="2020-10-31" calcext:value-type="date">
            <text:p>2020/10/31</text:p>
          </table:table-cell>
          <table:table-cell table:style-name="ce320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3]+1" office:value-type="date" office:date-value="2020-11-01" calcext:value-type="date">
            <text:p>2020/11/01</text:p>
          </table:table-cell>
          <table:table-cell table:style-name="ce320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4]+6" office:value-type="date" office:date-value="2020-11-07" calcext:value-type="date">
            <text:p>2020/11/07</text:p>
          </table:table-cell>
          <table:table-cell table:style-name="ce320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5]+1" office:value-type="date" office:date-value="2020-11-08" calcext:value-type="date">
            <text:p>2020/11/08</text:p>
          </table:table-cell>
          <table:table-cell table:style-name="ce320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6]+6" office:value-type="date" office:date-value="2020-11-14" calcext:value-type="date">
            <text:p>2020/11/14</text:p>
          </table:table-cell>
          <table:table-cell table:style-name="ce320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7]+1" office:value-type="date" office:date-value="2020-11-15" calcext:value-type="date">
            <text:p>2020/11/15</text:p>
          </table:table-cell>
          <table:table-cell table:style-name="ce320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8]+6" office:value-type="date" office:date-value="2020-11-21" calcext:value-type="date">
            <text:p>2020/11/21</text:p>
          </table:table-cell>
          <table:table-cell table:style-name="ce320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9]+1" office:value-type="date" office:date-value="2020-11-22" calcext:value-type="date">
            <text:p>2020/11/22</text:p>
          </table:table-cell>
          <table:table-cell table:style-name="ce320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0]+6" office:value-type="date" office:date-value="2020-11-28" calcext:value-type="date">
            <text:p>2020/11/28</text:p>
          </table:table-cell>
          <table:table-cell table:style-name="ce320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1]+1" office:value-type="date" office:date-value="2020-11-29" calcext:value-type="date">
            <text:p>2020/11/29</text:p>
          </table:table-cell>
          <table:table-cell table:style-name="ce320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2]+6" office:value-type="date" office:date-value="2020-12-05" calcext:value-type="date">
            <text:p>2020/12/05</text:p>
          </table:table-cell>
          <table:table-cell table:style-name="ce320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3]+1" office:value-type="date" office:date-value="2020-12-06" calcext:value-type="date">
            <text:p>2020/12/06</text:p>
          </table:table-cell>
          <table:table-cell table:style-name="ce320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4]+6" office:value-type="date" office:date-value="2020-12-12" calcext:value-type="date">
            <text:p>2020/12/12</text:p>
          </table:table-cell>
          <table:table-cell table:style-name="ce320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5]+1" office:value-type="date" office:date-value="2020-12-13" calcext:value-type="date">
            <text:p>2020/12/13</text:p>
          </table:table-cell>
          <table:table-cell table:style-name="ce320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6]+6" office:value-type="date" office:date-value="2020-12-19" calcext:value-type="date">
            <text:p>2020/12/19</text:p>
          </table:table-cell>
          <table:table-cell table:style-name="ce320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7]+1" office:value-type="date" office:date-value="2020-12-20" calcext:value-type="date">
            <text:p>2020/12/20</text:p>
          </table:table-cell>
          <table:table-cell table:style-name="ce320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8]+6" office:value-type="date" office:date-value="2020-12-26" calcext:value-type="date">
            <text:p>2020/12/26</text:p>
          </table:table-cell>
          <table:table-cell table:style-name="ce320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9]+1" office:value-type="date" office:date-value="2020-12-27" calcext:value-type="date">
            <text:p>2020/12/27</text:p>
          </table:table-cell>
          <table:table-cell table:style-name="ce320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0]+6" office:value-type="date" office:date-value="2021-01-02" calcext:value-type="date">
            <text:p>2021/01/02</text:p>
          </table:table-cell>
          <table:table-cell table:style-name="ce320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1]+1" office:value-type="date" office:date-value="2021-01-03" calcext:value-type="date">
            <text:p>2021/01/03</text:p>
          </table:table-cell>
          <table:table-cell table:style-name="ce320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2]+6" office:value-type="date" office:date-value="2021-01-09" calcext:value-type="date">
            <text:p>2021/01/09</text:p>
          </table:table-cell>
          <table:table-cell table:style-name="ce320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3]+1" office:value-type="date" office:date-value="2021-01-10" calcext:value-type="date">
            <text:p>2021/01/10</text:p>
          </table:table-cell>
          <table:table-cell table:style-name="ce320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4]+6" office:value-type="date" office:date-value="2021-01-16" calcext:value-type="date">
            <text:p>2021/01/16</text:p>
          </table:table-cell>
          <table:table-cell table:style-name="ce320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5]+1" office:value-type="date" office:date-value="2021-01-17" calcext:value-type="date">
            <text:p>2021/01/17</text:p>
          </table:table-cell>
          <table:table-cell table:style-name="ce320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6]+6" office:value-type="date" office:date-value="2021-01-23" calcext:value-type="date">
            <text:p>2021/01/23</text:p>
          </table:table-cell>
          <table:table-cell table:style-name="ce320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7]+1" office:value-type="date" office:date-value="2021-01-24" calcext:value-type="date">
            <text:p>2021/01/24</text:p>
          </table:table-cell>
          <table:table-cell table:style-name="ce320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8]+6" office:value-type="date" office:date-value="2021-01-30" calcext:value-type="date">
            <text:p>2021/01/30</text:p>
          </table:table-cell>
          <table:table-cell table:style-name="ce320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9]+1" office:value-type="date" office:date-value="2021-01-31" calcext:value-type="date">
            <text:p>2021/01/31</text:p>
          </table:table-cell>
          <table:table-cell table:style-name="ce320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0]+6" office:value-type="date" office:date-value="2021-02-06" calcext:value-type="date">
            <text:p>2021/02/06</text:p>
          </table:table-cell>
          <table:table-cell table:style-name="ce320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1]+1" office:value-type="date" office:date-value="2021-02-07" calcext:value-type="date">
            <text:p>2021/02/07</text:p>
          </table:table-cell>
          <table:table-cell table:style-name="ce320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2]+6" office:value-type="date" office:date-value="2021-02-13" calcext:value-type="date">
            <text:p>2021/02/13</text:p>
          </table:table-cell>
          <table:table-cell table:style-name="ce320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3]+1" office:value-type="date" office:date-value="2021-02-14" calcext:value-type="date">
            <text:p>2021/02/14</text:p>
          </table:table-cell>
          <table:table-cell table:style-name="ce320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4]+6" office:value-type="date" office:date-value="2021-02-20" calcext:value-type="date">
            <text:p>2021/02/20</text:p>
          </table:table-cell>
          <table:table-cell table:style-name="ce320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5]+1" office:value-type="date" office:date-value="2021-02-21" calcext:value-type="date">
            <text:p>2021/02/21</text:p>
          </table:table-cell>
          <table:table-cell table:style-name="ce320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6]+6" office:value-type="date" office:date-value="2021-02-27" calcext:value-type="date">
            <text:p>2021/02/27</text:p>
          </table:table-cell>
          <table:table-cell table:style-name="ce320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7]+1" office:value-type="date" office:date-value="2021-02-28" calcext:value-type="date">
            <text:p>2021/02/28</text:p>
          </table:table-cell>
          <table:table-cell table:style-name="ce320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8]+6" office:value-type="date" office:date-value="2021-03-06" calcext:value-type="date">
            <text:p>2021/03/06</text:p>
          </table:table-cell>
          <table:table-cell table:style-name="ce320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9]+1" office:value-type="date" office:date-value="2021-03-07" calcext:value-type="date">
            <text:p>2021/03/07</text:p>
          </table:table-cell>
          <table:table-cell table:style-name="ce320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0]+6" office:value-type="date" office:date-value="2021-03-13" calcext:value-type="date">
            <text:p>2021/03/13</text:p>
          </table:table-cell>
          <table:table-cell table:style-name="ce320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1]+1" office:value-type="date" office:date-value="2021-03-14" calcext:value-type="date">
            <text:p>2021/03/14</text:p>
          </table:table-cell>
          <table:table-cell table:style-name="ce320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2]+6" office:value-type="date" office:date-value="2021-03-20" calcext:value-type="date">
            <text:p>2021/03/20</text:p>
          </table:table-cell>
          <table:table-cell table:style-name="ce320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3]+1" office:value-type="date" office:date-value="2021-03-21" calcext:value-type="date">
            <text:p>2021/03/21</text:p>
          </table:table-cell>
          <table:table-cell table:style-name="ce320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4]+6" office:value-type="date" office:date-value="2021-03-27" calcext:value-type="date">
            <text:p>2021/03/27</text:p>
          </table:table-cell>
          <table:table-cell table:style-name="ce320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5]+1" office:value-type="date" office:date-value="2021-03-28" calcext:value-type="date">
            <text:p>2021/03/28</text:p>
          </table:table-cell>
          <table:table-cell table:style-name="ce320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6]+6" office:value-type="date" office:date-value="2021-04-03" calcext:value-type="date">
            <text:p>2021/04/03</text:p>
          </table:table-cell>
          <table:table-cell table:style-name="ce320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7]+1" office:value-type="date" office:date-value="2021-04-04" calcext:value-type="date">
            <text:p>2021/04/04</text:p>
          </table:table-cell>
          <table:table-cell table:style-name="ce320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8]+6" office:value-type="date" office:date-value="2021-04-10" calcext:value-type="date">
            <text:p>2021/04/10</text:p>
          </table:table-cell>
          <table:table-cell table:style-name="ce320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9]+1" office:value-type="date" office:date-value="2021-04-11" calcext:value-type="date">
            <text:p>2021/04/11</text:p>
          </table:table-cell>
          <table:table-cell table:style-name="ce320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0]+6" office:value-type="date" office:date-value="2021-04-17" calcext:value-type="date">
            <text:p>2021/04/17</text:p>
          </table:table-cell>
          <table:table-cell table:style-name="ce320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1]+1" office:value-type="date" office:date-value="2021-04-18" calcext:value-type="date">
            <text:p>2021/04/18</text:p>
          </table:table-cell>
          <table:table-cell table:style-name="ce320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2]+6" office:value-type="date" office:date-value="2021-04-24" calcext:value-type="date">
            <text:p>2021/04/24</text:p>
          </table:table-cell>
          <table:table-cell table:style-name="ce320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3]+1" office:value-type="date" office:date-value="2021-04-25" calcext:value-type="date">
            <text:p>2021/04/25</text:p>
          </table:table-cell>
          <table:table-cell table:style-name="ce320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4]+6" office:value-type="date" office:date-value="2021-05-01" calcext:value-type="date">
            <text:p>2021/05/01</text:p>
          </table:table-cell>
          <table:table-cell table:style-name="ce320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5]+1" office:value-type="date" office:date-value="2021-05-02" calcext:value-type="date">
            <text:p>2021/05/02</text:p>
          </table:table-cell>
          <table:table-cell table:style-name="ce320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6]+6" office:value-type="date" office:date-value="2021-05-08" calcext:value-type="date">
            <text:p>2021/05/08</text:p>
          </table:table-cell>
          <table:table-cell table:style-name="ce320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7]+1" office:value-type="date" office:date-value="2021-05-09" calcext:value-type="date">
            <text:p>2021/05/09</text:p>
          </table:table-cell>
          <table:table-cell table:style-name="ce320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8]+6" office:value-type="date" office:date-value="2021-05-15" calcext:value-type="date">
            <text:p>2021/05/15</text:p>
          </table:table-cell>
          <table:table-cell table:style-name="ce320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9]+1" office:value-type="date" office:date-value="2021-05-16" calcext:value-type="date">
            <text:p>2021/05/16</text:p>
          </table:table-cell>
          <table:table-cell table:style-name="ce320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0]+6" office:value-type="date" office:date-value="2021-05-22" calcext:value-type="date">
            <text:p>2021/05/22</text:p>
          </table:table-cell>
          <table:table-cell table:style-name="ce320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1]+1" office:value-type="date" office:date-value="2021-05-23" calcext:value-type="date">
            <text:p>2021/05/23</text:p>
          </table:table-cell>
          <table:table-cell table:style-name="ce320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2]+6" office:value-type="date" office:date-value="2021-05-29" calcext:value-type="date">
            <text:p>2021/05/29</text:p>
          </table:table-cell>
          <table:table-cell table:style-name="ce320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3]+1" office:value-type="date" office:date-value="2021-05-30" calcext:value-type="date">
            <text:p>2021/05/30</text:p>
          </table:table-cell>
          <table:table-cell table:style-name="ce320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4]+6" office:value-type="date" office:date-value="2021-06-05" calcext:value-type="date">
            <text:p>2021/06/05</text:p>
          </table:table-cell>
          <table:table-cell table:style-name="ce320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5]+1" office:value-type="date" office:date-value="2021-06-06" calcext:value-type="date">
            <text:p>2021/06/06</text:p>
          </table:table-cell>
          <table:table-cell table:style-name="ce320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6]+6" office:value-type="date" office:date-value="2021-06-12" calcext:value-type="date">
            <text:p>2021/06/12</text:p>
          </table:table-cell>
          <table:table-cell table:style-name="ce320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7]+1" office:value-type="date" office:date-value="2021-06-13" calcext:value-type="date">
            <text:p>2021/06/13</text:p>
          </table:table-cell>
          <table:table-cell table:style-name="ce320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8]+6" office:value-type="date" office:date-value="2021-06-19" calcext:value-type="date">
            <text:p>2021/06/19</text:p>
          </table:table-cell>
          <table:table-cell table:style-name="ce320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9]+1" office:value-type="date" office:date-value="2021-06-20" calcext:value-type="date">
            <text:p>2021/06/20</text:p>
          </table:table-cell>
          <table:table-cell table:style-name="ce320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0]+6" office:value-type="date" office:date-value="2021-06-26" calcext:value-type="date">
            <text:p>2021/06/26</text:p>
          </table:table-cell>
          <table:table-cell table:style-name="ce320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1]+1" office:value-type="date" office:date-value="2021-06-27" calcext:value-type="date">
            <text:p>2021/06/27</text:p>
          </table:table-cell>
          <table:table-cell table:style-name="ce320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2]+6" office:value-type="date" office:date-value="2021-07-03" calcext:value-type="date">
            <text:p>2021/07/03</text:p>
          </table:table-cell>
          <table:table-cell table:style-name="ce320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3]+1" office:value-type="date" office:date-value="2021-07-04" calcext:value-type="date">
            <text:p>2021/07/04</text:p>
          </table:table-cell>
          <table:table-cell table:style-name="ce320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4]+6" office:value-type="date" office:date-value="2021-07-10" calcext:value-type="date">
            <text:p>2021/07/10</text:p>
          </table:table-cell>
          <table:table-cell table:style-name="ce320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5]+1" office:value-type="date" office:date-value="2021-07-11" calcext:value-type="date">
            <text:p>2021/07/11</text:p>
          </table:table-cell>
          <table:table-cell table:style-name="ce320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6]+6" office:value-type="date" office:date-value="2021-07-17" calcext:value-type="date">
            <text:p>2021/07/17</text:p>
          </table:table-cell>
          <table:table-cell table:style-name="ce320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7]+1" office:value-type="date" office:date-value="2021-07-18" calcext:value-type="date">
            <text:p>2021/07/18</text:p>
          </table:table-cell>
          <table:table-cell table:style-name="ce320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8]+6" office:value-type="date" office:date-value="2021-07-24" calcext:value-type="date">
            <text:p>2021/07/24</text:p>
          </table:table-cell>
          <table:table-cell table:style-name="ce320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9]+1" office:value-type="date" office:date-value="2021-07-25" calcext:value-type="date">
            <text:p>2021/07/25</text:p>
          </table:table-cell>
          <table:table-cell table:style-name="ce320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0]+6" office:value-type="date" office:date-value="2021-07-31" calcext:value-type="date">
            <text:p>2021/07/31</text:p>
          </table:table-cell>
          <table:table-cell table:style-name="ce320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1]+1" office:value-type="date" office:date-value="2021-08-01" calcext:value-type="date">
            <text:p>2021/08/01</text:p>
          </table:table-cell>
          <table:table-cell table:style-name="ce320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2]+6" office:value-type="date" office:date-value="2021-08-07" calcext:value-type="date">
            <text:p>2021/08/07</text:p>
          </table:table-cell>
          <table:table-cell table:style-name="ce320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3]+1" office:value-type="date" office:date-value="2021-08-08" calcext:value-type="date">
            <text:p>2021/08/08</text:p>
          </table:table-cell>
          <table:table-cell table:style-name="ce320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4]+6" office:value-type="date" office:date-value="2021-08-14" calcext:value-type="date">
            <text:p>2021/08/14</text:p>
          </table:table-cell>
          <table:table-cell table:style-name="ce320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5]+1" office:value-type="date" office:date-value="2021-08-15" calcext:value-type="date">
            <text:p>2021/08/15</text:p>
          </table:table-cell>
          <table:table-cell table:style-name="ce320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6]+6" office:value-type="date" office:date-value="2021-08-21" calcext:value-type="date">
            <text:p>2021/08/21</text:p>
          </table:table-cell>
          <table:table-cell table:style-name="ce320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7]+1" office:value-type="date" office:date-value="2021-08-22" calcext:value-type="date">
            <text:p>2021/08/22</text:p>
          </table:table-cell>
          <table:table-cell table:style-name="ce320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8]+6" office:value-type="date" office:date-value="2021-08-28" calcext:value-type="date">
            <text:p>2021/08/28</text:p>
          </table:table-cell>
          <table:table-cell table:style-name="ce320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9]+1" office:value-type="date" office:date-value="2021-08-29" calcext:value-type="date">
            <text:p>2021/08/29</text:p>
          </table:table-cell>
          <table:table-cell table:style-name="ce320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0]+6" office:value-type="date" office:date-value="2021-09-04" calcext:value-type="date">
            <text:p>2021/09/04</text:p>
          </table:table-cell>
          <table:table-cell table:style-name="ce320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1]+1" office:value-type="date" office:date-value="2021-09-05" calcext:value-type="date">
            <text:p>2021/09/05</text:p>
          </table:table-cell>
          <table:table-cell table:style-name="ce320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2]+6" office:value-type="date" office:date-value="2021-09-11" calcext:value-type="date">
            <text:p>2021/09/11</text:p>
          </table:table-cell>
          <table:table-cell table:style-name="ce320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3]+1" office:value-type="date" office:date-value="2021-09-12" calcext:value-type="date">
            <text:p>2021/09/12</text:p>
          </table:table-cell>
          <table:table-cell table:style-name="ce320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4]+6" office:value-type="date" office:date-value="2021-09-18" calcext:value-type="date">
            <text:p>2021/09/18</text:p>
          </table:table-cell>
          <table:table-cell table:style-name="ce320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5]+1" office:value-type="date" office:date-value="2021-09-19" calcext:value-type="date">
            <text:p>2021/09/19</text:p>
          </table:table-cell>
          <table:table-cell table:style-name="ce320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6]+6" office:value-type="date" office:date-value="2021-09-25" calcext:value-type="date">
            <text:p>2021/09/25</text:p>
          </table:table-cell>
          <table:table-cell table:style-name="ce320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7]+1" office:value-type="date" office:date-value="2021-09-26" calcext:value-type="date">
            <text:p>2021/09/26</text:p>
          </table:table-cell>
          <table:table-cell table:style-name="ce320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8]+6" office:value-type="date" office:date-value="2021-10-02" calcext:value-type="date">
            <text:p>2021/10/02</text:p>
          </table:table-cell>
          <table:table-cell table:style-name="ce320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9]+1" office:value-type="date" office:date-value="2021-10-03" calcext:value-type="date">
            <text:p>2021/10/03</text:p>
          </table:table-cell>
          <table:table-cell table:style-name="ce320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0]+6" office:value-type="date" office:date-value="2021-10-09" calcext:value-type="date">
            <text:p>2021/10/09</text:p>
          </table:table-cell>
          <table:table-cell table:style-name="ce320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1]+1" office:value-type="date" office:date-value="2021-10-10" calcext:value-type="date">
            <text:p>2021/10/10</text:p>
          </table:table-cell>
          <table:table-cell table:style-name="ce320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2]+6" office:value-type="date" office:date-value="2021-10-16" calcext:value-type="date">
            <text:p>2021/10/16</text:p>
          </table:table-cell>
          <table:table-cell table:style-name="ce320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3]+1" office:value-type="date" office:date-value="2021-10-17" calcext:value-type="date">
            <text:p>2021/10/17</text:p>
          </table:table-cell>
          <table:table-cell table:style-name="ce320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4]+6" office:value-type="date" office:date-value="2021-10-23" calcext:value-type="date">
            <text:p>2021/10/23</text:p>
          </table:table-cell>
          <table:table-cell table:style-name="ce320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5]+1" office:value-type="date" office:date-value="2021-10-24" calcext:value-type="date">
            <text:p>2021/10/24</text:p>
          </table:table-cell>
          <table:table-cell table:style-name="ce320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6]+6" office:value-type="date" office:date-value="2021-10-30" calcext:value-type="date">
            <text:p>2021/10/30</text:p>
          </table:table-cell>
          <table:table-cell table:style-name="ce320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7]+1" office:value-type="date" office:date-value="2021-10-31" calcext:value-type="date">
            <text:p>2021/10/31</text:p>
          </table:table-cell>
          <table:table-cell table:style-name="ce320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8]+6" office:value-type="date" office:date-value="2021-11-06" calcext:value-type="date">
            <text:p>2021/11/06</text:p>
          </table:table-cell>
          <table:table-cell table:style-name="ce320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9]+1" office:value-type="date" office:date-value="2021-11-07" calcext:value-type="date">
            <text:p>2021/11/07</text:p>
          </table:table-cell>
          <table:table-cell table:style-name="ce320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0]+6" office:value-type="date" office:date-value="2021-11-13" calcext:value-type="date">
            <text:p>2021/11/13</text:p>
          </table:table-cell>
          <table:table-cell table:style-name="ce320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1]+1" office:value-type="date" office:date-value="2021-11-14" calcext:value-type="date">
            <text:p>2021/11/14</text:p>
          </table:table-cell>
          <table:table-cell table:style-name="ce320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2]+6" office:value-type="date" office:date-value="2021-11-20" calcext:value-type="date">
            <text:p>2021/11/20</text:p>
          </table:table-cell>
          <table:table-cell table:style-name="ce320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3]+1" office:value-type="date" office:date-value="2021-11-21" calcext:value-type="date">
            <text:p>2021/11/21</text:p>
          </table:table-cell>
          <table:table-cell table:style-name="ce320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4]+6" office:value-type="date" office:date-value="2021-11-27" calcext:value-type="date">
            <text:p>2021/11/27</text:p>
          </table:table-cell>
          <table:table-cell table:style-name="ce320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5]+1" office:value-type="date" office:date-value="2021-11-28" calcext:value-type="date">
            <text:p>2021/11/28</text:p>
          </table:table-cell>
          <table:table-cell table:style-name="ce320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6]+6" office:value-type="date" office:date-value="2021-12-04" calcext:value-type="date">
            <text:p>2021/12/04</text:p>
          </table:table-cell>
          <table:table-cell table:style-name="ce320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7]+1" office:value-type="date" office:date-value="2021-12-05" calcext:value-type="date">
            <text:p>2021/12/05</text:p>
          </table:table-cell>
          <table:table-cell table:style-name="ce320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8]+6" office:value-type="date" office:date-value="2021-12-11" calcext:value-type="date">
            <text:p>2021/12/11</text:p>
          </table:table-cell>
          <table:table-cell table:style-name="ce320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9]+1" office:value-type="date" office:date-value="2021-12-12" calcext:value-type="date">
            <text:p>2021/12/12</text:p>
          </table:table-cell>
          <table:table-cell table:style-name="ce320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0]+6" office:value-type="date" office:date-value="2021-12-18" calcext:value-type="date">
            <text:p>2021/12/18</text:p>
          </table:table-cell>
          <table:table-cell table:style-name="ce320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1]+1" office:value-type="date" office:date-value="2021-12-19" calcext:value-type="date">
            <text:p>2021/12/19</text:p>
          </table:table-cell>
          <table:table-cell table:style-name="ce320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2]+6" office:value-type="date" office:date-value="2021-12-25" calcext:value-type="date">
            <text:p>2021/12/25</text:p>
          </table:table-cell>
          <table:table-cell table:style-name="ce320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3]+1" office:value-type="date" office:date-value="2021-12-26" calcext:value-type="date">
            <text:p>2021/12/26</text:p>
          </table:table-cell>
          <table:table-cell table:style-name="ce320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4]+6" office:value-type="date" office:date-value="2022-01-01" calcext:value-type="date">
            <text:p>2022/01/01</text:p>
          </table:table-cell>
          <table:table-cell table:style-name="ce320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5]+1" office:value-type="date" office:date-value="2022-01-02" calcext:value-type="date">
            <text:p>2022/01/02</text:p>
          </table:table-cell>
          <table:table-cell table:style-name="ce320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6]+6" office:value-type="date" office:date-value="2022-01-08" calcext:value-type="date">
            <text:p>2022/01/08</text:p>
          </table:table-cell>
          <table:table-cell table:style-name="ce320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7]+1" office:value-type="date" office:date-value="2022-01-09" calcext:value-type="date">
            <text:p>2022/01/09</text:p>
          </table:table-cell>
          <table:table-cell table:style-name="ce320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8]+6" office:value-type="date" office:date-value="2022-01-15" calcext:value-type="date">
            <text:p>2022/01/15</text:p>
          </table:table-cell>
          <table:table-cell table:style-name="ce320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9]+1" office:value-type="date" office:date-value="2022-01-16" calcext:value-type="date">
            <text:p>2022/01/16</text:p>
          </table:table-cell>
          <table:table-cell table:style-name="ce320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0]+6" office:value-type="date" office:date-value="2022-01-22" calcext:value-type="date">
            <text:p>2022/01/22</text:p>
          </table:table-cell>
          <table:table-cell table:style-name="ce320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1]+1" office:value-type="date" office:date-value="2022-01-23" calcext:value-type="date">
            <text:p>2022/01/23</text:p>
          </table:table-cell>
          <table:table-cell table:style-name="ce320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2]+6" office:value-type="date" office:date-value="2022-01-29" calcext:value-type="date">
            <text:p>2022/01/29</text:p>
          </table:table-cell>
          <table:table-cell table:style-name="ce320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3]+1" office:value-type="date" office:date-value="2022-01-30" calcext:value-type="date">
            <text:p>2022/01/30</text:p>
          </table:table-cell>
          <table:table-cell table:style-name="ce320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4]+6" office:value-type="date" office:date-value="2022-02-05" calcext:value-type="date">
            <text:p>2022/02/05</text:p>
          </table:table-cell>
          <table:table-cell table:style-name="ce320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5]+1" office:value-type="date" office:date-value="2022-02-06" calcext:value-type="date">
            <text:p>2022/02/06</text:p>
          </table:table-cell>
          <table:table-cell table:style-name="ce320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6]+6" office:value-type="date" office:date-value="2022-02-12" calcext:value-type="date">
            <text:p>2022/02/12</text:p>
          </table:table-cell>
          <table:table-cell table:style-name="ce320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7]+1" office:value-type="date" office:date-value="2022-02-13" calcext:value-type="date">
            <text:p>2022/02/13</text:p>
          </table:table-cell>
          <table:table-cell table:style-name="ce320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8]+6" office:value-type="date" office:date-value="2022-02-19" calcext:value-type="date">
            <text:p>2022/02/19</text:p>
          </table:table-cell>
          <table:table-cell table:style-name="ce320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9]+1" office:value-type="date" office:date-value="2022-02-20" calcext:value-type="date">
            <text:p>2022/02/20</text:p>
          </table:table-cell>
          <table:table-cell table:style-name="ce320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0]+6" office:value-type="date" office:date-value="2022-02-26" calcext:value-type="date">
            <text:p>2022/02/26</text:p>
          </table:table-cell>
          <table:table-cell table:style-name="ce320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1]+1" office:value-type="date" office:date-value="2022-02-27" calcext:value-type="date">
            <text:p>2022/02/27</text:p>
          </table:table-cell>
          <table:table-cell table:style-name="ce320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2]+6" office:value-type="date" office:date-value="2022-03-05" calcext:value-type="date">
            <text:p>2022/03/05</text:p>
          </table:table-cell>
          <table:table-cell table:style-name="ce320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3]+1" office:value-type="date" office:date-value="2022-03-06" calcext:value-type="date">
            <text:p>2022/03/06</text:p>
          </table:table-cell>
          <table:table-cell table:style-name="ce320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4]+6" office:value-type="date" office:date-value="2022-03-12" calcext:value-type="date">
            <text:p>2022/03/12</text:p>
          </table:table-cell>
          <table:table-cell table:style-name="ce320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5]+1" office:value-type="date" office:date-value="2022-03-13" calcext:value-type="date">
            <text:p>2022/03/13</text:p>
          </table:table-cell>
          <table:table-cell table:style-name="ce320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6]+6" office:value-type="date" office:date-value="2022-03-19" calcext:value-type="date">
            <text:p>2022/03/19</text:p>
          </table:table-cell>
          <table:table-cell table:style-name="ce320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7]+1" office:value-type="date" office:date-value="2022-03-20" calcext:value-type="date">
            <text:p>2022/03/20</text:p>
          </table:table-cell>
          <table:table-cell table:style-name="ce320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8]+6" office:value-type="date" office:date-value="2022-03-26" calcext:value-type="date">
            <text:p>2022/03/26</text:p>
          </table:table-cell>
          <table:table-cell table:style-name="ce320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9]+1" office:value-type="date" office:date-value="2022-03-27" calcext:value-type="date">
            <text:p>2022/03/27</text:p>
          </table:table-cell>
          <table:table-cell table:style-name="ce320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0]+6" office:value-type="date" office:date-value="2022-04-02" calcext:value-type="date">
            <text:p>2022/04/02</text:p>
          </table:table-cell>
          <table:table-cell table:style-name="ce320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1]+1" office:value-type="date" office:date-value="2022-04-03" calcext:value-type="date">
            <text:p>2022/04/03</text:p>
          </table:table-cell>
          <table:table-cell table:style-name="ce320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2]+6" office:value-type="date" office:date-value="2022-04-09" calcext:value-type="date">
            <text:p>2022/04/09</text:p>
          </table:table-cell>
          <table:table-cell table:style-name="ce320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3]+1" office:value-type="date" office:date-value="2022-04-10" calcext:value-type="date">
            <text:p>2022/04/10</text:p>
          </table:table-cell>
          <table:table-cell table:style-name="ce320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4]+6" office:value-type="date" office:date-value="2022-04-16" calcext:value-type="date">
            <text:p>2022/04/16</text:p>
          </table:table-cell>
          <table:table-cell table:style-name="ce320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5]+1" office:value-type="date" office:date-value="2022-04-17" calcext:value-type="date">
            <text:p>2022/04/17</text:p>
          </table:table-cell>
          <table:table-cell table:style-name="ce320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6]+6" office:value-type="date" office:date-value="2022-04-23" calcext:value-type="date">
            <text:p>2022/04/23</text:p>
          </table:table-cell>
          <table:table-cell table:style-name="ce320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7]+1" office:value-type="date" office:date-value="2022-04-24" calcext:value-type="date">
            <text:p>2022/04/24</text:p>
          </table:table-cell>
          <table:table-cell table:style-name="ce320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8]+6" office:value-type="date" office:date-value="2022-04-30" calcext:value-type="date">
            <text:p>2022/04/30</text:p>
          </table:table-cell>
          <table:table-cell table:style-name="ce320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9]+1" office:value-type="date" office:date-value="2022-05-01" calcext:value-type="date">
            <text:p>2022/05/01</text:p>
          </table:table-cell>
          <table:table-cell table:style-name="ce320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0]+6" office:value-type="date" office:date-value="2022-05-07" calcext:value-type="date">
            <text:p>2022/05/07</text:p>
          </table:table-cell>
          <table:table-cell table:style-name="ce320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1]+1" office:value-type="date" office:date-value="2022-05-08" calcext:value-type="date">
            <text:p>2022/05/08</text:p>
          </table:table-cell>
          <table:table-cell table:style-name="ce320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2]+6" office:value-type="date" office:date-value="2022-05-14" calcext:value-type="date">
            <text:p>2022/05/14</text:p>
          </table:table-cell>
          <table:table-cell table:style-name="ce320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3]+1" office:value-type="date" office:date-value="2022-05-15" calcext:value-type="date">
            <text:p>2022/05/15</text:p>
          </table:table-cell>
          <table:table-cell table:style-name="ce320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4]+6" office:value-type="date" office:date-value="2022-05-21" calcext:value-type="date">
            <text:p>2022/05/21</text:p>
          </table:table-cell>
          <table:table-cell table:style-name="ce320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5]+1" office:value-type="date" office:date-value="2022-05-22" calcext:value-type="date">
            <text:p>2022/05/22</text:p>
          </table:table-cell>
          <table:table-cell table:style-name="ce320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6]+6" office:value-type="date" office:date-value="2022-05-28" calcext:value-type="date">
            <text:p>2022/05/28</text:p>
          </table:table-cell>
          <table:table-cell table:style-name="ce320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7]+1" office:value-type="date" office:date-value="2022-05-29" calcext:value-type="date">
            <text:p>2022/05/29</text:p>
          </table:table-cell>
          <table:table-cell table:style-name="ce320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8]+6" office:value-type="date" office:date-value="2022-06-04" calcext:value-type="date">
            <text:p>2022/06/04</text:p>
          </table:table-cell>
          <table:table-cell table:style-name="ce320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9]+1" office:value-type="date" office:date-value="2022-06-05" calcext:value-type="date">
            <text:p>2022/06/05</text:p>
          </table:table-cell>
          <table:table-cell table:style-name="ce320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0]+6" office:value-type="date" office:date-value="2022-06-11" calcext:value-type="date">
            <text:p>2022/06/11</text:p>
          </table:table-cell>
          <table:table-cell table:style-name="ce320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1]+1" office:value-type="date" office:date-value="2022-06-12" calcext:value-type="date">
            <text:p>2022/06/12</text:p>
          </table:table-cell>
          <table:table-cell table:style-name="ce320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2]+6" office:value-type="date" office:date-value="2022-06-18" calcext:value-type="date">
            <text:p>2022/06/18</text:p>
          </table:table-cell>
          <table:table-cell table:style-name="ce320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3]+1" office:value-type="date" office:date-value="2022-06-19" calcext:value-type="date">
            <text:p>2022/06/19</text:p>
          </table:table-cell>
          <table:table-cell table:style-name="ce320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4]+6" office:value-type="date" office:date-value="2022-06-25" calcext:value-type="date">
            <text:p>2022/06/25</text:p>
          </table:table-cell>
          <table:table-cell table:style-name="ce320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5]+1" office:value-type="date" office:date-value="2022-06-26" calcext:value-type="date">
            <text:p>2022/06/26</text:p>
          </table:table-cell>
          <table:table-cell table:style-name="ce320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6]+6" office:value-type="date" office:date-value="2022-07-02" calcext:value-type="date">
            <text:p>2022/07/02</text:p>
          </table:table-cell>
          <table:table-cell table:style-name="ce320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7]+1" office:value-type="date" office:date-value="2022-07-03" calcext:value-type="date">
            <text:p>2022/07/03</text:p>
          </table:table-cell>
          <table:table-cell table:style-name="ce320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8]+6" office:value-type="date" office:date-value="2022-07-09" calcext:value-type="date">
            <text:p>2022/07/09</text:p>
          </table:table-cell>
          <table:table-cell table:style-name="ce320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9]+1" office:value-type="date" office:date-value="2022-07-10" calcext:value-type="date">
            <text:p>2022/07/10</text:p>
          </table:table-cell>
          <table:table-cell table:style-name="ce320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0]+6" office:value-type="date" office:date-value="2022-07-16" calcext:value-type="date">
            <text:p>2022/07/16</text:p>
          </table:table-cell>
          <table:table-cell table:style-name="ce320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1]+1" office:value-type="date" office:date-value="2022-07-17" calcext:value-type="date">
            <text:p>2022/07/17</text:p>
          </table:table-cell>
          <table:table-cell table:style-name="ce320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2]+6" office:value-type="date" office:date-value="2022-07-23" calcext:value-type="date">
            <text:p>2022/07/23</text:p>
          </table:table-cell>
          <table:table-cell table:style-name="ce320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3]+1" office:value-type="date" office:date-value="2022-07-24" calcext:value-type="date">
            <text:p>2022/07/24</text:p>
          </table:table-cell>
          <table:table-cell table:style-name="ce320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4]+6" office:value-type="date" office:date-value="2022-07-30" calcext:value-type="date">
            <text:p>2022/07/30</text:p>
          </table:table-cell>
          <table:table-cell table:style-name="ce320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5]+1" office:value-type="date" office:date-value="2022-07-31" calcext:value-type="date">
            <text:p>2022/07/31</text:p>
          </table:table-cell>
          <table:table-cell table:style-name="ce320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6]+6" office:value-type="date" office:date-value="2022-08-06" calcext:value-type="date">
            <text:p>2022/08/06</text:p>
          </table:table-cell>
          <table:table-cell table:style-name="ce320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7]+1" office:value-type="date" office:date-value="2022-08-07" calcext:value-type="date">
            <text:p>2022/08/07</text:p>
          </table:table-cell>
          <table:table-cell table:style-name="ce320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8]+6" office:value-type="date" office:date-value="2022-08-13" calcext:value-type="date">
            <text:p>2022/08/13</text:p>
          </table:table-cell>
          <table:table-cell table:style-name="ce320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9]+1" office:value-type="date" office:date-value="2022-08-14" calcext:value-type="date">
            <text:p>2022/08/14</text:p>
          </table:table-cell>
          <table:table-cell table:style-name="ce320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0]+6" office:value-type="date" office:date-value="2022-08-20" calcext:value-type="date">
            <text:p>2022/08/20</text:p>
          </table:table-cell>
          <table:table-cell table:style-name="ce320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1]+1" office:value-type="date" office:date-value="2022-08-21" calcext:value-type="date">
            <text:p>2022/08/21</text:p>
          </table:table-cell>
          <table:table-cell table:style-name="ce320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2]+6" office:value-type="date" office:date-value="2022-08-27" calcext:value-type="date">
            <text:p>2022/08/27</text:p>
          </table:table-cell>
          <table:table-cell table:style-name="ce320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3]+1" office:value-type="date" office:date-value="2022-08-28" calcext:value-type="date">
            <text:p>2022/08/28</text:p>
          </table:table-cell>
          <table:table-cell table:style-name="ce320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4]+6" office:value-type="date" office:date-value="2022-09-03" calcext:value-type="date">
            <text:p>2022/09/03</text:p>
          </table:table-cell>
          <table:table-cell table:style-name="ce320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5]+1" office:value-type="date" office:date-value="2022-09-04" calcext:value-type="date">
            <text:p>2022/09/04</text:p>
          </table:table-cell>
          <table:table-cell table:style-name="ce320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6]+6" office:value-type="date" office:date-value="2022-09-10" calcext:value-type="date">
            <text:p>2022/09/10</text:p>
          </table:table-cell>
          <table:table-cell table:style-name="ce320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7]+1" office:value-type="date" office:date-value="2022-09-11" calcext:value-type="date">
            <text:p>2022/09/11</text:p>
          </table:table-cell>
          <table:table-cell table:style-name="ce320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8]+6" office:value-type="date" office:date-value="2022-09-17" calcext:value-type="date">
            <text:p>2022/09/17</text:p>
          </table:table-cell>
          <table:table-cell table:style-name="ce320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9]+1" office:value-type="date" office:date-value="2022-09-18" calcext:value-type="date">
            <text:p>2022/09/18</text:p>
          </table:table-cell>
          <table:table-cell table:style-name="ce320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0]+6" office:value-type="date" office:date-value="2022-09-24" calcext:value-type="date">
            <text:p>2022/09/24</text:p>
          </table:table-cell>
          <table:table-cell table:style-name="ce320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1]+1" office:value-type="date" office:date-value="2022-09-25" calcext:value-type="date">
            <text:p>2022/09/25</text:p>
          </table:table-cell>
          <table:table-cell table:style-name="ce320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2]+6" office:value-type="date" office:date-value="2022-10-01" calcext:value-type="date">
            <text:p>2022/10/01</text:p>
          </table:table-cell>
          <table:table-cell table:style-name="ce320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3]+1" office:value-type="date" office:date-value="2022-10-02" calcext:value-type="date">
            <text:p>2022/10/02</text:p>
          </table:table-cell>
          <table:table-cell table:style-name="ce320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4]+6" office:value-type="date" office:date-value="2022-10-08" calcext:value-type="date">
            <text:p>2022/10/08</text:p>
          </table:table-cell>
          <table:table-cell table:style-name="ce320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5]+1" office:value-type="date" office:date-value="2022-10-09" calcext:value-type="date">
            <text:p>2022/10/09</text:p>
          </table:table-cell>
          <table:table-cell table:style-name="ce320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6]+6" office:value-type="date" office:date-value="2022-10-15" calcext:value-type="date">
            <text:p>2022/10/15</text:p>
          </table:table-cell>
          <table:table-cell table:style-name="ce320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7]+1" office:value-type="date" office:date-value="2022-10-16" calcext:value-type="date">
            <text:p>2022/10/16</text:p>
          </table:table-cell>
          <table:table-cell table:style-name="ce320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8]+6" office:value-type="date" office:date-value="2022-10-22" calcext:value-type="date">
            <text:p>2022/10/22</text:p>
          </table:table-cell>
          <table:table-cell table:style-name="ce320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9]+1" office:value-type="date" office:date-value="2022-10-23" calcext:value-type="date">
            <text:p>2022/10/23</text:p>
          </table:table-cell>
          <table:table-cell table:style-name="ce320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0]+6" office:value-type="date" office:date-value="2022-10-29" calcext:value-type="date">
            <text:p>2022/10/29</text:p>
          </table:table-cell>
          <table:table-cell table:style-name="ce320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1]+1" office:value-type="date" office:date-value="2022-10-30" calcext:value-type="date">
            <text:p>2022/10/30</text:p>
          </table:table-cell>
          <table:table-cell table:style-name="ce320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2]+6" office:value-type="date" office:date-value="2022-11-05" calcext:value-type="date">
            <text:p>2022/11/05</text:p>
          </table:table-cell>
          <table:table-cell table:style-name="ce320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3]+1" office:value-type="date" office:date-value="2022-11-06" calcext:value-type="date">
            <text:p>2022/11/06</text:p>
          </table:table-cell>
          <table:table-cell table:style-name="ce320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4]+6" office:value-type="date" office:date-value="2022-11-12" calcext:value-type="date">
            <text:p>2022/11/12</text:p>
          </table:table-cell>
          <table:table-cell table:style-name="ce320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5]+1" office:value-type="date" office:date-value="2022-11-13" calcext:value-type="date">
            <text:p>2022/11/13</text:p>
          </table:table-cell>
          <table:table-cell table:style-name="ce320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6]+6" office:value-type="date" office:date-value="2022-11-19" calcext:value-type="date">
            <text:p>2022/11/19</text:p>
          </table:table-cell>
          <table:table-cell table:style-name="ce320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7]+1" office:value-type="date" office:date-value="2022-11-20" calcext:value-type="date">
            <text:p>2022/11/20</text:p>
          </table:table-cell>
          <table:table-cell table:style-name="ce320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8]+6" office:value-type="date" office:date-value="2022-11-26" calcext:value-type="date">
            <text:p>2022/11/26</text:p>
          </table:table-cell>
          <table:table-cell table:style-name="ce320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9]+1" office:value-type="date" office:date-value="2022-11-27" calcext:value-type="date">
            <text:p>2022/11/27</text:p>
          </table:table-cell>
          <table:table-cell table:style-name="ce320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0]+6" office:value-type="date" office:date-value="2022-12-03" calcext:value-type="date">
            <text:p>2022/12/03</text:p>
          </table:table-cell>
          <table:table-cell table:style-name="ce320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1]+1" office:value-type="date" office:date-value="2022-12-04" calcext:value-type="date">
            <text:p>2022/12/04</text:p>
          </table:table-cell>
          <table:table-cell table:style-name="ce320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2]+6" office:value-type="date" office:date-value="2022-12-10" calcext:value-type="date">
            <text:p>2022/12/10</text:p>
          </table:table-cell>
          <table:table-cell table:style-name="ce320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3]+1" office:value-type="date" office:date-value="2022-12-11" calcext:value-type="date">
            <text:p>2022/12/11</text:p>
          </table:table-cell>
          <table:table-cell table:style-name="ce320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4]+6" office:value-type="date" office:date-value="2022-12-17" calcext:value-type="date">
            <text:p>2022/12/17</text:p>
          </table:table-cell>
          <table:table-cell table:style-name="ce320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5]+1" office:value-type="date" office:date-value="2022-12-18" calcext:value-type="date">
            <text:p>2022/12/18</text:p>
          </table:table-cell>
          <table:table-cell table:style-name="ce320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6]+6" office:value-type="date" office:date-value="2022-12-24" calcext:value-type="date">
            <text:p>2022/12/24</text:p>
          </table:table-cell>
          <table:table-cell table:style-name="ce320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7]+1" office:value-type="date" office:date-value="2022-12-25" calcext:value-type="date">
            <text:p>2022/12/25</text:p>
          </table:table-cell>
          <table:table-cell table:style-name="ce320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8]+6" office:value-type="date" office:date-value="2022-12-31" calcext:value-type="date">
            <text:p>2022/12/31</text:p>
          </table:table-cell>
          <table:table-cell table:style-name="ce320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9]+1" office:value-type="date" office:date-value="2023-01-01" calcext:value-type="date">
            <text:p>2023/01/01</text:p>
          </table:table-cell>
          <table:table-cell table:style-name="ce320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0]+6" office:value-type="date" office:date-value="2023-01-07" calcext:value-type="date">
            <text:p>2023/01/07</text:p>
          </table:table-cell>
          <table:table-cell table:style-name="ce320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1]+1" office:value-type="date" office:date-value="2023-01-08" calcext:value-type="date">
            <text:p>2023/01/08</text:p>
          </table:table-cell>
          <table:table-cell table:style-name="ce320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2]+6" office:value-type="date" office:date-value="2023-01-14" calcext:value-type="date">
            <text:p>2023/01/14</text:p>
          </table:table-cell>
          <table:table-cell table:style-name="ce320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3]+1" office:value-type="date" office:date-value="2023-01-15" calcext:value-type="date">
            <text:p>2023/01/15</text:p>
          </table:table-cell>
          <table:table-cell table:style-name="ce320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4]+6" office:value-type="date" office:date-value="2023-01-21" calcext:value-type="date">
            <text:p>2023/01/21</text:p>
          </table:table-cell>
          <table:table-cell table:style-name="ce320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5]+1" office:value-type="date" office:date-value="2023-01-22" calcext:value-type="date">
            <text:p>2023/01/22</text:p>
          </table:table-cell>
          <table:table-cell table:style-name="ce320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6]+6" office:value-type="date" office:date-value="2023-01-28" calcext:value-type="date">
            <text:p>2023/01/28</text:p>
          </table:table-cell>
          <table:table-cell table:style-name="ce320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7]+1" office:value-type="date" office:date-value="2023-01-29" calcext:value-type="date">
            <text:p>2023/01/29</text:p>
          </table:table-cell>
          <table:table-cell table:style-name="ce320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8]+6" office:value-type="date" office:date-value="2023-02-04" calcext:value-type="date">
            <text:p>2023/02/04</text:p>
          </table:table-cell>
          <table:table-cell table:style-name="ce320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9]+1" office:value-type="date" office:date-value="2023-02-05" calcext:value-type="date">
            <text:p>2023/02/05</text:p>
          </table:table-cell>
          <table:table-cell table:style-name="ce320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0]+6" office:value-type="date" office:date-value="2023-02-11" calcext:value-type="date">
            <text:p>2023/02/11</text:p>
          </table:table-cell>
          <table:table-cell table:style-name="ce320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1]+1" office:value-type="date" office:date-value="2023-02-12" calcext:value-type="date">
            <text:p>2023/02/12</text:p>
          </table:table-cell>
          <table:table-cell table:style-name="ce320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2]+6" office:value-type="date" office:date-value="2023-02-18" calcext:value-type="date">
            <text:p>2023/02/18</text:p>
          </table:table-cell>
          <table:table-cell table:style-name="ce320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3]+1" office:value-type="date" office:date-value="2023-02-19" calcext:value-type="date">
            <text:p>2023/02/19</text:p>
          </table:table-cell>
          <table:table-cell table:style-name="ce320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4]+6" office:value-type="date" office:date-value="2023-02-25" calcext:value-type="date">
            <text:p>2023/02/25</text:p>
          </table:table-cell>
          <table:table-cell table:style-name="ce320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5]+1" office:value-type="date" office:date-value="2023-02-26" calcext:value-type="date">
            <text:p>2023/02/26</text:p>
          </table:table-cell>
          <table:table-cell table:style-name="ce320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6]+6" office:value-type="date" office:date-value="2023-03-04" calcext:value-type="date">
            <text:p>2023/03/04</text:p>
          </table:table-cell>
          <table:table-cell table:style-name="ce320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7]+1" office:value-type="date" office:date-value="2023-03-05" calcext:value-type="date">
            <text:p>2023/03/05</text:p>
          </table:table-cell>
          <table:table-cell table:style-name="ce320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8]+6" office:value-type="date" office:date-value="2023-03-11" calcext:value-type="date">
            <text:p>2023/03/11</text:p>
          </table:table-cell>
          <table:table-cell table:style-name="ce320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9]+1" office:value-type="date" office:date-value="2023-03-12" calcext:value-type="date">
            <text:p>2023/03/12</text:p>
          </table:table-cell>
          <table:table-cell table:style-name="ce320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0]+6" office:value-type="date" office:date-value="2023-03-18" calcext:value-type="date">
            <text:p>2023/03/18</text:p>
          </table:table-cell>
          <table:table-cell table:style-name="ce320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1]+1" office:value-type="date" office:date-value="2023-03-19" calcext:value-type="date">
            <text:p>2023/03/19</text:p>
          </table:table-cell>
          <table:table-cell table:style-name="ce320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2]+6" office:value-type="date" office:date-value="2023-03-25" calcext:value-type="date">
            <text:p>2023/03/25</text:p>
          </table:table-cell>
          <table:table-cell table:style-name="ce320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3]+1" office:value-type="date" office:date-value="2023-03-26" calcext:value-type="date">
            <text:p>2023/03/26</text:p>
          </table:table-cell>
          <table:table-cell table:style-name="ce320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4]+6" office:value-type="date" office:date-value="2023-04-01" calcext:value-type="date">
            <text:p>2023/04/01</text:p>
          </table:table-cell>
          <table:table-cell table:style-name="ce320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5]+1" office:value-type="date" office:date-value="2023-04-02" calcext:value-type="date">
            <text:p>2023/04/02</text:p>
          </table:table-cell>
          <table:table-cell table:style-name="ce320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6]+6" office:value-type="date" office:date-value="2023-04-08" calcext:value-type="date">
            <text:p>2023/04/08</text:p>
          </table:table-cell>
          <table:table-cell table:style-name="ce320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7]+1" office:value-type="date" office:date-value="2023-04-09" calcext:value-type="date">
            <text:p>2023/04/09</text:p>
          </table:table-cell>
          <table:table-cell table:style-name="ce320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8]+6" office:value-type="date" office:date-value="2023-04-15" calcext:value-type="date">
            <text:p>2023/04/15</text:p>
          </table:table-cell>
          <table:table-cell table:style-name="ce320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9]+1" office:value-type="date" office:date-value="2023-04-16" calcext:value-type="date">
            <text:p>2023/04/16</text:p>
          </table:table-cell>
          <table:table-cell table:style-name="ce320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0]+6" office:value-type="date" office:date-value="2023-04-22" calcext:value-type="date">
            <text:p>2023/04/22</text:p>
          </table:table-cell>
          <table:table-cell table:style-name="ce320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1]+1" office:value-type="date" office:date-value="2023-04-23" calcext:value-type="date">
            <text:p>2023/04/23</text:p>
          </table:table-cell>
          <table:table-cell table:style-name="ce320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2]+6" office:value-type="date" office:date-value="2023-04-29" calcext:value-type="date">
            <text:p>2023/04/29</text:p>
          </table:table-cell>
          <table:table-cell table:style-name="ce320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3]+1" office:value-type="date" office:date-value="2023-04-30" calcext:value-type="date">
            <text:p>2023/04/30</text:p>
          </table:table-cell>
          <table:table-cell table:style-name="ce320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4]+6" office:value-type="date" office:date-value="2023-05-06" calcext:value-type="date">
            <text:p>2023/05/06</text:p>
          </table:table-cell>
          <table:table-cell table:style-name="ce320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5]+1" office:value-type="date" office:date-value="2023-05-07" calcext:value-type="date">
            <text:p>2023/05/07</text:p>
          </table:table-cell>
          <table:table-cell table:style-name="ce320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6]+6" office:value-type="date" office:date-value="2023-05-13" calcext:value-type="date">
            <text:p>2023/05/13</text:p>
          </table:table-cell>
          <table:table-cell table:style-name="ce320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7]+1" office:value-type="date" office:date-value="2023-05-14" calcext:value-type="date">
            <text:p>2023/05/14</text:p>
          </table:table-cell>
          <table:table-cell table:style-name="ce320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8]+6" office:value-type="date" office:date-value="2023-05-20" calcext:value-type="date">
            <text:p>2023/05/20</text:p>
          </table:table-cell>
          <table:table-cell table:style-name="ce320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9]+1" office:value-type="date" office:date-value="2023-05-21" calcext:value-type="date">
            <text:p>2023/05/21</text:p>
          </table:table-cell>
          <table:table-cell table:style-name="ce320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0]+6" office:value-type="date" office:date-value="2023-05-27" calcext:value-type="date">
            <text:p>2023/05/27</text:p>
          </table:table-cell>
          <table:table-cell table:style-name="ce320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1]+1" office:value-type="date" office:date-value="2023-05-28" calcext:value-type="date">
            <text:p>2023/05/28</text:p>
          </table:table-cell>
          <table:table-cell table:style-name="ce320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2]+6" office:value-type="date" office:date-value="2023-06-03" calcext:value-type="date">
            <text:p>2023/06/03</text:p>
          </table:table-cell>
          <table:table-cell table:style-name="ce320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3]+1" office:value-type="date" office:date-value="2023-06-04" calcext:value-type="date">
            <text:p>2023/06/04</text:p>
          </table:table-cell>
          <table:table-cell table:style-name="ce320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4]+6" office:value-type="date" office:date-value="2023-06-10" calcext:value-type="date">
            <text:p>2023/06/10</text:p>
          </table:table-cell>
          <table:table-cell table:style-name="ce320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5]+1" office:value-type="date" office:date-value="2023-06-11" calcext:value-type="date">
            <text:p>2023/06/11</text:p>
          </table:table-cell>
          <table:table-cell table:style-name="ce320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6]+6" office:value-type="date" office:date-value="2023-06-17" calcext:value-type="date">
            <text:p>2023/06/17</text:p>
          </table:table-cell>
          <table:table-cell table:style-name="ce320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7]+1" office:value-type="date" office:date-value="2023-06-18" calcext:value-type="date">
            <text:p>2023/06/18</text:p>
          </table:table-cell>
          <table:table-cell table:style-name="ce320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8]+6" office:value-type="date" office:date-value="2023-06-24" calcext:value-type="date">
            <text:p>2023/06/24</text:p>
          </table:table-cell>
          <table:table-cell table:style-name="ce320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9]+1" office:value-type="date" office:date-value="2023-06-25" calcext:value-type="date">
            <text:p>2023/06/25</text:p>
          </table:table-cell>
          <table:table-cell table:style-name="ce320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0]+6" office:value-type="date" office:date-value="2023-07-01" calcext:value-type="date">
            <text:p>2023/07/01</text:p>
          </table:table-cell>
          <table:table-cell table:style-name="ce320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1]+1" office:value-type="date" office:date-value="2023-07-02" calcext:value-type="date">
            <text:p>2023/07/02</text:p>
          </table:table-cell>
          <table:table-cell table:style-name="ce320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2]+6" office:value-type="date" office:date-value="2023-07-08" calcext:value-type="date">
            <text:p>2023/07/08</text:p>
          </table:table-cell>
          <table:table-cell table:style-name="ce320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3]+1" office:value-type="date" office:date-value="2023-07-09" calcext:value-type="date">
            <text:p>2023/07/09</text:p>
          </table:table-cell>
          <table:table-cell table:style-name="ce320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4]+6" office:value-type="date" office:date-value="2023-07-15" calcext:value-type="date">
            <text:p>2023/07/15</text:p>
          </table:table-cell>
          <table:table-cell table:style-name="ce320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5]+1" office:value-type="date" office:date-value="2023-07-16" calcext:value-type="date">
            <text:p>2023/07/16</text:p>
          </table:table-cell>
          <table:table-cell table:style-name="ce320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6]+6" office:value-type="date" office:date-value="2023-07-22" calcext:value-type="date">
            <text:p>2023/07/22</text:p>
          </table:table-cell>
          <table:table-cell table:style-name="ce320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7]+1" office:value-type="date" office:date-value="2023-07-23" calcext:value-type="date">
            <text:p>2023/07/23</text:p>
          </table:table-cell>
          <table:table-cell table:style-name="ce320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8]+6" office:value-type="date" office:date-value="2023-07-29" calcext:value-type="date">
            <text:p>2023/07/29</text:p>
          </table:table-cell>
          <table:table-cell table:style-name="ce320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9]+1" office:value-type="date" office:date-value="2023-07-30" calcext:value-type="date">
            <text:p>2023/07/30</text:p>
          </table:table-cell>
          <table:table-cell table:style-name="ce320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0]+6" office:value-type="date" office:date-value="2023-08-05" calcext:value-type="date">
            <text:p>2023/08/05</text:p>
          </table:table-cell>
          <table:table-cell table:style-name="ce320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1]+1" office:value-type="date" office:date-value="2023-08-06" calcext:value-type="date">
            <text:p>2023/08/06</text:p>
          </table:table-cell>
          <table:table-cell table:style-name="ce320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2]+6" office:value-type="date" office:date-value="2023-08-12" calcext:value-type="date">
            <text:p>2023/08/12</text:p>
          </table:table-cell>
          <table:table-cell table:style-name="ce320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3]+1" office:value-type="date" office:date-value="2023-08-13" calcext:value-type="date">
            <text:p>2023/08/13</text:p>
          </table:table-cell>
          <table:table-cell table:style-name="ce320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4]+6" office:value-type="date" office:date-value="2023-08-19" calcext:value-type="date">
            <text:p>2023/08/19</text:p>
          </table:table-cell>
          <table:table-cell table:style-name="ce320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5]+1" office:value-type="date" office:date-value="2023-08-20" calcext:value-type="date">
            <text:p>2023/08/20</text:p>
          </table:table-cell>
          <table:table-cell table:style-name="ce320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6]+6" office:value-type="date" office:date-value="2023-08-26" calcext:value-type="date">
            <text:p>2023/08/26</text:p>
          </table:table-cell>
          <table:table-cell table:style-name="ce320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7]+1" office:value-type="date" office:date-value="2023-08-27" calcext:value-type="date">
            <text:p>2023/08/27</text:p>
          </table:table-cell>
          <table:table-cell table:style-name="ce320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8]+6" office:value-type="date" office:date-value="2023-09-02" calcext:value-type="date">
            <text:p>2023/09/02</text:p>
          </table:table-cell>
          <table:table-cell table:style-name="ce320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9]+1" office:value-type="date" office:date-value="2023-09-03" calcext:value-type="date">
            <text:p>2023/09/03</text:p>
          </table:table-cell>
          <table:table-cell table:style-name="ce320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0]+6" office:value-type="date" office:date-value="2023-09-09" calcext:value-type="date">
            <text:p>2023/09/09</text:p>
          </table:table-cell>
          <table:table-cell table:style-name="ce320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1]+1" office:value-type="date" office:date-value="2023-09-10" calcext:value-type="date">
            <text:p>2023/09/10</text:p>
          </table:table-cell>
          <table:table-cell table:style-name="ce320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2]+6" office:value-type="date" office:date-value="2023-09-16" calcext:value-type="date">
            <text:p>2023/09/16</text:p>
          </table:table-cell>
          <table:table-cell table:style-name="ce320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3]+1" office:value-type="date" office:date-value="2023-09-17" calcext:value-type="date">
            <text:p>2023/09/17</text:p>
          </table:table-cell>
          <table:table-cell table:style-name="ce320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4]+6" office:value-type="date" office:date-value="2023-09-23" calcext:value-type="date">
            <text:p>2023/09/23</text:p>
          </table:table-cell>
          <table:table-cell table:style-name="ce320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5]+1" office:value-type="date" office:date-value="2023-09-24" calcext:value-type="date">
            <text:p>2023/09/24</text:p>
          </table:table-cell>
          <table:table-cell table:style-name="ce320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6]+6" office:value-type="date" office:date-value="2023-09-30" calcext:value-type="date">
            <text:p>2023/09/30</text:p>
          </table:table-cell>
          <table:table-cell table:style-name="ce320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7]+1" office:value-type="date" office:date-value="2023-10-01" calcext:value-type="date">
            <text:p>2023/10/01</text:p>
          </table:table-cell>
          <table:table-cell table:style-name="ce320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8]+6" office:value-type="date" office:date-value="2023-10-07" calcext:value-type="date">
            <text:p>2023/10/07</text:p>
          </table:table-cell>
          <table:table-cell table:style-name="ce320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9]+1" office:value-type="date" office:date-value="2023-10-08" calcext:value-type="date">
            <text:p>2023/10/08</text:p>
          </table:table-cell>
          <table:table-cell table:style-name="ce320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0]+6" office:value-type="date" office:date-value="2023-10-14" calcext:value-type="date">
            <text:p>2023/10/14</text:p>
          </table:table-cell>
          <table:table-cell table:style-name="ce320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1]+1" office:value-type="date" office:date-value="2023-10-15" calcext:value-type="date">
            <text:p>2023/10/15</text:p>
          </table:table-cell>
          <table:table-cell table:style-name="ce320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2]+6" office:value-type="date" office:date-value="2023-10-21" calcext:value-type="date">
            <text:p>2023/10/21</text:p>
          </table:table-cell>
          <table:table-cell table:style-name="ce320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3]+1" office:value-type="date" office:date-value="2023-10-22" calcext:value-type="date">
            <text:p>2023/10/22</text:p>
          </table:table-cell>
          <table:table-cell table:style-name="ce320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4]+6" office:value-type="date" office:date-value="2023-10-28" calcext:value-type="date">
            <text:p>2023/10/28</text:p>
          </table:table-cell>
          <table:table-cell table:style-name="ce320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5]+1" office:value-type="date" office:date-value="2023-10-29" calcext:value-type="date">
            <text:p>2023/10/29</text:p>
          </table:table-cell>
          <table:table-cell table:style-name="ce320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6]+6" office:value-type="date" office:date-value="2023-11-04" calcext:value-type="date">
            <text:p>2023/11/04</text:p>
          </table:table-cell>
          <table:table-cell table:style-name="ce320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7]+1" office:value-type="date" office:date-value="2023-11-05" calcext:value-type="date">
            <text:p>2023/11/05</text:p>
          </table:table-cell>
          <table:table-cell table:style-name="ce320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8]+6" office:value-type="date" office:date-value="2023-11-11" calcext:value-type="date">
            <text:p>2023/11/11</text:p>
          </table:table-cell>
          <table:table-cell table:style-name="ce320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9]+1" office:value-type="date" office:date-value="2023-11-12" calcext:value-type="date">
            <text:p>2023/11/12</text:p>
          </table:table-cell>
          <table:table-cell table:style-name="ce320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0]+6" office:value-type="date" office:date-value="2023-11-18" calcext:value-type="date">
            <text:p>2023/11/18</text:p>
          </table:table-cell>
          <table:table-cell table:style-name="ce320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1]+1" office:value-type="date" office:date-value="2023-11-19" calcext:value-type="date">
            <text:p>2023/11/19</text:p>
          </table:table-cell>
          <table:table-cell table:style-name="ce320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2]+6" office:value-type="date" office:date-value="2023-11-25" calcext:value-type="date">
            <text:p>2023/11/25</text:p>
          </table:table-cell>
          <table:table-cell table:style-name="ce320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3]+1" office:value-type="date" office:date-value="2023-11-26" calcext:value-type="date">
            <text:p>2023/11/26</text:p>
          </table:table-cell>
          <table:table-cell table:style-name="ce320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4]+6" office:value-type="date" office:date-value="2023-12-02" calcext:value-type="date">
            <text:p>2023/12/02</text:p>
          </table:table-cell>
          <table:table-cell table:style-name="ce320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5]+1" office:value-type="date" office:date-value="2023-12-03" calcext:value-type="date">
            <text:p>2023/12/03</text:p>
          </table:table-cell>
          <table:table-cell table:style-name="ce320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6]+6" office:value-type="date" office:date-value="2023-12-09" calcext:value-type="date">
            <text:p>2023/12/09</text:p>
          </table:table-cell>
          <table:table-cell table:style-name="ce320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7]+1" office:value-type="date" office:date-value="2023-12-10" calcext:value-type="date">
            <text:p>2023/12/10</text:p>
          </table:table-cell>
          <table:table-cell table:style-name="ce320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8]+6" office:value-type="date" office:date-value="2023-12-16" calcext:value-type="date">
            <text:p>2023/12/16</text:p>
          </table:table-cell>
          <table:table-cell table:style-name="ce320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9]+1" office:value-type="date" office:date-value="2023-12-17" calcext:value-type="date">
            <text:p>2023/12/17</text:p>
          </table:table-cell>
          <table:table-cell table:style-name="ce320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0]+6" office:value-type="date" office:date-value="2023-12-23" calcext:value-type="date">
            <text:p>2023/12/23</text:p>
          </table:table-cell>
          <table:table-cell table:style-name="ce320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1]+1" office:value-type="date" office:date-value="2023-12-24" calcext:value-type="date">
            <text:p>2023/12/24</text:p>
          </table:table-cell>
          <table:table-cell table:style-name="ce320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2]+6" office:value-type="date" office:date-value="2023-12-30" calcext:value-type="date">
            <text:p>2023/12/30</text:p>
          </table:table-cell>
          <table:table-cell table:style-name="ce320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3]+1" office:value-type="date" office:date-value="2023-12-31" calcext:value-type="date">
            <text:p>2023/12/31</text:p>
          </table:table-cell>
          <table:table-cell table:style-name="ce320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4]+6" office:value-type="date" office:date-value="2024-01-06" calcext:value-type="date">
            <text:p>2024/01/06</text:p>
          </table:table-cell>
          <table:table-cell table:style-name="ce320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5]+1" office:value-type="date" office:date-value="2024-01-07" calcext:value-type="date">
            <text:p>2024/01/07</text:p>
          </table:table-cell>
          <table:table-cell table:style-name="ce320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6]+6" office:value-type="date" office:date-value="2024-01-13" calcext:value-type="date">
            <text:p>2024/01/13</text:p>
          </table:table-cell>
          <table:table-cell table:style-name="ce320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7]+1" office:value-type="date" office:date-value="2024-01-14" calcext:value-type="date">
            <text:p>2024/01/14</text:p>
          </table:table-cell>
          <table:table-cell table:style-name="ce320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8]+6" office:value-type="date" office:date-value="2024-01-20" calcext:value-type="date">
            <text:p>2024/01/20</text:p>
          </table:table-cell>
          <table:table-cell table:style-name="ce320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9]+1" office:value-type="date" office:date-value="2024-01-21" calcext:value-type="date">
            <text:p>2024/01/21</text:p>
          </table:table-cell>
          <table:table-cell table:style-name="ce320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0]+6" office:value-type="date" office:date-value="2024-01-27" calcext:value-type="date">
            <text:p>2024/01/27</text:p>
          </table:table-cell>
          <table:table-cell table:style-name="ce320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1]+1" office:value-type="date" office:date-value="2024-01-28" calcext:value-type="date">
            <text:p>2024/01/28</text:p>
          </table:table-cell>
          <table:table-cell table:style-name="ce320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2]+6" office:value-type="date" office:date-value="2024-02-03" calcext:value-type="date">
            <text:p>2024/02/03</text:p>
          </table:table-cell>
          <table:table-cell table:style-name="ce320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3]+1" office:value-type="date" office:date-value="2024-02-04" calcext:value-type="date">
            <text:p>2024/02/04</text:p>
          </table:table-cell>
          <table:table-cell table:style-name="ce320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4]+6" office:value-type="date" office:date-value="2024-02-10" calcext:value-type="date">
            <text:p>2024/02/10</text:p>
          </table:table-cell>
          <table:table-cell table:style-name="ce320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5]+1" office:value-type="date" office:date-value="2024-02-11" calcext:value-type="date">
            <text:p>2024/02/11</text:p>
          </table:table-cell>
          <table:table-cell table:style-name="ce320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6]+6" office:value-type="date" office:date-value="2024-02-17" calcext:value-type="date">
            <text:p>2024/02/17</text:p>
          </table:table-cell>
          <table:table-cell table:style-name="ce320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7]+1" office:value-type="date" office:date-value="2024-02-18" calcext:value-type="date">
            <text:p>2024/02/18</text:p>
          </table:table-cell>
          <table:table-cell table:style-name="ce320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8]+6" office:value-type="date" office:date-value="2024-02-24" calcext:value-type="date">
            <text:p>2024/02/24</text:p>
          </table:table-cell>
          <table:table-cell table:style-name="ce320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9]+1" office:value-type="date" office:date-value="2024-02-25" calcext:value-type="date">
            <text:p>2024/02/25</text:p>
          </table:table-cell>
          <table:table-cell table:style-name="ce320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0]+6" office:value-type="date" office:date-value="2024-03-02" calcext:value-type="date">
            <text:p>2024/03/02</text:p>
          </table:table-cell>
          <table:table-cell table:style-name="ce320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1]+1" office:value-type="date" office:date-value="2024-03-03" calcext:value-type="date">
            <text:p>2024/03/03</text:p>
          </table:table-cell>
          <table:table-cell table:style-name="ce320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2]+6" office:value-type="date" office:date-value="2024-03-09" calcext:value-type="date">
            <text:p>2024/03/09</text:p>
          </table:table-cell>
          <table:table-cell table:style-name="ce320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3]+1" office:value-type="date" office:date-value="2024-03-10" calcext:value-type="date">
            <text:p>2024/03/10</text:p>
          </table:table-cell>
          <table:table-cell table:style-name="ce320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4]+6" office:value-type="date" office:date-value="2024-03-16" calcext:value-type="date">
            <text:p>2024/03/16</text:p>
          </table:table-cell>
          <table:table-cell table:style-name="ce320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5]+1" office:value-type="date" office:date-value="2024-03-17" calcext:value-type="date">
            <text:p>2024/03/17</text:p>
          </table:table-cell>
          <table:table-cell table:style-name="ce320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6]+6" office:value-type="date" office:date-value="2024-03-23" calcext:value-type="date">
            <text:p>2024/03/23</text:p>
          </table:table-cell>
          <table:table-cell table:style-name="ce320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7]+1" office:value-type="date" office:date-value="2024-03-24" calcext:value-type="date">
            <text:p>2024/03/24</text:p>
          </table:table-cell>
          <table:table-cell table:style-name="ce320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8]+6" office:value-type="date" office:date-value="2024-03-30" calcext:value-type="date">
            <text:p>2024/03/30</text:p>
          </table:table-cell>
          <table:table-cell table:style-name="ce320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9]+1" office:value-type="date" office:date-value="2024-03-31" calcext:value-type="date">
            <text:p>2024/03/31</text:p>
          </table:table-cell>
          <table:table-cell table:style-name="ce320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0]+6" office:value-type="date" office:date-value="2024-04-06" calcext:value-type="date">
            <text:p>2024/04/06</text:p>
          </table:table-cell>
          <table:table-cell table:style-name="ce320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1]+1" office:value-type="date" office:date-value="2024-04-07" calcext:value-type="date">
            <text:p>2024/04/07</text:p>
          </table:table-cell>
          <table:table-cell table:style-name="ce320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2]+6" office:value-type="date" office:date-value="2024-04-13" calcext:value-type="date">
            <text:p>2024/04/13</text:p>
          </table:table-cell>
          <table:table-cell table:style-name="ce320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3]+1" office:value-type="date" office:date-value="2024-04-14" calcext:value-type="date">
            <text:p>2024/04/14</text:p>
          </table:table-cell>
          <table:table-cell table:style-name="ce320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4]+6" office:value-type="date" office:date-value="2024-04-20" calcext:value-type="date">
            <text:p>2024/04/20</text:p>
          </table:table-cell>
          <table:table-cell table:style-name="ce320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5]+1" office:value-type="date" office:date-value="2024-04-21" calcext:value-type="date">
            <text:p>2024/04/21</text:p>
          </table:table-cell>
          <table:table-cell table:style-name="ce320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6]+6" office:value-type="date" office:date-value="2024-04-27" calcext:value-type="date">
            <text:p>2024/04/27</text:p>
          </table:table-cell>
          <table:table-cell table:style-name="ce320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7]+1" office:value-type="date" office:date-value="2024-04-28" calcext:value-type="date">
            <text:p>2024/04/28</text:p>
          </table:table-cell>
          <table:table-cell table:style-name="ce320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8]+6" office:value-type="date" office:date-value="2024-05-04" calcext:value-type="date">
            <text:p>2024/05/04</text:p>
          </table:table-cell>
          <table:table-cell table:style-name="ce320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9]+1" office:value-type="date" office:date-value="2024-05-05" calcext:value-type="date">
            <text:p>2024/05/05</text:p>
          </table:table-cell>
          <table:table-cell table:style-name="ce320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0]+6" office:value-type="date" office:date-value="2024-05-11" calcext:value-type="date">
            <text:p>2024/05/11</text:p>
          </table:table-cell>
          <table:table-cell table:style-name="ce320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1]+1" office:value-type="date" office:date-value="2024-05-12" calcext:value-type="date">
            <text:p>2024/05/12</text:p>
          </table:table-cell>
          <table:table-cell table:style-name="ce320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2]+6" office:value-type="date" office:date-value="2024-05-18" calcext:value-type="date">
            <text:p>2024/05/18</text:p>
          </table:table-cell>
          <table:table-cell table:style-name="ce320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3]+1" office:value-type="date" office:date-value="2024-05-19" calcext:value-type="date">
            <text:p>2024/05/19</text:p>
          </table:table-cell>
          <table:table-cell table:style-name="ce320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4]+6" office:value-type="date" office:date-value="2024-05-25" calcext:value-type="date">
            <text:p>2024/05/25</text:p>
          </table:table-cell>
          <table:table-cell table:style-name="ce320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5]+1" office:value-type="date" office:date-value="2024-05-26" calcext:value-type="date">
            <text:p>2024/05/26</text:p>
          </table:table-cell>
          <table:table-cell table:style-name="ce320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6]+6" office:value-type="date" office:date-value="2024-06-01" calcext:value-type="date">
            <text:p>2024/06/01</text:p>
          </table:table-cell>
          <table:table-cell table:style-name="ce320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7]+1" office:value-type="date" office:date-value="2024-06-02" calcext:value-type="date">
            <text:p>2024/06/02</text:p>
          </table:table-cell>
          <table:table-cell table:style-name="ce320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8]+6" office:value-type="date" office:date-value="2024-06-08" calcext:value-type="date">
            <text:p>2024/06/08</text:p>
          </table:table-cell>
          <table:table-cell table:style-name="ce320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9]+1" office:value-type="date" office:date-value="2024-06-09" calcext:value-type="date">
            <text:p>2024/06/09</text:p>
          </table:table-cell>
          <table:table-cell table:style-name="ce320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0]+6" office:value-type="date" office:date-value="2024-06-15" calcext:value-type="date">
            <text:p>2024/06/15</text:p>
          </table:table-cell>
          <table:table-cell table:style-name="ce320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1]+1" office:value-type="date" office:date-value="2024-06-16" calcext:value-type="date">
            <text:p>2024/06/16</text:p>
          </table:table-cell>
          <table:table-cell table:style-name="ce320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2]+6" office:value-type="date" office:date-value="2024-06-22" calcext:value-type="date">
            <text:p>2024/06/22</text:p>
          </table:table-cell>
          <table:table-cell table:style-name="ce320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3]+1" office:value-type="date" office:date-value="2024-06-23" calcext:value-type="date">
            <text:p>2024/06/23</text:p>
          </table:table-cell>
          <table:table-cell table:style-name="ce320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4]+6" office:value-type="date" office:date-value="2024-06-29" calcext:value-type="date">
            <text:p>2024/06/29</text:p>
          </table:table-cell>
          <table:table-cell table:style-name="ce320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5]+1" office:value-type="date" office:date-value="2024-06-30" calcext:value-type="date">
            <text:p>2024/06/30</text:p>
          </table:table-cell>
          <table:table-cell table:style-name="ce320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6]+6" office:value-type="date" office:date-value="2024-07-06" calcext:value-type="date">
            <text:p>2024/07/06</text:p>
          </table:table-cell>
          <table:table-cell table:style-name="ce320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7]+1" office:value-type="date" office:date-value="2024-07-07" calcext:value-type="date">
            <text:p>2024/07/07</text:p>
          </table:table-cell>
          <table:table-cell table:style-name="ce320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8]+6" office:value-type="date" office:date-value="2024-07-13" calcext:value-type="date">
            <text:p>2024/07/13</text:p>
          </table:table-cell>
          <table:table-cell table:style-name="ce320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9]+1" office:value-type="date" office:date-value="2024-07-14" calcext:value-type="date">
            <text:p>2024/07/14</text:p>
          </table:table-cell>
          <table:table-cell table:style-name="ce320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0]+6" office:value-type="date" office:date-value="2024-07-20" calcext:value-type="date">
            <text:p>2024/07/20</text:p>
          </table:table-cell>
          <table:table-cell table:style-name="ce320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1]+1" office:value-type="date" office:date-value="2024-07-21" calcext:value-type="date">
            <text:p>2024/07/21</text:p>
          </table:table-cell>
          <table:table-cell table:style-name="ce320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2]+6" office:value-type="date" office:date-value="2024-07-27" calcext:value-type="date">
            <text:p>2024/07/27</text:p>
          </table:table-cell>
          <table:table-cell table:style-name="ce320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3]+1" office:value-type="date" office:date-value="2024-07-28" calcext:value-type="date">
            <text:p>2024/07/28</text:p>
          </table:table-cell>
          <table:table-cell table:style-name="ce320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4]+6" office:value-type="date" office:date-value="2024-08-03" calcext:value-type="date">
            <text:p>2024/08/03</text:p>
          </table:table-cell>
          <table:table-cell table:style-name="ce320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5]+1" office:value-type="date" office:date-value="2024-08-04" calcext:value-type="date">
            <text:p>2024/08/04</text:p>
          </table:table-cell>
          <table:table-cell table:style-name="ce320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6]+6" office:value-type="date" office:date-value="2024-08-10" calcext:value-type="date">
            <text:p>2024/08/10</text:p>
          </table:table-cell>
          <table:table-cell table:style-name="ce320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7]+1" office:value-type="date" office:date-value="2024-08-11" calcext:value-type="date">
            <text:p>2024/08/11</text:p>
          </table:table-cell>
          <table:table-cell table:style-name="ce320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8]+6" office:value-type="date" office:date-value="2024-08-17" calcext:value-type="date">
            <text:p>2024/08/17</text:p>
          </table:table-cell>
          <table:table-cell table:style-name="ce320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9]+1" office:value-type="date" office:date-value="2024-08-18" calcext:value-type="date">
            <text:p>2024/08/18</text:p>
          </table:table-cell>
          <table:table-cell table:style-name="ce320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0]+6" office:value-type="date" office:date-value="2024-08-24" calcext:value-type="date">
            <text:p>2024/08/24</text:p>
          </table:table-cell>
          <table:table-cell table:style-name="ce320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1]+1" office:value-type="date" office:date-value="2024-08-25" calcext:value-type="date">
            <text:p>2024/08/25</text:p>
          </table:table-cell>
          <table:table-cell table:style-name="ce320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2]+6" office:value-type="date" office:date-value="2024-08-31" calcext:value-type="date">
            <text:p>2024/08/31</text:p>
          </table:table-cell>
          <table:table-cell table:style-name="ce320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3]+1" office:value-type="date" office:date-value="2024-09-01" calcext:value-type="date">
            <text:p>2024/09/01</text:p>
          </table:table-cell>
          <table:table-cell table:style-name="ce320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4]+6" office:value-type="date" office:date-value="2024-09-07" calcext:value-type="date">
            <text:p>2024/09/07</text:p>
          </table:table-cell>
          <table:table-cell table:style-name="ce320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5]+1" office:value-type="date" office:date-value="2024-09-08" calcext:value-type="date">
            <text:p>2024/09/08</text:p>
          </table:table-cell>
          <table:table-cell table:style-name="ce320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6]+6" office:value-type="date" office:date-value="2024-09-14" calcext:value-type="date">
            <text:p>2024/09/14</text:p>
          </table:table-cell>
          <table:table-cell table:style-name="ce320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7]+1" office:value-type="date" office:date-value="2024-09-15" calcext:value-type="date">
            <text:p>2024/09/15</text:p>
          </table:table-cell>
          <table:table-cell table:style-name="ce320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8]+6" office:value-type="date" office:date-value="2024-09-21" calcext:value-type="date">
            <text:p>2024/09/21</text:p>
          </table:table-cell>
          <table:table-cell table:style-name="ce320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9]+1" office:value-type="date" office:date-value="2024-09-22" calcext:value-type="date">
            <text:p>2024/09/22</text:p>
          </table:table-cell>
          <table:table-cell table:style-name="ce320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0]+6" office:value-type="date" office:date-value="2024-09-28" calcext:value-type="date">
            <text:p>2024/09/28</text:p>
          </table:table-cell>
          <table:table-cell table:style-name="ce320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1]+1" office:value-type="date" office:date-value="2024-09-29" calcext:value-type="date">
            <text:p>2024/09/29</text:p>
          </table:table-cell>
          <table:table-cell table:style-name="ce320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2]+6" office:value-type="date" office:date-value="2024-10-05" calcext:value-type="date">
            <text:p>2024/10/05</text:p>
          </table:table-cell>
          <table:table-cell table:style-name="ce320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3]+1" office:value-type="date" office:date-value="2024-10-06" calcext:value-type="date">
            <text:p>2024/10/06</text:p>
          </table:table-cell>
          <table:table-cell table:style-name="ce320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4]+6" office:value-type="date" office:date-value="2024-10-12" calcext:value-type="date">
            <text:p>2024/10/12</text:p>
          </table:table-cell>
          <table:table-cell table:style-name="ce320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5]+1" office:value-type="date" office:date-value="2024-10-13" calcext:value-type="date">
            <text:p>2024/10/13</text:p>
          </table:table-cell>
          <table:table-cell table:style-name="ce320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6]+6" office:value-type="date" office:date-value="2024-10-19" calcext:value-type="date">
            <text:p>2024/10/19</text:p>
          </table:table-cell>
          <table:table-cell table:style-name="ce320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7]+1" office:value-type="date" office:date-value="2024-10-20" calcext:value-type="date">
            <text:p>2024/10/20</text:p>
          </table:table-cell>
          <table:table-cell table:style-name="ce320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8]+6" office:value-type="date" office:date-value="2024-10-26" calcext:value-type="date">
            <text:p>2024/10/26</text:p>
          </table:table-cell>
          <table:table-cell table:style-name="ce320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9]+1" office:value-type="date" office:date-value="2024-10-27" calcext:value-type="date">
            <text:p>2024/10/27</text:p>
          </table:table-cell>
          <table:table-cell table:style-name="ce320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0]+6" office:value-type="date" office:date-value="2024-11-02" calcext:value-type="date">
            <text:p>2024/11/02</text:p>
          </table:table-cell>
          <table:table-cell table:style-name="ce320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1]+1" office:value-type="date" office:date-value="2024-11-03" calcext:value-type="date">
            <text:p>2024/11/03</text:p>
          </table:table-cell>
          <table:table-cell table:style-name="ce320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2]+6" office:value-type="date" office:date-value="2024-11-09" calcext:value-type="date">
            <text:p>2024/11/09</text:p>
          </table:table-cell>
          <table:table-cell table:style-name="ce320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3]+1" office:value-type="date" office:date-value="2024-11-10" calcext:value-type="date">
            <text:p>2024/11/10</text:p>
          </table:table-cell>
          <table:table-cell table:style-name="ce320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4]+6" office:value-type="date" office:date-value="2024-11-16" calcext:value-type="date">
            <text:p>2024/11/16</text:p>
          </table:table-cell>
          <table:table-cell table:style-name="ce320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5]+1" office:value-type="date" office:date-value="2024-11-17" calcext:value-type="date">
            <text:p>2024/11/17</text:p>
          </table:table-cell>
          <table:table-cell table:style-name="ce320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6]+6" office:value-type="date" office:date-value="2024-11-23" calcext:value-type="date">
            <text:p>2024/11/23</text:p>
          </table:table-cell>
          <table:table-cell table:style-name="ce320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7]+1" office:value-type="date" office:date-value="2024-11-24" calcext:value-type="date">
            <text:p>2024/11/24</text:p>
          </table:table-cell>
          <table:table-cell table:style-name="ce320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8]+6" office:value-type="date" office:date-value="2024-11-30" calcext:value-type="date">
            <text:p>2024/11/30</text:p>
          </table:table-cell>
          <table:table-cell table:style-name="ce320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9]+1" office:value-type="date" office:date-value="2024-12-01" calcext:value-type="date">
            <text:p>2024/12/01</text:p>
          </table:table-cell>
          <table:table-cell table:style-name="ce320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0]+6" office:value-type="date" office:date-value="2024-12-07" calcext:value-type="date">
            <text:p>2024/12/07</text:p>
          </table:table-cell>
          <table:table-cell table:style-name="ce320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1]+1" office:value-type="date" office:date-value="2024-12-08" calcext:value-type="date">
            <text:p>2024/12/08</text:p>
          </table:table-cell>
          <table:table-cell table:style-name="ce320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2]+6" office:value-type="date" office:date-value="2024-12-14" calcext:value-type="date">
            <text:p>2024/12/14</text:p>
          </table:table-cell>
          <table:table-cell table:style-name="ce320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3]+1" office:value-type="date" office:date-value="2024-12-15" calcext:value-type="date">
            <text:p>2024/12/15</text:p>
          </table:table-cell>
          <table:table-cell table:style-name="ce320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4]+6" office:value-type="date" office:date-value="2024-12-21" calcext:value-type="date">
            <text:p>2024/12/21</text:p>
          </table:table-cell>
          <table:table-cell table:style-name="ce320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5]+1" office:value-type="date" office:date-value="2024-12-22" calcext:value-type="date">
            <text:p>2024/12/22</text:p>
          </table:table-cell>
          <table:table-cell table:style-name="ce320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6]+6" office:value-type="date" office:date-value="2024-12-28" calcext:value-type="date">
            <text:p>2024/12/28</text:p>
          </table:table-cell>
          <table:table-cell table:style-name="ce320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7]+1" office:value-type="date" office:date-value="2024-12-29" calcext:value-type="date">
            <text:p>2024/12/29</text:p>
          </table:table-cell>
          <table:table-cell table:style-name="ce320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8]+6" office:value-type="date" office:date-value="2025-01-04" calcext:value-type="date">
            <text:p>2025/01/04</text:p>
          </table:table-cell>
          <table:table-cell table:style-name="ce320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9]+1" office:value-type="date" office:date-value="2025-01-05" calcext:value-type="date">
            <text:p>2025/01/05</text:p>
          </table:table-cell>
          <table:table-cell table:style-name="ce320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0]+6" office:value-type="date" office:date-value="2025-01-11" calcext:value-type="date">
            <text:p>2025/01/11</text:p>
          </table:table-cell>
          <table:table-cell table:style-name="ce320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1]+1" office:value-type="date" office:date-value="2025-01-12" calcext:value-type="date">
            <text:p>2025/01/12</text:p>
          </table:table-cell>
          <table:table-cell table:style-name="ce320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2]+6" office:value-type="date" office:date-value="2025-01-18" calcext:value-type="date">
            <text:p>2025/01/18</text:p>
          </table:table-cell>
          <table:table-cell table:style-name="ce320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3]+1" office:value-type="date" office:date-value="2025-01-19" calcext:value-type="date">
            <text:p>2025/01/19</text:p>
          </table:table-cell>
          <table:table-cell table:style-name="ce320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4]+6" office:value-type="date" office:date-value="2025-01-25" calcext:value-type="date">
            <text:p>2025/01/25</text:p>
          </table:table-cell>
          <table:table-cell table:style-name="ce320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00/00/00</text:date>, <text:time style:data-style-name="N2" text:time-value="17:04:25.5931977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8</meta:editing-cycles>
    <meta:creation-date>2020-07-07T01:18:25</meta:creation-date>
    <dc:date>2026-06-05T17:30:31.694010200</dc:date>
    <dc:language>ja-JP</dc:language>
    <meta:editing-duration>PT47M49S</meta:editing-duration>
    <meta:generator>LibreOffice/25.8.6.2$Windows_X86_64 LibreOffice_project/b4b39682cd9868fa725bc664aff94278d315bd04</meta:generator>
    <meta:document-statistic meta:table-count="2" meta:cell-count="8179" meta:object-count="0"/>
    <meta:user-defined meta:name="AppVersion">16.0300</meta:user-defined>
    <meta:user-defined meta:name="ContentTypeId">0x010100B552E1E9D63E444D813A0265B822756D</meta:user-defined>
  </office:meta>
</office:document-meta>
</file>