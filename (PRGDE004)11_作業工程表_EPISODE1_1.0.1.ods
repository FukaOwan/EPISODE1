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wiss"/>
    <style:font-face style:name="游ゴシック Medium" svg:font-family="'游ゴシック Medium'" style:font-family-generic="modern"/>
    <style:font-face style:name="游ゴシック Medium1" svg:font-family="'游ゴシック Medium'" style:font-family-generic="modern" style:font-pitch="variable"/>
    <style:font-face style:name="ＭＳ ゴシック" svg:font-family="'ＭＳ ゴシック', 'Noto Sans JP', 游ゴシック, メイリオ" style:font-family-generic="modern" style:font-pitch="fixed"/>
  </office:font-face-decls>
  <office:automatic-styles>
    <style:style style:name="co16" style:family="table-column">
      <style:table-column-properties fo:break-before="auto" style:column-width="1.632cm"/>
    </style:style>
    <style:style style:name="co17" style:family="table-column">
      <style:table-column-properties fo:break-before="auto" style:column-width="2.152cm"/>
    </style:style>
    <style:style style:name="co18" style:family="table-column">
      <style:table-column-properties fo:break-before="auto" style:column-width="2.457cm"/>
    </style:style>
    <style:style style:name="co15" style:family="table-column">
      <style:table-column-properties fo:break-before="auto" style:column-width="2.708cm"/>
    </style:style>
    <style:style style:name="co5" style:family="table-column">
      <style:table-column-properties fo:break-before="auto" style:column-width="0.753cm"/>
    </style:style>
    <style:style style:name="co6" style:family="table-column">
      <style:table-column-properties fo:break-before="auto" style:column-width="1.268cm"/>
    </style:style>
    <style:style style:name="co7" style:family="table-column">
      <style:table-column-properties fo:break-before="auto" style:column-width="1.381cm"/>
    </style:style>
    <style:style style:name="co8" style:family="table-column">
      <style:table-column-properties fo:break-before="auto" style:column-width="4.761cm"/>
    </style:style>
    <style:style style:name="co9" style:family="table-column">
      <style:table-column-properties fo:break-before="auto" style:column-width="6.581cm"/>
    </style:style>
    <style:style style:name="co10" style:family="table-column">
      <style:table-column-properties fo:break-before="auto" style:column-width="10.82cm"/>
    </style:style>
    <style:style style:name="co11" style:family="table-column">
      <style:table-column-properties fo:break-before="auto" style:column-width="1.722cm"/>
    </style:style>
    <style:style style:name="co12" style:family="table-column">
      <style:table-column-properties fo:break-before="auto" style:column-width="1.79cm"/>
    </style:style>
    <style:style style:name="co13" style:family="table-column">
      <style:table-column-properties fo:break-before="auto" style:column-width="2.637cm"/>
    </style:style>
    <style:style style:name="co14" style:family="table-column">
      <style:table-column-properties fo:break-before="auto" style:column-width="2.044cm"/>
    </style:style>
    <style:style style:name="co19" style:family="table-column">
      <style:table-column-properties fo:break-before="auto" style:column-width="1.954cm"/>
    </style:style>
    <style:style style:name="co20" style:family="table-column">
      <style:table-column-properties fo:break-before="auto" style:column-width="0.826cm"/>
    </style:style>
    <style:style style:name="co21" style:family="table-column">
      <style:table-column-properties fo:break-before="auto" style:column-width="0.896cm"/>
    </style:style>
    <style:style style:name="co22" style:family="table-column">
      <style:table-column-properties fo:break-before="auto" style:column-width="2.725cm"/>
    </style:style>
    <style:style style:name="ro1" style:family="table-row">
      <style:table-row-properties style:row-height="0.661cm" fo:break-before="auto" style:use-optimal-row-height="false"/>
    </style:style>
    <style:style style:name="ro4" style:family="table-row">
      <style:table-row-properties style:row-height="0.635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1.129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2" style:family="table" style:master-page-name="PageStyle_5f_休日">
      <style:table-properties table:display="true" style:writing-mode="lr-tb"/>
    </style:style>
    <style:style style:name="ta3" style:family="table" style:master-page-name="PageStyle_5f_WBS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39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00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1" style:family="table-cell" style:parent-style-name="Default" style:data-style-name="N16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0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20" style:family="table-cell" style:parent-style-name="Default">
      <style:table-cell-properties fo:border-bottom="none" fo:background-color="#9dc3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ffd96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26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ffd965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72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ffd966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ffd96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name-asian="Segoe UI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ja" style:country-asian="JP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>
      <style:table-cell-properties fo:wrap-option="wrap"/>
      <style:text-properties style:text-outline="false" style:text-line-through-style="none" style:text-line-through-type="none" style:font-name="ＭＳ 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ゴシック" style:font-size-asian="10pt" style:language-asian="ja" style:country-asian="JP" style:font-style-asian="normal" style:font-weight-asian="normal" style:font-name-complex="ＭＳ ゴシック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name-asian="游ゴシック Medium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name-asian="游ゴシック Medium" style:font-size-asian="9pt" style:font-style-asian="normal" style:font-weight-asian="normal" style:font-size-complex="10.5pt" style:language-complex="en" style:country-complex="US" style:font-style-complex="normal" style:font-weight-complex="normal"/>
    </style:style>
    <style:style style:name="ce18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language-complex="en" style:country-complex="US" style:font-style-complex="normal" style:font-weight-complex="normal"/>
    </style:style>
    <style:style style:name="ce188" style:family="table-cell" style:parent-style-name="Default">
      <style:table-cell-properties style:vertical-align="middle"/>
      <style:text-properties style:font-name="游ゴシック Medium1" fo:font-size="12pt" style:font-name-asian="游ゴシック Medium" style:font-size-asian="9pt" style:font-size-complex="10.5pt" style:language-complex="en" style:country-complex="US"/>
    </style:style>
    <style:style style:name="ce189" style:family="table-cell" style:parent-style-name="Default">
      <style:text-properties style:font-name="游ゴシック Medium" fo:font-size="9pt" style:font-name-asian="游ゴシック Medium" style:font-size-asian="9pt" style:font-size-complex="9pt"/>
    </style:style>
    <style:style style:name="ce19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language-complex="en" style:country-complex="US" style:font-style-complex="normal" style:font-weight-complex="normal"/>
    </style:style>
    <style:style style:name="ce19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language-complex="en" style:country-complex="US" style:font-style-complex="normal" style:font-weight-complex="normal"/>
    </style:style>
    <style:style style:name="ce19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 style:data-style-name="N36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 style:data-style-name="N36">
      <style:table-cell-properties fo:border-bottom="0.74pt solid #000000" fo:background-color="#ffd96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02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12" style:family="table-cell" style:parent-style-name="Default">
      <style:table-cell-properties fo:background-color="#9dc3e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1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1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2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1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1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2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2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2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3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3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2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4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4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5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5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5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5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5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6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3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6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6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6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6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6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7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7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7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7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7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7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7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8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8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8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8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8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8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9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9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9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9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0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0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0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0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0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Default">
      <style:table-cell-properties fo:border-bottom="0.74pt solid #000000" fo:background-color="#ffd96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Default" style:data-style-name="N10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Default" style:data-style-name="N10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Default" style:data-style-name="N10">
      <style:table-cell-properties fo:border-bottom="0.74pt solid #000000" style:diagonal-bl-tr="none" style:diagonal-tl-br="none" style:text-align-source="value-type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24" style:family="table-cell" style:parent-style-name="Default">
      <style:table-cell-properties fo:background-color="#deebf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 style:data-style-name="N36">
      <style:table-cell-properties fo:background-color="#7f7f7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29" style:family="table-cell" style:parent-style-name="Default">
      <style:table-cell-properties fo:background-color="#cfe2f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wrap-option="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background-color="transparent" fo:wrap-option="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>
      <style:table-cell-properties fo:border-bottom="0.74pt solid #000000" fo:background-color="#ffd965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 style:data-style-name="N15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 style:data-style-name="N16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 style:data-style-name="N16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28]=&quot;○&quot;;[.$L28]&lt;=[.V$1];[.V$1]&lt;=[.$M28]))" style:apply-style-name="ConditionalStyle_5f_6" style:base-cell-address="WBS.V28"/>
      <style:map style:condition="is-true-formula(AND([.$D28]&lt;&gt;&quot;○&quot;;[.$L28]&lt;=[.V$1];[.V$1]&lt;=[.$M28]))" style:apply-style-name="ConditionalStyle_5f_5" style:base-cell-address="WBS.V28"/>
    </style:style>
    <style:style style:name="ce8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8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93]=&quot;○&quot;;[.$L93]&lt;=[.V$1];[.V$1]&lt;=[.$M93]))" style:apply-style-name="ConditionalStyle_5f_6" style:base-cell-address="WBS.V93"/>
      <style:map style:condition="is-true-formula(AND([.$D93]&lt;&gt;&quot;○&quot;;[.$L93]&lt;=[.V$1];[.V$1]&lt;=[.$M93]))" style:apply-style-name="ConditionalStyle_5f_5" style:base-cell-address="WBS.V93"/>
    </style:style>
    <style:style style:name="ce8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8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8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9]=&quot;○&quot;;[.$L119]&lt;=[.V$1];[.V$1]&lt;=[.$M119]))" style:apply-style-name="ConditionalStyle_5f_6" style:base-cell-address="WBS.V119"/>
      <style:map style:condition="is-true-formula(AND([.$D119]&lt;&gt;&quot;○&quot;;[.$L119]&lt;=[.V$1];[.V$1]&lt;=[.$M119]))" style:apply-style-name="ConditionalStyle_5f_5" style:base-cell-address="WBS.V119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24]=&quot;○&quot;;[.$L124]&lt;=[.V$1];[.V$1]&lt;=[.$M124]))" style:apply-style-name="ConditionalStyle_5f_6" style:base-cell-address="WBS.V124"/>
      <style:map style:condition="is-true-formula(AND([.$D124]&lt;&gt;&quot;○&quot;;[.$L124]&lt;=[.V$1];[.V$1]&lt;=[.$M124]))" style:apply-style-name="ConditionalStyle_5f_5" style:base-cell-address="WBS.V124"/>
    </style:style>
    <style:style style:name="ce89" style:family="table-cell" style:parent-style-name="Default">
      <style:table-cell-properties fo:border-bottom="0.74pt solid #000000" fo:background-color="#ffd96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cell-content()&gt;8" style:apply-style-name="ConditionalStyle_5f_3" style:base-cell-address="WBS.V408"/>
      <style:map style:condition="is-true-formula(AND([.V408]&lt;&gt;0;[.V408]&lt;8))" style:apply-style-name="ConditionalStyle_5f_2" style:base-cell-address="WBS.V408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 style:data-style-name="N15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93" style:family="table-cell" style:parent-style-name="Default" style:data-style-name="N16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94" style:family="table-cell" style:parent-style-name="Default" style:data-style-name="N16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9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9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28]=&quot;○&quot;;[.$L28]&lt;=[.V$1];[.V$1]&lt;=[.$M28]))" style:apply-style-name="ConditionalStyle_5f_6" style:base-cell-address="WBS.V28"/>
      <style:map style:condition="is-true-formula(AND([.$D28]&lt;&gt;&quot;○&quot;;[.$L28]&lt;=[.V$1];[.V$1]&lt;=[.$M28]))" style:apply-style-name="ConditionalStyle_5f_5" style:base-cell-address="WBS.V28"/>
    </style:style>
    <style:style style:name="ce9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9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93]=&quot;○&quot;;[.$L93]&lt;=[.V$1];[.V$1]&lt;=[.$M93]))" style:apply-style-name="ConditionalStyle_5f_6" style:base-cell-address="WBS.V93"/>
      <style:map style:condition="is-true-formula(AND([.$D93]&lt;&gt;&quot;○&quot;;[.$L93]&lt;=[.V$1];[.V$1]&lt;=[.$M93]))" style:apply-style-name="ConditionalStyle_5f_5" style:base-cell-address="WBS.V93"/>
    </style:style>
    <style:style style:name="ce9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10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10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9]=&quot;○&quot;;[.$L119]&lt;=[.V$1];[.V$1]&lt;=[.$M119]))" style:apply-style-name="ConditionalStyle_5f_6" style:base-cell-address="WBS.V119"/>
      <style:map style:condition="is-true-formula(AND([.$D119]&lt;&gt;&quot;○&quot;;[.$L119]&lt;=[.V$1];[.V$1]&lt;=[.$M119]))" style:apply-style-name="ConditionalStyle_5f_5" style:base-cell-address="WBS.V119"/>
    </style:style>
    <style:style style:name="ce10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24]=&quot;○&quot;;[.$L124]&lt;=[.V$1];[.V$1]&lt;=[.$M124]))" style:apply-style-name="ConditionalStyle_5f_6" style:base-cell-address="WBS.V124"/>
      <style:map style:condition="is-true-formula(AND([.$D124]&lt;&gt;&quot;○&quot;;[.$L124]&lt;=[.V$1];[.V$1]&lt;=[.$M124]))" style:apply-style-name="ConditionalStyle_5f_5" style:base-cell-address="WBS.V124"/>
    </style:style>
    <style:style style:name="ce103" style:family="table-cell" style:parent-style-name="Default" style:data-style-name="N36">
      <style:table-cell-properties fo:background-color="#eeeee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04" style:family="table-cell" style:parent-style-name="Default" style:data-style-name="N159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05" style:family="table-cell" style:parent-style-name="Default" style:data-style-name="N160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06" style:family="table-cell" style:parent-style-name="Default" style:data-style-name="N161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07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08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93]=&quot;○&quot;;[.$L93]&lt;=[.V$1];[.V$1]&lt;=[.$M93]))" style:apply-style-name="ConditionalStyle_5f_6" style:base-cell-address="WBS.V93"/>
      <style:map style:condition="is-true-formula(AND([.$D93]&lt;&gt;&quot;○&quot;;[.$L93]&lt;=[.V$1];[.V$1]&lt;=[.$M93]))" style:apply-style-name="ConditionalStyle_5f_5" style:base-cell-address="WBS.V93"/>
    </style:style>
    <style:style style:name="ce109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110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111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9]=&quot;○&quot;;[.$L119]&lt;=[.V$1];[.V$1]&lt;=[.$M119]))" style:apply-style-name="ConditionalStyle_5f_6" style:base-cell-address="WBS.V119"/>
      <style:map style:condition="is-true-formula(AND([.$D119]&lt;&gt;&quot;○&quot;;[.$L119]&lt;=[.V$1];[.V$1]&lt;=[.$M119]))" style:apply-style-name="ConditionalStyle_5f_5" style:base-cell-address="WBS.V119"/>
    </style:style>
    <style:style style:name="ce112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24]=&quot;○&quot;;[.$L124]&lt;=[.V$1];[.V$1]&lt;=[.$M124]))" style:apply-style-name="ConditionalStyle_5f_6" style:base-cell-address="WBS.V124"/>
      <style:map style:condition="is-true-formula(AND([.$D124]&lt;&gt;&quot;○&quot;;[.$L124]&lt;=[.V$1];[.V$1]&lt;=[.$M124]))" style:apply-style-name="ConditionalStyle_5f_5" style:base-cell-address="WBS.V124"/>
    </style:style>
    <style:style style:name="ce113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14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cell-content()&gt;8" style:apply-style-name="ConditionalStyle_5f_3" style:base-cell-address="WBS.V408"/>
      <style:map style:condition="is-true-formula(AND([.V408]&lt;&gt;0;[.V408]&lt;8))" style:apply-style-name="ConditionalStyle_5f_2" style:base-cell-address="WBS.V408"/>
    </style:style>
    <style:style style:name="ce115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16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3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111111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32" style:family="table-cell" style:parent-style-name="Default" style:data-style-name="N36">
      <style:table-cell-properties fo:background-color="#dee6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Default" style:data-style-name="N159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34" style:family="table-cell" style:parent-style-name="Default" style:data-style-name="N160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35" style:family="table-cell" style:parent-style-name="Default" style:data-style-name="N161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36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37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93]=&quot;○&quot;;[.$L93]&lt;=[.V$1];[.V$1]&lt;=[.$M93]))" style:apply-style-name="ConditionalStyle_5f_6" style:base-cell-address="WBS.V93"/>
      <style:map style:condition="is-true-formula(AND([.$D93]&lt;&gt;&quot;○&quot;;[.$L93]&lt;=[.V$1];[.V$1]&lt;=[.$M93]))" style:apply-style-name="ConditionalStyle_5f_5" style:base-cell-address="WBS.V93"/>
    </style:style>
    <style:style style:name="ce138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139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140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9]=&quot;○&quot;;[.$L119]&lt;=[.V$1];[.V$1]&lt;=[.$M119]))" style:apply-style-name="ConditionalStyle_5f_6" style:base-cell-address="WBS.V119"/>
      <style:map style:condition="is-true-formula(AND([.$D119]&lt;&gt;&quot;○&quot;;[.$L119]&lt;=[.V$1];[.V$1]&lt;=[.$M119]))" style:apply-style-name="ConditionalStyle_5f_5" style:base-cell-address="WBS.V119"/>
    </style:style>
    <style:style style:name="ce141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24]=&quot;○&quot;;[.$L124]&lt;=[.V$1];[.V$1]&lt;=[.$M124]))" style:apply-style-name="ConditionalStyle_5f_6" style:base-cell-address="WBS.V124"/>
      <style:map style:condition="is-true-formula(AND([.$D124]&lt;&gt;&quot;○&quot;;[.$L124]&lt;=[.V$1];[.V$1]&lt;=[.$M124]))" style:apply-style-name="ConditionalStyle_5f_5" style:base-cell-address="WBS.V124"/>
    </style:style>
    <style:style style:name="ce142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43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cell-content()&gt;8" style:apply-style-name="ConditionalStyle_5f_3" style:base-cell-address="WBS.V408"/>
      <style:map style:condition="is-true-formula(AND([.V408]&lt;&gt;0;[.V408]&lt;8))" style:apply-style-name="ConditionalStyle_5f_2" style:base-cell-address="WBS.V408"/>
    </style:style>
    <style:style style:name="ce144" style:family="table-cell" style:parent-style-name="Default">
      <style:table-cell-properties fo:background-color="#dee6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45" style:family="table-cell" style:parent-style-name="Default">
      <style:table-cell-properties fo:background-color="#dee6e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46" style:family="table-cell" style:parent-style-name="Default" style:data-style-name="N36">
      <style:table-cell-properties fo:background-color="#ffd8c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47" style:family="table-cell" style:parent-style-name="Default" style:data-style-name="N159">
      <style:table-cell-properties fo:background-color="#ffd8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48" style:family="table-cell" style:parent-style-name="Default" style:data-style-name="N160">
      <style:table-cell-properties fo:background-color="#ffd8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49" style:family="table-cell" style:parent-style-name="Default" style:data-style-name="N161">
      <style:table-cell-properties fo:background-color="#ffd8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50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51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93]=&quot;○&quot;;[.$L93]&lt;=[.V$1];[.V$1]&lt;=[.$M93]))" style:apply-style-name="ConditionalStyle_5f_6" style:base-cell-address="WBS.V93"/>
      <style:map style:condition="is-true-formula(AND([.$D93]&lt;&gt;&quot;○&quot;;[.$L93]&lt;=[.V$1];[.V$1]&lt;=[.$M93]))" style:apply-style-name="ConditionalStyle_5f_5" style:base-cell-address="WBS.V93"/>
    </style:style>
    <style:style style:name="ce152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153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154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9]=&quot;○&quot;;[.$L119]&lt;=[.V$1];[.V$1]&lt;=[.$M119]))" style:apply-style-name="ConditionalStyle_5f_6" style:base-cell-address="WBS.V119"/>
      <style:map style:condition="is-true-formula(AND([.$D119]&lt;&gt;&quot;○&quot;;[.$L119]&lt;=[.V$1];[.V$1]&lt;=[.$M119]))" style:apply-style-name="ConditionalStyle_5f_5" style:base-cell-address="WBS.V119"/>
    </style:style>
    <style:style style:name="ce155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24]=&quot;○&quot;;[.$L124]&lt;=[.V$1];[.V$1]&lt;=[.$M124]))" style:apply-style-name="ConditionalStyle_5f_6" style:base-cell-address="WBS.V124"/>
      <style:map style:condition="is-true-formula(AND([.$D124]&lt;&gt;&quot;○&quot;;[.$L124]&lt;=[.V$1];[.V$1]&lt;=[.$M124]))" style:apply-style-name="ConditionalStyle_5f_5" style:base-cell-address="WBS.V124"/>
    </style:style>
    <style:style style:name="ce156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57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cell-content()&gt;8" style:apply-style-name="ConditionalStyle_5f_3" style:base-cell-address="WBS.V408"/>
      <style:map style:condition="is-true-formula(AND([.V408]&lt;&gt;0;[.V408]&lt;8))" style:apply-style-name="ConditionalStyle_5f_2" style:base-cell-address="WBS.V408"/>
    </style:style>
    <style:style style:name="ce158" style:family="table-cell" style:parent-style-name="Default">
      <style:table-cell-properties fo:background-color="#ffd8c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59" style:family="table-cell" style:parent-style-name="Default">
      <style:table-cell-properties fo:background-color="#ffd8c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6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6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93]=&quot;○&quot;;[.$L93]&lt;=[.V$1];[.V$1]&lt;=[.$M93]))" style:apply-style-name="ConditionalStyle_5f_6" style:base-cell-address="WBS.V93"/>
      <style:map style:condition="is-true-formula(AND([.$D93]&lt;&gt;&quot;○&quot;;[.$L93]&lt;=[.V$1];[.V$1]&lt;=[.$M93]))" style:apply-style-name="ConditionalStyle_5f_5" style:base-cell-address="WBS.V93"/>
    </style:style>
    <style:style style:name="ce1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16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16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9]=&quot;○&quot;;[.$L119]&lt;=[.V$1];[.V$1]&lt;=[.$M119]))" style:apply-style-name="ConditionalStyle_5f_6" style:base-cell-address="WBS.V119"/>
      <style:map style:condition="is-true-formula(AND([.$D119]&lt;&gt;&quot;○&quot;;[.$L119]&lt;=[.V$1];[.V$1]&lt;=[.$M119]))" style:apply-style-name="ConditionalStyle_5f_5" style:base-cell-address="WBS.V119"/>
    </style:style>
    <style:style style:name="ce16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24]=&quot;○&quot;;[.$L124]&lt;=[.V$1];[.V$1]&lt;=[.$M124]))" style:apply-style-name="ConditionalStyle_5f_6" style:base-cell-address="WBS.V124"/>
      <style:map style:condition="is-true-formula(AND([.$D124]&lt;&gt;&quot;○&quot;;[.$L124]&lt;=[.V$1];[.V$1]&lt;=[.$M124]))" style:apply-style-name="ConditionalStyle_5f_5" style:base-cell-address="WBS.V124"/>
    </style:style>
    <style:style style:name="ce167" style:family="table-cell" style:parent-style-name="Default">
      <style:table-cell-properties fo:border-bottom="0.74pt solid #000000" fo:background-color="#ffd96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21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2" style:family="table-cell" style:parent-style-name="Default" style:data-style-name="N16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24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1.818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bold" style:font-family-asian="'MS P ゴシック'" style:font-family-generic-asian="modern" style:font-pitch-asian="variable" style:font-size-asian="9pt" style:font-style-asian="normal" style:font-weight-asian="bold" style:font-size-complex="9pt" style:font-style-complex="normal" style:font-weight-complex="bold"/>
    </style:style>
    <style:style style:name="gr2" style:family="graphic" style:parent-style-name="Note">
      <style:graphic-properties draw:stroke="solid" svg:stroke-width="0cm" svg:stroke-color="#217346" draw:stroke-linejoin="miter" svg:stroke-linecap="butt" draw:fill="solid" draw:fill-color="#ffffe1" draw:textarea-horizontal-align="justify" draw:textarea-vertical-align="top" draw:fit-to-size="false" style:shrink-to-fit="false" fo:min-height="3.788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normal" style:font-family-asian="'MS P 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3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2.374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4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2.339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5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3.212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6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3.839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7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1.712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8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4.358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游ゴシック" style:font-family-generic="swiss" style:font-pitch="variable" fo:font-size="11pt" fo:font-style="normal" fo:text-shadow="none" style:text-underline-style="none" fo:font-weight="normal" style:font-family-asian="游ゴシック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gr9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1.157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游ゴシック" style:font-family-generic="swiss" style:font-pitch="variable" fo:font-size="11pt" fo:font-style="normal" fo:text-shadow="none" style:text-underline-style="none" fo:font-weight="normal" style:font-family-asian="游ゴシック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P1" style:family="paragraph">
      <style:paragraph-properties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bold" style:font-family-asian="'MS P ゴシック'" style:font-family-generic-asian="modern" style:font-pitch-asian="variable" style:font-size-asian="9pt" style:font-style-asian="normal" style:font-weight-asian="bold" style:font-size-complex="9pt" style:font-style-complex="normal" style:font-weight-complex="bold"/>
    </style:style>
    <style:style style:name="P2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bold" style:font-family-asian="'MS P ゴシック'" style:font-family-generic-asian="modern" style:font-pitch-asian="variable" style:font-size-asian="9pt" style:font-style-asian="normal" style:font-weight-asian="bold" style:font-size-complex="9pt" style:font-style-complex="normal" style:font-weight-complex="bold"/>
    </style:style>
    <style:style style:name="P3" style:family="paragraph">
      <style:paragraph-properties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normal" style:font-family-asian="'MS P 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P4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normal" style:font-family-asian="'MS P 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P5" style:family="paragraph">
      <style:paragraph-properties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P6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P7" style:family="paragraph">
      <style:paragraph-properties fo:text-align="start"/>
      <style:text-properties fo:color="#000000" loext:opacity="100%" style:text-outline="false" style:text-line-through-style="none" style:text-line-through-type="none" style:text-position="0% 100%" fo:font-family="游ゴシック" style:font-family-generic="swiss" style:font-pitch="variable" fo:font-size="11pt" fo:font-style="normal" fo:text-shadow="none" style:text-underline-style="none" fo:font-weight="normal" style:font-family-asian="游ゴシック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游ゴシック" style:font-family-generic="swiss" style:font-pitch="variable" fo:font-size="11pt" fo:font-style="normal" fo:text-shadow="none" style:text-underline-style="none" fo:font-weight="normal" style:font-family-asian="游ゴシック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T25" style:family="text">
      <style:text-properties fo:color="#000000" loext:opacity="100%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6" style:family="text">
      <style:text-properties fo:color="#000000" loext:opacity="100%" style:text-outline="false" style:text-line-through-style="none" style:text-line-through-type="none" style:text-position="0% 100%" style:font-name="游ゴシック" fo:font-size="11pt" fo:font-style="normal" fo:text-shadow="none" style:text-underline-style="none" fo:font-weight="normal" style:font-name-asian="游ゴシック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bold" style:font-family-asian="'MS P ゴシック'" style:font-family-generic-asian="modern" style:font-pitch-asian="variable" style:font-size-asian="9pt" style:font-style-asian="normal" style:font-weight-asian="bold" style:font-size-complex="9pt" style:font-style-complex="normal" style:font-weight-complex="bold"/>
    </style:style>
    <style:style style:name="T4" style:family="text"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normal" style:font-family-asian="'MS P 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T5" style:family="text"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T6" style:family="text">
      <style:text-properties fo:color="#000000" loext:opacity="100%" style:text-outline="false" style:text-line-through-style="none" style:text-line-through-type="none" style:text-position="0% 100%" fo:font-family="游ゴシック" style:font-family-generic="swiss" style:font-pitch="variable" fo:font-size="11pt" fo:font-style="normal" fo:text-shadow="none" style:text-underline-style="none" fo:font-weight="normal" style:font-family-asian="游ゴシック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color="#000000" loext:opacity="100%" style:text-outline="false" style:text-line-through-style="none" style:text-line-through-type="none" style:text-position="0% 100%" fo:font-family="Arial" style:font-family-generic="swiss" style:font-pitch="variable" fo:font-size="9pt" fo:font-style="normal" fo:text-shadow="none" style:text-underline-style="none" fo:font-weight="normal" style:font-family-asian="游ゴシック" style:font-family-generic-asian="swiss" style:font-pitch-asian="variable" style:font-size-asian="9pt" style:font-style-asian="normal" style:font-weight-asian="normal" style:font-family-complex="Arial" style:font-family-generic-complex="swiss" style:font-pitch-complex="variable" style:font-size-complex="9pt" style:font-style-complex="normal" style:font-weight-complex="normal"/>
    </style:style>
    <style:style style:name="T8" style:family="text"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family-complex="Arial" style:font-family-generic-complex="swiss" style:font-pitch-complex="variable" style:font-size-complex="9pt" style:font-style-complex="normal" style:font-weight-complex="normal"/>
    </style:style>
    <style:style style:name="T9" style:family="text">
      <style:text-properties fo:color="#000000" loext:opacity="100%" style:text-outline="false" style:text-line-through-style="none" style:text-line-through-type="none" style:text-position="0% 100%" fo:font-family="Arial" style:font-family-generic="swiss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family-complex="Arial" style:font-family-generic-complex="swiss" style:font-pitch-complex="variable" style:font-size-complex="9pt" style:font-style-complex="normal" style:font-weight-complex="normal"/>
    </style:style>
    <style:style style:name="T10" style:family="text">
      <style:text-properties fo:color="#000000" style:font-name="游ゴシック Medium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游ゴシック Medium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ja" style:country-asian="JP" style:language-complex="en" style:country-complex="US" style:font-name-asian="游ゴシック Medium" style:font-size-asian="9pt" style:font-size-complex="10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ja" style:country-asian="JP" style:language-complex="en" style:country-complex="US" style:font-size-asian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ja" style:country-asian="JP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font-name-asian="游ゴシック Medium" style:font-size-asian="9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游ゴシック Medium1" fo:font-size="12pt" style:letter-kerning="true" style:language-complex="en" style:country-complex="US" style:font-size-complex="10.5pt"/>
    </style:style>
    <style:style style:name="T15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font-size-asian="9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游ゴシック Medium1" style:letter-kerning="true" style:language-complex="en" style:country-complex="US" fo:font-size="9pt" style:font-name-asian="游ゴシック Medium1" style:font-size-complex="9pt"/>
    </style:style>
    <style:style style:name="T16" style:family="text">
      <style:text-properties fo:font-weight="normal" style:letter-kerning="true" fo:language="en" fo:country="US" style:language-asian="ja" style:country-asian="JP" style:language-complex="en" style:country-complex="US" style:font-size-asian="9pt" style:font-weight-asian="normal" style:font-weight-complex="normal"/>
    </style:style>
    <style:style style:name="T17" style:family="text">
      <style:text-properties fo:font-weight="normal" style:font-size-asian="9pt" style:font-weight-asian="normal" style:font-weight-complex="normal"/>
    </style:style>
    <style:style style:name="T18" style:family="text">
      <style:text-properties fo:color="#000000" fo:font-size="9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ja" style:country-asian="JP" style:language-complex="en" style:country-complex="US" style:font-name-asian="游ゴシック Medium1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en" style:country-complex="US" style:font-size-asian="9pt" style:font-weight-asian="normal" style:font-weight-complex="normal" style:font-style-asian="normal" style:font-style-complex="normal" style:text-emphasize="none" style:font-relief="none" style:text-overline-style="none" style:text-overline-color="font-color" fo:font-size="12pt" style:font-name-asian="游ゴシック Medium" style:font-size-complex="10.5pt"/>
    </style:style>
    <style:style style:name="T20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en" style:country-complex="US" style:font-size-asian="9pt" style:font-weight-asian="normal" style:font-weight-complex="normal" style:font-style-asian="normal" style:font-style-complex="normal" style:text-emphasize="none" style:font-relief="none" style:text-overline-style="none" style:text-overline-color="font-color" fo:font-size="12pt" style:font-name-asian="游ゴシック Medium" style:font-size-complex="10.5pt" style:font-name="游ゴシック Medium1" style:letter-kerning="true"/>
    </style:style>
    <style:style style:name="T21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en" style:country-complex="US" style:font-size-asian="9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游ゴシック Medium1" style:letter-kerning="true" fo:font-size="9pt" style:font-name-asian="游ゴシック Medium1" style:font-size-complex="9pt"/>
    </style:style>
    <style:style style:name="T22" style:family="text">
      <style:text-properties fo:color="#000000" fo:font-size="9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ja" style:country-asian="JP" style:language-complex="en" style:country-complex="US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fo:font-size="9pt" fo:font-weight="normal" style:letter-kerning="true" fo:language="en" fo:country="US" style:language-asian="ja" style:country-asian="JP" style:language-complex="en" style:country-complex="US" style:font-size-asian="9pt" style:font-size-complex="9pt" style:font-weight-asian="normal" style:font-weight-complex="normal"/>
    </style:style>
    <style:style style:name="T24" style:family="text">
      <style:text-properties fo:color="#000000" style:font-name="游ゴシック Medium" fo:font-size="9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ja" style:country-asian="JP" style:language-complex="en" style:country-complex="US" style:font-name-asian="游ゴシック Medium1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ja" style:country-asian="JP" style:language-complex="en" style:country-complex="US" style:font-size-asian="9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游ゴシック Medium1" fo:font-size="12pt" style:font-name-asian="游ゴシック Medium" style:font-size-complex="10.5pt"/>
    </style:style>
    <style:style style:name="T28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ja" style:country-asian="JP" style:language-complex="en" style:country-complex="US" style:font-size-asian="9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游ゴシック Medium1" fo:font-size="9pt" style:font-name-asian="游ゴシック Medium1" style:font-size-complex="9pt"/>
    </style:style>
    <style:style style:name="T29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30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游ゴシック" style:font-name-asian="游ゴシック"/>
    </style:style>
  </office:automatic-styles>
  <office:body>
    <office:spreadsheet>
      <table:tracked-changes>
        <table:cell-content-change table:id="ct1" table:acceptance-state="accepted">
          <table:cell-address table:column="9" table:row="196" table:table="0"/>
          <office:change-info>
            <dc:creator>Unknown Author</dc:creator>
            <dc:date>2026-06-04T00:28:36.984215800</dc:date>
          </office:change-info>
          <table:previous>
            <table:change-track-table-cell/>
          </table:previous>
        </table:cell-content-change>
        <table:cell-content-change table:id="ct2" table:acceptance-state="accepted">
          <table:cell-address table:column="11" table:row="196" table:table="0"/>
          <office:change-info>
            <dc:creator>Unknown Author</dc:creator>
            <dc:date>2026-06-04T00:28:36.984235000</dc:date>
          </office:change-info>
          <table:previous>
            <table:change-track-table-cell/>
          </table:previous>
        </table:cell-content-change>
        <table:cell-content-change table:id="ct3" table:acceptance-state="accepted">
          <table:cell-address table:column="12" table:row="196" table:table="0"/>
          <office:change-info>
            <dc:creator>Unknown Author</dc:creator>
            <dc:date>2026-06-04T00:28:36.984264400</dc:date>
          </office:change-info>
          <table:previous>
            <table:change-track-table-cell/>
          </table:previous>
        </table:cell-content-change>
        <table:cell-content-change table:id="ct4" table:acceptance-state="accepted">
          <table:cell-address table:column="12" table:row="54" table:table="0"/>
          <office:change-info>
            <dc:creator>Unknown Author</dc:creator>
            <dc:date>2026-06-04T08:14:46.983481200</dc:date>
          </office:change-info>
          <table:previous>
            <table:change-track-table-cell office:value-type="float" office:value="46177"/>
          </table:previous>
        </table:cell-content-change>
        <table:cell-content-change table:id="ct5" table:acceptance-state="accepted">
          <table:cell-address table:column="12" table:row="55" table:table="0"/>
          <office:change-info>
            <dc:creator>Unknown Author</dc:creator>
            <dc:date>2026-06-04T08:14:59.894492300</dc:date>
          </office:change-info>
          <table:previous>
            <table:change-track-table-cell office:value-type="float" office:value="46177"/>
          </table:previous>
        </table:cell-content-change>
        <table:cell-content-change table:id="ct6" table:acceptance-state="accepted">
          <table:cell-address table:column="12" table:row="56" table:table="0"/>
          <office:change-info>
            <dc:creator>Unknown Author</dc:creator>
            <dc:date>2026-06-04T08:14:59.894505200</dc:date>
          </office:change-info>
          <table:previous>
            <table:change-track-table-cell office:value-type="float" office:value="46177"/>
          </table:previous>
        </table:cell-content-change>
        <table:cell-content-change table:id="ct7" table:acceptance-state="accepted">
          <table:cell-address table:column="12" table:row="57" table:table="0"/>
          <office:change-info>
            <dc:creator>Unknown Author</dc:creator>
            <dc:date>2026-06-04T08:14:59.894514300</dc:date>
          </office:change-info>
          <table:previous>
            <table:change-track-table-cell office:value-type="float" office:value="46177"/>
          </table:previous>
        </table:cell-content-change>
        <table:cell-content-change table:id="ct8" table:acceptance-state="accepted">
          <table:cell-address table:column="12" table:row="58" table:table="0"/>
          <office:change-info>
            <dc:creator>Unknown Author</dc:creator>
            <dc:date>2026-06-04T08:14:59.894523400</dc:date>
          </office:change-info>
          <table:previous>
            <table:change-track-table-cell office:value-type="float" office:value="46177"/>
          </table:previous>
        </table:cell-content-change>
        <table:cell-content-change table:id="ct9" table:acceptance-state="accepted">
          <table:cell-address table:column="11" table:row="54" table:table="0"/>
          <office:change-info>
            <dc:creator>Unknown Author</dc:creator>
            <dc:date>2026-06-04T08:15:22.534986100</dc:date>
          </office:change-info>
          <table:previous>
            <table:change-track-table-cell office:value-type="float" office:value="46177"/>
          </table:previous>
        </table:cell-content-change>
        <table:cell-content-change table:id="ct10" table:acceptance-state="accepted">
          <table:cell-address table:column="11" table:row="55" table:table="0"/>
          <office:change-info>
            <dc:creator>Unknown Author</dc:creator>
            <dc:date>2026-06-04T08:15:22.534996300</dc:date>
          </office:change-info>
          <table:previous>
            <table:change-track-table-cell office:value-type="float" office:value="46177"/>
          </table:previous>
        </table:cell-content-change>
        <table:cell-content-change table:id="ct11" table:acceptance-state="accepted">
          <table:cell-address table:column="11" table:row="56" table:table="0"/>
          <office:change-info>
            <dc:creator>Unknown Author</dc:creator>
            <dc:date>2026-06-04T08:15:22.535004300</dc:date>
          </office:change-info>
          <table:previous>
            <table:change-track-table-cell office:value-type="float" office:value="46177"/>
          </table:previous>
        </table:cell-content-change>
        <table:cell-content-change table:id="ct12" table:acceptance-state="accepted">
          <table:cell-address table:column="11" table:row="57" table:table="0"/>
          <office:change-info>
            <dc:creator>Unknown Author</dc:creator>
            <dc:date>2026-06-04T08:15:22.535011700</dc:date>
          </office:change-info>
          <table:previous>
            <table:change-track-table-cell office:value-type="float" office:value="46177"/>
          </table:previous>
        </table:cell-content-change>
        <table:cell-content-change table:id="ct13" table:acceptance-state="accepted">
          <table:cell-address table:column="11" table:row="58" table:table="0"/>
          <office:change-info>
            <dc:creator>Unknown Author</dc:creator>
            <dc:date>2026-06-04T08:15:22.535019200</dc:date>
          </office:change-info>
          <table:previous>
            <table:change-track-table-cell office:value-type="float" office:value="46177"/>
          </table:previous>
        </table:cell-content-change>
        <table:cell-content-change table:id="ct14" table:acceptance-state="accepted">
          <table:cell-address table:column="12" table:row="55" table:table="0"/>
          <office:change-info>
            <dc:creator>Unknown Author</dc:creator>
            <dc:date>2026-06-04T08:15:27.974833900</dc:date>
          </office:change-info>
          <table:previous table:id="ct5">
            <table:change-track-table-cell office:value-type="float" office:value="46182"/>
          </table:previous>
        </table:cell-content-change>
        <table:cell-content-change table:id="ct15" table:acceptance-state="accepted">
          <table:cell-address table:column="12" table:row="56" table:table="0"/>
          <office:change-info>
            <dc:creator>Unknown Author</dc:creator>
            <dc:date>2026-06-04T08:15:27.974844900</dc:date>
          </office:change-info>
          <table:previous table:id="ct6">
            <table:change-track-table-cell office:value-type="float" office:value="46183"/>
          </table:previous>
        </table:cell-content-change>
        <table:cell-content-change table:id="ct16" table:acceptance-state="accepted">
          <table:cell-address table:column="12" table:row="57" table:table="0"/>
          <office:change-info>
            <dc:creator>Unknown Author</dc:creator>
            <dc:date>2026-06-04T08:15:27.974852300</dc:date>
          </office:change-info>
          <table:previous table:id="ct7">
            <table:change-track-table-cell office:value-type="float" office:value="46184"/>
          </table:previous>
        </table:cell-content-change>
        <table:cell-content-change table:id="ct17" table:acceptance-state="accepted">
          <table:cell-address table:column="12" table:row="58" table:table="0"/>
          <office:change-info>
            <dc:creator>Unknown Author</dc:creator>
            <dc:date>2026-06-04T08:15:27.974860000</dc:date>
          </office:change-info>
          <table:previous table:id="ct8">
            <table:change-track-table-cell office:value-type="float" office:value="46185"/>
          </table:previous>
        </table:cell-content-change>
        <table:cell-content-change table:id="ct18" table:acceptance-state="accepted">
          <table:cell-address table:column="16" table:row="50" table:table="0"/>
          <office:change-info>
            <dc:creator>Unknown Author</dc:creator>
            <dc:date>2026-06-04T08:17:42.460265800</dc:date>
          </office:change-info>
          <table:previous>
            <table:change-track-table-cell office:value-type="float" office:value="0"/>
          </table:previous>
        </table:cell-content-change>
        <table:cell-content-change table:id="ct19" table:acceptance-state="accepted">
          <table:cell-address table:column="16" table:row="51" table:table="0"/>
          <office:change-info>
            <dc:creator>Unknown Author</dc:creator>
            <dc:date>2026-06-04T08:17:44.133767500</dc:date>
          </office:change-info>
          <table:previous>
            <table:change-track-table-cell office:value-type="float" office:value="0"/>
          </table:previous>
        </table:cell-content-change>
        <table:cell-content-change table:id="ct20" table:acceptance-state="accepted">
          <table:cell-address table:column="16" table:row="52" table:table="0"/>
          <office:change-info>
            <dc:creator>Unknown Author</dc:creator>
            <dc:date>2026-06-04T08:17:46.000276700</dc:date>
          </office:change-info>
          <table:previous>
            <table:change-track-table-cell office:value-type="float" office:value="0"/>
          </table:previous>
        </table:cell-content-change>
        <table:cell-content-change table:id="ct21" table:acceptance-state="accepted">
          <table:cell-address table:column="16" table:row="61" table:table="0"/>
          <office:change-info>
            <dc:creator>Unknown Author</dc:creator>
            <dc:date>2026-06-04T08:17:51.090041000</dc:date>
          </office:change-info>
          <table:previous>
            <table:change-track-table-cell office:value-type="float" office:value="0"/>
          </table:previous>
        </table:cell-content-change>
        <table:cell-content-change table:id="ct22" table:acceptance-state="accepted">
          <table:cell-address table:column="16" table:row="62" table:table="0"/>
          <office:change-info>
            <dc:creator>Unknown Author</dc:creator>
            <dc:date>2026-06-04T08:17:53.544332700</dc:date>
          </office:change-info>
          <table:previous>
            <table:change-track-table-cell office:value-type="float" office:value="0"/>
          </table:previous>
        </table:cell-content-change>
        <table:cell-content-change table:id="ct23" table:acceptance-state="accepted">
          <table:cell-address table:column="16" table:row="65" table:table="0"/>
          <office:change-info>
            <dc:creator>Unknown Author</dc:creator>
            <dc:date>2026-06-04T08:17:56.592713900</dc:date>
          </office:change-info>
          <table:previous>
            <table:change-track-table-cell office:value-type="float" office:value="0"/>
          </table:previous>
        </table:cell-content-change>
        <table:cell-content-change table:id="ct24" table:acceptance-state="accepted">
          <table:cell-address table:column="13" table:row="66" table:table="0"/>
          <office:change-info>
            <dc:creator>Unknown Author</dc:creator>
            <dc:date>2026-06-05T08:10:53.363706500</dc:date>
          </office:change-info>
          <table:previous>
            <table:change-track-table-cell office:value-type="float" office:value="46178"/>
          </table:previous>
        </table:cell-content-change>
        <table:cell-content-change table:id="ct25" table:acceptance-state="accepted">
          <table:cell-address table:column="16" table:row="63" table:table="0"/>
          <office:change-info>
            <dc:creator>Unknown Author</dc:creator>
            <dc:date>2026-06-05T08:11:29.633305100</dc:date>
          </office:change-info>
          <table:previous>
            <table:change-track-table-cell office:value-type="float" office:value="0"/>
          </table:previous>
        </table:cell-content-change>
        <table:cell-content-change table:id="ct26" table:acceptance-state="accepted">
          <table:cell-address table:column="16" table:row="64" table:table="0"/>
          <office:change-info>
            <dc:creator>Unknown Author</dc:creator>
            <dc:date>2026-06-05T08:11:32.221041000</dc:date>
          </office:change-info>
          <table:previous>
            <table:change-track-table-cell office:value-type="float" office:value="0"/>
          </table:previous>
        </table:cell-content-change>
        <table:cell-content-change table:id="ct27" table:acceptance-state="accepted">
          <table:cell-address table:column="16" table:row="94" table:table="0"/>
          <office:change-info>
            <dc:creator>Unknown Author</dc:creator>
            <dc:date>2026-06-05T08:12:55.413465400</dc:date>
          </office:change-info>
          <table:previous>
            <table:change-track-table-cell office:value-type="float" office:value="0"/>
          </table:previous>
        </table:cell-content-change>
        <table:cell-content-change table:id="ct28" table:acceptance-state="accepted">
          <table:cell-address table:column="16" table:row="96" table:table="0"/>
          <office:change-info>
            <dc:creator>Unknown Author</dc:creator>
            <dc:date>2026-06-05T08:12:57.952377800</dc:date>
          </office:change-info>
          <table:previous>
            <table:change-track-table-cell office:value-type="float" office:value="1"/>
          </table:previous>
        </table:cell-content-change>
        <table:cell-content-change table:id="ct29" table:acceptance-state="accepted">
          <table:cell-address table:column="16" table:row="99" table:table="0"/>
          <office:change-info>
            <dc:creator>Unknown Author</dc:creator>
            <dc:date>2026-06-05T08:13:01.510714200</dc:date>
          </office:change-info>
          <table:previous>
            <table:change-track-table-cell office:value-type="float" office:value="0"/>
          </table:previous>
        </table:cell-content-change>
        <table:cell-content-change table:id="ct30" table:acceptance-state="accepted">
          <table:cell-address table:column="16" table:row="116" table:table="0"/>
          <office:change-info>
            <dc:creator>Unknown Author</dc:creator>
            <dc:date>2026-06-05T08:13:08.341994000</dc:date>
          </office:change-info>
          <table:previous>
            <table:change-track-table-cell/>
          </table:previous>
        </table:cell-content-change>
        <table:cell-content-change table:id="ct31" table:acceptance-state="accepted">
          <table:cell-address table:column="16" table:row="117" table:table="0"/>
          <office:change-info>
            <dc:creator>Unknown Author</dc:creator>
            <dc:date>2026-06-05T08:13:10.151327500</dc:date>
          </office:change-info>
          <table:previous>
            <table:change-track-table-cell/>
          </table:previous>
        </table:cell-content-change>
        <table:cell-content-change table:id="ct32" table:acceptance-state="accepted">
          <table:cell-address table:column="16" table:row="130" table:table="0"/>
          <office:change-info>
            <dc:creator>Unknown Author</dc:creator>
            <dc:date>2026-06-05T08:13:14.155945000</dc:date>
          </office:change-info>
          <table:previous>
            <table:change-track-table-cell/>
          </table:previous>
        </table:cell-content-change>
        <table:cell-content-change table:id="ct33" table:acceptance-state="accepted">
          <table:cell-address table:column="16" table:row="133" table:table="0"/>
          <office:change-info>
            <dc:creator>Unknown Author</dc:creator>
            <dc:date>2026-06-05T08:13:16.435804700</dc:date>
          </office:change-info>
          <table:previous>
            <table:change-track-table-cell/>
          </table:previous>
        </table:cell-content-change>
        <table:cell-content-change table:id="ct34" table:acceptance-state="accepted">
          <table:cell-address table:column="16" table:row="158" table:table="0"/>
          <office:change-info>
            <dc:creator>Unknown Author</dc:creator>
            <dc:date>2026-06-05T08:13:28.600716400</dc:date>
          </office:change-info>
          <table:previous>
            <table:change-track-table-cell/>
          </table:previous>
        </table:cell-content-change>
        <table:cell-content-change table:id="ct35" table:acceptance-state="accepted">
          <table:cell-address table:column="16" table:row="161" table:table="0"/>
          <office:change-info>
            <dc:creator>Unknown Author</dc:creator>
            <dc:date>2026-06-05T08:13:30.909509000</dc:date>
          </office:change-info>
          <table:previous>
            <table:change-track-table-cell/>
          </table:previous>
        </table:cell-content-change>
        <table:cell-content-change table:id="ct36" table:acceptance-state="accepted">
          <table:cell-address table:column="16" table:row="164" table:table="0"/>
          <office:change-info>
            <dc:creator>Unknown Author</dc:creator>
            <dc:date>2026-06-05T08:13:32.967501500</dc:date>
          </office:change-info>
          <table:previous>
            <table:change-track-table-cell/>
          </table:previous>
        </table:cell-content-change>
        <table:cell-content-change table:id="ct37" table:acceptance-state="accepted">
          <table:cell-address table:column="16" table:row="171" table:table="0"/>
          <office:change-info>
            <dc:creator>Unknown Author</dc:creator>
            <dc:date>2026-06-05T08:13:36.961272200</dc:date>
          </office:change-info>
          <table:previous>
            <table:change-track-table-cell/>
          </table:previous>
        </table:cell-content-change>
        <table:cell-content-change table:id="ct38" table:acceptance-state="accepted">
          <table:cell-address table:column="16" table:row="174" table:table="0"/>
          <office:change-info>
            <dc:creator>Unknown Author</dc:creator>
            <dc:date>2026-06-05T08:13:38.986000500</dc:date>
          </office:change-info>
          <table:previous>
            <table:change-track-table-cell/>
          </table:previous>
        </table:cell-content-change>
        <table:cell-content-change table:id="ct39" table:acceptance-state="accepted">
          <table:cell-address table:column="16" table:row="177" table:table="0"/>
          <office:change-info>
            <dc:creator>Unknown Author</dc:creator>
            <dc:date>2026-06-05T08:13:42.156046800</dc:date>
          </office:change-info>
          <table:previous>
            <table:change-track-table-cell/>
          </table:previous>
        </table:cell-content-change>
        <table:cell-content-change table:id="ct40" table:acceptance-state="accepted">
          <table:cell-address table:column="16" table:row="34" table:table="0"/>
          <office:change-info>
            <dc:creator>Unknown Author</dc:creator>
            <dc:date>2026-06-05T08:15:53.684223300</dc:date>
          </office:change-info>
          <table:previous>
            <table:change-track-table-cell office:value-type="float" office:value="0"/>
          </table:previous>
        </table:cell-content-change>
        <table:cell-content-change table:id="ct41" table:acceptance-state="accepted">
          <table:cell-address table:column="16" table:row="35" table:table="0"/>
          <office:change-info>
            <dc:creator>Unknown Author</dc:creator>
            <dc:date>2026-06-05T08:15:55.905811500</dc:date>
          </office:change-info>
          <table:previous>
            <table:change-track-table-cell office:value-type="float" office:value="0"/>
          </table:previous>
        </table:cell-content-change>
        <table:cell-content-change table:id="ct42" table:acceptance-state="accepted">
          <table:cell-address table:column="13" table:row="118" table:table="0"/>
          <office:change-info>
            <dc:creator>Unknown Author</dc:creator>
            <dc:date>2026-06-05T08:18:00.602803200</dc:date>
          </office:change-info>
          <table:previous>
            <table:change-track-table-cell office:value-type="float" office:value="46178"/>
          </table:previous>
        </table:cell-content-change>
        <table:cell-content-change table:id="ct43" table:acceptance-state="accepted">
          <table:cell-address table:column="16" table:row="139" table:table="0"/>
          <office:change-info>
            <dc:creator>Unknown Author</dc:creator>
            <dc:date>2026-06-05T08:19:26.576478200</dc:date>
          </office:change-info>
          <table:previous>
            <table:change-track-table-cell/>
          </table:previous>
        </table:cell-content-change>
        <table:cell-content-change table:id="ct44" table:acceptance-state="accepted">
          <table:cell-address table:column="16" table:row="2" table:table="0"/>
          <office:change-info>
            <dc:creator>Unknown Author</dc:creator>
            <dc:date>2026-06-05T08:25:46.307803700</dc:date>
          </office:change-info>
          <table:previous>
            <table:change-track-table-cell/>
          </table:previous>
        </table:cell-content-change>
        <table:cell-content-change table:id="ct45" table:acceptance-state="accepted">
          <table:cell-address table:column="16" table:row="126" table:table="0"/>
          <office:change-info>
            <dc:creator>Unknown Author</dc:creator>
            <dc:date>2026-06-08T23:54:53.472830500</dc:date>
          </office:change-info>
          <table:previous>
            <table:change-track-table-cell/>
          </table:previous>
        </table:cell-content-change>
        <table:cell-content-change table:id="ct46" table:acceptance-state="accepted">
          <table:cell-address table:column="16" table:row="182" table:table="0"/>
          <office:change-info>
            <dc:creator>Unknown Author</dc:creator>
            <dc:date>2026-06-08T23:55:26.695337300</dc:date>
          </office:change-info>
          <table:previous>
            <table:change-track-table-cell/>
          </table:previous>
        </table:cell-content-change>
        <table:cell-content-change table:id="ct47" table:acceptance-state="accepted">
          <table:cell-address table:column="16" table:row="185" table:table="0"/>
          <office:change-info>
            <dc:creator>Unknown Author</dc:creator>
            <dc:date>2026-06-08T23:55:52.019712400</dc:date>
          </office:change-info>
          <table:previous>
            <table:change-track-table-cell/>
          </table:previous>
        </table:cell-content-change>
        <table:cell-content-change table:id="ct48" table:acceptance-state="accepted">
          <table:cell-address table:column="13" table:row="181" table:table="0"/>
          <office:change-info>
            <dc:creator>Unknown Author</dc:creator>
            <dc:date>2026-06-08T23:56:12.239703500</dc:date>
          </office:change-info>
          <table:previous>
            <table:change-track-table-cell/>
          </table:previous>
        </table:cell-content-change>
        <table:cell-content-change table:id="ct49" table:acceptance-state="accepted">
          <table:cell-address table:column="16" table:row="83" table:table="0"/>
          <office:change-info>
            <dc:creator>Unknown Author</dc:creator>
            <dc:date>2026-06-09T00:17:57.403484300</dc:date>
          </office:change-info>
          <table:previous>
            <table:change-track-table-cell/>
          </table:previous>
        </table:cell-content-change>
        <table:cell-content-change table:id="ct50" table:acceptance-state="accepted">
          <table:cell-address table:column="16" table:row="84" table:table="0"/>
          <office:change-info>
            <dc:creator>Unknown Author</dc:creator>
            <dc:date>2026-06-09T00:18:01.758490700</dc:date>
          </office:change-info>
          <table:previous>
            <table:change-track-table-cell office:value-type="float" office:value="0"/>
          </table:previous>
        </table:cell-content-change>
        <table:cell-content-change table:id="ct51" table:acceptance-state="accepted">
          <table:cell-address table:column="16" table:row="85" table:table="0"/>
          <office:change-info>
            <dc:creator>Unknown Author</dc:creator>
            <dc:date>2026-06-09T00:18:01.758498400</dc:date>
          </office:change-info>
          <table:previous>
            <table:change-track-table-cell office:value-type="float" office:value="0"/>
          </table:previous>
        </table:cell-content-change>
        <table:cell-content-change table:id="ct52" table:acceptance-state="accepted">
          <table:cell-address table:column="16" table:row="86" table:table="0"/>
          <office:change-info>
            <dc:creator>Unknown Author</dc:creator>
            <dc:date>2026-06-09T00:18:01.758500600</dc:date>
          </office:change-info>
          <table:previous>
            <table:change-track-table-cell office:value-type="float" office:value="0"/>
          </table:previous>
        </table:cell-content-change>
        <table:cell-content-change table:id="ct53" table:acceptance-state="accepted">
          <table:cell-address table:column="16" table:row="87" table:table="0"/>
          <office:change-info>
            <dc:creator>Unknown Author</dc:creator>
            <dc:date>2026-06-09T00:18:01.758502700</dc:date>
          </office:change-info>
          <table:previous>
            <table:change-track-table-cell office:value-type="float" office:value="0"/>
          </table:previous>
        </table:cell-content-change>
        <table:cell-content-change table:id="ct54" table:acceptance-state="accepted">
          <table:cell-address table:column="16" table:row="88" table:table="0"/>
          <office:change-info>
            <dc:creator>Unknown Author</dc:creator>
            <dc:date>2026-06-09T00:18:01.758504700</dc:date>
          </office:change-info>
          <table:previous>
            <table:change-track-table-cell office:value-type="float" office:value="0"/>
          </table:previous>
        </table:cell-content-change>
        <table:cell-content-change table:id="ct55" table:acceptance-state="accepted">
          <table:cell-address table:column="13" table:row="154" table:table="0"/>
          <office:change-info>
            <dc:creator>Unknown Author</dc:creator>
            <dc:date>2026-06-09T00:18:31.074496900</dc:date>
          </office:change-info>
          <table:previous>
            <table:change-track-table-cell office:value-type="float" office:value="46182"/>
          </table:previous>
        </table:cell-content-change>
        <table:cell-content-change table:id="ct56" table:acceptance-state="accepted">
          <table:cell-address table:column="16" table:row="154" table:table="0"/>
          <office:change-info>
            <dc:creator>Unknown Author</dc:creator>
            <dc:date>2026-06-09T00:18:54.410528500</dc:date>
          </office:change-info>
          <table:previous>
            <table:change-track-table-cell/>
          </table:previous>
        </table:cell-content-change>
        <table:cell-content-change table:id="ct57" table:acceptance-state="accepted">
          <table:cell-address table:column="13" table:row="139" table:table="0"/>
          <office:change-info>
            <dc:creator>Unknown Author</dc:creator>
            <dc:date>2026-06-09T00:20:08.581257300</dc:date>
          </office:change-info>
          <table:previous>
            <table:change-track-table-cell office:value-type="float" office:value="46178"/>
          </table:previous>
        </table:cell-content-change>
        <table:cell-content-change table:id="ct58" table:acceptance-state="accepted">
          <table:cell-address table:column="14" table:row="139" table:table="0"/>
          <office:change-info>
            <dc:creator>Unknown Author</dc:creator>
            <dc:date>2026-06-09T00:20:12.764149500</dc:date>
          </office:change-info>
          <table:previous>
            <table:change-track-table-cell office:value-type="float" office:value="46178"/>
          </table:previous>
        </table:cell-content-change>
        <table:cell-content-change table:id="ct59" table:acceptance-state="accepted">
          <table:cell-address table:column="16" table:row="140" table:table="0"/>
          <office:change-info>
            <dc:creator>Unknown Author</dc:creator>
            <dc:date>2026-06-09T00:21:59.199734700</dc:date>
          </office:change-info>
          <table:previous>
            <table:change-track-table-cell/>
          </table:previous>
        </table:cell-content-change>
        <table:cell-content-change table:id="ct60" table:acceptance-state="accepted">
          <table:cell-address table:column="13" table:row="146" table:table="0"/>
          <office:change-info>
            <dc:creator>Unknown Author</dc:creator>
            <dc:date>2026-06-09T00:22:24.454105300</dc:date>
          </office:change-info>
          <table:previous>
            <table:change-track-table-cell office:value-type="float" office:value="46181"/>
          </table:previous>
        </table:cell-content-change>
        <table:cell-content-change table:id="ct61" table:acceptance-state="accepted">
          <table:cell-address table:column="14" table:row="146" table:table="0"/>
          <office:change-info>
            <dc:creator>Unknown Author</dc:creator>
            <dc:date>2026-06-09T00:22:24.454126200</dc:date>
          </office:change-info>
          <table:previous>
            <table:change-track-table-cell office:value-type="float" office:value="46181"/>
          </table:previous>
        </table:cell-content-change>
        <table:cell-content-change table:id="ct62" table:acceptance-state="accepted">
          <table:cell-address table:column="16" table:row="146" table:table="0"/>
          <office:change-info>
            <dc:creator>Unknown Author</dc:creator>
            <dc:date>2026-06-09T00:22:30.137029100</dc:date>
          </office:change-info>
          <table:previous>
            <table:change-track-table-cell office:value-type="float" office:value="100"/>
          </table:previous>
        </table:cell-content-change>
        <table:cell-content-change table:id="ct63" table:acceptance-state="accepted">
          <table:cell-address table:column="13" table:row="96" table:table="0"/>
          <office:change-info>
            <dc:creator>Unknown Author</dc:creator>
            <dc:date>2026-06-09T00:23:36.820599100</dc:date>
          </office:change-info>
          <table:previous>
            <table:change-track-table-cell office:value-type="float" office:value="46178"/>
          </table:previous>
        </table:cell-content-change>
        <table:cell-content-change table:id="ct64" table:acceptance-state="accepted">
          <table:cell-address table:column="14" table:row="96" table:table="0"/>
          <office:change-info>
            <dc:creator>Unknown Author</dc:creator>
            <dc:date>2026-06-09T00:23:39.838262500</dc:date>
          </office:change-info>
          <table:previous>
            <table:change-track-table-cell office:value-type="float" office:value="46178"/>
          </table:previous>
        </table:cell-content-change>
        <table:cell-content-change table:id="ct65" table:acceptance-state="accepted">
          <table:cell-address table:column="13" table:row="116" table:table="0"/>
          <office:change-info>
            <dc:creator>Unknown Author</dc:creator>
            <dc:date>2026-06-09T00:25:08.685779100</dc:date>
          </office:change-info>
          <table:previous>
            <table:change-track-table-cell office:value-type="float" office:value="46178"/>
          </table:previous>
        </table:cell-content-change>
        <table:cell-content-change table:id="ct66" table:acceptance-state="accepted">
          <table:cell-address table:column="14" table:row="116" table:table="0"/>
          <office:change-info>
            <dc:creator>Unknown Author</dc:creator>
            <dc:date>2026-06-09T00:25:16.458008700</dc:date>
          </office:change-info>
          <table:previous>
            <table:change-track-table-cell office:value-type="float" office:value="46178"/>
          </table:previous>
        </table:cell-content-change>
        <table:cell-content-change table:id="ct67" table:acceptance-state="accepted">
          <table:cell-address table:column="13" table:row="117" table:table="0"/>
          <office:change-info>
            <dc:creator>Unknown Author</dc:creator>
            <dc:date>2026-06-09T00:25:23.385065500</dc:date>
          </office:change-info>
          <table:previous>
            <table:change-track-table-cell office:value-type="float" office:value="46178"/>
          </table:previous>
        </table:cell-content-change>
        <table:cell-content-change table:id="ct68" table:acceptance-state="accepted">
          <table:cell-address table:column="14" table:row="117" table:table="0"/>
          <office:change-info>
            <dc:creator>Unknown Author</dc:creator>
            <dc:date>2026-06-09T00:25:23.385079800</dc:date>
          </office:change-info>
          <table:previous>
            <table:change-track-table-cell office:value-type="float" office:value="46178"/>
          </table:previous>
        </table:cell-content-change>
        <table:cell-content-change table:id="ct69" table:acceptance-state="accepted">
          <table:cell-address table:column="13" table:row="106" table:table="0"/>
          <office:change-info>
            <dc:creator>Unknown Author</dc:creator>
            <dc:date>2026-06-09T00:30:14.984806000</dc:date>
          </office:change-info>
          <table:previous>
            <table:change-track-table-cell office:value-type="float" office:value="46178"/>
          </table:previous>
        </table:cell-content-change>
        <table:cell-content-change table:id="ct70" table:acceptance-state="accepted">
          <table:cell-address table:column="14" table:row="105" table:table="0"/>
          <office:change-info>
            <dc:creator>Unknown Author</dc:creator>
            <dc:date>2026-06-09T00:30:27.985239100</dc:date>
          </office:change-info>
          <table:previous>
            <table:change-track-table-cell office:value-type="float" office:value="46181"/>
          </table:previous>
        </table:cell-content-change>
        <table:cell-content-change table:id="ct71" table:acceptance-state="accepted">
          <table:cell-address table:column="16" table:row="106" table:table="0"/>
          <office:change-info>
            <dc:creator>Unknown Author</dc:creator>
            <dc:date>2026-06-09T00:30:48.158968900</dc:date>
          </office:change-info>
          <table:previous>
            <table:change-track-table-cell office:value-type="float" office:value="0"/>
          </table:previous>
        </table:cell-content-change>
        <table:cell-content-change table:id="ct72" table:acceptance-state="accepted">
          <table:cell-address table:column="16" table:row="107" table:table="0"/>
          <office:change-info>
            <dc:creator>Unknown Author</dc:creator>
            <dc:date>2026-06-09T00:30:54.296219900</dc:date>
          </office:change-info>
          <table:previous>
            <table:change-track-table-cell office:value-type="float" office:value="0"/>
          </table:previous>
        </table:cell-content-change>
        <table:cell-content-change table:id="ct73" table:acceptance-state="accepted">
          <table:cell-address table:column="16" table:row="108" table:table="0"/>
          <office:change-info>
            <dc:creator>Unknown Author</dc:creator>
            <dc:date>2026-06-09T00:30:54.296230300</dc:date>
          </office:change-info>
          <table:previous>
            <table:change-track-table-cell office:value-type="float" office:value="0"/>
          </table:previous>
        </table:cell-content-change>
        <table:cell-content-change table:id="ct74" table:acceptance-state="accepted">
          <table:cell-address table:column="16" table:row="109" table:table="0"/>
          <office:change-info>
            <dc:creator>Unknown Author</dc:creator>
            <dc:date>2026-06-09T00:30:54.296232600</dc:date>
          </office:change-info>
          <table:previous>
            <table:change-track-table-cell office:value-type="float" office:value="0"/>
          </table:previous>
        </table:cell-content-change>
        <table:cell-content-change table:id="ct75" table:acceptance-state="accepted">
          <table:cell-address table:column="16" table:row="110" table:table="0"/>
          <office:change-info>
            <dc:creator>Unknown Author</dc:creator>
            <dc:date>2026-06-09T00:30:54.296235200</dc:date>
          </office:change-info>
          <table:previous>
            <table:change-track-table-cell office:value-type="float" office:value="0"/>
          </table:previous>
        </table:cell-content-change>
        <table:cell-content-change table:id="ct76" table:acceptance-state="accepted">
          <table:cell-address table:column="16" table:row="111" table:table="0"/>
          <office:change-info>
            <dc:creator>Unknown Author</dc:creator>
            <dc:date>2026-06-09T00:30:54.296237400</dc:date>
          </office:change-info>
          <table:previous>
            <table:change-track-table-cell office:value-type="float" office:value="0"/>
          </table:previous>
        </table:cell-content-change>
        <table:cell-content-change table:id="ct77" table:acceptance-state="accepted">
          <table:cell-address table:column="13" table:row="152" table:table="0"/>
          <office:change-info>
            <dc:creator>Unknown Author</dc:creator>
            <dc:date>2026-06-09T00:31:55.923869100</dc:date>
          </office:change-info>
          <table:previous>
            <table:change-track-table-cell office:value-type="float" office:value="46181"/>
          </table:previous>
        </table:cell-content-change>
        <table:cell-content-change table:id="ct78" table:acceptance-state="accepted">
          <table:cell-address table:column="14" table:row="157" table:table="0"/>
          <office:change-info>
            <dc:creator>Unknown Author</dc:creator>
            <dc:date>2026-06-09T06:04:38.370536200</dc:date>
          </office:change-info>
          <table:previous>
            <table:change-track-table-cell office:value-type="float" office:value="46181"/>
          </table:previous>
        </table:cell-content-change>
        <table:cell-content-change table:id="ct79" table:acceptance-state="accepted">
          <table:cell-address table:column="16" table:row="157" table:table="0"/>
          <office:change-info>
            <dc:creator>Unknown Author</dc:creator>
            <dc:date>2026-06-09T06:05:29.216183000</dc:date>
          </office:change-info>
          <table:previous>
            <table:change-track-table-cell/>
          </table:previous>
        </table:cell-content-change>
        <table:cell-content-change table:id="ct80" table:acceptance-state="accepted">
          <table:cell-address table:column="13" table:row="169" table:table="0"/>
          <office:change-info>
            <dc:creator>Unknown Author</dc:creator>
            <dc:date>2026-06-09T06:06:03.101224600</dc:date>
          </office:change-info>
          <table:previous>
            <table:change-track-table-cell/>
          </table:previous>
        </table:cell-content-change>
        <table:cell-content-change table:id="ct81" table:acceptance-state="accepted">
          <table:cell-address table:column="16" table:row="169" table:table="0"/>
          <office:change-info>
            <dc:creator>Unknown Author</dc:creator>
            <dc:date>2026-06-09T06:06:23.417541000</dc:date>
          </office:change-info>
          <table:previous>
            <table:change-track-table-cell/>
          </table:previous>
        </table:cell-content-change>
        <table:cell-content-change table:id="ct82" table:acceptance-state="accepted">
          <table:cell-address table:column="16" table:row="170" table:table="0"/>
          <office:change-info>
            <dc:creator>Unknown Author</dc:creator>
            <dc:date>2026-06-09T06:06:23.417553700</dc:date>
          </office:change-info>
          <table:previous>
            <table:change-track-table-cell/>
          </table:previous>
        </table:cell-content-change>
        <table:cell-content-change table:id="ct83" table:acceptance-state="accepted">
          <table:cell-address table:column="14" table:row="168" table:table="0"/>
          <office:change-info>
            <dc:creator>Unknown Author</dc:creator>
            <dc:date>2026-06-09T06:06:29.590512400</dc:date>
          </office:change-info>
          <table:previous>
            <table:change-track-table-cell office:value-type="float" office:value="46182"/>
          </table:previous>
        </table:cell-content-change>
        <table:cell-content-change table:id="ct84" table:acceptance-state="accepted">
          <table:cell-address table:column="14" table:row="132" table:table="0"/>
          <office:change-info>
            <dc:creator>Unknown Author</dc:creator>
            <dc:date>2026-06-09T06:07:42.191711200</dc:date>
          </office:change-info>
          <table:previous>
            <table:change-track-table-cell office:value-type="float" office:value="46181"/>
          </table:previous>
        </table:cell-content-change>
        <table:cell-content-change table:id="ct85" table:acceptance-state="accepted">
          <table:cell-address table:column="16" table:row="129" table:table="0"/>
          <office:change-info>
            <dc:creator>Unknown Author</dc:creator>
            <dc:date>2026-06-09T06:08:02.386446000</dc:date>
          </office:change-info>
          <table:previous>
            <table:change-track-table-cell/>
          </table:previous>
        </table:cell-content-change>
        <table:cell-content-change table:id="ct86" table:acceptance-state="accepted">
          <table:cell-address table:column="13" table:row="134" table:table="0"/>
          <office:change-info>
            <dc:creator>Unknown Author</dc:creator>
            <dc:date>2026-06-09T06:08:14.323506700</dc:date>
          </office:change-info>
          <table:previous>
            <table:change-track-table-cell office:value-type="float" office:value="46181"/>
          </table:previous>
        </table:cell-content-change>
        <table:cell-content-change table:id="ct87" table:acceptance-state="accepted">
          <table:cell-address table:column="16" table:row="185" table:table="0"/>
          <office:change-info>
            <dc:creator>Unknown Author</dc:creator>
            <dc:date>2026-06-09T06:10:30.050859900</dc:date>
          </office:change-info>
          <table:previous table:id="ct47">
            <table:change-track-table-cell office:value-type="float" office:value="50"/>
          </table:previous>
        </table:cell-content-change>
        <table:cell-content-change table:id="ct88" table:acceptance-state="accepted">
          <table:cell-address table:column="16" table:row="186" table:table="0"/>
          <office:change-info>
            <dc:creator>Unknown Author</dc:creator>
            <dc:date>2026-06-09T06:10:30.050868300</dc:date>
          </office:change-info>
          <table:previous>
            <table:change-track-table-cell/>
          </table:previous>
        </table:cell-content-change>
        <table:cell-content-change table:id="ct89" table:acceptance-state="accepted">
          <table:cell-address table:column="16" table:row="187" table:table="0"/>
          <office:change-info>
            <dc:creator>Unknown Author</dc:creator>
            <dc:date>2026-06-09T06:10:30.050871100</dc:date>
          </office:change-info>
          <table:previous>
            <table:change-track-table-cell/>
          </table:previous>
        </table:cell-content-change>
        <table:cell-content-change table:id="ct90" table:acceptance-state="accepted">
          <table:cell-address table:column="16" table:row="188" table:table="0"/>
          <office:change-info>
            <dc:creator>Unknown Author</dc:creator>
            <dc:date>2026-06-09T06:10:30.050873000</dc:date>
          </office:change-info>
          <table:previous>
            <table:change-track-table-cell/>
          </table:previous>
        </table:cell-content-change>
        <table:cell-content-change table:id="ct91" table:acceptance-state="accepted">
          <table:cell-address table:column="16" table:row="189" table:table="0"/>
          <office:change-info>
            <dc:creator>Unknown Author</dc:creator>
            <dc:date>2026-06-09T06:10:30.050875600</dc:date>
          </office:change-info>
          <table:previous>
            <table:change-track-table-cell office:value-type="float" office:value="0"/>
          </table:previous>
        </table:cell-content-change>
        <table:cell-content-change table:id="ct92" table:acceptance-state="accepted">
          <table:cell-address table:column="16" table:row="114" table:table="0"/>
          <office:change-info>
            <dc:creator>Unknown Author</dc:creator>
            <dc:date>2026-06-09T06:12:02.406374100</dc:date>
          </office:change-info>
          <table:previous>
            <table:change-track-table-cell/>
          </table:previous>
        </table:cell-content-change>
        <table:cell-content-change table:id="ct93" table:acceptance-state="accepted">
          <table:cell-address table:column="16" table:row="115" table:table="0"/>
          <office:change-info>
            <dc:creator>Unknown Author</dc:creator>
            <dc:date>2026-06-09T06:12:02.406385800</dc:date>
          </office:change-info>
          <table:previous>
            <table:change-track-table-cell/>
          </table:previous>
        </table:cell-content-change>
        <table:cell-content-change table:id="ct94" table:acceptance-state="accepted">
          <table:cell-address table:column="7" table:row="196" table:table="0"/>
          <office:change-info>
            <dc:creator>Unknown Author</dc:creator>
            <dc:date>2026-06-09T06:15:51.299393800</dc:date>
          </office:change-info>
          <table:previous>
            <table:change-track-table-cell office:value-type="string">
              <text:p>未確定</text:p>
            </table:change-track-table-cell>
          </table:previous>
        </table:cell-content-change>
        <table:cell-content-change table:id="ct95" table:acceptance-state="accepted">
          <table:cell-address table:column="7" table:row="197" table:table="0"/>
          <office:change-info>
            <dc:creator>Unknown Author</dc:creator>
            <dc:date>2026-06-09T06:23:21.330534500</dc:date>
          </office:change-info>
          <table:previous>
            <table:change-track-table-cell/>
          </table:previous>
        </table:cell-content-change>
        <table:cell-content-change table:id="ct96" table:acceptance-state="accepted">
          <table:cell-address table:column="5" table:row="196" table:table="0"/>
          <office:change-info>
            <dc:creator>Unknown Author</dc:creator>
            <dc:date>2026-06-09T06:23:36.851799100</dc:date>
          </office:change-info>
          <table:previous>
            <table:change-track-table-cell office:value-type="string">
              <text:p>オリジナル機能</text:p>
            </table:change-track-table-cell>
          </table:previous>
        </table:cell-content-change>
        <table:cell-content-change table:id="ct97" table:acceptance-state="accepted">
          <table:cell-address table:column="7" table:row="197" table:table="0"/>
          <office:change-info>
            <dc:creator>Unknown Author</dc:creator>
            <dc:date>2026-06-09T06:23:42.161510800</dc:date>
          </office:change-info>
          <table:previous table:id="ct95">
            <table:change-track-table-cell office:value-type="string">
              <text:p>タイムセール</text:p>
            </table:change-track-table-cell>
          </table:previous>
        </table:cell-content-change>
        <table:cell-content-change table:id="ct98" table:acceptance-state="accepted">
          <table:cell-address table:column="7" table:row="197" table:table="0"/>
          <office:change-info>
            <dc:creator>Unknown Author</dc:creator>
            <dc:date>2026-06-09T06:24:05.849239500</dc:date>
          </office:change-info>
          <table:previous table:id="ct97">
            <table:change-track-table-cell/>
          </table:previous>
        </table:cell-content-change>
        <table:cell-content-change table:id="ct99" table:acceptance-state="accepted">
          <table:cell-address table:column="7" table:row="197" table:table="0"/>
          <office:change-info>
            <dc:creator>Unknown Author</dc:creator>
            <dc:date>2026-06-09T06:24:19.266461600</dc:date>
          </office:change-info>
          <table:previous table:id="ct98">
            <table:change-track-table-cell office:value-type="string">
              <text:p>支払い方法選択画面</text:p>
            </table:change-track-table-cell>
          </table:previous>
        </table:cell-content-change>
        <table:cell-content-change table:id="ct100" table:acceptance-state="accepted">
          <table:cell-address table:column="7" table:row="197" table:table="0"/>
          <office:change-info>
            <dc:creator>Unknown Author</dc:creator>
            <dc:date>2026-06-09T06:24:37.138862500</dc:date>
          </office:change-info>
          <table:previous table:id="ct99">
            <table:change-track-table-cell/>
          </table:previous>
        </table:cell-content-change>
        <table:cell-content-change table:id="ct101" table:acceptance-state="accepted">
          <table:cell-address table:column="7" table:row="197" table:table="0"/>
          <office:change-info>
            <dc:creator>Unknown Author</dc:creator>
            <dc:date>2026-06-09T06:25:35.967677500</dc:date>
          </office:change-info>
          <table:previous table:id="ct100">
            <table:change-track-table-cell office:value-type="string">
              <text:p>支払方法選択画面表示処理</text:p>
            </table:change-track-table-cell>
          </table:previous>
        </table:cell-content-change>
        <table:cell-content-change table:id="ct102" table:acceptance-state="accepted">
          <table:cell-address table:column="5" table:row="196" table:table="0"/>
          <office:change-info>
            <dc:creator>Unknown Author</dc:creator>
            <dc:date>2026-06-09T06:26:23.386544300</dc:date>
          </office:change-info>
          <table:previous table:id="ct96">
            <table:change-track-table-cell office:value-type="string">
              <text:p>オリジナル機能（タイムセール）</text:p>
            </table:change-track-table-cell>
          </table:previous>
        </table:cell-content-change>
        <table:cell-content-change table:id="ct103" table:acceptance-state="accepted">
          <table:cell-address table:column="5" table:row="196" table:table="0"/>
          <office:change-info>
            <dc:creator>Unknown Author</dc:creator>
            <dc:date>2026-06-09T06:26:53.252240700</dc:date>
          </office:change-info>
          <table:previous table:id="ct102">
            <table:change-track-table-cell office:value-type="string">
              <text:p>オリジナル機能（クーポン）</text:p>
            </table:change-track-table-cell>
          </table:previous>
        </table:cell-content-change>
        <table:cell-content-change table:id="ct104" table:acceptance-state="accepted">
          <table:cell-address table:column="7" table:row="198" table:table="0"/>
          <office:change-info>
            <dc:creator>Unknown Author</dc:creator>
            <dc:date>2026-06-09T06:27:31.940177700</dc:date>
          </office:change-info>
          <table:previous>
            <table:change-track-table-cell/>
          </table:previous>
        </table:cell-content-change>
        <table:cell-content-change table:id="ct105" table:acceptance-state="accepted">
          <table:cell-address table:column="7" table:row="198" table:table="0"/>
          <office:change-info>
            <dc:creator>Unknown Author</dc:creator>
            <dc:date>2026-06-09T06:27:41.636266000</dc:date>
          </office:change-info>
          <table:previous table:id="ct104">
            <table:change-track-table-cell office:value-type="string">
              <text:p>注文確認画面表示処理</text:p>
            </table:change-track-table-cell>
          </table:previous>
        </table:cell-content-change>
        <table:cell-content-change table:id="ct106" table:acceptance-state="accepted">
          <table:cell-address table:column="7" table:row="198" table:table="0"/>
          <office:change-info>
            <dc:creator>Unknown Author</dc:creator>
            <dc:date>2026-06-09T06:28:01.891196300</dc:date>
          </office:change-info>
          <table:previous table:id="ct105">
            <table:change-track-table-cell office:value-type="string">
              <text:p>注文確認画面表示処理　コントローラーの編集</text:p>
            </table:change-track-table-cell>
          </table:previous>
        </table:cell-content-change>
        <table:cell-content-change table:id="ct107" table:acceptance-state="accepted">
          <table:cell-address table:column="7" table:row="203" table:table="0"/>
          <office:change-info>
            <dc:creator>Unknown Author</dc:creator>
            <dc:date>2026-06-09T06:28:33.941269700</dc:date>
          </office:change-info>
          <table:previous>
            <table:change-track-table-cell/>
          </table:previous>
        </table:cell-content-change>
        <table:cell-content-change table:id="ct108" table:acceptance-state="accepted">
          <table:cell-address table:column="7" table:row="203" table:table="0"/>
          <office:change-info>
            <dc:creator>Unknown Author</dc:creator>
            <dc:date>2026-06-09T06:28:42.276663200</dc:date>
          </office:change-info>
          <table:previous table:id="ct107">
            <table:change-track-table-cell office:value-type="string">
              <text:p>ご注文の確定ボタン 押下時処理</text:p>
            </table:change-track-table-cell>
          </table:previous>
        </table:cell-content-change>
        <table:cell-content-change table:id="ct109" table:acceptance-state="accepted">
          <table:cell-address table:column="7" table:row="203" table:table="0"/>
          <office:change-info>
            <dc:creator>Unknown Author</dc:creator>
            <dc:date>2026-06-09T06:28:50.120940700</dc:date>
          </office:change-info>
          <table:previous table:id="ct108">
            <table:change-track-table-cell office:value-type="string">
              <text:p>ご注文の確定ボタン 押下時処理　コントローラーの編集</text:p>
            </table:change-track-table-cell>
          </table:previous>
        </table:cell-content-change>
        <table:cell-content-change table:id="ct110" table:acceptance-state="accepted">
          <table:cell-address table:column="7" table:row="203" table:table="0"/>
          <office:change-info>
            <dc:creator>Unknown Author</dc:creator>
            <dc:date>2026-06-09T06:29:13.753443800</dc:date>
          </office:change-info>
          <table:previous>
            <table:change-track-table-cell/>
          </table:previous>
        </table:cell-content-change>
        <table:cell-content-change table:id="ct111" table:acceptance-state="accepted">
          <table:cell-address table:column="7" table:row="203" table:table="0"/>
          <office:change-info>
            <dc:creator>Unknown Author</dc:creator>
            <dc:date>2026-06-09T06:29:21.249233500</dc:date>
          </office:change-info>
          <table:previous table:id="ct110">
            <table:change-track-table-cell office:value-type="string">
              <text:p>注文完了画面表示処理</text:p>
            </table:change-track-table-cell>
          </table:previous>
        </table:cell-content-change>
        <table:cell-content-change table:id="ct112" table:acceptance-state="accepted">
          <table:cell-address table:column="7" table:row="203" table:table="0"/>
          <office:change-info>
            <dc:creator>Unknown Author</dc:creator>
            <dc:date>2026-06-09T06:29:32.995245000</dc:date>
          </office:change-info>
          <table:previous table:id="ct111">
            <table:change-track-table-cell office:value-type="string">
              <text:p>注文完了画面表示処理　コントローラーの編集</text:p>
            </table:change-track-table-cell>
          </table:previous>
        </table:cell-content-change>
        <table:cell-content-change table:id="ct113" table:acceptance-state="accepted">
          <table:cell-address table:column="9" table:row="196" table:table="0"/>
          <office:change-info>
            <dc:creator>Unknown Author</dc:creator>
            <dc:date>2026-06-09T06:31:29.262398600</dc:date>
          </office:change-info>
          <table:previous table:id="ct1">
            <table:change-track-table-cell office:value-type="string">
              <text:p>全員</text:p>
            </table:change-track-table-cell>
          </table:previous>
        </table:cell-content-change>
        <table:cell-content-change table:id="ct114" table:acceptance-state="accepted">
          <table:cell-address table:column="3" table:row="195" table:table="0"/>
          <office:change-info>
            <dc:creator>Unknown Author</dc:creator>
            <dc:date>2026-06-09T06:31:44.171279400</dc:date>
          </office:change-info>
          <table:previous>
            <table:change-track-table-cell office:value-type="string">
              <text:p>任意機能</text:p>
            </table:change-track-table-cell>
          </table:previous>
        </table:cell-content-change>
        <table:cell-content-change table:id="ct115" table:acceptance-state="accepted">
          <table:cell-address table:column="5" table:row="196" table:table="0"/>
          <office:change-info>
            <dc:creator>Unknown Author</dc:creator>
            <dc:date>2026-06-09T06:31:58.745455900</dc:date>
          </office:change-info>
          <table:previous table:id="ct103">
            <table:change-track-table-cell office:value-type="string">
              <text:p>オリジナル機能（クーポン・タイムセール）</text:p>
            </table:change-track-table-cell>
          </table:previous>
        </table:cell-content-change>
        <table:cell-content-change table:id="ct116" table:acceptance-state="accepted">
          <table:cell-address table:column="7" table:row="204" table:table="0"/>
          <office:change-info>
            <dc:creator>Unknown Author</dc:creator>
            <dc:date>2026-06-09T06:38:14.644429100</dc:date>
          </office:change-info>
          <table:previous>
            <table:change-track-table-cell/>
          </table:previous>
        </table:cell-content-change>
        <table:cell-content-change table:id="ct117" table:acceptance-state="accepted">
          <table:cell-address table:column="14" table:row="143" table:table="0"/>
          <office:change-info>
            <dc:creator>Unknown Author</dc:creator>
            <dc:date>2026-06-09T06:45:06.763986900</dc:date>
          </office:change-info>
          <table:previous>
            <table:change-track-table-cell office:value-type="float" office:value="46181"/>
          </table:previous>
        </table:cell-content-change>
        <table:cell-content-change table:id="ct118" table:acceptance-state="accepted">
          <table:cell-address table:column="16" table:row="143" table:table="0"/>
          <office:change-info>
            <dc:creator>Unknown Author</dc:creator>
            <dc:date>2026-06-09T06:46:58.907816000</dc:date>
          </office:change-info>
          <table:previous>
            <table:change-track-table-cell/>
          </table:previous>
        </table:cell-content-change>
        <table:cell-content-change table:id="ct119" table:acceptance-state="accepted">
          <table:cell-address table:column="5" table:row="196" table:table="0"/>
          <office:change-info>
            <dc:creator>Unknown Author</dc:creator>
            <dc:date>2026-06-09T06:47:23.005316800</dc:date>
          </office:change-info>
          <table:previous table:id="ct115">
            <table:change-track-table-cell office:value-type="string">
              <text:p>クーポン・タイムセール）</text:p>
            </table:change-track-table-cell>
          </table:previous>
        </table:cell-content-change>
        <table:cell-content-change table:id="ct120" table:acceptance-state="accepted">
          <table:cell-address table:column="7" table:row="204" table:table="0"/>
          <office:change-info>
            <dc:creator>Unknown Author</dc:creator>
            <dc:date>2026-06-09T06:49:21.146672000</dc:date>
          </office:change-info>
          <table:previous table:id="ct116">
            <table:change-track-table-cell office:value-type="string">
              <text:p>HTMLも追加</text:p>
            </table:change-track-table-cell>
          </table:previous>
        </table:cell-content-change>
        <table:cell-content-change table:id="ct121" table:acceptance-state="accepted">
          <table:cell-address table:column="7" table:row="204" table:table="0"/>
          <office:change-info>
            <dc:creator>Unknown Author</dc:creator>
            <dc:date>2026-06-09T06:58:17.876422700</dc:date>
          </office:change-info>
          <table:previous table:id="ct120">
            <table:change-track-table-cell/>
          </table:previous>
        </table:cell-content-change>
        <table:cell-content-change table:id="ct122" table:acceptance-state="accepted">
          <table:cell-address table:column="7" table:row="204" table:table="0"/>
          <office:change-info>
            <dc:creator>Unknown Author</dc:creator>
            <dc:date>2026-06-09T06:58:40.164188600</dc:date>
          </office:change-info>
          <table:previous table:id="ct121">
            <table:change-track-table-cell office:value-type="string">
              <text:p>payment_input</text:p>
            </table:change-track-table-cell>
          </table:previous>
        </table:cell-content-change>
        <table:cell-content-change table:id="ct123" table:acceptance-state="accepted">
          <table:cell-address table:column="7" table:row="204" table:table="0"/>
          <office:change-info>
            <dc:creator>Unknown Author</dc:creator>
            <dc:date>2026-06-09T06:59:11.322354700</dc:date>
          </office:change-info>
          <table:previous table:id="ct122">
            <table:change-track-table-cell office:value-type="string">
              <text:p>payment_input.HTMLファイルの編</text:p>
            </table:change-track-table-cell>
          </table:previous>
        </table:cell-content-change>
        <table:cell-content-change table:id="ct124" table:acceptance-state="accepted">
          <table:cell-address table:column="7" table:row="198" table:table="0"/>
          <office:change-info>
            <dc:creator>Unknown Author</dc:creator>
            <dc:date>2026-06-09T06:59:15.560677200</dc:date>
          </office:change-info>
          <table:previous table:id="ct106">
            <table:change-track-table-cell office:value-type="string">
              <text:p>注文確認画面 表示処理用　コントローラーの編集</text:p>
            </table:change-track-table-cell>
          </table:previous>
        </table:cell-content-change>
        <table:cell-content-change table:id="ct125" table:acceptance-state="accepted">
          <table:cell-address table:column="7" table:row="203" table:table="0"/>
          <office:change-info>
            <dc:creator>Unknown Author</dc:creator>
            <dc:date>2026-06-09T07:00:17.385880100</dc:date>
          </office:change-info>
          <table:previous table:id="ct109">
            <table:change-track-table-cell office:value-type="string">
              <text:p>ご注文の確定ボタン 押下時処理用　コントローラーの編集</text:p>
            </table:change-track-table-cell>
          </table:previous>
        </table:cell-content-change>
        <table:cell-content-change table:id="ct126" table:acceptance-state="accepted">
          <table:cell-address table:column="7" table:row="198" table:table="0"/>
          <office:change-info>
            <dc:creator>Unknown Author</dc:creator>
            <dc:date>2026-06-09T07:01:07.322305200</dc:date>
          </office:change-info>
          <table:previous table:id="ct124">
            <table:change-track-table-cell office:value-type="string">
              <text:p>payment_input.HTMLファイルの編</text:p>
            </table:change-track-table-cell>
          </table:previous>
        </table:cell-content-change>
        <table:cell-content-change table:id="ct127" table:acceptance-state="accepted">
          <table:cell-address table:column="7" table:row="203" table:table="0"/>
          <office:change-info>
            <dc:creator>Unknown Author</dc:creator>
            <dc:date>2026-06-09T07:01:40.125743800</dc:date>
          </office:change-info>
          <table:previous table:id="ct125">
            <table:change-track-table-cell office:value-type="string">
              <text:p>注文確認画面表示処理　コントローラーの編</text:p>
            </table:change-track-table-cell>
          </table:previous>
        </table:cell-content-change>
        <table:cell-content-change table:id="ct128" table:acceptance-state="accepted">
          <table:cell-address table:column="7" table:row="203" table:table="0"/>
          <office:change-info>
            <dc:creator>Unknown Author</dc:creator>
            <dc:date>2026-06-09T07:01:51.262059200</dc:date>
          </office:change-info>
          <table:previous table:id="ct112">
            <table:change-track-table-cell office:value-type="string">
              <text:p>注文完了画面 表示処理用　コントローラーの編集</text:p>
            </table:change-track-table-cell>
          </table:previous>
        </table:cell-content-change>
        <table:cell-content-change table:id="ct129" table:acceptance-state="accepted">
          <table:cell-address table:column="7" table:row="203" table:table="0"/>
          <office:change-info>
            <dc:creator>Unknown Author</dc:creator>
            <dc:date>2026-06-09T07:02:00.701973400</dc:date>
          </office:change-info>
          <table:previous table:id="ct128">
            <table:change-track-table-cell office:value-type="string">
              <text:p>注文確認画面　コントローラーの編</text:p>
            </table:change-track-table-cell>
          </table:previous>
        </table:cell-content-change>
        <table:cell-content-change table:id="ct130" table:acceptance-state="accepted">
          <table:cell-address table:column="7" table:row="203" table:table="0"/>
          <office:change-info>
            <dc:creator>Unknown Author</dc:creator>
            <dc:date>2026-06-09T07:02:38.200440000</dc:date>
          </office:change-info>
          <table:previous table:id="ct127">
            <table:change-track-table-cell office:value-type="string">
              <text:p>注文確認画面 表示処理　コントローラーの編</text:p>
            </table:change-track-table-cell>
          </table:previous>
        </table:cell-content-change>
        <table:cell-content-change table:id="ct131" table:acceptance-state="accepted">
          <table:cell-address table:column="7" table:row="203" table:table="0"/>
          <office:change-info>
            <dc:creator>Unknown Author</dc:creator>
            <dc:date>2026-06-09T07:02:38.200474700</dc:date>
          </office:change-info>
          <table:previous table:id="ct129">
            <table:change-track-table-cell office:value-type="string">
              <text:p>注文確認画面　テンプレートファイルの編</text:p>
            </table:change-track-table-cell>
          </table:previous>
        </table:cell-content-change>
        <table:movement table:id="ct132" table:acceptance-state="accepted">
          <table:source-range-address table:start-column="7" table:start-row="199" table:start-table="0" table:end-column="7" table:end-row="200" table:end-table="0"/>
          <table:target-range-address table:start-column="7" table:start-row="200" table:start-table="0" table:end-column="7" table:end-row="201" table:end-table="0"/>
          <office:change-info>
            <dc:creator>Unknown Author</dc:creator>
            <dc:date>2026-06-09T07:02:39.676009100</dc:date>
          </office:change-info>
          <table:dependencies>
            <table:dependency table:id="ct174"/>
            <table:dependency table:id="ct168"/>
            <table:dependency table:id="ct164"/>
            <table:dependency table:id="ct134"/>
            <table:dependency table:id="ct133"/>
          </table:dependencies>
          <table:deletions>
            <table:cell-content-deletion table:id="ct123">
              <table:change-track-table-cell/>
            </table:cell-content-deletion>
            <table:cell-content-deletion table:id="ct131">
              <table:change-track-table-cell/>
            </table:cell-content-deletion>
          </table:deletions>
        </table:movement>
        <table:cell-content-change table:id="ct133" table:acceptance-state="accepted">
          <table:cell-address table:column="7" table:row="199" table:table="0"/>
          <office:change-info>
            <dc:creator>Unknown Author</dc:creator>
            <dc:date>2026-06-09T07:03:08.373566300</dc:date>
          </office:change-info>
          <table:previous>
            <table:change-track-table-cell/>
          </table:previous>
        </table:cell-content-change>
        <table:cell-content-change table:id="ct134" table:acceptance-state="accepted">
          <table:cell-address table:column="7" table:row="203" table:table="0"/>
          <office:change-info>
            <dc:creator>Unknown Author</dc:creator>
            <dc:date>2026-06-09T07:03:29.417049600</dc:date>
          </office:change-info>
          <table:previous table:id="ct130">
            <table:change-track-table-cell office:value-type="string">
              <text:p>注文確認画面 表示処理　コントローラーの編</text:p>
            </table:change-track-table-cell>
          </table:previous>
        </table:cell-content-change>
        <table:cell-content-change table:id="ct135" table:acceptance-state="accepted">
          <table:cell-address table:column="7" table:row="205" table:table="0"/>
          <office:change-info>
            <dc:creator>Unknown Author</dc:creator>
            <dc:date>2026-06-09T07:03:43.701777500</dc:date>
          </office:change-info>
          <table:previous>
            <table:change-track-table-cell/>
          </table:previous>
        </table:cell-content-change>
        <table:cell-content-change table:id="ct136" table:acceptance-state="accepted">
          <table:cell-address table:column="7" table:row="203" table:table="0"/>
          <office:change-info>
            <dc:creator>Unknown Author</dc:creator>
            <dc:date>2026-06-09T07:04:50.244882200</dc:date>
          </office:change-info>
          <table:previous>
            <table:change-track-table-cell/>
          </table:previous>
        </table:cell-content-change>
        <table:cell-content-change table:id="ct137" table:acceptance-state="accepted">
          <table:cell-address table:column="7" table:row="203" table:table="0"/>
          <office:change-info>
            <dc:creator>Unknown Author</dc:creator>
            <dc:date>2026-06-09T07:05:04.451893300</dc:date>
          </office:change-info>
          <table:previous table:id="ct136">
            <table:change-track-table-cell office:value-type="string">
              <text:p>ご注文の確定ボタン 押下時処</text:p>
            </table:change-track-table-cell>
          </table:previous>
        </table:cell-content-change>
        <table:cell-content-change table:id="ct138" table:acceptance-state="accepted">
          <table:cell-address table:column="11" table:row="196" table:table="0"/>
          <office:change-info>
            <dc:creator>Unknown Author</dc:creator>
            <dc:date>2026-06-09T07:09:29.992236100</dc:date>
          </office:change-info>
          <table:previous table:id="ct2">
            <table:change-track-table-cell office:value-type="float" office:value="46188"/>
          </table:previous>
        </table:cell-content-change>
        <table:cell-content-change table:id="ct139" table:acceptance-state="accepted">
          <table:cell-address table:column="12" table:row="196" table:table="0"/>
          <office:change-info>
            <dc:creator>Unknown Author</dc:creator>
            <dc:date>2026-06-09T07:09:34.959118000</dc:date>
          </office:change-info>
          <table:previous table:id="ct3">
            <table:change-track-table-cell office:value-type="float" office:value="46189"/>
          </table:previous>
        </table:cell-content-change>
        <table:cell-content-change table:id="ct140" table:acceptance-state="accepted">
          <table:cell-address table:column="12" table:row="196" table:table="0"/>
          <office:change-info>
            <dc:creator>Unknown Author</dc:creator>
            <dc:date>2026-06-09T07:09:45.357686400</dc:date>
          </office:change-info>
          <table:previous table:id="ct139">
            <table:change-track-table-cell office:value-type="float" office:value="46184"/>
          </table:previous>
        </table:cell-content-change>
        <table:cell-content-change table:id="ct141" table:acceptance-state="accepted">
          <table:cell-address table:column="12" table:row="197" table:table="0"/>
          <office:change-info>
            <dc:creator>Unknown Author</dc:creator>
            <dc:date>2026-06-09T07:10:07.109385500</dc:date>
          </office:change-info>
          <table:previous>
            <table:change-track-table-cell office:value-type="float" office:value="46183"/>
          </table:previous>
        </table:cell-content-change>
        <table:cell-content-change table:id="ct142" table:acceptance-state="accepted">
          <table:cell-address table:column="7" table:row="204" table:table="0"/>
          <office:change-info>
            <dc:creator>Unknown Author</dc:creator>
            <dc:date>2026-06-09T07:11:07.614540700</dc:date>
          </office:change-info>
          <table:previous>
            <table:change-track-table-cell/>
          </table:previous>
        </table:cell-content-change>
        <table:cell-content-change table:id="ct143" table:acceptance-state="accepted">
          <table:cell-address table:column="7" table:row="204" table:table="0"/>
          <office:change-info>
            <dc:creator>Unknown Author</dc:creator>
            <dc:date>2026-06-09T07:11:25.329166600</dc:date>
          </office:change-info>
          <table:previous table:id="ct142">
            <table:change-track-table-cell office:value-type="string">
              <text:p>注文完了画面表示処</text:p>
            </table:change-track-table-cell>
          </table:previous>
        </table:cell-content-change>
        <table:cell-content-change table:id="ct144" table:acceptance-state="accepted">
          <table:cell-address table:column="7" table:row="205" table:table="0"/>
          <office:change-info>
            <dc:creator>Unknown Author</dc:creator>
            <dc:date>2026-06-09T07:11:56.201648600</dc:date>
          </office:change-info>
          <table:previous>
            <table:change-track-table-cell office:value-type="string">
              <text:p>注文完了画</text:p>
            </table:change-track-table-cell>
          </table:previous>
        </table:cell-content-change>
        <table:cell-content-change table:id="ct145" table:acceptance-state="accepted">
          <table:cell-address table:column="7" table:row="205" table:table="0"/>
          <office:change-info>
            <dc:creator>Unknown Author</dc:creator>
            <dc:date>2026-06-09T07:12:05.929646200</dc:date>
          </office:change-info>
          <table:previous table:id="ct144">
            <table:change-track-table-cell office:value-type="string">
              <text:p>　</text:p>
            </table:change-track-table-cell>
          </table:previous>
        </table:cell-content-change>
        <table:cell-content-change table:id="ct146" table:acceptance-state="accepted">
          <table:cell-address table:column="7" table:row="205" table:table="0"/>
          <office:change-info>
            <dc:creator>Unknown Author</dc:creator>
            <dc:date>2026-06-09T07:12:16.623917500</dc:date>
          </office:change-info>
          <table:previous table:id="ct145">
            <table:change-track-table-cell office:value-type="string">
              <text:p>注文完了画</text:p>
            </table:change-track-table-cell>
          </table:previous>
        </table:cell-content-change>
        <table:cell-content-change table:id="ct147" table:acceptance-state="accepted">
          <table:cell-address table:column="5" table:row="196" table:table="0"/>
          <office:change-info>
            <dc:creator>Unknown Author</dc:creator>
            <dc:date>2026-06-09T07:13:59.883000900</dc:date>
          </office:change-info>
          <table:previous table:id="ct119">
            <table:change-track-table-cell office:value-type="string">
              <text:p>クーポン・タイムセール</text:p>
            </table:change-track-table-cell>
          </table:previous>
        </table:cell-content-change>
        <table:cell-content-change table:id="ct148" table:acceptance-state="accepted">
          <table:cell-address table:column="5" table:row="196" table:table="0"/>
          <office:change-info>
            <dc:creator>Unknown Author</dc:creator>
            <dc:date>2026-06-09T07:14:05.937175100</dc:date>
          </office:change-info>
          <table:previous table:id="ct147">
            <table:change-track-table-cell office:value-type="string">
              <text:p>クーポン機能・タイムセール機能</text:p>
            </table:change-track-table-cell>
          </table:previous>
        </table:cell-content-change>
        <table:cell-content-change table:id="ct149" table:acceptance-state="accepted">
          <table:cell-address table:column="5" table:row="196" table:table="0"/>
          <office:change-info>
            <dc:creator>Unknown Author</dc:creator>
            <dc:date>2026-06-09T07:14:32.903263000</dc:date>
          </office:change-info>
          <table:previous table:id="ct148">
            <table:change-track-table-cell office:value-type="string">
              <text:p>クーポン・タイムセール</text:p>
            </table:change-track-table-cell>
          </table:previous>
        </table:cell-content-change>
        <table:cell-content-change table:id="ct150" table:acceptance-state="accepted">
          <table:cell-address table:column="9" table:row="196" table:table="0"/>
          <office:change-info>
            <dc:creator>Unknown Author</dc:creator>
            <dc:date>2026-06-09T07:14:49.652133100</dc:date>
          </office:change-info>
          <table:previous table:id="ct113">
            <table:change-track-table-cell/>
          </table:previous>
        </table:cell-content-change>
        <table:cell-content-change table:id="ct151" table:acceptance-state="accepted">
          <table:cell-address table:column="7" table:row="200" table:table="0"/>
          <office:change-info>
            <dc:creator>Unknown Author</dc:creator>
            <dc:date>2026-06-09T07:16:19.646696900</dc:date>
          </office:change-info>
          <table:previous>
            <table:change-track-table-cell/>
          </table:previous>
        </table:cell-content-change>
        <table:cell-content-change table:id="ct152" table:acceptance-state="accepted">
          <table:cell-address table:column="7" table:row="200" table:table="0"/>
          <office:change-info>
            <dc:creator>Unknown Author</dc:creator>
            <dc:date>2026-06-09T07:16:41.014911400</dc:date>
          </office:change-info>
          <table:previous table:id="ct151">
            <table:change-track-table-cell office:value-type="string">
              <text:p>クーポン</text:p>
            </table:change-track-table-cell>
          </table:previous>
        </table:cell-content-change>
        <table:cell-content-change table:id="ct153" table:acceptance-state="accepted">
          <table:cell-address table:column="7" table:row="202" table:table="0"/>
          <office:change-info>
            <dc:creator>Unknown Author</dc:creator>
            <dc:date>2026-06-09T07:22:22.817610800</dc:date>
          </office:change-info>
          <table:previous>
            <table:change-track-table-cell/>
          </table:previous>
        </table:cell-content-change>
        <table:cell-content-change table:id="ct154" table:acceptance-state="accepted">
          <table:cell-address table:column="7" table:row="202" table:table="0"/>
          <office:change-info>
            <dc:creator>Unknown Author</dc:creator>
            <dc:date>2026-06-09T07:31:06.557540700</dc:date>
          </office:change-info>
          <table:previous table:id="ct153">
            <table:change-track-table-cell office:value-type="string">
              <text:p>会員詳細画面</text:p>
            </table:change-track-table-cell>
          </table:previous>
        </table:cell-content-change>
        <table:cell-content-change table:id="ct155" table:acceptance-state="accepted">
          <table:cell-address table:column="7" table:row="200" table:table="0"/>
          <office:change-info>
            <dc:creator>Unknown Author</dc:creator>
            <dc:date>2026-06-09T07:31:30.336023900</dc:date>
          </office:change-info>
          <table:previous table:id="ct152">
            <table:change-track-table-cell office:value-type="string">
              <text:p>クーポン機能・タイムセール機能　動作確認</text:p>
            </table:change-track-table-cell>
          </table:previous>
        </table:cell-content-change>
        <table:cell-content-change table:id="ct156" table:acceptance-state="accepted">
          <table:cell-address table:column="7" table:row="202" table:table="0"/>
          <office:change-info>
            <dc:creator>Unknown Author</dc:creator>
            <dc:date>2026-06-09T07:31:48.578184600</dc:date>
          </office:change-info>
          <table:previous table:id="ct154">
            <table:change-track-table-cell office:value-type="string">
              <text:p>クーポン機能・タイムセール機能　動作確認</text:p>
            </table:change-track-table-cell>
          </table:previous>
        </table:cell-content-change>
        <table:cell-content-change table:id="ct157" table:acceptance-state="accepted">
          <table:cell-address table:column="7" table:row="202" table:table="0"/>
          <office:change-info>
            <dc:creator>Unknown Author</dc:creator>
            <dc:date>2026-06-09T07:31:53.746087900</dc:date>
          </office:change-info>
          <table:previous table:id="ct156">
            <table:change-track-table-cell office:value-type="string">
              <text:p>会員詳細画面　</text:p>
            </table:change-track-table-cell>
          </table:previous>
        </table:cell-content-change>
        <table:cell-content-change table:id="ct158" table:acceptance-state="accepted">
          <table:cell-address table:column="7" table:row="202" table:table="0"/>
          <office:change-info>
            <dc:creator>Unknown Author</dc:creator>
            <dc:date>2026-06-09T07:31:58.664304600</dc:date>
          </office:change-info>
          <table:previous>
            <table:change-track-table-cell office:value-type="string">
              <text:p>クーポン機能・タイムセール機能　動作確認</text:p>
            </table:change-track-table-cell>
          </table:previous>
        </table:cell-content-change>
        <table:cell-content-change table:id="ct159" table:acceptance-state="accepted">
          <table:cell-address table:column="7" table:row="209" table:table="0"/>
          <office:change-info>
            <dc:creator>Unknown Author</dc:creator>
            <dc:date>2026-06-09T07:32:00.384792800</dc:date>
          </office:change-info>
          <table:previous>
            <table:change-track-table-cell/>
          </table:previous>
        </table:cell-content-change>
        <table:cell-content-change table:id="ct160" table:acceptance-state="accepted">
          <table:cell-address table:column="7" table:row="202" table:table="0"/>
          <office:change-info>
            <dc:creator>Unknown Author</dc:creator>
            <dc:date>2026-06-09T07:32:12.270330700</dc:date>
          </office:change-info>
          <table:previous table:id="ct158">
            <table:change-track-table-cell/>
          </table:previous>
        </table:cell-content-change>
        <table:cell-content-change table:id="ct161" table:acceptance-state="accepted">
          <table:cell-address table:column="7" table:row="210" table:table="0"/>
          <office:change-info>
            <dc:creator>Unknown Author</dc:creator>
            <dc:date>2026-06-09T07:35:16.181993000</dc:date>
          </office:change-info>
          <table:previous>
            <table:change-track-table-cell/>
          </table:previous>
        </table:cell-content-change>
        <table:cell-content-change table:id="ct162" table:acceptance-state="accepted">
          <table:cell-address table:column="7" table:row="210" table:table="0"/>
          <office:change-info>
            <dc:creator>Unknown Author</dc:creator>
            <dc:date>2026-06-09T07:35:40.344580200</dc:date>
          </office:change-info>
          <table:previous table:id="ct161">
            <table:change-track-table-cell office:value-type="string">
              <text:p>HTML編集</text:p>
            </table:change-track-table-cell>
          </table:previous>
        </table:cell-content-change>
        <table:movement table:id="ct163" table:acceptance-state="accepted">
          <table:source-range-address table:start-column="7" table:start-row="206" table:start-table="0" table:end-column="7" table:end-row="208" table:end-table="0"/>
          <table:target-range-address table:start-column="7" table:start-row="212" table:start-table="0" table:end-column="7" table:end-row="215" table:end-table="0"/>
          <office:change-info>
            <dc:creator>Unknown Author</dc:creator>
            <dc:date>2026-06-09T07:36:22.125718800</dc:date>
          </office:change-info>
          <table:dependencies>
            <table:dependency table:id="ct299"/>
            <table:dependency table:id="ct261"/>
            <table:dependency table:id="ct216"/>
            <table:dependency table:id="ct165"/>
          </table:dependencies>
        </table:movement>
        <table:movement table:id="ct164" table:acceptance-state="accepted">
          <table:source-range-address table:start-column="7" table:start-row="200" table:start-table="0" table:end-column="7" table:end-row="205" table:end-table="0"/>
          <table:target-range-address table:start-column="7" table:start-row="203" table:start-table="0" table:end-column="7" table:end-row="208" table:end-table="0"/>
          <office:change-info>
            <dc:creator>Unknown Author</dc:creator>
            <dc:date>2026-06-09T07:36:33.518376600</dc:date>
          </office:change-info>
          <table:dependencies>
            <table:dependency table:id="ct175"/>
            <table:dependency table:id="ct174"/>
            <table:dependency table:id="ct169"/>
            <table:dependency table:id="ct168"/>
          </table:dependencies>
          <table:deletions>
            <table:cell-content-deletion table:id="ct146">
              <table:change-track-table-cell office:value-type="string">
                <text:p>注文完了画面　テンプレートファイルの編</text:p>
              </table:change-track-table-cell>
            </table:cell-content-deletion>
            <table:cell-content-deletion table:id="ct143">
              <table:change-track-table-cell office:value-type="string">
                <text:p>注文完了画面 表示処理用　コントローラーの編</text:p>
              </table:change-track-table-cell>
            </table:cell-content-deletion>
            <table:cell-content-deletion table:id="ct137">
              <table:change-track-table-cell office:value-type="string">
                <text:p>ご注文の確定ボタン 押下時処理用　コントローラーの編</text:p>
              </table:change-track-table-cell>
            </table:cell-content-deletion>
          </table:deletions>
        </table:movement>
        <table:movement table:id="ct165" table:acceptance-state="accepted">
          <table:source-range-address table:start-column="7" table:start-row="212" table:start-table="0" table:end-column="7" table:end-row="215" table:end-table="0"/>
          <table:target-range-address table:start-column="7" table:start-row="200" table:start-table="0" table:end-column="7" table:end-row="202" table:end-table="0"/>
          <office:change-info>
            <dc:creator>Unknown Author</dc:creator>
            <dc:date>2026-06-09T07:36:41.724896300</dc:date>
          </office:change-info>
          <table:dependencies>
            <table:dependency table:id="ct299"/>
            <table:dependency table:id="ct264"/>
            <table:dependency table:id="ct257"/>
            <table:dependency table:id="ct174"/>
            <table:dependency table:id="ct168"/>
          </table:dependencies>
        </table:movement>
        <table:movement table:id="ct166" table:acceptance-state="accepted">
          <table:source-range-address table:start-column="11" table:start-row="206" table:start-table="0" table:end-column="12" table:end-row="208" table:end-table="0"/>
          <table:target-range-address table:start-column="11" table:start-row="200" table:start-table="0" table:end-column="12" table:end-row="202" table:end-table="0"/>
          <office:change-info>
            <dc:creator>Unknown Author</dc:creator>
            <dc:date>2026-06-09T07:36:46.811527800</dc:date>
          </office:change-info>
          <table:dependencies>
            <table:dependency table:id="ct232"/>
            <table:dependency table:id="ct188"/>
          </table:dependencies>
        </table:movement>
        <table:cell-content-change table:id="ct167" table:acceptance-state="accepted">
          <table:cell-address table:column="9" table:row="210" table:table="0"/>
          <office:change-info>
            <dc:creator>Unknown Author</dc:creator>
            <dc:date>2026-06-09T07:37:37.610783100</dc:date>
          </office:change-info>
          <table:previous>
            <table:change-track-table-cell/>
          </table:previous>
        </table:cell-content-change>
        <table:movement table:id="ct168" table:acceptance-state="accepted">
          <table:source-range-address table:start-column="7" table:start-row="201" table:start-table="0" table:end-column="7" table:end-row="210" table:end-table="0"/>
          <table:target-range-address table:start-column="7" table:start-row="202" table:start-table="0" table:end-column="7" table:end-row="211" table:end-table="0"/>
          <office:change-info>
            <dc:creator>Unknown Author</dc:creator>
            <dc:date>2026-06-09T07:39:20.683894800</dc:date>
          </office:change-info>
          <table:dependencies>
            <table:dependency table:id="ct215"/>
            <table:dependency table:id="ct175"/>
            <table:dependency table:id="ct174"/>
            <table:dependency table:id="ct169"/>
          </table:dependencies>
          <table:deletions>
            <table:cell-content-deletion>
              <table:cell-address table:column="7" table:row="204" table:table="0"/>
              <table:change-track-table-cell office:value-type="string">
                <text:p>注文確認画面　テンプレートファイルの編</text:p>
              </table:change-track-table-cell>
            </table:cell-content-deletion>
            <table:cell-content-deletion>
              <table:cell-address table:column="7" table:row="204" table:table="0"/>
              <table:change-track-table-cell office:value-type="string">
                <text:p>注文確認画面　テンプレートファイルの編</text:p>
              </table:change-track-table-cell>
            </table:cell-content-deletion>
            <table:cell-content-deletion>
              <table:cell-address table:column="7" table:row="206" table:table="0"/>
              <table:change-track-table-cell office:value-type="string">
                <text:p>ご注文の確定ボタン 押下時処理用　コントローラーの編</text:p>
              </table:change-track-table-cell>
            </table:cell-content-deletion>
            <table:cell-content-deletion>
              <table:cell-address table:column="7" table:row="207" table:table="0"/>
              <table:change-track-table-cell office:value-type="string">
                <text:p>注文完了画面 表示処理用　コントローラーの編</text:p>
              </table:change-track-table-cell>
            </table:cell-content-deletion>
            <table:cell-content-deletion>
              <table:cell-address table:column="7" table:row="208" table:table="0"/>
              <table:change-track-table-cell office:value-type="string">
                <text:p>注文完了画面　テンプレートファイルの編</text:p>
              </table:change-track-table-cell>
            </table:cell-content-deletion>
            <table:cell-content-deletion table:id="ct162">
              <table:change-track-table-cell office:value-type="string">
                <text:p>ヘッダーテンプレート　HTMLの編集</text:p>
              </table:change-track-table-cell>
            </table:cell-content-deletion>
            <table:cell-content-deletion table:id="ct159">
              <table:change-track-table-cell office:value-type="string">
                <text:p>クーポン機能・タイムセール機能　動作確認</text:p>
              </table:change-track-table-cell>
            </table:cell-content-deletion>
            <table:cell-content-deletion table:id="ct160">
              <table:change-track-table-cell office:value-type="string">
                <text:p>会員詳細画面　動作確認</text:p>
              </table:change-track-table-cell>
            </table:cell-content-deletion>
            <table:cell-content-deletion table:id="ct146">
              <table:change-track-table-cell office:value-type="string">
                <text:p>注文完了画面　テンプレートファイルの編</text:p>
              </table:change-track-table-cell>
            </table:cell-content-deletion>
            <table:cell-content-deletion table:id="ct143">
              <table:change-track-table-cell office:value-type="string">
                <text:p>注文完了画面 表示処理用　コントローラーの編</text:p>
              </table:change-track-table-cell>
            </table:cell-content-deletion>
            <table:cell-content-deletion table:id="ct137">
              <table:change-track-table-cell office:value-type="string">
                <text:p>ご注文の確定ボタン 押下時処理用　コントローラーの編</text:p>
              </table:change-track-table-cell>
            </table:cell-content-deletion>
            <table:cell-content-deletion table:id="ct135">
              <table:change-track-table-cell office:value-type="string">
                <text:p>注文確認画面　動作確</text:p>
              </table:change-track-table-cell>
            </table:cell-content-deletion>
            <table:cell-content-deletion table:id="ct123">
              <table:change-track-table-cell/>
            </table:cell-content-deletion>
            <table:cell-content-deletion table:id="ct131">
              <table:change-track-table-cell/>
            </table:cell-content-deletion>
            <table:cell-content-deletion table:id="ct134">
              <table:change-track-table-cell office:value-type="string">
                <text:p>注文確認画面 表示処理用　コントローラーの編</text:p>
              </table:change-track-table-cell>
            </table:cell-content-deletion>
          </table:deletions>
        </table:movement>
        <table:cell-content-change table:id="ct169" table:acceptance-state="accepted">
          <table:cell-address table:column="7" table:row="202" table:table="0"/>
          <office:change-info>
            <dc:creator>Unknown Author</dc:creator>
            <dc:date>2026-06-09T07:39:43.206209900</dc:date>
          </office:change-info>
          <table:previous>
            <table:change-track-table-cell/>
          </table:previous>
        </table:cell-content-change>
        <table:cell-content-change table:id="ct170" table:acceptance-state="accepted">
          <table:cell-address table:column="9" table:row="200" table:table="0"/>
          <office:change-info>
            <dc:creator>Unknown Author</dc:creator>
            <dc:date>2026-06-09T07:39:47.7742830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71" table:acceptance-state="accepted">
          <table:cell-address table:column="9" table:row="201" table:table="0"/>
          <office:change-info>
            <dc:creator>Unknown Author</dc:creator>
            <dc:date>2026-06-09T07:39:53.3311280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72" table:acceptance-state="accepted">
          <table:cell-address table:column="9" table:row="202" table:table="0"/>
          <office:change-info>
            <dc:creator>Unknown Author</dc:creator>
            <dc:date>2026-06-09T07:39:53.3311555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73" table:acceptance-state="accepted">
          <table:cell-address table:column="9" table:row="203" table:table="0"/>
          <office:change-info>
            <dc:creator>Unknown Author</dc:creator>
            <dc:date>2026-06-09T07:39:53.3311590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movement table:id="ct174" table:acceptance-state="accepted">
          <table:source-range-address table:start-column="7" table:start-row="201" table:start-table="0" table:end-column="7" table:end-row="211" table:end-table="0"/>
          <table:target-range-address table:start-column="7" table:start-row="202" table:start-table="0" table:end-column="7" table:end-row="212" table:end-table="0"/>
          <office:change-info>
            <dc:creator>Unknown Author</dc:creator>
            <dc:date>2026-06-09T07:40:05.750780000</dc:date>
          </office:change-info>
          <table:dependencies>
            <table:dependency table:id="ct216"/>
            <table:dependency table:id="ct215"/>
            <table:dependency table:id="ct175"/>
          </table:dependencies>
          <table:deletions>
            <table:cell-content-deletion>
              <table:cell-address table:column="7" table:row="204" table:table="0"/>
              <table:change-track-table-cell office:value-type="string">
                <text:p>注文確認画面　テンプレートファイルの編</text:p>
              </table:change-track-table-cell>
            </table:cell-content-deletion>
            <table:cell-content-deletion>
              <table:cell-address table:column="7" table:row="204" table:table="0"/>
              <table:change-track-table-cell office:value-type="string">
                <text:p>注文確認画面　テンプレートファイルの編</text:p>
              </table:change-track-table-cell>
            </table:cell-content-deletion>
            <table:cell-content-deletion>
              <table:cell-address table:column="7" table:row="206" table:table="0"/>
              <table:change-track-table-cell office:value-type="string">
                <text:p>ご注文の確定ボタン 押下時処理用　コントローラーの編</text:p>
              </table:change-track-table-cell>
            </table:cell-content-deletion>
            <table:cell-content-deletion>
              <table:cell-address table:column="7" table:row="207" table:table="0"/>
              <table:change-track-table-cell office:value-type="string">
                <text:p>注文完了画面 表示処理用　コントローラーの編</text:p>
              </table:change-track-table-cell>
            </table:cell-content-deletion>
            <table:cell-content-deletion>
              <table:cell-address table:column="7" table:row="208" table:table="0"/>
              <table:change-track-table-cell office:value-type="string">
                <text:p>注文完了画面　テンプレートファイルの編</text:p>
              </table:change-track-table-cell>
            </table:cell-content-deletion>
            <table:cell-content-deletion>
              <table:cell-address table:column="7" table:row="203" table:table="0"/>
              <table:change-track-table-cell office:value-type="string">
                <text:p>会員詳細画面　動作確認</text:p>
              </table:change-track-table-cell>
            </table:cell-content-deletion>
            <table:cell-content-deletion>
              <table:cell-address table:column="7" table:row="204" table:table="0"/>
              <table:change-track-table-cell office:value-type="string">
                <text:p>注文確認画面 表示処理用　コントローラーの編</text:p>
              </table:change-track-table-cell>
            </table:cell-content-deletion>
            <table:cell-content-deletion>
              <table:cell-address table:column="7" table:row="205" table:table="0"/>
              <table:change-track-table-cell office:value-type="string">
                <text:p>注文確認画面　テンプレートファイルの編</text:p>
              </table:change-track-table-cell>
            </table:cell-content-deletion>
            <table:cell-content-deletion>
              <table:cell-address table:column="7" table:row="206" table:table="0"/>
              <table:change-track-table-cell office:value-type="string">
                <text:p>注文確認画面　動作確</text:p>
              </table:change-track-table-cell>
            </table:cell-content-deletion>
            <table:cell-content-deletion>
              <table:cell-address table:column="7" table:row="207" table:table="0"/>
              <table:change-track-table-cell office:value-type="string">
                <text:p>ご注文の確定ボタン 押下時処理用　コントローラーの編</text:p>
              </table:change-track-table-cell>
            </table:cell-content-deletion>
            <table:cell-content-deletion>
              <table:cell-address table:column="7" table:row="208" table:table="0"/>
              <table:change-track-table-cell office:value-type="string">
                <text:p>注文完了画面 表示処理用　コントローラーの編</text:p>
              </table:change-track-table-cell>
            </table:cell-content-deletion>
            <table:cell-content-deletion>
              <table:cell-address table:column="7" table:row="209" table:table="0"/>
              <table:change-track-table-cell office:value-type="string">
                <text:p>注文完了画面　テンプレートファイルの編</text:p>
              </table:change-track-table-cell>
            </table:cell-content-deletion>
            <table:cell-content-deletion>
              <table:cell-address table:column="7" table:row="210" table:table="0"/>
              <table:change-track-table-cell office:value-type="string">
                <text:p>クーポン機能・タイムセール機能　動作確認</text:p>
              </table:change-track-table-cell>
            </table:cell-content-deletion>
            <table:cell-content-deletion>
              <table:cell-address table:column="7" table:row="212" table:table="0"/>
              <table:change-track-table-cell office:value-type="string">
                <text:p>ヘッダーテンプレート　HTMLの編集</text:p>
              </table:change-track-table-cell>
            </table:cell-content-deletion>
            <table:cell-content-deletion table:id="ct162">
              <table:change-track-table-cell office:value-type="string">
                <text:p>ヘッダーテンプレート　HTMLの編集</text:p>
              </table:change-track-table-cell>
            </table:cell-content-deletion>
            <table:cell-content-deletion table:id="ct159">
              <table:change-track-table-cell office:value-type="string">
                <text:p>クーポン機能・タイムセール機能　動作確認</text:p>
              </table:change-track-table-cell>
            </table:cell-content-deletion>
            <table:cell-content-deletion table:id="ct160">
              <table:change-track-table-cell office:value-type="string">
                <text:p>会員詳細画面　動作確認</text:p>
              </table:change-track-table-cell>
            </table:cell-content-deletion>
            <table:cell-content-deletion table:id="ct157">
              <table:change-track-table-cell office:value-type="string">
                <text:p>会員詳細画面　テンプレートファイルの編</text:p>
              </table:change-track-table-cell>
            </table:cell-content-deletion>
            <table:cell-content-deletion table:id="ct146">
              <table:change-track-table-cell office:value-type="string">
                <text:p>注文完了画面　テンプレートファイルの編</text:p>
              </table:change-track-table-cell>
            </table:cell-content-deletion>
            <table:cell-content-deletion table:id="ct143">
              <table:change-track-table-cell office:value-type="string">
                <text:p>注文完了画面 表示処理用　コントローラーの編</text:p>
              </table:change-track-table-cell>
            </table:cell-content-deletion>
            <table:cell-content-deletion table:id="ct137">
              <table:change-track-table-cell office:value-type="string">
                <text:p>ご注文の確定ボタン 押下時処理用　コントローラーの編</text:p>
              </table:change-track-table-cell>
            </table:cell-content-deletion>
            <table:cell-content-deletion table:id="ct135">
              <table:change-track-table-cell office:value-type="string">
                <text:p>注文確認画面　動作確</text:p>
              </table:change-track-table-cell>
            </table:cell-content-deletion>
            <table:cell-content-deletion table:id="ct123">
              <table:change-track-table-cell/>
            </table:cell-content-deletion>
            <table:cell-content-deletion table:id="ct131">
              <table:change-track-table-cell/>
            </table:cell-content-deletion>
            <table:cell-content-deletion table:id="ct134">
              <table:change-track-table-cell office:value-type="string">
                <text:p>注文確認画面 表示処理用　コントローラーの編</text:p>
              </table:change-track-table-cell>
            </table:cell-content-deletion>
          </table:deletions>
        </table:movement>
        <table:cell-content-change table:id="ct175" table:acceptance-state="accepted">
          <table:cell-address table:column="7" table:row="201" table:table="0"/>
          <office:change-info>
            <dc:creator>Unknown Author</dc:creator>
            <dc:date>2026-06-09T07:40:24.705317900</dc:date>
          </office:change-info>
          <table:previous>
            <table:change-track-table-cell/>
          </table:previous>
        </table:cell-content-change>
        <table:cell-content-change table:id="ct176" table:acceptance-state="accepted">
          <table:cell-address table:column="9" table:row="204" table:table="0"/>
          <office:change-info>
            <dc:creator>Unknown Author</dc:creator>
            <dc:date>2026-06-09T07:40:38.0416213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77" table:acceptance-state="accepted">
          <table:cell-address table:column="9" table:row="197" table:table="0"/>
          <office:change-info>
            <dc:creator>Unknown Author</dc:creator>
            <dc:date>2026-06-09T07:55:27.3688475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78" table:acceptance-state="accepted">
          <table:cell-address table:column="9" table:row="198" table:table="0"/>
          <office:change-info>
            <dc:creator>Unknown Author</dc:creator>
            <dc:date>2026-06-09T07:55:31.8073439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79" table:acceptance-state="accepted">
          <table:cell-address table:column="9" table:row="199" table:table="0"/>
          <office:change-info>
            <dc:creator>Unknown Author</dc:creator>
            <dc:date>2026-06-09T07:55:36.2954691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80" table:acceptance-state="accepted">
          <table:cell-address table:column="9" table:row="205" table:table="0"/>
          <office:change-info>
            <dc:creator>Unknown Author</dc:creator>
            <dc:date>2026-06-09T07:56:10.9183085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81" table:acceptance-state="accepted">
          <table:cell-address table:column="9" table:row="206" table:table="0"/>
          <office:change-info>
            <dc:creator>Unknown Author</dc:creator>
            <dc:date>2026-06-09T07:56:23.9117255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82" table:acceptance-state="accepted">
          <table:cell-address table:column="6" table:row="214" table:table="0"/>
          <office:change-info>
            <dc:creator>Unknown Author</dc:creator>
            <dc:date>2026-06-09T07:56:45.483620300</dc:date>
          </office:change-info>
          <table:previous>
            <table:change-track-table-cell table:cell-address="WBS.G215" table:formula="of:=IF([.$H204]=&quot;&quot;;&quot;&quot;;IF([.$G213]=&quot;&quot;;1;[.$G213]+1))" office:value-type="float" office:value="17"/>
          </table:previous>
        </table:cell-content-change>
        <table:cell-content-change table:id="ct183" table:acceptance-state="accepted">
          <table:cell-address table:column="6" table:row="215" table:table="0"/>
          <office:change-info>
            <dc:creator>Unknown Author</dc:creator>
            <dc:date>2026-06-09T07:56:45.483667800</dc:date>
          </office:change-info>
          <table:previous>
            <table:change-track-table-cell table:cell-address="WBS.G216" table:formula="of:=IF([.$H205]=&quot;&quot;;&quot;&quot;;IF([.$G215]=&quot;&quot;;1;[.$G215]+1))" office:value-type="float" office:value="1"/>
          </table:previous>
        </table:cell-content-change>
        <table:cell-content-change table:id="ct184" table:acceptance-state="accepted">
          <table:cell-address table:column="9" table:row="206" table:table="0"/>
          <office:change-info>
            <dc:creator>Unknown Author</dc:creator>
            <dc:date>2026-06-09T07:57:06.942326600</dc:date>
          </office:change-info>
          <table:previous table:id="ct181">
            <table:change-track-table-cell/>
          </table:previous>
        </table:cell-content-change>
        <table:cell-content-change table:id="ct185" table:acceptance-state="accepted">
          <table:cell-address table:column="9" table:row="207" table:table="0"/>
          <office:change-info>
            <dc:creator>Unknown Author</dc:creator>
            <dc:date>2026-06-09T07:57:11.220942000</dc:date>
          </office:change-info>
          <table:previous>
            <table:change-track-table-cell/>
          </table:previous>
        </table:cell-content-change>
        <table:cell-content-change table:id="ct186" table:acceptance-state="accepted">
          <table:cell-address table:column="9" table:row="210" table:table="0"/>
          <office:change-info>
            <dc:creator>Unknown Author</dc:creator>
            <dc:date>2026-06-09T07:59:19.057563900</dc:date>
          </office:change-info>
          <table:previous table:id="ct167">
            <table:change-track-table-cell office:value-type="string">
              <text:p>上田</text:p>
            </table:change-track-table-cell>
          </table:previous>
        </table:cell-content-change>
        <table:cell-content-change table:id="ct187" table:acceptance-state="accepted">
          <table:cell-address table:column="12" table:row="205" table:table="0"/>
          <office:change-info>
            <dc:creator>Unknown Author</dc:creator>
            <dc:date>2026-06-09T07:59:45.182360200</dc:date>
          </office:change-info>
          <table:previous>
            <table:change-track-table-cell office:value-type="float" office:value="46183"/>
          </table:previous>
        </table:cell-content-change>
        <table:cell-content-change table:id="ct188" table:acceptance-state="accepted">
          <table:cell-address table:column="12" table:row="206" table:table="0"/>
          <office:change-info>
            <dc:creator>Unknown Author</dc:creator>
            <dc:date>2026-06-09T08:00:06.682975700</dc:date>
          </office:change-info>
          <table:previous>
            <table:change-track-table-cell office:value-type="float" office:value="46183"/>
          </table:previous>
        </table:cell-content-change>
        <table:cell-content-change table:id="ct189" table:acceptance-state="accepted">
          <table:cell-address table:column="6" table:row="2" table:table="0"/>
          <office:change-info>
            <dc:creator>Unknown Author</dc:creator>
            <dc:date>2026-06-09T08:03:07.758326100</dc:date>
          </office:change-info>
          <table:previous>
            <table:change-track-table-cell/>
          </table:previous>
        </table:cell-content-change>
        <table:cell-content-change table:id="ct190" table:acceptance-state="accepted">
          <table:cell-address table:column="16" table:row="66" table:table="0"/>
          <office:change-info>
            <dc:creator>Unknown Author</dc:creator>
            <dc:date>2026-06-09T08:09:28.336946300</dc:date>
          </office:change-info>
          <table:previous>
            <table:change-track-table-cell office:value-type="float" office:value="0"/>
          </table:previous>
        </table:cell-content-change>
        <table:cell-content-change table:id="ct191" table:acceptance-state="accepted">
          <table:cell-address table:column="16" table:row="72" table:table="0"/>
          <office:change-info>
            <dc:creator>Unknown Author</dc:creator>
            <dc:date>2026-06-09T08:10:00.336876300</dc:date>
          </office:change-info>
          <table:previous>
            <table:change-track-table-cell office:value-type="float" office:value="0"/>
          </table:previous>
        </table:cell-content-change>
        <table:cell-content-change table:id="ct192" table:acceptance-state="accepted">
          <table:cell-address table:column="16" table:row="68" table:table="0"/>
          <office:change-info>
            <dc:creator>Unknown Author</dc:creator>
            <dc:date>2026-06-09T08:10:04.819187400</dc:date>
          </office:change-info>
          <table:previous>
            <table:change-track-table-cell office:value-type="float" office:value="0"/>
          </table:previous>
        </table:cell-content-change>
        <table:cell-content-change table:id="ct193" table:acceptance-state="accepted">
          <table:cell-address table:column="16" table:row="69" table:table="0"/>
          <office:change-info>
            <dc:creator>Unknown Author</dc:creator>
            <dc:date>2026-06-09T08:10:04.819206100</dc:date>
          </office:change-info>
          <table:previous>
            <table:change-track-table-cell office:value-type="float" office:value="0"/>
          </table:previous>
        </table:cell-content-change>
        <table:cell-content-change table:id="ct194" table:acceptance-state="accepted">
          <table:cell-address table:column="16" table:row="70" table:table="0"/>
          <office:change-info>
            <dc:creator>Unknown Author</dc:creator>
            <dc:date>2026-06-09T08:10:04.819210700</dc:date>
          </office:change-info>
          <table:previous>
            <table:change-track-table-cell office:value-type="float" office:value="0"/>
          </table:previous>
        </table:cell-content-change>
        <table:cell-content-change table:id="ct195" table:acceptance-state="accepted">
          <table:cell-address table:column="16" table:row="71" table:table="0"/>
          <office:change-info>
            <dc:creator>Unknown Author</dc:creator>
            <dc:date>2026-06-09T08:10:04.819214400</dc:date>
          </office:change-info>
          <table:previous>
            <table:change-track-table-cell office:value-type="float" office:value="0"/>
          </table:previous>
        </table:cell-content-change>
        <table:cell-content-change table:id="ct196" table:acceptance-state="accepted">
          <table:cell-address table:column="16" table:row="60" table:table="0"/>
          <office:change-info>
            <dc:creator>Unknown Author</dc:creator>
            <dc:date>2026-06-09T08:12:16.731038200</dc:date>
          </office:change-info>
          <table:previous>
            <table:change-track-table-cell office:value-type="float" office:value="0"/>
          </table:previous>
        </table:cell-content-change>
        <table:cell-content-change table:id="ct197" table:acceptance-state="accepted">
          <table:cell-address table:column="16" table:row="54" table:table="0"/>
          <office:change-info>
            <dc:creator>Unknown Author</dc:creator>
            <dc:date>2026-06-09T08:12:37.297761300</dc:date>
          </office:change-info>
          <table:previous>
            <table:change-track-table-cell office:value-type="float" office:value="0"/>
          </table:previous>
        </table:cell-content-change>
        <table:cell-content-change table:id="ct198" table:acceptance-state="accepted">
          <table:cell-address table:column="16" table:row="55" table:table="0"/>
          <office:change-info>
            <dc:creator>Unknown Author</dc:creator>
            <dc:date>2026-06-09T08:12:37.297777400</dc:date>
          </office:change-info>
          <table:previous>
            <table:change-track-table-cell office:value-type="float" office:value="0"/>
          </table:previous>
        </table:cell-content-change>
        <table:cell-content-change table:id="ct199" table:acceptance-state="accepted">
          <table:cell-address table:column="16" table:row="56" table:table="0"/>
          <office:change-info>
            <dc:creator>Unknown Author</dc:creator>
            <dc:date>2026-06-09T08:12:37.297781000</dc:date>
          </office:change-info>
          <table:previous>
            <table:change-track-table-cell office:value-type="float" office:value="0"/>
          </table:previous>
        </table:cell-content-change>
        <table:cell-content-change table:id="ct200" table:acceptance-state="accepted">
          <table:cell-address table:column="16" table:row="57" table:table="0"/>
          <office:change-info>
            <dc:creator>Unknown Author</dc:creator>
            <dc:date>2026-06-09T08:12:37.297783400</dc:date>
          </office:change-info>
          <table:previous>
            <table:change-track-table-cell office:value-type="float" office:value="0"/>
          </table:previous>
        </table:cell-content-change>
        <table:cell-content-change table:id="ct201" table:acceptance-state="accepted">
          <table:cell-address table:column="16" table:row="58" table:table="0"/>
          <office:change-info>
            <dc:creator>Unknown Author</dc:creator>
            <dc:date>2026-06-09T08:12:37.297785800</dc:date>
          </office:change-info>
          <table:previous>
            <table:change-track-table-cell office:value-type="float" office:value="0"/>
          </table:previous>
        </table:cell-content-change>
        <table:cell-content-change table:id="ct202" table:acceptance-state="accepted">
          <table:cell-address table:column="14" table:row="41" table:table="0"/>
          <office:change-info>
            <dc:creator>Unknown Author</dc:creator>
            <dc:date>2026-06-09T08:14:20.908930100</dc:date>
          </office:change-info>
          <table:previous>
            <table:change-track-table-cell office:value-type="float" office:value="46176"/>
          </table:previous>
        </table:cell-content-change>
        <table:cell-content-change table:id="ct203" table:acceptance-state="accepted">
          <table:cell-address table:column="14" table:row="105" table:table="0"/>
          <office:change-info>
            <dc:creator>Unknown Author</dc:creator>
            <dc:date>2026-06-09T08:21:03.834652400</dc:date>
          </office:change-info>
          <table:previous table:id="ct70">
            <table:change-track-table-cell office:value-type="float" office:value="46181"/>
          </table:previous>
        </table:cell-content-change>
        <table:cell-content-change table:id="ct204" table:acceptance-state="accepted">
          <table:cell-address table:column="16" table:row="105" table:table="0"/>
          <office:change-info>
            <dc:creator>Unknown Author</dc:creator>
            <dc:date>2026-06-09T08:21:08.839652300</dc:date>
          </office:change-info>
          <table:previous>
            <table:change-track-table-cell office:value-type="float" office:value="0"/>
          </table:previous>
        </table:cell-content-change>
        <table:cell-content-change table:id="ct205" table:acceptance-state="accepted">
          <table:cell-address table:column="14" table:row="105" table:table="0"/>
          <office:change-info>
            <dc:creator>Unknown Author</dc:creator>
            <dc:date>2026-06-09T08:23:12.510942600</dc:date>
          </office:change-info>
          <table:previous table:id="ct203">
            <table:change-track-table-cell office:value-type="float" office:value="46182"/>
          </table:previous>
        </table:cell-content-change>
        <table:cell-content-change table:id="ct206" table:acceptance-state="accepted">
          <table:cell-address table:column="12" table:row="197" table:table="0"/>
          <office:change-info>
            <dc:creator>Unknown Author</dc:creator>
            <dc:date>2026-06-09T08:41:11.908247800</dc:date>
          </office:change-info>
          <table:previous table:id="ct141">
            <table:change-track-table-cell office:value-type="float" office:value="46184"/>
          </table:previous>
        </table:cell-content-change>
        <table:cell-content-change table:id="ct207" table:acceptance-state="accepted">
          <table:cell-address table:column="12" table:row="198" table:table="0"/>
          <office:change-info>
            <dc:creator>Unknown Author</dc:creator>
            <dc:date>2026-06-09T08:41:15.907126400</dc:date>
          </office:change-info>
          <table:previous>
            <table:change-track-table-cell office:value-type="float" office:value="46184"/>
          </table:previous>
        </table:cell-content-change>
        <table:cell-content-change table:id="ct208" table:acceptance-state="accepted">
          <table:cell-address table:column="12" table:row="199" table:table="0"/>
          <office:change-info>
            <dc:creator>Unknown Author</dc:creator>
            <dc:date>2026-06-09T08:41:15.907165000</dc:date>
          </office:change-info>
          <table:previous>
            <table:change-track-table-cell office:value-type="float" office:value="46184"/>
          </table:previous>
        </table:cell-content-change>
        <table:cell-content-change table:id="ct209" table:acceptance-state="accepted">
          <table:cell-address table:column="12" table:row="196" table:table="0"/>
          <office:change-info>
            <dc:creator>Unknown Author</dc:creator>
            <dc:date>2026-06-09T08:43:14.139264700</dc:date>
          </office:change-info>
          <table:previous table:id="ct140">
            <table:change-track-table-cell office:value-type="float" office:value="46183"/>
          </table:previous>
        </table:cell-content-change>
        <table:cell-content-change table:id="ct210" table:acceptance-state="accepted">
          <table:cell-address table:column="12" table:row="200" table:table="0"/>
          <office:change-info>
            <dc:creator>Unknown Author</dc:creator>
            <dc:date>2026-06-09T08:43:30.443245400</dc:date>
          </office:change-info>
          <table:previous>
            <table:change-track-table-cell office:value-type="float" office:value="46184"/>
          </table:previous>
        </table:cell-content-change>
        <table:cell-content-change table:id="ct211" table:acceptance-state="accepted">
          <table:cell-address table:column="12" table:row="201" table:table="0"/>
          <office:change-info>
            <dc:creator>Unknown Author</dc:creator>
            <dc:date>2026-06-09T08:43:34.816774100</dc:date>
          </office:change-info>
          <table:previous>
            <table:change-track-table-cell office:value-type="float" office:value="46184"/>
          </table:previous>
        </table:cell-content-change>
        <table:cell-content-change table:id="ct212" table:acceptance-state="accepted">
          <table:cell-address table:column="12" table:row="202" table:table="0"/>
          <office:change-info>
            <dc:creator>Unknown Author</dc:creator>
            <dc:date>2026-06-09T08:43:34.816854600</dc:date>
          </office:change-info>
          <table:previous>
            <table:change-track-table-cell office:value-type="float" office:value="46184"/>
          </table:previous>
        </table:cell-content-change>
        <table:cell-content-change table:id="ct213" table:acceptance-state="accepted">
          <table:cell-address table:column="12" table:row="203" table:table="0"/>
          <office:change-info>
            <dc:creator>Unknown Author</dc:creator>
            <dc:date>2026-06-09T08:43:34.816894200</dc:date>
          </office:change-info>
          <table:previous>
            <table:change-track-table-cell office:value-type="float" office:value="46184"/>
          </table:previous>
        </table:cell-content-change>
        <table:cell-content-change table:id="ct214" table:acceptance-state="accepted">
          <table:cell-address table:column="12" table:row="204" table:table="0"/>
          <office:change-info>
            <dc:creator>Unknown Author</dc:creator>
            <dc:date>2026-06-09T08:43:34.816929200</dc:date>
          </office:change-info>
          <table:previous>
            <table:change-track-table-cell office:value-type="float" office:value="46184"/>
          </table:previous>
        </table:cell-content-change>
        <table:movement table:id="ct215" table:acceptance-state="accepted">
          <table:source-range-address table:column="7" table:row="211" table:table="0"/>
          <table:target-range-address table:column="7" table:row="214" table:table="0"/>
          <office:change-info>
            <dc:creator>Unknown Author</dc:creator>
            <dc:date>2026-06-09T08:43:59.684320100</dc:date>
          </office:change-info>
          <table:dependencies>
            <table:dependency table:id="ct261"/>
            <table:dependency table:id="ct216"/>
          </table:dependencies>
        </table:movement>
        <table:movement table:id="ct216" table:acceptance-state="accepted">
          <table:source-range-address table:start-column="7" table:start-row="212" table:start-table="0" table:end-column="7" table:end-row="214" table:end-table="0"/>
          <table:target-range-address table:start-column="7" table:start-row="211" table:start-table="0" table:end-column="7" table:end-row="212" table:end-table="0"/>
          <office:change-info>
            <dc:creator>Unknown Author</dc:creator>
            <dc:date>2026-06-09T08:44:05.890438000</dc:date>
          </office:change-info>
          <table:dependencies>
            <table:dependency table:id="ct299"/>
            <table:dependency table:id="ct257"/>
          </table:dependencies>
          <table:deletions>
            <table:cell-content-deletion>
              <table:cell-address table:column="7" table:row="212" table:table="0"/>
              <table:change-track-table-cell office:value-type="string">
                <text:p>ヘッダーテンプレート　HTMLの編集</text:p>
              </table:change-track-table-cell>
            </table:cell-content-deletion>
          </table:deletions>
        </table:movement>
        <table:cell-content-change table:id="ct217" table:acceptance-state="accepted">
          <table:cell-address table:column="9" table:row="212" table:table="0"/>
          <office:change-info>
            <dc:creator>Unknown Author</dc:creator>
            <dc:date>2026-06-09T08:44:16.216384600</dc:date>
          </office:change-info>
          <table:previous>
            <table:change-track-table-cell/>
          </table:previous>
        </table:cell-content-change>
        <table:cell-content-change table:id="ct218" table:acceptance-state="accepted">
          <table:cell-address table:column="12" table:row="212" table:table="0"/>
          <office:change-info>
            <dc:creator>Unknown Author</dc:creator>
            <dc:date>2026-06-09T08:45:26.422017700</dc:date>
          </office:change-info>
          <table:previous>
            <table:change-track-table-cell office:value-type="float" office:value="46186"/>
          </table:previous>
        </table:cell-content-change>
        <table:cell-content-change table:id="ct219" table:acceptance-state="accepted">
          <table:cell-address table:column="13" table:row="93" table:table="0"/>
          <office:change-info>
            <dc:creator>Unknown Author</dc:creator>
            <dc:date>2026-06-10T06:25:54.595644400</dc:date>
          </office:change-info>
          <table:previous>
            <table:change-track-table-cell/>
          </table:previous>
        </table:cell-content-change>
        <table:cell-content-change table:id="ct220" table:acceptance-state="accepted">
          <table:cell-address table:column="13" table:row="93" table:table="0"/>
          <office:change-info>
            <dc:creator>Unknown Author</dc:creator>
            <dc:date>2026-06-10T06:26:03.103040200</dc:date>
          </office:change-info>
          <table:previous table:id="ct219">
            <table:change-track-table-cell office:value-type="string">
              <text:p>2626/0610</text:p>
            </table:change-track-table-cell>
          </table:previous>
        </table:cell-content-change>
        <table:cell-content-change table:id="ct221" table:acceptance-state="accepted">
          <table:cell-address table:column="16" table:row="90" table:table="0"/>
          <office:change-info>
            <dc:creator>Unknown Author</dc:creator>
            <dc:date>2026-06-10T06:28:42.187650400</dc:date>
          </office:change-info>
          <table:previous>
            <table:change-track-table-cell office:value-type="float" office:value="0"/>
          </table:previous>
        </table:cell-content-change>
        <table:cell-content-change table:id="ct222" table:acceptance-state="accepted">
          <table:cell-address table:column="16" table:row="91" table:table="0"/>
          <office:change-info>
            <dc:creator>Unknown Author</dc:creator>
            <dc:date>2026-06-10T06:28:42.187661200</dc:date>
          </office:change-info>
          <table:previous>
            <table:change-track-table-cell office:value-type="float" office:value="0"/>
          </table:previous>
        </table:cell-content-change>
        <table:cell-content-change table:id="ct223" table:acceptance-state="accepted">
          <table:cell-address table:column="16" table:row="92" table:table="0"/>
          <office:change-info>
            <dc:creator>Unknown Author</dc:creator>
            <dc:date>2026-06-10T06:28:42.187664200</dc:date>
          </office:change-info>
          <table:previous>
            <table:change-track-table-cell office:value-type="float" office:value="0"/>
          </table:previous>
        </table:cell-content-change>
        <table:cell-content-change table:id="ct224" table:acceptance-state="accepted">
          <table:cell-address table:column="16" table:row="93" table:table="0"/>
          <office:change-info>
            <dc:creator>Unknown Author</dc:creator>
            <dc:date>2026-06-10T06:28:42.187666500</dc:date>
          </office:change-info>
          <table:previous>
            <table:change-track-table-cell office:value-type="float" office:value="0"/>
          </table:previous>
        </table:cell-content-change>
        <table:cell-content-change table:id="ct225" table:acceptance-state="accepted">
          <table:cell-address table:column="16" table:row="95" table:table="0"/>
          <office:change-info>
            <dc:creator>Unknown Author</dc:creator>
            <dc:date>2026-06-10T06:28:48.039499700</dc:date>
          </office:change-info>
          <table:previous>
            <table:change-track-table-cell office:value-type="float" office:value="0"/>
          </table:previous>
        </table:cell-content-change>
        <table:cell-content-change table:id="ct226" table:acceptance-state="accepted">
          <table:cell-address table:column="16" table:row="97" table:table="0"/>
          <office:change-info>
            <dc:creator>Unknown Author</dc:creator>
            <dc:date>2026-06-10T06:29:05.191359600</dc:date>
          </office:change-info>
          <table:previous>
            <table:change-track-table-cell office:value-type="float" office:value="0"/>
          </table:previous>
        </table:cell-content-change>
        <table:cell-content-change table:id="ct227" table:acceptance-state="accepted">
          <table:cell-address table:column="16" table:row="98" table:table="0"/>
          <office:change-info>
            <dc:creator>Unknown Author</dc:creator>
            <dc:date>2026-06-10T06:29:08.123550700</dc:date>
          </office:change-info>
          <table:previous>
            <table:change-track-table-cell office:value-type="float" office:value="0"/>
          </table:previous>
        </table:cell-content-change>
        <table:cell-content-change table:id="ct228" table:acceptance-state="accepted">
          <table:cell-address table:column="16" table:row="100" table:table="0"/>
          <office:change-info>
            <dc:creator>Unknown Author</dc:creator>
            <dc:date>2026-06-10T06:29:10.835691100</dc:date>
          </office:change-info>
          <table:previous>
            <table:change-track-table-cell office:value-type="float" office:value="0"/>
          </table:previous>
        </table:cell-content-change>
        <table:cell-content-change table:id="ct229" table:acceptance-state="accepted">
          <table:cell-address table:column="16" table:row="124" table:table="0"/>
          <office:change-info>
            <dc:creator>Unknown Author</dc:creator>
            <dc:date>2026-06-10T06:32:41.351118100</dc:date>
          </office:change-info>
          <table:previous>
            <table:change-track-table-cell/>
          </table:previous>
        </table:cell-content-change>
        <table:cell-content-change table:id="ct230" table:acceptance-state="accepted">
          <table:cell-address table:column="16" table:row="125" table:table="0"/>
          <office:change-info>
            <dc:creator>Unknown Author</dc:creator>
            <dc:date>2026-06-10T06:32:41.351131300</dc:date>
          </office:change-info>
          <table:previous>
            <table:change-track-table-cell/>
          </table:previous>
        </table:cell-content-change>
        <table:cell-content-change table:id="ct231" table:acceptance-state="accepted">
          <table:cell-address table:column="17" table:row="2" table:table="0"/>
          <office:change-info>
            <dc:creator>Unknown Author</dc:creator>
            <dc:date>2026-06-10T06:36:29.894177900</dc:date>
          </office:change-info>
          <table:previous>
            <table:change-track-table-cell/>
          </table:previous>
        </table:cell-content-change>
        <table:cell-content-change table:id="ct232" table:acceptance-state="accepted">
          <table:cell-address table:column="11" table:row="207" table:table="0"/>
          <office:change-info>
            <dc:creator>Unknown Author</dc:creator>
            <dc:date>2026-06-10T06:37:02.250878400</dc:date>
          </office:change-info>
          <table:previous>
            <table:change-track-table-cell office:value-type="float" office:value="46183"/>
          </table:previous>
        </table:cell-content-change>
        <table:cell-content-change table:id="ct233" table:acceptance-state="accepted">
          <table:cell-address table:column="15" table:row="258" table:table="0"/>
          <office:change-info>
            <dc:creator>Unknown Author</dc:creator>
            <dc:date>2026-06-10T06:37:43.794464500</dc:date>
          </office:change-info>
          <table:previous>
            <table:change-track-table-cell table:cell-address="WBS.P259" table:formula="of:=IF([.$L259]&lt;&gt;&quot;&quot;;NETWORKDAYS([.$L259];[.$M259];[$休日.$B$4:.$B$304]);&quot;&quot;)" office:value-type="float" office:value="1"/>
          </table:previous>
        </table:cell-content-change>
        <table:cell-content-change table:id="ct234" table:acceptance-state="accepted">
          <table:cell-address table:column="17" table:row="2" table:table="0"/>
          <office:change-info>
            <dc:creator>Unknown Author</dc:creator>
            <dc:date>2026-06-10T06:39:06.180892900</dc:date>
          </office:change-info>
          <table:previous table:id="ct231">
            <table:change-track-table-cell table:cell-address="WBS.R3" table:formula="of:=COUNTIF()" office:value-type="float" office:value="0"/>
          </table:previous>
        </table:cell-content-change>
        <table:cell-content-change table:id="ct235" table:acceptance-state="accepted">
          <table:cell-address table:column="17" table:row="2" table:table="0"/>
          <office:change-info>
            <dc:creator>Unknown Author</dc:creator>
            <dc:date>2026-06-10T06:41:13.170191000</dc:date>
          </office:change-info>
          <table:previous table:id="ct234">
            <table:change-track-table-cell table:cell-address="WBS.R3" table:formula="of:=COUNTIF([.P:.P]:!null)" office:value-type="float" office:value="0"/>
          </table:previous>
        </table:cell-content-change>
        <table:cell-content-change table:id="ct236" table:acceptance-state="accepted">
          <table:cell-address table:column="17" table:row="2" table:table="0"/>
          <office:change-info>
            <dc:creator>Unknown Author</dc:creator>
            <dc:date>2026-06-10T06:41:45.476728200</dc:date>
          </office:change-info>
          <table:previous table:id="ct235">
            <table:change-track-table-cell table:cell-address="WBS.R3" table:formula="of:=COUNTIF([.P:.P]:&gt;0)" office:value-type="float" office:value="0"/>
          </table:previous>
        </table:cell-content-change>
        <table:cell-content-change table:id="ct237" table:acceptance-state="accepted">
          <table:cell-address table:column="17" table:row="2" table:table="0"/>
          <office:change-info>
            <dc:creator>Unknown Author</dc:creator>
            <dc:date>2026-06-10T06:43:15.035628400</dc:date>
          </office:change-info>
          <table:previous table:id="ct236">
            <table:change-track-table-cell table:cell-address="WBS.R3" table:formula="of:=COUNTIF([.P:.P];&gt;0)" office:value-type="float" office:value="0"/>
          </table:previous>
        </table:cell-content-change>
        <table:cell-content-change table:id="ct238" table:acceptance-state="accepted">
          <table:cell-address table:column="15" table:row="2" table:table="0"/>
          <office:change-info>
            <dc:creator>Unknown Author</dc:creator>
            <dc:date>2026-06-10T06:43:38.678200400</dc:date>
          </office:change-info>
          <table:previous>
            <table:change-track-table-cell/>
          </table:previous>
        </table:cell-content-change>
        <table:cell-content-change table:id="ct239" table:acceptance-state="accepted">
          <table:cell-address table:column="16" table:row="152" table:table="0"/>
          <office:change-info>
            <dc:creator>Unknown Author</dc:creator>
            <dc:date>2026-06-11T06:33:14.483780700</dc:date>
          </office:change-info>
          <table:previous>
            <table:change-track-table-cell/>
          </table:previous>
        </table:cell-content-change>
        <table:cell-content-change table:id="ct240" table:acceptance-state="accepted">
          <table:cell-address table:column="13" table:row="197" table:table="0"/>
          <office:change-info>
            <dc:creator>Unknown Author</dc:creator>
            <dc:date>2026-06-11T06:34:45.925971800</dc:date>
          </office:change-info>
          <table:previous>
            <table:change-track-table-cell office:value-type="float" office:value="265328"/>
          </table:previous>
        </table:cell-content-change>
        <table:cell-content-change table:id="ct241" table:acceptance-state="accepted">
          <table:cell-address table:column="9" table:row="197" table:table="0"/>
          <office:change-info>
            <dc:creator>Unknown Author</dc:creator>
            <dc:date>2026-06-11T06:36:20.723038900</dc:date>
          </office:change-info>
          <table:previous table:id="ct177">
            <table:change-track-table-cell office:value-type="string">
              <text:p>伊藤</text:p>
            </table:change-track-table-cell>
          </table:previous>
        </table:cell-content-change>
        <table:cell-content-change table:id="ct242" table:acceptance-state="accepted">
          <table:cell-address table:column="9" table:row="198" table:table="0"/>
          <office:change-info>
            <dc:creator>Unknown Author</dc:creator>
            <dc:date>2026-06-11T06:36:25.413193300</dc:date>
          </office:change-info>
          <table:previous table:id="ct178">
            <table:change-track-table-cell office:value-type="string">
              <text:p>伊藤</text:p>
            </table:change-track-table-cell>
          </table:previous>
        </table:cell-content-change>
        <table:cell-content-change table:id="ct243" table:acceptance-state="accepted">
          <table:cell-address table:column="9" table:row="199" table:table="0"/>
          <office:change-info>
            <dc:creator>Unknown Author</dc:creator>
            <dc:date>2026-06-11T06:36:25.413203900</dc:date>
          </office:change-info>
          <table:previous table:id="ct179">
            <table:change-track-table-cell office:value-type="string">
              <text:p>伊藤</text:p>
            </table:change-track-table-cell>
          </table:previous>
        </table:cell-content-change>
        <table:cell-content-change table:id="ct244" table:acceptance-state="accepted">
          <table:cell-address table:column="9" table:row="206" table:table="0"/>
          <office:change-info>
            <dc:creator>Unknown Author</dc:creator>
            <dc:date>2026-06-11T06:36:34.968125900</dc:date>
          </office:change-info>
          <table:previous table:id="ct184">
            <table:change-track-table-cell office:value-type="string">
              <text:p>伊藤</text:p>
            </table:change-track-table-cell>
          </table:previous>
        </table:cell-content-change>
        <table:cell-content-change table:id="ct245" table:acceptance-state="accepted">
          <table:cell-address table:column="13" table:row="230" table:table="0"/>
          <office:change-info>
            <dc:creator>Unknown Author</dc:creator>
            <dc:date>2026-06-11T06:38:58.879667500</dc:date>
          </office:change-info>
          <table:previous>
            <table:change-track-table-cell office:value-type="string">
              <text:p>上田</text:p>
            </table:change-track-table-cell>
          </table:previous>
        </table:cell-content-change>
        <table:cell-content-change table:id="ct246" table:acceptance-state="accepted">
          <table:cell-address table:column="13" table:row="231" table:table="0"/>
          <office:change-info>
            <dc:creator>Unknown Author</dc:creator>
            <dc:date>2026-06-11T06:38:58.879694300</dc:date>
          </office:change-info>
          <table:previous>
            <table:change-track-table-cell office:value-type="string">
              <text:p>上田</text:p>
            </table:change-track-table-cell>
          </table:previous>
        </table:cell-content-change>
        <table:cell-content-change table:id="ct247" table:acceptance-state="accepted">
          <table:cell-address table:column="13" table:row="232" table:table="0"/>
          <office:change-info>
            <dc:creator>Unknown Author</dc:creator>
            <dc:date>2026-06-11T06:38:58.879704000</dc:date>
          </office:change-info>
          <table:previous>
            <table:change-track-table-cell office:value-type="string">
              <text:p>上田</text:p>
            </table:change-track-table-cell>
          </table:previous>
        </table:cell-content-change>
        <table:cell-content-change table:id="ct248" table:acceptance-state="accepted">
          <table:cell-address table:column="13" table:row="233" table:table="0"/>
          <office:change-info>
            <dc:creator>Unknown Author</dc:creator>
            <dc:date>2026-06-11T06:38:58.879712100</dc:date>
          </office:change-info>
          <table:previous>
            <table:change-track-table-cell office:value-type="string">
              <text:p>上田</text:p>
            </table:change-track-table-cell>
          </table:previous>
        </table:cell-content-change>
        <table:cell-content-change table:id="ct249" table:acceptance-state="accepted">
          <table:cell-address table:column="16" table:row="230" table:table="0"/>
          <office:change-info>
            <dc:creator>Unknown Author</dc:creator>
            <dc:date>2026-06-11T06:41:27.729150700</dc:date>
          </office:change-info>
          <table:previous>
            <table:change-track-table-cell office:value-type="float" office:value="0"/>
          </table:previous>
        </table:cell-content-change>
        <table:cell-content-change table:id="ct250" table:acceptance-state="accepted">
          <table:cell-address table:column="16" table:row="231" table:table="0"/>
          <office:change-info>
            <dc:creator>Unknown Author</dc:creator>
            <dc:date>2026-06-11T06:41:31.496904100</dc:date>
          </office:change-info>
          <table:previous>
            <table:change-track-table-cell office:value-type="float" office:value="0"/>
          </table:previous>
        </table:cell-content-change>
        <table:cell-content-change table:id="ct251" table:acceptance-state="accepted">
          <table:cell-address table:column="9" table:row="230" table:table="0"/>
          <office:change-info>
            <dc:creator>Unknown Author</dc:creator>
            <dc:date>2026-06-11T06:45:35.527149800</dc:date>
          </office:change-info>
          <table:previous>
            <table:change-track-table-cell office:value-type="string">
              <text:p>全員</text:p>
            </table:change-track-table-cell>
          </table:previous>
        </table:cell-content-change>
        <table:cell-content-change table:id="ct252" table:acceptance-state="accepted">
          <table:cell-address table:column="9" table:row="231" table:table="0"/>
          <office:change-info>
            <dc:creator>Unknown Author</dc:creator>
            <dc:date>2026-06-11T06:45:45.586697800</dc:date>
          </office:change-info>
          <table:previous>
            <table:change-track-table-cell office:value-type="string">
              <text:p>全員</text:p>
            </table:change-track-table-cell>
          </table:previous>
        </table:cell-content-change>
        <table:cell-content-change table:id="ct253" table:acceptance-state="accepted">
          <table:cell-address table:column="9" table:row="232" table:table="0"/>
          <office:change-info>
            <dc:creator>Unknown Author</dc:creator>
            <dc:date>2026-06-11T06:45:45.586724600</dc:date>
          </office:change-info>
          <table:previous>
            <table:change-track-table-cell office:value-type="string">
              <text:p>全員</text:p>
            </table:change-track-table-cell>
          </table:previous>
        </table:cell-content-change>
        <table:cell-content-change table:id="ct254" table:acceptance-state="accepted">
          <table:cell-address table:column="9" table:row="254" table:table="0"/>
          <office:change-info>
            <dc:creator>Unknown Author</dc:creator>
            <dc:date>2026-06-11T06:45:53.628296500</dc:date>
          </office:change-info>
          <table:previous>
            <table:change-track-table-cell office:value-type="string">
              <text:p>全員</text:p>
            </table:change-track-table-cell>
          </table:previous>
        </table:cell-content-change>
        <table:cell-content-change table:id="ct255" table:acceptance-state="accepted">
          <table:cell-address table:column="9" table:row="255" table:table="0"/>
          <office:change-info>
            <dc:creator>Unknown Author</dc:creator>
            <dc:date>2026-06-11T06:46:00.730581800</dc:date>
          </office:change-info>
          <table:previous>
            <table:change-track-table-cell office:value-type="string">
              <text:p>全員</text:p>
            </table:change-track-table-cell>
          </table:previous>
        </table:cell-content-change>
        <table:cell-content-change table:id="ct256" table:acceptance-state="accepted">
          <table:cell-address table:column="16" table:row="255" table:table="0"/>
          <office:change-info>
            <dc:creator>Unknown Author</dc:creator>
            <dc:date>2026-06-11T06:47:04.600203300</dc:date>
          </office:change-info>
          <table:previous>
            <table:change-track-table-cell office:value-type="float" office:value="0"/>
          </table:previous>
        </table:cell-content-change>
        <table:cell-content-change table:id="ct257" table:acceptance-state="accepted">
          <table:cell-address table:column="5" table:row="214" table:table="0"/>
          <office:change-info>
            <dc:creator>Unknown Author</dc:creator>
            <dc:date>2026-06-12T06:18:27.072852800</dc:date>
          </office:change-info>
          <table:previous>
            <table:change-track-table-cell/>
          </table:previous>
        </table:cell-content-change>
        <table:cell-content-change table:id="ct258" table:acceptance-state="accepted">
          <table:cell-address table:column="9" table:row="214" table:table="0"/>
          <office:change-info>
            <dc:creator>Unknown Author</dc:creator>
            <dc:date>2026-06-12T06:18:35.028966600</dc:date>
          </office:change-info>
          <table:previous>
            <table:change-track-table-cell/>
          </table:previous>
        </table:cell-content-change>
        <table:cell-content-change table:id="ct259" table:acceptance-state="accepted">
          <table:cell-address table:column="11" table:row="214" table:table="0"/>
          <office:change-info>
            <dc:creator>Unknown Author</dc:creator>
            <dc:date>2026-06-12T06:18:56.741250800</dc:date>
          </office:change-info>
          <table:previous>
            <table:change-track-table-cell office:value-type="float" office:value="265329"/>
          </table:previous>
        </table:cell-content-change>
        <table:cell-content-change table:id="ct260" table:acceptance-state="accepted">
          <table:cell-address table:column="14" table:row="214" table:table="0"/>
          <office:change-info>
            <dc:creator>Unknown Author</dc:creator>
            <dc:date>2026-06-12T06:19:07.528505500</dc:date>
          </office:change-info>
          <table:previous>
            <table:change-track-table-cell office:value-type="float" office:value="265330"/>
          </table:previous>
        </table:cell-content-change>
        <table:movement table:id="ct261" table:acceptance-state="accepted">
          <table:source-range-address table:column="7" table:row="214" table:table="0"/>
          <table:target-range-address table:column="5" table:row="214" table:table="0"/>
          <office:change-info>
            <dc:creator>Unknown Author</dc:creator>
            <dc:date>2026-06-12T06:21:40.092090000</dc:date>
          </office:change-info>
        </table:movement>
        <table:cell-content-change table:id="ct262" table:acceptance-state="accepted">
          <table:cell-address table:column="6" table:row="214" table:table="0"/>
          <office:change-info>
            <dc:creator>Unknown Author</dc:creator>
            <dc:date>2026-06-12T06:22:05.385827100</dc:date>
          </office:change-info>
          <table:previous table:id="ct182">
            <table:change-track-table-cell table:cell-address="WBS.G215" table:formula="of:=IF([.$H202]=&quot;&quot;;&quot;&quot;;IF([.$G213]=&quot;&quot;;1;[.$G213]+1))" office:value-type="float" office:value="17"/>
          </table:previous>
        </table:cell-content-change>
        <table:cell-content-change table:id="ct263" table:acceptance-state="accepted">
          <table:cell-address table:column="4" table:row="214" table:table="0"/>
          <office:change-info>
            <dc:creator>Unknown Author</dc:creator>
            <dc:date>2026-06-12T06:22:24.053300100</dc:date>
          </office:change-info>
          <table:previous>
            <table:change-track-table-cell table:cell-address="WBS.E215" table:formula="of:=IF(AND([.$F215]&lt;&gt;&quot;&quot;;[.$D213]&lt;&gt;&quot;&quot;);1;IF([.$F215]&lt;&gt;&quot;&quot;;MAX(INDIRECT([.$B215]):[.$E213])+1;&quot;&quot;))" office:value-type="float" office:value="4"/>
          </table:previous>
        </table:cell-content-change>
        <table:cell-content-change table:id="ct264" table:acceptance-state="accepted">
          <table:cell-address table:column="7" table:row="215" table:table="0"/>
          <office:change-info>
            <dc:creator>Unknown Author</dc:creator>
            <dc:date>2026-06-12T06:22:43.664386300</dc:date>
          </office:change-info>
          <table:previous>
            <table:change-track-table-cell/>
          </table:previous>
        </table:cell-content-change>
        <table:cell-content-change table:id="ct265" table:acceptance-state="accepted">
          <table:cell-address table:column="7" table:row="216" table:table="0"/>
          <office:change-info>
            <dc:creator>Unknown Author</dc:creator>
            <dc:date>2026-06-12T06:22:51.977443400</dc:date>
          </office:change-info>
          <table:previous>
            <table:change-track-table-cell/>
          </table:previous>
        </table:cell-content-change>
        <table:insertion table:id="ct266" table:acceptance-state="accepted" table:type="row" table:position="217" table:table="0">
          <office:change-info>
            <dc:creator>Unknown Author</dc:creator>
            <dc:date>2026-06-12T06:22:59.810627000</dc:date>
          </office:change-info>
          <table:dependencies>
            <table:dependency table:id="ct596"/>
            <table:dependency table:id="ct586"/>
            <table:dependency table:id="ct574"/>
            <table:dependency table:id="ct558"/>
            <table:dependency table:id="ct329"/>
            <table:dependency table:id="ct326"/>
            <table:dependency table:id="ct321"/>
            <table:dependency table:id="ct301"/>
            <table:dependency table:id="ct284"/>
            <table:dependency table:id="ct273"/>
          </table:dependencies>
        </table:insertion>
        <table:insertion table:id="ct267" table:acceptance-state="accepted" table:type="row" table:position="227" table:table="0">
          <office:change-info>
            <dc:creator>Unknown Author</dc:creator>
            <dc:date>2026-06-12T06:23:07.028581800</dc:date>
          </office:change-info>
          <table:dependencies>
            <table:dependency table:id="ct298"/>
            <table:dependency table:id="ct277"/>
          </table:dependencies>
        </table:insertion>
        <table:insertion table:id="ct268" table:acceptance-state="accepted" table:type="row" table:position="226" table:table="0">
          <office:change-info>
            <dc:creator>Unknown Author</dc:creator>
            <dc:date>2026-06-12T06:23:09.544240000</dc:date>
          </office:change-info>
          <table:dependencies>
            <table:dependency table:id="ct604"/>
            <table:dependency table:id="ct595"/>
            <table:dependency table:id="ct573"/>
            <table:dependency table:id="ct566"/>
            <table:dependency table:id="ct345"/>
            <table:dependency table:id="ct338"/>
            <table:dependency table:id="ct297"/>
            <table:dependency table:id="ct295"/>
            <table:dependency table:id="ct276"/>
          </table:dependencies>
        </table:insertion>
        <table:cell-content-change table:id="ct269" table:acceptance-state="accepted">
          <table:cell-address table:column="6" table:row="215" table:table="0"/>
          <office:change-info>
            <dc:creator>Unknown Author</dc:creator>
            <dc:date>2026-06-12T06:23:19.879236600</dc:date>
          </office:change-info>
          <table:previous table:id="ct183">
            <table:change-track-table-cell/>
          </table:previous>
        </table:cell-content-change>
        <table:insertion table:id="ct270" table:acceptance-state="accepted" table:type="row" table:position="219" table:table="0">
          <office:change-info>
            <dc:creator>Unknown Author</dc:creator>
            <dc:date>2026-06-12T06:23:28.434361900</dc:date>
          </office:change-info>
          <table:dependencies>
            <table:dependency table:id="ct605"/>
            <table:dependency table:id="ct588"/>
            <table:dependency table:id="ct576"/>
            <table:dependency table:id="ct560"/>
            <table:dependency table:id="ct331"/>
            <table:dependency table:id="ct286"/>
            <table:dependency table:id="ct275"/>
          </table:dependencies>
        </table:insertion>
        <table:insertion table:id="ct271" table:acceptance-state="accepted" table:type="row" table:position="218" table:table="0">
          <office:change-info>
            <dc:creator>Unknown Author</dc:creator>
            <dc:date>2026-06-12T06:23:34.318054800</dc:date>
          </office:change-info>
          <table:dependencies>
            <table:dependency table:id="ct597"/>
            <table:dependency table:id="ct587"/>
            <table:dependency table:id="ct575"/>
            <table:dependency table:id="ct559"/>
            <table:dependency table:id="ct358"/>
            <table:dependency table:id="ct347"/>
            <table:dependency table:id="ct330"/>
            <table:dependency table:id="ct285"/>
            <table:dependency table:id="ct274"/>
          </table:dependencies>
        </table:insertion>
        <table:cell-content-change table:id="ct272" table:acceptance-state="accepted">
          <table:cell-address table:column="6" table:row="216" table:table="0"/>
          <office:change-info>
            <dc:creator>Unknown Author</dc:creator>
            <dc:date>2026-06-12T06:23:59.451742000</dc:date>
          </office:change-info>
          <table:previous>
            <table:change-track-table-cell table:cell-address="WBS.G217" table:formula="of:=IF([.$H217]=&quot;&quot;;&quot;&quot;;IF([.$G216]=&quot;&quot;;1;[.$G216]+1))" office:value-type="float" office:value="2"/>
          </table:previous>
        </table:cell-content-change>
        <table:cell-content-change table:id="ct273" table:acceptance-state="accepted">
          <table:cell-address table:column="6" table:row="217" table:table="0"/>
          <office:change-info>
            <dc:creator>Unknown Author</dc:creator>
            <dc:date>2026-06-12T06:23:59.451779100</dc:date>
          </office:change-info>
          <table:previous>
            <table:change-track-table-cell table:cell-address="WBS.G218" table:formula="of:=IF([.$H218]=&quot;&quot;;&quot;&quot;;IF([.$G217]=&quot;&quot;;1;[.$G217]+1))" office:value-type="float" office:value="3"/>
          </table:previous>
        </table:cell-content-change>
        <table:cell-content-change table:id="ct274" table:acceptance-state="accepted">
          <table:cell-address table:column="6" table:row="218" table:table="0"/>
          <office:change-info>
            <dc:creator>Unknown Author</dc:creator>
            <dc:date>2026-06-12T06:23:59.451790000</dc:date>
          </office:change-info>
          <table:previous>
            <table:change-track-table-cell table:cell-address="WBS.G219" table:formula="of:=IF([.$H219]=&quot;&quot;;&quot;&quot;;IF([.$G218]=&quot;&quot;;1;[.$G218]+1))" office:value-type="float" office:value="4"/>
          </table:previous>
        </table:cell-content-change>
        <table:cell-content-change table:id="ct275" table:acceptance-state="accepted">
          <table:cell-address table:column="6" table:row="219" table:table="0"/>
          <office:change-info>
            <dc:creator>Unknown Author</dc:creator>
            <dc:date>2026-06-12T06:23:59.451799700</dc:date>
          </office:change-info>
          <table:previous>
            <table:change-track-table-cell table:cell-address="WBS.G220" table:formula="of:=IF([.$H220]=&quot;&quot;;&quot;&quot;;IF([.$G219]=&quot;&quot;;1;[.$G219]+1))" office:value-type="float" office:value="5"/>
          </table:previous>
        </table:cell-content-change>
        <table:cell-content-change table:id="ct276" table:acceptance-state="accepted">
          <table:cell-address table:column="6" table:row="226" table:table="0"/>
          <office:change-info>
            <dc:creator>Unknown Author</dc:creator>
            <dc:date>2026-06-12T06:23:59.451808200</dc:date>
          </office:change-info>
          <table:previous>
            <table:change-track-table-cell table:cell-address="WBS.G227" table:formula="of:=IF([.$H227]=&quot;&quot;;&quot;&quot;;IF([.$G220]=&quot;&quot;;1;[.$G220]+1))" office:value-type="float" office:value="6"/>
          </table:previous>
        </table:cell-content-change>
        <table:cell-content-change table:id="ct277" table:acceptance-state="accepted">
          <table:cell-address table:column="6" table:row="227" table:table="0"/>
          <office:change-info>
            <dc:creator>Unknown Author</dc:creator>
            <dc:date>2026-06-12T06:23:59.451816500</dc:date>
          </office:change-info>
          <table:previous>
            <table:change-track-table-cell table:cell-address="WBS.G228" table:formula="of:=IF([.$H228]=&quot;&quot;;&quot;&quot;;IF([.$G227]=&quot;&quot;;1;[.$G227]+1))" office:value-type="string"/>
          </table:previous>
        </table:cell-content-change>
        <table:insertion table:id="ct278" table:acceptance-state="accepted" table:type="row" table:position="225" table:table="0">
          <office:change-info>
            <dc:creator>Unknown Author</dc:creator>
            <dc:date>2026-06-12T06:24:03.667072100</dc:date>
          </office:change-info>
          <table:dependencies>
            <table:dependency table:id="ct603"/>
            <table:dependency table:id="ct594"/>
            <table:dependency table:id="ct572"/>
            <table:dependency table:id="ct565"/>
            <table:dependency table:id="ct357"/>
            <table:dependency table:id="ct349"/>
            <table:dependency table:id="ct346"/>
            <table:dependency table:id="ct344"/>
            <table:dependency table:id="ct337"/>
            <table:dependency table:id="ct296"/>
            <table:dependency table:id="ct294"/>
          </table:dependencies>
        </table:insertion>
        <table:insertion table:id="ct279" table:acceptance-state="accepted" table:type="row" table:position="224" table:table="0">
          <office:change-info>
            <dc:creator>Unknown Author</dc:creator>
            <dc:date>2026-06-12T06:24:05.610371300</dc:date>
          </office:change-info>
          <table:dependencies>
            <table:dependency table:id="ct602"/>
            <table:dependency table:id="ct593"/>
            <table:dependency table:id="ct571"/>
            <table:dependency table:id="ct564"/>
            <table:dependency table:id="ct343"/>
            <table:dependency table:id="ct336"/>
            <table:dependency table:id="ct328"/>
            <table:dependency table:id="ct293"/>
          </table:dependencies>
        </table:insertion>
        <table:insertion table:id="ct280" table:acceptance-state="accepted" table:type="row" table:position="223" table:table="0">
          <office:change-info>
            <dc:creator>Unknown Author</dc:creator>
            <dc:date>2026-06-12T06:24:07.895953700</dc:date>
          </office:change-info>
          <table:dependencies>
            <table:dependency table:id="ct601"/>
            <table:dependency table:id="ct592"/>
            <table:dependency table:id="ct570"/>
            <table:dependency table:id="ct348"/>
            <table:dependency table:id="ct342"/>
            <table:dependency table:id="ct335"/>
            <table:dependency table:id="ct292"/>
          </table:dependencies>
        </table:insertion>
        <table:insertion table:id="ct281" table:acceptance-state="accepted" table:type="row" table:position="222" table:table="0">
          <office:change-info>
            <dc:creator>Unknown Author</dc:creator>
            <dc:date>2026-06-12T06:24:09.347102000</dc:date>
          </office:change-info>
          <table:dependencies>
            <table:dependency table:id="ct600"/>
            <table:dependency table:id="ct591"/>
            <table:dependency table:id="ct569"/>
            <table:dependency table:id="ct563"/>
            <table:dependency table:id="ct341"/>
            <table:dependency table:id="ct334"/>
            <table:dependency table:id="ct325"/>
            <table:dependency table:id="ct291"/>
            <table:dependency table:id="ct290"/>
          </table:dependencies>
        </table:insertion>
        <table:insertion table:id="ct282" table:acceptance-state="accepted" table:type="row" table:position="221" table:table="0">
          <office:change-info>
            <dc:creator>Unknown Author</dc:creator>
            <dc:date>2026-06-12T06:24:10.657119700</dc:date>
          </office:change-info>
          <table:dependencies>
            <table:dependency table:id="ct599"/>
            <table:dependency table:id="ct590"/>
            <table:dependency table:id="ct568"/>
            <table:dependency table:id="ct562"/>
            <table:dependency table:id="ct340"/>
            <table:dependency table:id="ct333"/>
            <table:dependency table:id="ct324"/>
            <table:dependency table:id="ct289"/>
            <table:dependency table:id="ct288"/>
          </table:dependencies>
        </table:insertion>
        <table:insertion table:id="ct283" table:acceptance-state="accepted" table:type="row" table:position="220" table:table="0">
          <office:change-info>
            <dc:creator>Unknown Author</dc:creator>
            <dc:date>2026-06-12T06:24:11.562293900</dc:date>
          </office:change-info>
          <table:dependencies>
            <table:dependency table:id="ct598"/>
            <table:dependency table:id="ct589"/>
            <table:dependency table:id="ct567"/>
            <table:dependency table:id="ct561"/>
            <table:dependency table:id="ct339"/>
            <table:dependency table:id="ct332"/>
            <table:dependency table:id="ct287"/>
          </table:dependencies>
        </table:insertion>
        <table:cell-content-change table:id="ct284" table:acceptance-state="accepted">
          <table:cell-address table:column="7" table:row="217" table:table="0"/>
          <office:change-info>
            <dc:creator>Unknown Author</dc:creator>
            <dc:date>2026-06-12T06:24:30.856940100</dc:date>
          </office:change-info>
          <table:previous>
            <table:change-track-table-cell/>
          </table:previous>
        </table:cell-content-change>
        <table:cell-content-change table:id="ct285" table:acceptance-state="accepted">
          <table:cell-address table:column="7" table:row="218" table:table="0"/>
          <office:change-info>
            <dc:creator>Unknown Author</dc:creator>
            <dc:date>2026-06-12T06:24:43.203658600</dc:date>
          </office:change-info>
          <table:previous>
            <table:change-track-table-cell/>
          </table:previous>
        </table:cell-content-change>
        <table:cell-content-change table:id="ct286" table:acceptance-state="accepted">
          <table:cell-address table:column="7" table:row="219" table:table="0"/>
          <office:change-info>
            <dc:creator>Unknown Author</dc:creator>
            <dc:date>2026-06-12T06:24:52.777306100</dc:date>
          </office:change-info>
          <table:previous>
            <table:change-track-table-cell/>
          </table:previous>
        </table:cell-content-change>
        <table:cell-content-change table:id="ct287" table:acceptance-state="accepted">
          <table:cell-address table:column="7" table:row="220" table:table="0"/>
          <office:change-info>
            <dc:creator>Unknown Author</dc:creator>
            <dc:date>2026-06-12T06:25:02.250030900</dc:date>
          </office:change-info>
          <table:previous>
            <table:change-track-table-cell/>
          </table:previous>
        </table:cell-content-change>
        <table:cell-content-change table:id="ct288" table:acceptance-state="accepted">
          <table:cell-address table:column="7" table:row="221" table:table="0"/>
          <office:change-info>
            <dc:creator>Unknown Author</dc:creator>
            <dc:date>2026-06-12T06:25:24.040312000</dc:date>
          </office:change-info>
          <table:previous>
            <table:change-track-table-cell/>
          </table:previous>
        </table:cell-content-change>
        <table:cell-content-change table:id="ct289" table:acceptance-state="accepted">
          <table:cell-address table:column="7" table:row="221" table:table="0"/>
          <office:change-info>
            <dc:creator>Unknown Author</dc:creator>
            <dc:date>2026-06-12T06:25:55.288833600</dc:date>
          </office:change-info>
          <table:previous table:id="ct288">
            <table:change-track-table-cell office:value-type="string">
              <text:p>メインコンテンツの編集</text:p>
            </table:change-track-table-cell>
          </table:previous>
        </table:cell-content-change>
        <table:cell-content-change table:id="ct290" table:acceptance-state="accepted">
          <table:cell-address table:column="7" table:row="222" table:table="0"/>
          <office:change-info>
            <dc:creator>Unknown Author</dc:creator>
            <dc:date>2026-06-12T06:26:01.141510800</dc:date>
          </office:change-info>
          <table:previous>
            <table:change-track-table-cell/>
          </table:previous>
        </table:cell-content-change>
        <table:cell-content-change table:id="ct291" table:acceptance-state="accepted">
          <table:cell-address table:column="7" table:row="222" table:table="0"/>
          <office:change-info>
            <dc:creator>Unknown Author</dc:creator>
            <dc:date>2026-06-12T06:26:12.006856800</dc:date>
          </office:change-info>
          <table:previous table:id="ct290">
            <table:change-track-table-cell office:value-type="string">
              <text:p>商品知覧画面の</text:p>
            </table:change-track-table-cell>
          </table:previous>
        </table:cell-content-change>
        <table:cell-content-change table:id="ct292" table:acceptance-state="accepted">
          <table:cell-address table:column="7" table:row="223" table:table="0"/>
          <office:change-info>
            <dc:creator>Unknown Author</dc:creator>
            <dc:date>2026-06-12T06:26:20.628808600</dc:date>
          </office:change-info>
          <table:previous>
            <table:change-track-table-cell/>
          </table:previous>
        </table:cell-content-change>
        <table:cell-content-change table:id="ct293" table:acceptance-state="accepted">
          <table:cell-address table:column="7" table:row="224" table:table="0"/>
          <office:change-info>
            <dc:creator>Unknown Author</dc:creator>
            <dc:date>2026-06-12T06:26:33.697572800</dc:date>
          </office:change-info>
          <table:previous>
            <table:change-track-table-cell/>
          </table:previous>
        </table:cell-content-change>
        <table:cell-content-change table:id="ct294" table:acceptance-state="accepted">
          <table:cell-address table:column="7" table:row="225" table:table="0"/>
          <office:change-info>
            <dc:creator>Unknown Author</dc:creator>
            <dc:date>2026-06-12T06:26:42.933465000</dc:date>
          </office:change-info>
          <table:previous>
            <table:change-track-table-cell/>
          </table:previous>
        </table:cell-content-change>
        <table:cell-content-change table:id="ct295" table:acceptance-state="accepted">
          <table:cell-address table:column="7" table:row="226" table:table="0"/>
          <office:change-info>
            <dc:creator>Unknown Author</dc:creator>
            <dc:date>2026-06-12T06:26:52.488173900</dc:date>
          </office:change-info>
          <table:previous>
            <table:change-track-table-cell/>
          </table:previous>
        </table:cell-content-change>
        <table:cell-content-change table:id="ct296" table:acceptance-state="accepted">
          <table:cell-address table:column="6" table:row="225" table:table="0"/>
          <office:change-info>
            <dc:creator>Unknown Author</dc:creator>
            <dc:date>2026-06-12T06:26:57.558950900</dc:date>
          </office:change-info>
          <table:previous>
            <table:change-track-table-cell/>
          </table:previous>
        </table:cell-content-change>
        <table:cell-content-change table:id="ct297" table:acceptance-state="accepted">
          <table:cell-address table:column="6" table:row="226" table:table="0"/>
          <office:change-info>
            <dc:creator>Unknown Author</dc:creator>
            <dc:date>2026-06-12T06:26:57.558973900</dc:date>
          </office:change-info>
          <table:previous table:id="ct276">
            <table:change-track-table-cell office:value-type="float" office:value="6"/>
          </table:previous>
        </table:cell-content-change>
        <table:cell-content-change table:id="ct298" table:acceptance-state="accepted">
          <table:cell-address table:column="6" table:row="227" table:table="0"/>
          <office:change-info>
            <dc:creator>Unknown Author</dc:creator>
            <dc:date>2026-06-12T06:27:06.464822200</dc:date>
          </office:change-info>
          <table:previous table:id="ct277">
            <table:change-track-table-cell office:value-type="float" office:value="7"/>
          </table:previous>
        </table:cell-content-change>
        <table:insertion table:id="ct299" table:acceptance-state="accepted" table:type="row" table:position="213" table:table="0">
          <office:change-info>
            <dc:creator>Unknown Author</dc:creator>
            <dc:date>2026-06-12T06:27:56.923445100</dc:date>
          </office:change-info>
        </table:insertion>
        <table:cell-content-change table:id="ct300" table:acceptance-state="accepted">
          <table:cell-address table:column="16" table:row="215" table:table="0"/>
          <office:change-info>
            <dc:creator>Unknown Author</dc:creator>
            <dc:date>2026-06-12T06:28:12.266883100</dc:date>
          </office:change-info>
          <table:previous>
            <table:change-track-table-cell/>
          </table:previous>
        </table:cell-content-change>
        <table:cell-content-change table:id="ct301" table:acceptance-state="accepted">
          <table:cell-address table:column="12" table:row="217" table:table="0"/>
          <office:change-info>
            <dc:creator>Unknown Author</dc:creator>
            <dc:date>2026-06-12T06:28:55.927929500</dc:date>
          </office:change-info>
          <table:previous>
            <table:change-track-table-cell office:value-type="float" office:value="265330"/>
          </table:previous>
        </table:cell-content-change>
        <table:movement table:id="ct302" table:acceptance-state="accepted">
          <table:source-range-address table:column="14" table:row="216" table:table="0"/>
          <table:target-range-address table:column="14" table:row="214" table:table="0"/>
          <office:change-info>
            <dc:creator>Unknown Author</dc:creator>
            <dc:date>2026-06-12T06:31:20.702140800</dc:date>
          </office:change-info>
          <table:dependencies>
            <table:dependency table:id="ct557"/>
          </table:dependencies>
          <table:deletions>
            <table:cell-content-deletion table:id="ct260">
              <table:change-track-table-cell/>
            </table:cell-content-deletion>
          </table:deletions>
        </table:movement>
        <table:movement table:id="ct303" table:acceptance-state="accepted">
          <table:source-range-address table:column="16" table:row="216" table:table="0"/>
          <table:target-range-address table:column="16" table:row="214" table:table="0"/>
          <office:change-info>
            <dc:creator>Unknown Author</dc:creator>
            <dc:date>2026-06-12T06:31:24.527015500</dc:date>
          </office:change-info>
        </table:movement>
        <table:cell-content-change table:id="ct304" table:acceptance-state="accepted">
          <table:cell-address table:column="9" table:row="197" table:table="0"/>
          <office:change-info>
            <dc:creator>Unknown Author</dc:creator>
            <dc:date>2026-06-12T06:32:49.469194600</dc:date>
          </office:change-info>
          <table:previous table:id="ct241">
            <table:change-track-table-cell office:value-type="string">
              <text:p>伊藤、上田</text:p>
            </table:change-track-table-cell>
          </table:previous>
        </table:cell-content-change>
        <table:cell-content-change table:id="ct305" table:acceptance-state="accepted">
          <table:cell-address table:column="9" table:row="198" table:table="0"/>
          <office:change-info>
            <dc:creator>Unknown Author</dc:creator>
            <dc:date>2026-06-12T06:32:55.104596300</dc:date>
          </office:change-info>
          <table:previous table:id="ct242">
            <table:change-track-table-cell office:value-type="string">
              <text:p>伊藤、上田</text:p>
            </table:change-track-table-cell>
          </table:previous>
        </table:cell-content-change>
        <table:cell-content-change table:id="ct306" table:acceptance-state="accepted">
          <table:cell-address table:column="9" table:row="205" table:table="0"/>
          <office:change-info>
            <dc:creator>Unknown Author</dc:creator>
            <dc:date>2026-06-12T06:33:01.451355100</dc:date>
          </office:change-info>
          <table:previous table:id="ct180">
            <table:change-track-table-cell office:value-type="string">
              <text:p>上田</text:p>
            </table:change-track-table-cell>
          </table:previous>
        </table:cell-content-change>
        <table:cell-content-change table:id="ct307" table:acceptance-state="accepted">
          <table:cell-address table:column="9" table:row="206" table:table="0"/>
          <office:change-info>
            <dc:creator>Unknown Author</dc:creator>
            <dc:date>2026-06-12T06:33:01.451375500</dc:date>
          </office:change-info>
          <table:previous table:id="ct244">
            <table:change-track-table-cell office:value-type="string">
              <text:p>伊藤、上田</text:p>
            </table:change-track-table-cell>
          </table:previous>
        </table:cell-content-change>
        <table:cell-content-change table:id="ct308" table:acceptance-state="accepted">
          <table:cell-address table:column="9" table:row="207" table:table="0"/>
          <office:change-info>
            <dc:creator>Unknown Author</dc:creator>
            <dc:date>2026-06-12T06:33:10.717321300</dc:date>
          </office:change-info>
          <table:previous table:id="ct185">
            <table:change-track-table-cell office:value-type="string">
              <text:p>上田、伊藤</text:p>
            </table:change-track-table-cell>
          </table:previous>
        </table:cell-content-change>
        <table:cell-content-change table:id="ct309" table:acceptance-state="accepted">
          <table:cell-address table:column="9" table:row="208" table:table="0"/>
          <office:change-info>
            <dc:creator>Unknown Author</dc:creator>
            <dc:date>2026-06-12T06:33:10.717340400</dc:date>
          </office:change-info>
          <table:previous>
            <table:change-track-table-cell office:value-type="string">
              <text:p>上田</text:p>
            </table:change-track-table-cell>
          </table:previous>
        </table:cell-content-change>
        <table:cell-content-change table:id="ct310" table:acceptance-state="accepted">
          <table:cell-address table:column="9" table:row="209" table:table="0"/>
          <office:change-info>
            <dc:creator>Unknown Author</dc:creator>
            <dc:date>2026-06-12T06:33:10.717349100</dc:date>
          </office:change-info>
          <table:previous>
            <table:change-track-table-cell office:value-type="string">
              <text:p>上田</text:p>
            </table:change-track-table-cell>
          </table:previous>
        </table:cell-content-change>
        <table:cell-content-change table:id="ct311" table:acceptance-state="accepted">
          <table:cell-address table:column="9" table:row="210" table:table="0"/>
          <office:change-info>
            <dc:creator>Unknown Author</dc:creator>
            <dc:date>2026-06-12T06:33:10.717352100</dc:date>
          </office:change-info>
          <table:previous table:id="ct186">
            <table:change-track-table-cell office:value-type="string">
              <text:p>上田</text:p>
            </table:change-track-table-cell>
          </table:previous>
        </table:cell-content-change>
        <table:cell-content-change table:id="ct312" table:acceptance-state="accepted">
          <table:cell-address table:column="9" table:row="211" table:table="0"/>
          <office:change-info>
            <dc:creator>Unknown Author</dc:creator>
            <dc:date>2026-06-12T06:33:10.717353500</dc:date>
          </office:change-info>
          <table:previous>
            <table:change-track-table-cell office:value-type="string">
              <text:p>上田</text:p>
            </table:change-track-table-cell>
          </table:previous>
        </table:cell-content-change>
        <table:cell-content-change table:id="ct313" table:acceptance-state="accepted">
          <table:cell-address table:column="9" table:row="212" table:table="0"/>
          <office:change-info>
            <dc:creator>Unknown Author</dc:creator>
            <dc:date>2026-06-12T06:33:10.717355900</dc:date>
          </office:change-info>
          <table:previous table:id="ct217">
            <table:change-track-table-cell office:value-type="string">
              <text:p>全員</text:p>
            </table:change-track-table-cell>
          </table:previous>
        </table:cell-content-change>
        <table:cell-content-change table:id="ct314" table:acceptance-state="accepted">
          <table:cell-address table:column="9" table:row="199" table:table="0"/>
          <office:change-info>
            <dc:creator>Unknown Author</dc:creator>
            <dc:date>2026-06-12T06:33:27.545094800</dc:date>
          </office:change-info>
          <table:previous table:id="ct243">
            <table:change-track-table-cell office:value-type="string">
              <text:p>伊藤、上田</text:p>
            </table:change-track-table-cell>
          </table:previous>
        </table:cell-content-change>
        <table:cell-content-change table:id="ct315" table:acceptance-state="accepted">
          <table:cell-address table:column="9" table:row="196" table:table="0"/>
          <office:change-info>
            <dc:creator>Unknown Author</dc:creator>
            <dc:date>2026-06-12T06:33:39.359703600</dc:date>
          </office:change-info>
          <table:previous table:id="ct150"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316" table:acceptance-state="accepted">
          <table:cell-address table:column="16" table:row="254" table:table="0"/>
          <office:change-info>
            <dc:creator>Unknown Author</dc:creator>
            <dc:date>2026-06-12T06:34:02.756738800</dc:date>
          </office:change-info>
          <table:previous>
            <table:change-track-table-cell office:value-type="float" office:value="0"/>
          </table:previous>
        </table:cell-content-change>
        <table:cell-content-change table:id="ct317" table:acceptance-state="accepted">
          <table:cell-address table:column="16" table:row="196" table:table="0"/>
          <office:change-info>
            <dc:creator>Unknown Author</dc:creator>
            <dc:date>2026-06-15T06:27:45.278599000</dc:date>
          </office:change-info>
          <table:previous>
            <table:change-track-table-cell/>
          </table:previous>
        </table:cell-content-change>
        <table:cell-content-change table:id="ct318" table:acceptance-state="accepted">
          <table:cell-address table:column="16" table:row="199" table:table="0"/>
          <office:change-info>
            <dc:creator>Unknown Author</dc:creator>
            <dc:date>2026-06-15T06:27:45.279042100</dc:date>
          </office:change-info>
          <table:previous>
            <table:change-track-table-cell/>
          </table:previous>
        </table:cell-content-change>
        <table:cell-content-change table:id="ct319" table:acceptance-state="accepted">
          <table:cell-address table:column="16" table:row="207" table:table="0"/>
          <office:change-info>
            <dc:creator>Unknown Author</dc:creator>
            <dc:date>2026-06-15T06:27:45.279088900</dc:date>
          </office:change-info>
          <table:previous>
            <table:change-track-table-cell/>
          </table:previous>
        </table:cell-content-change>
        <table:cell-content-change table:id="ct320" table:acceptance-state="accepted">
          <table:cell-address table:column="13" table:row="272" table:table="0"/>
          <office:change-info>
            <dc:creator>Unknown Author</dc:creator>
            <dc:date>2026-06-15T06:28:16.111582200</dc:date>
          </office:change-info>
          <table:previous>
            <table:change-track-table-cell office:value-type="float" office:value="46197"/>
          </table:previous>
        </table:cell-content-change>
        <table:cell-content-change table:id="ct321" table:acceptance-state="accepted">
          <table:cell-address table:column="13" table:row="217" table:table="0"/>
          <office:change-info>
            <dc:creator>Unknown Author</dc:creator>
            <dc:date>2026-06-15T06:30:14.343355800</dc:date>
          </office:change-info>
          <table:previous>
            <table:change-track-table-cell office:value-type="float" office:value="265330"/>
          </table:previous>
        </table:cell-content-change>
        <table:cell-content-change table:id="ct322" table:acceptance-state="accepted">
          <table:cell-address table:column="14" table:row="214" table:table="0"/>
          <office:change-info>
            <dc:creator>Unknown Author</dc:creator>
            <dc:date>2026-06-15T06:31:10.253528900</dc:date>
          </office:change-info>
          <table:previous>
            <table:change-track-table-cell office:value-type="float" office:value="265330"/>
          </table:previous>
        </table:cell-content-change>
        <table:cell-content-change table:id="ct323" table:acceptance-state="accepted">
          <table:cell-address table:column="16" table:row="214" table:table="0"/>
          <office:change-info>
            <dc:creator>Unknown Author</dc:creator>
            <dc:date>2026-06-15T06:31:53.336596400</dc:date>
          </office:change-info>
          <table:previous>
            <table:change-track-table-cell office:value-type="float" office:value="100"/>
          </table:previous>
        </table:cell-content-change>
        <table:cell-content-change table:id="ct324" table:acceptance-state="accepted">
          <table:cell-address table:column="14" table:row="221" table:table="0"/>
          <office:change-info>
            <dc:creator>Unknown Author</dc:creator>
            <dc:date>2026-06-15T06:32:21.078405000</dc:date>
          </office:change-info>
          <table:previous>
            <table:change-track-table-cell/>
          </table:previous>
        </table:cell-content-change>
        <table:cell-content-change table:id="ct325" table:acceptance-state="accepted">
          <table:cell-address table:column="14" table:row="222" table:table="0"/>
          <office:change-info>
            <dc:creator>Unknown Author</dc:creator>
            <dc:date>2026-06-15T06:32:25.582351100</dc:date>
          </office:change-info>
          <table:previous>
            <table:change-track-table-cell/>
          </table:previous>
        </table:cell-content-change>
        <table:cell-content-change table:id="ct326" table:acceptance-state="accepted">
          <table:cell-address table:column="14" table:row="217" table:table="0"/>
          <office:change-info>
            <dc:creator>Unknown Author</dc:creator>
            <dc:date>2026-06-15T06:32:30.359058500</dc:date>
          </office:change-info>
          <table:previous>
            <table:change-track-table-cell/>
          </table:previous>
        </table:cell-content-change>
        <table:cell-content-change table:id="ct327">
          <table:cell-address table:column="16" table:row="153" table:table="0"/>
          <office:change-info>
            <dc:creator>Unknown Author</dc:creator>
            <dc:date>2026-06-15T06:41:47.884593200</dc:date>
          </office:change-info>
          <table:previous>
            <table:change-track-table-cell office:value-type="float" office:value="100"/>
          </table:previous>
        </table:cell-content-change>
        <table:cell-content-change table:id="ct328">
          <table:cell-address table:column="14" table:row="224" table:table="0"/>
          <office:change-info>
            <dc:creator>Unknown Author</dc:creator>
            <dc:date>2026-06-16T06:42:37.487203300</dc:date>
          </office:change-info>
          <table:previous>
            <table:change-track-table-cell office:value-type="float" office:value="265333"/>
          </table:previous>
        </table:cell-content-change>
        <table:cell-content-change table:id="ct329">
          <table:cell-address table:column="15" table:row="217" table:table="0"/>
          <office:change-info>
            <dc:creator>Unknown Author</dc:creator>
            <dc:date>2026-06-16T06:45:18.873827600</dc:date>
          </office:change-info>
          <table:previous>
            <table:change-track-table-cell/>
          </table:previous>
        </table:cell-content-change>
        <table:cell-content-change table:id="ct330">
          <table:cell-address table:column="15" table:row="218" table:table="0"/>
          <office:change-info>
            <dc:creator>Unknown Author</dc:creator>
            <dc:date>2026-06-16T06:45:21.011643000</dc:date>
          </office:change-info>
          <table:previous>
            <table:change-track-table-cell/>
          </table:previous>
        </table:cell-content-change>
        <table:cell-content-change table:id="ct331">
          <table:cell-address table:column="15" table:row="219" table:table="0"/>
          <office:change-info>
            <dc:creator>Unknown Author</dc:creator>
            <dc:date>2026-06-16T06:45:22.919032900</dc:date>
          </office:change-info>
          <table:previous>
            <table:change-track-table-cell/>
          </table:previous>
        </table:cell-content-change>
        <table:cell-content-change table:id="ct332">
          <table:cell-address table:column="15" table:row="220" table:table="0"/>
          <office:change-info>
            <dc:creator>Unknown Author</dc:creator>
            <dc:date>2026-06-16T06:45:24.563238600</dc:date>
          </office:change-info>
          <table:previous>
            <table:change-track-table-cell/>
          </table:previous>
        </table:cell-content-change>
        <table:cell-content-change table:id="ct333">
          <table:cell-address table:column="15" table:row="221" table:table="0"/>
          <office:change-info>
            <dc:creator>Unknown Author</dc:creator>
            <dc:date>2026-06-16T06:45:26.173569800</dc:date>
          </office:change-info>
          <table:previous>
            <table:change-track-table-cell/>
          </table:previous>
        </table:cell-content-change>
        <table:cell-content-change table:id="ct334">
          <table:cell-address table:column="15" table:row="222" table:table="0"/>
          <office:change-info>
            <dc:creator>Unknown Author</dc:creator>
            <dc:date>2026-06-16T06:45:27.744537700</dc:date>
          </office:change-info>
          <table:previous>
            <table:change-track-table-cell/>
          </table:previous>
        </table:cell-content-change>
        <table:cell-content-change table:id="ct335">
          <table:cell-address table:column="15" table:row="223" table:table="0"/>
          <office:change-info>
            <dc:creator>Unknown Author</dc:creator>
            <dc:date>2026-06-16T06:45:29.678146900</dc:date>
          </office:change-info>
          <table:previous>
            <table:change-track-table-cell/>
          </table:previous>
        </table:cell-content-change>
        <table:cell-content-change table:id="ct336">
          <table:cell-address table:column="15" table:row="224" table:table="0"/>
          <office:change-info>
            <dc:creator>Unknown Author</dc:creator>
            <dc:date>2026-06-16T06:45:31.373985300</dc:date>
          </office:change-info>
          <table:previous>
            <table:change-track-table-cell/>
          </table:previous>
        </table:cell-content-change>
        <table:cell-content-change table:id="ct337">
          <table:cell-address table:column="15" table:row="225" table:table="0"/>
          <office:change-info>
            <dc:creator>Unknown Author</dc:creator>
            <dc:date>2026-06-16T06:45:34.116792500</dc:date>
          </office:change-info>
          <table:previous>
            <table:change-track-table-cell/>
          </table:previous>
        </table:cell-content-change>
        <table:cell-content-change table:id="ct338">
          <table:cell-address table:column="15" table:row="226" table:table="0"/>
          <office:change-info>
            <dc:creator>Unknown Author</dc:creator>
            <dc:date>2026-06-16T06:45:36.956464300</dc:date>
          </office:change-info>
          <table:previous>
            <table:change-track-table-cell/>
          </table:previous>
        </table:cell-content-change>
        <table:cell-content-change table:id="ct339">
          <table:cell-address table:column="15" table:row="220" table:table="0"/>
          <office:change-info>
            <dc:creator>Unknown Author</dc:creator>
            <dc:date>2026-06-16T06:46:59.718690000</dc:date>
          </office:change-info>
          <table:previous table:id="ct332">
            <table:change-track-table-cell office:value-type="float" office:value="1"/>
          </table:previous>
        </table:cell-content-change>
        <table:cell-content-change table:id="ct340">
          <table:cell-address table:column="15" table:row="221" table:table="0"/>
          <office:change-info>
            <dc:creator>Unknown Author</dc:creator>
            <dc:date>2026-06-16T06:46:59.718710800</dc:date>
          </office:change-info>
          <table:previous table:id="ct333">
            <table:change-track-table-cell office:value-type="float" office:value="1"/>
          </table:previous>
        </table:cell-content-change>
        <table:cell-content-change table:id="ct341">
          <table:cell-address table:column="15" table:row="222" table:table="0"/>
          <office:change-info>
            <dc:creator>Unknown Author</dc:creator>
            <dc:date>2026-06-16T06:46:59.718714200</dc:date>
          </office:change-info>
          <table:previous table:id="ct334">
            <table:change-track-table-cell office:value-type="float" office:value="1"/>
          </table:previous>
        </table:cell-content-change>
        <table:cell-content-change table:id="ct342">
          <table:cell-address table:column="15" table:row="223" table:table="0"/>
          <office:change-info>
            <dc:creator>Unknown Author</dc:creator>
            <dc:date>2026-06-16T06:46:59.718717300</dc:date>
          </office:change-info>
          <table:previous table:id="ct335">
            <table:change-track-table-cell office:value-type="float" office:value="1"/>
          </table:previous>
        </table:cell-content-change>
        <table:cell-content-change table:id="ct343">
          <table:cell-address table:column="15" table:row="224" table:table="0"/>
          <office:change-info>
            <dc:creator>Unknown Author</dc:creator>
            <dc:date>2026-06-16T06:46:59.718720600</dc:date>
          </office:change-info>
          <table:previous table:id="ct336">
            <table:change-track-table-cell office:value-type="float" office:value="1"/>
          </table:previous>
        </table:cell-content-change>
        <table:cell-content-change table:id="ct344">
          <table:cell-address table:column="15" table:row="225" table:table="0"/>
          <office:change-info>
            <dc:creator>Unknown Author</dc:creator>
            <dc:date>2026-06-16T06:46:59.718723300</dc:date>
          </office:change-info>
          <table:previous table:id="ct337">
            <table:change-track-table-cell office:value-type="float" office:value="1"/>
          </table:previous>
        </table:cell-content-change>
        <table:cell-content-change table:id="ct345">
          <table:cell-address table:column="15" table:row="226" table:table="0"/>
          <office:change-info>
            <dc:creator>Unknown Author</dc:creator>
            <dc:date>2026-06-16T06:46:59.718726500</dc:date>
          </office:change-info>
          <table:previous table:id="ct338">
            <table:change-track-table-cell office:value-type="float" office:value="1"/>
          </table:previous>
        </table:cell-content-change>
        <table:cell-content-change table:id="ct346">
          <table:cell-address table:column="14" table:row="225" table:table="0"/>
          <office:change-info>
            <dc:creator>Unknown Author</dc:creator>
            <dc:date>2026-06-16T06:50:11.120673900</dc:date>
          </office:change-info>
          <table:previous>
            <table:change-track-table-cell office:value-type="float" office:value="265333"/>
          </table:previous>
        </table:cell-content-change>
        <table:cell-content-change table:id="ct347">
          <table:cell-address table:column="16" table:row="218" table:table="0"/>
          <office:change-info>
            <dc:creator>Unknown Author</dc:creator>
            <dc:date>2026-06-16T06:50:29.290669200</dc:date>
          </office:change-info>
          <table:previous>
            <table:change-track-table-cell office:value-type="float" office:value="100"/>
          </table:previous>
        </table:cell-content-change>
        <table:cell-content-change table:id="ct348">
          <table:cell-address table:column="16" table:row="223" table:table="0"/>
          <office:change-info>
            <dc:creator>Unknown Author</dc:creator>
            <dc:date>2026-06-16T06:50:31.384478900</dc:date>
          </office:change-info>
          <table:previous>
            <table:change-track-table-cell office:value-type="float" office:value="100"/>
          </table:previous>
        </table:cell-content-change>
        <table:cell-content-change table:id="ct349">
          <table:cell-address table:column="16" table:row="225" table:table="0"/>
          <office:change-info>
            <dc:creator>Unknown Author</dc:creator>
            <dc:date>2026-06-16T06:50:33.253046000</dc:date>
          </office:change-info>
          <table:previous>
            <table:change-track-table-cell office:value-type="float" office:value="100"/>
          </table:previous>
        </table:cell-content-change>
        <table:cell-content-change table:id="ct350">
          <table:cell-address table:column="14" table:row="234" table:table="0"/>
          <office:change-info>
            <dc:creator>Unknown Author</dc:creator>
            <dc:date>2026-06-17T06:37:55.485343300</dc:date>
          </office:change-info>
          <table:previous>
            <table:change-track-table-cell/>
          </table:previous>
        </table:cell-content-change>
        <table:cell-content-change table:id="ct351">
          <table:cell-address table:column="13" table:row="237" table:table="0"/>
          <office:change-info>
            <dc:creator>Unknown Author</dc:creator>
            <dc:date>2026-06-17T06:38:36.841496100</dc:date>
          </office:change-info>
          <table:previous>
            <table:change-track-table-cell office:value-type="float" office:value="46192"/>
          </table:previous>
        </table:cell-content-change>
        <table:cell-content-change table:id="ct352">
          <table:cell-address table:column="14" table:row="237" table:table="0"/>
          <office:change-info>
            <dc:creator>Unknown Author</dc:creator>
            <dc:date>2026-06-17T06:39:17.647918200</dc:date>
          </office:change-info>
          <table:previous>
            <table:change-track-table-cell office:value-type="float" office:value="46190"/>
          </table:previous>
        </table:cell-content-change>
        <table:cell-content-change table:id="ct353">
          <table:cell-address table:column="16" table:row="232" table:table="0"/>
          <office:change-info>
            <dc:creator>Unknown Author</dc:creator>
            <dc:date>2026-06-17T06:40:12.960099800</dc:date>
          </office:change-info>
          <table:previous>
            <table:change-track-table-cell office:value-type="float" office:value="0"/>
          </table:previous>
        </table:cell-content-change>
        <table:cell-content-change table:id="ct354">
          <table:cell-address table:column="16" table:row="233" table:table="0"/>
          <office:change-info>
            <dc:creator>Unknown Author</dc:creator>
            <dc:date>2026-06-17T06:40:12.960124800</dc:date>
          </office:change-info>
          <table:previous>
            <table:change-track-table-cell office:value-type="float" office:value="0"/>
          </table:previous>
        </table:cell-content-change>
        <table:cell-content-change table:id="ct355">
          <table:cell-address table:column="16" table:row="234" table:table="0"/>
          <office:change-info>
            <dc:creator>Unknown Author</dc:creator>
            <dc:date>2026-06-17T06:40:12.960131300</dc:date>
          </office:change-info>
          <table:previous>
            <table:change-track-table-cell office:value-type="float" office:value="0"/>
          </table:previous>
        </table:cell-content-change>
        <table:cell-content-change table:id="ct356">
          <table:cell-address table:column="16" table:row="229" table:table="0"/>
          <office:change-info>
            <dc:creator>Unknown Author</dc:creator>
            <dc:date>2026-06-17T06:40:14.423526500</dc:date>
          </office:change-info>
          <table:previous>
            <table:change-track-table-cell office:value-type="float" office:value="0"/>
          </table:previous>
        </table:cell-content-change>
        <table:cell-content-change table:id="ct357">
          <table:cell-address table:column="14" table:row="225" table:table="0"/>
          <office:change-info>
            <dc:creator>Unknown Author</dc:creator>
            <dc:date>2026-06-17T06:41:48.057752000</dc:date>
          </office:change-info>
          <table:previous table:id="ct346">
            <table:change-track-table-cell office:value-type="float" office:value="265333"/>
          </table:previous>
        </table:cell-content-change>
        <table:cell-content-change table:id="ct358">
          <table:cell-address table:column="14" table:row="218" table:table="0"/>
          <office:change-info>
            <dc:creator>Unknown Author</dc:creator>
            <dc:date>2026-06-17T06:42:07.940849600</dc:date>
          </office:change-info>
          <table:previous>
            <table:change-track-table-cell office:value-type="float" office:value="265333"/>
          </table:previous>
        </table:cell-content-change>
        <table:insertion table:id="ct359" table:type="row" table:position="248" table:count="15" table:table="0">
          <office:change-info>
            <dc:creator>Unknown Author</dc:creator>
            <dc:date>2026-06-17T06:48:59.051433000</dc:date>
          </office:change-info>
          <table:dependencies>
            <table:dependency table:id="ct636"/>
            <table:dependency table:id="ct618"/>
            <table:dependency table:id="ct617"/>
            <table:dependency table:id="ct616"/>
            <table:dependency table:id="ct615"/>
            <table:dependency table:id="ct614"/>
            <table:dependency table:id="ct613"/>
            <table:dependency table:id="ct612"/>
            <table:dependency table:id="ct611"/>
            <table:dependency table:id="ct610"/>
            <table:dependency table:id="ct609"/>
            <table:dependency table:id="ct608"/>
            <table:dependency table:id="ct607"/>
            <table:dependency table:id="ct606"/>
            <table:dependency table:id="ct471"/>
            <table:dependency table:id="ct470"/>
            <table:dependency table:id="ct469"/>
            <table:dependency table:id="ct468"/>
            <table:dependency table:id="ct467"/>
            <table:dependency table:id="ct466"/>
            <table:dependency table:id="ct465"/>
            <table:dependency table:id="ct464"/>
            <table:dependency table:id="ct463"/>
            <table:dependency table:id="ct462"/>
            <table:dependency table:id="ct461"/>
            <table:dependency table:id="ct460"/>
            <table:dependency table:id="ct459"/>
            <table:dependency table:id="ct458"/>
            <table:dependency table:id="ct457"/>
            <table:dependency table:id="ct456"/>
            <table:dependency table:id="ct455"/>
            <table:dependency table:id="ct454"/>
            <table:dependency table:id="ct453"/>
            <table:dependency table:id="ct452"/>
            <table:dependency table:id="ct451"/>
            <table:dependency table:id="ct450"/>
            <table:dependency table:id="ct449"/>
            <table:dependency table:id="ct448"/>
            <table:dependency table:id="ct447"/>
            <table:dependency table:id="ct446"/>
            <table:dependency table:id="ct399"/>
            <table:dependency table:id="ct398"/>
            <table:dependency table:id="ct397"/>
            <table:dependency table:id="ct396"/>
            <table:dependency table:id="ct395"/>
            <table:dependency table:id="ct394"/>
            <table:dependency table:id="ct393"/>
            <table:dependency table:id="ct392"/>
            <table:dependency table:id="ct391"/>
            <table:dependency table:id="ct390"/>
            <table:dependency table:id="ct389"/>
            <table:dependency table:id="ct388"/>
            <table:dependency table:id="ct387"/>
            <table:dependency table:id="ct386"/>
            <table:dependency table:id="ct385"/>
            <table:dependency table:id="ct383"/>
            <table:dependency table:id="ct382"/>
            <table:dependency table:id="ct381"/>
            <table:dependency table:id="ct380"/>
            <table:dependency table:id="ct379"/>
            <table:dependency table:id="ct378"/>
            <table:dependency table:id="ct377"/>
            <table:dependency table:id="ct376"/>
            <table:dependency table:id="ct375"/>
            <table:dependency table:id="ct374"/>
            <table:dependency table:id="ct373"/>
            <table:dependency table:id="ct372"/>
            <table:dependency table:id="ct371"/>
            <table:dependency table:id="ct370"/>
            <table:dependency table:id="ct369"/>
            <table:dependency table:id="ct368"/>
            <table:dependency table:id="ct367"/>
            <table:dependency table:id="ct366"/>
            <table:dependency table:id="ct365"/>
            <table:dependency table:id="ct364"/>
            <table:dependency table:id="ct363"/>
            <table:dependency table:id="ct362"/>
            <table:dependency table:id="ct361"/>
            <table:dependency table:id="ct360"/>
          </table:dependencies>
        </table:insertion>
        <table:movement table:id="ct360">
          <table:source-range-address table:start-column="3" table:start-row="228" table:start-table="0" table:end-column="17" table:end-row="227" table:end-table="0"/>
          <table:target-range-address table:start-column="3" table:start-row="249" table:start-table="0" table:end-column="17" table:end-row="261" table:end-table="0"/>
          <office:change-info>
            <dc:creator>Unknown Author</dc:creator>
            <dc:date>2026-06-17T06:49:23.078314800</dc:date>
          </office:change-info>
          <table:dependencies>
            <table:dependency table:id="ct444"/>
            <table:dependency table:id="ct443"/>
            <table:dependency table:id="ct442"/>
            <table:dependency table:id="ct441"/>
            <table:dependency table:id="ct440"/>
            <table:dependency table:id="ct439"/>
            <table:dependency table:id="ct438"/>
            <table:dependency table:id="ct437"/>
            <table:dependency table:id="ct436"/>
            <table:dependency table:id="ct435"/>
            <table:dependency table:id="ct434"/>
            <table:dependency table:id="ct433"/>
            <table:dependency table:id="ct432"/>
          </table:dependencies>
        </table:movement>
        <table:deletion table:id="ct361" table:type="row" table:position="268" table:table="0" table:multi-deletion-spanned="7">
          <office:change-info>
            <dc:creator>Unknown Author</dc:creator>
            <dc:date>2026-06-17T06:49:34.606749800</dc:date>
          </office:change-info>
          <table:deletions>
            <table:change-deletion table:id="ct704"/>
            <table:change-deletion table:id="ct701"/>
          </table:deletions>
        </table:deletion>
        <table:deletion table:id="ct362" table:type="row" table:position="268" table:table="0">
          <office:change-info>
            <dc:creator>Unknown Author</dc:creator>
            <dc:date>2026-06-17T06:49:34.606842400</dc:date>
          </office:change-info>
          <table:deletions>
            <table:change-deletion table:id="ct361"/>
          </table:deletions>
        </table:deletion>
        <table:deletion table:id="ct363" table:type="row" table:position="268" table:table="0">
          <office:change-info>
            <dc:creator>Unknown Author</dc:creator>
            <dc:date>2026-06-17T06:49:34.606871900</dc:date>
          </office:change-info>
          <table:deletions>
            <table:change-deletion table:id="ct362"/>
          </table:deletions>
        </table:deletion>
        <table:deletion table:id="ct364" table:type="row" table:position="268" table:table="0">
          <office:change-info>
            <dc:creator>Unknown Author</dc:creator>
            <dc:date>2026-06-17T06:49:34.606898900</dc:date>
          </office:change-info>
          <table:deletions>
            <table:change-deletion table:id="ct363"/>
          </table:deletions>
        </table:deletion>
        <table:deletion table:id="ct365" table:type="row" table:position="268" table:table="0">
          <office:change-info>
            <dc:creator>Unknown Author</dc:creator>
            <dc:date>2026-06-17T06:49:34.606926300</dc:date>
          </office:change-info>
          <table:deletions>
            <table:change-deletion table:id="ct364"/>
          </table:deletions>
        </table:deletion>
        <table:deletion table:id="ct366" table:type="row" table:position="268" table:table="0">
          <office:change-info>
            <dc:creator>Unknown Author</dc:creator>
            <dc:date>2026-06-17T06:49:34.606953000</dc:date>
          </office:change-info>
          <table:deletions>
            <table:change-deletion table:id="ct365"/>
          </table:deletions>
        </table:deletion>
        <table:deletion table:id="ct367" table:type="row" table:position="268" table:table="0">
          <office:change-info>
            <dc:creator>Unknown Author</dc:creator>
            <dc:date>2026-06-17T06:49:34.606979700</dc:date>
          </office:change-info>
          <table:deletions>
            <table:change-deletion table:id="ct366"/>
          </table:deletions>
        </table:deletion>
        <table:deletion table:id="ct368" table:type="row" table:position="268" table:table="0">
          <office:change-info>
            <dc:creator>Unknown Author</dc:creator>
            <dc:date>2026-06-17T06:49:39.957452800</dc:date>
          </office:change-info>
          <table:deletions>
            <table:change-deletion table:id="ct367"/>
          </table:deletions>
          <table:cut-offs>
            <table:insertion-cut-off table:id="ct359" table:position="-1"/>
          </table:cut-offs>
        </table:deletion>
        <table:cell-content-change table:id="ct369">
          <table:cell-address table:column="2" table:row="248" table:table="0"/>
          <office:change-info>
            <dc:creator>Unknown Author</dc:creator>
            <dc:date>2026-06-17T06:49:52.799141900</dc:date>
          </office:change-info>
          <table:previous>
            <table:change-track-table-cell/>
          </table:previous>
        </table:cell-content-change>
        <table:cell-content-change table:id="ct370">
          <table:cell-address table:column="2" table:row="249" table:table="0"/>
          <office:change-info>
            <dc:creator>Unknown Author</dc:creator>
            <dc:date>2026-06-17T06:49:52.799165400</dc:date>
          </office:change-info>
          <table:previous>
            <table:change-track-table-cell/>
          </table:previous>
        </table:cell-content-change>
        <table:cell-content-change table:id="ct371">
          <table:cell-address table:column="2" table:row="250" table:table="0"/>
          <office:change-info>
            <dc:creator>Unknown Author</dc:creator>
            <dc:date>2026-06-17T06:49:52.799175900</dc:date>
          </office:change-info>
          <table:previous>
            <table:change-track-table-cell/>
          </table:previous>
        </table:cell-content-change>
        <table:cell-content-change table:id="ct372">
          <table:cell-address table:column="2" table:row="251" table:table="0"/>
          <office:change-info>
            <dc:creator>Unknown Author</dc:creator>
            <dc:date>2026-06-17T06:49:52.799186600</dc:date>
          </office:change-info>
          <table:previous>
            <table:change-track-table-cell/>
          </table:previous>
        </table:cell-content-change>
        <table:cell-content-change table:id="ct373">
          <table:cell-address table:column="2" table:row="252" table:table="0"/>
          <office:change-info>
            <dc:creator>Unknown Author</dc:creator>
            <dc:date>2026-06-17T06:49:52.799197300</dc:date>
          </office:change-info>
          <table:previous>
            <table:change-track-table-cell/>
          </table:previous>
        </table:cell-content-change>
        <table:cell-content-change table:id="ct374">
          <table:cell-address table:column="2" table:row="253" table:table="0"/>
          <office:change-info>
            <dc:creator>Unknown Author</dc:creator>
            <dc:date>2026-06-17T06:49:52.799206300</dc:date>
          </office:change-info>
          <table:previous>
            <table:change-track-table-cell/>
          </table:previous>
        </table:cell-content-change>
        <table:cell-content-change table:id="ct375">
          <table:cell-address table:column="2" table:row="254" table:table="0"/>
          <office:change-info>
            <dc:creator>Unknown Author</dc:creator>
            <dc:date>2026-06-17T06:49:52.799215100</dc:date>
          </office:change-info>
          <table:previous>
            <table:change-track-table-cell/>
          </table:previous>
        </table:cell-content-change>
        <table:cell-content-change table:id="ct376">
          <table:cell-address table:column="2" table:row="255" table:table="0"/>
          <office:change-info>
            <dc:creator>Unknown Author</dc:creator>
            <dc:date>2026-06-17T06:49:52.799224100</dc:date>
          </office:change-info>
          <table:previous>
            <table:change-track-table-cell/>
          </table:previous>
        </table:cell-content-change>
        <table:cell-content-change table:id="ct377">
          <table:cell-address table:column="2" table:row="256" table:table="0"/>
          <office:change-info>
            <dc:creator>Unknown Author</dc:creator>
            <dc:date>2026-06-17T06:49:52.799233500</dc:date>
          </office:change-info>
          <table:previous>
            <table:change-track-table-cell/>
          </table:previous>
        </table:cell-content-change>
        <table:cell-content-change table:id="ct378">
          <table:cell-address table:column="2" table:row="257" table:table="0"/>
          <office:change-info>
            <dc:creator>Unknown Author</dc:creator>
            <dc:date>2026-06-17T06:49:52.799242400</dc:date>
          </office:change-info>
          <table:previous>
            <table:change-track-table-cell/>
          </table:previous>
        </table:cell-content-change>
        <table:cell-content-change table:id="ct379">
          <table:cell-address table:column="2" table:row="258" table:table="0"/>
          <office:change-info>
            <dc:creator>Unknown Author</dc:creator>
            <dc:date>2026-06-17T06:49:52.799250900</dc:date>
          </office:change-info>
          <table:previous>
            <table:change-track-table-cell/>
          </table:previous>
        </table:cell-content-change>
        <table:cell-content-change table:id="ct380">
          <table:cell-address table:column="2" table:row="259" table:table="0"/>
          <office:change-info>
            <dc:creator>Unknown Author</dc:creator>
            <dc:date>2026-06-17T06:49:52.799263600</dc:date>
          </office:change-info>
          <table:previous>
            <table:change-track-table-cell/>
          </table:previous>
        </table:cell-content-change>
        <table:cell-content-change table:id="ct381">
          <table:cell-address table:column="2" table:row="260" table:table="0"/>
          <office:change-info>
            <dc:creator>Unknown Author</dc:creator>
            <dc:date>2026-06-17T06:49:52.799271500</dc:date>
          </office:change-info>
          <table:previous>
            <table:change-track-table-cell/>
          </table:previous>
        </table:cell-content-change>
        <table:cell-content-change table:id="ct382">
          <table:cell-address table:column="2" table:row="261" table:table="0"/>
          <office:change-info>
            <dc:creator>Unknown Author</dc:creator>
            <dc:date>2026-06-17T06:49:52.799279500</dc:date>
          </office:change-info>
          <table:previous>
            <table:change-track-table-cell/>
          </table:previous>
        </table:cell-content-change>
        <table:cell-content-change table:id="ct383">
          <table:cell-address table:column="2" table:row="262" table:table="0"/>
          <office:change-info>
            <dc:creator>Unknown Author</dc:creator>
            <dc:date>2026-06-17T06:49:52.799287500</dc:date>
          </office:change-info>
          <table:previous>
            <table:change-track-table-cell/>
          </table:previous>
        </table:cell-content-change>
        <table:cell-content-change table:id="ct384">
          <table:cell-address table:column="2" table:row="268" table:table="0"/>
          <office:change-info>
            <dc:creator>Unknown Author</dc:creator>
            <dc:date>2026-06-17T06:49:52.799300200</dc:date>
          </office:change-info>
          <table:previous>
            <table:change-track-table-cell table:cell-address="WBS.C269" table:formula="of:=IF(AND([.$D269]&lt;&gt;&quot;&quot;;[.$D269]&lt;&gt;&quot;○&quot;);MAX([.$C$3:.$C248])+1;[.$C248])" office:value-type="float" office:value="11"/>
          </table:previous>
        </table:cell-content-change>
        <table:cell-content-change table:id="ct385">
          <table:cell-address table:column="1" table:row="248" table:table="0"/>
          <office:change-info>
            <dc:creator>Unknown Author</dc:creator>
            <dc:date>2026-06-17T06:50:02.364509100</dc:date>
          </office:change-info>
          <table:previous>
            <table:change-track-table-cell/>
          </table:previous>
        </table:cell-content-change>
        <table:cell-content-change table:id="ct386">
          <table:cell-address table:column="1" table:row="249" table:table="0"/>
          <office:change-info>
            <dc:creator>Unknown Author</dc:creator>
            <dc:date>2026-06-17T06:50:02.364532400</dc:date>
          </office:change-info>
          <table:previous>
            <table:change-track-table-cell/>
          </table:previous>
        </table:cell-content-change>
        <table:cell-content-change table:id="ct387">
          <table:cell-address table:column="1" table:row="250" table:table="0"/>
          <office:change-info>
            <dc:creator>Unknown Author</dc:creator>
            <dc:date>2026-06-17T06:50:02.364541200</dc:date>
          </office:change-info>
          <table:previous>
            <table:change-track-table-cell/>
          </table:previous>
        </table:cell-content-change>
        <table:cell-content-change table:id="ct388">
          <table:cell-address table:column="1" table:row="251" table:table="0"/>
          <office:change-info>
            <dc:creator>Unknown Author</dc:creator>
            <dc:date>2026-06-17T06:50:02.364550100</dc:date>
          </office:change-info>
          <table:previous>
            <table:change-track-table-cell/>
          </table:previous>
        </table:cell-content-change>
        <table:cell-content-change table:id="ct389">
          <table:cell-address table:column="1" table:row="252" table:table="0"/>
          <office:change-info>
            <dc:creator>Unknown Author</dc:creator>
            <dc:date>2026-06-17T06:50:02.364558800</dc:date>
          </office:change-info>
          <table:previous>
            <table:change-track-table-cell/>
          </table:previous>
        </table:cell-content-change>
        <table:cell-content-change table:id="ct390">
          <table:cell-address table:column="1" table:row="253" table:table="0"/>
          <office:change-info>
            <dc:creator>Unknown Author</dc:creator>
            <dc:date>2026-06-17T06:50:02.364566700</dc:date>
          </office:change-info>
          <table:previous>
            <table:change-track-table-cell/>
          </table:previous>
        </table:cell-content-change>
        <table:cell-content-change table:id="ct391">
          <table:cell-address table:column="1" table:row="254" table:table="0"/>
          <office:change-info>
            <dc:creator>Unknown Author</dc:creator>
            <dc:date>2026-06-17T06:50:02.364575000</dc:date>
          </office:change-info>
          <table:previous>
            <table:change-track-table-cell/>
          </table:previous>
        </table:cell-content-change>
        <table:cell-content-change table:id="ct392">
          <table:cell-address table:column="1" table:row="255" table:table="0"/>
          <office:change-info>
            <dc:creator>Unknown Author</dc:creator>
            <dc:date>2026-06-17T06:50:02.364583000</dc:date>
          </office:change-info>
          <table:previous>
            <table:change-track-table-cell/>
          </table:previous>
        </table:cell-content-change>
        <table:cell-content-change table:id="ct393">
          <table:cell-address table:column="1" table:row="256" table:table="0"/>
          <office:change-info>
            <dc:creator>Unknown Author</dc:creator>
            <dc:date>2026-06-17T06:50:02.364591000</dc:date>
          </office:change-info>
          <table:previous>
            <table:change-track-table-cell/>
          </table:previous>
        </table:cell-content-change>
        <table:cell-content-change table:id="ct394">
          <table:cell-address table:column="1" table:row="257" table:table="0"/>
          <office:change-info>
            <dc:creator>Unknown Author</dc:creator>
            <dc:date>2026-06-17T06:50:02.364599300</dc:date>
          </office:change-info>
          <table:previous>
            <table:change-track-table-cell/>
          </table:previous>
        </table:cell-content-change>
        <table:cell-content-change table:id="ct395">
          <table:cell-address table:column="1" table:row="258" table:table="0"/>
          <office:change-info>
            <dc:creator>Unknown Author</dc:creator>
            <dc:date>2026-06-17T06:50:02.364607500</dc:date>
          </office:change-info>
          <table:previous>
            <table:change-track-table-cell/>
          </table:previous>
        </table:cell-content-change>
        <table:cell-content-change table:id="ct396">
          <table:cell-address table:column="1" table:row="259" table:table="0"/>
          <office:change-info>
            <dc:creator>Unknown Author</dc:creator>
            <dc:date>2026-06-17T06:50:02.364615800</dc:date>
          </office:change-info>
          <table:previous>
            <table:change-track-table-cell/>
          </table:previous>
        </table:cell-content-change>
        <table:cell-content-change table:id="ct397">
          <table:cell-address table:column="1" table:row="260" table:table="0"/>
          <office:change-info>
            <dc:creator>Unknown Author</dc:creator>
            <dc:date>2026-06-17T06:50:02.364624000</dc:date>
          </office:change-info>
          <table:previous>
            <table:change-track-table-cell/>
          </table:previous>
        </table:cell-content-change>
        <table:cell-content-change table:id="ct398">
          <table:cell-address table:column="1" table:row="261" table:table="0"/>
          <office:change-info>
            <dc:creator>Unknown Author</dc:creator>
            <dc:date>2026-06-17T06:50:02.364632100</dc:date>
          </office:change-info>
          <table:previous>
            <table:change-track-table-cell/>
          </table:previous>
        </table:cell-content-change>
        <table:cell-content-change table:id="ct399">
          <table:cell-address table:column="1" table:row="262" table:table="0"/>
          <office:change-info>
            <dc:creator>Unknown Author</dc:creator>
            <dc:date>2026-06-17T06:50:02.364641300</dc:date>
          </office:change-info>
          <table:previous>
            <table:change-track-table-cell/>
          </table:previous>
        </table:cell-content-change>
        <table:cell-content-change table:id="ct400">
          <table:cell-address table:column="1" table:row="268" table:table="0"/>
          <office:change-info>
            <dc:creator>Unknown Author</dc:creator>
            <dc:date>2026-06-17T06:50:02.364656600</dc:date>
          </office:change-info>
          <table:previous>
            <table:change-track-table-cell table:cell-address="WBS.B269" table:formula="of:=IF(AND([.$D269]&lt;&gt;&quot;&quot;;[.$F269]=&quot;&quot;);&quot;E&quot;&amp;ROW();[.$B172])" office:value-type="string">
              <text:p>E153</text:p>
            </table:change-track-table-cell>
          </table:previous>
        </table:cell-content-change>
        <table:cell-content-change table:id="ct401">
          <table:cell-address table:column="1" table:row="269" table:table="0"/>
          <office:change-info>
            <dc:creator>Unknown Author</dc:creator>
            <dc:date>2026-06-17T06:50:02.364670000</dc:date>
          </office:change-info>
          <table:previous>
            <table:change-track-table-cell table:cell-address="WBS.B270" table:formula="of:=IF(AND([.$D270]&lt;&gt;&quot;&quot;;[.$F270]=&quot;&quot;);&quot;E&quot;&amp;ROW();[.$B173])" office:value-type="string">
              <text:p>E270</text:p>
            </table:change-track-table-cell>
          </table:previous>
        </table:cell-content-change>
        <table:cell-content-change table:id="ct402">
          <table:cell-address table:column="1" table:row="270" table:table="0"/>
          <office:change-info>
            <dc:creator>Unknown Author</dc:creator>
            <dc:date>2026-06-17T06:50:02.364682400</dc:date>
          </office:change-info>
          <table:previous>
            <table:change-track-table-cell table:cell-address="WBS.B271" table:formula="of:=IF(AND([.$D271]&lt;&gt;&quot;&quot;;[.$F271]=&quot;&quot;);&quot;E&quot;&amp;ROW();[.$B174])" office:value-type="string">
              <text:p>E153</text:p>
            </table:change-track-table-cell>
          </table:previous>
        </table:cell-content-change>
        <table:cell-content-change table:id="ct403">
          <table:cell-address table:column="1" table:row="271" table:table="0"/>
          <office:change-info>
            <dc:creator>Unknown Author</dc:creator>
            <dc:date>2026-06-17T06:50:02.364694900</dc:date>
          </office:change-info>
          <table:previous>
            <table:change-track-table-cell table:cell-address="WBS.B272" table:formula="of:=IF(AND([.$D272]&lt;&gt;&quot;&quot;;[.$F272]=&quot;&quot;);&quot;E&quot;&amp;ROW();[.$B175])" office:value-type="string">
              <text:p>E153</text:p>
            </table:change-track-table-cell>
          </table:previous>
        </table:cell-content-change>
        <table:cell-content-change table:id="ct404">
          <table:cell-address table:column="1" table:row="272" table:table="0"/>
          <office:change-info>
            <dc:creator>Unknown Author</dc:creator>
            <dc:date>2026-06-17T06:50:02.364707100</dc:date>
          </office:change-info>
          <table:previous>
            <table:change-track-table-cell table:cell-address="WBS.B273" table:formula="of:=IF(AND([.$D273]&lt;&gt;&quot;&quot;;[.$F273]=&quot;&quot;);&quot;E&quot;&amp;ROW();[.$B176])" office:value-type="string">
              <text:p>E153</text:p>
            </table:change-track-table-cell>
          </table:previous>
        </table:cell-content-change>
        <table:cell-content-change table:id="ct405">
          <table:cell-address table:column="1" table:row="273" table:table="0"/>
          <office:change-info>
            <dc:creator>Unknown Author</dc:creator>
            <dc:date>2026-06-17T06:50:02.364719700</dc:date>
          </office:change-info>
          <table:previous>
            <table:change-track-table-cell table:cell-address="WBS.B274" table:formula="of:=IF(AND([.$D274]&lt;&gt;&quot;&quot;;[.$F274]=&quot;&quot;);&quot;E&quot;&amp;ROW();[.$B177])" office:value-type="string">
              <text:p>E153</text:p>
            </table:change-track-table-cell>
          </table:previous>
        </table:cell-content-change>
        <table:cell-content-change table:id="ct406">
          <table:cell-address table:column="1" table:row="274" table:table="0"/>
          <office:change-info>
            <dc:creator>Unknown Author</dc:creator>
            <dc:date>2026-06-17T06:50:02.364733200</dc:date>
          </office:change-info>
          <table:previous>
            <table:change-track-table-cell table:cell-address="WBS.B275" table:formula="of:=IF(AND([.$D275]&lt;&gt;&quot;&quot;;[.$F275]=&quot;&quot;);&quot;E&quot;&amp;ROW();[.$B178])" office:value-type="string">
              <text:p>E153</text:p>
            </table:change-track-table-cell>
          </table:previous>
        </table:cell-content-change>
        <table:cell-content-change table:id="ct407">
          <table:cell-address table:column="1" table:row="275" table:table="0"/>
          <office:change-info>
            <dc:creator>Unknown Author</dc:creator>
            <dc:date>2026-06-17T06:50:02.364746000</dc:date>
          </office:change-info>
          <table:previous>
            <table:change-track-table-cell table:cell-address="WBS.B276" table:formula="of:=IF(AND([.$D276]&lt;&gt;&quot;&quot;;[.$F276]=&quot;&quot;);&quot;E&quot;&amp;ROW();[.$B179])" office:value-type="string">
              <text:p>E153</text:p>
            </table:change-track-table-cell>
          </table:previous>
        </table:cell-content-change>
        <table:cell-content-change table:id="ct408">
          <table:cell-address table:column="1" table:row="276" table:table="0"/>
          <office:change-info>
            <dc:creator>Unknown Author</dc:creator>
            <dc:date>2026-06-17T06:50:02.364758300</dc:date>
          </office:change-info>
          <table:previous>
            <table:change-track-table-cell table:cell-address="WBS.B277" table:formula="of:=IF(AND([.$D277]&lt;&gt;&quot;&quot;;[.$F277]=&quot;&quot;);&quot;E&quot;&amp;ROW();[.$B180])" office:value-type="string">
              <text:p>E153</text:p>
            </table:change-track-table-cell>
          </table:previous>
        </table:cell-content-change>
        <table:cell-content-change table:id="ct409">
          <table:cell-address table:column="1" table:row="278" table:table="0"/>
          <office:change-info>
            <dc:creator>Unknown Author</dc:creator>
            <dc:date>2026-06-17T06:50:02.364771500</dc:date>
          </office:change-info>
          <table:previous>
            <table:change-track-table-cell table:cell-address="WBS.B279" table:formula="of:=IF(AND([.$D279]&lt;&gt;&quot;&quot;;[.$F279]=&quot;&quot;);&quot;E&quot;&amp;ROW();[.$B181])" office:value-type="string">
              <text:p>E153</text:p>
            </table:change-track-table-cell>
          </table:previous>
        </table:cell-content-change>
        <table:cell-content-change table:id="ct410">
          <table:cell-address table:column="1" table:row="279" table:table="0"/>
          <office:change-info>
            <dc:creator>Unknown Author</dc:creator>
            <dc:date>2026-06-17T06:50:02.364785000</dc:date>
          </office:change-info>
          <table:previous>
            <table:change-track-table-cell table:cell-address="WBS.B280" table:formula="of:=IF(AND([.$D280]&lt;&gt;&quot;&quot;;[.$F280]=&quot;&quot;);&quot;E&quot;&amp;ROW();[.$B181])" office:value-type="string">
              <text:p>E153</text:p>
            </table:change-track-table-cell>
          </table:previous>
        </table:cell-content-change>
        <table:cell-content-change table:id="ct411">
          <table:cell-address table:column="1" table:row="280" table:table="0"/>
          <office:change-info>
            <dc:creator>Unknown Author</dc:creator>
            <dc:date>2026-06-17T06:50:02.364799300</dc:date>
          </office:change-info>
          <table:previous>
            <table:change-track-table-cell table:cell-address="WBS.B281" table:formula="of:=IF(AND([.$D281]&lt;&gt;&quot;&quot;;[.$D281]=&quot;&quot;);&quot;E&quot;&amp;ROW();[.$B182])" office:value-type="string">
              <text:p>E153</text:p>
            </table:change-track-table-cell>
          </table:previous>
        </table:cell-content-change>
        <table:cell-content-change table:id="ct412">
          <table:cell-address table:column="1" table:row="281" table:table="0"/>
          <office:change-info>
            <dc:creator>Unknown Author</dc:creator>
            <dc:date>2026-06-17T06:50:02.364812500</dc:date>
          </office:change-info>
          <table:previous>
            <table:change-track-table-cell table:cell-address="WBS.B282" table:formula="of:=IF(AND([.$D282]&lt;&gt;&quot;&quot;;[.$F282]=&quot;&quot;);&quot;E&quot;&amp;ROW();[.$B183])" office:value-type="string">
              <text:p>E153</text:p>
            </table:change-track-table-cell>
          </table:previous>
        </table:cell-content-change>
        <table:cell-content-change table:id="ct413">
          <table:cell-address table:column="1" table:row="282" table:table="0"/>
          <office:change-info>
            <dc:creator>Unknown Author</dc:creator>
            <dc:date>2026-06-17T06:50:02.364825300</dc:date>
          </office:change-info>
          <table:previous>
            <table:change-track-table-cell table:cell-address="WBS.B283" table:formula="of:=IF(AND([.$D283]&lt;&gt;&quot;&quot;;[.$F283]=&quot;&quot;);&quot;E&quot;&amp;ROW();[.$B184])" office:value-type="string">
              <text:p>E153</text:p>
            </table:change-track-table-cell>
          </table:previous>
        </table:cell-content-change>
        <table:cell-content-change table:id="ct414">
          <table:cell-address table:column="1" table:row="283" table:table="0"/>
          <office:change-info>
            <dc:creator>Unknown Author</dc:creator>
            <dc:date>2026-06-17T06:50:02.364837700</dc:date>
          </office:change-info>
          <table:previous>
            <table:change-track-table-cell table:cell-address="WBS.B284" table:formula="of:=IF(AND([.$D284]&lt;&gt;&quot;&quot;;[.$F284]=&quot;&quot;);&quot;E&quot;&amp;ROW();[.$B185])" office:value-type="string">
              <text:p>E153</text:p>
            </table:change-track-table-cell>
          </table:previous>
        </table:cell-content-change>
        <table:cell-content-change table:id="ct415">
          <table:cell-address table:column="1" table:row="284" table:table="0"/>
          <office:change-info>
            <dc:creator>Unknown Author</dc:creator>
            <dc:date>2026-06-17T06:50:02.364850400</dc:date>
          </office:change-info>
          <table:previous>
            <table:change-track-table-cell table:cell-address="WBS.B285" table:formula="of:=IF(AND([.$D285]&lt;&gt;&quot;&quot;;[.$F285]=&quot;&quot;);&quot;E&quot;&amp;ROW();[.$B186])" office:value-type="string">
              <text:p>E153</text:p>
            </table:change-track-table-cell>
          </table:previous>
        </table:cell-content-change>
        <table:cell-content-change table:id="ct416">
          <table:cell-address table:column="1" table:row="285" table:table="0"/>
          <office:change-info>
            <dc:creator>Unknown Author</dc:creator>
            <dc:date>2026-06-17T06:50:02.364862800</dc:date>
          </office:change-info>
          <table:previous>
            <table:change-track-table-cell table:cell-address="WBS.B286" table:formula="of:=IF(AND([.$D286]&lt;&gt;&quot;&quot;;[.$F286]=&quot;&quot;);&quot;E&quot;&amp;ROW();[.$B187])" office:value-type="string">
              <text:p>E153</text:p>
            </table:change-track-table-cell>
          </table:previous>
        </table:cell-content-change>
        <table:cell-content-change table:id="ct417">
          <table:cell-address table:column="1" table:row="286" table:table="0"/>
          <office:change-info>
            <dc:creator>Unknown Author</dc:creator>
            <dc:date>2026-06-17T06:50:02.364875700</dc:date>
          </office:change-info>
          <table:previous>
            <table:change-track-table-cell table:cell-address="WBS.B287" table:formula="of:=IF(AND([.$D287]&lt;&gt;&quot;&quot;;[.$F287]=&quot;&quot;);&quot;E&quot;&amp;ROW();[.$B188])" office:value-type="string">
              <text:p>E153</text:p>
            </table:change-track-table-cell>
          </table:previous>
        </table:cell-content-change>
        <table:cell-content-change table:id="ct418">
          <table:cell-address table:column="1" table:row="287" table:table="0"/>
          <office:change-info>
            <dc:creator>Unknown Author</dc:creator>
            <dc:date>2026-06-17T06:50:02.364888200</dc:date>
          </office:change-info>
          <table:previous>
            <table:change-track-table-cell table:cell-address="WBS.B288" table:formula="of:=IF(AND([.$D288]&lt;&gt;&quot;&quot;;[.$F288]=&quot;&quot;);&quot;E&quot;&amp;ROW();[.$B189])" office:value-type="string">
              <text:p>E153</text:p>
            </table:change-track-table-cell>
          </table:previous>
        </table:cell-content-change>
        <table:cell-content-change table:id="ct419">
          <table:cell-address table:column="1" table:row="288" table:table="0"/>
          <office:change-info>
            <dc:creator>Unknown Author</dc:creator>
            <dc:date>2026-06-17T06:50:02.364900900</dc:date>
          </office:change-info>
          <table:previous>
            <table:change-track-table-cell table:cell-address="WBS.B289" table:formula="of:=IF(AND([.$D289]&lt;&gt;&quot;&quot;;[.$F289]=&quot;&quot;);&quot;E&quot;&amp;ROW();[.$B190])" office:value-type="string">
              <text:p>E91</text:p>
            </table:change-track-table-cell>
          </table:previous>
        </table:cell-content-change>
        <table:cell-content-change table:id="ct420">
          <table:cell-address table:column="1" table:row="289" table:table="0"/>
          <office:change-info>
            <dc:creator>Unknown Author</dc:creator>
            <dc:date>2026-06-17T06:50:02.364913400</dc:date>
          </office:change-info>
          <table:previous>
            <table:change-track-table-cell table:cell-address="WBS.B290" table:formula="of:=IF(AND([.$D290]&lt;&gt;&quot;&quot;;[.$F290]=&quot;&quot;);&quot;E&quot;&amp;ROW();[.$B191])" office:value-type="string">
              <text:p>E91</text:p>
            </table:change-track-table-cell>
          </table:previous>
        </table:cell-content-change>
        <table:cell-content-change table:id="ct421">
          <table:cell-address table:column="1" table:row="290" table:table="0"/>
          <office:change-info>
            <dc:creator>Unknown Author</dc:creator>
            <dc:date>2026-06-17T06:50:02.364926700</dc:date>
          </office:change-info>
          <table:previous>
            <table:change-track-table-cell table:cell-address="WBS.B291" table:formula="of:=IF(AND([.$D291]&lt;&gt;&quot;&quot;;[.$F291]=&quot;&quot;);&quot;E&quot;&amp;ROW();[.$B192])" office:value-type="string">
              <text:p>E91</text:p>
            </table:change-track-table-cell>
          </table:previous>
        </table:cell-content-change>
        <table:cell-content-change table:id="ct422">
          <table:cell-address table:column="1" table:row="291" table:table="0"/>
          <office:change-info>
            <dc:creator>Unknown Author</dc:creator>
            <dc:date>2026-06-17T06:50:02.364938800</dc:date>
          </office:change-info>
          <table:previous>
            <table:change-track-table-cell table:cell-address="WBS.B292" table:formula="of:=IF(AND([.$D292]&lt;&gt;&quot;&quot;;[.$F292]=&quot;&quot;);&quot;E&quot;&amp;ROW();[.$B193])" office:value-type="string">
              <text:p>E115</text:p>
            </table:change-track-table-cell>
          </table:previous>
        </table:cell-content-change>
        <table:cell-content-change table:id="ct423">
          <table:cell-address table:column="1" table:row="292" table:table="0"/>
          <office:change-info>
            <dc:creator>Unknown Author</dc:creator>
            <dc:date>2026-06-17T06:50:02.364951700</dc:date>
          </office:change-info>
          <table:previous>
            <table:change-track-table-cell table:cell-address="WBS.B293" table:formula="of:=IF(AND([.$D293]&lt;&gt;&quot;&quot;;[.$F293]=&quot;&quot;);&quot;E&quot;&amp;ROW();[.$B194])" office:value-type="string">
              <text:p>E115</text:p>
            </table:change-track-table-cell>
          </table:previous>
        </table:cell-content-change>
        <table:cell-content-change table:id="ct424">
          <table:cell-address table:column="1" table:row="293" table:table="0"/>
          <office:change-info>
            <dc:creator>Unknown Author</dc:creator>
            <dc:date>2026-06-17T06:50:02.364964100</dc:date>
          </office:change-info>
          <table:previous>
            <table:change-track-table-cell table:cell-address="WBS.B294" table:formula="of:=IF(AND([.$D294]&lt;&gt;&quot;&quot;;[.$F294]=&quot;&quot;);&quot;E&quot;&amp;ROW();[.$B195])" office:value-type="string">
              <text:p>E115</text:p>
            </table:change-track-table-cell>
          </table:previous>
        </table:cell-content-change>
        <table:cell-content-change table:id="ct425">
          <table:cell-address table:column="1" table:row="294" table:table="0"/>
          <office:change-info>
            <dc:creator>Unknown Author</dc:creator>
            <dc:date>2026-06-17T06:50:02.364976100</dc:date>
          </office:change-info>
          <table:previous>
            <table:change-track-table-cell table:cell-address="WBS.B295" table:formula="of:=IF(AND([.$D295]&lt;&gt;&quot;&quot;;[.$F295]=&quot;&quot;);&quot;E&quot;&amp;ROW();[.$B196])" office:value-type="string">
              <text:p>E196</text:p>
            </table:change-track-table-cell>
          </table:previous>
        </table:cell-content-change>
        <table:cell-content-change table:id="ct426">
          <table:cell-address table:column="1" table:row="295" table:table="0"/>
          <office:change-info>
            <dc:creator>Unknown Author</dc:creator>
            <dc:date>2026-06-17T06:50:02.364988600</dc:date>
          </office:change-info>
          <table:previous>
            <table:change-track-table-cell table:cell-address="WBS.B296" table:formula="of:=IF(AND([.$D296]&lt;&gt;&quot;&quot;;[.$F296]=&quot;&quot;);&quot;E&quot;&amp;ROW();[.$B197])" office:value-type="string">
              <text:p>E115</text:p>
            </table:change-track-table-cell>
          </table:previous>
        </table:cell-content-change>
        <table:cell-content-change table:id="ct427">
          <table:cell-address table:column="1" table:row="296" table:table="0"/>
          <office:change-info>
            <dc:creator>Unknown Author</dc:creator>
            <dc:date>2026-06-17T06:50:02.365001300</dc:date>
          </office:change-info>
          <table:previous>
            <table:change-track-table-cell table:cell-address="WBS.B297" table:formula="of:=IF(AND([.$D297]&lt;&gt;&quot;&quot;;[.$F297]=&quot;&quot;);&quot;E&quot;&amp;ROW();[.$B198])" office:value-type="string">
              <text:p>E115</text:p>
            </table:change-track-table-cell>
          </table:previous>
        </table:cell-content-change>
        <table:cell-content-change table:id="ct428">
          <table:cell-address table:column="1" table:row="297" table:table="0"/>
          <office:change-info>
            <dc:creator>Unknown Author</dc:creator>
            <dc:date>2026-06-17T06:50:02.365013700</dc:date>
          </office:change-info>
          <table:previous>
            <table:change-track-table-cell table:cell-address="WBS.B298" table:formula="of:=IF(AND([.$D298]&lt;&gt;&quot;&quot;;[.$F298]=&quot;&quot;);&quot;E&quot;&amp;ROW();[.$B199])" office:value-type="string">
              <text:p>E115</text:p>
            </table:change-track-table-cell>
          </table:previous>
        </table:cell-content-change>
        <table:cell-content-change table:id="ct429">
          <table:cell-address table:column="1" table:row="298" table:table="0"/>
          <office:change-info>
            <dc:creator>Unknown Author</dc:creator>
            <dc:date>2026-06-17T06:50:02.365025800</dc:date>
          </office:change-info>
          <table:previous>
            <table:change-track-table-cell table:cell-address="WBS.B299" table:formula="of:=IF(AND([.$D299]&lt;&gt;&quot;&quot;;[.$F299]=&quot;&quot;);&quot;E&quot;&amp;ROW();[.$B200])" office:value-type="string">
              <text:p>E115</text:p>
            </table:change-track-table-cell>
          </table:previous>
        </table:cell-content-change>
        <table:cell-content-change table:id="ct430">
          <table:cell-address table:column="1" table:row="299" table:table="0"/>
          <office:change-info>
            <dc:creator>Unknown Author</dc:creator>
            <dc:date>2026-06-17T06:50:02.365038400</dc:date>
          </office:change-info>
          <table:previous>
            <table:change-track-table-cell table:cell-address="WBS.B300" table:formula="of:=IF(AND([.$D300]&lt;&gt;&quot;&quot;;[.$F300]=&quot;&quot;);&quot;E&quot;&amp;ROW();[.$B201])" office:value-type="string">
              <text:p>E115</text:p>
            </table:change-track-table-cell>
          </table:previous>
        </table:cell-content-change>
        <table:cell-content-change table:id="ct431">
          <table:cell-address table:column="1" table:row="300" table:table="0"/>
          <office:change-info>
            <dc:creator>Unknown Author</dc:creator>
            <dc:date>2026-06-17T06:50:02.365051000</dc:date>
          </office:change-info>
          <table:previous>
            <table:change-track-table-cell table:cell-address="WBS.B301" table:formula="of:=IF(AND([.$D301]&lt;&gt;&quot;&quot;;[.$F301]=&quot;&quot;);&quot;E&quot;&amp;ROW();[.$B202])" office:value-type="string">
              <text:p>E125</text:p>
            </table:change-track-table-cell>
          </table:previous>
        </table:cell-content-change>
        <table:deletion table:id="ct432" table:type="row" table:position="228" table:table="0" table:multi-deletion-spanned="13">
          <office:change-info>
            <dc:creator>Unknown Author</dc:creator>
            <dc:date>2026-06-17T07:22:47.453941200</dc:date>
          </office:change-info>
          <table:deletions>
            <table:cell-content-deletion>
              <table:cell-address table:column="19" table:row="228" table:table="0"/>
              <table:change-track-table-cell table:cell-address="WBS.T229" table:formula="of:=SUM([.$V229:.$FM229])" office:value-type="float" office:value="0"/>
            </table:cell-content-deletion>
            <table:cell-content-deletion>
              <table:cell-address table:column="2" table:row="228" table:table="0"/>
              <table:change-track-table-cell table:cell-address="WBS.C229" table:formula="of:=IF(AND([.$D269]&lt;&gt;&quot;&quot;;[.$D269]&lt;&gt;&quot;○&quot;);MAX([.$C$3:.$C217])+1;[.$C217])" office:value-type="float" office:value="10"/>
            </table:cell-content-deletion>
            <table:cell-content-deletion>
              <table:cell-address table:column="1" table:row="228" table:table="0"/>
              <table:change-track-table-cell table:cell-address="WBS.B229" table:formula="of:=IF(AND([.$D269]&lt;&gt;&quot;&quot;;[.$F269]=&quot;&quot;);&quot;E&quot;&amp;ROW();[.$B140])" office:value-type="string">
                <text:p>E125</text:p>
              </table:change-track-table-cell>
            </table:cell-content-deletion>
          </table:deletions>
          <table:cut-offs>
            <table:movement-cut-off table:id="ct360" table:start-position="1" table:end-position="0"/>
          </table:cut-offs>
        </table:deletion>
        <table:deletion table:id="ct433" table:type="row" table:position="228" table:table="0">
          <office:change-info>
            <dc:creator>Unknown Author</dc:creator>
            <dc:date>2026-06-17T07:22:47.454090900</dc:date>
          </office:change-info>
          <table:deletions>
            <table:cell-content-deletion>
              <table:cell-address table:column="19" table:row="228" table:table="0"/>
              <table:change-track-table-cell table:cell-address="WBS.T229" table:formula="of:=SUM([.$V229:.$FM229])" office:value-type="float" office:value="0"/>
            </table:cell-content-deletion>
            <table:cell-content-deletion>
              <table:cell-address table:column="2" table:row="228" table:table="0"/>
              <table:change-track-table-cell table:cell-address="WBS.C229" table:formula="of:=IF(AND([.$D269]&lt;&gt;&quot;&quot;;[.$D269]&lt;&gt;&quot;○&quot;);MAX([.$C$3:.$C228])+1;[.$C228])" office:value-type="float" office:value="10"/>
            </table:cell-content-deletion>
            <table:cell-content-deletion>
              <table:cell-address table:column="1" table:row="228" table:table="0"/>
              <table:change-track-table-cell table:cell-address="WBS.B229" table:formula="of:=IF(AND([.$D269]&lt;&gt;&quot;&quot;;[.$F269]=&quot;&quot;);&quot;E&quot;&amp;ROW();[.$B140])" office:value-type="string">
                <text:p>E125</text:p>
              </table:change-track-table-cell>
            </table:cell-content-deletion>
            <table:change-deletion table:id="ct432"/>
          </table:deletions>
          <table:cut-offs>
            <table:movement-cut-off table:id="ct360" table:start-position="1" table:end-position="0"/>
          </table:cut-offs>
        </table:deletion>
        <table:deletion table:id="ct434" table:type="row" table:position="228" table:table="0">
          <office:change-info>
            <dc:creator>Unknown Author</dc:creator>
            <dc:date>2026-06-17T07:22:47.454143500</dc:date>
          </office:change-info>
          <table:deletions>
            <table:cell-content-deletion>
              <table:cell-address table:column="19" table:row="228" table:table="0"/>
              <table:change-track-table-cell table:cell-address="WBS.T229" table:formula="of:=SUM([.$V229:.$FM229])" office:value-type="float" office:value="0"/>
            </table:cell-content-deletion>
            <table:cell-content-deletion>
              <table:cell-address table:column="2" table:row="228" table:table="0"/>
              <table:change-track-table-cell table:cell-address="WBS.C229" table:formula="of:=IF(AND([.$D269]&lt;&gt;&quot;&quot;;[.$D269]&lt;&gt;&quot;○&quot;);MAX([.$C$3:.$C228])+1;[.$C228])" office:value-type="float" office:value="10"/>
            </table:cell-content-deletion>
            <table:cell-content-deletion>
              <table:cell-address table:column="1" table:row="228" table:table="0"/>
              <table:change-track-table-cell table:cell-address="WBS.B229" table:formula="of:=IF(AND([.$D269]&lt;&gt;&quot;&quot;;[.$F269]=&quot;&quot;);&quot;E&quot;&amp;ROW();[.$B140])" office:value-type="string">
                <text:p>E125</text:p>
              </table:change-track-table-cell>
            </table:cell-content-deletion>
            <table:change-deletion table:id="ct433"/>
          </table:deletions>
          <table:cut-offs>
            <table:movement-cut-off table:id="ct360" table:start-position="1" table:end-position="0"/>
          </table:cut-offs>
        </table:deletion>
        <table:deletion table:id="ct435" table:type="row" table:position="228" table:table="0">
          <office:change-info>
            <dc:creator>Unknown Author</dc:creator>
            <dc:date>2026-06-17T07:22:47.454190200</dc:date>
          </office:change-info>
          <table:deletions>
            <table:cell-content-deletion>
              <table:cell-address table:column="19" table:row="228" table:table="0"/>
              <table:change-track-table-cell table:cell-address="WBS.T229" table:formula="of:=SUM([.$V229:.$FM229])" office:value-type="float" office:value="0"/>
            </table:cell-content-deletion>
            <table:cell-content-deletion>
              <table:cell-address table:column="2" table:row="228" table:table="0"/>
              <table:change-track-table-cell table:cell-address="WBS.C229" table:formula="of:=IF(AND([.$D269]&lt;&gt;&quot;&quot;;[.$D269]&lt;&gt;&quot;○&quot;);MAX([.$C$3:.$C228])+1;[.$C228])" office:value-type="float" office:value="10"/>
            </table:cell-content-deletion>
            <table:cell-content-deletion>
              <table:cell-address table:column="1" table:row="228" table:table="0"/>
              <table:change-track-table-cell table:cell-address="WBS.B229" table:formula="of:=IF(AND([.$D269]&lt;&gt;&quot;&quot;;[.$F269]=&quot;&quot;);&quot;E&quot;&amp;ROW();[.$B140])" office:value-type="string">
                <text:p>E125</text:p>
              </table:change-track-table-cell>
            </table:cell-content-deletion>
            <table:change-deletion table:id="ct434"/>
          </table:deletions>
          <table:cut-offs>
            <table:movement-cut-off table:id="ct360" table:start-position="1" table:end-position="0"/>
          </table:cut-offs>
        </table:deletion>
        <table:deletion table:id="ct436" table:type="row" table:position="228" table:table="0">
          <office:change-info>
            <dc:creator>Unknown Author</dc:creator>
            <dc:date>2026-06-17T07:22:47.454235900</dc:date>
          </office:change-info>
          <table:deletions>
            <table:cell-content-deletion>
              <table:cell-address table:column="19" table:row="228" table:table="0"/>
              <table:change-track-table-cell table:cell-address="WBS.T229" table:formula="of:=SUM([.$V229:.$FM229])" office:value-type="float" office:value="0"/>
            </table:cell-content-deletion>
            <table:cell-content-deletion>
              <table:cell-address table:column="2" table:row="228" table:table="0"/>
              <table:change-track-table-cell table:cell-address="WBS.C229" table:formula="of:=IF(AND([.$D269]&lt;&gt;&quot;&quot;;[.$D269]&lt;&gt;&quot;○&quot;);MAX([.$C$3:.$C228])+1;[.$C228])" office:value-type="float" office:value="10"/>
            </table:cell-content-deletion>
            <table:cell-content-deletion>
              <table:cell-address table:column="1" table:row="228" table:table="0"/>
              <table:change-track-table-cell table:cell-address="WBS.B229" table:formula="of:=IF(AND([.$D269]&lt;&gt;&quot;&quot;;[.$F269]=&quot;&quot;);&quot;E&quot;&amp;ROW();[.$B140])" office:value-type="string">
                <text:p>E125</text:p>
              </table:change-track-table-cell>
            </table:cell-content-deletion>
            <table:change-deletion table:id="ct435"/>
          </table:deletions>
          <table:cut-offs>
            <table:movement-cut-off table:id="ct360" table:start-position="1" table:end-position="0"/>
          </table:cut-offs>
        </table:deletion>
        <table:deletion table:id="ct437" table:type="row" table:position="228" table:table="0">
          <office:change-info>
            <dc:creator>Unknown Author</dc:creator>
            <dc:date>2026-06-17T07:22:47.454281000</dc:date>
          </office:change-info>
          <table:deletions>
            <table:cell-content-deletion>
              <table:cell-address table:column="19" table:row="228" table:table="0"/>
              <table:change-track-table-cell table:cell-address="WBS.T229" table:formula="of:=SUM([.$V229:.$FM229])" office:value-type="float" office:value="0"/>
            </table:cell-content-deletion>
            <table:cell-content-deletion>
              <table:cell-address table:column="2" table:row="228" table:table="0"/>
              <table:change-track-table-cell table:cell-address="WBS.C229" table:formula="of:=IF(AND([.$D269]&lt;&gt;&quot;&quot;;[.$D269]&lt;&gt;&quot;○&quot;);MAX([.$C$3:.$C228])+1;[.$C228])" office:value-type="float" office:value="10"/>
            </table:cell-content-deletion>
            <table:cell-content-deletion>
              <table:cell-address table:column="1" table:row="228" table:table="0"/>
              <table:change-track-table-cell table:cell-address="WBS.B229" table:formula="of:=IF(AND([.$D269]&lt;&gt;&quot;&quot;;[.$F269]=&quot;&quot;);&quot;E&quot;&amp;ROW();[.$B140])" office:value-type="string">
                <text:p>E125</text:p>
              </table:change-track-table-cell>
            </table:cell-content-deletion>
            <table:change-deletion table:id="ct436"/>
          </table:deletions>
          <table:cut-offs>
            <table:movement-cut-off table:id="ct360" table:start-position="1" table:end-position="0"/>
          </table:cut-offs>
        </table:deletion>
        <table:deletion table:id="ct438" table:type="row" table:position="228" table:table="0">
          <office:change-info>
            <dc:creator>Unknown Author</dc:creator>
            <dc:date>2026-06-17T07:22:47.454326700</dc:date>
          </office:change-info>
          <table:deletions>
            <table:cell-content-deletion>
              <table:cell-address table:column="19" table:row="228" table:table="0"/>
              <table:change-track-table-cell table:cell-address="WBS.T229" table:formula="of:=SUM([.$V229:.$FM229])" office:value-type="float" office:value="0"/>
            </table:cell-content-deletion>
            <table:cell-content-deletion>
              <table:cell-address table:column="2" table:row="228" table:table="0"/>
              <table:change-track-table-cell table:cell-address="WBS.C229" table:formula="of:=IF(AND([.$D269]&lt;&gt;&quot;&quot;;[.$D269]&lt;&gt;&quot;○&quot;);MAX([.$C$3:.$C228])+1;[.$C228])" office:value-type="float" office:value="10"/>
            </table:cell-content-deletion>
            <table:cell-content-deletion>
              <table:cell-address table:column="1" table:row="228" table:table="0"/>
              <table:change-track-table-cell table:cell-address="WBS.B229" table:formula="of:=IF(AND([.$D269]&lt;&gt;&quot;&quot;;[.$F269]=&quot;&quot;);&quot;E&quot;&amp;ROW();[.$B140])" office:value-type="string">
                <text:p>E125</text:p>
              </table:change-track-table-cell>
            </table:cell-content-deletion>
            <table:change-deletion table:id="ct437"/>
          </table:deletions>
          <table:cut-offs>
            <table:movement-cut-off table:id="ct360" table:start-position="1" table:end-position="0"/>
          </table:cut-offs>
        </table:deletion>
        <table:deletion table:id="ct439" table:type="row" table:position="228" table:table="0">
          <office:change-info>
            <dc:creator>Unknown Author</dc:creator>
            <dc:date>2026-06-17T07:22:47.454372800</dc:date>
          </office:change-info>
          <table:deletions>
            <table:cell-content-deletion>
              <table:cell-address table:column="19" table:row="228" table:table="0"/>
              <table:change-track-table-cell table:cell-address="WBS.T229" table:formula="of:=SUM([.$V229:.$FM229])" office:value-type="float" office:value="0"/>
            </table:cell-content-deletion>
            <table:cell-content-deletion>
              <table:cell-address table:column="2" table:row="228" table:table="0"/>
              <table:change-track-table-cell table:cell-address="WBS.C229" table:formula="of:=IF(AND([.$D269]&lt;&gt;&quot;&quot;;[.$D269]&lt;&gt;&quot;○&quot;);MAX([.$C$3:.$C228])+1;[.$C228])" office:value-type="float" office:value="10"/>
            </table:cell-content-deletion>
            <table:cell-content-deletion>
              <table:cell-address table:column="1" table:row="228" table:table="0"/>
              <table:change-track-table-cell table:cell-address="WBS.B229" table:formula="of:=IF(AND([.$D269]&lt;&gt;&quot;&quot;;[.$F269]=&quot;&quot;);&quot;E&quot;&amp;ROW();[.$B140])" office:value-type="string">
                <text:p>E125</text:p>
              </table:change-track-table-cell>
            </table:cell-content-deletion>
            <table:change-deletion table:id="ct438"/>
          </table:deletions>
          <table:cut-offs>
            <table:movement-cut-off table:id="ct360" table:start-position="1" table:end-position="0"/>
          </table:cut-offs>
        </table:deletion>
        <table:deletion table:id="ct440" table:type="row" table:position="228" table:table="0">
          <office:change-info>
            <dc:creator>Unknown Author</dc:creator>
            <dc:date>2026-06-17T07:22:47.454419300</dc:date>
          </office:change-info>
          <table:deletions>
            <table:cell-content-deletion>
              <table:cell-address table:column="19" table:row="228" table:table="0"/>
              <table:change-track-table-cell table:cell-address="WBS.T229" table:formula="of:=SUM([.$V229:.$FM229])" office:value-type="float" office:value="0"/>
            </table:cell-content-deletion>
            <table:cell-content-deletion>
              <table:cell-address table:column="2" table:row="228" table:table="0"/>
              <table:change-track-table-cell table:cell-address="WBS.C229" table:formula="of:=IF(AND([.$D269]&lt;&gt;&quot;&quot;;[.$D269]&lt;&gt;&quot;○&quot;);MAX([.$C$3:.$C228])+1;[.$C228])" office:value-type="float" office:value="10"/>
            </table:cell-content-deletion>
            <table:cell-content-deletion>
              <table:cell-address table:column="1" table:row="228" table:table="0"/>
              <table:change-track-table-cell table:cell-address="WBS.B229" table:formula="of:=IF(AND([.$D269]&lt;&gt;&quot;&quot;;[.$F269]=&quot;&quot;);&quot;E&quot;&amp;ROW();[.$B140])" office:value-type="string">
                <text:p>E125</text:p>
              </table:change-track-table-cell>
            </table:cell-content-deletion>
            <table:change-deletion table:id="ct439"/>
          </table:deletions>
          <table:cut-offs>
            <table:movement-cut-off table:id="ct360" table:start-position="1" table:end-position="0"/>
          </table:cut-offs>
        </table:deletion>
        <table:deletion table:id="ct441" table:type="row" table:position="228" table:table="0">
          <office:change-info>
            <dc:creator>Unknown Author</dc:creator>
            <dc:date>2026-06-17T07:22:47.454465100</dc:date>
          </office:change-info>
          <table:deletions>
            <table:cell-content-deletion>
              <table:cell-address table:column="19" table:row="228" table:table="0"/>
              <table:change-track-table-cell table:cell-address="WBS.T229" table:formula="of:=SUM([.$V229:.$FM229])" office:value-type="float" office:value="0"/>
            </table:cell-content-deletion>
            <table:cell-content-deletion>
              <table:cell-address table:column="2" table:row="228" table:table="0"/>
              <table:change-track-table-cell table:cell-address="WBS.C229" table:formula="of:=IF(AND([.$D269]&lt;&gt;&quot;&quot;;[.$D269]&lt;&gt;&quot;○&quot;);MAX([.$C$3:.$C228])+1;[.$C228])" office:value-type="float" office:value="10"/>
            </table:cell-content-deletion>
            <table:cell-content-deletion>
              <table:cell-address table:column="1" table:row="228" table:table="0"/>
              <table:change-track-table-cell table:cell-address="WBS.B229" table:formula="of:=IF(AND([.$D269]&lt;&gt;&quot;&quot;;[.$F269]=&quot;&quot;);&quot;E&quot;&amp;ROW();[.$B140])" office:value-type="string">
                <text:p>E125</text:p>
              </table:change-track-table-cell>
            </table:cell-content-deletion>
            <table:change-deletion table:id="ct440"/>
          </table:deletions>
          <table:cut-offs>
            <table:movement-cut-off table:id="ct360" table:start-position="1" table:end-position="0"/>
          </table:cut-offs>
        </table:deletion>
        <table:deletion table:id="ct442" table:type="row" table:position="228" table:table="0">
          <office:change-info>
            <dc:creator>Unknown Author</dc:creator>
            <dc:date>2026-06-17T07:22:47.454511200</dc:date>
          </office:change-info>
          <table:deletions>
            <table:cell-content-deletion>
              <table:cell-address table:column="19" table:row="228" table:table="0"/>
              <table:change-track-table-cell table:cell-address="WBS.T229" table:formula="of:=SUM([.$V229:.$FM229])" office:value-type="float" office:value="0"/>
            </table:cell-content-deletion>
            <table:cell-content-deletion>
              <table:cell-address table:column="2" table:row="228" table:table="0"/>
              <table:change-track-table-cell table:cell-address="WBS.C229" table:formula="of:=IF(AND([.$D269]&lt;&gt;&quot;&quot;;[.$D269]&lt;&gt;&quot;○&quot;);MAX([.$C$3:.$C228])+1;[.$C228])" office:value-type="float" office:value="10"/>
            </table:cell-content-deletion>
            <table:cell-content-deletion>
              <table:cell-address table:column="1" table:row="228" table:table="0"/>
              <table:change-track-table-cell table:cell-address="WBS.B229" table:formula="of:=IF(AND([.$D269]&lt;&gt;&quot;&quot;;[.$F269]=&quot;&quot;);&quot;E&quot;&amp;ROW();[.$B140])" office:value-type="string">
                <text:p>E125</text:p>
              </table:change-track-table-cell>
            </table:cell-content-deletion>
            <table:change-deletion table:id="ct441"/>
          </table:deletions>
          <table:cut-offs>
            <table:movement-cut-off table:id="ct360" table:start-position="1" table:end-position="0"/>
          </table:cut-offs>
        </table:deletion>
        <table:deletion table:id="ct443" table:type="row" table:position="228" table:table="0">
          <office:change-info>
            <dc:creator>Unknown Author</dc:creator>
            <dc:date>2026-06-17T07:22:47.454556600</dc:date>
          </office:change-info>
          <table:deletions>
            <table:cell-content-deletion>
              <table:cell-address table:column="19" table:row="228" table:table="0"/>
              <table:change-track-table-cell table:cell-address="WBS.T229" table:formula="of:=SUM([.$V229:.$FM229])" office:value-type="float" office:value="0"/>
            </table:cell-content-deletion>
            <table:cell-content-deletion>
              <table:cell-address table:column="2" table:row="228" table:table="0"/>
              <table:change-track-table-cell table:cell-address="WBS.C229" table:formula="of:=IF(AND([.$D269]&lt;&gt;&quot;&quot;;[.$D269]&lt;&gt;&quot;○&quot;);MAX([.$C$3:.$C228])+1;[.$C228])" office:value-type="float" office:value="10"/>
            </table:cell-content-deletion>
            <table:cell-content-deletion>
              <table:cell-address table:column="1" table:row="228" table:table="0"/>
              <table:change-track-table-cell table:cell-address="WBS.B229" table:formula="of:=IF(AND([.$D269]&lt;&gt;&quot;&quot;;[.$F269]=&quot;&quot;);&quot;E&quot;&amp;ROW();[.$B140])" office:value-type="string">
                <text:p>E125</text:p>
              </table:change-track-table-cell>
            </table:cell-content-deletion>
            <table:change-deletion table:id="ct442"/>
          </table:deletions>
          <table:cut-offs>
            <table:movement-cut-off table:id="ct360" table:start-position="1" table:end-position="0"/>
          </table:cut-offs>
        </table:deletion>
        <table:deletion table:id="ct444" table:type="row" table:position="228" table:table="0">
          <office:change-info>
            <dc:creator>Unknown Author</dc:creator>
            <dc:date>2026-06-17T07:22:47.454603700</dc:date>
          </office:change-info>
          <table:deletions>
            <table:cell-content-deletion>
              <table:cell-address table:column="19" table:row="228" table:table="0"/>
              <table:change-track-table-cell table:cell-address="WBS.T229" table:formula="of:=SUM([.$V229:.$FM229])" office:value-type="float" office:value="0"/>
            </table:cell-content-deletion>
            <table:cell-content-deletion>
              <table:cell-address table:column="2" table:row="228" table:table="0"/>
              <table:change-track-table-cell table:cell-address="WBS.C229" table:formula="of:=IF(AND([.$D269]&lt;&gt;&quot;&quot;;[.$D269]&lt;&gt;&quot;○&quot;);MAX([.$C$3:.$C228])+1;[.$C228])" office:value-type="float" office:value="10"/>
            </table:cell-content-deletion>
            <table:cell-content-deletion>
              <table:cell-address table:column="1" table:row="228" table:table="0"/>
              <table:change-track-table-cell table:cell-address="WBS.B229" table:formula="of:=IF(AND([.$D269]&lt;&gt;&quot;&quot;;[.$F269]=&quot;&quot;);&quot;E&quot;&amp;ROW();[.$B140])" office:value-type="string">
                <text:p>E125</text:p>
              </table:change-track-table-cell>
            </table:cell-content-deletion>
            <table:change-deletion table:id="ct443"/>
          </table:deletions>
          <table:cut-offs>
            <table:movement-cut-off table:id="ct360" table:start-position="1" table:end-position="0"/>
          </table:cut-offs>
        </table:deletion>
        <table:deletion table:id="ct445" table:type="row" table:position="228" table:table="0">
          <office:change-info>
            <dc:creator>Unknown Author</dc:creator>
            <dc:date>2026-06-17T07:23:04.763616300</dc:date>
          </office:change-info>
          <table:deletions>
            <table:change-deletion table:id="ct444"/>
          </table:deletions>
          <table:cut-offs>
            <table:movement-cut-off table:id="ct360" table:start-position="1" table:end-position="0"/>
          </table:cut-offs>
        </table:deletion>
        <table:cell-content-change table:id="ct446">
          <table:cell-address table:column="11" table:row="249" table:table="0"/>
          <office:change-info>
            <dc:creator>Unknown Author</dc:creator>
            <dc:date>2026-06-17T07:29:10.490255300</dc:date>
          </office:change-info>
          <table:previous>
            <table:change-track-table-cell office:value-type="float" office:value="46190"/>
          </table:previous>
        </table:cell-content-change>
        <table:cell-content-change table:id="ct447">
          <table:cell-address table:column="11" table:row="250" table:table="0"/>
          <office:change-info>
            <dc:creator>Unknown Author</dc:creator>
            <dc:date>2026-06-17T07:29:10.490289000</dc:date>
          </office:change-info>
          <table:previous>
            <table:change-track-table-cell office:value-type="float" office:value="46190"/>
          </table:previous>
        </table:cell-content-change>
        <table:cell-content-change table:id="ct448">
          <table:cell-address table:column="11" table:row="251" table:table="0"/>
          <office:change-info>
            <dc:creator>Unknown Author</dc:creator>
            <dc:date>2026-06-17T07:29:10.490302400</dc:date>
          </office:change-info>
          <table:previous>
            <table:change-track-table-cell office:value-type="float" office:value="46190"/>
          </table:previous>
        </table:cell-content-change>
        <table:cell-content-change table:id="ct449">
          <table:cell-address table:column="11" table:row="252" table:table="0"/>
          <office:change-info>
            <dc:creator>Unknown Author</dc:creator>
            <dc:date>2026-06-17T07:29:10.490314700</dc:date>
          </office:change-info>
          <table:previous>
            <table:change-track-table-cell office:value-type="float" office:value="46190"/>
          </table:previous>
        </table:cell-content-change>
        <table:cell-content-change table:id="ct450">
          <table:cell-address table:column="11" table:row="253" table:table="0"/>
          <office:change-info>
            <dc:creator>Unknown Author</dc:creator>
            <dc:date>2026-06-17T07:29:10.490326900</dc:date>
          </office:change-info>
          <table:previous>
            <table:change-track-table-cell office:value-type="float" office:value="46190"/>
          </table:previous>
        </table:cell-content-change>
        <table:cell-content-change table:id="ct451">
          <table:cell-address table:column="11" table:row="254" table:table="0"/>
          <office:change-info>
            <dc:creator>Unknown Author</dc:creator>
            <dc:date>2026-06-17T07:29:10.490339500</dc:date>
          </office:change-info>
          <table:previous>
            <table:change-track-table-cell office:value-type="float" office:value="46190"/>
          </table:previous>
        </table:cell-content-change>
        <table:cell-content-change table:id="ct452">
          <table:cell-address table:column="11" table:row="255" table:table="0"/>
          <office:change-info>
            <dc:creator>Unknown Author</dc:creator>
            <dc:date>2026-06-17T07:29:10.490351700</dc:date>
          </office:change-info>
          <table:previous>
            <table:change-track-table-cell office:value-type="float" office:value="46190"/>
          </table:previous>
        </table:cell-content-change>
        <table:cell-content-change table:id="ct453">
          <table:cell-address table:column="11" table:row="256" table:table="0"/>
          <office:change-info>
            <dc:creator>Unknown Author</dc:creator>
            <dc:date>2026-06-17T07:29:10.490363700</dc:date>
          </office:change-info>
          <table:previous>
            <table:change-track-table-cell office:value-type="float" office:value="46190"/>
          </table:previous>
        </table:cell-content-change>
        <table:cell-content-change table:id="ct454">
          <table:cell-address table:column="11" table:row="257" table:table="0"/>
          <office:change-info>
            <dc:creator>Unknown Author</dc:creator>
            <dc:date>2026-06-17T07:29:10.490376900</dc:date>
          </office:change-info>
          <table:previous>
            <table:change-track-table-cell office:value-type="float" office:value="46190"/>
          </table:previous>
        </table:cell-content-change>
        <table:cell-content-change table:id="ct455">
          <table:cell-address table:column="11" table:row="258" table:table="0"/>
          <office:change-info>
            <dc:creator>Unknown Author</dc:creator>
            <dc:date>2026-06-17T07:29:10.490388800</dc:date>
          </office:change-info>
          <table:previous>
            <table:change-track-table-cell office:value-type="float" office:value="46190"/>
          </table:previous>
        </table:cell-content-change>
        <table:cell-content-change table:id="ct456">
          <table:cell-address table:column="11" table:row="259" table:table="0"/>
          <office:change-info>
            <dc:creator>Unknown Author</dc:creator>
            <dc:date>2026-06-17T07:29:10.490402900</dc:date>
          </office:change-info>
          <table:previous>
            <table:change-track-table-cell office:value-type="float" office:value="46190"/>
          </table:previous>
        </table:cell-content-change>
        <table:cell-content-change table:id="ct457">
          <table:cell-address table:column="11" table:row="260" table:table="0"/>
          <office:change-info>
            <dc:creator>Unknown Author</dc:creator>
            <dc:date>2026-06-17T07:29:10.490415100</dc:date>
          </office:change-info>
          <table:previous>
            <table:change-track-table-cell office:value-type="float" office:value="46190"/>
          </table:previous>
        </table:cell-content-change>
        <table:cell-content-change table:id="ct458">
          <table:cell-address table:column="11" table:row="261" table:table="0"/>
          <office:change-info>
            <dc:creator>Unknown Author</dc:creator>
            <dc:date>2026-06-17T07:29:10.490427200</dc:date>
          </office:change-info>
          <table:previous>
            <table:change-track-table-cell office:value-type="float" office:value="46190"/>
          </table:previous>
        </table:cell-content-change>
        <table:cell-content-change table:id="ct459">
          <table:cell-address table:column="12" table:row="249" table:table="0"/>
          <office:change-info>
            <dc:creator>Unknown Author</dc:creator>
            <dc:date>2026-06-17T07:29:10.490440300</dc:date>
          </office:change-info>
          <table:previous>
            <table:change-track-table-cell office:value-type="float" office:value="46190"/>
          </table:previous>
        </table:cell-content-change>
        <table:cell-content-change table:id="ct460">
          <table:cell-address table:column="12" table:row="250" table:table="0"/>
          <office:change-info>
            <dc:creator>Unknown Author</dc:creator>
            <dc:date>2026-06-17T07:29:10.490452900</dc:date>
          </office:change-info>
          <table:previous>
            <table:change-track-table-cell office:value-type="float" office:value="46190"/>
          </table:previous>
        </table:cell-content-change>
        <table:cell-content-change table:id="ct461">
          <table:cell-address table:column="12" table:row="251" table:table="0"/>
          <office:change-info>
            <dc:creator>Unknown Author</dc:creator>
            <dc:date>2026-06-17T07:29:10.490466700</dc:date>
          </office:change-info>
          <table:previous>
            <table:change-track-table-cell office:value-type="float" office:value="46190"/>
          </table:previous>
        </table:cell-content-change>
        <table:cell-content-change table:id="ct462">
          <table:cell-address table:column="12" table:row="252" table:table="0"/>
          <office:change-info>
            <dc:creator>Unknown Author</dc:creator>
            <dc:date>2026-06-17T07:29:10.490478900</dc:date>
          </office:change-info>
          <table:previous>
            <table:change-track-table-cell office:value-type="float" office:value="46190"/>
          </table:previous>
        </table:cell-content-change>
        <table:cell-content-change table:id="ct463">
          <table:cell-address table:column="12" table:row="253" table:table="0"/>
          <office:change-info>
            <dc:creator>Unknown Author</dc:creator>
            <dc:date>2026-06-17T07:29:10.490491800</dc:date>
          </office:change-info>
          <table:previous>
            <table:change-track-table-cell office:value-type="float" office:value="46190"/>
          </table:previous>
        </table:cell-content-change>
        <table:cell-content-change table:id="ct464">
          <table:cell-address table:column="12" table:row="254" table:table="0"/>
          <office:change-info>
            <dc:creator>Unknown Author</dc:creator>
            <dc:date>2026-06-17T07:29:10.490504100</dc:date>
          </office:change-info>
          <table:previous>
            <table:change-track-table-cell office:value-type="float" office:value="46190"/>
          </table:previous>
        </table:cell-content-change>
        <table:cell-content-change table:id="ct465">
          <table:cell-address table:column="12" table:row="255" table:table="0"/>
          <office:change-info>
            <dc:creator>Unknown Author</dc:creator>
            <dc:date>2026-06-17T07:29:10.490516200</dc:date>
          </office:change-info>
          <table:previous>
            <table:change-track-table-cell office:value-type="float" office:value="46190"/>
          </table:previous>
        </table:cell-content-change>
        <table:cell-content-change table:id="ct466">
          <table:cell-address table:column="12" table:row="256" table:table="0"/>
          <office:change-info>
            <dc:creator>Unknown Author</dc:creator>
            <dc:date>2026-06-17T07:29:10.490528100</dc:date>
          </office:change-info>
          <table:previous>
            <table:change-track-table-cell office:value-type="float" office:value="46190"/>
          </table:previous>
        </table:cell-content-change>
        <table:cell-content-change table:id="ct467">
          <table:cell-address table:column="12" table:row="257" table:table="0"/>
          <office:change-info>
            <dc:creator>Unknown Author</dc:creator>
            <dc:date>2026-06-17T07:29:10.490539900</dc:date>
          </office:change-info>
          <table:previous>
            <table:change-track-table-cell office:value-type="float" office:value="46190"/>
          </table:previous>
        </table:cell-content-change>
        <table:cell-content-change table:id="ct468">
          <table:cell-address table:column="12" table:row="258" table:table="0"/>
          <office:change-info>
            <dc:creator>Unknown Author</dc:creator>
            <dc:date>2026-06-17T07:29:10.490551700</dc:date>
          </office:change-info>
          <table:previous>
            <table:change-track-table-cell office:value-type="float" office:value="46190"/>
          </table:previous>
        </table:cell-content-change>
        <table:cell-content-change table:id="ct469">
          <table:cell-address table:column="12" table:row="259" table:table="0"/>
          <office:change-info>
            <dc:creator>Unknown Author</dc:creator>
            <dc:date>2026-06-17T07:29:10.490564300</dc:date>
          </office:change-info>
          <table:previous>
            <table:change-track-table-cell office:value-type="float" office:value="46190"/>
          </table:previous>
        </table:cell-content-change>
        <table:cell-content-change table:id="ct470">
          <table:cell-address table:column="12" table:row="260" table:table="0"/>
          <office:change-info>
            <dc:creator>Unknown Author</dc:creator>
            <dc:date>2026-06-17T07:29:10.490576300</dc:date>
          </office:change-info>
          <table:previous>
            <table:change-track-table-cell office:value-type="float" office:value="46190"/>
          </table:previous>
        </table:cell-content-change>
        <table:cell-content-change table:id="ct471">
          <table:cell-address table:column="12" table:row="261" table:table="0"/>
          <office:change-info>
            <dc:creator>Unknown Author</dc:creator>
            <dc:date>2026-06-17T07:29:10.490588400</dc:date>
          </office:change-info>
          <table:previous>
            <table:change-track-table-cell office:value-type="float" office:value="46190"/>
          </table:previous>
        </table:cell-content-change>
        <table:cell-content-change table:id="ct472">
          <table:cell-address table:column="10" table:row="244" table:table="0"/>
          <office:change-info>
            <dc:creator>Unknown Author</dc:creator>
            <dc:date>2026-06-17T07:29:26.372021400</dc:date>
          </office:change-info>
          <table:previous>
            <table:change-track-table-cell/>
          </table:previous>
        </table:cell-content-change>
        <table:cell-content-change table:id="ct473">
          <table:cell-address table:column="11" table:row="228" table:table="0"/>
          <office:change-info>
            <dc:creator>Unknown Author</dc:creator>
            <dc:date>2026-06-17T07:30:27.857821800</dc:date>
          </office:change-info>
          <table:previous>
            <table:change-track-table-cell office:value-type="float" office:value="46191"/>
          </table:previous>
        </table:cell-content-change>
        <table:cell-content-change table:id="ct474">
          <table:cell-address table:column="11" table:row="229" table:table="0"/>
          <office:change-info>
            <dc:creator>Unknown Author</dc:creator>
            <dc:date>2026-06-17T07:30:27.857854100</dc:date>
          </office:change-info>
          <table:previous>
            <table:change-track-table-cell office:value-type="float" office:value="46191"/>
          </table:previous>
        </table:cell-content-change>
        <table:cell-content-change table:id="ct475">
          <table:cell-address table:column="11" table:row="230" table:table="0"/>
          <office:change-info>
            <dc:creator>Unknown Author</dc:creator>
            <dc:date>2026-06-17T07:30:27.857861300</dc:date>
          </office:change-info>
          <table:previous>
            <table:change-track-table-cell office:value-type="float" office:value="46191"/>
          </table:previous>
        </table:cell-content-change>
        <table:cell-content-change table:id="ct476">
          <table:cell-address table:column="11" table:row="231" table:table="0"/>
          <office:change-info>
            <dc:creator>Unknown Author</dc:creator>
            <dc:date>2026-06-17T07:30:27.857867800</dc:date>
          </office:change-info>
          <table:previous>
            <table:change-track-table-cell office:value-type="float" office:value="46191"/>
          </table:previous>
        </table:cell-content-change>
        <table:cell-content-change table:id="ct477">
          <table:cell-address table:column="11" table:row="232" table:table="0"/>
          <office:change-info>
            <dc:creator>Unknown Author</dc:creator>
            <dc:date>2026-06-17T07:30:27.857875100</dc:date>
          </office:change-info>
          <table:previous>
            <table:change-track-table-cell office:value-type="float" office:value="46191"/>
          </table:previous>
        </table:cell-content-change>
        <table:cell-content-change table:id="ct478">
          <table:cell-address table:column="11" table:row="233" table:table="0"/>
          <office:change-info>
            <dc:creator>Unknown Author</dc:creator>
            <dc:date>2026-06-17T07:30:27.857881400</dc:date>
          </office:change-info>
          <table:previous>
            <table:change-track-table-cell office:value-type="float" office:value="46191"/>
          </table:previous>
        </table:cell-content-change>
        <table:cell-content-change table:id="ct479">
          <table:cell-address table:column="11" table:row="234" table:table="0"/>
          <office:change-info>
            <dc:creator>Unknown Author</dc:creator>
            <dc:date>2026-06-17T07:30:27.857887600</dc:date>
          </office:change-info>
          <table:previous>
            <table:change-track-table-cell office:value-type="float" office:value="46191"/>
          </table:previous>
        </table:cell-content-change>
        <table:cell-content-change table:id="ct480">
          <table:cell-address table:column="11" table:row="235" table:table="0"/>
          <office:change-info>
            <dc:creator>Unknown Author</dc:creator>
            <dc:date>2026-06-17T07:30:27.857893600</dc:date>
          </office:change-info>
          <table:previous>
            <table:change-track-table-cell/>
          </table:previous>
        </table:cell-content-change>
        <table:cell-content-change table:id="ct481">
          <table:cell-address table:column="11" table:row="236" table:table="0"/>
          <office:change-info>
            <dc:creator>Unknown Author</dc:creator>
            <dc:date>2026-06-17T07:30:27.857900000</dc:date>
          </office:change-info>
          <table:previous>
            <table:change-track-table-cell office:value-type="float" office:value="46192"/>
          </table:previous>
        </table:cell-content-change>
        <table:cell-content-change table:id="ct482">
          <table:cell-address table:column="11" table:row="237" table:table="0"/>
          <office:change-info>
            <dc:creator>Unknown Author</dc:creator>
            <dc:date>2026-06-17T07:30:27.857906300</dc:date>
          </office:change-info>
          <table:previous>
            <table:change-track-table-cell office:value-type="float" office:value="46192"/>
          </table:previous>
        </table:cell-content-change>
        <table:cell-content-change table:id="ct483">
          <table:cell-address table:column="11" table:row="238" table:table="0"/>
          <office:change-info>
            <dc:creator>Unknown Author</dc:creator>
            <dc:date>2026-06-17T07:30:27.857912400</dc:date>
          </office:change-info>
          <table:previous>
            <table:change-track-table-cell office:value-type="float" office:value="46192"/>
          </table:previous>
        </table:cell-content-change>
        <table:cell-content-change table:id="ct484">
          <table:cell-address table:column="11" table:row="239" table:table="0"/>
          <office:change-info>
            <dc:creator>Unknown Author</dc:creator>
            <dc:date>2026-06-17T07:30:27.857918800</dc:date>
          </office:change-info>
          <table:previous>
            <table:change-track-table-cell office:value-type="float" office:value="46192"/>
          </table:previous>
        </table:cell-content-change>
        <table:cell-content-change table:id="ct485">
          <table:cell-address table:column="11" table:row="240" table:table="0"/>
          <office:change-info>
            <dc:creator>Unknown Author</dc:creator>
            <dc:date>2026-06-17T07:30:27.857924900</dc:date>
          </office:change-info>
          <table:previous>
            <table:change-track-table-cell office:value-type="float" office:value="46195"/>
          </table:previous>
        </table:cell-content-change>
        <table:cell-content-change table:id="ct486">
          <table:cell-address table:column="11" table:row="241" table:table="0"/>
          <office:change-info>
            <dc:creator>Unknown Author</dc:creator>
            <dc:date>2026-06-17T07:30:27.857931000</dc:date>
          </office:change-info>
          <table:previous>
            <table:change-track-table-cell office:value-type="float" office:value="46195"/>
          </table:previous>
        </table:cell-content-change>
        <table:cell-content-change table:id="ct487">
          <table:cell-address table:column="11" table:row="242" table:table="0"/>
          <office:change-info>
            <dc:creator>Unknown Author</dc:creator>
            <dc:date>2026-06-17T07:30:27.857937200</dc:date>
          </office:change-info>
          <table:previous>
            <table:change-track-table-cell office:value-type="float" office:value="46196"/>
          </table:previous>
        </table:cell-content-change>
        <table:cell-content-change table:id="ct488">
          <table:cell-address table:column="11" table:row="243" table:table="0"/>
          <office:change-info>
            <dc:creator>Unknown Author</dc:creator>
            <dc:date>2026-06-17T07:30:27.857943100</dc:date>
          </office:change-info>
          <table:previous>
            <table:change-track-table-cell/>
          </table:previous>
        </table:cell-content-change>
        <table:cell-content-change table:id="ct489">
          <table:cell-address table:column="11" table:row="244" table:table="0"/>
          <office:change-info>
            <dc:creator>Unknown Author</dc:creator>
            <dc:date>2026-06-17T07:30:27.857949100</dc:date>
          </office:change-info>
          <table:previous>
            <table:change-track-table-cell office:value-type="float" office:value="46196"/>
          </table:previous>
        </table:cell-content-change>
        <table:cell-content-change table:id="ct490">
          <table:cell-address table:column="11" table:row="245" table:table="0"/>
          <office:change-info>
            <dc:creator>Unknown Author</dc:creator>
            <dc:date>2026-06-17T07:30:27.857955200</dc:date>
          </office:change-info>
          <table:previous>
            <table:change-track-table-cell office:value-type="float" office:value="46196"/>
          </table:previous>
        </table:cell-content-change>
        <table:cell-content-change table:id="ct491">
          <table:cell-address table:column="11" table:row="246" table:table="0"/>
          <office:change-info>
            <dc:creator>Unknown Author</dc:creator>
            <dc:date>2026-06-17T07:30:27.857961300</dc:date>
          </office:change-info>
          <table:previous>
            <table:change-track-table-cell office:value-type="float" office:value="46196"/>
          </table:previous>
        </table:cell-content-change>
        <table:cell-content-change table:id="ct492">
          <table:cell-address table:column="11" table:row="247" table:table="0"/>
          <office:change-info>
            <dc:creator>Unknown Author</dc:creator>
            <dc:date>2026-06-17T07:30:27.857967400</dc:date>
          </office:change-info>
          <table:previous>
            <table:change-track-table-cell office:value-type="float" office:value="46196"/>
          </table:previous>
        </table:cell-content-change>
        <table:cell-content-change table:id="ct493">
          <table:cell-address table:column="12" table:row="228" table:table="0"/>
          <office:change-info>
            <dc:creator>Unknown Author</dc:creator>
            <dc:date>2026-06-17T07:30:27.857974000</dc:date>
          </office:change-info>
          <table:previous>
            <table:change-track-table-cell office:value-type="float" office:value="46196"/>
          </table:previous>
        </table:cell-content-change>
        <table:cell-content-change table:id="ct494">
          <table:cell-address table:column="12" table:row="229" table:table="0"/>
          <office:change-info>
            <dc:creator>Unknown Author</dc:creator>
            <dc:date>2026-06-17T07:30:27.857980600</dc:date>
          </office:change-info>
          <table:previous>
            <table:change-track-table-cell office:value-type="float" office:value="46191"/>
          </table:previous>
        </table:cell-content-change>
        <table:cell-content-change table:id="ct495">
          <table:cell-address table:column="12" table:row="230" table:table="0"/>
          <office:change-info>
            <dc:creator>Unknown Author</dc:creator>
            <dc:date>2026-06-17T07:30:27.857986900</dc:date>
          </office:change-info>
          <table:previous>
            <table:change-track-table-cell office:value-type="float" office:value="46191"/>
          </table:previous>
        </table:cell-content-change>
        <table:cell-content-change table:id="ct496">
          <table:cell-address table:column="12" table:row="231" table:table="0"/>
          <office:change-info>
            <dc:creator>Unknown Author</dc:creator>
            <dc:date>2026-06-17T07:30:27.857993000</dc:date>
          </office:change-info>
          <table:previous>
            <table:change-track-table-cell office:value-type="float" office:value="46191"/>
          </table:previous>
        </table:cell-content-change>
        <table:cell-content-change table:id="ct497">
          <table:cell-address table:column="12" table:row="232" table:table="0"/>
          <office:change-info>
            <dc:creator>Unknown Author</dc:creator>
            <dc:date>2026-06-17T07:30:27.857999600</dc:date>
          </office:change-info>
          <table:previous>
            <table:change-track-table-cell office:value-type="float" office:value="46191"/>
          </table:previous>
        </table:cell-content-change>
        <table:cell-content-change table:id="ct498">
          <table:cell-address table:column="12" table:row="233" table:table="0"/>
          <office:change-info>
            <dc:creator>Unknown Author</dc:creator>
            <dc:date>2026-06-17T07:30:27.858005900</dc:date>
          </office:change-info>
          <table:previous>
            <table:change-track-table-cell office:value-type="float" office:value="46191"/>
          </table:previous>
        </table:cell-content-change>
        <table:cell-content-change table:id="ct499">
          <table:cell-address table:column="12" table:row="234" table:table="0"/>
          <office:change-info>
            <dc:creator>Unknown Author</dc:creator>
            <dc:date>2026-06-17T07:30:27.858012000</dc:date>
          </office:change-info>
          <table:previous>
            <table:change-track-table-cell office:value-type="float" office:value="46191"/>
          </table:previous>
        </table:cell-content-change>
        <table:cell-content-change table:id="ct500">
          <table:cell-address table:column="12" table:row="235" table:table="0"/>
          <office:change-info>
            <dc:creator>Unknown Author</dc:creator>
            <dc:date>2026-06-17T07:30:27.858017800</dc:date>
          </office:change-info>
          <table:previous>
            <table:change-track-table-cell/>
          </table:previous>
        </table:cell-content-change>
        <table:cell-content-change table:id="ct501">
          <table:cell-address table:column="12" table:row="236" table:table="0"/>
          <office:change-info>
            <dc:creator>Unknown Author</dc:creator>
            <dc:date>2026-06-17T07:30:27.858023800</dc:date>
          </office:change-info>
          <table:previous>
            <table:change-track-table-cell office:value-type="float" office:value="46192"/>
          </table:previous>
        </table:cell-content-change>
        <table:cell-content-change table:id="ct502">
          <table:cell-address table:column="12" table:row="237" table:table="0"/>
          <office:change-info>
            <dc:creator>Unknown Author</dc:creator>
            <dc:date>2026-06-17T07:30:27.858030100</dc:date>
          </office:change-info>
          <table:previous>
            <table:change-track-table-cell office:value-type="float" office:value="46192"/>
          </table:previous>
        </table:cell-content-change>
        <table:cell-content-change table:id="ct503">
          <table:cell-address table:column="12" table:row="238" table:table="0"/>
          <office:change-info>
            <dc:creator>Unknown Author</dc:creator>
            <dc:date>2026-06-17T07:30:27.858036800</dc:date>
          </office:change-info>
          <table:previous>
            <table:change-track-table-cell office:value-type="float" office:value="46192"/>
          </table:previous>
        </table:cell-content-change>
        <table:cell-content-change table:id="ct504">
          <table:cell-address table:column="12" table:row="239" table:table="0"/>
          <office:change-info>
            <dc:creator>Unknown Author</dc:creator>
            <dc:date>2026-06-17T07:30:27.858043000</dc:date>
          </office:change-info>
          <table:previous>
            <table:change-track-table-cell office:value-type="float" office:value="46192"/>
          </table:previous>
        </table:cell-content-change>
        <table:cell-content-change table:id="ct505">
          <table:cell-address table:column="12" table:row="240" table:table="0"/>
          <office:change-info>
            <dc:creator>Unknown Author</dc:creator>
            <dc:date>2026-06-17T07:30:27.858049100</dc:date>
          </office:change-info>
          <table:previous>
            <table:change-track-table-cell office:value-type="float" office:value="46196"/>
          </table:previous>
        </table:cell-content-change>
        <table:cell-content-change table:id="ct506">
          <table:cell-address table:column="12" table:row="241" table:table="0"/>
          <office:change-info>
            <dc:creator>Unknown Author</dc:creator>
            <dc:date>2026-06-17T07:30:27.858055400</dc:date>
          </office:change-info>
          <table:previous>
            <table:change-track-table-cell office:value-type="float" office:value="46196"/>
          </table:previous>
        </table:cell-content-change>
        <table:cell-content-change table:id="ct507">
          <table:cell-address table:column="12" table:row="242" table:table="0"/>
          <office:change-info>
            <dc:creator>Unknown Author</dc:creator>
            <dc:date>2026-06-17T07:30:27.858062000</dc:date>
          </office:change-info>
          <table:previous>
            <table:change-track-table-cell office:value-type="float" office:value="46196"/>
          </table:previous>
        </table:cell-content-change>
        <table:cell-content-change table:id="ct508">
          <table:cell-address table:column="12" table:row="243" table:table="0"/>
          <office:change-info>
            <dc:creator>Unknown Author</dc:creator>
            <dc:date>2026-06-17T07:30:27.858068300</dc:date>
          </office:change-info>
          <table:previous>
            <table:change-track-table-cell/>
          </table:previous>
        </table:cell-content-change>
        <table:cell-content-change table:id="ct509">
          <table:cell-address table:column="12" table:row="244" table:table="0"/>
          <office:change-info>
            <dc:creator>Unknown Author</dc:creator>
            <dc:date>2026-06-17T07:30:27.858074200</dc:date>
          </office:change-info>
          <table:previous>
            <table:change-track-table-cell office:value-type="float" office:value="46196"/>
          </table:previous>
        </table:cell-content-change>
        <table:cell-content-change table:id="ct510">
          <table:cell-address table:column="12" table:row="245" table:table="0"/>
          <office:change-info>
            <dc:creator>Unknown Author</dc:creator>
            <dc:date>2026-06-17T07:30:27.858080300</dc:date>
          </office:change-info>
          <table:previous>
            <table:change-track-table-cell office:value-type="float" office:value="46196"/>
          </table:previous>
        </table:cell-content-change>
        <table:cell-content-change table:id="ct511">
          <table:cell-address table:column="12" table:row="246" table:table="0"/>
          <office:change-info>
            <dc:creator>Unknown Author</dc:creator>
            <dc:date>2026-06-17T07:30:27.858086700</dc:date>
          </office:change-info>
          <table:previous>
            <table:change-track-table-cell office:value-type="float" office:value="46196"/>
          </table:previous>
        </table:cell-content-change>
        <table:cell-content-change table:id="ct512">
          <table:cell-address table:column="12" table:row="247" table:table="0"/>
          <office:change-info>
            <dc:creator>Unknown Author</dc:creator>
            <dc:date>2026-06-17T07:30:27.858092900</dc:date>
          </office:change-info>
          <table:previous>
            <table:change-track-table-cell office:value-type="float" office:value="46196"/>
          </table:previous>
        </table:cell-content-change>
        <table:cell-content-change table:id="ct513">
          <table:cell-address table:column="11" table:row="235" table:table="0"/>
          <office:change-info>
            <dc:creator>Unknown Author</dc:creator>
            <dc:date>2026-06-17T07:30:47.008340800</dc:date>
          </office:change-info>
          <table:previous table:id="ct480">
            <table:change-track-table-cell office:value-type="float" office:value="-1"/>
          </table:previous>
        </table:cell-content-change>
        <table:cell-content-change table:id="ct514">
          <table:cell-address table:column="12" table:row="235" table:table="0"/>
          <office:change-info>
            <dc:creator>Unknown Author</dc:creator>
            <dc:date>2026-06-17T07:30:47.008352900</dc:date>
          </office:change-info>
          <table:previous table:id="ct500">
            <table:change-track-table-cell office:value-type="float" office:value="-1"/>
          </table:previous>
        </table:cell-content-change>
        <table:cell-content-change table:id="ct515">
          <table:cell-address table:column="11" table:row="243" table:table="0"/>
          <office:change-info>
            <dc:creator>Unknown Author</dc:creator>
            <dc:date>2026-06-17T07:30:58.703676700</dc:date>
          </office:change-info>
          <table:previous table:id="ct488">
            <table:change-track-table-cell office:value-type="float" office:value="-1"/>
          </table:previous>
        </table:cell-content-change>
        <table:cell-content-change table:id="ct516">
          <table:cell-address table:column="12" table:row="243" table:table="0"/>
          <office:change-info>
            <dc:creator>Unknown Author</dc:creator>
            <dc:date>2026-06-17T07:30:58.703690300</dc:date>
          </office:change-info>
          <table:previous table:id="ct508">
            <table:change-track-table-cell office:value-type="float" office:value="-1"/>
          </table:previous>
        </table:cell-content-change>
        <table:cell-content-change table:id="ct517">
          <table:cell-address table:column="16" table:row="243" table:table="0"/>
          <office:change-info>
            <dc:creator>Unknown Author</dc:creator>
            <dc:date>2026-06-17T07:31:01.315287700</dc:date>
          </office:change-info>
          <table:previous>
            <table:change-track-table-cell office:value-type="float" office:value="0"/>
          </table:previous>
        </table:cell-content-change>
        <table:cell-content-change table:id="ct518">
          <table:cell-address table:column="10" table:row="228" table:table="0"/>
          <office:change-info>
            <dc:creator>Unknown Author</dc:creator>
            <dc:date>2026-06-17T07:35:00.011032300</dc:date>
          </office:change-info>
          <table:previous>
            <table:change-track-table-cell/>
          </table:previous>
        </table:cell-content-change>
        <table:cell-content-change table:id="ct519">
          <table:cell-address table:column="13" table:row="228" table:table="0"/>
          <office:change-info>
            <dc:creator>Unknown Author</dc:creator>
            <dc:date>2026-06-17T07:35:12.602167300</dc:date>
          </office:change-info>
          <table:previous>
            <table:change-track-table-cell office:value-type="float" office:value="265329"/>
          </table:previous>
        </table:cell-content-change>
        <table:cell-content-change table:id="ct520">
          <table:cell-address table:column="10" table:row="228" table:table="0"/>
          <office:change-info>
            <dc:creator>Unknown Author</dc:creator>
            <dc:date>2026-06-17T07:35:26.766619400</dc:date>
          </office:change-info>
          <table:previous table:id="ct518">
            <table:change-track-table-cell office:value-type="float" office:value="21915"/>
          </table:previous>
        </table:cell-content-change>
        <table:cell-content-change table:id="ct521">
          <table:cell-address table:column="13" table:row="228" table:table="0"/>
          <office:change-info>
            <dc:creator>Unknown Author</dc:creator>
            <dc:date>2026-06-17T07:35:33.176323700</dc:date>
          </office:change-info>
          <table:previous table:id="ct519">
            <table:change-track-table-cell office:value-type="float" office:value="243414"/>
          </table:previous>
        </table:cell-content-change>
        <table:cell-content-change table:id="ct522">
          <table:cell-address table:column="13" table:row="196" table:table="0"/>
          <office:change-info>
            <dc:creator>Unknown Author</dc:creator>
            <dc:date>2026-06-17T07:35:44.431850600</dc:date>
          </office:change-info>
          <table:previous>
            <table:change-track-table-cell office:value-type="float" office:value="265329"/>
          </table:previous>
        </table:cell-content-change>
        <table:cell-content-change table:id="ct523">
          <table:cell-address table:column="13" table:row="197" table:table="0"/>
          <office:change-info>
            <dc:creator>Unknown Author</dc:creator>
            <dc:date>2026-06-17T07:35:52.974728000</dc:date>
          </office:change-info>
          <table:previous table:id="ct240">
            <table:change-track-table-cell office:value-type="float" office:value="265329"/>
          </table:previous>
        </table:cell-content-change>
        <table:cell-content-change table:id="ct524">
          <table:cell-address table:column="13" table:row="198" table:table="0"/>
          <office:change-info>
            <dc:creator>Unknown Author</dc:creator>
            <dc:date>2026-06-17T07:35:52.974759100</dc:date>
          </office:change-info>
          <table:previous>
            <table:change-track-table-cell office:value-type="float" office:value="265329"/>
          </table:previous>
        </table:cell-content-change>
        <table:cell-content-change table:id="ct525">
          <table:cell-address table:column="13" table:row="199" table:table="0"/>
          <office:change-info>
            <dc:creator>Unknown Author</dc:creator>
            <dc:date>2026-06-17T07:35:52.974774600</dc:date>
          </office:change-info>
          <table:previous>
            <table:change-track-table-cell office:value-type="float" office:value="265329"/>
          </table:previous>
        </table:cell-content-change>
        <table:cell-content-change table:id="ct526">
          <table:cell-address table:column="13" table:row="200" table:table="0"/>
          <office:change-info>
            <dc:creator>Unknown Author</dc:creator>
            <dc:date>2026-06-17T07:35:58.326580800</dc:date>
          </office:change-info>
          <table:previous>
            <table:change-track-table-cell office:value-type="float" office:value="265328"/>
          </table:previous>
        </table:cell-content-change>
        <table:cell-content-change table:id="ct527">
          <table:cell-address table:column="13" table:row="201" table:table="0"/>
          <office:change-info>
            <dc:creator>Unknown Author</dc:creator>
            <dc:date>2026-06-17T07:36:02.818834600</dc:date>
          </office:change-info>
          <table:previous>
            <table:change-track-table-cell office:value-type="float" office:value="265328"/>
          </table:previous>
        </table:cell-content-change>
        <table:cell-content-change table:id="ct528">
          <table:cell-address table:column="13" table:row="202" table:table="0"/>
          <office:change-info>
            <dc:creator>Unknown Author</dc:creator>
            <dc:date>2026-06-17T07:36:02.818892900</dc:date>
          </office:change-info>
          <table:previous>
            <table:change-track-table-cell office:value-type="float" office:value="265328"/>
          </table:previous>
        </table:cell-content-change>
        <table:cell-content-change table:id="ct529">
          <table:cell-address table:column="13" table:row="203" table:table="0"/>
          <office:change-info>
            <dc:creator>Unknown Author</dc:creator>
            <dc:date>2026-06-17T07:36:02.818909900</dc:date>
          </office:change-info>
          <table:previous>
            <table:change-track-table-cell office:value-type="float" office:value="265328"/>
          </table:previous>
        </table:cell-content-change>
        <table:cell-content-change table:id="ct530">
          <table:cell-address table:column="13" table:row="204" table:table="0"/>
          <office:change-info>
            <dc:creator>Unknown Author</dc:creator>
            <dc:date>2026-06-17T07:36:02.818925100</dc:date>
          </office:change-info>
          <table:previous>
            <table:change-track-table-cell office:value-type="float" office:value="265328"/>
          </table:previous>
        </table:cell-content-change>
        <table:cell-content-change table:id="ct531">
          <table:cell-address table:column="13" table:row="205" table:table="0"/>
          <office:change-info>
            <dc:creator>Unknown Author</dc:creator>
            <dc:date>2026-06-17T07:36:10.529503000</dc:date>
          </office:change-info>
          <table:previous>
            <table:change-track-table-cell office:value-type="float" office:value="265329"/>
          </table:previous>
        </table:cell-content-change>
        <table:cell-content-change table:id="ct532">
          <table:cell-address table:column="13" table:row="206" table:table="0"/>
          <office:change-info>
            <dc:creator>Unknown Author</dc:creator>
            <dc:date>2026-06-17T07:36:14.935061900</dc:date>
          </office:change-info>
          <table:previous>
            <table:change-track-table-cell office:value-type="float" office:value="265329"/>
          </table:previous>
        </table:cell-content-change>
        <table:cell-content-change table:id="ct533">
          <table:cell-address table:column="13" table:row="207" table:table="0"/>
          <office:change-info>
            <dc:creator>Unknown Author</dc:creator>
            <dc:date>2026-06-17T07:36:14.935100800</dc:date>
          </office:change-info>
          <table:previous>
            <table:change-track-table-cell office:value-type="float" office:value="265329"/>
          </table:previous>
        </table:cell-content-change>
        <table:cell-content-change table:id="ct534">
          <table:cell-address table:column="13" table:row="208" table:table="0"/>
          <office:change-info>
            <dc:creator>Unknown Author</dc:creator>
            <dc:date>2026-06-17T07:36:14.935110400</dc:date>
          </office:change-info>
          <table:previous>
            <table:change-track-table-cell office:value-type="float" office:value="265329"/>
          </table:previous>
        </table:cell-content-change>
        <table:cell-content-change table:id="ct535">
          <table:cell-address table:column="13" table:row="209" table:table="0"/>
          <office:change-info>
            <dc:creator>Unknown Author</dc:creator>
            <dc:date>2026-06-17T07:36:14.935120900</dc:date>
          </office:change-info>
          <table:previous>
            <table:change-track-table-cell office:value-type="float" office:value="265329"/>
          </table:previous>
        </table:cell-content-change>
        <table:cell-content-change table:id="ct536">
          <table:cell-address table:column="13" table:row="210" table:table="0"/>
          <office:change-info>
            <dc:creator>Unknown Author</dc:creator>
            <dc:date>2026-06-17T07:36:14.935129700</dc:date>
          </office:change-info>
          <table:previous>
            <table:change-track-table-cell office:value-type="float" office:value="265329"/>
          </table:previous>
        </table:cell-content-change>
        <table:cell-content-change table:id="ct537">
          <table:cell-address table:column="13" table:row="211" table:table="0"/>
          <office:change-info>
            <dc:creator>Unknown Author</dc:creator>
            <dc:date>2026-06-17T07:36:20.024919600</dc:date>
          </office:change-info>
          <table:previous>
            <table:change-track-table-cell office:value-type="float" office:value="265328"/>
          </table:previous>
        </table:cell-content-change>
        <table:cell-content-change table:id="ct538">
          <table:cell-address table:column="13" table:row="212" table:table="0"/>
          <office:change-info>
            <dc:creator>Unknown Author</dc:creator>
            <dc:date>2026-06-17T07:36:24.182735500</dc:date>
          </office:change-info>
          <table:previous>
            <table:change-track-table-cell office:value-type="float" office:value="265329"/>
          </table:previous>
        </table:cell-content-change>
        <table:cell-content-change table:id="ct539">
          <table:cell-address table:column="14" table:row="196" table:table="0"/>
          <office:change-info>
            <dc:creator>Unknown Author</dc:creator>
            <dc:date>2026-06-17T07:36:30.617072700</dc:date>
          </office:change-info>
          <table:previous>
            <table:change-track-table-cell office:value-type="float" office:value="265330"/>
          </table:previous>
        </table:cell-content-change>
        <table:cell-content-change table:id="ct540">
          <table:cell-address table:column="14" table:row="197" table:table="0"/>
          <office:change-info>
            <dc:creator>Unknown Author</dc:creator>
            <dc:date>2026-06-17T07:36:34.563072100</dc:date>
          </office:change-info>
          <table:previous>
            <table:change-track-table-cell office:value-type="float" office:value="265330"/>
          </table:previous>
        </table:cell-content-change>
        <table:cell-content-change table:id="ct541">
          <table:cell-address table:column="14" table:row="198" table:table="0"/>
          <office:change-info>
            <dc:creator>Unknown Author</dc:creator>
            <dc:date>2026-06-17T07:36:34.563112500</dc:date>
          </office:change-info>
          <table:previous>
            <table:change-track-table-cell office:value-type="float" office:value="265330"/>
          </table:previous>
        </table:cell-content-change>
        <table:cell-content-change table:id="ct542">
          <table:cell-address table:column="14" table:row="199" table:table="0"/>
          <office:change-info>
            <dc:creator>Unknown Author</dc:creator>
            <dc:date>2026-06-17T07:36:34.563121900</dc:date>
          </office:change-info>
          <table:previous>
            <table:change-track-table-cell office:value-type="float" office:value="265330"/>
          </table:previous>
        </table:cell-content-change>
        <table:cell-content-change table:id="ct543">
          <table:cell-address table:column="14" table:row="200" table:table="0"/>
          <office:change-info>
            <dc:creator>Unknown Author</dc:creator>
            <dc:date>2026-06-17T07:36:40.104868000</dc:date>
          </office:change-info>
          <table:previous>
            <table:change-track-table-cell office:value-type="float" office:value="265328"/>
          </table:previous>
        </table:cell-content-change>
        <table:cell-content-change table:id="ct544">
          <table:cell-address table:column="14" table:row="201" table:table="0"/>
          <office:change-info>
            <dc:creator>Unknown Author</dc:creator>
            <dc:date>2026-06-17T07:36:46.582658900</dc:date>
          </office:change-info>
          <table:previous>
            <table:change-track-table-cell office:value-type="float" office:value="265328"/>
          </table:previous>
        </table:cell-content-change>
        <table:cell-content-change table:id="ct545">
          <table:cell-address table:column="14" table:row="202" table:table="0"/>
          <office:change-info>
            <dc:creator>Unknown Author</dc:creator>
            <dc:date>2026-06-17T07:36:46.582701000</dc:date>
          </office:change-info>
          <table:previous>
            <table:change-track-table-cell office:value-type="float" office:value="265328"/>
          </table:previous>
        </table:cell-content-change>
        <table:cell-content-change table:id="ct546">
          <table:cell-address table:column="14" table:row="203" table:table="0"/>
          <office:change-info>
            <dc:creator>Unknown Author</dc:creator>
            <dc:date>2026-06-17T07:36:46.582710300</dc:date>
          </office:change-info>
          <table:previous>
            <table:change-track-table-cell office:value-type="float" office:value="265328"/>
          </table:previous>
        </table:cell-content-change>
        <table:cell-content-change table:id="ct547">
          <table:cell-address table:column="14" table:row="204" table:table="0"/>
          <office:change-info>
            <dc:creator>Unknown Author</dc:creator>
            <dc:date>2026-06-17T07:36:46.582719400</dc:date>
          </office:change-info>
          <table:previous>
            <table:change-track-table-cell office:value-type="float" office:value="265328"/>
          </table:previous>
        </table:cell-content-change>
        <table:cell-content-change table:id="ct548">
          <table:cell-address table:column="14" table:row="211" table:table="0"/>
          <office:change-info>
            <dc:creator>Unknown Author</dc:creator>
            <dc:date>2026-06-17T07:36:50.352437400</dc:date>
          </office:change-info>
          <table:previous>
            <table:change-track-table-cell office:value-type="float" office:value="265328"/>
          </table:previous>
        </table:cell-content-change>
        <table:cell-content-change table:id="ct549">
          <table:cell-address table:column="14" table:row="212" table:table="0"/>
          <office:change-info>
            <dc:creator>Unknown Author</dc:creator>
            <dc:date>2026-06-17T07:36:55.323592000</dc:date>
          </office:change-info>
          <table:previous>
            <table:change-track-table-cell office:value-type="float" office:value="265330"/>
          </table:previous>
        </table:cell-content-change>
        <table:cell-content-change table:id="ct550">
          <table:cell-address table:column="14" table:row="205" table:table="0"/>
          <office:change-info>
            <dc:creator>Unknown Author</dc:creator>
            <dc:date>2026-06-17T07:37:00.594326100</dc:date>
          </office:change-info>
          <table:previous>
            <table:change-track-table-cell office:value-type="float" office:value="265330"/>
          </table:previous>
        </table:cell-content-change>
        <table:cell-content-change table:id="ct551">
          <table:cell-address table:column="14" table:row="206" table:table="0"/>
          <office:change-info>
            <dc:creator>Unknown Author</dc:creator>
            <dc:date>2026-06-17T07:37:00.594378700</dc:date>
          </office:change-info>
          <table:previous>
            <table:change-track-table-cell office:value-type="float" office:value="265330"/>
          </table:previous>
        </table:cell-content-change>
        <table:cell-content-change table:id="ct552">
          <table:cell-address table:column="14" table:row="207" table:table="0"/>
          <office:change-info>
            <dc:creator>Unknown Author</dc:creator>
            <dc:date>2026-06-17T07:37:00.594395700</dc:date>
          </office:change-info>
          <table:previous>
            <table:change-track-table-cell office:value-type="float" office:value="265330"/>
          </table:previous>
        </table:cell-content-change>
        <table:cell-content-change table:id="ct553">
          <table:cell-address table:column="14" table:row="208" table:table="0"/>
          <office:change-info>
            <dc:creator>Unknown Author</dc:creator>
            <dc:date>2026-06-17T07:37:00.594412000</dc:date>
          </office:change-info>
          <table:previous>
            <table:change-track-table-cell office:value-type="float" office:value="265330"/>
          </table:previous>
        </table:cell-content-change>
        <table:cell-content-change table:id="ct554">
          <table:cell-address table:column="14" table:row="209" table:table="0"/>
          <office:change-info>
            <dc:creator>Unknown Author</dc:creator>
            <dc:date>2026-06-17T07:37:00.594431100</dc:date>
          </office:change-info>
          <table:previous>
            <table:change-track-table-cell office:value-type="float" office:value="265330"/>
          </table:previous>
        </table:cell-content-change>
        <table:cell-content-change table:id="ct555">
          <table:cell-address table:column="14" table:row="210" table:table="0"/>
          <office:change-info>
            <dc:creator>Unknown Author</dc:creator>
            <dc:date>2026-06-17T07:37:00.594439700</dc:date>
          </office:change-info>
          <table:previous>
            <table:change-track-table-cell office:value-type="float" office:value="265330"/>
          </table:previous>
        </table:cell-content-change>
        <table:cell-content-change table:id="ct556">
          <table:cell-address table:column="14" table:row="215" table:table="0"/>
          <office:change-info>
            <dc:creator>Unknown Author</dc:creator>
            <dc:date>2026-06-17T07:37:14.676694800</dc:date>
          </office:change-info>
          <table:previous>
            <table:change-track-table-cell office:value-type="float" office:value="265330"/>
          </table:previous>
        </table:cell-content-change>
        <table:cell-content-change table:id="ct557">
          <table:cell-address table:column="14" table:row="216" table:table="0"/>
          <office:change-info>
            <dc:creator>Unknown Author</dc:creator>
            <dc:date>2026-06-17T07:37:18.931707000</dc:date>
          </office:change-info>
          <table:previous>
            <table:change-track-table-cell office:value-type="float" office:value="265333"/>
          </table:previous>
        </table:cell-content-change>
        <table:cell-content-change table:id="ct558">
          <table:cell-address table:column="14" table:row="217" table:table="0"/>
          <office:change-info>
            <dc:creator>Unknown Author</dc:creator>
            <dc:date>2026-06-17T07:37:22.400547800</dc:date>
          </office:change-info>
          <table:previous table:id="ct326">
            <table:change-track-table-cell office:value-type="float" office:value="265333"/>
          </table:previous>
        </table:cell-content-change>
        <table:cell-content-change table:id="ct559">
          <table:cell-address table:column="14" table:row="218" table:table="0"/>
          <office:change-info>
            <dc:creator>Unknown Author</dc:creator>
            <dc:date>2026-06-17T07:37:26.103176500</dc:date>
          </office:change-info>
          <table:previous table:id="ct358">
            <table:change-track-table-cell office:value-type="float" office:value="265335"/>
          </table:previous>
        </table:cell-content-change>
        <table:cell-content-change table:id="ct560">
          <table:cell-address table:column="14" table:row="219" table:table="0"/>
          <office:change-info>
            <dc:creator>Unknown Author</dc:creator>
            <dc:date>2026-06-17T07:37:30.500479700</dc:date>
          </office:change-info>
          <table:previous>
            <table:change-track-table-cell office:value-type="float" office:value="265330"/>
          </table:previous>
        </table:cell-content-change>
        <table:cell-content-change table:id="ct561">
          <table:cell-address table:column="14" table:row="220" table:table="0"/>
          <office:change-info>
            <dc:creator>Unknown Author</dc:creator>
            <dc:date>2026-06-17T07:37:33.437553500</dc:date>
          </office:change-info>
          <table:previous>
            <table:change-track-table-cell office:value-type="float" office:value="265333"/>
          </table:previous>
        </table:cell-content-change>
        <table:cell-content-change table:id="ct562">
          <table:cell-address table:column="14" table:row="221" table:table="0"/>
          <office:change-info>
            <dc:creator>Unknown Author</dc:creator>
            <dc:date>2026-06-17T07:37:36.593652800</dc:date>
          </office:change-info>
          <table:previous table:id="ct324">
            <table:change-track-table-cell office:value-type="float" office:value="265333"/>
          </table:previous>
        </table:cell-content-change>
        <table:cell-content-change table:id="ct563">
          <table:cell-address table:column="14" table:row="222" table:table="0"/>
          <office:change-info>
            <dc:creator>Unknown Author</dc:creator>
            <dc:date>2026-06-17T07:37:41.648789100</dc:date>
          </office:change-info>
          <table:previous table:id="ct325">
            <table:change-track-table-cell office:value-type="float" office:value="265333"/>
          </table:previous>
        </table:cell-content-change>
        <table:cell-content-change table:id="ct564">
          <table:cell-address table:column="14" table:row="224" table:table="0"/>
          <office:change-info>
            <dc:creator>Unknown Author</dc:creator>
            <dc:date>2026-06-17T07:37:45.219984100</dc:date>
          </office:change-info>
          <table:previous table:id="ct328">
            <table:change-track-table-cell office:value-type="float" office:value="265334"/>
          </table:previous>
        </table:cell-content-change>
        <table:cell-content-change table:id="ct565">
          <table:cell-address table:column="14" table:row="225" table:table="0"/>
          <office:change-info>
            <dc:creator>Unknown Author</dc:creator>
            <dc:date>2026-06-17T07:37:48.165596900</dc:date>
          </office:change-info>
          <table:previous table:id="ct357">
            <table:change-track-table-cell office:value-type="float" office:value="265335"/>
          </table:previous>
        </table:cell-content-change>
        <table:cell-content-change table:id="ct566">
          <table:cell-address table:column="14" table:row="226" table:table="0"/>
          <office:change-info>
            <dc:creator>Unknown Author</dc:creator>
            <dc:date>2026-06-17T07:37:51.194081000</dc:date>
          </office:change-info>
          <table:previous>
            <table:change-track-table-cell office:value-type="float" office:value="265333"/>
          </table:previous>
        </table:cell-content-change>
        <table:cell-content-change table:id="ct567">
          <table:cell-address table:column="13" table:row="220" table:table="0"/>
          <office:change-info>
            <dc:creator>Unknown Author</dc:creator>
            <dc:date>2026-06-17T07:38:03.494802700</dc:date>
          </office:change-info>
          <table:previous>
            <table:change-track-table-cell office:value-type="float" office:value="265333"/>
          </table:previous>
        </table:cell-content-change>
        <table:cell-content-change table:id="ct568">
          <table:cell-address table:column="13" table:row="221" table:table="0"/>
          <office:change-info>
            <dc:creator>Unknown Author</dc:creator>
            <dc:date>2026-06-17T07:38:03.494843900</dc:date>
          </office:change-info>
          <table:previous>
            <table:change-track-table-cell office:value-type="float" office:value="265333"/>
          </table:previous>
        </table:cell-content-change>
        <table:cell-content-change table:id="ct569">
          <table:cell-address table:column="13" table:row="222" table:table="0"/>
          <office:change-info>
            <dc:creator>Unknown Author</dc:creator>
            <dc:date>2026-06-17T07:38:03.494854100</dc:date>
          </office:change-info>
          <table:previous>
            <table:change-track-table-cell office:value-type="float" office:value="265333"/>
          </table:previous>
        </table:cell-content-change>
        <table:cell-content-change table:id="ct570">
          <table:cell-address table:column="13" table:row="223" table:table="0"/>
          <office:change-info>
            <dc:creator>Unknown Author</dc:creator>
            <dc:date>2026-06-17T07:38:03.494863200</dc:date>
          </office:change-info>
          <table:previous>
            <table:change-track-table-cell office:value-type="float" office:value="265333"/>
          </table:previous>
        </table:cell-content-change>
        <table:cell-content-change table:id="ct571">
          <table:cell-address table:column="13" table:row="224" table:table="0"/>
          <office:change-info>
            <dc:creator>Unknown Author</dc:creator>
            <dc:date>2026-06-17T07:38:03.494872300</dc:date>
          </office:change-info>
          <table:previous>
            <table:change-track-table-cell office:value-type="float" office:value="265333"/>
          </table:previous>
        </table:cell-content-change>
        <table:cell-content-change table:id="ct572">
          <table:cell-address table:column="13" table:row="225" table:table="0"/>
          <office:change-info>
            <dc:creator>Unknown Author</dc:creator>
            <dc:date>2026-06-17T07:38:03.494881500</dc:date>
          </office:change-info>
          <table:previous>
            <table:change-track-table-cell office:value-type="float" office:value="265333"/>
          </table:previous>
        </table:cell-content-change>
        <table:cell-content-change table:id="ct573">
          <table:cell-address table:column="13" table:row="226" table:table="0"/>
          <office:change-info>
            <dc:creator>Unknown Author</dc:creator>
            <dc:date>2026-06-17T07:38:03.494890300</dc:date>
          </office:change-info>
          <table:previous>
            <table:change-track-table-cell office:value-type="float" office:value="265333"/>
          </table:previous>
        </table:cell-content-change>
        <table:cell-content-change table:id="ct574">
          <table:cell-address table:column="13" table:row="217" table:table="0"/>
          <office:change-info>
            <dc:creator>Unknown Author</dc:creator>
            <dc:date>2026-06-17T07:38:07.323146200</dc:date>
          </office:change-info>
          <table:previous table:id="ct321">
            <table:change-track-table-cell office:value-type="float" office:value="265333"/>
          </table:previous>
        </table:cell-content-change>
        <table:cell-content-change table:id="ct575">
          <table:cell-address table:column="13" table:row="218" table:table="0"/>
          <office:change-info>
            <dc:creator>Unknown Author</dc:creator>
            <dc:date>2026-06-17T07:38:07.323181600</dc:date>
          </office:change-info>
          <table:previous>
            <table:change-track-table-cell office:value-type="float" office:value="265333"/>
          </table:previous>
        </table:cell-content-change>
        <table:cell-content-change table:id="ct576">
          <table:cell-address table:column="13" table:row="219" table:table="0"/>
          <office:change-info>
            <dc:creator>Unknown Author</dc:creator>
            <dc:date>2026-06-17T07:38:24.926765000</dc:date>
          </office:change-info>
          <table:previous>
            <table:change-track-table-cell office:value-type="float" office:value="265330"/>
          </table:previous>
        </table:cell-content-change>
        <table:cell-content-change table:id="ct577">
          <table:cell-address table:column="13" table:row="214" table:table="0"/>
          <office:change-info>
            <dc:creator>Unknown Author</dc:creator>
            <dc:date>2026-06-17T07:38:29.276755600</dc:date>
          </office:change-info>
          <table:previous>
            <table:change-track-table-cell office:value-type="float" office:value="265330"/>
          </table:previous>
        </table:cell-content-change>
        <table:cell-content-change table:id="ct578">
          <table:cell-address table:column="13" table:row="215" table:table="0"/>
          <office:change-info>
            <dc:creator>Unknown Author</dc:creator>
            <dc:date>2026-06-17T07:38:29.276801200</dc:date>
          </office:change-info>
          <table:previous>
            <table:change-track-table-cell office:value-type="float" office:value="265330"/>
          </table:previous>
        </table:cell-content-change>
        <table:cell-content-change table:id="ct579">
          <table:cell-address table:column="13" table:row="216" table:table="0"/>
          <office:change-info>
            <dc:creator>Unknown Author</dc:creator>
            <dc:date>2026-06-17T07:38:29.276811400</dc:date>
          </office:change-info>
          <table:previous>
            <table:change-track-table-cell office:value-type="float" office:value="265330"/>
          </table:previous>
        </table:cell-content-change>
        <table:cell-content-change table:id="ct580">
          <table:cell-address table:column="12" table:row="214" table:table="0"/>
          <office:change-info>
            <dc:creator>Unknown Author</dc:creator>
            <dc:date>2026-06-17T07:38:31.922512000</dc:date>
          </office:change-info>
          <table:previous>
            <table:change-track-table-cell office:value-type="float" office:value="265330"/>
          </table:previous>
        </table:cell-content-change>
        <table:cell-content-change table:id="ct581">
          <table:cell-address table:column="12" table:row="215" table:table="0"/>
          <office:change-info>
            <dc:creator>Unknown Author</dc:creator>
            <dc:date>2026-06-17T07:38:31.922570100</dc:date>
          </office:change-info>
          <table:previous>
            <table:change-track-table-cell office:value-type="float" office:value="265330"/>
          </table:previous>
        </table:cell-content-change>
        <table:cell-content-change table:id="ct582">
          <table:cell-address table:column="12" table:row="216" table:table="0"/>
          <office:change-info>
            <dc:creator>Unknown Author</dc:creator>
            <dc:date>2026-06-17T07:38:31.922586800</dc:date>
          </office:change-info>
          <table:previous>
            <table:change-track-table-cell office:value-type="float" office:value="265330"/>
          </table:previous>
        </table:cell-content-change>
        <table:cell-content-change table:id="ct583">
          <table:cell-address table:column="11" table:row="214" table:table="0"/>
          <office:change-info>
            <dc:creator>Unknown Author</dc:creator>
            <dc:date>2026-06-17T07:38:37.946336800</dc:date>
          </office:change-info>
          <table:previous table:id="ct259">
            <table:change-track-table-cell office:value-type="float" office:value="265330"/>
          </table:previous>
        </table:cell-content-change>
        <table:cell-content-change table:id="ct584">
          <table:cell-address table:column="11" table:row="215" table:table="0"/>
          <office:change-info>
            <dc:creator>Unknown Author</dc:creator>
            <dc:date>2026-06-17T07:38:37.946390300</dc:date>
          </office:change-info>
          <table:previous>
            <table:change-track-table-cell office:value-type="float" office:value="265330"/>
          </table:previous>
        </table:cell-content-change>
        <table:cell-content-change table:id="ct585">
          <table:cell-address table:column="11" table:row="216" table:table="0"/>
          <office:change-info>
            <dc:creator>Unknown Author</dc:creator>
            <dc:date>2026-06-17T07:38:37.946420600</dc:date>
          </office:change-info>
          <table:previous>
            <table:change-track-table-cell office:value-type="float" office:value="265330"/>
          </table:previous>
        </table:cell-content-change>
        <table:cell-content-change table:id="ct586">
          <table:cell-address table:column="11" table:row="217" table:table="0"/>
          <office:change-info>
            <dc:creator>Unknown Author</dc:creator>
            <dc:date>2026-06-17T07:39:40.414357900</dc:date>
          </office:change-info>
          <table:previous>
            <table:change-track-table-cell office:value-type="float" office:value="265330"/>
          </table:previous>
        </table:cell-content-change>
        <table:cell-content-change table:id="ct587">
          <table:cell-address table:column="11" table:row="218" table:table="0"/>
          <office:change-info>
            <dc:creator>Unknown Author</dc:creator>
            <dc:date>2026-06-17T07:39:40.414423400</dc:date>
          </office:change-info>
          <table:previous>
            <table:change-track-table-cell office:value-type="float" office:value="265330"/>
          </table:previous>
        </table:cell-content-change>
        <table:cell-content-change table:id="ct588">
          <table:cell-address table:column="11" table:row="219" table:table="0"/>
          <office:change-info>
            <dc:creator>Unknown Author</dc:creator>
            <dc:date>2026-06-17T07:39:40.414440200</dc:date>
          </office:change-info>
          <table:previous>
            <table:change-track-table-cell office:value-type="float" office:value="265330"/>
          </table:previous>
        </table:cell-content-change>
        <table:cell-content-change table:id="ct589">
          <table:cell-address table:column="11" table:row="220" table:table="0"/>
          <office:change-info>
            <dc:creator>Unknown Author</dc:creator>
            <dc:date>2026-06-17T07:39:40.414455300</dc:date>
          </office:change-info>
          <table:previous>
            <table:change-track-table-cell office:value-type="float" office:value="265330"/>
          </table:previous>
        </table:cell-content-change>
        <table:cell-content-change table:id="ct590">
          <table:cell-address table:column="11" table:row="221" table:table="0"/>
          <office:change-info>
            <dc:creator>Unknown Author</dc:creator>
            <dc:date>2026-06-17T07:39:40.414470200</dc:date>
          </office:change-info>
          <table:previous>
            <table:change-track-table-cell office:value-type="float" office:value="265330"/>
          </table:previous>
        </table:cell-content-change>
        <table:cell-content-change table:id="ct591">
          <table:cell-address table:column="11" table:row="222" table:table="0"/>
          <office:change-info>
            <dc:creator>Unknown Author</dc:creator>
            <dc:date>2026-06-17T07:39:40.414485100</dc:date>
          </office:change-info>
          <table:previous>
            <table:change-track-table-cell office:value-type="float" office:value="265330"/>
          </table:previous>
        </table:cell-content-change>
        <table:cell-content-change table:id="ct592">
          <table:cell-address table:column="11" table:row="223" table:table="0"/>
          <office:change-info>
            <dc:creator>Unknown Author</dc:creator>
            <dc:date>2026-06-17T07:39:40.414499900</dc:date>
          </office:change-info>
          <table:previous>
            <table:change-track-table-cell office:value-type="float" office:value="265330"/>
          </table:previous>
        </table:cell-content-change>
        <table:cell-content-change table:id="ct593">
          <table:cell-address table:column="11" table:row="224" table:table="0"/>
          <office:change-info>
            <dc:creator>Unknown Author</dc:creator>
            <dc:date>2026-06-17T07:39:40.414514500</dc:date>
          </office:change-info>
          <table:previous>
            <table:change-track-table-cell office:value-type="float" office:value="265330"/>
          </table:previous>
        </table:cell-content-change>
        <table:cell-content-change table:id="ct594">
          <table:cell-address table:column="11" table:row="225" table:table="0"/>
          <office:change-info>
            <dc:creator>Unknown Author</dc:creator>
            <dc:date>2026-06-17T07:39:40.414528900</dc:date>
          </office:change-info>
          <table:previous>
            <table:change-track-table-cell office:value-type="float" office:value="265330"/>
          </table:previous>
        </table:cell-content-change>
        <table:cell-content-change table:id="ct595">
          <table:cell-address table:column="11" table:row="226" table:table="0"/>
          <office:change-info>
            <dc:creator>Unknown Author</dc:creator>
            <dc:date>2026-06-17T07:39:40.414544200</dc:date>
          </office:change-info>
          <table:previous>
            <table:change-track-table-cell office:value-type="float" office:value="265330"/>
          </table:previous>
        </table:cell-content-change>
        <table:cell-content-change table:id="ct596">
          <table:cell-address table:column="12" table:row="217" table:table="0"/>
          <office:change-info>
            <dc:creator>Unknown Author</dc:creator>
            <dc:date>2026-06-17T07:39:40.779577700</dc:date>
          </office:change-info>
          <table:previous table:id="ct301">
            <table:change-track-table-cell office:value-type="float" office:value="265334"/>
          </table:previous>
        </table:cell-content-change>
        <table:cell-content-change table:id="ct597">
          <table:cell-address table:column="12" table:row="218" table:table="0"/>
          <office:change-info>
            <dc:creator>Unknown Author</dc:creator>
            <dc:date>2026-06-17T07:39:40.779631300</dc:date>
          </office:change-info>
          <table:previous>
            <table:change-track-table-cell office:value-type="float" office:value="265334"/>
          </table:previous>
        </table:cell-content-change>
        <table:cell-content-change table:id="ct598">
          <table:cell-address table:column="12" table:row="220" table:table="0"/>
          <office:change-info>
            <dc:creator>Unknown Author</dc:creator>
            <dc:date>2026-06-17T07:39:41.181829600</dc:date>
          </office:change-info>
          <table:previous>
            <table:change-track-table-cell office:value-type="float" office:value="265334"/>
          </table:previous>
        </table:cell-content-change>
        <table:cell-content-change table:id="ct599">
          <table:cell-address table:column="12" table:row="221" table:table="0"/>
          <office:change-info>
            <dc:creator>Unknown Author</dc:creator>
            <dc:date>2026-06-17T07:39:41.181895600</dc:date>
          </office:change-info>
          <table:previous>
            <table:change-track-table-cell office:value-type="float" office:value="265334"/>
          </table:previous>
        </table:cell-content-change>
        <table:cell-content-change table:id="ct600">
          <table:cell-address table:column="12" table:row="222" table:table="0"/>
          <office:change-info>
            <dc:creator>Unknown Author</dc:creator>
            <dc:date>2026-06-17T07:39:41.181913200</dc:date>
          </office:change-info>
          <table:previous>
            <table:change-track-table-cell office:value-type="float" office:value="265334"/>
          </table:previous>
        </table:cell-content-change>
        <table:cell-content-change table:id="ct601">
          <table:cell-address table:column="12" table:row="223" table:table="0"/>
          <office:change-info>
            <dc:creator>Unknown Author</dc:creator>
            <dc:date>2026-06-17T07:39:41.181929200</dc:date>
          </office:change-info>
          <table:previous>
            <table:change-track-table-cell office:value-type="float" office:value="265334"/>
          </table:previous>
        </table:cell-content-change>
        <table:cell-content-change table:id="ct602">
          <table:cell-address table:column="12" table:row="224" table:table="0"/>
          <office:change-info>
            <dc:creator>Unknown Author</dc:creator>
            <dc:date>2026-06-17T07:39:41.181945400</dc:date>
          </office:change-info>
          <table:previous>
            <table:change-track-table-cell office:value-type="float" office:value="265334"/>
          </table:previous>
        </table:cell-content-change>
        <table:cell-content-change table:id="ct603">
          <table:cell-address table:column="12" table:row="225" table:table="0"/>
          <office:change-info>
            <dc:creator>Unknown Author</dc:creator>
            <dc:date>2026-06-17T07:39:41.181961500</dc:date>
          </office:change-info>
          <table:previous>
            <table:change-track-table-cell office:value-type="float" office:value="265334"/>
          </table:previous>
        </table:cell-content-change>
        <table:cell-content-change table:id="ct604">
          <table:cell-address table:column="12" table:row="226" table:table="0"/>
          <office:change-info>
            <dc:creator>Unknown Author</dc:creator>
            <dc:date>2026-06-17T07:39:41.181977100</dc:date>
          </office:change-info>
          <table:previous>
            <table:change-track-table-cell office:value-type="float" office:value="265334"/>
          </table:previous>
        </table:cell-content-change>
        <table:cell-content-change table:id="ct605">
          <table:cell-address table:column="12" table:row="219" table:table="0"/>
          <office:change-info>
            <dc:creator>Unknown Author</dc:creator>
            <dc:date>2026-06-17T07:39:48.045364500</dc:date>
          </office:change-info>
          <table:previous>
            <table:change-track-table-cell office:value-type="float" office:value="265330"/>
          </table:previous>
        </table:cell-content-change>
        <table:cell-content-change table:id="ct606">
          <table:cell-address table:column="13" table:row="261" table:table="0"/>
          <office:change-info>
            <dc:creator>Unknown Author</dc:creator>
            <dc:date>2026-06-19T06:41:47.046124600</dc:date>
          </office:change-info>
          <table:previous>
            <table:change-track-table-cell office:value-type="float" office:value="46196"/>
          </table:previous>
        </table:cell-content-change>
        <table:cell-content-change table:id="ct607">
          <table:cell-address table:column="13" table:row="249" table:table="0"/>
          <office:change-info>
            <dc:creator>Unknown Author</dc:creator>
            <dc:date>2026-06-19T06:43:35.843021100</dc:date>
          </office:change-info>
          <table:previous>
            <table:change-track-table-cell office:value-type="float" office:value="46192"/>
          </table:previous>
        </table:cell-content-change>
        <table:cell-content-change table:id="ct608">
          <table:cell-address table:column="16" table:row="257" table:table="0"/>
          <office:change-info>
            <dc:creator>Unknown Author</dc:creator>
            <dc:date>2026-06-19T06:44:42.508860400</dc:date>
          </office:change-info>
          <table:previous>
            <table:change-track-table-cell office:value-type="float" office:value="0"/>
          </table:previous>
        </table:cell-content-change>
        <table:cell-content-change table:id="ct609">
          <table:cell-address table:column="16" table:row="258" table:table="0"/>
          <office:change-info>
            <dc:creator>Unknown Author</dc:creator>
            <dc:date>2026-06-19T06:44:42.508885600</dc:date>
          </office:change-info>
          <table:previous>
            <table:change-track-table-cell office:value-type="float" office:value="0"/>
          </table:previous>
        </table:cell-content-change>
        <table:cell-content-change table:id="ct610">
          <table:cell-address table:column="16" table:row="259" table:table="0"/>
          <office:change-info>
            <dc:creator>Unknown Author</dc:creator>
            <dc:date>2026-06-19T06:44:42.508889500</dc:date>
          </office:change-info>
          <table:previous>
            <table:change-track-table-cell office:value-type="float" office:value="0"/>
          </table:previous>
        </table:cell-content-change>
        <table:cell-content-change table:id="ct611">
          <table:cell-address table:column="16" table:row="260" table:table="0"/>
          <office:change-info>
            <dc:creator>Unknown Author</dc:creator>
            <dc:date>2026-06-19T06:44:42.508891800</dc:date>
          </office:change-info>
          <table:previous>
            <table:change-track-table-cell office:value-type="float" office:value="0"/>
          </table:previous>
        </table:cell-content-change>
        <table:cell-content-change table:id="ct612">
          <table:cell-address table:column="16" table:row="261" table:table="0"/>
          <office:change-info>
            <dc:creator>Unknown Author</dc:creator>
            <dc:date>2026-06-19T06:44:42.508893900</dc:date>
          </office:change-info>
          <table:previous>
            <table:change-track-table-cell office:value-type="float" office:value="0"/>
          </table:previous>
        </table:cell-content-change>
        <table:cell-content-change table:id="ct613">
          <table:cell-address table:column="16" table:row="256" table:table="0"/>
          <office:change-info>
            <dc:creator>Unknown Author</dc:creator>
            <dc:date>2026-06-19T06:44:44.931402000</dc:date>
          </office:change-info>
          <table:previous>
            <table:change-track-table-cell office:value-type="float" office:value="0"/>
          </table:previous>
        </table:cell-content-change>
        <table:cell-content-change table:id="ct614">
          <table:cell-address table:column="16" table:row="249" table:table="0"/>
          <office:change-info>
            <dc:creator>Unknown Author</dc:creator>
            <dc:date>2026-06-19T06:44:48.322562200</dc:date>
          </office:change-info>
          <table:previous>
            <table:change-track-table-cell office:value-type="float" office:value="0"/>
          </table:previous>
        </table:cell-content-change>
        <table:cell-content-change table:id="ct615">
          <table:cell-address table:column="16" table:row="250" table:table="0"/>
          <office:change-info>
            <dc:creator>Unknown Author</dc:creator>
            <dc:date>2026-06-19T06:44:48.322587900</dc:date>
          </office:change-info>
          <table:previous>
            <table:change-track-table-cell office:value-type="float" office:value="0"/>
          </table:previous>
        </table:cell-content-change>
        <table:cell-content-change table:id="ct616">
          <table:cell-address table:column="16" table:row="251" table:table="0"/>
          <office:change-info>
            <dc:creator>Unknown Author</dc:creator>
            <dc:date>2026-06-19T06:44:48.322593800</dc:date>
          </office:change-info>
          <table:previous>
            <table:change-track-table-cell office:value-type="float" office:value="0"/>
          </table:previous>
        </table:cell-content-change>
        <table:cell-content-change table:id="ct617">
          <table:cell-address table:column="16" table:row="252" table:table="0"/>
          <office:change-info>
            <dc:creator>Unknown Author</dc:creator>
            <dc:date>2026-06-19T06:44:48.322598000</dc:date>
          </office:change-info>
          <table:previous>
            <table:change-track-table-cell office:value-type="float" office:value="0"/>
          </table:previous>
        </table:cell-content-change>
        <table:cell-content-change table:id="ct618">
          <table:cell-address table:column="16" table:row="253" table:table="0"/>
          <office:change-info>
            <dc:creator>Unknown Author</dc:creator>
            <dc:date>2026-06-19T06:44:48.322601800</dc:date>
          </office:change-info>
          <table:previous>
            <table:change-track-table-cell office:value-type="float" office:value="0"/>
          </table:previous>
        </table:cell-content-change>
        <table:cell-content-change table:id="ct619">
          <table:cell-address table:column="13" table:row="239" table:table="0"/>
          <office:change-info>
            <dc:creator>Unknown Author</dc:creator>
            <dc:date>2026-06-19T06:47:33.707406200</dc:date>
          </office:change-info>
          <table:previous>
            <table:change-track-table-cell/>
          </table:previous>
        </table:cell-content-change>
        <table:cell-content-change table:id="ct620">
          <table:cell-address table:column="16" table:row="228" table:table="0"/>
          <office:change-info>
            <dc:creator>Unknown Author</dc:creator>
            <dc:date>2026-06-19T06:49:14.070517300</dc:date>
          </office:change-info>
          <table:previous>
            <table:change-track-table-cell office:value-type="float" office:value="0"/>
          </table:previous>
        </table:cell-content-change>
        <table:cell-content-change table:id="ct621">
          <table:cell-address table:column="16" table:row="236" table:table="0"/>
          <office:change-info>
            <dc:creator>Unknown Author</dc:creator>
            <dc:date>2026-06-19T06:49:18.518945700</dc:date>
          </office:change-info>
          <table:previous>
            <table:change-track-table-cell office:value-type="float" office:value="0"/>
          </table:previous>
        </table:cell-content-change>
        <table:cell-content-change table:id="ct622">
          <table:cell-address table:column="16" table:row="237" table:table="0"/>
          <office:change-info>
            <dc:creator>Unknown Author</dc:creator>
            <dc:date>2026-06-19T06:49:18.518974200</dc:date>
          </office:change-info>
          <table:previous>
            <table:change-track-table-cell office:value-type="float" office:value="0"/>
          </table:previous>
        </table:cell-content-change>
        <table:cell-content-change table:id="ct623">
          <table:cell-address table:column="16" table:row="238" table:table="0"/>
          <office:change-info>
            <dc:creator>Unknown Author</dc:creator>
            <dc:date>2026-06-19T06:49:18.518980800</dc:date>
          </office:change-info>
          <table:previous>
            <table:change-track-table-cell office:value-type="float" office:value="0"/>
          </table:previous>
        </table:cell-content-change>
        <table:cell-content-change table:id="ct624">
          <table:cell-address table:column="16" table:row="239" table:table="0"/>
          <office:change-info>
            <dc:creator>Unknown Author</dc:creator>
            <dc:date>2026-06-19T06:49:18.518986700</dc:date>
          </office:change-info>
          <table:previous>
            <table:change-track-table-cell office:value-type="float" office:value="0"/>
          </table:previous>
        </table:cell-content-change>
        <table:cell-content-change table:id="ct625">
          <table:cell-address table:column="16" table:row="240" table:table="0"/>
          <office:change-info>
            <dc:creator>Unknown Author</dc:creator>
            <dc:date>2026-06-19T06:49:18.518991700</dc:date>
          </office:change-info>
          <table:previous>
            <table:change-track-table-cell office:value-type="float" office:value="0"/>
          </table:previous>
        </table:cell-content-change>
        <table:cell-content-change table:id="ct626">
          <table:cell-address table:column="16" table:row="241" table:table="0"/>
          <office:change-info>
            <dc:creator>Unknown Author</dc:creator>
            <dc:date>2026-06-19T06:49:18.518996500</dc:date>
          </office:change-info>
          <table:previous>
            <table:change-track-table-cell office:value-type="float" office:value="0"/>
          </table:previous>
        </table:cell-content-change>
        <table:cell-content-change table:id="ct627">
          <table:cell-address table:column="16" table:row="242" table:table="0"/>
          <office:change-info>
            <dc:creator>Unknown Author</dc:creator>
            <dc:date>2026-06-19T06:49:18.519001100</dc:date>
          </office:change-info>
          <table:previous>
            <table:change-track-table-cell office:value-type="float" office:value="0"/>
          </table:previous>
        </table:cell-content-change>
        <table:cell-content-change table:id="ct628">
          <table:cell-address table:column="16" table:row="244" table:table="0"/>
          <office:change-info>
            <dc:creator>Unknown Author</dc:creator>
            <dc:date>2026-06-19T06:49:34.487446800</dc:date>
          </office:change-info>
          <table:previous>
            <table:change-track-table-cell office:value-type="float" office:value="0"/>
          </table:previous>
        </table:cell-content-change>
        <table:cell-content-change table:id="ct629">
          <table:cell-address table:column="16" table:row="245" table:table="0"/>
          <office:change-info>
            <dc:creator>Unknown Author</dc:creator>
            <dc:date>2026-06-19T06:49:34.487474900</dc:date>
          </office:change-info>
          <table:previous>
            <table:change-track-table-cell office:value-type="float" office:value="0"/>
          </table:previous>
        </table:cell-content-change>
        <table:cell-content-change table:id="ct630">
          <table:cell-address table:column="16" table:row="246" table:table="0"/>
          <office:change-info>
            <dc:creator>Unknown Author</dc:creator>
            <dc:date>2026-06-19T06:49:34.487480400</dc:date>
          </office:change-info>
          <table:previous>
            <table:change-track-table-cell office:value-type="float" office:value="0"/>
          </table:previous>
        </table:cell-content-change>
        <table:cell-content-change table:id="ct631">
          <table:cell-address table:column="16" table:row="247" table:table="0"/>
          <office:change-info>
            <dc:creator>Unknown Author</dc:creator>
            <dc:date>2026-06-19T06:49:34.487485100</dc:date>
          </office:change-info>
          <table:previous>
            <table:change-track-table-cell office:value-type="float" office:value="0"/>
          </table:previous>
        </table:cell-content-change>
        <table:cell-content-change table:id="ct632">
          <table:cell-address table:column="13" table:row="273" table:table="0"/>
          <office:change-info>
            <dc:creator>Unknown Author</dc:creator>
            <dc:date>2026-06-19T07:05:53.438585600</dc:date>
          </office:change-info>
          <table:previous>
            <table:change-track-table-cell office:value-type="float" office:value="46188"/>
          </table:previous>
        </table:cell-content-change>
        <table:insertion table:id="ct633" table:type="row" table:position="263" table:count="4" table:table="0">
          <office:change-info>
            <dc:creator>Unknown Author</dc:creator>
            <dc:date>2026-06-19T07:18:44.916924900</dc:date>
          </office:change-info>
          <table:dependencies>
            <table:dependency table:id="ct704"/>
            <table:dependency table:id="ct703"/>
            <table:dependency table:id="ct702"/>
            <table:dependency table:id="ct682"/>
            <table:dependency table:id="ct681"/>
            <table:dependency table:id="ct680"/>
            <table:dependency table:id="ct677"/>
            <table:dependency table:id="ct660"/>
            <table:dependency table:id="ct659"/>
            <table:dependency table:id="ct652"/>
            <table:dependency table:id="ct651"/>
            <table:dependency table:id="ct650"/>
            <table:dependency table:id="ct649"/>
            <table:dependency table:id="ct646"/>
            <table:dependency table:id="ct644"/>
            <table:dependency table:id="ct643"/>
            <table:dependency table:id="ct642"/>
            <table:dependency table:id="ct641"/>
            <table:dependency table:id="ct640"/>
            <table:dependency table:id="ct639"/>
            <table:dependency table:id="ct638"/>
            <table:dependency table:id="ct637"/>
            <table:dependency table:id="ct635"/>
          </table:dependencies>
        </table:insertion>
        <table:insertion table:id="ct634" table:type="row" table:position="268" table:table="0">
          <office:change-info>
            <dc:creator>Unknown Author</dc:creator>
            <dc:date>2026-06-19T07:18:51.872890400</dc:date>
          </office:change-info>
          <table:dependencies>
            <table:dependency table:id="ct692"/>
            <table:dependency table:id="ct691"/>
            <table:dependency table:id="ct690"/>
            <table:dependency table:id="ct689"/>
            <table:dependency table:id="ct688"/>
            <table:dependency table:id="ct687"/>
            <table:dependency table:id="ct686"/>
            <table:dependency table:id="ct685"/>
            <table:dependency table:id="ct684"/>
            <table:dependency table:id="ct683"/>
            <table:dependency table:id="ct679"/>
            <table:dependency table:id="ct678"/>
            <table:dependency table:id="ct676"/>
            <table:dependency table:id="ct675"/>
            <table:dependency table:id="ct674"/>
            <table:dependency table:id="ct673"/>
            <table:dependency table:id="ct672"/>
            <table:dependency table:id="ct671"/>
            <table:dependency table:id="ct670"/>
            <table:dependency table:id="ct669"/>
            <table:dependency table:id="ct668"/>
            <table:dependency table:id="ct667"/>
            <table:dependency table:id="ct666"/>
            <table:dependency table:id="ct665"/>
            <table:dependency table:id="ct664"/>
            <table:dependency table:id="ct663"/>
            <table:dependency table:id="ct662"/>
            <table:dependency table:id="ct661"/>
            <table:dependency table:id="ct658"/>
            <table:dependency table:id="ct657"/>
            <table:dependency table:id="ct656"/>
            <table:dependency table:id="ct655"/>
            <table:dependency table:id="ct654"/>
            <table:dependency table:id="ct653"/>
            <table:dependency table:id="ct647"/>
          </table:dependencies>
        </table:insertion>
        <table:cell-content-change table:id="ct635">
          <table:cell-address table:column="5" table:row="263" table:table="0"/>
          <office:change-info>
            <dc:creator>Unknown Author</dc:creator>
            <dc:date>2026-06-19T07:19:34.166962800</dc:date>
          </office:change-info>
          <table:previous>
            <table:change-track-table-cell office:value-type="string">
              <text:p>バグ探し兼URLテスト担当 </text:p>
            </table:change-track-table-cell>
          </table:previous>
        </table:cell-content-change>
        <table:cell-content-change table:id="ct636">
          <table:cell-address table:column="3" table:row="262" table:table="0"/>
          <office:change-info>
            <dc:creator>Unknown Author</dc:creator>
            <dc:date>2026-06-19T07:20:35.347665300</dc:date>
          </office:change-info>
          <table:previous>
            <table:change-track-table-cell/>
          </table:previous>
        </table:cell-content-change>
        <table:movement table:id="ct637">
          <table:source-range-address table:column="3" table:row="263" table:table="0"/>
          <table:target-range-address table:column="5" table:row="263" table:table="0"/>
          <office:change-info>
            <dc:creator>Unknown Author</dc:creator>
            <dc:date>2026-06-19T07:20:36.206153600</dc:date>
          </office:change-info>
        </table:movement>
        <table:cell-content-change table:id="ct638">
          <table:cell-address table:column="7" table:row="264" table:table="0"/>
          <office:change-info>
            <dc:creator>Unknown Author</dc:creator>
            <dc:date>2026-06-19T07:21:05.707201300</dc:date>
          </office:change-info>
          <table:previous>
            <table:change-track-table-cell/>
          </table:previous>
        </table:cell-content-change>
        <table:cell-content-change table:id="ct639">
          <table:cell-address table:column="7" table:row="265" table:table="0"/>
          <office:change-info>
            <dc:creator>Unknown Author</dc:creator>
            <dc:date>2026-06-19T07:21:14.681438200</dc:date>
          </office:change-info>
          <table:previous>
            <table:change-track-table-cell/>
          </table:previous>
        </table:cell-content-change>
        <table:cell-content-change table:id="ct640">
          <table:cell-address table:column="7" table:row="266" table:table="0"/>
          <office:change-info>
            <dc:creator>Unknown Author</dc:creator>
            <dc:date>2026-06-19T07:21:19.695798400</dc:date>
          </office:change-info>
          <table:previous>
            <table:change-track-table-cell/>
          </table:previous>
        </table:cell-content-change>
        <table:cell-content-change table:id="ct641">
          <table:cell-address table:column="5" table:row="268" table:table="0"/>
          <office:change-info>
            <dc:creator>Unknown Author</dc:creator>
            <dc:date>2026-06-19T07:21:54.302331100</dc:date>
          </office:change-info>
          <table:previous>
            <table:change-track-table-cell/>
          </table:previous>
        </table:cell-content-change>
        <table:cell-content-change table:id="ct642">
          <table:cell-address table:column="7" table:row="268" table:table="0"/>
          <office:change-info>
            <dc:creator>Unknown Author</dc:creator>
            <dc:date>2026-06-19T07:22:12.696409900</dc:date>
          </office:change-info>
          <table:previous>
            <table:change-track-table-cell office:value-type="string">
              <text:p>新機能追加</text:p>
            </table:change-track-table-cell>
          </table:previous>
        </table:cell-content-change>
        <table:cell-content-change table:id="ct643">
          <table:cell-address table:column="3" table:row="268" table:table="0"/>
          <office:change-info>
            <dc:creator>Unknown Author</dc:creator>
            <dc:date>2026-06-19T07:22:19.133472600</dc:date>
          </office:change-info>
          <table:previous>
            <table:change-track-table-cell/>
          </table:previous>
        </table:cell-content-change>
        <table:cell-content-change table:id="ct644">
          <table:cell-address table:column="3" table:row="268" table:table="0"/>
          <office:change-info>
            <dc:creator>Unknown Author</dc:creator>
            <dc:date>2026-06-19T07:22:27.923378400</dc:date>
          </office:change-info>
          <table:previous table:id="ct643">
            <table:change-track-table-cell office:value-type="string">
              <text:p>発表資料担当 </text:p>
            </table:change-track-table-cell>
          </table:previous>
        </table:cell-content-change>
        <table:insertion table:id="ct645" table:type="row" table:position="277" table:table="0">
          <office:change-info>
            <dc:creator>Unknown Author</dc:creator>
            <dc:date>2026-06-19T07:22:49.046316000</dc:date>
          </office:change-info>
          <table:dependencies>
            <table:dependency table:id="ct714"/>
            <table:dependency table:id="ct713"/>
            <table:dependency table:id="ct712"/>
            <table:dependency table:id="ct711"/>
            <table:dependency table:id="ct710"/>
            <table:dependency table:id="ct709"/>
            <table:dependency table:id="ct708"/>
            <table:dependency table:id="ct707"/>
            <table:dependency table:id="ct706"/>
          </table:dependencies>
        </table:insertion>
        <table:cell-content-change table:id="ct646">
          <table:cell-address table:column="3" table:row="268" table:table="0"/>
          <office:change-info>
            <dc:creator>Unknown Author</dc:creator>
            <dc:date>2026-06-19T07:23:09.716589500</dc:date>
          </office:change-info>
          <table:previous table:id="ct644">
            <table:change-track-table-cell/>
          </table:previous>
        </table:cell-content-change>
        <table:insertion table:id="ct647" table:type="row" table:position="268" table:table="0">
          <office:change-info>
            <dc:creator>Unknown Author</dc:creator>
            <dc:date>2026-06-19T07:24:21.460308200</dc:date>
          </office:change-info>
          <table:dependencies>
            <table:dependency table:id="ct701"/>
            <table:dependency table:id="ct700"/>
            <table:dependency table:id="ct699"/>
            <table:dependency table:id="ct698"/>
            <table:dependency table:id="ct697"/>
            <table:dependency table:id="ct696"/>
            <table:dependency table:id="ct695"/>
            <table:dependency table:id="ct694"/>
            <table:dependency table:id="ct693"/>
            <table:dependency table:id="ct648"/>
          </table:dependencies>
        </table:insertion>
        <table:cell-content-change table:id="ct648">
          <table:cell-address table:column="3" table:row="268" table:table="0"/>
          <office:change-info>
            <dc:creator>Unknown Author</dc:creator>
            <dc:date>2026-06-19T07:25:12.612127200</dc:date>
          </office:change-info>
          <table:previous>
            <table:change-track-table-cell/>
          </table:previous>
        </table:cell-content-change>
        <table:cell-content-change table:id="ct649">
          <table:cell-address table:column="6" table:row="264" table:table="0"/>
          <office:change-info>
            <dc:creator>Unknown Author</dc:creator>
            <dc:date>2026-06-22T08:04:17.733754400</dc:date>
          </office:change-info>
          <table:previous>
            <table:change-track-table-cell/>
          </table:previous>
        </table:cell-content-change>
        <table:cell-content-change table:id="ct650">
          <table:cell-address table:column="5" table:row="268" table:table="0"/>
          <office:change-info>
            <dc:creator>Unknown Author</dc:creator>
            <dc:date>2026-06-22T08:05:43.810278800</dc:date>
          </office:change-info>
          <table:previous>
            <table:change-track-table-cell office:value-type="float" office:value="1"/>
          </table:previous>
        </table:cell-content-change>
        <table:cell-content-change table:id="ct651">
          <table:cell-address table:column="4" table:row="268" table:table="0"/>
          <office:change-info>
            <dc:creator>Unknown Author</dc:creator>
            <dc:date>2026-06-22T08:05:48.556060500</dc:date>
          </office:change-info>
          <table:previous>
            <table:change-track-table-cell/>
          </table:previous>
        </table:cell-content-change>
        <table:cell-content-change table:id="ct652">
          <table:cell-address table:column="6" table:row="268" table:table="0"/>
          <office:change-info>
            <dc:creator>Unknown Author</dc:creator>
            <dc:date>2026-06-22T08:05:55.469504900</dc:date>
          </office:change-info>
          <table:previous>
            <table:change-track-table-cell office:value-type="string">
              <text:p>デプロイ手順書の読み込み</text:p>
            </table:change-track-table-cell>
          </table:previous>
        </table:cell-content-change>
        <table:cell-content-change table:id="ct653">
          <table:cell-address table:column="6" table:row="268" table:table="0"/>
          <office:change-info>
            <dc:creator>Unknown Author</dc:creator>
            <dc:date>2026-06-22T08:06:06.160765900</dc:date>
          </office:change-info>
          <table:previous>
            <table:change-track-table-cell office:value-type="string">
              <text:p>必要なデータの準備</text:p>
            </table:change-track-table-cell>
          </table:previous>
        </table:cell-content-change>
        <table:cell-content-change table:id="ct654">
          <table:cell-address table:column="5" table:row="268" table:table="0"/>
          <office:change-info>
            <dc:creator>Unknown Author</dc:creator>
            <dc:date>2026-06-22T08:06:06.948351300</dc:date>
          </office:change-info>
          <table:previous>
            <table:change-track-table-cell office:value-type="float" office:value="2"/>
          </table:previous>
        </table:cell-content-change>
        <table:cell-content-change table:id="ct655">
          <table:cell-address table:column="4" table:row="268" table:table="0"/>
          <office:change-info>
            <dc:creator>Unknown Author</dc:creator>
            <dc:date>2026-06-22T08:06:10.409128900</dc:date>
          </office:change-info>
          <table:previous>
            <table:change-track-table-cell/>
          </table:previous>
        </table:cell-content-change>
        <table:cell-content-change table:id="ct656">
          <table:cell-address table:column="6" table:row="268" table:table="0"/>
          <office:change-info>
            <dc:creator>Unknown Author</dc:creator>
            <dc:date>2026-06-22T08:06:17.361344000</dc:date>
          </office:change-info>
          <table:previous>
            <table:change-track-table-cell office:value-type="string">
              <text:p>AWSサービスによるデプロイ</text:p>
            </table:change-track-table-cell>
          </table:previous>
        </table:cell-content-change>
        <table:cell-content-change table:id="ct657">
          <table:cell-address table:column="5" table:row="268" table:table="0"/>
          <office:change-info>
            <dc:creator>Unknown Author</dc:creator>
            <dc:date>2026-06-22T08:06:18.017436000</dc:date>
          </office:change-info>
          <table:previous>
            <table:change-track-table-cell office:value-type="float" office:value="3"/>
          </table:previous>
        </table:cell-content-change>
        <table:cell-content-change table:id="ct658">
          <table:cell-address table:column="4" table:row="268" table:table="0"/>
          <office:change-info>
            <dc:creator>Unknown Author</dc:creator>
            <dc:date>2026-06-22T08:06:20.274830900</dc:date>
          </office:change-info>
          <table:previous>
            <table:change-track-table-cell/>
          </table:previous>
        </table:cell-content-change>
        <table:cell-content-change table:id="ct659">
          <table:cell-address table:column="8" table:row="268" table:table="0"/>
          <office:change-info>
            <dc:creator>Unknown Author</dc:creator>
            <dc:date>2026-06-22T08:06:31.496413200</dc:date>
          </office:change-info>
          <table:previous>
            <table:change-track-table-cell office:value-type="string">
              <text:p>デプロイ手順書の内容把握</text:p>
            </table:change-track-table-cell>
          </table:previous>
        </table:cell-content-change>
        <table:cell-content-change table:id="ct660">
          <table:cell-address table:column="7" table:row="268" table:table="0"/>
          <office:change-info>
            <dc:creator>Unknown Author</dc:creator>
            <dc:date>2026-06-22T08:06:35.871780800</dc:date>
          </office:change-info>
          <table:previous>
            <table:change-track-table-cell office:value-type="float" office:value="1"/>
          </table:previous>
        </table:cell-content-change>
        <table:cell-content-change table:id="ct661">
          <table:cell-address table:column="8" table:row="268" table:table="0"/>
          <office:change-info>
            <dc:creator>Unknown Author</dc:creator>
            <dc:date>2026-06-22T08:06:42.453978800</dc:date>
          </office:change-info>
          <table:previous>
            <table:change-track-table-cell office:value-type="string">
              <text:p>実行環境に必要なデータの把握</text:p>
            </table:change-track-table-cell>
          </table:previous>
        </table:cell-content-change>
        <table:cell-content-change table:id="ct662">
          <table:cell-address table:column="7" table:row="268" table:table="0"/>
          <office:change-info>
            <dc:creator>Unknown Author</dc:creator>
            <dc:date>2026-06-22T08:06:43.107584400</dc:date>
          </office:change-info>
          <table:previous>
            <table:change-track-table-cell office:value-type="float" office:value="2"/>
          </table:previous>
        </table:cell-content-change>
        <table:cell-content-change table:id="ct663">
          <table:cell-address table:column="8" table:row="268" table:table="0"/>
          <office:change-info>
            <dc:creator>Unknown Author</dc:creator>
            <dc:date>2026-06-22T08:06:50.111822500</dc:date>
          </office:change-info>
          <table:previous>
            <table:change-track-table-cell office:value-type="string">
              <text:p>SQL文の準備</text:p>
            </table:change-track-table-cell>
          </table:previous>
        </table:cell-content-change>
        <table:cell-content-change table:id="ct664">
          <table:cell-address table:column="7" table:row="268" table:table="0"/>
          <office:change-info>
            <dc:creator>Unknown Author</dc:creator>
            <dc:date>2026-06-22T08:06:50.828349400</dc:date>
          </office:change-info>
          <table:previous>
            <table:change-track-table-cell office:value-type="float" office:value="1"/>
          </table:previous>
        </table:cell-content-change>
        <table:cell-content-change table:id="ct665">
          <table:cell-address table:column="8" table:row="268" table:table="0"/>
          <office:change-info>
            <dc:creator>Unknown Author</dc:creator>
            <dc:date>2026-06-22T08:06:55.473565300</dc:date>
          </office:change-info>
          <table:previous>
            <table:change-track-table-cell office:value-type="string">
              <text:p>デプロイ用のソースコード、画像ファイルの準備</text:p>
            </table:change-track-table-cell>
          </table:previous>
        </table:cell-content-change>
        <table:cell-content-change table:id="ct666">
          <table:cell-address table:column="7" table:row="268" table:table="0"/>
          <office:change-info>
            <dc:creator>Unknown Author</dc:creator>
            <dc:date>2026-06-22T08:06:56.100316400</dc:date>
          </office:change-info>
          <table:previous>
            <table:change-track-table-cell office:value-type="float" office:value="2"/>
          </table:previous>
        </table:cell-content-change>
        <table:cell-content-change table:id="ct667">
          <table:cell-address table:column="8" table:row="268" table:table="0"/>
          <office:change-info>
            <dc:creator>Unknown Author</dc:creator>
            <dc:date>2026-06-22T08:06:59.625009600</dc:date>
          </office:change-info>
          <table:previous>
            <table:change-track-table-cell office:value-type="string">
              <text:p>Linux用RPMファイルの準備</text:p>
            </table:change-track-table-cell>
          </table:previous>
        </table:cell-content-change>
        <table:cell-content-change table:id="ct668">
          <table:cell-address table:column="7" table:row="268" table:table="0"/>
          <office:change-info>
            <dc:creator>Unknown Author</dc:creator>
            <dc:date>2026-06-22T08:07:00.240643700</dc:date>
          </office:change-info>
          <table:previous>
            <table:change-track-table-cell office:value-type="float" office:value="3"/>
          </table:previous>
        </table:cell-content-change>
        <table:cell-content-change table:id="ct669">
          <table:cell-address table:column="8" table:row="268" table:table="0"/>
          <office:change-info>
            <dc:creator>Unknown Author</dc:creator>
            <dc:date>2026-06-22T08:07:03.907141000</dc:date>
          </office:change-info>
          <table:previous>
            <table:change-track-table-cell office:value-type="string">
              <text:p>安心サンドボックスへの接続準備</text:p>
            </table:change-track-table-cell>
          </table:previous>
        </table:cell-content-change>
        <table:cell-content-change table:id="ct670">
          <table:cell-address table:column="7" table:row="268" table:table="0"/>
          <office:change-info>
            <dc:creator>Unknown Author</dc:creator>
            <dc:date>2026-06-22T08:07:04.541275500</dc:date>
          </office:change-info>
          <table:previous>
            <table:change-track-table-cell office:value-type="float" office:value="4"/>
          </table:previous>
        </table:cell-content-change>
        <table:cell-content-change table:id="ct671">
          <table:cell-address table:column="8" table:row="268" table:table="0"/>
          <office:change-info>
            <dc:creator>Unknown Author</dc:creator>
            <dc:date>2026-06-22T08:07:08.342343300</dc:date>
          </office:change-info>
          <table:previous>
            <table:change-track-table-cell office:value-type="string">
              <text:p>環境構築作業の実施</text:p>
            </table:change-track-table-cell>
          </table:previous>
        </table:cell-content-change>
        <table:cell-content-change table:id="ct672">
          <table:cell-address table:column="7" table:row="268" table:table="0"/>
          <office:change-info>
            <dc:creator>Unknown Author</dc:creator>
            <dc:date>2026-06-22T08:07:09.108235900</dc:date>
          </office:change-info>
          <table:previous>
            <table:change-track-table-cell office:value-type="float" office:value="1"/>
          </table:previous>
        </table:cell-content-change>
        <table:cell-content-change table:id="ct673">
          <table:cell-address table:column="8" table:row="268" table:table="0"/>
          <office:change-info>
            <dc:creator>Unknown Author</dc:creator>
            <dc:date>2026-06-22T08:07:12.053318100</dc:date>
          </office:change-info>
          <table:previous>
            <table:change-track-table-cell office:value-type="string">
              <text:p>Webアプリケーションの準備作業の実施</text:p>
            </table:change-track-table-cell>
          </table:previous>
        </table:cell-content-change>
        <table:cell-content-change table:id="ct674">
          <table:cell-address table:column="7" table:row="268" table:table="0"/>
          <office:change-info>
            <dc:creator>Unknown Author</dc:creator>
            <dc:date>2026-06-22T08:07:12.615649600</dc:date>
          </office:change-info>
          <table:previous>
            <table:change-track-table-cell office:value-type="float" office:value="2"/>
          </table:previous>
        </table:cell-content-change>
        <table:cell-content-change table:id="ct675">
          <table:cell-address table:column="8" table:row="268" table:table="0"/>
          <office:change-info>
            <dc:creator>Unknown Author</dc:creator>
            <dc:date>2026-06-22T08:07:15.616628800</dc:date>
          </office:change-info>
          <table:previous>
            <table:change-track-table-cell office:value-type="string">
              <text:p>Webアプリケーションのデプロイ作業の実施</text:p>
            </table:change-track-table-cell>
          </table:previous>
        </table:cell-content-change>
        <table:cell-content-change table:id="ct676">
          <table:cell-address table:column="7" table:row="268" table:table="0"/>
          <office:change-info>
            <dc:creator>Unknown Author</dc:creator>
            <dc:date>2026-06-22T08:07:16.169833300</dc:date>
          </office:change-info>
          <table:previous>
            <table:change-track-table-cell office:value-type="float" office:value="3"/>
          </table:previous>
        </table:cell-content-change>
        <table:cell-content-change table:id="ct677">
          <table:cell-address table:column="6" table:row="268" table:table="0"/>
          <office:change-info>
            <dc:creator>Unknown Author</dc:creator>
            <dc:date>2026-06-22T08:07:19.513353200</dc:date>
          </office:change-info>
          <table:previous>
            <table:change-track-table-cell/>
          </table:previous>
        </table:cell-content-change>
        <table:cell-content-change table:id="ct678">
          <table:cell-address table:column="6" table:row="268" table:table="0"/>
          <office:change-info>
            <dc:creator>Unknown Author</dc:creator>
            <dc:date>2026-06-22T08:07:25.698825900</dc:date>
          </office:change-info>
          <table:previous>
            <table:change-track-table-cell/>
          </table:previous>
        </table:cell-content-change>
        <table:cell-content-change table:id="ct679">
          <table:cell-address table:column="6" table:row="268" table:table="0"/>
          <office:change-info>
            <dc:creator>Unknown Author</dc:creator>
            <dc:date>2026-06-22T08:07:33.029436400</dc:date>
          </office:change-info>
          <table:previous>
            <table:change-track-table-cell/>
          </table:previous>
        </table:cell-content-change>
        <table:deletion table:id="ct680" table:type="row" table:position="268" table:table="0" table:multi-deletion-spanned="14">
          <office:change-info>
            <dc:creator>Unknown Author</dc:creator>
            <dc:date>2026-06-22T08:09:13.696522800</dc:date>
          </office:change-info>
          <table:deletions>
            <table:cell-content-deletion table:id="ct646">
              <table:change-track-table-cell office:value-type="string">
                <text:p>再度デプロイ</text:p>
              </table:change-track-table-cell>
            </table:cell-content-deletion>
          </table:deletions>
        </table:deletion>
        <table:deletion table:id="ct681" table:type="row" table:position="268" table:table="0">
          <office:change-info>
            <dc:creator>Unknown Author</dc:creator>
            <dc:date>2026-06-22T08:09:13.696637700</dc:date>
          </office:change-info>
          <table:deletions>
            <table:change-deletion table:id="ct680"/>
            <table:cell-content-deletion table:id="ct652">
              <table:change-track-table-cell/>
            </table:cell-content-deletion>
            <table:cell-content-deletion table:id="ct651">
              <table:change-track-table-cell office:value-type="float" office:value="1"/>
            </table:cell-content-deletion>
            <table:cell-content-deletion table:id="ct650">
              <table:change-track-table-cell/>
            </table:cell-content-deletion>
          </table:deletions>
        </table:deletion>
        <table:deletion table:id="ct682" table:type="row" table:position="268" table:table="0">
          <office:change-info>
            <dc:creator>Unknown Author</dc:creator>
            <dc:date>2026-06-22T08:09:13.696673000</dc:date>
          </office:change-info>
          <table:deletions>
            <table:change-deletion table:id="ct681"/>
            <table:cell-content-deletion table:id="ct677">
              <table:change-track-table-cell office:value-type="float" office:value="1"/>
            </table:cell-content-deletion>
            <table:cell-content-deletion table:id="ct660">
              <table:change-track-table-cell office:value-type="string">
                <text:p>デプロイ手順書の内容把握</text:p>
              </table:change-track-table-cell>
            </table:cell-content-deletion>
            <table:cell-content-deletion table:id="ct659">
              <table:change-track-table-cell/>
            </table:cell-content-deletion>
          </table:deletions>
          <table:cut-offs>
            <table:insertion-cut-off table:id="ct633" table:position="-1"/>
          </table:cut-offs>
        </table:deletion>
        <table:deletion table:id="ct683" table:type="row" table:position="268" table:table="0">
          <office:change-info>
            <dc:creator>Unknown Author</dc:creator>
            <dc:date>2026-06-22T08:09:13.696705100</dc:date>
          </office:change-info>
          <table:deletions>
            <table:cell-content-deletion>
              <table:cell-address table:column="6" table:row="268" table:table="0"/>
              <table:change-track-table-cell office:value-type="float" office:value="2"/>
            </table:cell-content-deletion>
            <table:change-deletion table:id="ct682"/>
            <table:cell-content-deletion table:id="ct662">
              <table:change-track-table-cell office:value-type="string">
                <text:p>実行環境に必要なデータの把握</text:p>
              </table:change-track-table-cell>
            </table:cell-content-deletion>
            <table:cell-content-deletion table:id="ct661">
              <table:change-track-table-cell/>
            </table:cell-content-deletion>
          </table:deletions>
          <table:cut-offs>
            <table:insertion-cut-off table:id="ct634" table:position="1"/>
          </table:cut-offs>
        </table:deletion>
        <table:deletion table:id="ct684" table:type="row" table:position="268" table:table="0">
          <office:change-info>
            <dc:creator>Unknown Author</dc:creator>
            <dc:date>2026-06-22T08:09:13.697077200</dc:date>
          </office:change-info>
          <table:deletions>
            <table:change-deletion table:id="ct683"/>
            <table:cell-content-deletion table:id="ct655">
              <table:change-track-table-cell office:value-type="float" office:value="2"/>
            </table:cell-content-deletion>
            <table:cell-content-deletion table:id="ct654">
              <table:change-track-table-cell office:value-type="string">
                <text:p>必要なデータの準備</text:p>
              </table:change-track-table-cell>
            </table:cell-content-deletion>
            <table:cell-content-deletion table:id="ct653">
              <table:change-track-table-cell/>
            </table:cell-content-deletion>
          </table:deletions>
          <table:cut-offs>
            <table:insertion-cut-off table:id="ct634" table:position="1"/>
          </table:cut-offs>
        </table:deletion>
        <table:deletion table:id="ct685" table:type="row" table:position="268" table:table="0">
          <office:change-info>
            <dc:creator>Unknown Author</dc:creator>
            <dc:date>2026-06-22T08:09:13.697133800</dc:date>
          </office:change-info>
          <table:deletions>
            <table:change-deletion table:id="ct684"/>
            <table:cell-content-deletion table:id="ct678">
              <table:change-track-table-cell office:value-type="float" office:value="1"/>
            </table:cell-content-deletion>
            <table:cell-content-deletion table:id="ct664">
              <table:change-track-table-cell office:value-type="string">
                <text:p>SQL文の準備</text:p>
              </table:change-track-table-cell>
            </table:cell-content-deletion>
            <table:cell-content-deletion table:id="ct663">
              <table:change-track-table-cell/>
            </table:cell-content-deletion>
          </table:deletions>
          <table:cut-offs>
            <table:insertion-cut-off table:id="ct634" table:position="1"/>
          </table:cut-offs>
        </table:deletion>
        <table:deletion table:id="ct686" table:type="row" table:position="268" table:table="0">
          <office:change-info>
            <dc:creator>Unknown Author</dc:creator>
            <dc:date>2026-06-22T08:09:13.697167000</dc:date>
          </office:change-info>
          <table:deletions>
            <table:cell-content-deletion>
              <table:cell-address table:column="6" table:row="268" table:table="0"/>
              <table:change-track-table-cell office:value-type="float" office:value="2"/>
            </table:cell-content-deletion>
            <table:change-deletion table:id="ct685"/>
            <table:cell-content-deletion table:id="ct666">
              <table:change-track-table-cell office:value-type="string">
                <text:p>デプロイ用のソースコード、画像ファイルの準備</text:p>
              </table:change-track-table-cell>
            </table:cell-content-deletion>
            <table:cell-content-deletion table:id="ct665">
              <table:change-track-table-cell/>
            </table:cell-content-deletion>
          </table:deletions>
          <table:cut-offs>
            <table:insertion-cut-off table:id="ct634" table:position="1"/>
          </table:cut-offs>
        </table:deletion>
        <table:deletion table:id="ct687" table:type="row" table:position="268" table:table="0">
          <office:change-info>
            <dc:creator>Unknown Author</dc:creator>
            <dc:date>2026-06-22T08:09:13.697206600</dc:date>
          </office:change-info>
          <table:deletions>
            <table:cell-content-deletion>
              <table:cell-address table:column="6" table:row="268" table:table="0"/>
              <table:change-track-table-cell office:value-type="float" office:value="3"/>
            </table:cell-content-deletion>
            <table:change-deletion table:id="ct686"/>
            <table:cell-content-deletion table:id="ct668">
              <table:change-track-table-cell office:value-type="string">
                <text:p>Linux用RPMファイルの準備</text:p>
              </table:change-track-table-cell>
            </table:cell-content-deletion>
            <table:cell-content-deletion table:id="ct667">
              <table:change-track-table-cell/>
            </table:cell-content-deletion>
          </table:deletions>
          <table:cut-offs>
            <table:insertion-cut-off table:id="ct634" table:position="1"/>
          </table:cut-offs>
        </table:deletion>
        <table:deletion table:id="ct688" table:type="row" table:position="268" table:table="0">
          <office:change-info>
            <dc:creator>Unknown Author</dc:creator>
            <dc:date>2026-06-22T08:09:13.697240200</dc:date>
          </office:change-info>
          <table:deletions>
            <table:cell-content-deletion>
              <table:cell-address table:column="6" table:row="268" table:table="0"/>
              <table:change-track-table-cell office:value-type="float" office:value="4"/>
            </table:cell-content-deletion>
            <table:change-deletion table:id="ct687"/>
            <table:cell-content-deletion table:id="ct670">
              <table:change-track-table-cell office:value-type="string">
                <text:p>安心サンドボックスへの接続準備</text:p>
              </table:change-track-table-cell>
            </table:cell-content-deletion>
            <table:cell-content-deletion table:id="ct669">
              <table:change-track-table-cell/>
            </table:cell-content-deletion>
          </table:deletions>
          <table:cut-offs>
            <table:insertion-cut-off table:id="ct634" table:position="1"/>
          </table:cut-offs>
        </table:deletion>
        <table:deletion table:id="ct689" table:type="row" table:position="268" table:table="0">
          <office:change-info>
            <dc:creator>Unknown Author</dc:creator>
            <dc:date>2026-06-22T08:09:13.697273200</dc:date>
          </office:change-info>
          <table:deletions>
            <table:change-deletion table:id="ct688"/>
            <table:cell-content-deletion table:id="ct658">
              <table:change-track-table-cell office:value-type="float" office:value="3"/>
            </table:cell-content-deletion>
            <table:cell-content-deletion table:id="ct657">
              <table:change-track-table-cell office:value-type="string">
                <text:p>AWSサービスによるデプロイ</text:p>
              </table:change-track-table-cell>
            </table:cell-content-deletion>
            <table:cell-content-deletion table:id="ct656">
              <table:change-track-table-cell/>
            </table:cell-content-deletion>
          </table:deletions>
          <table:cut-offs>
            <table:insertion-cut-off table:id="ct634" table:position="1"/>
          </table:cut-offs>
        </table:deletion>
        <table:deletion table:id="ct690" table:type="row" table:position="268" table:table="0">
          <office:change-info>
            <dc:creator>Unknown Author</dc:creator>
            <dc:date>2026-06-22T08:09:13.697304900</dc:date>
          </office:change-info>
          <table:deletions>
            <table:change-deletion table:id="ct689"/>
            <table:cell-content-deletion table:id="ct679">
              <table:change-track-table-cell office:value-type="float" office:value="1"/>
            </table:cell-content-deletion>
            <table:cell-content-deletion table:id="ct672">
              <table:change-track-table-cell office:value-type="string">
                <text:p>環境構築作業の実施</text:p>
              </table:change-track-table-cell>
            </table:cell-content-deletion>
            <table:cell-content-deletion table:id="ct671">
              <table:change-track-table-cell/>
            </table:cell-content-deletion>
          </table:deletions>
          <table:cut-offs>
            <table:insertion-cut-off table:id="ct634" table:position="1"/>
          </table:cut-offs>
        </table:deletion>
        <table:deletion table:id="ct691" table:type="row" table:position="268" table:table="0">
          <office:change-info>
            <dc:creator>Unknown Author</dc:creator>
            <dc:date>2026-06-22T08:09:13.697337300</dc:date>
          </office:change-info>
          <table:deletions>
            <table:cell-content-deletion>
              <table:cell-address table:column="6" table:row="268" table:table="0"/>
              <table:change-track-table-cell office:value-type="float" office:value="2"/>
            </table:cell-content-deletion>
            <table:change-deletion table:id="ct690"/>
            <table:cell-content-deletion table:id="ct674">
              <table:change-track-table-cell office:value-type="string">
                <text:p>Webアプリケーションの準備作業の実施</text:p>
              </table:change-track-table-cell>
            </table:cell-content-deletion>
            <table:cell-content-deletion table:id="ct673">
              <table:change-track-table-cell/>
            </table:cell-content-deletion>
          </table:deletions>
          <table:cut-offs>
            <table:insertion-cut-off table:id="ct634" table:position="1"/>
          </table:cut-offs>
        </table:deletion>
        <table:deletion table:id="ct692" table:type="row" table:position="268" table:table="0">
          <office:change-info>
            <dc:creator>Unknown Author</dc:creator>
            <dc:date>2026-06-22T08:09:13.697370300</dc:date>
          </office:change-info>
          <table:deletions>
            <table:cell-content-deletion>
              <table:cell-address table:column="6" table:row="268" table:table="0"/>
              <table:change-track-table-cell office:value-type="float" office:value="3"/>
            </table:cell-content-deletion>
            <table:change-deletion table:id="ct691"/>
            <table:cell-content-deletion table:id="ct676">
              <table:change-track-table-cell office:value-type="string">
                <text:p>Webアプリケーションのデプロイ作業の実施</text:p>
              </table:change-track-table-cell>
            </table:cell-content-deletion>
            <table:cell-content-deletion table:id="ct675">
              <table:change-track-table-cell/>
            </table:cell-content-deletion>
          </table:deletions>
          <table:cut-offs>
            <table:insertion-cut-off table:id="ct634" table:position="1"/>
          </table:cut-offs>
        </table:deletion>
        <table:deletion table:id="ct693" table:type="row" table:position="268" table:table="0">
          <office:change-info>
            <dc:creator>Unknown Author</dc:creator>
            <dc:date>2026-06-22T08:09:13.697403000</dc:date>
          </office:change-info>
          <table:deletions>
            <table:change-deletion table:id="ct692"/>
            <table:cell-content-deletion table:id="ct648">
              <table:change-track-table-cell office:value-type="string">
                <text:p>テスト</text:p>
              </table:change-track-table-cell>
            </table:cell-content-deletion>
          </table:deletions>
          <table:cut-offs>
            <table:insertion-cut-off table:id="ct647" table:position="1"/>
          </table:cut-offs>
        </table:deletion>
        <table:deletion table:id="ct694" table:type="row" table:position="268" table:table="0" table:multi-deletion-spanned="8">
          <office:change-info>
            <dc:creator>Unknown Author</dc:creator>
            <dc:date>2026-06-22T08:09:19.583912000</dc:date>
          </office:change-info>
          <table:deletions>
            <table:change-deletion table:id="ct693"/>
          </table:deletions>
          <table:cut-offs>
            <table:insertion-cut-off table:id="ct647" table:position="1"/>
          </table:cut-offs>
        </table:deletion>
        <table:deletion table:id="ct695" table:type="row" table:position="268" table:table="0">
          <office:change-info>
            <dc:creator>Unknown Author</dc:creator>
            <dc:date>2026-06-22T08:09:19.584021100</dc:date>
          </office:change-info>
          <table:deletions>
            <table:change-deletion table:id="ct694"/>
          </table:deletions>
          <table:cut-offs>
            <table:insertion-cut-off table:id="ct647" table:position="1"/>
          </table:cut-offs>
        </table:deletion>
        <table:deletion table:id="ct696" table:type="row" table:position="268" table:table="0">
          <office:change-info>
            <dc:creator>Unknown Author</dc:creator>
            <dc:date>2026-06-22T08:09:19.584052700</dc:date>
          </office:change-info>
          <table:deletions>
            <table:change-deletion table:id="ct695"/>
          </table:deletions>
          <table:cut-offs>
            <table:insertion-cut-off table:id="ct647" table:position="1"/>
          </table:cut-offs>
        </table:deletion>
        <table:deletion table:id="ct697" table:type="row" table:position="268" table:table="0">
          <office:change-info>
            <dc:creator>Unknown Author</dc:creator>
            <dc:date>2026-06-22T08:09:19.584084100</dc:date>
          </office:change-info>
          <table:deletions>
            <table:change-deletion table:id="ct696"/>
          </table:deletions>
          <table:cut-offs>
            <table:insertion-cut-off table:id="ct647" table:position="1"/>
          </table:cut-offs>
        </table:deletion>
        <table:deletion table:id="ct698" table:type="row" table:position="268" table:table="0">
          <office:change-info>
            <dc:creator>Unknown Author</dc:creator>
            <dc:date>2026-06-22T08:09:19.584114600</dc:date>
          </office:change-info>
          <table:deletions>
            <table:change-deletion table:id="ct697"/>
          </table:deletions>
          <table:cut-offs>
            <table:insertion-cut-off table:id="ct647" table:position="1"/>
          </table:cut-offs>
        </table:deletion>
        <table:deletion table:id="ct699" table:type="row" table:position="268" table:table="0">
          <office:change-info>
            <dc:creator>Unknown Author</dc:creator>
            <dc:date>2026-06-22T08:09:19.584145400</dc:date>
          </office:change-info>
          <table:deletions>
            <table:change-deletion table:id="ct698"/>
          </table:deletions>
          <table:cut-offs>
            <table:insertion-cut-off table:id="ct647" table:position="1"/>
          </table:cut-offs>
        </table:deletion>
        <table:deletion table:id="ct700" table:type="row" table:position="268" table:table="0">
          <office:change-info>
            <dc:creator>Unknown Author</dc:creator>
            <dc:date>2026-06-22T08:09:19.584176100</dc:date>
          </office:change-info>
          <table:deletions>
            <table:change-deletion table:id="ct699"/>
            <table:change-deletion table:id="ct647"/>
          </table:deletions>
          <table:cut-offs>
            <table:insertion-cut-off table:id="ct634" table:position="1"/>
          </table:cut-offs>
        </table:deletion>
        <table:deletion table:id="ct701" table:type="row" table:position="268" table:table="0">
          <office:change-info>
            <dc:creator>Unknown Author</dc:creator>
            <dc:date>2026-06-22T08:09:19.584206900</dc:date>
          </office:change-info>
          <table:deletions>
            <table:change-deletion table:id="ct700"/>
            <table:change-deletion table:id="ct634"/>
          </table:deletions>
        </table:deletion>
        <table:deletion table:id="ct702" table:type="row" table:position="268" table:table="0" table:multi-deletion-spanned="3">
          <office:change-info>
            <dc:creator>Unknown Author</dc:creator>
            <dc:date>2026-06-22T08:09:26.523421000</dc:date>
          </office:change-info>
          <table:deletions>
            <table:cell-content-deletion>
              <table:cell-address table:column="3" table:row="268" table:table="0"/>
              <table:change-track-table-cell office:value-type="string">
                <text:p>新機能 </text:p>
              </table:change-track-table-cell>
            </table:cell-content-deletion>
          </table:deletions>
        </table:deletion>
        <table:deletion table:id="ct703" table:type="row" table:position="268" table:table="0">
          <office:change-info>
            <dc:creator>Unknown Author</dc:creator>
            <dc:date>2026-06-22T08:09:26.523537500</dc:date>
          </office:change-info>
          <table:deletions>
            <table:change-deletion table:id="ct702"/>
            <table:cell-content-deletion table:id="ct641">
              <table:change-track-table-cell office:value-type="string">
                <text:p>新機能追加</text:p>
              </table:change-track-table-cell>
            </table:cell-content-deletion>
          </table:deletions>
        </table:deletion>
        <table:deletion table:id="ct704" table:type="row" table:position="268" table:table="0">
          <office:change-info>
            <dc:creator>Unknown Author</dc:creator>
            <dc:date>2026-06-22T08:09:26.523571900</dc:date>
          </office:change-info>
          <table:deletions>
            <table:change-deletion table:id="ct703"/>
            <table:cell-content-deletion table:id="ct642">
              <table:change-track-table-cell office:value-type="string">
                <text:p>未確定</text:p>
              </table:change-track-table-cell>
            </table:cell-content-deletion>
          </table:deletions>
          <table:cut-offs>
            <table:insertion-cut-off table:id="ct633" table:position="-1"/>
          </table:cut-offs>
        </table:deletion>
        <table:insertion table:id="ct705" table:type="row" table:position="267" table:table="0">
          <office:change-info>
            <dc:creator>Unknown Author</dc:creator>
            <dc:date>2026-06-22T08:09:33.300721200</dc:date>
          </office:change-info>
        </table:insertion>
        <table:deletion table:id="ct706" table:type="row" table:position="277" table:table="0" table:multi-deletion-spanned="9">
          <office:change-info>
            <dc:creator>Unknown Author</dc:creator>
            <dc:date>2026-06-22T08:10:07.012223900</dc:date>
          </office:change-info>
          <table:cut-offs>
            <table:insertion-cut-off table:id="ct645" table:position="1"/>
          </table:cut-offs>
        </table:deletion>
        <table:deletion table:id="ct707" table:type="row" table:position="277" table:table="0">
          <office:change-info>
            <dc:creator>Unknown Author</dc:creator>
            <dc:date>2026-06-22T08:10:07.012334100</dc:date>
          </office:change-info>
          <table:deletions>
            <table:change-deletion table:id="ct706"/>
          </table:deletions>
          <table:cut-offs>
            <table:insertion-cut-off table:id="ct645" table:position="1"/>
          </table:cut-offs>
        </table:deletion>
        <table:deletion table:id="ct708" table:type="row" table:position="277" table:table="0">
          <office:change-info>
            <dc:creator>Unknown Author</dc:creator>
            <dc:date>2026-06-22T08:10:07.012368800</dc:date>
          </office:change-info>
          <table:deletions>
            <table:change-deletion table:id="ct707"/>
          </table:deletions>
          <table:cut-offs>
            <table:insertion-cut-off table:id="ct645" table:position="1"/>
          </table:cut-offs>
        </table:deletion>
        <table:deletion table:id="ct709" table:type="row" table:position="277" table:table="0">
          <office:change-info>
            <dc:creator>Unknown Author</dc:creator>
            <dc:date>2026-06-22T08:10:07.012400500</dc:date>
          </office:change-info>
          <table:deletions>
            <table:change-deletion table:id="ct708"/>
          </table:deletions>
          <table:cut-offs>
            <table:insertion-cut-off table:id="ct645" table:position="1"/>
          </table:cut-offs>
        </table:deletion>
        <table:deletion table:id="ct710" table:type="row" table:position="277" table:table="0">
          <office:change-info>
            <dc:creator>Unknown Author</dc:creator>
            <dc:date>2026-06-22T08:10:07.012432600</dc:date>
          </office:change-info>
          <table:deletions>
            <table:change-deletion table:id="ct709"/>
          </table:deletions>
          <table:cut-offs>
            <table:insertion-cut-off table:id="ct645" table:position="1"/>
          </table:cut-offs>
        </table:deletion>
        <table:deletion table:id="ct711" table:type="row" table:position="277" table:table="0">
          <office:change-info>
            <dc:creator>Unknown Author</dc:creator>
            <dc:date>2026-06-22T08:10:07.012464200</dc:date>
          </office:change-info>
          <table:deletions>
            <table:change-deletion table:id="ct710"/>
          </table:deletions>
          <table:cut-offs>
            <table:insertion-cut-off table:id="ct645" table:position="1"/>
          </table:cut-offs>
        </table:deletion>
        <table:deletion table:id="ct712" table:type="row" table:position="277" table:table="0">
          <office:change-info>
            <dc:creator>Unknown Author</dc:creator>
            <dc:date>2026-06-22T08:10:07.012495600</dc:date>
          </office:change-info>
          <table:deletions>
            <table:change-deletion table:id="ct711"/>
          </table:deletions>
          <table:cut-offs>
            <table:insertion-cut-off table:id="ct645" table:position="1"/>
          </table:cut-offs>
        </table:deletion>
        <table:deletion table:id="ct713" table:type="row" table:position="277" table:table="0">
          <office:change-info>
            <dc:creator>Unknown Author</dc:creator>
            <dc:date>2026-06-22T08:10:07.012526900</dc:date>
          </office:change-info>
          <table:deletions>
            <table:change-deletion table:id="ct712"/>
          </table:deletions>
          <table:cut-offs>
            <table:insertion-cut-off table:id="ct645" table:position="1"/>
          </table:cut-offs>
        </table:deletion>
        <table:deletion table:id="ct714" table:type="row" table:position="277" table:table="0">
          <office:change-info>
            <dc:creator>Unknown Author</dc:creator>
            <dc:date>2026-06-22T08:10:07.012558200</dc:date>
          </office:change-info>
          <table:deletions>
            <table:change-deletion table:id="ct713"/>
          </table:deletions>
          <table:cut-offs>
            <table:insertion-cut-off table:id="ct645" table:position="1"/>
          </table:cut-offs>
        </table:deletion>
        <table:cell-content-change table:id="ct715">
          <table:cell-address table:column="13" table:row="274" table:table="0"/>
          <office:change-info>
            <dc:creator>Unknown Author</dc:creator>
            <dc:date>2026-06-22T08:11:30.417626400</dc:date>
          </office:change-info>
          <table:previous>
            <table:change-track-table-cell office:value-type="float" office:value="46192"/>
          </table:previous>
        </table:cell-content-change>
        <table:cell-content-change table:id="ct716">
          <table:cell-address table:column="16" table:row="272" table:table="0"/>
          <office:change-info>
            <dc:creator>Unknown Author</dc:creator>
            <dc:date>2026-06-22T08:11:51.190308600</dc:date>
          </office:change-info>
          <table:previous>
            <table:change-track-table-cell office:value-type="float" office:value="0"/>
          </table:previous>
        </table:cell-content-change>
      </table:tracked-changes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BS" table:style-name="ta3">
        <office:forms form:automatic-focus="false" form:apply-design-mode="false"/>
        <table:table-column-group>
          <table:table-column table:style-name="co5" table:default-cell-style-name="ce1"/>
          <table:table-column table:style-name="co6" table:default-cell-style-name="ce4"/>
        </table:table-column-group>
        <table:table-column table:style-name="co7" table:default-cell-style-name="ce1"/>
        <table:table-column table:style-name="co8" table:default-cell-style-name="ce1"/>
        <table:table-column-group>
          <table:table-column table:style-name="co7" table:default-cell-style-name="ce1"/>
          <table:table-column table:style-name="co9" table:default-cell-style-name="ce1"/>
        </table:table-column-group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number-columns-repeated="2" table:default-cell-style-name="ce1"/>
        <table:table-column-group>
          <table:table-column table:style-name="co13" table:number-columns-repeated="2" table:default-cell-style-name="ce1"/>
          <table:table-column table:style-name="co14" table:default-cell-style-name="ce1"/>
          <table:table-column table:style-name="co11" table:default-cell-style-name="ce1"/>
          <table:table-column table:style-name="co19" table:default-cell-style-name="ce1"/>
          <table:table-column table:style-name="co19" table:visibility="collapse" table:number-columns-repeated="2" table:default-cell-style-name="ce1"/>
        </table:table-column-group>
        <table:table-column table:style-name="co19" table:default-cell-style-name="ce1"/>
        <table:table-column table:style-name="co20" table:number-columns-repeated="3" table:default-cell-style-name="ce1"/>
        <table:table-column table:style-name="co20" table:number-columns-repeated="2" table:default-cell-style-name="ce116"/>
        <table:table-column table:style-name="co20" table:number-columns-repeated="5" table:default-cell-style-name="ce1"/>
        <table:table-column table:style-name="co20" table:default-cell-style-name="ce116"/>
        <table:table-column table:style-name="co21" table:default-cell-style-name="ce116"/>
        <table:table-column table:style-name="co20" table:number-columns-repeated="5" table:default-cell-style-name="ce1"/>
        <table:table-column table:style-name="co20" table:number-columns-repeated="2" table:default-cell-style-name="ce116"/>
        <table:table-column table:style-name="co20" table:number-columns-repeated="4" table:default-cell-style-name="ce1"/>
        <table:table-column table:style-name="co20" table:default-cell-style-name="ce145"/>
        <table:table-column table:style-name="co20" table:number-columns-repeated="2" table:default-cell-style-name="ce116"/>
        <table:table-column table:style-name="co20" table:default-cell-style-name="ce159"/>
        <table:table-column table:style-name="co20" table:number-columns-repeated="121" table:default-cell-style-name="ce1"/>
        <table:table-column table:style-name="co22" table:number-columns-repeated="855" table:default-cell-style-name="ce1"/>
        <table:table-column table:style-name="co15" table:number-columns-repeated="15360"/>
        <table:table-row table:style-name="ro1">
          <table:table-cell table:number-columns-repeated="2"/>
          <table:table-cell table:style-name="ce11"/>
          <table:table-cell table:number-columns-repeated="14"/>
          <table:table-cell table:style-name="ce62" office:value-type="date" office:date-value="2026-06-03" calcext:value-type="date">
            <text:p>2026/06/03</text:p>
          </table:table-cell>
          <table:table-cell table:style-name="ce62" table:number-columns-repeated="2"/>
          <table:table-cell table:style-name="ce68" table:formula="of:=TODAY()" office:value-type="date" office:date-value="2026-06-22" calcext:value-type="date">
            <text:p>2026/06/22</text:p>
          </table:table-cell>
          <table:table-cell table:style-name="ce77" table:formula="of:=[.R1]" office:value-type="date" office:date-value="2026-06-03" calcext:value-type="date">
            <text:p>2026/06/03</text:p>
          </table:table-cell>
          <table:table-cell table:style-name="ce77" table:formula="of:=[.V1]+1" office:value-type="date" office:date-value="2026-06-04" calcext:value-type="date">
            <text:p>2026/06/04</text:p>
          </table:table-cell>
          <table:table-cell table:style-name="ce77" table:formula="of:=[.W1]+1" office:value-type="date" office:date-value="2026-06-05" calcext:value-type="date">
            <text:p>2026/06/05</text:p>
          </table:table-cell>
          <table:table-cell table:style-name="ce103" table:formula="of:=[.X1]+1" office:value-type="date" office:date-value="2026-06-06" calcext:value-type="date">
            <text:p>2026/06/06</text:p>
          </table:table-cell>
          <table:table-cell table:style-name="ce103" table:formula="of:=[.Y1]+1" office:value-type="date" office:date-value="2026-06-07" calcext:value-type="date">
            <text:p>2026/06/07</text:p>
          </table:table-cell>
          <table:table-cell table:style-name="ce77" table:formula="of:=[.Z1]+1" office:value-type="date" office:date-value="2026-06-08" calcext:value-type="date">
            <text:p>2026/06/08</text:p>
          </table:table-cell>
          <table:table-cell table:style-name="ce77" table:formula="of:=[.AA1]+1" office:value-type="date" office:date-value="2026-06-09" calcext:value-type="date">
            <text:p>2026/06/09</text:p>
          </table:table-cell>
          <table:table-cell table:style-name="ce77" table:formula="of:=[.AB1]+1" office:value-type="date" office:date-value="2026-06-10" calcext:value-type="date">
            <text:p>2026/06/10</text:p>
          </table:table-cell>
          <table:table-cell table:style-name="ce77" table:formula="of:=[.AC1]+1" office:value-type="date" office:date-value="2026-06-11" calcext:value-type="date">
            <text:p>2026/06/11</text:p>
          </table:table-cell>
          <table:table-cell table:style-name="ce77" table:formula="of:=[.AD1]+1" office:value-type="date" office:date-value="2026-06-12" calcext:value-type="date">
            <text:p>2026/06/12</text:p>
          </table:table-cell>
          <table:table-cell table:style-name="ce103" table:formula="of:=[.AE1]+1" office:value-type="date" office:date-value="2026-06-13" calcext:value-type="date">
            <text:p>2026/06/13</text:p>
          </table:table-cell>
          <table:table-cell table:style-name="ce103" table:formula="of:=[.AF1]+1" office:value-type="date" office:date-value="2026-06-14" calcext:value-type="date">
            <text:p>2026/06/14</text:p>
          </table:table-cell>
          <table:table-cell table:style-name="ce77" table:formula="of:=[.AG1]+1" office:value-type="date" office:date-value="2026-06-15" calcext:value-type="date">
            <text:p>2026/06/15</text:p>
          </table:table-cell>
          <table:table-cell table:style-name="ce77" table:formula="of:=[.AH1]+1" office:value-type="date" office:date-value="2026-06-16" calcext:value-type="date">
            <text:p>2026/06/16</text:p>
          </table:table-cell>
          <table:table-cell table:style-name="ce77" table:formula="of:=[.AI1]+1" office:value-type="date" office:date-value="2026-06-17" calcext:value-type="date">
            <text:p>2026/06/17</text:p>
          </table:table-cell>
          <table:table-cell table:style-name="ce77" table:formula="of:=[.AJ1]+1" office:value-type="date" office:date-value="2026-06-18" calcext:value-type="date">
            <text:p>2026/06/18</text:p>
          </table:table-cell>
          <table:table-cell table:style-name="ce77" table:formula="of:=[.AK1]+1" office:value-type="date" office:date-value="2026-06-19" calcext:value-type="date">
            <text:p>2026/06/19</text:p>
          </table:table-cell>
          <table:table-cell table:style-name="ce103" table:formula="of:=[.AL1]+1" office:value-type="date" office:date-value="2026-06-20" calcext:value-type="date">
            <text:p>2026/06/20</text:p>
          </table:table-cell>
          <table:table-cell table:style-name="ce103" table:formula="of:=[.AM1]+1" office:value-type="date" office:date-value="2026-06-21" calcext:value-type="date">
            <text:p>2026/06/21</text:p>
          </table:table-cell>
          <table:table-cell table:style-name="ce77" table:formula="of:=[.AN1]+1" office:value-type="date" office:date-value="2026-06-22" calcext:value-type="date">
            <text:p>2026/06/22</text:p>
          </table:table-cell>
          <table:table-cell table:style-name="ce77" table:formula="of:=[.AO1]+1" office:value-type="date" office:date-value="2026-06-23" calcext:value-type="date">
            <text:p>2026/06/23</text:p>
          </table:table-cell>
          <table:table-cell table:style-name="ce77" table:formula="of:=[.AP1]+1" office:value-type="date" office:date-value="2026-06-24" calcext:value-type="date">
            <text:p>2026/06/24</text:p>
          </table:table-cell>
          <table:table-cell table:style-name="ce77" table:formula="of:=[.AQ1]+1" office:value-type="date" office:date-value="2026-06-25" calcext:value-type="date">
            <text:p>2026/06/25</text:p>
          </table:table-cell>
          <table:table-cell table:style-name="ce132" table:formula="of:=[.AR1]+1" office:value-type="date" office:date-value="2026-06-26" calcext:value-type="date">
            <text:p>2026/06/26</text:p>
          </table:table-cell>
          <table:table-cell table:style-name="ce103" table:formula="of:=[.AS1]+1" office:value-type="date" office:date-value="2026-06-27" calcext:value-type="date">
            <text:p>2026/06/27</text:p>
          </table:table-cell>
          <table:table-cell table:style-name="ce103" table:formula="of:=[.AT1]+1" office:value-type="date" office:date-value="2026-06-28" calcext:value-type="date">
            <text:p>2026/06/28</text:p>
          </table:table-cell>
          <table:table-cell table:style-name="ce146" table:formula="of:=[.AU1]+1" office:value-type="date" office:date-value="2026-06-29" calcext:value-type="date">
            <text:p>2026/06/29</text:p>
          </table:table-cell>
          <table:table-cell table:style-name="ce77" table:formula="of:=[.AV1]+1" office:value-type="date" office:date-value="2026-06-30" calcext:value-type="date">
            <text:p>2026/06/30</text:p>
          </table:table-cell>
          <table:table-cell table:style-name="ce77" table:formula="of:=[.AW1]+1" office:value-type="date" office:date-value="2026-07-01" calcext:value-type="date">
            <text:p>2026/07/01</text:p>
          </table:table-cell>
          <table:table-cell table:style-name="ce77" table:formula="of:=[.AX1]+1" office:value-type="date" office:date-value="2026-07-02" calcext:value-type="date">
            <text:p>2026/07/02</text:p>
          </table:table-cell>
          <table:table-cell table:style-name="ce77" table:formula="of:=[.AY1]+1" office:value-type="date" office:date-value="2026-07-03" calcext:value-type="date">
            <text:p>2026/07/03</text:p>
          </table:table-cell>
          <table:table-cell table:style-name="ce77" table:formula="of:=[.AZ1]+1" office:value-type="date" office:date-value="2026-07-04" calcext:value-type="date">
            <text:p>2026/07/04</text:p>
          </table:table-cell>
          <table:table-cell table:style-name="ce77" table:formula="of:=[.BA1]+1" office:value-type="date" office:date-value="2026-07-05" calcext:value-type="date">
            <text:p>2026/07/05</text:p>
          </table:table-cell>
          <table:table-cell table:style-name="ce77" table:formula="of:=[.BB1]+1" office:value-type="date" office:date-value="2026-07-06" calcext:value-type="date">
            <text:p>2026/07/06</text:p>
          </table:table-cell>
          <table:table-cell table:style-name="ce77" table:formula="of:=[.BC1]+1" office:value-type="date" office:date-value="2026-07-07" calcext:value-type="date">
            <text:p>2026/07/07</text:p>
          </table:table-cell>
          <table:table-cell table:style-name="ce77" table:formula="of:=[.BD1]+1" office:value-type="date" office:date-value="2026-07-08" calcext:value-type="date">
            <text:p>2026/07/08</text:p>
          </table:table-cell>
          <table:table-cell table:style-name="ce77" table:formula="of:=[.BE1]+1" office:value-type="date" office:date-value="2026-07-09" calcext:value-type="date">
            <text:p>2026/07/09</text:p>
          </table:table-cell>
          <table:table-cell table:style-name="ce77" table:formula="of:=[.BF1]+1" office:value-type="date" office:date-value="2026-07-10" calcext:value-type="date">
            <text:p>2026/07/10</text:p>
          </table:table-cell>
          <table:table-cell table:style-name="ce77" table:formula="of:=[.BG1]+1" office:value-type="date" office:date-value="2026-07-11" calcext:value-type="date">
            <text:p>2026/07/11</text:p>
          </table:table-cell>
          <table:table-cell table:style-name="ce77" table:formula="of:=[.BH1]+1" office:value-type="date" office:date-value="2026-07-12" calcext:value-type="date">
            <text:p>2026/07/12</text:p>
          </table:table-cell>
          <table:table-cell table:style-name="ce77" table:formula="of:=[.BI1]+1" office:value-type="date" office:date-value="2026-07-13" calcext:value-type="date">
            <text:p>2026/07/13</text:p>
          </table:table-cell>
          <table:table-cell table:style-name="ce77" table:formula="of:=[.BJ1]+1" office:value-type="date" office:date-value="2026-07-14" calcext:value-type="date">
            <text:p>2026/07/14</text:p>
          </table:table-cell>
          <table:table-cell table:style-name="ce77" table:formula="of:=[.BK1]+1" office:value-type="date" office:date-value="2026-07-15" calcext:value-type="date">
            <text:p>2026/07/15</text:p>
          </table:table-cell>
          <table:table-cell table:style-name="ce77" table:formula="of:=[.BL1]+1" office:value-type="date" office:date-value="2026-07-16" calcext:value-type="date">
            <text:p>2026/07/16</text:p>
          </table:table-cell>
          <table:table-cell table:style-name="ce77" table:formula="of:=[.BM1]+1" office:value-type="date" office:date-value="2026-07-17" calcext:value-type="date">
            <text:p>2026/07/17</text:p>
          </table:table-cell>
          <table:table-cell table:style-name="ce77" table:formula="of:=[.BN1]+1" office:value-type="date" office:date-value="2026-07-18" calcext:value-type="date">
            <text:p>2026/07/18</text:p>
          </table:table-cell>
          <table:table-cell table:style-name="ce77" table:formula="of:=[.BO1]+1" office:value-type="date" office:date-value="2026-07-19" calcext:value-type="date">
            <text:p>2026/07/19</text:p>
          </table:table-cell>
          <table:table-cell table:style-name="ce77" table:formula="of:=[.BP1]+1" office:value-type="date" office:date-value="2026-07-20" calcext:value-type="date">
            <text:p>2026/07/20</text:p>
          </table:table-cell>
          <table:table-cell table:style-name="ce77" table:formula="of:=[.BQ1]+1" office:value-type="date" office:date-value="2026-07-21" calcext:value-type="date">
            <text:p>2026/07/21</text:p>
          </table:table-cell>
          <table:table-cell table:style-name="ce77" table:formula="of:=[.BR1]+1" office:value-type="date" office:date-value="2026-07-22" calcext:value-type="date">
            <text:p>2026/07/22</text:p>
          </table:table-cell>
          <table:table-cell table:style-name="ce77" table:formula="of:=[.BS1]+1" office:value-type="date" office:date-value="2026-07-23" calcext:value-type="date">
            <text:p>2026/07/23</text:p>
          </table:table-cell>
          <table:table-cell table:style-name="ce77" table:formula="of:=[.BT1]+1" office:value-type="date" office:date-value="2026-07-24" calcext:value-type="date">
            <text:p>2026/07/24</text:p>
          </table:table-cell>
          <table:table-cell table:style-name="ce77" table:formula="of:=[.BU1]+1" office:value-type="date" office:date-value="2026-07-25" calcext:value-type="date">
            <text:p>2026/07/25</text:p>
          </table:table-cell>
          <table:table-cell table:style-name="ce77" table:formula="of:=[.BV1]+1" office:value-type="date" office:date-value="2026-07-26" calcext:value-type="date">
            <text:p>2026/07/26</text:p>
          </table:table-cell>
          <table:table-cell table:style-name="ce77" table:formula="of:=[.BW1]+1" office:value-type="date" office:date-value="2026-07-27" calcext:value-type="date">
            <text:p>2026/07/27</text:p>
          </table:table-cell>
          <table:table-cell table:style-name="ce77" table:formula="of:=[.BX1]+1" office:value-type="date" office:date-value="2026-07-28" calcext:value-type="date">
            <text:p>2026/07/28</text:p>
          </table:table-cell>
          <table:table-cell table:style-name="ce77" table:formula="of:=[.BY1]+1" office:value-type="date" office:date-value="2026-07-29" calcext:value-type="date">
            <text:p>2026/07/29</text:p>
          </table:table-cell>
          <table:table-cell table:style-name="ce77" table:formula="of:=[.BZ1]+1" office:value-type="date" office:date-value="2026-07-30" calcext:value-type="date">
            <text:p>2026/07/30</text:p>
          </table:table-cell>
          <table:table-cell table:style-name="ce77" table:formula="of:=[.CA1]+1" office:value-type="date" office:date-value="2026-07-31" calcext:value-type="date">
            <text:p>2026/07/31</text:p>
          </table:table-cell>
          <table:table-cell table:style-name="ce77" table:formula="of:=[.CB1]+1" office:value-type="date" office:date-value="2026-08-01" calcext:value-type="date">
            <text:p>2026/08/01</text:p>
          </table:table-cell>
          <table:table-cell table:style-name="ce77" table:formula="of:=[.CC1]+1" office:value-type="date" office:date-value="2026-08-02" calcext:value-type="date">
            <text:p>2026/08/02</text:p>
          </table:table-cell>
          <table:table-cell table:style-name="ce77" table:formula="of:=[.CD1]+1" office:value-type="date" office:date-value="2026-08-03" calcext:value-type="date">
            <text:p>2026/08/03</text:p>
          </table:table-cell>
          <table:table-cell table:style-name="ce77" table:formula="of:=[.CE1]+1" office:value-type="date" office:date-value="2026-08-04" calcext:value-type="date">
            <text:p>2026/08/04</text:p>
          </table:table-cell>
          <table:table-cell table:style-name="ce77" table:formula="of:=[.CF1]+1" office:value-type="date" office:date-value="2026-08-05" calcext:value-type="date">
            <text:p>2026/08/05</text:p>
          </table:table-cell>
          <table:table-cell table:style-name="ce77" table:formula="of:=[.CG1]+1" office:value-type="date" office:date-value="2026-08-06" calcext:value-type="date">
            <text:p>2026/08/06</text:p>
          </table:table-cell>
          <table:table-cell table:style-name="ce77" table:formula="of:=[.CH1]+1" office:value-type="date" office:date-value="2026-08-07" calcext:value-type="date">
            <text:p>2026/08/07</text:p>
          </table:table-cell>
          <table:table-cell table:style-name="ce77" table:formula="of:=[.CI1]+1" office:value-type="date" office:date-value="2026-08-08" calcext:value-type="date">
            <text:p>2026/08/08</text:p>
          </table:table-cell>
          <table:table-cell table:style-name="ce77" table:formula="of:=[.CJ1]+1" office:value-type="date" office:date-value="2026-08-09" calcext:value-type="date">
            <text:p>2026/08/09</text:p>
          </table:table-cell>
          <table:table-cell table:style-name="ce77" table:formula="of:=[.CK1]+1" office:value-type="date" office:date-value="2026-08-10" calcext:value-type="date">
            <text:p>2026/08/10</text:p>
          </table:table-cell>
          <table:table-cell table:style-name="ce77" table:formula="of:=[.CL1]+1" office:value-type="date" office:date-value="2026-08-11" calcext:value-type="date">
            <text:p>2026/08/11</text:p>
          </table:table-cell>
          <table:table-cell table:style-name="ce77" table:formula="of:=[.CM1]+1" office:value-type="date" office:date-value="2026-08-12" calcext:value-type="date">
            <text:p>2026/08/12</text:p>
          </table:table-cell>
          <table:table-cell table:style-name="ce77" table:formula="of:=[.CN1]+1" office:value-type="date" office:date-value="2026-08-13" calcext:value-type="date">
            <text:p>2026/08/13</text:p>
          </table:table-cell>
          <table:table-cell table:style-name="ce77" table:formula="of:=[.CO1]+1" office:value-type="date" office:date-value="2026-08-14" calcext:value-type="date">
            <text:p>2026/08/14</text:p>
          </table:table-cell>
          <table:table-cell table:style-name="ce77" table:formula="of:=[.CP1]+1" office:value-type="date" office:date-value="2026-08-15" calcext:value-type="date">
            <text:p>2026/08/15</text:p>
          </table:table-cell>
          <table:table-cell table:style-name="ce77" table:formula="of:=[.CQ1]+1" office:value-type="date" office:date-value="2026-08-16" calcext:value-type="date">
            <text:p>2026/08/16</text:p>
          </table:table-cell>
          <table:table-cell table:style-name="ce77" table:formula="of:=[.CR1]+1" office:value-type="date" office:date-value="2026-08-17" calcext:value-type="date">
            <text:p>2026/08/17</text:p>
          </table:table-cell>
          <table:table-cell table:style-name="ce77" table:formula="of:=[.CS1]+1" office:value-type="date" office:date-value="2026-08-18" calcext:value-type="date">
            <text:p>2026/08/18</text:p>
          </table:table-cell>
          <table:table-cell table:style-name="ce77" table:formula="of:=[.CT1]+1" office:value-type="date" office:date-value="2026-08-19" calcext:value-type="date">
            <text:p>2026/08/19</text:p>
          </table:table-cell>
          <table:table-cell table:style-name="ce77" table:formula="of:=[.CU1]+1" office:value-type="date" office:date-value="2026-08-20" calcext:value-type="date">
            <text:p>2026/08/20</text:p>
          </table:table-cell>
          <table:table-cell table:style-name="ce77" table:formula="of:=[.CV1]+1" office:value-type="date" office:date-value="2026-08-21" calcext:value-type="date">
            <text:p>2026/08/21</text:p>
          </table:table-cell>
          <table:table-cell table:style-name="ce77" table:formula="of:=[.CW1]+1" office:value-type="date" office:date-value="2026-08-22" calcext:value-type="date">
            <text:p>2026/08/22</text:p>
          </table:table-cell>
          <table:table-cell table:style-name="ce77" table:formula="of:=[.CX1]+1" office:value-type="date" office:date-value="2026-08-23" calcext:value-type="date">
            <text:p>2026/08/23</text:p>
          </table:table-cell>
          <table:table-cell table:style-name="ce77" table:formula="of:=[.CY1]+1" office:value-type="date" office:date-value="2026-08-24" calcext:value-type="date">
            <text:p>2026/08/24</text:p>
          </table:table-cell>
          <table:table-cell table:style-name="ce77" table:formula="of:=[.CZ1]+1" office:value-type="date" office:date-value="2026-08-25" calcext:value-type="date">
            <text:p>2026/08/25</text:p>
          </table:table-cell>
          <table:table-cell table:style-name="ce77" table:formula="of:=[.DA1]+1" office:value-type="date" office:date-value="2026-08-26" calcext:value-type="date">
            <text:p>2026/08/26</text:p>
          </table:table-cell>
          <table:table-cell table:style-name="ce77" table:formula="of:=[.DB1]+1" office:value-type="date" office:date-value="2026-08-27" calcext:value-type="date">
            <text:p>2026/08/27</text:p>
          </table:table-cell>
          <table:table-cell table:style-name="ce77" table:formula="of:=[.DC1]+1" office:value-type="date" office:date-value="2026-08-28" calcext:value-type="date">
            <text:p>2026/08/28</text:p>
          </table:table-cell>
          <table:table-cell table:style-name="ce77" table:formula="of:=[.DD1]+1" office:value-type="date" office:date-value="2026-08-29" calcext:value-type="date">
            <text:p>2026/08/29</text:p>
          </table:table-cell>
          <table:table-cell table:style-name="ce77" table:formula="of:=[.DE1]+1" office:value-type="date" office:date-value="2026-08-30" calcext:value-type="date">
            <text:p>2026/08/30</text:p>
          </table:table-cell>
          <table:table-cell table:style-name="ce77" table:formula="of:=[.DF1]+1" office:value-type="date" office:date-value="2026-08-31" calcext:value-type="date">
            <text:p>2026/08/31</text:p>
          </table:table-cell>
          <table:table-cell table:style-name="ce77" table:formula="of:=[.DG1]+1" office:value-type="date" office:date-value="2026-09-01" calcext:value-type="date">
            <text:p>2026/09/01</text:p>
          </table:table-cell>
          <table:table-cell table:style-name="ce77" table:formula="of:=[.DH1]+1" office:value-type="date" office:date-value="2026-09-02" calcext:value-type="date">
            <text:p>2026/09/02</text:p>
          </table:table-cell>
          <table:table-cell table:style-name="ce77" table:formula="of:=[.DI1]+1" office:value-type="date" office:date-value="2026-09-03" calcext:value-type="date">
            <text:p>2026/09/03</text:p>
          </table:table-cell>
          <table:table-cell table:style-name="ce77" table:formula="of:=[.DJ1]+1" office:value-type="date" office:date-value="2026-09-04" calcext:value-type="date">
            <text:p>2026/09/04</text:p>
          </table:table-cell>
          <table:table-cell table:style-name="ce77" table:formula="of:=[.DK1]+1" office:value-type="date" office:date-value="2026-09-05" calcext:value-type="date">
            <text:p>2026/09/05</text:p>
          </table:table-cell>
          <table:table-cell table:style-name="ce77" table:formula="of:=[.DL1]+1" office:value-type="date" office:date-value="2026-09-06" calcext:value-type="date">
            <text:p>2026/09/06</text:p>
          </table:table-cell>
          <table:table-cell table:style-name="ce77" table:formula="of:=[.DM1]+1" office:value-type="date" office:date-value="2026-09-07" calcext:value-type="date">
            <text:p>2026/09/07</text:p>
          </table:table-cell>
          <table:table-cell table:style-name="ce77" table:formula="of:=[.DN1]+1" office:value-type="date" office:date-value="2026-09-08" calcext:value-type="date">
            <text:p>2026/09/08</text:p>
          </table:table-cell>
          <table:table-cell table:style-name="ce77" table:formula="of:=[.DO1]+1" office:value-type="date" office:date-value="2026-09-09" calcext:value-type="date">
            <text:p>2026/09/09</text:p>
          </table:table-cell>
          <table:table-cell table:style-name="ce77" table:formula="of:=[.DP1]+1" office:value-type="date" office:date-value="2026-09-10" calcext:value-type="date">
            <text:p>2026/09/10</text:p>
          </table:table-cell>
          <table:table-cell table:style-name="ce77" table:formula="of:=[.DQ1]+1" office:value-type="date" office:date-value="2026-09-11" calcext:value-type="date">
            <text:p>2026/09/11</text:p>
          </table:table-cell>
          <table:table-cell table:style-name="ce77" table:formula="of:=[.DR1]+1" office:value-type="date" office:date-value="2026-09-12" calcext:value-type="date">
            <text:p>2026/09/12</text:p>
          </table:table-cell>
          <table:table-cell table:style-name="ce77" table:formula="of:=[.DS1]+1" office:value-type="date" office:date-value="2026-09-13" calcext:value-type="date">
            <text:p>2026/09/13</text:p>
          </table:table-cell>
          <table:table-cell table:style-name="ce77" table:formula="of:=[.DT1]+1" office:value-type="date" office:date-value="2026-09-14" calcext:value-type="date">
            <text:p>2026/09/14</text:p>
          </table:table-cell>
          <table:table-cell table:style-name="ce77" table:formula="of:=[.DU1]+1" office:value-type="date" office:date-value="2026-09-15" calcext:value-type="date">
            <text:p>2026/09/15</text:p>
          </table:table-cell>
          <table:table-cell table:style-name="ce77" table:formula="of:=[.DV1]+1" office:value-type="date" office:date-value="2026-09-16" calcext:value-type="date">
            <text:p>2026/09/16</text:p>
          </table:table-cell>
          <table:table-cell table:style-name="ce77" table:formula="of:=[.DW1]+1" office:value-type="date" office:date-value="2026-09-17" calcext:value-type="date">
            <text:p>2026/09/17</text:p>
          </table:table-cell>
          <table:table-cell table:style-name="ce77" table:formula="of:=[.DX1]+1" office:value-type="date" office:date-value="2026-09-18" calcext:value-type="date">
            <text:p>2026/09/18</text:p>
          </table:table-cell>
          <table:table-cell table:style-name="ce77" table:formula="of:=[.DY1]+1" office:value-type="date" office:date-value="2026-09-19" calcext:value-type="date">
            <text:p>2026/09/19</text:p>
          </table:table-cell>
          <table:table-cell table:style-name="ce77" table:formula="of:=[.DZ1]+1" office:value-type="date" office:date-value="2026-09-20" calcext:value-type="date">
            <text:p>2026/09/20</text:p>
          </table:table-cell>
          <table:table-cell table:style-name="ce77" table:formula="of:=[.EA1]+1" office:value-type="date" office:date-value="2026-09-21" calcext:value-type="date">
            <text:p>2026/09/21</text:p>
          </table:table-cell>
          <table:table-cell table:style-name="ce77" table:formula="of:=[.EB1]+1" office:value-type="date" office:date-value="2026-09-22" calcext:value-type="date">
            <text:p>2026/09/22</text:p>
          </table:table-cell>
          <table:table-cell table:style-name="ce77" table:formula="of:=[.EC1]+1" office:value-type="date" office:date-value="2026-09-23" calcext:value-type="date">
            <text:p>2026/09/23</text:p>
          </table:table-cell>
          <table:table-cell table:style-name="ce77" table:formula="of:=[.ED1]+1" office:value-type="date" office:date-value="2026-09-24" calcext:value-type="date">
            <text:p>2026/09/24</text:p>
          </table:table-cell>
          <table:table-cell table:style-name="ce77" table:formula="of:=[.EE1]+1" office:value-type="date" office:date-value="2026-09-25" calcext:value-type="date">
            <text:p>2026/09/25</text:p>
          </table:table-cell>
          <table:table-cell table:style-name="ce77" table:formula="of:=[.EF1]+1" office:value-type="date" office:date-value="2026-09-26" calcext:value-type="date">
            <text:p>2026/09/26</text:p>
          </table:table-cell>
          <table:table-cell table:style-name="ce77" table:formula="of:=[.EG1]+1" office:value-type="date" office:date-value="2026-09-27" calcext:value-type="date">
            <text:p>2026/09/27</text:p>
          </table:table-cell>
          <table:table-cell table:style-name="ce77" table:formula="of:=[.EH1]+1" office:value-type="date" office:date-value="2026-09-28" calcext:value-type="date">
            <text:p>2026/09/28</text:p>
          </table:table-cell>
          <table:table-cell table:style-name="ce77" table:formula="of:=[.EI1]+1" office:value-type="date" office:date-value="2026-09-29" calcext:value-type="date">
            <text:p>2026/09/29</text:p>
          </table:table-cell>
          <table:table-cell table:style-name="ce77" table:formula="of:=[.EJ1]+1" office:value-type="date" office:date-value="2026-09-30" calcext:value-type="date">
            <text:p>2026/09/30</text:p>
          </table:table-cell>
          <table:table-cell table:style-name="ce77" table:formula="of:=[.EK1]+1" office:value-type="date" office:date-value="2026-10-01" calcext:value-type="date">
            <text:p>2026/10/01</text:p>
          </table:table-cell>
          <table:table-cell table:style-name="ce77" table:formula="of:=[.EL1]+1" office:value-type="date" office:date-value="2026-10-02" calcext:value-type="date">
            <text:p>2026/10/02</text:p>
          </table:table-cell>
          <table:table-cell table:style-name="ce77" table:formula="of:=[.EM1]+1" office:value-type="date" office:date-value="2026-10-03" calcext:value-type="date">
            <text:p>2026/10/03</text:p>
          </table:table-cell>
          <table:table-cell table:style-name="ce77" table:formula="of:=[.EN1]+1" office:value-type="date" office:date-value="2026-10-04" calcext:value-type="date">
            <text:p>2026/10/04</text:p>
          </table:table-cell>
          <table:table-cell table:style-name="ce77" table:formula="of:=[.EO1]+1" office:value-type="date" office:date-value="2026-10-05" calcext:value-type="date">
            <text:p>2026/10/05</text:p>
          </table:table-cell>
          <table:table-cell table:style-name="ce77" table:formula="of:=[.EP1]+1" office:value-type="date" office:date-value="2026-10-06" calcext:value-type="date">
            <text:p>2026/10/06</text:p>
          </table:table-cell>
          <table:table-cell table:style-name="ce77" table:formula="of:=[.EQ1]+1" office:value-type="date" office:date-value="2026-10-07" calcext:value-type="date">
            <text:p>2026/10/07</text:p>
          </table:table-cell>
          <table:table-cell table:style-name="ce77" table:formula="of:=[.ER1]+1" office:value-type="date" office:date-value="2026-10-08" calcext:value-type="date">
            <text:p>2026/10/08</text:p>
          </table:table-cell>
          <table:table-cell table:style-name="ce77" table:formula="of:=[.ES1]+1" office:value-type="date" office:date-value="2026-10-09" calcext:value-type="date">
            <text:p>2026/10/09</text:p>
          </table:table-cell>
          <table:table-cell table:style-name="ce77" table:formula="of:=[.ET1]+1" office:value-type="date" office:date-value="2026-10-10" calcext:value-type="date">
            <text:p>2026/10/10</text:p>
          </table:table-cell>
          <table:table-cell table:style-name="ce77" table:formula="of:=[.EU1]+1" office:value-type="date" office:date-value="2026-10-11" calcext:value-type="date">
            <text:p>2026/10/11</text:p>
          </table:table-cell>
          <table:table-cell table:style-name="ce77" table:formula="of:=[.EV1]+1" office:value-type="date" office:date-value="2026-10-12" calcext:value-type="date">
            <text:p>2026/10/12</text:p>
          </table:table-cell>
          <table:table-cell table:style-name="ce77" table:formula="of:=[.EW1]+1" office:value-type="date" office:date-value="2026-10-13" calcext:value-type="date">
            <text:p>2026/10/13</text:p>
          </table:table-cell>
          <table:table-cell table:style-name="ce77" table:formula="of:=[.EX1]+1" office:value-type="date" office:date-value="2026-10-14" calcext:value-type="date">
            <text:p>2026/10/14</text:p>
          </table:table-cell>
          <table:table-cell table:style-name="ce77" table:formula="of:=[.EY1]+1" office:value-type="date" office:date-value="2026-10-15" calcext:value-type="date">
            <text:p>2026/10/15</text:p>
          </table:table-cell>
          <table:table-cell table:style-name="ce77" table:formula="of:=[.EZ1]+1" office:value-type="date" office:date-value="2026-10-16" calcext:value-type="date">
            <text:p>2026/10/16</text:p>
          </table:table-cell>
          <table:table-cell table:style-name="ce77" table:formula="of:=[.FA1]+1" office:value-type="date" office:date-value="2026-10-17" calcext:value-type="date">
            <text:p>2026/10/17</text:p>
          </table:table-cell>
          <table:table-cell table:style-name="ce77" table:formula="of:=[.FB1]+1" office:value-type="date" office:date-value="2026-10-18" calcext:value-type="date">
            <text:p>2026/10/18</text:p>
          </table:table-cell>
          <table:table-cell table:style-name="ce77" table:formula="of:=[.FC1]+1" office:value-type="date" office:date-value="2026-10-19" calcext:value-type="date">
            <text:p>2026/10/19</text:p>
          </table:table-cell>
          <table:table-cell table:style-name="ce77" table:formula="of:=[.FD1]+1" office:value-type="date" office:date-value="2026-10-20" calcext:value-type="date">
            <text:p>2026/10/20</text:p>
          </table:table-cell>
          <table:table-cell table:style-name="ce77" table:formula="of:=[.FE1]+1" office:value-type="date" office:date-value="2026-10-21" calcext:value-type="date">
            <text:p>2026/10/21</text:p>
          </table:table-cell>
          <table:table-cell table:style-name="ce77" table:formula="of:=[.FF1]+1" office:value-type="date" office:date-value="2026-10-22" calcext:value-type="date">
            <text:p>2026/10/22</text:p>
          </table:table-cell>
          <table:table-cell table:style-name="ce77" table:formula="of:=[.FG1]+1" office:value-type="date" office:date-value="2026-10-23" calcext:value-type="date">
            <text:p>2026/10/23</text:p>
          </table:table-cell>
          <table:table-cell table:style-name="ce77" table:formula="of:=[.FH1]+1" office:value-type="date" office:date-value="2026-10-24" calcext:value-type="date">
            <text:p>2026/10/24</text:p>
          </table:table-cell>
          <table:table-cell table:style-name="ce77" table:formula="of:=[.FI1]+1" office:value-type="date" office:date-value="2026-10-25" calcext:value-type="date">
            <text:p>2026/10/25</text:p>
          </table:table-cell>
          <table:table-cell table:style-name="ce77" table:formula="of:=[.FJ1]+1" office:value-type="date" office:date-value="2026-10-26" calcext:value-type="date">
            <text:p>2026/10/26</text:p>
          </table:table-cell>
          <table:table-cell table:style-name="ce77" table:formula="of:=[.FK1]+1" office:value-type="date" office:date-value="2026-10-27" calcext:value-type="date">
            <text:p>2026/10/27</text:p>
          </table:table-cell>
          <table:table-cell table:style-name="ce77" table:formula="of:=[.FL1]+1" office:value-type="date" office:date-value="2026-10-28" calcext:value-type="date">
            <text:p>2026/10/28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 table:number-columns-repeated="2"/>
          <table:table-cell table:style-name="ce11"/>
          <table:table-cell table:number-columns-repeated="17"/>
          <table:table-cell table:style-name="ce69" office:value-type="string" calcext:value-type="string">
            <text:p>月</text:p>
          </table:table-cell>
          <table:table-cell table:style-name="ce78" table:formula="of:=[.V$1]" office:value-type="date" office:date-value="2026-06-03" calcext:value-type="date">
            <text:p>6</text:p>
          </table:table-cell>
          <table:table-cell table:style-name="ce92" table:formula="of:=[.W$1]" office:value-type="date" office:date-value="2026-06-04" calcext:value-type="date">
            <text:p>6</text:p>
          </table:table-cell>
          <table:table-cell table:style-name="ce92" table:formula="of:=[.X$1]" office:value-type="date" office:date-value="2026-06-05" calcext:value-type="date">
            <text:p>6</text:p>
          </table:table-cell>
          <table:table-cell table:style-name="ce104" table:formula="of:=[.Y$1]" office:value-type="date" office:date-value="2026-06-06" calcext:value-type="date">
            <text:p>6</text:p>
          </table:table-cell>
          <table:table-cell table:style-name="ce104" table:formula="of:=[.Z$1]" office:value-type="date" office:date-value="2026-06-07" calcext:value-type="date">
            <text:p>6</text:p>
          </table:table-cell>
          <table:table-cell table:style-name="ce92" table:formula="of:=[.AA$1]" office:value-type="date" office:date-value="2026-06-08" calcext:value-type="date">
            <text:p>6</text:p>
          </table:table-cell>
          <table:table-cell table:style-name="ce92" table:formula="of:=[.AB$1]" office:value-type="date" office:date-value="2026-06-09" calcext:value-type="date">
            <text:p>6</text:p>
          </table:table-cell>
          <table:table-cell table:style-name="ce92" table:formula="of:=[.AC$1]" office:value-type="date" office:date-value="2026-06-10" calcext:value-type="date">
            <text:p>6</text:p>
          </table:table-cell>
          <table:table-cell table:style-name="ce92" table:formula="of:=[.AD$1]" office:value-type="date" office:date-value="2026-06-11" calcext:value-type="date">
            <text:p>6</text:p>
          </table:table-cell>
          <table:table-cell table:style-name="ce92" table:formula="of:=[.AE$1]" office:value-type="date" office:date-value="2026-06-12" calcext:value-type="date">
            <text:p>6</text:p>
          </table:table-cell>
          <table:table-cell table:style-name="ce104" table:formula="of:=[.AF$1]" office:value-type="date" office:date-value="2026-06-13" calcext:value-type="date">
            <text:p>6</text:p>
          </table:table-cell>
          <table:table-cell table:style-name="ce104" table:formula="of:=[.AG$1]" office:value-type="date" office:date-value="2026-06-14" calcext:value-type="date">
            <text:p>6</text:p>
          </table:table-cell>
          <table:table-cell table:style-name="ce92" table:formula="of:=[.AH$1]" office:value-type="date" office:date-value="2026-06-15" calcext:value-type="date">
            <text:p>6</text:p>
          </table:table-cell>
          <table:table-cell table:style-name="ce92" table:formula="of:=[.AI$1]" office:value-type="date" office:date-value="2026-06-16" calcext:value-type="date">
            <text:p>6</text:p>
          </table:table-cell>
          <table:table-cell table:style-name="ce92" table:formula="of:=[.AJ$1]" office:value-type="date" office:date-value="2026-06-17" calcext:value-type="date">
            <text:p>6</text:p>
          </table:table-cell>
          <table:table-cell table:style-name="ce92" table:formula="of:=[.AK$1]" office:value-type="date" office:date-value="2026-06-18" calcext:value-type="date">
            <text:p>6</text:p>
          </table:table-cell>
          <table:table-cell table:style-name="ce92" table:formula="of:=[.AL$1]" office:value-type="date" office:date-value="2026-06-19" calcext:value-type="date">
            <text:p>6</text:p>
          </table:table-cell>
          <table:table-cell table:style-name="ce104" table:formula="of:=[.AM$1]" office:value-type="date" office:date-value="2026-06-20" calcext:value-type="date">
            <text:p>6</text:p>
          </table:table-cell>
          <table:table-cell table:style-name="ce104" table:formula="of:=[.AN$1]" office:value-type="date" office:date-value="2026-06-21" calcext:value-type="date">
            <text:p>6</text:p>
          </table:table-cell>
          <table:table-cell table:style-name="ce92" table:formula="of:=[.AO$1]" office:value-type="date" office:date-value="2026-06-22" calcext:value-type="date">
            <text:p>6</text:p>
          </table:table-cell>
          <table:table-cell table:style-name="ce92" table:formula="of:=[.AP$1]" office:value-type="date" office:date-value="2026-06-23" calcext:value-type="date">
            <text:p>6</text:p>
          </table:table-cell>
          <table:table-cell table:style-name="ce92" table:formula="of:=[.AQ$1]" office:value-type="date" office:date-value="2026-06-24" calcext:value-type="date">
            <text:p>6</text:p>
          </table:table-cell>
          <table:table-cell table:style-name="ce92" table:formula="of:=[.AR$1]" office:value-type="date" office:date-value="2026-06-25" calcext:value-type="date">
            <text:p>6</text:p>
          </table:table-cell>
          <table:table-cell table:style-name="ce133" table:formula="of:=[.AS$1]" office:value-type="date" office:date-value="2026-06-26" calcext:value-type="date">
            <text:p>6</text:p>
          </table:table-cell>
          <table:table-cell table:style-name="ce104" table:formula="of:=[.AT$1]" office:value-type="date" office:date-value="2026-06-27" calcext:value-type="date">
            <text:p>6</text:p>
          </table:table-cell>
          <table:table-cell table:style-name="ce104" table:formula="of:=[.AU$1]" office:value-type="date" office:date-value="2026-06-28" calcext:value-type="date">
            <text:p>6</text:p>
          </table:table-cell>
          <table:table-cell table:style-name="ce147" table:formula="of:=[.AV$1]" office:value-type="date" office:date-value="2026-06-29" calcext:value-type="date">
            <text:p>6</text:p>
          </table:table-cell>
          <table:table-cell table:style-name="ce92" table:formula="of:=[.AW$1]" office:value-type="date" office:date-value="2026-06-30" calcext:value-type="date">
            <text:p>6</text:p>
          </table:table-cell>
          <table:table-cell table:style-name="ce92" table:formula="of:=[.AX$1]" office:value-type="date" office:date-value="2026-07-01" calcext:value-type="date">
            <text:p>7</text:p>
          </table:table-cell>
          <table:table-cell table:style-name="ce92" table:formula="of:=[.AY$1]" office:value-type="date" office:date-value="2026-07-02" calcext:value-type="date">
            <text:p>7</text:p>
          </table:table-cell>
          <table:table-cell table:style-name="ce92" table:formula="of:=[.AZ$1]" office:value-type="date" office:date-value="2026-07-03" calcext:value-type="date">
            <text:p>7</text:p>
          </table:table-cell>
          <table:table-cell table:style-name="ce92" table:formula="of:=[.BA$1]" office:value-type="date" office:date-value="2026-07-04" calcext:value-type="date">
            <text:p>7</text:p>
          </table:table-cell>
          <table:table-cell table:style-name="ce92" table:formula="of:=[.BB$1]" office:value-type="date" office:date-value="2026-07-05" calcext:value-type="date">
            <text:p>7</text:p>
          </table:table-cell>
          <table:table-cell table:style-name="ce92" table:formula="of:=[.BC$1]" office:value-type="date" office:date-value="2026-07-06" calcext:value-type="date">
            <text:p>7</text:p>
          </table:table-cell>
          <table:table-cell table:style-name="ce92" table:formula="of:=[.BD$1]" office:value-type="date" office:date-value="2026-07-07" calcext:value-type="date">
            <text:p>7</text:p>
          </table:table-cell>
          <table:table-cell table:style-name="ce92" table:formula="of:=[.BE$1]" office:value-type="date" office:date-value="2026-07-08" calcext:value-type="date">
            <text:p>7</text:p>
          </table:table-cell>
          <table:table-cell table:style-name="ce92" table:formula="of:=[.BF$1]" office:value-type="date" office:date-value="2026-07-09" calcext:value-type="date">
            <text:p>7</text:p>
          </table:table-cell>
          <table:table-cell table:style-name="ce92" table:formula="of:=[.BG$1]" office:value-type="date" office:date-value="2026-07-10" calcext:value-type="date">
            <text:p>7</text:p>
          </table:table-cell>
          <table:table-cell table:style-name="ce92" table:formula="of:=[.BH$1]" office:value-type="date" office:date-value="2026-07-11" calcext:value-type="date">
            <text:p>7</text:p>
          </table:table-cell>
          <table:table-cell table:style-name="ce92" table:formula="of:=[.BI$1]" office:value-type="date" office:date-value="2026-07-12" calcext:value-type="date">
            <text:p>7</text:p>
          </table:table-cell>
          <table:table-cell table:style-name="ce92" table:formula="of:=[.BJ$1]" office:value-type="date" office:date-value="2026-07-13" calcext:value-type="date">
            <text:p>7</text:p>
          </table:table-cell>
          <table:table-cell table:style-name="ce92" table:formula="of:=[.BK$1]" office:value-type="date" office:date-value="2026-07-14" calcext:value-type="date">
            <text:p>7</text:p>
          </table:table-cell>
          <table:table-cell table:style-name="ce92" table:formula="of:=[.BL$1]" office:value-type="date" office:date-value="2026-07-15" calcext:value-type="date">
            <text:p>7</text:p>
          </table:table-cell>
          <table:table-cell table:style-name="ce92" table:formula="of:=[.BM$1]" office:value-type="date" office:date-value="2026-07-16" calcext:value-type="date">
            <text:p>7</text:p>
          </table:table-cell>
          <table:table-cell table:style-name="ce92" table:formula="of:=[.BN$1]" office:value-type="date" office:date-value="2026-07-17" calcext:value-type="date">
            <text:p>7</text:p>
          </table:table-cell>
          <table:table-cell table:style-name="ce92" table:formula="of:=[.BO$1]" office:value-type="date" office:date-value="2026-07-18" calcext:value-type="date">
            <text:p>7</text:p>
          </table:table-cell>
          <table:table-cell table:style-name="ce92" table:formula="of:=[.BP$1]" office:value-type="date" office:date-value="2026-07-19" calcext:value-type="date">
            <text:p>7</text:p>
          </table:table-cell>
          <table:table-cell table:style-name="ce92" table:formula="of:=[.BQ$1]" office:value-type="date" office:date-value="2026-07-20" calcext:value-type="date">
            <text:p>7</text:p>
          </table:table-cell>
          <table:table-cell table:style-name="ce92" table:formula="of:=[.BR$1]" office:value-type="date" office:date-value="2026-07-21" calcext:value-type="date">
            <text:p>7</text:p>
          </table:table-cell>
          <table:table-cell table:style-name="ce92" table:formula="of:=[.BS$1]" office:value-type="date" office:date-value="2026-07-22" calcext:value-type="date">
            <text:p>7</text:p>
          </table:table-cell>
          <table:table-cell table:style-name="ce92" table:formula="of:=[.BT$1]" office:value-type="date" office:date-value="2026-07-23" calcext:value-type="date">
            <text:p>7</text:p>
          </table:table-cell>
          <table:table-cell table:style-name="ce92" table:formula="of:=[.BU$1]" office:value-type="date" office:date-value="2026-07-24" calcext:value-type="date">
            <text:p>7</text:p>
          </table:table-cell>
          <table:table-cell table:style-name="ce92" table:formula="of:=[.BV$1]" office:value-type="date" office:date-value="2026-07-25" calcext:value-type="date">
            <text:p>7</text:p>
          </table:table-cell>
          <table:table-cell table:style-name="ce92" table:formula="of:=[.BW$1]" office:value-type="date" office:date-value="2026-07-26" calcext:value-type="date">
            <text:p>7</text:p>
          </table:table-cell>
          <table:table-cell table:style-name="ce92" table:formula="of:=[.BX$1]" office:value-type="date" office:date-value="2026-07-27" calcext:value-type="date">
            <text:p>7</text:p>
          </table:table-cell>
          <table:table-cell table:style-name="ce92" table:formula="of:=[.BY$1]" office:value-type="date" office:date-value="2026-07-28" calcext:value-type="date">
            <text:p>7</text:p>
          </table:table-cell>
          <table:table-cell table:style-name="ce92" table:formula="of:=[.BZ$1]" office:value-type="date" office:date-value="2026-07-29" calcext:value-type="date">
            <text:p>7</text:p>
          </table:table-cell>
          <table:table-cell table:style-name="ce92" table:formula="of:=[.CA$1]" office:value-type="date" office:date-value="2026-07-30" calcext:value-type="date">
            <text:p>7</text:p>
          </table:table-cell>
          <table:table-cell table:style-name="ce92" table:formula="of:=[.CB$1]" office:value-type="date" office:date-value="2026-07-31" calcext:value-type="date">
            <text:p>7</text:p>
          </table:table-cell>
          <table:table-cell table:style-name="ce92" table:formula="of:=[.CC$1]" office:value-type="date" office:date-value="2026-08-01" calcext:value-type="date">
            <text:p>8</text:p>
          </table:table-cell>
          <table:table-cell table:style-name="ce92" table:formula="of:=[.CD$1]" office:value-type="date" office:date-value="2026-08-02" calcext:value-type="date">
            <text:p>8</text:p>
          </table:table-cell>
          <table:table-cell table:style-name="ce92" table:formula="of:=[.CE$1]" office:value-type="date" office:date-value="2026-08-03" calcext:value-type="date">
            <text:p>8</text:p>
          </table:table-cell>
          <table:table-cell table:style-name="ce92" table:formula="of:=[.CF$1]" office:value-type="date" office:date-value="2026-08-04" calcext:value-type="date">
            <text:p>8</text:p>
          </table:table-cell>
          <table:table-cell table:style-name="ce92" table:formula="of:=[.CG$1]" office:value-type="date" office:date-value="2026-08-05" calcext:value-type="date">
            <text:p>8</text:p>
          </table:table-cell>
          <table:table-cell table:style-name="ce92" table:formula="of:=[.CH$1]" office:value-type="date" office:date-value="2026-08-06" calcext:value-type="date">
            <text:p>8</text:p>
          </table:table-cell>
          <table:table-cell table:style-name="ce92" table:formula="of:=[.CI$1]" office:value-type="date" office:date-value="2026-08-07" calcext:value-type="date">
            <text:p>8</text:p>
          </table:table-cell>
          <table:table-cell table:style-name="ce92" table:formula="of:=[.CJ$1]" office:value-type="date" office:date-value="2026-08-08" calcext:value-type="date">
            <text:p>8</text:p>
          </table:table-cell>
          <table:table-cell table:style-name="ce92" table:formula="of:=[.CK$1]" office:value-type="date" office:date-value="2026-08-09" calcext:value-type="date">
            <text:p>8</text:p>
          </table:table-cell>
          <table:table-cell table:style-name="ce92" table:formula="of:=[.CL$1]" office:value-type="date" office:date-value="2026-08-10" calcext:value-type="date">
            <text:p>8</text:p>
          </table:table-cell>
          <table:table-cell table:style-name="ce92" table:formula="of:=[.CM$1]" office:value-type="date" office:date-value="2026-08-11" calcext:value-type="date">
            <text:p>8</text:p>
          </table:table-cell>
          <table:table-cell table:style-name="ce92" table:formula="of:=[.CN$1]" office:value-type="date" office:date-value="2026-08-12" calcext:value-type="date">
            <text:p>8</text:p>
          </table:table-cell>
          <table:table-cell table:style-name="ce92" table:formula="of:=[.CO$1]" office:value-type="date" office:date-value="2026-08-13" calcext:value-type="date">
            <text:p>8</text:p>
          </table:table-cell>
          <table:table-cell table:style-name="ce92" table:formula="of:=[.CP$1]" office:value-type="date" office:date-value="2026-08-14" calcext:value-type="date">
            <text:p>8</text:p>
          </table:table-cell>
          <table:table-cell table:style-name="ce92" table:formula="of:=[.CQ$1]" office:value-type="date" office:date-value="2026-08-15" calcext:value-type="date">
            <text:p>8</text:p>
          </table:table-cell>
          <table:table-cell table:style-name="ce92" table:formula="of:=[.CR$1]" office:value-type="date" office:date-value="2026-08-16" calcext:value-type="date">
            <text:p>8</text:p>
          </table:table-cell>
          <table:table-cell table:style-name="ce92" table:formula="of:=[.CS$1]" office:value-type="date" office:date-value="2026-08-17" calcext:value-type="date">
            <text:p>8</text:p>
          </table:table-cell>
          <table:table-cell table:style-name="ce92" table:formula="of:=[.CT$1]" office:value-type="date" office:date-value="2026-08-18" calcext:value-type="date">
            <text:p>8</text:p>
          </table:table-cell>
          <table:table-cell table:style-name="ce92" table:formula="of:=[.CU$1]" office:value-type="date" office:date-value="2026-08-19" calcext:value-type="date">
            <text:p>8</text:p>
          </table:table-cell>
          <table:table-cell table:style-name="ce92" table:formula="of:=[.CV$1]" office:value-type="date" office:date-value="2026-08-20" calcext:value-type="date">
            <text:p>8</text:p>
          </table:table-cell>
          <table:table-cell table:style-name="ce92" table:formula="of:=[.CW$1]" office:value-type="date" office:date-value="2026-08-21" calcext:value-type="date">
            <text:p>8</text:p>
          </table:table-cell>
          <table:table-cell table:style-name="ce92" table:formula="of:=[.CX$1]" office:value-type="date" office:date-value="2026-08-22" calcext:value-type="date">
            <text:p>8</text:p>
          </table:table-cell>
          <table:table-cell table:style-name="ce92" table:formula="of:=[.CY$1]" office:value-type="date" office:date-value="2026-08-23" calcext:value-type="date">
            <text:p>8</text:p>
          </table:table-cell>
          <table:table-cell table:style-name="ce92" table:formula="of:=[.CZ$1]" office:value-type="date" office:date-value="2026-08-24" calcext:value-type="date">
            <text:p>8</text:p>
          </table:table-cell>
          <table:table-cell table:style-name="ce92" table:formula="of:=[.DA$1]" office:value-type="date" office:date-value="2026-08-25" calcext:value-type="date">
            <text:p>8</text:p>
          </table:table-cell>
          <table:table-cell table:style-name="ce92" table:formula="of:=[.DB$1]" office:value-type="date" office:date-value="2026-08-26" calcext:value-type="date">
            <text:p>8</text:p>
          </table:table-cell>
          <table:table-cell table:style-name="ce92" table:formula="of:=[.DC$1]" office:value-type="date" office:date-value="2026-08-27" calcext:value-type="date">
            <text:p>8</text:p>
          </table:table-cell>
          <table:table-cell table:style-name="ce92" table:formula="of:=[.DD$1]" office:value-type="date" office:date-value="2026-08-28" calcext:value-type="date">
            <text:p>8</text:p>
          </table:table-cell>
          <table:table-cell table:style-name="ce92" table:formula="of:=[.DE$1]" office:value-type="date" office:date-value="2026-08-29" calcext:value-type="date">
            <text:p>8</text:p>
          </table:table-cell>
          <table:table-cell table:style-name="ce92" table:formula="of:=[.DF$1]" office:value-type="date" office:date-value="2026-08-30" calcext:value-type="date">
            <text:p>8</text:p>
          </table:table-cell>
          <table:table-cell table:style-name="ce92" table:formula="of:=[.DG$1]" office:value-type="date" office:date-value="2026-08-31" calcext:value-type="date">
            <text:p>8</text:p>
          </table:table-cell>
          <table:table-cell table:style-name="ce92" table:formula="of:=[.DH$1]" office:value-type="date" office:date-value="2026-09-01" calcext:value-type="date">
            <text:p>9</text:p>
          </table:table-cell>
          <table:table-cell table:style-name="ce92" table:formula="of:=[.DI$1]" office:value-type="date" office:date-value="2026-09-02" calcext:value-type="date">
            <text:p>9</text:p>
          </table:table-cell>
          <table:table-cell table:style-name="ce92" table:formula="of:=[.DJ$1]" office:value-type="date" office:date-value="2026-09-03" calcext:value-type="date">
            <text:p>9</text:p>
          </table:table-cell>
          <table:table-cell table:style-name="ce92" table:formula="of:=[.DK$1]" office:value-type="date" office:date-value="2026-09-04" calcext:value-type="date">
            <text:p>9</text:p>
          </table:table-cell>
          <table:table-cell table:style-name="ce92" table:formula="of:=[.DL$1]" office:value-type="date" office:date-value="2026-09-05" calcext:value-type="date">
            <text:p>9</text:p>
          </table:table-cell>
          <table:table-cell table:style-name="ce92" table:formula="of:=[.DM$1]" office:value-type="date" office:date-value="2026-09-06" calcext:value-type="date">
            <text:p>9</text:p>
          </table:table-cell>
          <table:table-cell table:style-name="ce92" table:formula="of:=[.DN$1]" office:value-type="date" office:date-value="2026-09-07" calcext:value-type="date">
            <text:p>9</text:p>
          </table:table-cell>
          <table:table-cell table:style-name="ce92" table:formula="of:=[.DO$1]" office:value-type="date" office:date-value="2026-09-08" calcext:value-type="date">
            <text:p>9</text:p>
          </table:table-cell>
          <table:table-cell table:style-name="ce92" table:formula="of:=[.DP$1]" office:value-type="date" office:date-value="2026-09-09" calcext:value-type="date">
            <text:p>9</text:p>
          </table:table-cell>
          <table:table-cell table:style-name="ce92" table:formula="of:=[.DQ$1]" office:value-type="date" office:date-value="2026-09-10" calcext:value-type="date">
            <text:p>9</text:p>
          </table:table-cell>
          <table:table-cell table:style-name="ce92" table:formula="of:=[.DR$1]" office:value-type="date" office:date-value="2026-09-11" calcext:value-type="date">
            <text:p>9</text:p>
          </table:table-cell>
          <table:table-cell table:style-name="ce92" table:formula="of:=[.DS$1]" office:value-type="date" office:date-value="2026-09-12" calcext:value-type="date">
            <text:p>9</text:p>
          </table:table-cell>
          <table:table-cell table:style-name="ce92" table:formula="of:=[.DT$1]" office:value-type="date" office:date-value="2026-09-13" calcext:value-type="date">
            <text:p>9</text:p>
          </table:table-cell>
          <table:table-cell table:style-name="ce92" table:formula="of:=[.DU$1]" office:value-type="date" office:date-value="2026-09-14" calcext:value-type="date">
            <text:p>9</text:p>
          </table:table-cell>
          <table:table-cell table:style-name="ce92" table:formula="of:=[.DV$1]" office:value-type="date" office:date-value="2026-09-15" calcext:value-type="date">
            <text:p>9</text:p>
          </table:table-cell>
          <table:table-cell table:style-name="ce92" table:formula="of:=[.DW$1]" office:value-type="date" office:date-value="2026-09-16" calcext:value-type="date">
            <text:p>9</text:p>
          </table:table-cell>
          <table:table-cell table:style-name="ce92" table:formula="of:=[.DX$1]" office:value-type="date" office:date-value="2026-09-17" calcext:value-type="date">
            <text:p>9</text:p>
          </table:table-cell>
          <table:table-cell table:style-name="ce92" table:formula="of:=[.DY$1]" office:value-type="date" office:date-value="2026-09-18" calcext:value-type="date">
            <text:p>9</text:p>
          </table:table-cell>
          <table:table-cell table:style-name="ce92" table:formula="of:=[.DZ$1]" office:value-type="date" office:date-value="2026-09-19" calcext:value-type="date">
            <text:p>9</text:p>
          </table:table-cell>
          <table:table-cell table:style-name="ce92" table:formula="of:=[.EA$1]" office:value-type="date" office:date-value="2026-09-20" calcext:value-type="date">
            <text:p>9</text:p>
          </table:table-cell>
          <table:table-cell table:style-name="ce92" table:formula="of:=[.EB$1]" office:value-type="date" office:date-value="2026-09-21" calcext:value-type="date">
            <text:p>9</text:p>
          </table:table-cell>
          <table:table-cell table:style-name="ce92" table:formula="of:=[.EC$1]" office:value-type="date" office:date-value="2026-09-22" calcext:value-type="date">
            <text:p>9</text:p>
          </table:table-cell>
          <table:table-cell table:style-name="ce92" table:formula="of:=[.ED$1]" office:value-type="date" office:date-value="2026-09-23" calcext:value-type="date">
            <text:p>9</text:p>
          </table:table-cell>
          <table:table-cell table:style-name="ce92" table:formula="of:=[.EE$1]" office:value-type="date" office:date-value="2026-09-24" calcext:value-type="date">
            <text:p>9</text:p>
          </table:table-cell>
          <table:table-cell table:style-name="ce92" table:formula="of:=[.EF$1]" office:value-type="date" office:date-value="2026-09-25" calcext:value-type="date">
            <text:p>9</text:p>
          </table:table-cell>
          <table:table-cell table:style-name="ce92" table:formula="of:=[.EG$1]" office:value-type="date" office:date-value="2026-09-26" calcext:value-type="date">
            <text:p>9</text:p>
          </table:table-cell>
          <table:table-cell table:style-name="ce92" table:formula="of:=[.EH$1]" office:value-type="date" office:date-value="2026-09-27" calcext:value-type="date">
            <text:p>9</text:p>
          </table:table-cell>
          <table:table-cell table:style-name="ce92" table:formula="of:=[.EI$1]" office:value-type="date" office:date-value="2026-09-28" calcext:value-type="date">
            <text:p>9</text:p>
          </table:table-cell>
          <table:table-cell table:style-name="ce92" table:formula="of:=[.EJ$1]" office:value-type="date" office:date-value="2026-09-29" calcext:value-type="date">
            <text:p>9</text:p>
          </table:table-cell>
          <table:table-cell table:style-name="ce92" table:formula="of:=[.EK$1]" office:value-type="date" office:date-value="2026-09-30" calcext:value-type="date">
            <text:p>9</text:p>
          </table:table-cell>
          <table:table-cell table:style-name="ce92" table:formula="of:=[.EL$1]" office:value-type="date" office:date-value="2026-10-01" calcext:value-type="date">
            <text:p>10</text:p>
          </table:table-cell>
          <table:table-cell table:style-name="ce92" table:formula="of:=[.EM$1]" office:value-type="date" office:date-value="2026-10-02" calcext:value-type="date">
            <text:p>10</text:p>
          </table:table-cell>
          <table:table-cell table:style-name="ce92" table:formula="of:=[.EN$1]" office:value-type="date" office:date-value="2026-10-03" calcext:value-type="date">
            <text:p>10</text:p>
          </table:table-cell>
          <table:table-cell table:style-name="ce92" table:formula="of:=[.EO$1]" office:value-type="date" office:date-value="2026-10-04" calcext:value-type="date">
            <text:p>10</text:p>
          </table:table-cell>
          <table:table-cell table:style-name="ce92" table:formula="of:=[.EP$1]" office:value-type="date" office:date-value="2026-10-05" calcext:value-type="date">
            <text:p>10</text:p>
          </table:table-cell>
          <table:table-cell table:style-name="ce92" table:formula="of:=[.EQ$1]" office:value-type="date" office:date-value="2026-10-06" calcext:value-type="date">
            <text:p>10</text:p>
          </table:table-cell>
          <table:table-cell table:style-name="ce92" table:formula="of:=[.ER$1]" office:value-type="date" office:date-value="2026-10-07" calcext:value-type="date">
            <text:p>10</text:p>
          </table:table-cell>
          <table:table-cell table:style-name="ce92" table:formula="of:=[.ES$1]" office:value-type="date" office:date-value="2026-10-08" calcext:value-type="date">
            <text:p>10</text:p>
          </table:table-cell>
          <table:table-cell table:style-name="ce92" table:formula="of:=[.ET$1]" office:value-type="date" office:date-value="2026-10-09" calcext:value-type="date">
            <text:p>10</text:p>
          </table:table-cell>
          <table:table-cell table:style-name="ce92" table:formula="of:=[.EU$1]" office:value-type="date" office:date-value="2026-10-10" calcext:value-type="date">
            <text:p>10</text:p>
          </table:table-cell>
          <table:table-cell table:style-name="ce92" table:formula="of:=[.EV$1]" office:value-type="date" office:date-value="2026-10-11" calcext:value-type="date">
            <text:p>10</text:p>
          </table:table-cell>
          <table:table-cell table:style-name="ce92" table:formula="of:=[.EW$1]" office:value-type="date" office:date-value="2026-10-12" calcext:value-type="date">
            <text:p>10</text:p>
          </table:table-cell>
          <table:table-cell table:style-name="ce92" table:formula="of:=[.EX$1]" office:value-type="date" office:date-value="2026-10-13" calcext:value-type="date">
            <text:p>10</text:p>
          </table:table-cell>
          <table:table-cell table:style-name="ce92" table:formula="of:=[.EY$1]" office:value-type="date" office:date-value="2026-10-14" calcext:value-type="date">
            <text:p>10</text:p>
          </table:table-cell>
          <table:table-cell table:style-name="ce92" table:formula="of:=[.EZ$1]" office:value-type="date" office:date-value="2026-10-15" calcext:value-type="date">
            <text:p>10</text:p>
          </table:table-cell>
          <table:table-cell table:style-name="ce92" table:formula="of:=[.FA$1]" office:value-type="date" office:date-value="2026-10-16" calcext:value-type="date">
            <text:p>10</text:p>
          </table:table-cell>
          <table:table-cell table:style-name="ce92" table:formula="of:=[.FB$1]" office:value-type="date" office:date-value="2026-10-17" calcext:value-type="date">
            <text:p>10</text:p>
          </table:table-cell>
          <table:table-cell table:style-name="ce92" table:formula="of:=[.FC$1]" office:value-type="date" office:date-value="2026-10-18" calcext:value-type="date">
            <text:p>10</text:p>
          </table:table-cell>
          <table:table-cell table:style-name="ce92" table:formula="of:=[.FD$1]" office:value-type="date" office:date-value="2026-10-19" calcext:value-type="date">
            <text:p>10</text:p>
          </table:table-cell>
          <table:table-cell table:style-name="ce92" table:formula="of:=[.FE$1]" office:value-type="date" office:date-value="2026-10-20" calcext:value-type="date">
            <text:p>10</text:p>
          </table:table-cell>
          <table:table-cell table:style-name="ce92" table:formula="of:=[.FF$1]" office:value-type="date" office:date-value="2026-10-21" calcext:value-type="date">
            <text:p>10</text:p>
          </table:table-cell>
          <table:table-cell table:style-name="ce92" table:formula="of:=[.FG$1]" office:value-type="date" office:date-value="2026-10-22" calcext:value-type="date">
            <text:p>10</text:p>
          </table:table-cell>
          <table:table-cell table:style-name="ce92" table:formula="of:=[.FH$1]" office:value-type="date" office:date-value="2026-10-23" calcext:value-type="date">
            <text:p>10</text:p>
          </table:table-cell>
          <table:table-cell table:style-name="ce92" table:formula="of:=[.FI$1]" office:value-type="date" office:date-value="2026-10-24" calcext:value-type="date">
            <text:p>10</text:p>
          </table:table-cell>
          <table:table-cell table:style-name="ce92" table:formula="of:=[.FJ$1]" office:value-type="date" office:date-value="2026-10-25" calcext:value-type="date">
            <text:p>10</text:p>
          </table:table-cell>
          <table:table-cell table:style-name="ce92" table:formula="of:=[.FK$1]" office:value-type="date" office:date-value="2026-10-26" calcext:value-type="date">
            <text:p>10</text:p>
          </table:table-cell>
          <table:table-cell table:style-name="ce92" table:formula="of:=[.FL$1]" office:value-type="date" office:date-value="2026-10-27" calcext:value-type="date">
            <text:p>10</text:p>
          </table:table-cell>
          <table:table-cell table:style-name="ce92" table:formula="of:=[.FM$1]" office:value-type="date" office:date-value="2026-10-28" calcext:value-type="date">
            <text:p>10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 table:number-columns-repeated="2"/>
          <table:table-cell table:style-name="ce11"/>
          <table:table-cell table:number-columns-repeated="3"/>
          <table:table-cell table:formula="of:=COUNT([.G:.G])" office:value-type="float" office:value="186" calcext:value-type="float">
            <text:p>186</text:p>
          </table:table-cell>
          <table:table-cell table:number-columns-repeated="8"/>
          <table:table-cell table:style-name="ce202" table:formula="of:=[.Q3]/[.R3]" office:value-type="percentage" office:value="0.973684210526316" calcext:value-type="percentage">
            <text:p>97%</text:p>
          </table:table-cell>
          <table:table-cell table:formula="of:=COUNTIF([.Q:.Q];100)" office:value-type="float" office:value="222" calcext:value-type="float">
            <text:p>222</text:p>
          </table:table-cell>
          <table:table-cell table:formula="of:=COUNTIF([.P:.P];&quot;&gt;0&quot;)" office:value-type="float" office:value="229" calcext:value-type="float">
            <text:p>229</text:p>
          </table:table-cell>
          <table:table-cell table:number-columns-repeated="2"/>
          <table:table-cell table:style-name="ce69" office:value-type="string" calcext:value-type="string">
            <text:p>日</text:p>
          </table:table-cell>
          <table:table-cell table:style-name="ce79" table:formula="of:=[.V$1]" office:value-type="date" office:date-value="2026-06-03" calcext:value-type="date">
            <text:p>3</text:p>
          </table:table-cell>
          <table:table-cell table:style-name="ce93" table:formula="of:=[.W$1]" office:value-type="date" office:date-value="2026-06-04" calcext:value-type="date">
            <text:p>4</text:p>
          </table:table-cell>
          <table:table-cell table:style-name="ce93" table:formula="of:=[.X$1]" office:value-type="date" office:date-value="2026-06-05" calcext:value-type="date">
            <text:p>5</text:p>
          </table:table-cell>
          <table:table-cell table:style-name="ce105" table:formula="of:=[.Y$1]" office:value-type="date" office:date-value="2026-06-06" calcext:value-type="date">
            <text:p>6</text:p>
          </table:table-cell>
          <table:table-cell table:style-name="ce105" table:formula="of:=[.Z$1]" office:value-type="date" office:date-value="2026-06-07" calcext:value-type="date">
            <text:p>7</text:p>
          </table:table-cell>
          <table:table-cell table:style-name="ce93" table:formula="of:=[.AA$1]" office:value-type="date" office:date-value="2026-06-08" calcext:value-type="date">
            <text:p>8</text:p>
          </table:table-cell>
          <table:table-cell table:style-name="ce93" table:formula="of:=[.AB$1]" office:value-type="date" office:date-value="2026-06-09" calcext:value-type="date">
            <text:p>9</text:p>
          </table:table-cell>
          <table:table-cell table:style-name="ce93" table:formula="of:=[.AC$1]" office:value-type="date" office:date-value="2026-06-10" calcext:value-type="date">
            <text:p>10</text:p>
          </table:table-cell>
          <table:table-cell table:style-name="ce93" table:formula="of:=[.AD$1]" office:value-type="date" office:date-value="2026-06-11" calcext:value-type="date">
            <text:p>11</text:p>
          </table:table-cell>
          <table:table-cell table:style-name="ce93" table:formula="of:=[.AE$1]" office:value-type="date" office:date-value="2026-06-12" calcext:value-type="date">
            <text:p>12</text:p>
          </table:table-cell>
          <table:table-cell table:style-name="ce105" table:formula="of:=[.AF$1]" office:value-type="date" office:date-value="2026-06-13" calcext:value-type="date">
            <text:p>13</text:p>
          </table:table-cell>
          <table:table-cell table:style-name="ce105" table:formula="of:=[.AG$1]" office:value-type="date" office:date-value="2026-06-14" calcext:value-type="date">
            <text:p>14</text:p>
          </table:table-cell>
          <table:table-cell table:style-name="ce93" table:formula="of:=[.AH$1]" office:value-type="date" office:date-value="2026-06-15" calcext:value-type="date">
            <text:p>15</text:p>
          </table:table-cell>
          <table:table-cell table:style-name="ce93" table:formula="of:=[.AI$1]" office:value-type="date" office:date-value="2026-06-16" calcext:value-type="date">
            <text:p>16</text:p>
          </table:table-cell>
          <table:table-cell table:style-name="ce93" table:formula="of:=[.AJ$1]" office:value-type="date" office:date-value="2026-06-17" calcext:value-type="date">
            <text:p>17</text:p>
          </table:table-cell>
          <table:table-cell table:style-name="ce93" table:formula="of:=[.AK$1]" office:value-type="date" office:date-value="2026-06-18" calcext:value-type="date">
            <text:p>18</text:p>
          </table:table-cell>
          <table:table-cell table:style-name="ce93" table:formula="of:=[.AL$1]" office:value-type="date" office:date-value="2026-06-19" calcext:value-type="date">
            <text:p>19</text:p>
          </table:table-cell>
          <table:table-cell table:style-name="ce105" table:formula="of:=[.AM$1]" office:value-type="date" office:date-value="2026-06-20" calcext:value-type="date">
            <text:p>20</text:p>
          </table:table-cell>
          <table:table-cell table:style-name="ce105" table:formula="of:=[.AN$1]" office:value-type="date" office:date-value="2026-06-21" calcext:value-type="date">
            <text:p>21</text:p>
          </table:table-cell>
          <table:table-cell table:style-name="ce93" table:formula="of:=[.AO$1]" office:value-type="date" office:date-value="2026-06-22" calcext:value-type="date">
            <text:p>22</text:p>
          </table:table-cell>
          <table:table-cell table:style-name="ce93" table:formula="of:=[.AP$1]" office:value-type="date" office:date-value="2026-06-23" calcext:value-type="date">
            <text:p>23</text:p>
          </table:table-cell>
          <table:table-cell table:style-name="ce93" table:formula="of:=[.AQ$1]" office:value-type="date" office:date-value="2026-06-24" calcext:value-type="date">
            <text:p>24</text:p>
          </table:table-cell>
          <table:table-cell table:style-name="ce93" table:formula="of:=[.AR$1]" office:value-type="date" office:date-value="2026-06-25" calcext:value-type="date">
            <text:p>25</text:p>
          </table:table-cell>
          <table:table-cell table:style-name="ce134" table:formula="of:=[.AS$1]" office:value-type="date" office:date-value="2026-06-26" calcext:value-type="date">
            <text:p>26</text:p>
          </table:table-cell>
          <table:table-cell table:style-name="ce105" table:formula="of:=[.AT$1]" office:value-type="date" office:date-value="2026-06-27" calcext:value-type="date">
            <text:p>27</text:p>
          </table:table-cell>
          <table:table-cell table:style-name="ce105" table:formula="of:=[.AU$1]" office:value-type="date" office:date-value="2026-06-28" calcext:value-type="date">
            <text:p>28</text:p>
          </table:table-cell>
          <table:table-cell table:style-name="ce148" table:formula="of:=[.AV$1]" office:value-type="date" office:date-value="2026-06-29" calcext:value-type="date">
            <text:p>29</text:p>
          </table:table-cell>
          <table:table-cell table:style-name="ce93" table:formula="of:=[.AW$1]" office:value-type="date" office:date-value="2026-06-30" calcext:value-type="date">
            <text:p>30</text:p>
          </table:table-cell>
          <table:table-cell table:style-name="ce93" table:formula="of:=[.AX$1]" office:value-type="date" office:date-value="2026-07-01" calcext:value-type="date">
            <text:p>1</text:p>
          </table:table-cell>
          <table:table-cell table:style-name="ce93" table:formula="of:=[.AY$1]" office:value-type="date" office:date-value="2026-07-02" calcext:value-type="date">
            <text:p>2</text:p>
          </table:table-cell>
          <table:table-cell table:style-name="ce93" table:formula="of:=[.AZ$1]" office:value-type="date" office:date-value="2026-07-03" calcext:value-type="date">
            <text:p>3</text:p>
          </table:table-cell>
          <table:table-cell table:style-name="ce93" table:formula="of:=[.BA$1]" office:value-type="date" office:date-value="2026-07-04" calcext:value-type="date">
            <text:p>4</text:p>
          </table:table-cell>
          <table:table-cell table:style-name="ce93" table:formula="of:=[.BB$1]" office:value-type="date" office:date-value="2026-07-05" calcext:value-type="date">
            <text:p>5</text:p>
          </table:table-cell>
          <table:table-cell table:style-name="ce93" table:formula="of:=[.BC$1]" office:value-type="date" office:date-value="2026-07-06" calcext:value-type="date">
            <text:p>6</text:p>
          </table:table-cell>
          <table:table-cell table:style-name="ce93" table:formula="of:=[.BD$1]" office:value-type="date" office:date-value="2026-07-07" calcext:value-type="date">
            <text:p>7</text:p>
          </table:table-cell>
          <table:table-cell table:style-name="ce93" table:formula="of:=[.BE$1]" office:value-type="date" office:date-value="2026-07-08" calcext:value-type="date">
            <text:p>8</text:p>
          </table:table-cell>
          <table:table-cell table:style-name="ce93" table:formula="of:=[.BF$1]" office:value-type="date" office:date-value="2026-07-09" calcext:value-type="date">
            <text:p>9</text:p>
          </table:table-cell>
          <table:table-cell table:style-name="ce93" table:formula="of:=[.BG$1]" office:value-type="date" office:date-value="2026-07-10" calcext:value-type="date">
            <text:p>10</text:p>
          </table:table-cell>
          <table:table-cell table:style-name="ce93" table:formula="of:=[.BH$1]" office:value-type="date" office:date-value="2026-07-11" calcext:value-type="date">
            <text:p>11</text:p>
          </table:table-cell>
          <table:table-cell table:style-name="ce93" table:formula="of:=[.BI$1]" office:value-type="date" office:date-value="2026-07-12" calcext:value-type="date">
            <text:p>12</text:p>
          </table:table-cell>
          <table:table-cell table:style-name="ce93" table:formula="of:=[.BJ$1]" office:value-type="date" office:date-value="2026-07-13" calcext:value-type="date">
            <text:p>13</text:p>
          </table:table-cell>
          <table:table-cell table:style-name="ce93" table:formula="of:=[.BK$1]" office:value-type="date" office:date-value="2026-07-14" calcext:value-type="date">
            <text:p>14</text:p>
          </table:table-cell>
          <table:table-cell table:style-name="ce93" table:formula="of:=[.BL$1]" office:value-type="date" office:date-value="2026-07-15" calcext:value-type="date">
            <text:p>15</text:p>
          </table:table-cell>
          <table:table-cell table:style-name="ce93" table:formula="of:=[.BM$1]" office:value-type="date" office:date-value="2026-07-16" calcext:value-type="date">
            <text:p>16</text:p>
          </table:table-cell>
          <table:table-cell table:style-name="ce93" table:formula="of:=[.BN$1]" office:value-type="date" office:date-value="2026-07-17" calcext:value-type="date">
            <text:p>17</text:p>
          </table:table-cell>
          <table:table-cell table:style-name="ce93" table:formula="of:=[.BO$1]" office:value-type="date" office:date-value="2026-07-18" calcext:value-type="date">
            <text:p>18</text:p>
          </table:table-cell>
          <table:table-cell table:style-name="ce93" table:formula="of:=[.BP$1]" office:value-type="date" office:date-value="2026-07-19" calcext:value-type="date">
            <text:p>19</text:p>
          </table:table-cell>
          <table:table-cell table:style-name="ce93" table:formula="of:=[.BQ$1]" office:value-type="date" office:date-value="2026-07-20" calcext:value-type="date">
            <text:p>20</text:p>
          </table:table-cell>
          <table:table-cell table:style-name="ce93" table:formula="of:=[.BR$1]" office:value-type="date" office:date-value="2026-07-21" calcext:value-type="date">
            <text:p>21</text:p>
          </table:table-cell>
          <table:table-cell table:style-name="ce93" table:formula="of:=[.BS$1]" office:value-type="date" office:date-value="2026-07-22" calcext:value-type="date">
            <text:p>22</text:p>
          </table:table-cell>
          <table:table-cell table:style-name="ce93" table:formula="of:=[.BT$1]" office:value-type="date" office:date-value="2026-07-23" calcext:value-type="date">
            <text:p>23</text:p>
          </table:table-cell>
          <table:table-cell table:style-name="ce93" table:formula="of:=[.BU$1]" office:value-type="date" office:date-value="2026-07-24" calcext:value-type="date">
            <text:p>24</text:p>
          </table:table-cell>
          <table:table-cell table:style-name="ce93" table:formula="of:=[.BV$1]" office:value-type="date" office:date-value="2026-07-25" calcext:value-type="date">
            <text:p>25</text:p>
          </table:table-cell>
          <table:table-cell table:style-name="ce93" table:formula="of:=[.BW$1]" office:value-type="date" office:date-value="2026-07-26" calcext:value-type="date">
            <text:p>26</text:p>
          </table:table-cell>
          <table:table-cell table:style-name="ce93" table:formula="of:=[.BX$1]" office:value-type="date" office:date-value="2026-07-27" calcext:value-type="date">
            <text:p>27</text:p>
          </table:table-cell>
          <table:table-cell table:style-name="ce93" table:formula="of:=[.BY$1]" office:value-type="date" office:date-value="2026-07-28" calcext:value-type="date">
            <text:p>28</text:p>
          </table:table-cell>
          <table:table-cell table:style-name="ce93" table:formula="of:=[.BZ$1]" office:value-type="date" office:date-value="2026-07-29" calcext:value-type="date">
            <text:p>29</text:p>
          </table:table-cell>
          <table:table-cell table:style-name="ce93" table:formula="of:=[.CA$1]" office:value-type="date" office:date-value="2026-07-30" calcext:value-type="date">
            <text:p>30</text:p>
          </table:table-cell>
          <table:table-cell table:style-name="ce93" table:formula="of:=[.CB$1]" office:value-type="date" office:date-value="2026-07-31" calcext:value-type="date">
            <text:p>31</text:p>
          </table:table-cell>
          <table:table-cell table:style-name="ce93" table:formula="of:=[.CC$1]" office:value-type="date" office:date-value="2026-08-01" calcext:value-type="date">
            <text:p>1</text:p>
          </table:table-cell>
          <table:table-cell table:style-name="ce93" table:formula="of:=[.CD$1]" office:value-type="date" office:date-value="2026-08-02" calcext:value-type="date">
            <text:p>2</text:p>
          </table:table-cell>
          <table:table-cell table:style-name="ce93" table:formula="of:=[.CE$1]" office:value-type="date" office:date-value="2026-08-03" calcext:value-type="date">
            <text:p>3</text:p>
          </table:table-cell>
          <table:table-cell table:style-name="ce93" table:formula="of:=[.CF$1]" office:value-type="date" office:date-value="2026-08-04" calcext:value-type="date">
            <text:p>4</text:p>
          </table:table-cell>
          <table:table-cell table:style-name="ce93" table:formula="of:=[.CG$1]" office:value-type="date" office:date-value="2026-08-05" calcext:value-type="date">
            <text:p>5</text:p>
          </table:table-cell>
          <table:table-cell table:style-name="ce93" table:formula="of:=[.CH$1]" office:value-type="date" office:date-value="2026-08-06" calcext:value-type="date">
            <text:p>6</text:p>
          </table:table-cell>
          <table:table-cell table:style-name="ce93" table:formula="of:=[.CI$1]" office:value-type="date" office:date-value="2026-08-07" calcext:value-type="date">
            <text:p>7</text:p>
          </table:table-cell>
          <table:table-cell table:style-name="ce93" table:formula="of:=[.CJ$1]" office:value-type="date" office:date-value="2026-08-08" calcext:value-type="date">
            <text:p>8</text:p>
          </table:table-cell>
          <table:table-cell table:style-name="ce93" table:formula="of:=[.CK$1]" office:value-type="date" office:date-value="2026-08-09" calcext:value-type="date">
            <text:p>9</text:p>
          </table:table-cell>
          <table:table-cell table:style-name="ce93" table:formula="of:=[.CL$1]" office:value-type="date" office:date-value="2026-08-10" calcext:value-type="date">
            <text:p>10</text:p>
          </table:table-cell>
          <table:table-cell table:style-name="ce93" table:formula="of:=[.CM$1]" office:value-type="date" office:date-value="2026-08-11" calcext:value-type="date">
            <text:p>11</text:p>
          </table:table-cell>
          <table:table-cell table:style-name="ce93" table:formula="of:=[.CN$1]" office:value-type="date" office:date-value="2026-08-12" calcext:value-type="date">
            <text:p>12</text:p>
          </table:table-cell>
          <table:table-cell table:style-name="ce93" table:formula="of:=[.CO$1]" office:value-type="date" office:date-value="2026-08-13" calcext:value-type="date">
            <text:p>13</text:p>
          </table:table-cell>
          <table:table-cell table:style-name="ce93" table:formula="of:=[.CP$1]" office:value-type="date" office:date-value="2026-08-14" calcext:value-type="date">
            <text:p>14</text:p>
          </table:table-cell>
          <table:table-cell table:style-name="ce93" table:formula="of:=[.CQ$1]" office:value-type="date" office:date-value="2026-08-15" calcext:value-type="date">
            <text:p>15</text:p>
          </table:table-cell>
          <table:table-cell table:style-name="ce93" table:formula="of:=[.CR$1]" office:value-type="date" office:date-value="2026-08-16" calcext:value-type="date">
            <text:p>16</text:p>
          </table:table-cell>
          <table:table-cell table:style-name="ce93" table:formula="of:=[.CS$1]" office:value-type="date" office:date-value="2026-08-17" calcext:value-type="date">
            <text:p>17</text:p>
          </table:table-cell>
          <table:table-cell table:style-name="ce93" table:formula="of:=[.CT$1]" office:value-type="date" office:date-value="2026-08-18" calcext:value-type="date">
            <text:p>18</text:p>
          </table:table-cell>
          <table:table-cell table:style-name="ce93" table:formula="of:=[.CU$1]" office:value-type="date" office:date-value="2026-08-19" calcext:value-type="date">
            <text:p>19</text:p>
          </table:table-cell>
          <table:table-cell table:style-name="ce93" table:formula="of:=[.CV$1]" office:value-type="date" office:date-value="2026-08-20" calcext:value-type="date">
            <text:p>20</text:p>
          </table:table-cell>
          <table:table-cell table:style-name="ce93" table:formula="of:=[.CW$1]" office:value-type="date" office:date-value="2026-08-21" calcext:value-type="date">
            <text:p>21</text:p>
          </table:table-cell>
          <table:table-cell table:style-name="ce93" table:formula="of:=[.CX$1]" office:value-type="date" office:date-value="2026-08-22" calcext:value-type="date">
            <text:p>22</text:p>
          </table:table-cell>
          <table:table-cell table:style-name="ce93" table:formula="of:=[.CY$1]" office:value-type="date" office:date-value="2026-08-23" calcext:value-type="date">
            <text:p>23</text:p>
          </table:table-cell>
          <table:table-cell table:style-name="ce93" table:formula="of:=[.CZ$1]" office:value-type="date" office:date-value="2026-08-24" calcext:value-type="date">
            <text:p>24</text:p>
          </table:table-cell>
          <table:table-cell table:style-name="ce93" table:formula="of:=[.DA$1]" office:value-type="date" office:date-value="2026-08-25" calcext:value-type="date">
            <text:p>25</text:p>
          </table:table-cell>
          <table:table-cell table:style-name="ce93" table:formula="of:=[.DB$1]" office:value-type="date" office:date-value="2026-08-26" calcext:value-type="date">
            <text:p>26</text:p>
          </table:table-cell>
          <table:table-cell table:style-name="ce93" table:formula="of:=[.DC$1]" office:value-type="date" office:date-value="2026-08-27" calcext:value-type="date">
            <text:p>27</text:p>
          </table:table-cell>
          <table:table-cell table:style-name="ce93" table:formula="of:=[.DD$1]" office:value-type="date" office:date-value="2026-08-28" calcext:value-type="date">
            <text:p>28</text:p>
          </table:table-cell>
          <table:table-cell table:style-name="ce93" table:formula="of:=[.DE$1]" office:value-type="date" office:date-value="2026-08-29" calcext:value-type="date">
            <text:p>29</text:p>
          </table:table-cell>
          <table:table-cell table:style-name="ce93" table:formula="of:=[.DF$1]" office:value-type="date" office:date-value="2026-08-30" calcext:value-type="date">
            <text:p>30</text:p>
          </table:table-cell>
          <table:table-cell table:style-name="ce93" table:formula="of:=[.DG$1]" office:value-type="date" office:date-value="2026-08-31" calcext:value-type="date">
            <text:p>31</text:p>
          </table:table-cell>
          <table:table-cell table:style-name="ce93" table:formula="of:=[.DH$1]" office:value-type="date" office:date-value="2026-09-01" calcext:value-type="date">
            <text:p>1</text:p>
          </table:table-cell>
          <table:table-cell table:style-name="ce93" table:formula="of:=[.DI$1]" office:value-type="date" office:date-value="2026-09-02" calcext:value-type="date">
            <text:p>2</text:p>
          </table:table-cell>
          <table:table-cell table:style-name="ce93" table:formula="of:=[.DJ$1]" office:value-type="date" office:date-value="2026-09-03" calcext:value-type="date">
            <text:p>3</text:p>
          </table:table-cell>
          <table:table-cell table:style-name="ce93" table:formula="of:=[.DK$1]" office:value-type="date" office:date-value="2026-09-04" calcext:value-type="date">
            <text:p>4</text:p>
          </table:table-cell>
          <table:table-cell table:style-name="ce93" table:formula="of:=[.DL$1]" office:value-type="date" office:date-value="2026-09-05" calcext:value-type="date">
            <text:p>5</text:p>
          </table:table-cell>
          <table:table-cell table:style-name="ce93" table:formula="of:=[.DM$1]" office:value-type="date" office:date-value="2026-09-06" calcext:value-type="date">
            <text:p>6</text:p>
          </table:table-cell>
          <table:table-cell table:style-name="ce93" table:formula="of:=[.DN$1]" office:value-type="date" office:date-value="2026-09-07" calcext:value-type="date">
            <text:p>7</text:p>
          </table:table-cell>
          <table:table-cell table:style-name="ce93" table:formula="of:=[.DO$1]" office:value-type="date" office:date-value="2026-09-08" calcext:value-type="date">
            <text:p>8</text:p>
          </table:table-cell>
          <table:table-cell table:style-name="ce93" table:formula="of:=[.DP$1]" office:value-type="date" office:date-value="2026-09-09" calcext:value-type="date">
            <text:p>9</text:p>
          </table:table-cell>
          <table:table-cell table:style-name="ce93" table:formula="of:=[.DQ$1]" office:value-type="date" office:date-value="2026-09-10" calcext:value-type="date">
            <text:p>10</text:p>
          </table:table-cell>
          <table:table-cell table:style-name="ce93" table:formula="of:=[.DR$1]" office:value-type="date" office:date-value="2026-09-11" calcext:value-type="date">
            <text:p>11</text:p>
          </table:table-cell>
          <table:table-cell table:style-name="ce93" table:formula="of:=[.DS$1]" office:value-type="date" office:date-value="2026-09-12" calcext:value-type="date">
            <text:p>12</text:p>
          </table:table-cell>
          <table:table-cell table:style-name="ce93" table:formula="of:=[.DT$1]" office:value-type="date" office:date-value="2026-09-13" calcext:value-type="date">
            <text:p>13</text:p>
          </table:table-cell>
          <table:table-cell table:style-name="ce93" table:formula="of:=[.DU$1]" office:value-type="date" office:date-value="2026-09-14" calcext:value-type="date">
            <text:p>14</text:p>
          </table:table-cell>
          <table:table-cell table:style-name="ce93" table:formula="of:=[.DV$1]" office:value-type="date" office:date-value="2026-09-15" calcext:value-type="date">
            <text:p>15</text:p>
          </table:table-cell>
          <table:table-cell table:style-name="ce93" table:formula="of:=[.DW$1]" office:value-type="date" office:date-value="2026-09-16" calcext:value-type="date">
            <text:p>16</text:p>
          </table:table-cell>
          <table:table-cell table:style-name="ce93" table:formula="of:=[.DX$1]" office:value-type="date" office:date-value="2026-09-17" calcext:value-type="date">
            <text:p>17</text:p>
          </table:table-cell>
          <table:table-cell table:style-name="ce93" table:formula="of:=[.DY$1]" office:value-type="date" office:date-value="2026-09-18" calcext:value-type="date">
            <text:p>18</text:p>
          </table:table-cell>
          <table:table-cell table:style-name="ce93" table:formula="of:=[.DZ$1]" office:value-type="date" office:date-value="2026-09-19" calcext:value-type="date">
            <text:p>19</text:p>
          </table:table-cell>
          <table:table-cell table:style-name="ce93" table:formula="of:=[.EA$1]" office:value-type="date" office:date-value="2026-09-20" calcext:value-type="date">
            <text:p>20</text:p>
          </table:table-cell>
          <table:table-cell table:style-name="ce93" table:formula="of:=[.EB$1]" office:value-type="date" office:date-value="2026-09-21" calcext:value-type="date">
            <text:p>21</text:p>
          </table:table-cell>
          <table:table-cell table:style-name="ce93" table:formula="of:=[.EC$1]" office:value-type="date" office:date-value="2026-09-22" calcext:value-type="date">
            <text:p>22</text:p>
          </table:table-cell>
          <table:table-cell table:style-name="ce93" table:formula="of:=[.ED$1]" office:value-type="date" office:date-value="2026-09-23" calcext:value-type="date">
            <text:p>23</text:p>
          </table:table-cell>
          <table:table-cell table:style-name="ce93" table:formula="of:=[.EE$1]" office:value-type="date" office:date-value="2026-09-24" calcext:value-type="date">
            <text:p>24</text:p>
          </table:table-cell>
          <table:table-cell table:style-name="ce93" table:formula="of:=[.EF$1]" office:value-type="date" office:date-value="2026-09-25" calcext:value-type="date">
            <text:p>25</text:p>
          </table:table-cell>
          <table:table-cell table:style-name="ce93" table:formula="of:=[.EG$1]" office:value-type="date" office:date-value="2026-09-26" calcext:value-type="date">
            <text:p>26</text:p>
          </table:table-cell>
          <table:table-cell table:style-name="ce93" table:formula="of:=[.EH$1]" office:value-type="date" office:date-value="2026-09-27" calcext:value-type="date">
            <text:p>27</text:p>
          </table:table-cell>
          <table:table-cell table:style-name="ce93" table:formula="of:=[.EI$1]" office:value-type="date" office:date-value="2026-09-28" calcext:value-type="date">
            <text:p>28</text:p>
          </table:table-cell>
          <table:table-cell table:style-name="ce93" table:formula="of:=[.EJ$1]" office:value-type="date" office:date-value="2026-09-29" calcext:value-type="date">
            <text:p>29</text:p>
          </table:table-cell>
          <table:table-cell table:style-name="ce93" table:formula="of:=[.EK$1]" office:value-type="date" office:date-value="2026-09-30" calcext:value-type="date">
            <text:p>30</text:p>
          </table:table-cell>
          <table:table-cell table:style-name="ce93" table:formula="of:=[.EL$1]" office:value-type="date" office:date-value="2026-10-01" calcext:value-type="date">
            <text:p>1</text:p>
          </table:table-cell>
          <table:table-cell table:style-name="ce93" table:formula="of:=[.EM$1]" office:value-type="date" office:date-value="2026-10-02" calcext:value-type="date">
            <text:p>2</text:p>
          </table:table-cell>
          <table:table-cell table:style-name="ce93" table:formula="of:=[.EN$1]" office:value-type="date" office:date-value="2026-10-03" calcext:value-type="date">
            <text:p>3</text:p>
          </table:table-cell>
          <table:table-cell table:style-name="ce93" table:formula="of:=[.EO$1]" office:value-type="date" office:date-value="2026-10-04" calcext:value-type="date">
            <text:p>4</text:p>
          </table:table-cell>
          <table:table-cell table:style-name="ce93" table:formula="of:=[.EP$1]" office:value-type="date" office:date-value="2026-10-05" calcext:value-type="date">
            <text:p>5</text:p>
          </table:table-cell>
          <table:table-cell table:style-name="ce93" table:formula="of:=[.EQ$1]" office:value-type="date" office:date-value="2026-10-06" calcext:value-type="date">
            <text:p>6</text:p>
          </table:table-cell>
          <table:table-cell table:style-name="ce93" table:formula="of:=[.ER$1]" office:value-type="date" office:date-value="2026-10-07" calcext:value-type="date">
            <text:p>7</text:p>
          </table:table-cell>
          <table:table-cell table:style-name="ce93" table:formula="of:=[.ES$1]" office:value-type="date" office:date-value="2026-10-08" calcext:value-type="date">
            <text:p>8</text:p>
          </table:table-cell>
          <table:table-cell table:style-name="ce93" table:formula="of:=[.ET$1]" office:value-type="date" office:date-value="2026-10-09" calcext:value-type="date">
            <text:p>9</text:p>
          </table:table-cell>
          <table:table-cell table:style-name="ce93" table:formula="of:=[.EU$1]" office:value-type="date" office:date-value="2026-10-10" calcext:value-type="date">
            <text:p>10</text:p>
          </table:table-cell>
          <table:table-cell table:style-name="ce93" table:formula="of:=[.EV$1]" office:value-type="date" office:date-value="2026-10-11" calcext:value-type="date">
            <text:p>11</text:p>
          </table:table-cell>
          <table:table-cell table:style-name="ce93" table:formula="of:=[.EW$1]" office:value-type="date" office:date-value="2026-10-12" calcext:value-type="date">
            <text:p>12</text:p>
          </table:table-cell>
          <table:table-cell table:style-name="ce93" table:formula="of:=[.EX$1]" office:value-type="date" office:date-value="2026-10-13" calcext:value-type="date">
            <text:p>13</text:p>
          </table:table-cell>
          <table:table-cell table:style-name="ce93" table:formula="of:=[.EY$1]" office:value-type="date" office:date-value="2026-10-14" calcext:value-type="date">
            <text:p>14</text:p>
          </table:table-cell>
          <table:table-cell table:style-name="ce93" table:formula="of:=[.EZ$1]" office:value-type="date" office:date-value="2026-10-15" calcext:value-type="date">
            <text:p>15</text:p>
          </table:table-cell>
          <table:table-cell table:style-name="ce93" table:formula="of:=[.FA$1]" office:value-type="date" office:date-value="2026-10-16" calcext:value-type="date">
            <text:p>16</text:p>
          </table:table-cell>
          <table:table-cell table:style-name="ce93" table:formula="of:=[.FB$1]" office:value-type="date" office:date-value="2026-10-17" calcext:value-type="date">
            <text:p>17</text:p>
          </table:table-cell>
          <table:table-cell table:style-name="ce93" table:formula="of:=[.FC$1]" office:value-type="date" office:date-value="2026-10-18" calcext:value-type="date">
            <text:p>18</text:p>
          </table:table-cell>
          <table:table-cell table:style-name="ce93" table:formula="of:=[.FD$1]" office:value-type="date" office:date-value="2026-10-19" calcext:value-type="date">
            <text:p>19</text:p>
          </table:table-cell>
          <table:table-cell table:style-name="ce93" table:formula="of:=[.FE$1]" office:value-type="date" office:date-value="2026-10-20" calcext:value-type="date">
            <text:p>20</text:p>
          </table:table-cell>
          <table:table-cell table:style-name="ce93" table:formula="of:=[.FF$1]" office:value-type="date" office:date-value="2026-10-21" calcext:value-type="date">
            <text:p>21</text:p>
          </table:table-cell>
          <table:table-cell table:style-name="ce93" table:formula="of:=[.FG$1]" office:value-type="date" office:date-value="2026-10-22" calcext:value-type="date">
            <text:p>22</text:p>
          </table:table-cell>
          <table:table-cell table:style-name="ce93" table:formula="of:=[.FH$1]" office:value-type="date" office:date-value="2026-10-23" calcext:value-type="date">
            <text:p>23</text:p>
          </table:table-cell>
          <table:table-cell table:style-name="ce93" table:formula="of:=[.FI$1]" office:value-type="date" office:date-value="2026-10-24" calcext:value-type="date">
            <text:p>24</text:p>
          </table:table-cell>
          <table:table-cell table:style-name="ce93" table:formula="of:=[.FJ$1]" office:value-type="date" office:date-value="2026-10-25" calcext:value-type="date">
            <text:p>25</text:p>
          </table:table-cell>
          <table:table-cell table:style-name="ce93" table:formula="of:=[.FK$1]" office:value-type="date" office:date-value="2026-10-26" calcext:value-type="date">
            <text:p>26</text:p>
          </table:table-cell>
          <table:table-cell table:style-name="ce93" table:formula="of:=[.FL$1]" office:value-type="date" office:date-value="2026-10-27" calcext:value-type="date">
            <text:p>27</text:p>
          </table:table-cell>
          <table:table-cell table:style-name="ce93" table:formula="of:=[.FM$1]" office:value-type="date" office:date-value="2026-10-28" calcext:value-type="date">
            <text:p>28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5" office:value-type="string" calcext:value-type="string">
            <office:annotation draw:style-name="gr1" draw:text-style-name="P2" svg:width="1.945cm" svg:height="2.018cm" svg:x="0.675cm" svg:y="1.499cm" draw:caption-point-x="1.336cm" draw:caption-point-y="0.495cm">
              <dc:creator>井上翔</dc:creator>
              <dc:date>2026-06-04T09:14:21</dc:date>
              <text:p text:style-name="P1"><text:span text:style-name="T3">E</text:span><text:span text:style-name="T3">列の数式用</text:span></text:p>
            </office:annotation>
            <text:p>数式用</text:p>
          </table:table-cell>
          <table:table-cell table:style-name="ce120" office:value-type="string" calcext:value-type="string">
            <office:annotation draw:style-name="gr2" draw:text-style-name="P4" svg:width="2.257cm" svg:height="3.988cm" svg:x="3.579cm" svg:y="1.641cm" draw:caption-point-x="-0.186cm" draw:caption-point-y="0.353cm">
              <dc:creator>Unknown Author</dc:creator>
              <dc:date>2026-06-04T09:14:21</dc:date>
              <text:p text:style-name="P3"><text:span text:style-name="T4">この作業工程表はサンプルです。作業項目を作成する際の参考としてください。</text:span></text:p>
              <text:p text:style-name="P3"><text:span text:style-name="T4"/></text:p>
            </office:annotation>
            <text:p>#</text:p>
          </table:table-cell>
          <table:table-cell table:style-name="ce126" office:value-type="string" calcext:value-type="string">
            <office:annotation draw:style-name="gr3" draw:text-style-name="P6" svg:width="7.062cm" svg:height="2.574cm" svg:x="8.269cm" svg:y="2.752cm" draw:caption-point-x="-0.116cm" draw:caption-point-y="-0.758cm">
              <dc:creator>井上翔</dc:creator>
              <dc:date>2026-06-04T09:14:21</dc:date>
              <text:p text:style-name="P5"><text:span text:style-name="T5">タスク全体のタイトルを記載</text:span></text:p>
              <text:p text:style-name="P5"><text:span text:style-name="T5">大項目ごとの最終タスクには○をつける</text:span></text:p>
            </office:annotation>
            <text:p>大項目(レベル1)</text:p>
          </table:table-cell>
          <table:table-cell table:style-name="ce172" office:value-type="string" calcext:value-type="string">
            <text:p>#</text:p>
          </table:table-cell>
          <table:table-cell table:style-name="ce126" office:value-type="string" calcext:value-type="string">
            <office:annotation draw:style-name="gr4" draw:text-style-name="P6" svg:width="9.804cm" svg:height="2.539cm" svg:x="19.024cm" svg:y="2.752cm" draw:caption-point-x="-2.909cm" draw:caption-point-y="-0.758cm">
              <dc:creator>井上翔</dc:creator>
              <dc:date>2026-06-04T09:14:21</dc:date>
              <text:p text:style-name="P5"><text:span text:style-name="T5">作業そのものの名前や作業対象を記載する</text:span></text:p>
            </office:annotation>
            <text:p>中項目(レベル2)</text:p>
          </table:table-cell>
          <table:table-cell table:style-name="ce172" office:value-type="string" calcext:value-type="string">
            <text:p>#</text:p>
          </table:table-cell>
          <table:table-cell table:style-name="ce126" office:value-type="string" calcext:value-type="string">
            <office:annotation draw:style-name="gr5" draw:text-style-name="P6" svg:width="7.418cm" svg:height="3.412cm" svg:x="32.157cm" svg:y="2.752cm" draw:caption-point-x="-3.841cm" draw:caption-point-y="-0.758cm">
              <dc:creator>井上翔</dc:creator>
              <dc:date>2026-06-04T09:14:21</dc:date>
              <text:p text:style-name="P5"><text:span text:style-name="T5">作成、レビュー、実施といったタスク名を記載</text:span></text:p>
            </office:annotation>
            <text:p>小項目(レベル3)</text:p>
          </table:table-cell>
          <table:table-cell table:style-name="ce126" office:value-type="string" calcext:value-type="string">
            <office:annotation draw:style-name="gr6" draw:text-style-name="P6" svg:width="7.101cm" svg:height="4.039cm" svg:x="32.404cm" svg:y="2.752cm" draw:caption-point-x="-2.366cm" draw:caption-point-y="-0.758cm">
              <dc:creator>井上翔</dc:creator>
              <dc:date>2026-06-04T09:14:21</dc:date>
              <text:p text:style-name="P5"><text:span text:style-name="T5">タスクによって完成する成果物、またはタスクの対象となる成果物を記載</text:span></text:p>
            </office:annotation>
            <text:p>成果物</text:p>
          </table:table-cell>
          <table:table-cell table:style-name="ce126" office:value-type="string" calcext:value-type="string">
            <text:p>作業者</text:p>
          </table:table-cell>
          <table:table-cell table:style-name="ce126" office:value-type="string" calcext:value-type="string">
            <text:p>確認者</text:p>
          </table:table-cell>
          <table:table-cell table:style-name="ce126" office:value-type="string" calcext:value-type="string">
            <text:p>開始日(予定)</text:p>
          </table:table-cell>
          <table:table-cell table:style-name="ce126" office:value-type="string" calcext:value-type="string">
            <text:p>終了日(予定)</text:p>
          </table:table-cell>
          <table:table-cell table:style-name="ce126" office:value-type="string" calcext:value-type="string">
            <text:p>開始日(実績)</text:p>
          </table:table-cell>
          <table:table-cell table:style-name="ce126" office:value-type="string" calcext:value-type="string">
            <text:p>終了日(実績)</text:p>
          </table:table-cell>
          <table:table-cell table:style-name="ce212" office:value-type="string" calcext:value-type="string">
            <office:annotation draw:style-name="gr7" draw:text-style-name="P6" svg:width="5.721cm" svg:height="1.912cm" svg:x="48.297cm" svg:y="2.752cm" draw:caption-point-x="-2.155cm" draw:caption-point-y="-0.758cm">
              <dc:creator>井上翔</dc:creator>
              <dc:date>2026-06-04T09:14:21</dc:date>
              <text:p text:style-name="P5"><text:span text:style-name="T5">土日祝日を除いた営業日</text:span></text:p>
            </office:annotation>
            <text:p>予定日数</text:p>
          </table:table-cell>
          <table:table-cell table:style-name="ce212" office:value-type="string" calcext:value-type="string">
            <office:annotation draw:style-name="gr8" draw:text-style-name="P8" svg:width="8.141cm" svg:height="4.558cm" svg:x="51.063cm" svg:y="2.752cm" draw:caption-point-x="-3.199cm" draw:caption-point-y="-0.758cm">
              <dc:creator>井上翔</dc:creator>
              <dc:date>2026-06-04T09:14:21</dc:date>
              <text:p text:style-name="P7"><text:span text:style-name="T6">着手：</text:span><text:span text:style-name="T7">10%</text:span></text:p>
              <text:p text:style-name="P7"><text:span text:style-name="T8">成果物の形ができた：</text:span><text:span text:style-name="T9">50%</text:span></text:p>
              <text:p text:style-name="P7"><text:span text:style-name="T8">最終確認中：</text:span><text:span text:style-name="T9">80%</text:span></text:p>
              <text:p text:style-name="P7"><text:span text:style-name="T8">レビュー依頼済み：</text:span><text:span text:style-name="T9">100%</text:span></text:p>
              <text:p text:style-name="P7"><text:span text:style-name="T9"/></text:p>
            </office:annotation>
            <text:p>進捗度</text:p>
          </table:table-cell>
          <table:table-cell table:style-name="ce212" office:value-type="string" calcext:value-type="string">
            <office:annotation draw:style-name="gr9" draw:text-style-name="P8" svg:width="6.568cm" svg:height="1.357cm" svg:x="58.415cm" svg:y="3.554cm" draw:caption-point-x="-8.597cm" draw:caption-point-y="-1.56cm">
              <dc:creator>井上翔</dc:creator>
              <dc:date>2026-06-04T09:14:21</dc:date>
              <text:p text:style-name="P7"><text:span text:style-name="T6">進捗が</text:span><text:span text:style-name="T7">100%</text:span><text:span text:style-name="T8">未満かつ今日が終了日以降であるなら遅延と表示</text:span></text:p>
            </office:annotation>
            <text:p>遅延flg</text:p>
          </table:table-cell>
          <table:table-cell table:style-name="ce324" office:value-type="string" calcext:value-type="string">
            <text:p>予定工数</text:p>
          </table:table-cell>
          <table:table-cell table:style-name="ce212" office:value-type="string" calcext:value-type="string">
            <text:p>実績工数</text:p>
          </table:table-cell>
          <table:table-cell table:style-name="ce329" office:value-type="string" calcext:value-type="string">
            <text:p>備考</text:p>
          </table:table-cell>
          <table:table-cell table:style-name="ce80" table:formula="of:=TEXT([.V1];&quot;aaa&quot;)" office:value-type="string" office:string-value="水" calcext:value-type="string">
            <text:p>水</text:p>
          </table:table-cell>
          <table:table-cell table:style-name="ce94" table:formula="of:=TEXT([.W1];&quot;aaa&quot;)" office:value-type="string" office:string-value="木" calcext:value-type="string">
            <text:p>木</text:p>
          </table:table-cell>
          <table:table-cell table:style-name="ce94" table:formula="of:=TEXT([.X1];&quot;aaa&quot;)" office:value-type="string" office:string-value="金" calcext:value-type="string">
            <text:p>金</text:p>
          </table:table-cell>
          <table:table-cell table:style-name="ce106" table:formula="of:=TEXT([.Y1];&quot;aaa&quot;)" office:value-type="string" office:string-value="土" calcext:value-type="string">
            <text:p>土</text:p>
          </table:table-cell>
          <table:table-cell table:style-name="ce106" table:formula="of:=TEXT([.Z1];&quot;aaa&quot;)" office:value-type="string" office:string-value="日" calcext:value-type="string">
            <text:p>日</text:p>
          </table:table-cell>
          <table:table-cell table:style-name="ce94" table:formula="of:=TEXT([.AA1];&quot;aaa&quot;)" office:value-type="string" office:string-value="月" calcext:value-type="string">
            <text:p>月</text:p>
          </table:table-cell>
          <table:table-cell table:style-name="ce94" table:formula="of:=TEXT([.AB1];&quot;aaa&quot;)" office:value-type="string" office:string-value="火" calcext:value-type="string">
            <text:p>火</text:p>
          </table:table-cell>
          <table:table-cell table:style-name="ce94" table:formula="of:=TEXT([.AC1];&quot;aaa&quot;)" office:value-type="string" office:string-value="水" calcext:value-type="string">
            <text:p>水</text:p>
          </table:table-cell>
          <table:table-cell table:style-name="ce94" table:formula="of:=TEXT([.AD1];&quot;aaa&quot;)" office:value-type="string" office:string-value="木" calcext:value-type="string">
            <text:p>木</text:p>
          </table:table-cell>
          <table:table-cell table:style-name="ce94" table:formula="of:=TEXT([.AE1];&quot;aaa&quot;)" office:value-type="string" office:string-value="金" calcext:value-type="string">
            <text:p>金</text:p>
          </table:table-cell>
          <table:table-cell table:style-name="ce106" table:formula="of:=TEXT([.AF1];&quot;aaa&quot;)" office:value-type="string" office:string-value="土" calcext:value-type="string">
            <text:p>土</text:p>
          </table:table-cell>
          <table:table-cell table:style-name="ce106" table:formula="of:=TEXT([.AG1];&quot;aaa&quot;)" office:value-type="string" office:string-value="日" calcext:value-type="string">
            <text:p>日</text:p>
          </table:table-cell>
          <table:table-cell table:style-name="ce94" table:formula="of:=TEXT([.AH1];&quot;aaa&quot;)" office:value-type="string" office:string-value="月" calcext:value-type="string">
            <text:p>月</text:p>
          </table:table-cell>
          <table:table-cell table:style-name="ce94" table:formula="of:=TEXT([.AI1];&quot;aaa&quot;)" office:value-type="string" office:string-value="火" calcext:value-type="string">
            <text:p>火</text:p>
          </table:table-cell>
          <table:table-cell table:style-name="ce94" table:formula="of:=TEXT([.AJ1];&quot;aaa&quot;)" office:value-type="string" office:string-value="水" calcext:value-type="string">
            <text:p>水</text:p>
          </table:table-cell>
          <table:table-cell table:style-name="ce94" table:formula="of:=TEXT([.AK1];&quot;aaa&quot;)" office:value-type="string" office:string-value="木" calcext:value-type="string">
            <text:p>木</text:p>
          </table:table-cell>
          <table:table-cell table:style-name="ce94" table:formula="of:=TEXT([.AL1];&quot;aaa&quot;)" office:value-type="string" office:string-value="金" calcext:value-type="string">
            <text:p>金</text:p>
          </table:table-cell>
          <table:table-cell table:style-name="ce106" table:formula="of:=TEXT([.AM1];&quot;aaa&quot;)" office:value-type="string" office:string-value="土" calcext:value-type="string">
            <text:p>土</text:p>
          </table:table-cell>
          <table:table-cell table:style-name="ce106" table:formula="of:=TEXT([.AN1];&quot;aaa&quot;)" office:value-type="string" office:string-value="日" calcext:value-type="string">
            <text:p>日</text:p>
          </table:table-cell>
          <table:table-cell table:style-name="ce94" table:formula="of:=TEXT([.AO1];&quot;aaa&quot;)" office:value-type="string" office:string-value="月" calcext:value-type="string">
            <text:p>月</text:p>
          </table:table-cell>
          <table:table-cell table:style-name="ce94" table:formula="of:=TEXT([.AP1];&quot;aaa&quot;)" office:value-type="string" office:string-value="火" calcext:value-type="string">
            <text:p>火</text:p>
          </table:table-cell>
          <table:table-cell table:style-name="ce94" table:formula="of:=TEXT([.AQ1];&quot;aaa&quot;)" office:value-type="string" office:string-value="水" calcext:value-type="string">
            <text:p>水</text:p>
          </table:table-cell>
          <table:table-cell table:style-name="ce94" table:formula="of:=TEXT([.AR1];&quot;aaa&quot;)" office:value-type="string" office:string-value="木" calcext:value-type="string">
            <text:p>木</text:p>
          </table:table-cell>
          <table:table-cell table:style-name="ce135" table:formula="of:=TEXT([.AS1];&quot;aaa&quot;)" office:value-type="string" office:string-value="金" calcext:value-type="string">
            <text:p>金</text:p>
          </table:table-cell>
          <table:table-cell table:style-name="ce106" table:formula="of:=TEXT([.AT1];&quot;aaa&quot;)" office:value-type="string" office:string-value="土" calcext:value-type="string">
            <text:p>土</text:p>
          </table:table-cell>
          <table:table-cell table:style-name="ce106" table:formula="of:=TEXT([.AU1];&quot;aaa&quot;)" office:value-type="string" office:string-value="日" calcext:value-type="string">
            <text:p>日</text:p>
          </table:table-cell>
          <table:table-cell table:style-name="ce149" table:formula="of:=TEXT([.AV1];&quot;aaa&quot;)" office:value-type="string" office:string-value="月" calcext:value-type="string">
            <text:p>月</text:p>
          </table:table-cell>
          <table:table-cell table:style-name="ce94" table:formula="of:=TEXT([.AW1];&quot;aaa&quot;)" office:value-type="string" office:string-value="火" calcext:value-type="string">
            <text:p>火</text:p>
          </table:table-cell>
          <table:table-cell table:style-name="ce94" table:formula="of:=TEXT([.AX1];&quot;aaa&quot;)" office:value-type="string" office:string-value="水" calcext:value-type="string">
            <text:p>水</text:p>
          </table:table-cell>
          <table:table-cell table:style-name="ce94" table:formula="of:=TEXT([.AY1];&quot;aaa&quot;)" office:value-type="string" office:string-value="木" calcext:value-type="string">
            <text:p>木</text:p>
          </table:table-cell>
          <table:table-cell table:style-name="ce94" table:formula="of:=TEXT([.AZ1];&quot;aaa&quot;)" office:value-type="string" office:string-value="金" calcext:value-type="string">
            <text:p>金</text:p>
          </table:table-cell>
          <table:table-cell table:style-name="ce94" table:formula="of:=TEXT([.BA1];&quot;aaa&quot;)" office:value-type="string" office:string-value="土" calcext:value-type="string">
            <text:p>土</text:p>
          </table:table-cell>
          <table:table-cell table:style-name="ce94" table:formula="of:=TEXT([.BB1];&quot;aaa&quot;)" office:value-type="string" office:string-value="日" calcext:value-type="string">
            <text:p>日</text:p>
          </table:table-cell>
          <table:table-cell table:style-name="ce94" table:formula="of:=TEXT([.BC1];&quot;aaa&quot;)" office:value-type="string" office:string-value="月" calcext:value-type="string">
            <text:p>月</text:p>
          </table:table-cell>
          <table:table-cell table:style-name="ce94" table:formula="of:=TEXT([.BD1];&quot;aaa&quot;)" office:value-type="string" office:string-value="火" calcext:value-type="string">
            <text:p>火</text:p>
          </table:table-cell>
          <table:table-cell table:style-name="ce94" table:formula="of:=TEXT([.BE1];&quot;aaa&quot;)" office:value-type="string" office:string-value="水" calcext:value-type="string">
            <text:p>水</text:p>
          </table:table-cell>
          <table:table-cell table:style-name="ce94" table:formula="of:=TEXT([.BF1];&quot;aaa&quot;)" office:value-type="string" office:string-value="木" calcext:value-type="string">
            <text:p>木</text:p>
          </table:table-cell>
          <table:table-cell table:style-name="ce94" table:formula="of:=TEXT([.BG1];&quot;aaa&quot;)" office:value-type="string" office:string-value="金" calcext:value-type="string">
            <text:p>金</text:p>
          </table:table-cell>
          <table:table-cell table:style-name="ce94" table:formula="of:=TEXT([.BH1];&quot;aaa&quot;)" office:value-type="string" office:string-value="土" calcext:value-type="string">
            <text:p>土</text:p>
          </table:table-cell>
          <table:table-cell table:style-name="ce94" table:formula="of:=TEXT([.BI1];&quot;aaa&quot;)" office:value-type="string" office:string-value="日" calcext:value-type="string">
            <text:p>日</text:p>
          </table:table-cell>
          <table:table-cell table:style-name="ce94" table:formula="of:=TEXT([.BJ1];&quot;aaa&quot;)" office:value-type="string" office:string-value="月" calcext:value-type="string">
            <text:p>月</text:p>
          </table:table-cell>
          <table:table-cell table:style-name="ce94" table:formula="of:=TEXT([.BK1];&quot;aaa&quot;)" office:value-type="string" office:string-value="火" calcext:value-type="string">
            <text:p>火</text:p>
          </table:table-cell>
          <table:table-cell table:style-name="ce94" table:formula="of:=TEXT([.BL1];&quot;aaa&quot;)" office:value-type="string" office:string-value="水" calcext:value-type="string">
            <text:p>水</text:p>
          </table:table-cell>
          <table:table-cell table:style-name="ce94" table:formula="of:=TEXT([.BM1];&quot;aaa&quot;)" office:value-type="string" office:string-value="木" calcext:value-type="string">
            <text:p>木</text:p>
          </table:table-cell>
          <table:table-cell table:style-name="ce94" table:formula="of:=TEXT([.BN1];&quot;aaa&quot;)" office:value-type="string" office:string-value="金" calcext:value-type="string">
            <text:p>金</text:p>
          </table:table-cell>
          <table:table-cell table:style-name="ce94" table:formula="of:=TEXT([.BO1];&quot;aaa&quot;)" office:value-type="string" office:string-value="土" calcext:value-type="string">
            <text:p>土</text:p>
          </table:table-cell>
          <table:table-cell table:style-name="ce94" table:formula="of:=TEXT([.BP1];&quot;aaa&quot;)" office:value-type="string" office:string-value="日" calcext:value-type="string">
            <text:p>日</text:p>
          </table:table-cell>
          <table:table-cell table:style-name="ce94" table:formula="of:=TEXT([.BQ1];&quot;aaa&quot;)" office:value-type="string" office:string-value="月" calcext:value-type="string">
            <text:p>月</text:p>
          </table:table-cell>
          <table:table-cell table:style-name="ce94" table:formula="of:=TEXT([.BR1];&quot;aaa&quot;)" office:value-type="string" office:string-value="火" calcext:value-type="string">
            <text:p>火</text:p>
          </table:table-cell>
          <table:table-cell table:style-name="ce94" table:formula="of:=TEXT([.BS1];&quot;aaa&quot;)" office:value-type="string" office:string-value="水" calcext:value-type="string">
            <text:p>水</text:p>
          </table:table-cell>
          <table:table-cell table:style-name="ce94" table:formula="of:=TEXT([.BT1];&quot;aaa&quot;)" office:value-type="string" office:string-value="木" calcext:value-type="string">
            <text:p>木</text:p>
          </table:table-cell>
          <table:table-cell table:style-name="ce94" table:formula="of:=TEXT([.BU1];&quot;aaa&quot;)" office:value-type="string" office:string-value="金" calcext:value-type="string">
            <text:p>金</text:p>
          </table:table-cell>
          <table:table-cell table:style-name="ce94" table:formula="of:=TEXT([.BV1];&quot;aaa&quot;)" office:value-type="string" office:string-value="土" calcext:value-type="string">
            <text:p>土</text:p>
          </table:table-cell>
          <table:table-cell table:style-name="ce94" table:formula="of:=TEXT([.BW1];&quot;aaa&quot;)" office:value-type="string" office:string-value="日" calcext:value-type="string">
            <text:p>日</text:p>
          </table:table-cell>
          <table:table-cell table:style-name="ce94" table:formula="of:=TEXT([.BX1];&quot;aaa&quot;)" office:value-type="string" office:string-value="月" calcext:value-type="string">
            <text:p>月</text:p>
          </table:table-cell>
          <table:table-cell table:style-name="ce94" table:formula="of:=TEXT([.BY1];&quot;aaa&quot;)" office:value-type="string" office:string-value="火" calcext:value-type="string">
            <text:p>火</text:p>
          </table:table-cell>
          <table:table-cell table:style-name="ce94" table:formula="of:=TEXT([.BZ1];&quot;aaa&quot;)" office:value-type="string" office:string-value="水" calcext:value-type="string">
            <text:p>水</text:p>
          </table:table-cell>
          <table:table-cell table:style-name="ce94" table:formula="of:=TEXT([.CA1];&quot;aaa&quot;)" office:value-type="string" office:string-value="木" calcext:value-type="string">
            <text:p>木</text:p>
          </table:table-cell>
          <table:table-cell table:style-name="ce94" table:formula="of:=TEXT([.CB1];&quot;aaa&quot;)" office:value-type="string" office:string-value="金" calcext:value-type="string">
            <text:p>金</text:p>
          </table:table-cell>
          <table:table-cell table:style-name="ce94" table:formula="of:=TEXT([.CC1];&quot;aaa&quot;)" office:value-type="string" office:string-value="土" calcext:value-type="string">
            <text:p>土</text:p>
          </table:table-cell>
          <table:table-cell table:style-name="ce94" table:formula="of:=TEXT([.CD1];&quot;aaa&quot;)" office:value-type="string" office:string-value="日" calcext:value-type="string">
            <text:p>日</text:p>
          </table:table-cell>
          <table:table-cell table:style-name="ce94" table:formula="of:=TEXT([.CE1];&quot;aaa&quot;)" office:value-type="string" office:string-value="月" calcext:value-type="string">
            <text:p>月</text:p>
          </table:table-cell>
          <table:table-cell table:style-name="ce94" table:formula="of:=TEXT([.CF1];&quot;aaa&quot;)" office:value-type="string" office:string-value="火" calcext:value-type="string">
            <text:p>火</text:p>
          </table:table-cell>
          <table:table-cell table:style-name="ce94" table:formula="of:=TEXT([.CG1];&quot;aaa&quot;)" office:value-type="string" office:string-value="水" calcext:value-type="string">
            <text:p>水</text:p>
          </table:table-cell>
          <table:table-cell table:style-name="ce94" table:formula="of:=TEXT([.CH1];&quot;aaa&quot;)" office:value-type="string" office:string-value="木" calcext:value-type="string">
            <text:p>木</text:p>
          </table:table-cell>
          <table:table-cell table:style-name="ce94" table:formula="of:=TEXT([.CI1];&quot;aaa&quot;)" office:value-type="string" office:string-value="金" calcext:value-type="string">
            <text:p>金</text:p>
          </table:table-cell>
          <table:table-cell table:style-name="ce94" table:formula="of:=TEXT([.CJ1];&quot;aaa&quot;)" office:value-type="string" office:string-value="土" calcext:value-type="string">
            <text:p>土</text:p>
          </table:table-cell>
          <table:table-cell table:style-name="ce94" table:formula="of:=TEXT([.CK1];&quot;aaa&quot;)" office:value-type="string" office:string-value="日" calcext:value-type="string">
            <text:p>日</text:p>
          </table:table-cell>
          <table:table-cell table:style-name="ce94" table:formula="of:=TEXT([.CL1];&quot;aaa&quot;)" office:value-type="string" office:string-value="月" calcext:value-type="string">
            <text:p>月</text:p>
          </table:table-cell>
          <table:table-cell table:style-name="ce94" table:formula="of:=TEXT([.CM1];&quot;aaa&quot;)" office:value-type="string" office:string-value="火" calcext:value-type="string">
            <text:p>火</text:p>
          </table:table-cell>
          <table:table-cell table:style-name="ce94" table:formula="of:=TEXT([.CN1];&quot;aaa&quot;)" office:value-type="string" office:string-value="水" calcext:value-type="string">
            <text:p>水</text:p>
          </table:table-cell>
          <table:table-cell table:style-name="ce94" table:formula="of:=TEXT([.CO1];&quot;aaa&quot;)" office:value-type="string" office:string-value="木" calcext:value-type="string">
            <text:p>木</text:p>
          </table:table-cell>
          <table:table-cell table:style-name="ce94" table:formula="of:=TEXT([.CP1];&quot;aaa&quot;)" office:value-type="string" office:string-value="金" calcext:value-type="string">
            <text:p>金</text:p>
          </table:table-cell>
          <table:table-cell table:style-name="ce94" table:formula="of:=TEXT([.CQ1];&quot;aaa&quot;)" office:value-type="string" office:string-value="土" calcext:value-type="string">
            <text:p>土</text:p>
          </table:table-cell>
          <table:table-cell table:style-name="ce94" table:formula="of:=TEXT([.CR1];&quot;aaa&quot;)" office:value-type="string" office:string-value="日" calcext:value-type="string">
            <text:p>日</text:p>
          </table:table-cell>
          <table:table-cell table:style-name="ce94" table:formula="of:=TEXT([.CS1];&quot;aaa&quot;)" office:value-type="string" office:string-value="月" calcext:value-type="string">
            <text:p>月</text:p>
          </table:table-cell>
          <table:table-cell table:style-name="ce94" table:formula="of:=TEXT([.CT1];&quot;aaa&quot;)" office:value-type="string" office:string-value="火" calcext:value-type="string">
            <text:p>火</text:p>
          </table:table-cell>
          <table:table-cell table:style-name="ce94" table:formula="of:=TEXT([.CU1];&quot;aaa&quot;)" office:value-type="string" office:string-value="水" calcext:value-type="string">
            <text:p>水</text:p>
          </table:table-cell>
          <table:table-cell table:style-name="ce94" table:formula="of:=TEXT([.CV1];&quot;aaa&quot;)" office:value-type="string" office:string-value="木" calcext:value-type="string">
            <text:p>木</text:p>
          </table:table-cell>
          <table:table-cell table:style-name="ce94" table:formula="of:=TEXT([.CW1];&quot;aaa&quot;)" office:value-type="string" office:string-value="金" calcext:value-type="string">
            <text:p>金</text:p>
          </table:table-cell>
          <table:table-cell table:style-name="ce94" table:formula="of:=TEXT([.CX1];&quot;aaa&quot;)" office:value-type="string" office:string-value="土" calcext:value-type="string">
            <text:p>土</text:p>
          </table:table-cell>
          <table:table-cell table:style-name="ce94" table:formula="of:=TEXT([.CY1];&quot;aaa&quot;)" office:value-type="string" office:string-value="日" calcext:value-type="string">
            <text:p>日</text:p>
          </table:table-cell>
          <table:table-cell table:style-name="ce94" table:formula="of:=TEXT([.CZ1];&quot;aaa&quot;)" office:value-type="string" office:string-value="月" calcext:value-type="string">
            <text:p>月</text:p>
          </table:table-cell>
          <table:table-cell table:style-name="ce94" table:formula="of:=TEXT([.DA1];&quot;aaa&quot;)" office:value-type="string" office:string-value="火" calcext:value-type="string">
            <text:p>火</text:p>
          </table:table-cell>
          <table:table-cell table:style-name="ce94" table:formula="of:=TEXT([.DB1];&quot;aaa&quot;)" office:value-type="string" office:string-value="水" calcext:value-type="string">
            <text:p>水</text:p>
          </table:table-cell>
          <table:table-cell table:style-name="ce94" table:formula="of:=TEXT([.DC1];&quot;aaa&quot;)" office:value-type="string" office:string-value="木" calcext:value-type="string">
            <text:p>木</text:p>
          </table:table-cell>
          <table:table-cell table:style-name="ce94" table:formula="of:=TEXT([.DD1];&quot;aaa&quot;)" office:value-type="string" office:string-value="金" calcext:value-type="string">
            <text:p>金</text:p>
          </table:table-cell>
          <table:table-cell table:style-name="ce94" table:formula="of:=TEXT([.DE1];&quot;aaa&quot;)" office:value-type="string" office:string-value="土" calcext:value-type="string">
            <text:p>土</text:p>
          </table:table-cell>
          <table:table-cell table:style-name="ce94" table:formula="of:=TEXT([.DF1];&quot;aaa&quot;)" office:value-type="string" office:string-value="日" calcext:value-type="string">
            <text:p>日</text:p>
          </table:table-cell>
          <table:table-cell table:style-name="ce94" table:formula="of:=TEXT([.DG1];&quot;aaa&quot;)" office:value-type="string" office:string-value="月" calcext:value-type="string">
            <text:p>月</text:p>
          </table:table-cell>
          <table:table-cell table:style-name="ce94" table:formula="of:=TEXT([.DH1];&quot;aaa&quot;)" office:value-type="string" office:string-value="火" calcext:value-type="string">
            <text:p>火</text:p>
          </table:table-cell>
          <table:table-cell table:style-name="ce94" table:formula="of:=TEXT([.DI1];&quot;aaa&quot;)" office:value-type="string" office:string-value="水" calcext:value-type="string">
            <text:p>水</text:p>
          </table:table-cell>
          <table:table-cell table:style-name="ce94" table:formula="of:=TEXT([.DJ1];&quot;aaa&quot;)" office:value-type="string" office:string-value="木" calcext:value-type="string">
            <text:p>木</text:p>
          </table:table-cell>
          <table:table-cell table:style-name="ce94" table:formula="of:=TEXT([.DK1];&quot;aaa&quot;)" office:value-type="string" office:string-value="金" calcext:value-type="string">
            <text:p>金</text:p>
          </table:table-cell>
          <table:table-cell table:style-name="ce94" table:formula="of:=TEXT([.DL1];&quot;aaa&quot;)" office:value-type="string" office:string-value="土" calcext:value-type="string">
            <text:p>土</text:p>
          </table:table-cell>
          <table:table-cell table:style-name="ce94" table:formula="of:=TEXT([.DM1];&quot;aaa&quot;)" office:value-type="string" office:string-value="日" calcext:value-type="string">
            <text:p>日</text:p>
          </table:table-cell>
          <table:table-cell table:style-name="ce94" table:formula="of:=TEXT([.DN1];&quot;aaa&quot;)" office:value-type="string" office:string-value="月" calcext:value-type="string">
            <text:p>月</text:p>
          </table:table-cell>
          <table:table-cell table:style-name="ce94" table:formula="of:=TEXT([.DO1];&quot;aaa&quot;)" office:value-type="string" office:string-value="火" calcext:value-type="string">
            <text:p>火</text:p>
          </table:table-cell>
          <table:table-cell table:style-name="ce94" table:formula="of:=TEXT([.DP1];&quot;aaa&quot;)" office:value-type="string" office:string-value="水" calcext:value-type="string">
            <text:p>水</text:p>
          </table:table-cell>
          <table:table-cell table:style-name="ce94" table:formula="of:=TEXT([.DQ1];&quot;aaa&quot;)" office:value-type="string" office:string-value="木" calcext:value-type="string">
            <text:p>木</text:p>
          </table:table-cell>
          <table:table-cell table:style-name="ce94" table:formula="of:=TEXT([.DR1];&quot;aaa&quot;)" office:value-type="string" office:string-value="金" calcext:value-type="string">
            <text:p>金</text:p>
          </table:table-cell>
          <table:table-cell table:style-name="ce94" table:formula="of:=TEXT([.DS1];&quot;aaa&quot;)" office:value-type="string" office:string-value="土" calcext:value-type="string">
            <text:p>土</text:p>
          </table:table-cell>
          <table:table-cell table:style-name="ce94" table:formula="of:=TEXT([.DT1];&quot;aaa&quot;)" office:value-type="string" office:string-value="日" calcext:value-type="string">
            <text:p>日</text:p>
          </table:table-cell>
          <table:table-cell table:style-name="ce94" table:formula="of:=TEXT([.DU1];&quot;aaa&quot;)" office:value-type="string" office:string-value="月" calcext:value-type="string">
            <text:p>月</text:p>
          </table:table-cell>
          <table:table-cell table:style-name="ce94" table:formula="of:=TEXT([.DV1];&quot;aaa&quot;)" office:value-type="string" office:string-value="火" calcext:value-type="string">
            <text:p>火</text:p>
          </table:table-cell>
          <table:table-cell table:style-name="ce94" table:formula="of:=TEXT([.DW1];&quot;aaa&quot;)" office:value-type="string" office:string-value="水" calcext:value-type="string">
            <text:p>水</text:p>
          </table:table-cell>
          <table:table-cell table:style-name="ce94" table:formula="of:=TEXT([.DX1];&quot;aaa&quot;)" office:value-type="string" office:string-value="木" calcext:value-type="string">
            <text:p>木</text:p>
          </table:table-cell>
          <table:table-cell table:style-name="ce94" table:formula="of:=TEXT([.DY1];&quot;aaa&quot;)" office:value-type="string" office:string-value="金" calcext:value-type="string">
            <text:p>金</text:p>
          </table:table-cell>
          <table:table-cell table:style-name="ce94" table:formula="of:=TEXT([.DZ1];&quot;aaa&quot;)" office:value-type="string" office:string-value="土" calcext:value-type="string">
            <text:p>土</text:p>
          </table:table-cell>
          <table:table-cell table:style-name="ce94" table:formula="of:=TEXT([.EA1];&quot;aaa&quot;)" office:value-type="string" office:string-value="日" calcext:value-type="string">
            <text:p>日</text:p>
          </table:table-cell>
          <table:table-cell table:style-name="ce94" table:formula="of:=TEXT([.EB1];&quot;aaa&quot;)" office:value-type="string" office:string-value="月" calcext:value-type="string">
            <text:p>月</text:p>
          </table:table-cell>
          <table:table-cell table:style-name="ce94" table:formula="of:=TEXT([.EC1];&quot;aaa&quot;)" office:value-type="string" office:string-value="火" calcext:value-type="string">
            <text:p>火</text:p>
          </table:table-cell>
          <table:table-cell table:style-name="ce94" table:formula="of:=TEXT([.ED1];&quot;aaa&quot;)" office:value-type="string" office:string-value="水" calcext:value-type="string">
            <text:p>水</text:p>
          </table:table-cell>
          <table:table-cell table:style-name="ce94" table:formula="of:=TEXT([.EE1];&quot;aaa&quot;)" office:value-type="string" office:string-value="木" calcext:value-type="string">
            <text:p>木</text:p>
          </table:table-cell>
          <table:table-cell table:style-name="ce94" table:formula="of:=TEXT([.EF1];&quot;aaa&quot;)" office:value-type="string" office:string-value="金" calcext:value-type="string">
            <text:p>金</text:p>
          </table:table-cell>
          <table:table-cell table:style-name="ce94" table:formula="of:=TEXT([.EG1];&quot;aaa&quot;)" office:value-type="string" office:string-value="土" calcext:value-type="string">
            <text:p>土</text:p>
          </table:table-cell>
          <table:table-cell table:style-name="ce94" table:formula="of:=TEXT([.EH1];&quot;aaa&quot;)" office:value-type="string" office:string-value="日" calcext:value-type="string">
            <text:p>日</text:p>
          </table:table-cell>
          <table:table-cell table:style-name="ce94" table:formula="of:=TEXT([.EI1];&quot;aaa&quot;)" office:value-type="string" office:string-value="月" calcext:value-type="string">
            <text:p>月</text:p>
          </table:table-cell>
          <table:table-cell table:style-name="ce94" table:formula="of:=TEXT([.EJ1];&quot;aaa&quot;)" office:value-type="string" office:string-value="火" calcext:value-type="string">
            <text:p>火</text:p>
          </table:table-cell>
          <table:table-cell table:style-name="ce94" table:formula="of:=TEXT([.EK1];&quot;aaa&quot;)" office:value-type="string" office:string-value="水" calcext:value-type="string">
            <text:p>水</text:p>
          </table:table-cell>
          <table:table-cell table:style-name="ce94" table:formula="of:=TEXT([.EL1];&quot;aaa&quot;)" office:value-type="string" office:string-value="木" calcext:value-type="string">
            <text:p>木</text:p>
          </table:table-cell>
          <table:table-cell table:style-name="ce94" table:formula="of:=TEXT([.EM1];&quot;aaa&quot;)" office:value-type="string" office:string-value="金" calcext:value-type="string">
            <text:p>金</text:p>
          </table:table-cell>
          <table:table-cell table:style-name="ce94" table:formula="of:=TEXT([.EN1];&quot;aaa&quot;)" office:value-type="string" office:string-value="土" calcext:value-type="string">
            <text:p>土</text:p>
          </table:table-cell>
          <table:table-cell table:style-name="ce94" table:formula="of:=TEXT([.EO1];&quot;aaa&quot;)" office:value-type="string" office:string-value="日" calcext:value-type="string">
            <text:p>日</text:p>
          </table:table-cell>
          <table:table-cell table:style-name="ce94" table:formula="of:=TEXT([.EP1];&quot;aaa&quot;)" office:value-type="string" office:string-value="月" calcext:value-type="string">
            <text:p>月</text:p>
          </table:table-cell>
          <table:table-cell table:style-name="ce94" table:formula="of:=TEXT([.EQ1];&quot;aaa&quot;)" office:value-type="string" office:string-value="火" calcext:value-type="string">
            <text:p>火</text:p>
          </table:table-cell>
          <table:table-cell table:style-name="ce94" table:formula="of:=TEXT([.ER1];&quot;aaa&quot;)" office:value-type="string" office:string-value="水" calcext:value-type="string">
            <text:p>水</text:p>
          </table:table-cell>
          <table:table-cell table:style-name="ce94" table:formula="of:=TEXT([.ES1];&quot;aaa&quot;)" office:value-type="string" office:string-value="木" calcext:value-type="string">
            <text:p>木</text:p>
          </table:table-cell>
          <table:table-cell table:style-name="ce94" table:formula="of:=TEXT([.ET1];&quot;aaa&quot;)" office:value-type="string" office:string-value="金" calcext:value-type="string">
            <text:p>金</text:p>
          </table:table-cell>
          <table:table-cell table:style-name="ce94" table:formula="of:=TEXT([.EU1];&quot;aaa&quot;)" office:value-type="string" office:string-value="土" calcext:value-type="string">
            <text:p>土</text:p>
          </table:table-cell>
          <table:table-cell table:style-name="ce94" table:formula="of:=TEXT([.EV1];&quot;aaa&quot;)" office:value-type="string" office:string-value="日" calcext:value-type="string">
            <text:p>日</text:p>
          </table:table-cell>
          <table:table-cell table:style-name="ce94" table:formula="of:=TEXT([.EW1];&quot;aaa&quot;)" office:value-type="string" office:string-value="月" calcext:value-type="string">
            <text:p>月</text:p>
          </table:table-cell>
          <table:table-cell table:style-name="ce94" table:formula="of:=TEXT([.EX1];&quot;aaa&quot;)" office:value-type="string" office:string-value="火" calcext:value-type="string">
            <text:p>火</text:p>
          </table:table-cell>
          <table:table-cell table:style-name="ce94" table:formula="of:=TEXT([.EY1];&quot;aaa&quot;)" office:value-type="string" office:string-value="水" calcext:value-type="string">
            <text:p>水</text:p>
          </table:table-cell>
          <table:table-cell table:style-name="ce94" table:formula="of:=TEXT([.EZ1];&quot;aaa&quot;)" office:value-type="string" office:string-value="木" calcext:value-type="string">
            <text:p>木</text:p>
          </table:table-cell>
          <table:table-cell table:style-name="ce94" table:formula="of:=TEXT([.FA1];&quot;aaa&quot;)" office:value-type="string" office:string-value="金" calcext:value-type="string">
            <text:p>金</text:p>
          </table:table-cell>
          <table:table-cell table:style-name="ce94" table:formula="of:=TEXT([.FB1];&quot;aaa&quot;)" office:value-type="string" office:string-value="土" calcext:value-type="string">
            <text:p>土</text:p>
          </table:table-cell>
          <table:table-cell table:style-name="ce94" table:formula="of:=TEXT([.FC1];&quot;aaa&quot;)" office:value-type="string" office:string-value="日" calcext:value-type="string">
            <text:p>日</text:p>
          </table:table-cell>
          <table:table-cell table:style-name="ce94" table:formula="of:=TEXT([.FD1];&quot;aaa&quot;)" office:value-type="string" office:string-value="月" calcext:value-type="string">
            <text:p>月</text:p>
          </table:table-cell>
          <table:table-cell table:style-name="ce94" table:formula="of:=TEXT([.FE1];&quot;aaa&quot;)" office:value-type="string" office:string-value="火" calcext:value-type="string">
            <text:p>火</text:p>
          </table:table-cell>
          <table:table-cell table:style-name="ce94" table:formula="of:=TEXT([.FF1];&quot;aaa&quot;)" office:value-type="string" office:string-value="水" calcext:value-type="string">
            <text:p>水</text:p>
          </table:table-cell>
          <table:table-cell table:style-name="ce94" table:formula="of:=TEXT([.FG1];&quot;aaa&quot;)" office:value-type="string" office:string-value="木" calcext:value-type="string">
            <text:p>木</text:p>
          </table:table-cell>
          <table:table-cell table:style-name="ce94" table:formula="of:=TEXT([.FH1];&quot;aaa&quot;)" office:value-type="string" office:string-value="金" calcext:value-type="string">
            <text:p>金</text:p>
          </table:table-cell>
          <table:table-cell table:style-name="ce94" table:formula="of:=TEXT([.FI1];&quot;aaa&quot;)" office:value-type="string" office:string-value="土" calcext:value-type="string">
            <text:p>土</text:p>
          </table:table-cell>
          <table:table-cell table:style-name="ce94" table:formula="of:=TEXT([.FJ1];&quot;aaa&quot;)" office:value-type="string" office:string-value="日" calcext:value-type="string">
            <text:p>日</text:p>
          </table:table-cell>
          <table:table-cell table:style-name="ce94" table:formula="of:=TEXT([.FK1];&quot;aaa&quot;)" office:value-type="string" office:string-value="月" calcext:value-type="string">
            <text:p>月</text:p>
          </table:table-cell>
          <table:table-cell table:style-name="ce94" table:formula="of:=TEXT([.FL1];&quot;aaa&quot;)" office:value-type="string" office:string-value="火" calcext:value-type="string">
            <text:p>火</text:p>
          </table:table-cell>
          <table:table-cell table:style-name="ce94" table:formula="of:=TEXT([.FM1];&quot;aaa&quot;)" office:value-type="string" office:string-value="水" calcext:value-type="string">
            <text:p>水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5]&lt;&gt;&quot;&quot;;[.$F5]=&quot;&quot;);&quot;E&quot;&amp;ROW();[.$B4])" office:value-type="string" office:string-value="E5" calcext:value-type="string">
            <text:p>E5</text:p>
          </table:table-cell>
          <table:table-cell table:style-name="ce13" table:formula="of:=IF(AND([.$D5]&lt;&gt;&quot;&quot;;[.$D5]&lt;&gt;&quot;○&quot;);MAX([.$C$3:.$C4])+1;[.$C4])" office:value-type="float" office:value="1" calcext:value-type="float">
            <text:p>1</text:p>
          </table:table-cell>
          <table:table-cell table:style-name="ce18" office:value-type="string" calcext:value-type="string">
            <text:p>体制整備</text:p>
          </table:table-cell>
          <table:table-cell table:style-name="ce26" table:formula="of:=IF(AND([.$F5]&lt;&gt;&quot;&quot;;[.$D4]&lt;&gt;&quot;&quot;);1;IF([.$F5]&lt;&gt;&quot;&quot;;MAX(INDIRECT([.$B5]):[.$E4])+1;&quot;&quot;))">
            <text:p/>
          </table:table-cell>
          <table:table-cell table:style-name="ce18"/>
          <table:table-cell table:style-name="ce26" table:formula="of:=IF(AND([.$F5]&lt;&gt;&quot;&quot;;[.$D4]&lt;&gt;&quot;&quot;);1;IF([.$F5]&lt;&gt;&quot;&quot;;MAX(INDIRECT([.$B5]):[.$E4])+1;&quot;&quot;))">
            <text:p/>
          </table:table-cell>
          <table:table-cell table:style-name="ce18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5" table:formula="of:=IF([.$L5]&lt;&gt;&quot;&quot;;NETWORKDAYS([.$L5];[.$M5];[$休日.$B$4:.$B$304]);&quot;&quot;)" office:value-type="float" office:value="1" calcext:value-type="float">
            <text:p>1</text:p>
          </table:table-cell>
          <table:table-cell table:style-name="ce47" office:value-type="float" office:value="100" calcext:value-type="float">
            <text:p>100</text:p>
          </table:table-cell>
          <table:table-cell table:style-name="ce18" table:formula="of:=IF(OR(AND([.$N5]=&quot;&quot;;[.$L5]&lt;&gt;&quot;&quot;;[.$L5]&lt;=[.$U$1]);AND([.$M5]&lt;&gt;&quot;&quot;;[.Q5]&lt;100;[.$M5]&lt;=[.$U$1]));&quot;遅延&quot;;&quot;&quot;)">
            <text:p/>
          </table:table-cell>
          <table:table-cell table:style-name="ce18" table:number-columns-repeated="2"/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6]&lt;&gt;&quot;&quot;;[.$F6]=&quot;&quot;);&quot;E&quot;&amp;ROW();[.$B5])" office:value-type="string" office:string-value="E5" calcext:value-type="string">
            <text:p>E5</text:p>
          </table:table-cell>
          <table:table-cell table:style-name="ce13" table:formula="of:=IF(AND([.$D6]&lt;&gt;&quot;&quot;;[.$D6]&lt;&gt;&quot;○&quot;);MAX([.$C$3:.$C5])+1;[.$C5])" office:value-type="float" office:value="1" calcext:value-type="float">
            <text:p>1</text:p>
          </table:table-cell>
          <table:table-cell table:style-name="ce19"/>
          <table:table-cell table:style-name="ce27" table:formula="of:=IF(AND([.$F6]&lt;&gt;&quot;&quot;;[.$D5]&lt;&gt;&quot;&quot;);1;IF([.$F6]&lt;&gt;&quot;&quot;;MAX(INDIRECT([.$B6]):[.$E5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チーム名の決定</text:p>
          </table:table-cell>
          <table:table-cell table:style-name="ce32" table:formula="of:=IF([.$H6]=&quot;&quot;;&quot;&quot;;IF([.$G5]=&quot;&quot;;1;[.$G5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6]&lt;&gt;&quot;&quot;;NETWORKDAYS([.$L6];[.$M6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6]=&quot;&quot;;[.$L6]&lt;&gt;&quot;&quot;;[.$L6]&lt;=[.$U$1]);AND([.$M6]&lt;&gt;&quot;&quot;;[.Q6]&lt;100;[.$M6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]&lt;&gt;&quot;&quot;;[.$F7]=&quot;&quot;);&quot;E&quot;&amp;ROW();[.$B6])" office:value-type="string" office:string-value="E5" calcext:value-type="string">
            <text:p>E5</text:p>
          </table:table-cell>
          <table:table-cell table:style-name="ce13" table:formula="of:=IF(AND([.$D7]&lt;&gt;&quot;&quot;;[.$D7]&lt;&gt;&quot;○&quot;);MAX([.$C$3:.$C6])+1;[.$C6])" office:value-type="float" office:value="1" calcext:value-type="float">
            <text:p>1</text:p>
          </table:table-cell>
          <table:table-cell table:style-name="ce19"/>
          <table:table-cell table:style-name="ce27" table:formula="of:=IF(AND([.$F7]&lt;&gt;&quot;&quot;;[.$D6]&lt;&gt;&quot;&quot;);1;IF([.$F7]&lt;&gt;&quot;&quot;;MAX(INDIRECT([.$B7]):[.$E6])+1;&quot;&quot;))">
            <text:p/>
          </table:table-cell>
          <table:table-cell table:style-name="ce32"/>
          <table:table-cell table:style-name="ce32" table:formula="of:=IF([.$H7]=&quot;&quot;;&quot;&quot;;IF([.$G6]=&quot;&quot;;1;[.$G6]+1))" office:value-type="float" office:value="1" calcext:value-type="float">
            <text:p>1</text:p>
          </table:table-cell>
          <table:table-cell table:style-name="ce32" office:value-type="string" calcext:value-type="string">
            <text:p>チーム名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7]&lt;&gt;&quot;&quot;;NETWORKDAYS([.$L7];[.$M7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7]=&quot;&quot;;[.$L7]&lt;&gt;&quot;&quot;;[.$L7]&lt;=[.$U$1]);AND([.$M7]&lt;&gt;&quot;&quot;;[.Q7]&lt;100;[.$M7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7:.$FM7])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8]&lt;&gt;&quot;&quot;;[.$F8]=&quot;&quot;);&quot;E&quot;&amp;ROW();[.$B7])" office:value-type="string" office:string-value="E5" calcext:value-type="string">
            <text:p>E5</text:p>
          </table:table-cell>
          <table:table-cell table:style-name="ce13" table:formula="of:=IF(AND([.$D8]&lt;&gt;&quot;&quot;;[.$D8]&lt;&gt;&quot;○&quot;);MAX([.$C$3:.$C7])+1;[.$C7])" office:value-type="float" office:value="1" calcext:value-type="float">
            <text:p>1</text:p>
          </table:table-cell>
          <table:table-cell table:style-name="ce19"/>
          <table:table-cell table:style-name="ce27" table:formula="of:=IF(AND([.$F8]&lt;&gt;&quot;&quot;;[.$D7]&lt;&gt;&quot;&quot;);1;IF([.$F8]&lt;&gt;&quot;&quot;;MAX(INDIRECT([.$B8]):[.$E7])+1;&quot;&quot;))">
            <text:p/>
          </table:table-cell>
          <table:table-cell table:style-name="ce32"/>
          <table:table-cell table:style-name="ce32" table:formula="of:=IF([.$H8]=&quot;&quot;;&quot;&quot;;IF([.$G7]=&quot;&quot;;1;[.$G7]+1))" office:value-type="float" office:value="2" calcext:value-type="float">
            <text:p>2</text:p>
          </table:table-cell>
          <table:table-cell table:style-name="ce32" office:value-type="string" calcext:value-type="string">
            <text:p>発注者への決定内容の通知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8]&lt;&gt;&quot;&quot;;NETWORKDAYS([.$L8];[.$M8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8]=&quot;&quot;;[.$L8]&lt;&gt;&quot;&quot;;[.$L8]&lt;=[.$U$1]);AND([.$M8]&lt;&gt;&quot;&quot;;[.Q8]&lt;100;[.$M8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:.$FM8])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]&lt;&gt;&quot;&quot;;[.$F10]=&quot;&quot;);&quot;E&quot;&amp;ROW();[.$B8])" office:value-type="string" office:string-value="E5" calcext:value-type="string">
            <text:p>E5</text:p>
          </table:table-cell>
          <table:table-cell table:style-name="ce13" table:formula="of:=IF(AND([.$D10]&lt;&gt;&quot;&quot;;[.$D10]&lt;&gt;&quot;○&quot;);MAX([.$C$3:.$C8])+1;[.$C8])" office:value-type="float" office:value="1" calcext:value-type="float">
            <text:p>1</text:p>
          </table:table-cell>
          <table:table-cell table:style-name="ce19"/>
          <table:table-cell table:style-name="ce27" table:formula="of:=IF(AND([.$F10]&lt;&gt;&quot;&quot;;[.$D8]&lt;&gt;&quot;&quot;);1;IF([.$F10]&lt;&gt;&quot;&quot;;MAX(INDIRECT([.$B10]):[.$E8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チーム内の役割決定</text:p>
          </table:table-cell>
          <table:table-cell table:style-name="ce32" table:number-columns-repeated="3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0]&lt;&gt;&quot;&quot;;NETWORKDAYS([.$L10];[.$M10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0]=&quot;&quot;;[.$L10]&lt;&gt;&quot;&quot;;[.$L10]&lt;=[.$U$1]);AND([.$M10]&lt;&gt;&quot;&quot;;[.Q10]&lt;100;[.$M10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0:.$FM1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]&lt;&gt;&quot;&quot;;[.$F11]=&quot;&quot;);&quot;E&quot;&amp;ROW();[.$B10])" office:value-type="string" office:string-value="E5" calcext:value-type="string">
            <text:p>E5</text:p>
          </table:table-cell>
          <table:table-cell table:style-name="ce13" table:formula="of:=IF(AND([.$D11]&lt;&gt;&quot;&quot;;[.$D11]&lt;&gt;&quot;○&quot;);MAX([.$C$3:.$C10])+1;[.$C10])" office:value-type="float" office:value="1" calcext:value-type="float">
            <text:p>1</text:p>
          </table:table-cell>
          <table:table-cell table:style-name="ce19"/>
          <table:table-cell table:style-name="ce27" table:formula="of:=IF(AND([.$F11]&lt;&gt;&quot;&quot;;[.$D10]&lt;&gt;&quot;&quot;);1;IF([.$F11]&lt;&gt;&quot;&quot;;MAX(INDIRECT([.$B11]):[.$E10])+1;&quot;&quot;))">
            <text:p/>
          </table:table-cell>
          <table:table-cell table:style-name="ce32"/>
          <table:table-cell table:style-name="ce32" table:formula="of:=IF([.$H11]=&quot;&quot;;&quot;&quot;;IF([.$G10]=&quot;&quot;;1;[.$G10]+1))" office:value-type="float" office:value="1" calcext:value-type="float">
            <text:p>1</text:p>
          </table:table-cell>
          <table:table-cell table:style-name="ce32" office:value-type="string" calcext:value-type="string">
            <text:p>役割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11]&lt;&gt;&quot;&quot;;NETWORKDAYS([.$L11];[.$M11];[$休日.$B$4:.$B$304]);&quot;&quot;)" office:value-type="float" office:value="1" calcext:value-type="float">
            <text:p>1</text:p>
          </table:table-cell>
          <table:table-cell table:style-name="ce214" office:value-type="float" office:value="100" calcext:value-type="float">
            <text:p>100</text:p>
          </table:table-cell>
          <table:table-cell table:style-name="ce63" table:formula="of:=IF(OR(AND([.$N11]=&quot;&quot;;[.$L11]&lt;&gt;&quot;&quot;;[.$L11]&lt;=[.$U$1]);AND([.$M11]&lt;&gt;&quot;&quot;;[.Q11]&lt;100;[.$M11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1:.$FM11])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 table:style-name="ce2"/>
          <table:table-cell table:style-name="ce7" table:formula="of:=IF(AND([.$D12]&lt;&gt;&quot;&quot;;[.$F12]=&quot;&quot;);&quot;E&quot;&amp;ROW();[.$B11])" office:value-type="string" office:string-value="E5" calcext:value-type="string">
            <text:p>E5</text:p>
          </table:table-cell>
          <table:table-cell table:style-name="ce13" table:formula="of:=IF(AND([.$D12]&lt;&gt;&quot;&quot;;[.$D12]&lt;&gt;&quot;○&quot;);MAX([.$C$3:.$C11])+1;[.$C11])" office:value-type="float" office:value="1" calcext:value-type="float">
            <text:p>1</text:p>
          </table:table-cell>
          <table:table-cell table:style-name="ce19"/>
          <table:table-cell table:style-name="ce27"/>
          <table:table-cell table:style-name="ce32"/>
          <table:table-cell table:style-name="ce32" table:formula="of:=IF([.$H12]=&quot;&quot;;&quot;&quot;;IF([.$G11]=&quot;&quot;;1;[.$G11]+1))" office:value-type="float" office:value="2" calcext:value-type="float">
            <text:p>2</text:p>
          </table:table-cell>
          <table:table-cell table:style-name="ce32" office:value-type="string" calcext:value-type="string">
            <text:p>役割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12]&lt;&gt;&quot;&quot;;NETWORKDAYS([.$L12];[.$M12];[$休日.$B$4:.$B$304]);&quot;&quot;)" office:value-type="float" office:value="1" calcext:value-type="float">
            <text:p>1</text:p>
          </table:table-cell>
          <table:table-cell table:style-name="ce214" office:value-type="float" office:value="100" calcext:value-type="float">
            <text:p>100</text:p>
          </table:table-cell>
          <table:table-cell table:style-name="ce63" table:formula="of:=IF(OR(AND([.$N12]=&quot;&quot;;[.$L12]&lt;&gt;&quot;&quot;;[.$L12]&lt;=[.$U$1]);AND([.$M12]&lt;&gt;&quot;&quot;;[.Q12]&lt;100;[.$M12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 table:style-name="ce2"/>
          <table:table-cell table:style-name="ce7" table:formula="of:=IF(AND([.$D13]&lt;&gt;&quot;&quot;;[.$F13]=&quot;&quot;);&quot;E&quot;&amp;ROW();[.$B12])" office:value-type="string" office:string-value="E5" calcext:value-type="string">
            <text:p>E5</text:p>
          </table:table-cell>
          <table:table-cell table:style-name="ce13" table:formula="of:=IF(AND([.$D13]&lt;&gt;&quot;&quot;;[.$D13]&lt;&gt;&quot;○&quot;);MAX([.$C$3:.$C12])+1;[.$C12])" office:value-type="float" office:value="1" calcext:value-type="float">
            <text:p>1</text:p>
          </table:table-cell>
          <table:table-cell table:style-name="ce19"/>
          <table:table-cell table:style-name="ce27" table:formula="of:=IF(AND([.$F13]&lt;&gt;&quot;&quot;;[.$D12]&lt;&gt;&quot;&quot;);1;IF([.$F13]&lt;&gt;&quot;&quot;;MAX(INDIRECT([.$B13]):[.$E12])+1;&quot;&quot;))">
            <text:p/>
          </table:table-cell>
          <table:table-cell table:style-name="ce32"/>
          <table:table-cell table:style-name="ce32" table:formula="of:=IF([.$H13]=&quot;&quot;;&quot;&quot;;IF([.$G12]=&quot;&quot;;1;[.$G12]+1))" office:value-type="float" office:value="3" calcext:value-type="float">
            <text:p>3</text:p>
          </table:table-cell>
          <table:table-cell table:style-name="ce32" office:value-type="string" calcext:value-type="string">
            <text:p>発注者への決定内容の通知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13]&lt;&gt;&quot;&quot;;NETWORKDAYS([.$L13];[.$M13];[$休日.$B$4:.$B$304]);&quot;&quot;)" office:value-type="float" office:value="1" calcext:value-type="float">
            <text:p>1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table:formula="of:=IF(OR(AND([.$N13]=&quot;&quot;;[.$L13]&lt;&gt;&quot;&quot;;[.$L13]&lt;=[.$U$1]);AND([.$M13]&lt;&gt;&quot;&quot;;[.Q13]&lt;100;[.$M13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 table:style-name="ce2"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49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]&lt;&gt;&quot;&quot;;[.$F15]=&quot;&quot;);&quot;E&quot;&amp;ROW();[.$B13])" office:value-type="string" office:string-value="E5" calcext:value-type="string">
            <text:p>E5</text:p>
          </table:table-cell>
          <table:table-cell table:style-name="ce13" table:formula="of:=IF(AND([.$D15]&lt;&gt;&quot;&quot;;[.$D15]&lt;&gt;&quot;○&quot;);MAX([.$C$3:.$C13])+1;[.$C13])" office:value-type="float" office:value="1" calcext:value-type="float">
            <text:p>1</text:p>
          </table:table-cell>
          <table:table-cell table:style-name="ce19"/>
          <table:table-cell table:style-name="ce27" table:formula="of:=IF(AND([.$F15]&lt;&gt;&quot;&quot;;[.$D13]&lt;&gt;&quot;&quot;);1;IF([.$F15]&lt;&gt;&quot;&quot;;MAX(INDIRECT([.$B15]):[.$E13])+1;&quot;&quot;))" office:value-type="float" office:value="3" calcext:value-type="float">
            <text:p>3</text:p>
          </table:table-cell>
          <table:table-cell table:style-name="ce32" office:value-type="string" calcext:value-type="string">
            <text:p>開発環境の整備</text:p>
          </table:table-cell>
          <table:table-cell table:style-name="ce32" table:formula="of:=IF([.$H15]=&quot;&quot;;&quot;&quot;;IF([.$G13]=&quot;&quot;;1;[.$G13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5]&lt;&gt;&quot;&quot;;NETWORKDAYS([.$L15];[.$M15];[$休日.$B$4:.$B$304]);&quot;&quot;)" office:value-type="float" office:value="1" calcext:value-type="float">
            <text:p>1</text:p>
          </table:table-cell>
          <table:table-cell table:style-name="ce214" office:value-type="float" office:value="100" calcext:value-type="float">
            <text:p>100</text:p>
          </table:table-cell>
          <table:table-cell table:style-name="ce63" table:formula="of:=IF(OR(AND([.$N15]=&quot;&quot;;[.$L15]&lt;&gt;&quot;&quot;;[.$L15]&lt;=[.$U$1]);AND([.$M15]&lt;&gt;&quot;&quot;;[.Q15]&lt;100;[.$M15]&lt;=[.$U$1]));&quot;遅延&quot;;&quot;&quot;)">
            <text:p/>
          </table:table-cell>
          <table:table-cell table:style-name="ce66"/>
          <table:table-cell table:style-name="ce66" table:formula="of:=SUM([.$V15:.$FM1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]&lt;&gt;&quot;&quot;;[.$F16]=&quot;&quot;);&quot;E&quot;&amp;ROW();[.$B15])" office:value-type="string" office:string-value="E5" calcext:value-type="string">
            <text:p>E5</text:p>
          </table:table-cell>
          <table:table-cell table:style-name="ce13" table:formula="of:=IF(AND([.$D16]&lt;&gt;&quot;&quot;;[.$D16]&lt;&gt;&quot;○&quot;);MAX([.$C$3:.$C15])+1;[.$C15])" office:value-type="float" office:value="1" calcext:value-type="float">
            <text:p>1</text:p>
          </table:table-cell>
          <table:table-cell table:style-name="ce19"/>
          <table:table-cell table:style-name="ce27" table:formula="of:=IF(AND([.$F16]&lt;&gt;&quot;&quot;;[.$D15]&lt;&gt;&quot;&quot;);1;IF([.$F16]&lt;&gt;&quot;&quot;;MAX(INDIRECT([.$B16]):[.$E15])+1;&quot;&quot;))">
            <text:p/>
          </table:table-cell>
          <table:table-cell table:style-name="ce32"/>
          <table:table-cell table:style-name="ce32" table:formula="of:=IF([.$H16]=&quot;&quot;;&quot;&quot;;IF([.$G15]=&quot;&quot;;1;[.$G15]+1))" office:value-type="float" office:value="1" calcext:value-type="float">
            <text:p>1</text:p>
          </table:table-cell>
          <table:table-cell table:style-name="ce32" office:value-type="string" calcext:value-type="string">
            <text:p>Eclipseへのプロジェクトインポート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6]&lt;&gt;&quot;&quot;;NETWORKDAYS([.$L16];[.$M16];[$休日.$B$4:.$B$304]);&quot;&quot;)" office:value-type="float" office:value="1" calcext:value-type="float">
            <text:p>1</text:p>
          </table:table-cell>
          <table:table-cell table:style-name="ce214" office:value-type="float" office:value="100" calcext:value-type="float">
            <text:p>100</text:p>
          </table:table-cell>
          <table:table-cell table:style-name="ce63" table:formula="of:=IF(OR(AND([.$N16]=&quot;&quot;;[.$L16]&lt;&gt;&quot;&quot;;[.$L16]&lt;=[.$U$1]);AND([.$M16]&lt;&gt;&quot;&quot;;[.Q16]&lt;100;[.$M16]&lt;=[.$U$1]));&quot;遅延&quot;;&quot;&quot;)">
            <text:p/>
          </table:table-cell>
          <table:table-cell table:style-name="ce66"/>
          <table:table-cell table:style-name="ce66" table:formula="of:=SUM([.$V16:.$FM1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]&lt;&gt;&quot;&quot;;[.$F17]=&quot;&quot;);&quot;E&quot;&amp;ROW();[.$B16])" office:value-type="string" office:string-value="E5" calcext:value-type="string">
            <text:p>E5</text:p>
          </table:table-cell>
          <table:table-cell table:style-name="ce13" table:formula="of:=IF(AND([.$D17]&lt;&gt;&quot;&quot;;[.$D17]&lt;&gt;&quot;○&quot;);MAX([.$C$3:.$C16])+1;[.$C16])" office:value-type="float" office:value="1" calcext:value-type="float">
            <text:p>1</text:p>
          </table:table-cell>
          <table:table-cell table:style-name="ce19"/>
          <table:table-cell table:style-name="ce27" table:formula="of:=IF(AND([.$F17]&lt;&gt;&quot;&quot;;[.$D16]&lt;&gt;&quot;&quot;);1;IF([.$F17]&lt;&gt;&quot;&quot;;MAX(INDIRECT([.$B17]):[.$E16])+1;&quot;&quot;))">
            <text:p/>
          </table:table-cell>
          <table:table-cell table:style-name="ce32"/>
          <table:table-cell table:style-name="ce32" table:formula="of:=IF([.$H17]=&quot;&quot;;&quot;&quot;;IF([.$G16]=&quot;&quot;;1;[.$G16]+1))" office:value-type="float" office:value="2" calcext:value-type="float">
            <text:p>2</text:p>
          </table:table-cell>
          <table:table-cell table:style-name="ce32" office:value-type="string" calcext:value-type="string">
            <text:p>gitリポジトリの作成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7]&lt;&gt;&quot;&quot;;NETWORKDAYS([.$L17];[.$M17];[$休日.$B$4:.$B$304]);&quot;&quot;)" office:value-type="float" office:value="1" calcext:value-type="float">
            <text:p>1</text:p>
          </table:table-cell>
          <table:table-cell table:style-name="ce214" office:value-type="float" office:value="100" calcext:value-type="float">
            <text:p>100</text:p>
          </table:table-cell>
          <table:table-cell table:style-name="ce63" table:formula="of:=IF(OR(AND([.$N17]=&quot;&quot;;[.$L17]&lt;&gt;&quot;&quot;;[.$L17]&lt;=[.$U$1]);AND([.$M17]&lt;&gt;&quot;&quot;;[.Q17]&lt;100;[.$M17]&lt;=[.$U$1]));&quot;遅延&quot;;&quot;&quot;)">
            <text:p/>
          </table:table-cell>
          <table:table-cell table:style-name="ce66"/>
          <table:table-cell table:style-name="ce66" table:formula="of:=SUM([.$V17:.$FM1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]&lt;&gt;&quot;&quot;;[.$F18]=&quot;&quot;);&quot;E&quot;&amp;ROW();[.$B17])" office:value-type="string" office:string-value="E5" calcext:value-type="string">
            <text:p>E5</text:p>
          </table:table-cell>
          <table:table-cell table:style-name="ce13" table:formula="of:=IF(AND([.$D18]&lt;&gt;&quot;&quot;;[.$D18]&lt;&gt;&quot;○&quot;);MAX([.$C$3:.$C17])+1;[.$C17])" office:value-type="float" office:value="1" calcext:value-type="float">
            <text:p>1</text:p>
          </table:table-cell>
          <table:table-cell table:style-name="ce19"/>
          <table:table-cell table:style-name="ce27" table:formula="of:=IF(AND([.$F18]&lt;&gt;&quot;&quot;;[.$D17]&lt;&gt;&quot;&quot;);1;IF([.$F18]&lt;&gt;&quot;&quot;;MAX(INDIRECT([.$B18]):[.$E17])+1;&quot;&quot;))">
            <text:p/>
          </table:table-cell>
          <table:table-cell table:style-name="ce32"/>
          <table:table-cell table:style-name="ce32" table:formula="of:=IF([.$H18]=&quot;&quot;;&quot;&quot;;IF([.$G17]=&quot;&quot;;1;[.$G17]+1))" office:value-type="float" office:value="3" calcext:value-type="float">
            <text:p>3</text:p>
          </table:table-cell>
          <table:table-cell table:style-name="ce32" office:value-type="string" calcext:value-type="string">
            <text:p>DBユーザの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8]&lt;&gt;&quot;&quot;;NETWORKDAYS([.$L18];[.$M18];[$休日.$B$4:.$B$304]);&quot;&quot;)" office:value-type="float" office:value="1" calcext:value-type="float">
            <text:p>1</text:p>
          </table:table-cell>
          <table:table-cell table:style-name="ce214" office:value-type="float" office:value="100" calcext:value-type="float">
            <text:p>100</text:p>
          </table:table-cell>
          <table:table-cell table:style-name="ce63" table:formula="of:=IF(OR(AND([.$N18]=&quot;&quot;;[.$L18]&lt;&gt;&quot;&quot;;[.$L18]&lt;=[.$U$1]);AND([.$M18]&lt;&gt;&quot;&quot;;[.Q18]&lt;100;[.$M18]&lt;=[.$U$1]));&quot;遅延&quot;;&quot;&quot;)">
            <text:p/>
          </table:table-cell>
          <table:table-cell table:style-name="ce66"/>
          <table:table-cell table:style-name="ce66" table:formula="of:=SUM([.$V18:.$FM1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]&lt;&gt;&quot;&quot;;[.$F19]=&quot;&quot;);&quot;E&quot;&amp;ROW();[.$B18])" office:value-type="string" office:string-value="E5" calcext:value-type="string">
            <text:p>E5</text:p>
          </table:table-cell>
          <table:table-cell table:style-name="ce13" table:formula="of:=IF(AND([.$D19]&lt;&gt;&quot;&quot;;[.$D19]&lt;&gt;&quot;○&quot;);MAX([.$C$3:.$C18])+1;[.$C18])" office:value-type="float" office:value="1" calcext:value-type="float">
            <text:p>1</text:p>
          </table:table-cell>
          <table:table-cell table:style-name="ce19"/>
          <table:table-cell table:style-name="ce27" table:formula="of:=IF(AND([.$F19]&lt;&gt;&quot;&quot;;[.$D18]&lt;&gt;&quot;&quot;);1;IF([.$F19]&lt;&gt;&quot;&quot;;MAX(INDIRECT([.$B19]):[.$E18])+1;&quot;&quot;))">
            <text:p/>
          </table:table-cell>
          <table:table-cell table:style-name="ce32"/>
          <table:table-cell table:style-name="ce32" table:formula="of:=IF([.$H19]=&quot;&quot;;&quot;&quot;;IF([.$G18]=&quot;&quot;;1;[.$G18]+1))" office:value-type="float" office:value="4" calcext:value-type="float">
            <text:p>4</text:p>
          </table:table-cell>
          <table:table-cell table:style-name="ce32" office:value-type="string" calcext:value-type="string">
            <text:p>テーブル、シーケンスの作成とデータ登録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9]&lt;&gt;&quot;&quot;;NETWORKDAYS([.$L19];[.$M19];[$休日.$B$4:.$B$304]);&quot;&quot;)" office:value-type="float" office:value="1" calcext:value-type="float">
            <text:p>1</text:p>
          </table:table-cell>
          <table:table-cell table:style-name="ce214" office:value-type="float" office:value="100" calcext:value-type="float">
            <text:p>100</text:p>
          </table:table-cell>
          <table:table-cell table:style-name="ce63" table:formula="of:=IF(OR(AND([.$N19]=&quot;&quot;;[.$L19]&lt;&gt;&quot;&quot;;[.$L19]&lt;=[.$U$1]);AND([.$M19]&lt;&gt;&quot;&quot;;[.Q19]&lt;100;[.$M19]&lt;=[.$U$1]));&quot;遅延&quot;;&quot;&quot;)">
            <text:p/>
          </table:table-cell>
          <table:table-cell table:style-name="ce66"/>
          <table:table-cell table:style-name="ce66" table:formula="of:=SUM([.$V19:.$FM1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]&lt;&gt;&quot;&quot;;[.$F21]=&quot;&quot;);&quot;E&quot;&amp;ROW();[.$B18])" office:value-type="string" office:string-value="E5" calcext:value-type="string">
            <text:p>E5</text:p>
          </table:table-cell>
          <table:table-cell table:style-name="ce13" table:formula="of:=IF(AND([.$D21]&lt;&gt;&quot;&quot;;[.$D21]&lt;&gt;&quot;○&quot;);MAX([.$C$3:.$C18])+1;[.$C18])" office:value-type="float" office:value="1" calcext:value-type="float">
            <text:p>1</text:p>
          </table:table-cell>
          <table:table-cell table:style-name="ce19"/>
          <table:table-cell table:style-name="ce27" table:formula="of:=IF(AND([.$F21]&lt;&gt;&quot;&quot;;[.$D18]&lt;&gt;&quot;&quot;);1;IF([.$F21]&lt;&gt;&quot;&quot;;MAX(INDIRECT([.$B21]):[.$E18])+1;&quot;&quot;))" office:value-type="float" office:value="4" calcext:value-type="float">
            <text:p>4</text:p>
          </table:table-cell>
          <table:table-cell table:style-name="ce32" office:value-type="string" calcext:value-type="string">
            <text:p>チーム内のルール決定</text:p>
          </table:table-cell>
          <table:table-cell table:style-name="ce32" table:formula="of:=IF([.$H21]=&quot;&quot;;&quot;&quot;;IF([.$G19]=&quot;&quot;;1;[.$G19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21]&lt;&gt;&quot;&quot;;NETWORKDAYS([.$L21];[.$M21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1]=&quot;&quot;;[.$L21]&lt;&gt;&quot;&quot;;[.$L21]&lt;=[.$U$1]);AND([.$M21]&lt;&gt;&quot;&quot;;[.Q21]&lt;100;[.$M21]&lt;=[.$U$1]));&quot;遅延&quot;;&quot;&quot;)">
            <text:p/>
          </table:table-cell>
          <table:table-cell table:style-name="ce66"/>
          <table:table-cell table:style-name="ce66" table:formula="of:=SUM([.$V21:.$FM2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]&lt;&gt;&quot;&quot;;[.$F22]=&quot;&quot;);&quot;E&quot;&amp;ROW();[.$B21])" office:value-type="string" office:string-value="E5" calcext:value-type="string">
            <text:p>E5</text:p>
          </table:table-cell>
          <table:table-cell table:style-name="ce13" table:formula="of:=IF(AND([.$D22]&lt;&gt;&quot;&quot;;[.$D22]&lt;&gt;&quot;○&quot;);MAX([.$C$3:.$C21])+1;[.$C21])" office:value-type="float" office:value="1" calcext:value-type="float">
            <text:p>1</text:p>
          </table:table-cell>
          <table:table-cell table:style-name="ce19"/>
          <table:table-cell table:style-name="ce27" table:formula="of:=IF(AND([.$F22]&lt;&gt;&quot;&quot;;[.$D21]&lt;&gt;&quot;&quot;);1;IF([.$F22]&lt;&gt;&quot;&quot;;MAX(INDIRECT([.$B22]):[.$E21])+1;&quot;&quot;))">
            <text:p/>
          </table:table-cell>
          <table:table-cell table:style-name="ce32"/>
          <table:table-cell table:style-name="ce32" table:formula="of:=IF([.$H22]=&quot;&quot;;&quot;&quot;;IF([.$G21]=&quot;&quot;;1;[.$G21]+1))" office:value-type="float" office:value="1" calcext:value-type="float">
            <text:p>1</text:p>
          </table:table-cell>
          <table:table-cell table:style-name="ce32" office:value-type="string" calcext:value-type="string">
            <text:p>打ち合わせ時間と目的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22]&lt;&gt;&quot;&quot;;NETWORKDAYS([.$L22];[.$M22];[$休日.$B$4:.$B$304]);&quot;&quot;)" office:value-type="float" office:value="1" calcext:value-type="float">
            <text:p>1</text:p>
          </table:table-cell>
          <table:table-cell table:style-name="ce217" office:value-type="float" office:value="100" calcext:value-type="float">
            <text:p>100</text:p>
          </table:table-cell>
          <table:table-cell table:style-name="ce63" table:formula="of:=IF(OR(AND([.$N22]=&quot;&quot;;[.$L22]&lt;&gt;&quot;&quot;;[.$L22]&lt;=[.$U$1]);AND([.$M22]&lt;&gt;&quot;&quot;;[.Q22]&lt;100;[.$M22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]&lt;&gt;&quot;&quot;;[.$F23]=&quot;&quot;);&quot;E&quot;&amp;ROW();[.$B22])" office:value-type="string" office:string-value="E5" calcext:value-type="string">
            <text:p>E5</text:p>
          </table:table-cell>
          <table:table-cell table:style-name="ce13" table:formula="of:=IF(AND([.$D23]&lt;&gt;&quot;&quot;;[.$D23]&lt;&gt;&quot;○&quot;);MAX([.$C$3:.$C22])+1;[.$C22])" office:value-type="float" office:value="1" calcext:value-type="float">
            <text:p>1</text:p>
          </table:table-cell>
          <table:table-cell table:style-name="ce19"/>
          <table:table-cell table:style-name="ce27" table:formula="of:=IF(AND([.$F23]&lt;&gt;&quot;&quot;;[.$D22]&lt;&gt;&quot;&quot;);1;IF([.$F23]&lt;&gt;&quot;&quot;;MAX(INDIRECT([.$B23]):[.$E22])+1;&quot;&quot;))">
            <text:p/>
          </table:table-cell>
          <table:table-cell table:style-name="ce32"/>
          <table:table-cell table:style-name="ce32" table:formula="of:=IF([.$H23]=&quot;&quot;;&quot;&quot;;IF([.$G22]=&quot;&quot;;1;[.$G22]+1))" office:value-type="float" office:value="2" calcext:value-type="float">
            <text:p>2</text:p>
          </table:table-cell>
          <table:table-cell table:style-name="ce32" office:value-type="string" calcext:value-type="string">
            <text:p>gitの利用方法、データ共有の方法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23]&lt;&gt;&quot;&quot;;NETWORKDAYS([.$L23];[.$M23];[$休日.$B$4:.$B$304]);&quot;&quot;)" office:value-type="float" office:value="1" calcext:value-type="float">
            <text:p>1</text:p>
          </table:table-cell>
          <table:table-cell table:style-name="ce217" office:value-type="float" office:value="100" calcext:value-type="float">
            <text:p>100</text:p>
          </table:table-cell>
          <table:table-cell table:style-name="ce63" table:formula="of:=IF(OR(AND([.$N23]=&quot;&quot;;[.$L23]&lt;&gt;&quot;&quot;;[.$L23]&lt;=[.$U$1]);AND([.$M23]&lt;&gt;&quot;&quot;;[.Q23]&lt;100;[.$M23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4]&lt;&gt;&quot;&quot;;[.$F24]=&quot;&quot;);&quot;E&quot;&amp;ROW();[.$B23])" office:value-type="string" office:string-value="E5" calcext:value-type="string">
            <text:p>E5</text:p>
          </table:table-cell>
          <table:table-cell table:style-name="ce13" table:formula="of:=IF(AND([.$D24]&lt;&gt;&quot;&quot;;[.$D24]&lt;&gt;&quot;○&quot;);MAX([.$C$3:.$C23])+1;[.$C23])" office:value-type="float" office:value="1" calcext:value-type="float">
            <text:p>1</text:p>
          </table:table-cell>
          <table:table-cell table:style-name="ce19"/>
          <table:table-cell table:style-name="ce27" table:formula="of:=IF(AND([.$F24]&lt;&gt;&quot;&quot;;[.$D23]&lt;&gt;&quot;&quot;);1;IF([.$F24]&lt;&gt;&quot;&quot;;MAX(INDIRECT([.$B24]):[.$E23])+1;&quot;&quot;))">
            <text:p/>
          </table:table-cell>
          <table:table-cell table:style-name="ce32"/>
          <table:table-cell table:style-name="ce32" table:formula="of:=IF([.$H24]=&quot;&quot;;&quot;&quot;;IF([.$G23]=&quot;&quot;;1;[.$G23]+1))" office:value-type="float" office:value="3" calcext:value-type="float">
            <text:p>3</text:p>
          </table:table-cell>
          <table:table-cell table:style-name="ce32" office:value-type="string" calcext:value-type="string">
            <text:p>課題管理表の扱い方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24]&lt;&gt;&quot;&quot;;NETWORKDAYS([.$L24];[.$M24];[$休日.$B$4:.$B$304]);&quot;&quot;)" office:value-type="float" office:value="1" calcext:value-type="float">
            <text:p>1</text:p>
          </table:table-cell>
          <table:table-cell table:style-name="ce217" office:value-type="float" office:value="100" calcext:value-type="float">
            <text:p>100</text:p>
          </table:table-cell>
          <table:table-cell table:style-name="ce63" table:formula="of:=IF(OR(AND([.$N24]=&quot;&quot;;[.$L24]&lt;&gt;&quot;&quot;;[.$L24]&lt;=[.$U$1]);AND([.$M24]&lt;&gt;&quot;&quot;;[.Q24]&lt;100;[.$M24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5]&lt;&gt;&quot;&quot;;[.$F25]=&quot;&quot;);&quot;E&quot;&amp;ROW();[.$B24])" office:value-type="string" office:string-value="E5" calcext:value-type="string">
            <text:p>E5</text:p>
          </table:table-cell>
          <table:table-cell table:style-name="ce13" table:formula="of:=IF(AND([.$D25]&lt;&gt;&quot;&quot;;[.$D25]&lt;&gt;&quot;○&quot;);MAX([.$C$3:.$C24])+1;[.$C24])" office:value-type="float" office:value="1" calcext:value-type="float">
            <text:p>1</text:p>
          </table:table-cell>
          <table:table-cell table:style-name="ce19"/>
          <table:table-cell table:style-name="ce27" table:formula="of:=IF(AND([.$F25]&lt;&gt;&quot;&quot;;[.$D24]&lt;&gt;&quot;&quot;);1;IF([.$F25]&lt;&gt;&quot;&quot;;MAX(INDIRECT([.$B25]):[.$E24])+1;&quot;&quot;))">
            <text:p/>
          </table:table-cell>
          <table:table-cell table:style-name="ce32"/>
          <table:table-cell table:style-name="ce32" table:formula="of:=IF([.$H25]=&quot;&quot;;&quot;&quot;;IF([.$G24]=&quot;&quot;;1;[.$G24]+1))" office:value-type="float" office:value="4" calcext:value-type="float">
            <text:p>4</text:p>
          </table:table-cell>
          <table:table-cell table:style-name="ce32" office:value-type="string" calcext:value-type="string">
            <text:p>作業の進め方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25]&lt;&gt;&quot;&quot;;NETWORKDAYS([.$L25];[.$M25];[$休日.$B$4:.$B$304]);&quot;&quot;)" office:value-type="float" office:value="1" calcext:value-type="float">
            <text:p>1</text:p>
          </table:table-cell>
          <table:table-cell table:style-name="ce50" office:value-type="float" office:value="100" calcext:value-type="float">
            <text:p>100</text:p>
          </table:table-cell>
          <table:table-cell table:style-name="ce63" table:formula="of:=IF(OR(AND([.$N25]=&quot;&quot;;[.$L25]&lt;&gt;&quot;&quot;;[.$L25]&lt;=[.$U$1]);AND([.$M25]&lt;&gt;&quot;&quot;;[.Q25]&lt;100;[.$M25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46"/>
          <table:table-cell table:style-name="ce50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27]&lt;&gt;&quot;&quot;;[.$F27]=&quot;&quot;);&quot;E&quot;&amp;ROW();[.$B25])" office:value-type="string" office:string-value="E27" calcext:value-type="string">
            <text:p>E27</text:p>
          </table:table-cell>
          <table:table-cell table:style-name="ce13" table:formula="of:=IF(AND([.$D27]&lt;&gt;&quot;&quot;;[.$D27]&lt;&gt;&quot;○&quot;);MAX([.$C$3:.$C25])+1;[.$C25])" office:value-type="float" office:value="2" calcext:value-type="float">
            <text:p>2</text:p>
          </table:table-cell>
          <table:table-cell table:style-name="ce19" office:value-type="string" calcext:value-type="string">
            <text:p>作業計画</text:p>
          </table:table-cell>
          <table:table-cell table:style-name="ce27" table:formula="of:=IF(AND([.$F27]&lt;&gt;&quot;&quot;;[.$D73]&lt;&gt;&quot;&quot;);1;IF([.$F27]&lt;&gt;&quot;&quot;;MAX(INDIRECT([.$B27]):[.$E73])+1;&quot;&quot;))">
            <text:p/>
          </table:table-cell>
          <table:table-cell table:style-name="ce32"/>
          <table:table-cell table:style-name="ce32" table:formula="of:=IF([.$H27]=&quot;&quot;;&quot;&quot;;IF([.$G73]=&quot;&quot;;1;[.$G73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number-columns-repeated="2" table:style-name="ce38" office:value-type="date" office:date-value="2026-06-03" calcext:value-type="date">
            <text:p>2026/06/03</text:p>
          </table:table-cell>
          <table:table-cell table:style-name="ce32" table:formula="of:=IF([.$L27]&lt;&gt;&quot;&quot;;NETWORKDAYS([.$L27];[.$M27];[$休日.$B$4:.$B$304]);&quot;&quot;)" office:value-type="float" office:value="2" calcext:value-type="float">
            <text:p>2</text:p>
          </table:table-cell>
          <table:table-cell table:style-name="ce217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8]&lt;&gt;&quot;&quot;;[.$F28]=&quot;&quot;);&quot;E&quot;&amp;ROW();[.$B27])" office:value-type="string" office:string-value="E27" calcext:value-type="string">
            <text:p>E27</text:p>
          </table:table-cell>
          <table:table-cell table:style-name="ce13" table:formula="of:=IF(AND([.$D28]&lt;&gt;&quot;&quot;;[.$D28]&lt;&gt;&quot;○&quot;);MAX([.$C$3:.$C27])+1;[.$C27])" office:value-type="float" office:value="2" calcext:value-type="float">
            <text:p>2</text:p>
          </table:table-cell>
          <table:table-cell table:style-name="ce19"/>
          <table:table-cell table:style-name="ce27" table:formula="of:=IF(AND([.$F28]&lt;&gt;&quot;&quot;;[.$D27]&lt;&gt;&quot;&quot;);1;IF([.$F28]&lt;&gt;&quot;&quot;;MAX(INDIRECT([.$B28]):[.$E27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作業項目の抽出</text:p>
          </table:table-cell>
          <table:table-cell table:style-name="ce32" table:formula="of:=IF([.$H28]=&quot;&quot;;&quot;&quot;;IF([.$G27]=&quot;&quot;;1;[.$G27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28]&lt;&gt;&quot;&quot;;NETWORKDAYS([.$L28];[.$M28];[$休日.$B$4:.$B$304]);&quot;&quot;)" office:value-type="float" office:value="1" calcext:value-type="float">
            <text:p>1</text:p>
          </table:table-cell>
          <table:table-cell table:style-name="ce220" office:value-type="float" office:value="100" calcext:value-type="float">
            <text:p>100</text:p>
          </table:table-cell>
          <table:table-cell table:style-name="ce63" table:formula="of:=IF(OR(AND([.$N28]=&quot;&quot;;[.$L28]&lt;&gt;&quot;&quot;;[.$L28]&lt;=[.$U$1]);AND([.$M28]&lt;&gt;&quot;&quot;;[.Q28]&lt;100;[.$M28]&lt;=[.$U$1]));&quot;遅延&quot;;&quot;&quot;)">
            <text:p/>
          </table:table-cell>
          <table:table-cell table:style-name="ce66"/>
          <table:table-cell table:style-name="ce66" table:formula="of:=SUM([.$V28:.$FM28])" office:value-type="float" office:value="0" calcext:value-type="float">
            <text:p>0</text:p>
          </table:table-cell>
          <table:table-cell table:style-name="ce72"/>
          <table:table-cell table:style-name="ce82"/>
          <table:table-cell table:style-name="ce96"/>
          <table:table-cell table:style-name="ce9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9]&lt;&gt;&quot;&quot;;[.$F29]=&quot;&quot;);&quot;E&quot;&amp;ROW();[.$B28])" office:value-type="string" office:string-value="E27" calcext:value-type="string">
            <text:p>E27</text:p>
          </table:table-cell>
          <table:table-cell table:style-name="ce13" table:formula="of:=IF(AND([.$D29]&lt;&gt;&quot;&quot;;[.$D29]&lt;&gt;&quot;○&quot;);MAX([.$C$3:.$C28])+1;[.$C28])" office:value-type="float" office:value="2" calcext:value-type="float">
            <text:p>2</text:p>
          </table:table-cell>
          <table:table-cell table:style-name="ce19"/>
          <table:table-cell table:style-name="ce27" table:formula="of:=IF(AND([.$F29]&lt;&gt;&quot;&quot;;[.$D28]&lt;&gt;&quot;&quot;);1;IF([.$F29]&lt;&gt;&quot;&quot;;MAX(INDIRECT([.$B29]):[.$E28])+1;&quot;&quot;))">
            <text:p/>
          </table:table-cell>
          <table:table-cell table:style-name="ce32"/>
          <table:table-cell table:style-name="ce32" table:formula="of:=IF([.$H29]=&quot;&quot;;&quot;&quot;;IF([.$G28]=&quot;&quot;;1;[.$G28]+1))" office:value-type="float" office:value="1" calcext:value-type="float">
            <text:p>1</text:p>
          </table:table-cell>
          <table:table-cell table:style-name="ce32" office:value-type="string" calcext:value-type="string">
            <text:p>成果物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29]&lt;&gt;&quot;&quot;;NETWORKDAYS([.$L29];[.$M29];[$休日.$B$4:.$B$304]);&quot;&quot;)" office:value-type="float" office:value="1" calcext:value-type="float">
            <text:p>1</text:p>
          </table:table-cell>
          <table:table-cell table:style-name="ce220" office:value-type="float" office:value="100" calcext:value-type="float">
            <text:p>100</text:p>
          </table:table-cell>
          <table:table-cell table:style-name="ce63" table:formula="of:=IF(OR(AND([.$N29]=&quot;&quot;;[.$L29]&lt;&gt;&quot;&quot;;[.$L29]&lt;=[.$U$1]);AND([.$M29]&lt;&gt;&quot;&quot;;[.Q29]&lt;100;[.$M29]&lt;=[.$U$1]));&quot;遅延&quot;;&quot;&quot;)">
            <text:p/>
          </table:table-cell>
          <table:table-cell table:style-name="ce66"/>
          <table:table-cell table:style-name="ce66" table:formula="of:=SUM([.$V29:.$FM29])" office:value-type="float" office:value="0" calcext:value-type="float">
            <text:p>0</text:p>
          </table:table-cell>
          <table:table-cell table:style-name="ce72"/>
          <table:table-cell table:style-name="ce82"/>
          <table:table-cell table:style-name="ce96"/>
          <table:table-cell table:style-name="ce9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30]&lt;&gt;&quot;&quot;;[.$F30]=&quot;&quot;);&quot;E&quot;&amp;ROW();[.$B29])" office:value-type="string" office:string-value="E27" calcext:value-type="string">
            <text:p>E27</text:p>
          </table:table-cell>
          <table:table-cell table:style-name="ce13" table:formula="of:=IF(AND([.$D30]&lt;&gt;&quot;&quot;;[.$D30]&lt;&gt;&quot;○&quot;);MAX([.$C$3:.$C29])+1;[.$C29])" office:value-type="float" office:value="2" calcext:value-type="float">
            <text:p>2</text:p>
          </table:table-cell>
          <table:table-cell table:style-name="ce19"/>
          <table:table-cell table:style-name="ce27" table:formula="of:=IF(AND([.$F30]&lt;&gt;&quot;&quot;;[.$D29]&lt;&gt;&quot;&quot;);1;IF([.$F30]&lt;&gt;&quot;&quot;;MAX(INDIRECT([.$B30]):[.$E29])+1;&quot;&quot;))">
            <text:p/>
          </table:table-cell>
          <table:table-cell table:style-name="ce32"/>
          <table:table-cell table:style-name="ce32" table:formula="of:=IF([.$H30]=&quot;&quot;;&quot;&quot;;IF([.$G29]=&quot;&quot;;1;[.$G29]+1))" office:value-type="float" office:value="2" calcext:value-type="float">
            <text:p>2</text:p>
          </table:table-cell>
          <table:table-cell table:style-name="ce32" office:value-type="string" calcext:value-type="string">
            <text:p>作業項目の抽出方法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30]&lt;&gt;&quot;&quot;;NETWORKDAYS([.$L30];[.$M30];[$休日.$B$4:.$B$304]);&quot;&quot;)" office:value-type="float" office:value="1" calcext:value-type="float">
            <text:p>1</text:p>
          </table:table-cell>
          <table:table-cell table:style-name="ce220" office:value-type="float" office:value="100" calcext:value-type="float">
            <text:p>100</text:p>
          </table:table-cell>
          <table:table-cell table:style-name="ce63" table:formula="of:=IF(OR(AND([.$N30]=&quot;&quot;;[.$L30]&lt;&gt;&quot;&quot;;[.$L30]&lt;=[.$U$1]);AND([.$M30]&lt;&gt;&quot;&quot;;[.Q30]&lt;100;[.$M30]&lt;=[.$U$1]));&quot;遅延&quot;;&quot;&quot;)">
            <text:p/>
          </table:table-cell>
          <table:table-cell table:style-name="ce66"/>
          <table:table-cell table:style-name="ce66" table:formula="of:=SUM([.$V30:.$FM3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1]&lt;&gt;&quot;&quot;;[.$F31]=&quot;&quot;);&quot;E&quot;&amp;ROW();[.$B30])" office:value-type="string" office:string-value="E27" calcext:value-type="string">
            <text:p>E27</text:p>
          </table:table-cell>
          <table:table-cell table:style-name="ce13" table:formula="of:=IF(AND([.$D31]&lt;&gt;&quot;&quot;;[.$D31]&lt;&gt;&quot;○&quot;);MAX([.$C$3:.$C30])+1;[.$C30])" office:value-type="float" office:value="2" calcext:value-type="float">
            <text:p>2</text:p>
          </table:table-cell>
          <table:table-cell table:style-name="ce20"/>
          <table:table-cell table:style-name="ce28" table:formula="of:=IF(AND([.$F31]&lt;&gt;&quot;&quot;;[.$D30]&lt;&gt;&quot;&quot;);1;IF([.$F31]&lt;&gt;&quot;&quot;;MAX(INDIRECT([.$B31]):[.$E30])+1;&quot;&quot;))">
            <text:p/>
          </table:table-cell>
          <table:table-cell table:style-name="ce20"/>
          <table:table-cell table:style-name="ce28" table:formula="of:=IF([.$H31]=&quot;&quot;;&quot;&quot;;IF([.$G30]=&quot;&quot;;1;[.$G30]+1))" office:value-type="float" office:value="3" calcext:value-type="float">
            <text:p>3</text:p>
          </table:table-cell>
          <table:table-cell table:style-name="ce20" office:value-type="string" calcext:value-type="string">
            <text:p>作業項目の抽出</text:p>
          </table:table-cell>
          <table:table-cell table:style-name="ce20"/>
          <table:table-cell table:style-name="ce32" office:value-type="string" calcext:value-type="string">
            <text:p>全員</text:p>
          </table:table-cell>
          <table:table-cell table:style-name="ce18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18" table:formula="of:=IF([.$L31]&lt;&gt;&quot;&quot;;NETWORKDAYS([.$L31];[.$M31];[$休日.$B$4:.$B$304]);&quot;&quot;)" office:value-type="float" office:value="1" calcext:value-type="float">
            <text:p>1</text:p>
          </table:table-cell>
          <table:table-cell table:style-name="ce220" office:value-type="float" office:value="100" calcext:value-type="float">
            <text:p>100</text:p>
          </table:table-cell>
          <table:table-cell table:style-name="ce18" table:formula="of:=IF(OR(AND([.$N31]=&quot;&quot;;[.$L31]&lt;&gt;&quot;&quot;;[.$L31]&lt;=[.$U$1]);AND([.$M31]&lt;&gt;&quot;&quot;;[.Q31]&lt;100;[.$M31]&lt;=[.$U$1]));&quot;遅延&quot;;&quot;&quot;)">
            <text:p/>
          </table:table-cell>
          <table:table-cell table:style-name="ce18"/>
          <table:table-cell table:style-name="ce18" table:formula="of:=SUM([.$V31:.$FM31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20"/>
          <table:table-cell table:style-name="ce28"/>
          <table:table-cell table:style-name="ce20"/>
          <table:table-cell table:style-name="ce28"/>
          <table:table-cell table:style-name="ce20" table:number-columns-repeated="3"/>
          <table:table-cell table:style-name="ce18"/>
          <table:table-cell table:style-name="ce38" table:number-columns-repeated="4"/>
          <table:table-cell table:style-name="ce18"/>
          <table:table-cell table:style-name="ce210"/>
          <table:table-cell table:style-name="ce18" table:number-columns-repeated="3"/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]&lt;&gt;&quot;&quot;;[.$F33]=&quot;&quot;);&quot;E&quot;&amp;ROW();[.$B31])" office:value-type="string" office:string-value="E27" calcext:value-type="string">
            <text:p>E27</text:p>
          </table:table-cell>
          <table:table-cell table:style-name="ce13" table:formula="of:=IF(AND([.$D33]&lt;&gt;&quot;&quot;;[.$D33]&lt;&gt;&quot;○&quot;);MAX([.$C$3:.$C31])+1;[.$C31])" office:value-type="float" office:value="2" calcext:value-type="float">
            <text:p>2</text:p>
          </table:table-cell>
          <table:table-cell table:style-name="ce19"/>
          <table:table-cell table:style-name="ce27" table:formula="of:=IF(AND([.$F33]&lt;&gt;&quot;&quot;;[.$D31]&lt;&gt;&quot;&quot;);1;IF([.$F33]&lt;&gt;&quot;&quot;;MAX(INDIRECT([.$B33]):[.$E31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作業工程表の作成</text:p>
          </table:table-cell>
          <table:table-cell table:style-name="ce32" table:formula="of:=IF([.$H33]=&quot;&quot;;&quot;&quot;;IF([.$G31]=&quot;&quot;;1;[.$G31]+1))">
            <text:p/>
          </table:table-cell>
          <table:table-cell table:style-name="ce32" table:number-columns-repeated="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33]&lt;&gt;&quot;&quot;;NETWORKDAYS([.$L33];[.$M33];[$休日.$B$4:.$B$304]);&quot;&quot;)" office:value-type="float" office:value="1" calcext:value-type="float">
            <text:p>1</text:p>
          </table:table-cell>
          <table:table-cell table:style-name="ce219" office:value-type="float" office:value="100" calcext:value-type="float">
            <text:p>100</text:p>
          </table:table-cell>
          <table:table-cell table:style-name="ce63" table:formula="of:=IF(OR(AND([.$N33]=&quot;&quot;;[.$L33]&lt;&gt;&quot;&quot;;[.$L33]&lt;=[.$U$1]);AND([.$M33]&lt;&gt;&quot;&quot;;[.Q33]&lt;100;[.$M33]&lt;=[.$U$1]));&quot;遅延&quot;;&quot;&quot;)">
            <text:p/>
          </table:table-cell>
          <table:table-cell table:style-name="ce66"/>
          <table:table-cell table:style-name="ce66" table:formula="of:=SUM([.$V33:.$FM3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4]&lt;&gt;&quot;&quot;;[.$F34]=&quot;&quot;);&quot;E&quot;&amp;ROW();[.$B33])" office:value-type="string" office:string-value="E27" calcext:value-type="string">
            <text:p>E27</text:p>
          </table:table-cell>
          <table:table-cell table:style-name="ce13" table:formula="of:=IF(AND([.$D34]&lt;&gt;&quot;&quot;;[.$D34]&lt;&gt;&quot;○&quot;);MAX([.$C$3:.$C33])+1;[.$C33])" office:value-type="float" office:value="2" calcext:value-type="float">
            <text:p>2</text:p>
          </table:table-cell>
          <table:table-cell table:style-name="ce19"/>
          <table:table-cell table:style-name="ce27" table:formula="of:=IF(AND([.$F34]&lt;&gt;&quot;&quot;;[.$D33]&lt;&gt;&quot;&quot;);1;IF([.$F34]&lt;&gt;&quot;&quot;;MAX(INDIRECT([.$B34]):[.$E33])+1;&quot;&quot;))">
            <text:p/>
          </table:table-cell>
          <table:table-cell table:style-name="ce32"/>
          <table:table-cell table:style-name="ce32" table:formula="of:=IF([.$H34]=&quot;&quot;;&quot;&quot;;IF([.$G33]=&quot;&quot;;1;[.$G33]+1))" office:value-type="float" office:value="1" calcext:value-type="float">
            <text:p>1</text:p>
          </table:table-cell>
          <table:table-cell table:style-name="ce32" office:value-type="string" calcext:value-type="string">
            <text:p>作業工程表の作成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34]&lt;&gt;&quot;&quot;;NETWORKDAYS([.$L34];[.$M34];[$休日.$B$4:.$B$304]);&quot;&quot;)" office:value-type="float" office:value="1" calcext:value-type="float">
            <text:p>1</text:p>
          </table:table-cell>
          <table:table-cell table:style-name="ce219" office:value-type="float" office:value="100" calcext:value-type="float">
            <text:p>100</text:p>
          </table:table-cell>
          <table:table-cell table:style-name="ce63" table:formula="of:=IF(OR(AND([.$N34]=&quot;&quot;;[.$L34]&lt;&gt;&quot;&quot;;[.$L34]&lt;=[.$U$1]);AND([.$M34]&lt;&gt;&quot;&quot;;[.Q34]&lt;100;[.$M34]&lt;=[.$U$1]));&quot;遅延&quot;;&quot;&quot;)">
            <text:p/>
          </table:table-cell>
          <table:table-cell table:style-name="ce66"/>
          <table:table-cell table:style-name="ce66" table:formula="of:=SUM([.$V34:.$FM3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5]&lt;&gt;&quot;&quot;;[.$F35]=&quot;&quot;);&quot;E&quot;&amp;ROW();[.$B34])" office:value-type="string" office:string-value="E27" calcext:value-type="string">
            <text:p>E27</text:p>
          </table:table-cell>
          <table:table-cell table:style-name="ce13" table:formula="of:=IF(AND([.$D35]&lt;&gt;&quot;&quot;;[.$D35]&lt;&gt;&quot;○&quot;);MAX([.$C$3:.$C34])+1;[.$C34])" office:value-type="float" office:value="2" calcext:value-type="float">
            <text:p>2</text:p>
          </table:table-cell>
          <table:table-cell table:style-name="ce19"/>
          <table:table-cell table:style-name="ce27" table:formula="of:=IF(AND([.$F35]&lt;&gt;&quot;&quot;;[.$D34]&lt;&gt;&quot;&quot;);1;IF([.$F35]&lt;&gt;&quot;&quot;;MAX(INDIRECT([.$B35]):[.$E34])+1;&quot;&quot;))">
            <text:p/>
          </table:table-cell>
          <table:table-cell table:style-name="ce32"/>
          <table:table-cell table:style-name="ce32" table:formula="of:=IF([.$H35]=&quot;&quot;;&quot;&quot;;IF([.$G34]=&quot;&quot;;1;[.$G34]+1))" office:value-type="float" office:value="2" calcext:value-type="float">
            <text:p>2</text:p>
          </table:table-cell>
          <table:table-cell table:style-name="ce32" office:value-type="string" calcext:value-type="string">
            <text:p>作業工程表のレビュー</text:p>
          </table:table-cell>
          <table:table-cell table:style-name="ce32"/>
          <table:table-cell table:style-name="ce32" office:value-type="string" calcext:value-type="string">
            <text:p>発注元</text:p>
          </table:table-cell>
          <table:table-cell table:style-name="ce32"/>
          <table:table-cell table:number-columns-repeated="4" table:style-name="ce38" office:value-type="date" office:date-value="2026-06-04" calcext:value-type="date">
            <text:p>2026/06/04</text:p>
          </table:table-cell>
          <table:table-cell table:style-name="ce32" table:formula="of:=IF([.$L35]&lt;&gt;&quot;&quot;;NETWORKDAYS([.$L35];[.$M35];[$休日.$B$4:.$B$304]);&quot;&quot;)" office:value-type="float" office:value="1" calcext:value-type="float">
            <text:p>1</text:p>
          </table:table-cell>
          <table:table-cell table:style-name="ce219" office:value-type="float" office:value="100" calcext:value-type="float">
            <text:p>100</text:p>
          </table:table-cell>
          <table:table-cell table:style-name="ce63" table:formula="of:=IF(OR(AND([.$N35]=&quot;&quot;;[.$L35]&lt;&gt;&quot;&quot;;[.$L35]&lt;=[.$U$1]);AND([.$M35]&lt;&gt;&quot;&quot;;[.Q35]&lt;100;[.$M35]&lt;=[.$U$1]));&quot;遅延&quot;;&quot;&quot;)">
            <text:p/>
          </table:table-cell>
          <table:table-cell table:style-name="ce66"/>
          <table:table-cell table:style-name="ce66" table:formula="of:=SUM([.$V35:.$FM3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6]&lt;&gt;&quot;&quot;;[.$F36]=&quot;&quot;);&quot;E&quot;&amp;ROW();[.$B35])" office:value-type="string" office:string-value="E27" calcext:value-type="string">
            <text:p>E27</text:p>
          </table:table-cell>
          <table:table-cell table:style-name="ce13" table:formula="of:=IF(AND([.$D36]&lt;&gt;&quot;&quot;;[.$D36]&lt;&gt;&quot;○&quot;);MAX([.$C$3:.$C35])+1;[.$C35])" office:value-type="float" office:value="2" calcext:value-type="float">
            <text:p>2</text:p>
          </table:table-cell>
          <table:table-cell table:style-name="ce19"/>
          <table:table-cell table:style-name="ce27" table:formula="of:=IF(AND([.$F36]&lt;&gt;&quot;&quot;;[.$D35]&lt;&gt;&quot;&quot;);1;IF([.$F36]&lt;&gt;&quot;&quot;;MAX(INDIRECT([.$B36]):[.$E35])+1;&quot;&quot;))">
            <text:p/>
          </table:table-cell>
          <table:table-cell table:style-name="ce32"/>
          <table:table-cell table:style-name="ce32" table:formula="of:=IF([.$H36]=&quot;&quot;;&quot;&quot;;IF([.$G35]=&quot;&quot;;1;[.$G35]+1))" office:value-type="float" office:value="3" calcext:value-type="float">
            <text:p>3</text:p>
          </table:table-cell>
          <table:table-cell table:style-name="ce32" office:value-type="string" calcext:value-type="string">
            <text:p>チーム内での作業工程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4" calcext:value-type="date">
            <text:p>2026/06/04</text:p>
          </table:table-cell>
          <table:table-cell table:style-name="ce32" table:formula="of:=IF([.$L36]&lt;&gt;&quot;&quot;;NETWORKDAYS([.$L36];[.$M36];[$休日.$B$4:.$B$304]);&quot;&quot;)" office:value-type="float" office:value="1" calcext:value-type="float">
            <text:p>1</text:p>
          </table:table-cell>
          <table:table-cell table:style-name="ce219" office:value-type="float" office:value="100" calcext:value-type="float">
            <text:p>100</text:p>
          </table:table-cell>
          <table:table-cell table:style-name="ce63" table:formula="of:=IF(OR(AND([.$N36]=&quot;&quot;;[.$L36]&lt;&gt;&quot;&quot;;[.$L36]&lt;=[.$U$1]);AND([.$M36]&lt;&gt;&quot;&quot;;[.Q36]&lt;100;[.$M36]&lt;=[.$U$1]));&quot;遅延&quot;;&quot;&quot;)">
            <text:p/>
          </table:table-cell>
          <table:table-cell table:style-name="ce66"/>
          <table:table-cell table:style-name="ce66" table:formula="of:=SUM([.$V36:.$FM3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0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]&lt;&gt;&quot;&quot;;[.$F38]=&quot;&quot;);&quot;E&quot;&amp;ROW();[.$B36])" office:value-type="string" office:string-value="E27" calcext:value-type="string">
            <text:p>E27</text:p>
          </table:table-cell>
          <table:table-cell table:style-name="ce13" table:formula="of:=IF(AND([.$D38]&lt;&gt;&quot;&quot;;[.$D38]&lt;&gt;&quot;○&quot;);MAX([.$C$3:.$C36])+1;[.$C36])" office:value-type="float" office:value="2" calcext:value-type="float">
            <text:p>2</text:p>
          </table:table-cell>
          <table:table-cell table:style-name="ce19"/>
          <table:table-cell table:style-name="ce27" table:formula="of:=IF(AND([.$F38]&lt;&gt;&quot;&quot;;[.$D36]&lt;&gt;&quot;&quot;);1;IF([.$F38]&lt;&gt;&quot;&quot;;MAX(INDIRECT([.$B38]):[.$E36])+1;&quot;&quot;))" office:value-type="float" office:value="3" calcext:value-type="float">
            <text:p>3</text:p>
          </table:table-cell>
          <table:table-cell table:style-name="ce32" office:value-type="string" calcext:value-type="string">
            <text:p>作業分担の決定</text:p>
          </table:table-cell>
          <table:table-cell table:style-name="ce32" table:formula="of:=IF([.$H38]=&quot;&quot;;&quot;&quot;;IF([.$G36]=&quot;&quot;;1;[.$G36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38]&lt;&gt;&quot;&quot;;NETWORKDAYS([.$L38];[.$M38];[$休日.$B$4:.$B$304]);&quot;&quot;)" office:value-type="float" office:value="1" calcext:value-type="float">
            <text:p>1</text:p>
          </table:table-cell>
          <table:table-cell table:style-name="ce222" office:value-type="float" office:value="100" calcext:value-type="float">
            <text:p>100</text:p>
          </table:table-cell>
          <table:table-cell table:style-name="ce63" table:formula="of:=IF(OR(AND([.$N38]=&quot;&quot;;[.$L38]&lt;&gt;&quot;&quot;;[.$L38]&lt;=[.$U$1]);AND([.$M38]&lt;&gt;&quot;&quot;;[.Q38]&lt;100;[.$M38]&lt;=[.$U$1]));&quot;遅延&quot;;&quot;&quot;)">
            <text:p/>
          </table:table-cell>
          <table:table-cell table:style-name="ce66"/>
          <table:table-cell table:style-name="ce66" table:formula="of:=SUM([.$V38:.$FM3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9]&lt;&gt;&quot;&quot;;[.$F39]=&quot;&quot;);&quot;E&quot;&amp;ROW();[.$B38])" office:value-type="string" office:string-value="E27" calcext:value-type="string">
            <text:p>E27</text:p>
          </table:table-cell>
          <table:table-cell table:style-name="ce13" table:formula="of:=IF(AND([.$D39]&lt;&gt;&quot;&quot;;[.$D39]&lt;&gt;&quot;○&quot;);MAX([.$C$3:.$C38])+1;[.$C38])" office:value-type="float" office:value="2" calcext:value-type="float">
            <text:p>2</text:p>
          </table:table-cell>
          <table:table-cell table:style-name="ce19"/>
          <table:table-cell table:style-name="ce27" table:formula="of:=IF(AND([.$F39]&lt;&gt;&quot;&quot;;[.$D38]&lt;&gt;&quot;&quot;);1;IF([.$F39]&lt;&gt;&quot;&quot;;MAX(INDIRECT([.$B39]):[.$E38])+1;&quot;&quot;))">
            <text:p/>
          </table:table-cell>
          <table:table-cell table:style-name="ce32"/>
          <table:table-cell table:style-name="ce32" table:formula="of:=IF([.$H39]=&quot;&quot;;&quot;&quot;;IF([.$G38]=&quot;&quot;;1;[.$G38]+1))" office:value-type="float" office:value="1" calcext:value-type="float">
            <text:p>1</text:p>
          </table:table-cell>
          <table:table-cell table:style-name="ce32" office:value-type="string" calcext:value-type="string">
            <text:p>作業項目の担当者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39]&lt;&gt;&quot;&quot;;NETWORKDAYS([.$L39];[.$M39];[$休日.$B$4:.$B$304]);&quot;&quot;)" office:value-type="float" office:value="1" calcext:value-type="float">
            <text:p>1</text:p>
          </table:table-cell>
          <table:table-cell table:style-name="ce222" office:value-type="float" office:value="100" calcext:value-type="float">
            <text:p>100</text:p>
          </table:table-cell>
          <table:table-cell table:style-name="ce63" table:formula="of:=IF(OR(AND([.$N39]=&quot;&quot;;[.$L39]&lt;&gt;&quot;&quot;;[.$L39]&lt;=[.$U$1]);AND([.$M39]&lt;&gt;&quot;&quot;;[.Q39]&lt;100;[.$M39]&lt;=[.$U$1]));&quot;遅延&quot;;&quot;&quot;)">
            <text:p/>
          </table:table-cell>
          <table:table-cell table:style-name="ce66"/>
          <table:table-cell table:style-name="ce66" table:formula="of:=SUM([.$V39:.$FM3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0]&lt;&gt;&quot;&quot;;[.$F40]=&quot;&quot;);&quot;E&quot;&amp;ROW();[.$B39])" office:value-type="string" office:string-value="E27" calcext:value-type="string">
            <text:p>E27</text:p>
          </table:table-cell>
          <table:table-cell table:style-name="ce13" table:formula="of:=IF(AND([.$D40]&lt;&gt;&quot;&quot;;[.$D40]&lt;&gt;&quot;○&quot;);MAX([.$C$3:.$C39])+1;[.$C39])" office:value-type="float" office:value="2" calcext:value-type="float">
            <text:p>2</text:p>
          </table:table-cell>
          <table:table-cell table:style-name="ce19"/>
          <table:table-cell table:style-name="ce27" table:formula="of:=IF(AND([.$F40]&lt;&gt;&quot;&quot;;[.$D39]&lt;&gt;&quot;&quot;);1;IF([.$F40]&lt;&gt;&quot;&quot;;MAX(INDIRECT([.$B40]):[.$E39])+1;&quot;&quot;))">
            <text:p/>
          </table:table-cell>
          <table:table-cell table:style-name="ce32"/>
          <table:table-cell table:style-name="ce32" table:formula="of:=IF([.$H40]=&quot;&quot;;&quot;&quot;;IF([.$G39]=&quot;&quot;;1;[.$G3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40]&lt;&gt;&quot;&quot;;NETWORKDAYS([.$L40];[.$M40];[$休日.$B$4:.$B$304]);&quot;&quot;)">
            <text:p/>
          </table:table-cell>
          <table:table-cell table:style-name="ce216"/>
          <table:table-cell table:style-name="ce63" table:formula="of:=IF(OR(AND([.$N40]=&quot;&quot;;[.$L40]&lt;&gt;&quot;&quot;;[.$L40]&lt;=[.$U$1]);AND([.$M40]&lt;&gt;&quot;&quot;;[.Q40]&lt;100;[.$M40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1]&lt;&gt;&quot;&quot;;[.$F41]=&quot;&quot;);&quot;E&quot;&amp;ROW();[.$B40])" office:value-type="string" office:string-value="E27" calcext:value-type="string">
            <text:p>E27</text:p>
          </table:table-cell>
          <table:table-cell table:style-name="ce13" table:formula="of:=IF(AND([.$D41]&lt;&gt;&quot;&quot;;[.$D41]&lt;&gt;&quot;○&quot;);MAX([.$C$3:.$C40])+1;[.$C40])" office:value-type="float" office:value="2" calcext:value-type="float">
            <text:p>2</text:p>
          </table:table-cell>
          <table:table-cell table:style-name="ce19"/>
          <table:table-cell table:style-name="ce27" table:formula="of:=IF(AND([.$F41]&lt;&gt;&quot;&quot;;[.$D40]&lt;&gt;&quot;&quot;);1;IF([.$F41]&lt;&gt;&quot;&quot;;MAX(INDIRECT([.$B41]):[.$E40])+1;&quot;&quot;))">
            <text:p/>
          </table:table-cell>
          <table:table-cell table:style-name="ce32"/>
          <table:table-cell table:style-name="ce32" table:formula="of:=IF([.$H41]=&quot;&quot;;&quot;&quot;;IF([.$G40]=&quot;&quot;;1;[.$G4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41]&lt;&gt;&quot;&quot;;NETWORKDAYS([.$L41];[.$M41];[$休日.$B$4:.$B$304]);&quot;&quot;)">
            <text:p/>
          </table:table-cell>
          <table:table-cell table:style-name="ce216"/>
          <table:table-cell table:style-name="ce63" table:formula="of:=IF(OR(AND([.$N41]=&quot;&quot;;[.$L41]&lt;&gt;&quot;&quot;;[.$L41]&lt;=[.$U$1]);AND([.$M41]&lt;&gt;&quot;&quot;;[.Q41]&lt;100;[.$M41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2]&lt;&gt;&quot;&quot;;[.$F42]=&quot;&quot;);&quot;E&quot;&amp;ROW();[.$B41])" office:value-type="string" office:string-value="E42" calcext:value-type="string">
            <text:p>E42</text:p>
          </table:table-cell>
          <table:table-cell table:style-name="ce13" table:formula="of:=IF(AND([.$D42]&lt;&gt;&quot;&quot;;[.$D42]&lt;&gt;&quot;○&quot;);MAX([.$C$3:.$C41])+1;[.$C41])" office:value-type="float" office:value="3" calcext:value-type="float">
            <text:p>3</text:p>
          </table:table-cell>
          <table:table-cell table:style-name="ce19" office:value-type="string" calcext:value-type="string">
            <text:p>仕様書の理解とコンセプト検討</text:p>
          </table:table-cell>
          <table:table-cell table:style-name="ce27" table:formula="of:=IF(AND([.$F42]&lt;&gt;&quot;&quot;;[.$D25]&lt;&gt;&quot;&quot;);1;IF([.$F42]&lt;&gt;&quot;&quot;;MAX(INDIRECT([.$B42]):[.$E25])+1;&quot;&quot;))">
            <text:p/>
          </table:table-cell>
          <table:table-cell table:style-name="ce32"/>
          <table:table-cell table:style-name="ce32" table:formula="of:=IF([.$H42]=&quot;&quot;;&quot;&quot;;IF([.$G25]=&quot;&quot;;1;[.$G25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5" calcext:value-type="date">
            <text:p>2026/06/05</text:p>
          </table:table-cell>
          <table:table-cell table:style-name="ce46" table:formula="of:=IF([.$L42]&lt;&gt;&quot;&quot;;NETWORKDAYS([.$L42];[.$M42];[$休日.$B$4:.$B$304]);&quot;&quot;)" office:value-type="float" office:value="4" calcext:value-type="float">
            <text:p>4</text:p>
          </table:table-cell>
          <table:table-cell table:style-name="ce223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3]&lt;&gt;&quot;&quot;;[.$F43]=&quot;&quot;);&quot;E&quot;&amp;ROW();[.$B42])" office:value-type="string" office:string-value="E42" calcext:value-type="string">
            <text:p>E42</text:p>
          </table:table-cell>
          <table:table-cell table:style-name="ce13" table:formula="of:=IF(AND([.$D43]&lt;&gt;&quot;&quot;;[.$D43]&lt;&gt;&quot;○&quot;);MAX([.$C$3:.$C42])+1;[.$C42])" office:value-type="float" office:value="3" calcext:value-type="float">
            <text:p>3</text:p>
          </table:table-cell>
          <table:table-cell table:style-name="ce19"/>
          <table:table-cell table:style-name="ce27" table:formula="of:=IF(AND([.$F43]&lt;&gt;&quot;&quot;;[.$D42]&lt;&gt;&quot;&quot;);1;IF([.$F43]&lt;&gt;&quot;&quot;;MAX(INDIRECT([.$B43]):[.$E42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仕様書の読み込み</text:p>
          </table:table-cell>
          <table:table-cell table:style-name="ce32" table:formula="of:=IF([.$H43]=&quot;&quot;;&quot;&quot;;IF([.$G42]=&quot;&quot;;1;[.$G42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43]&lt;&gt;&quot;&quot;;NETWORKDAYS([.$L43];[.$M43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43]=&quot;&quot;;[.$L43]&lt;&gt;&quot;&quot;;[.$L43]&lt;=[.$U$1]);AND([.$M43]&lt;&gt;&quot;&quot;;[.Q43]&lt;100;[.$M43]&lt;=[.$U$1]));&quot;遅延&quot;;&quot;&quot;)">
            <text:p/>
          </table:table-cell>
          <table:table-cell table:style-name="ce66"/>
          <table:table-cell table:style-name="ce66" table:formula="of:=SUM([.$V43:.$FM43])" office:value-type="float" office:value="24" calcext:value-type="float">
            <text:p>24</text:p>
          </table:table-cell>
          <table:table-cell table:style-name="ce72"/>
          <table:table-cell table:style-name="ce81" office:value-type="float" office:value="8" calcext:value-type="float">
            <text:p>8</text:p>
          </table:table-cell>
          <table:table-cell table:style-name="ce95" office:value-type="float" office:value="8" calcext:value-type="float">
            <text:p>8</text:p>
          </table:table-cell>
          <table:table-cell table:style-name="ce95"/>
          <table:table-cell table:style-name="ce107"/>
          <table:table-cell table:style-name="ce107" office:value-type="float" office:value="8" calcext:value-type="float">
            <text:p>8</text:p>
          </table:table-cell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4]&lt;&gt;&quot;&quot;;[.$F44]=&quot;&quot;);&quot;E&quot;&amp;ROW();[.$B43])" office:value-type="string" office:string-value="E42" calcext:value-type="string">
            <text:p>E42</text:p>
          </table:table-cell>
          <table:table-cell table:style-name="ce13" table:formula="of:=IF(AND([.$D44]&lt;&gt;&quot;&quot;;[.$D44]&lt;&gt;&quot;○&quot;);MAX([.$C$3:.$C43])+1;[.$C43])" office:value-type="float" office:value="3" calcext:value-type="float">
            <text:p>3</text:p>
          </table:table-cell>
          <table:table-cell table:style-name="ce19"/>
          <table:table-cell table:style-name="ce27" table:formula="of:=IF(AND([.$F44]&lt;&gt;&quot;&quot;;[.$D43]&lt;&gt;&quot;&quot;);1;IF([.$F44]&lt;&gt;&quot;&quot;;MAX(INDIRECT([.$B44]):[.$E43])+1;&quot;&quot;))">
            <text:p/>
          </table:table-cell>
          <table:table-cell table:style-name="ce32"/>
          <table:table-cell table:style-name="ce32" table:formula="of:=IF([.$H44]=&quot;&quot;;&quot;&quot;;IF([.$G43]=&quot;&quot;;1;[.$G43]+1))" office:value-type="float" office:value="1" calcext:value-type="float">
            <text:p>1</text:p>
          </table:table-cell>
          <table:table-cell table:style-name="ce32" office:value-type="string" calcext:value-type="string">
            <text:p>プロジェクト説明資料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4]&lt;&gt;&quot;&quot;;NETWORKDAYS([.$L44];[.$M44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44]=&quot;&quot;;[.$L44]&lt;&gt;&quot;&quot;;[.$L44]&lt;=[.$U$1]);AND([.$M44]&lt;&gt;&quot;&quot;;[.Q44]&lt;100;[.$M44]&lt;=[.$U$1]));&quot;遅延&quot;;&quot;&quot;)">
            <text:p/>
          </table:table-cell>
          <table:table-cell table:style-name="ce66"/>
          <table:table-cell table:style-name="ce66" table:formula="of:=SUM([.$V44:.$FM4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5]&lt;&gt;&quot;&quot;;[.$F45]=&quot;&quot;);&quot;E&quot;&amp;ROW();[.$B43])" office:value-type="string" office:string-value="E42" calcext:value-type="string">
            <text:p>E42</text:p>
          </table:table-cell>
          <table:table-cell table:style-name="ce13" table:formula="of:=IF(AND([.$D45]&lt;&gt;&quot;&quot;;[.$D45]&lt;&gt;&quot;○&quot;);MAX([.$C$3:.$C44])+1;[.$C44])" office:value-type="float" office:value="3" calcext:value-type="float">
            <text:p>3</text:p>
          </table:table-cell>
          <table:table-cell table:style-name="ce19"/>
          <table:table-cell table:style-name="ce27" table:formula="of:=IF(AND([.$F45]&lt;&gt;&quot;&quot;;[.$D44]&lt;&gt;&quot;&quot;);1;IF([.$F45]&lt;&gt;&quot;&quot;;MAX(INDIRECT([.$B45]):[.$E44])+1;&quot;&quot;))">
            <text:p/>
          </table:table-cell>
          <table:table-cell table:style-name="ce32"/>
          <table:table-cell table:style-name="ce32" table:formula="of:=IF([.$H45]=&quot;&quot;;&quot;&quot;;IF([.$G44]=&quot;&quot;;1;[.$G44]+1))" office:value-type="float" office:value="2" calcext:value-type="float">
            <text:p>2</text:p>
          </table:table-cell>
          <table:table-cell table:style-name="ce32" office:value-type="string" calcext:value-type="string">
            <text:p>顧客要望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5]&lt;&gt;&quot;&quot;;NETWORKDAYS([.$L45];[.$M45];[$休日.$B$4:.$B$304]);&quot;&quot;)" office:value-type="float" office:value="1" calcext:value-type="float">
            <text:p>1</text:p>
          </table:table-cell>
          <table:table-cell table:style-name="ce227" office:value-type="float" office:value="100" calcext:value-type="float">
            <text:p>100</text:p>
          </table:table-cell>
          <table:table-cell table:style-name="ce63" table:formula="of:=IF(OR(AND([.$N45]=&quot;&quot;;[.$L45]&lt;&gt;&quot;&quot;;[.$L45]&lt;=[.$U$1]);AND([.$M45]&lt;&gt;&quot;&quot;;[.Q45]&lt;100;[.$M45]&lt;=[.$U$1]));&quot;遅延&quot;;&quot;&quot;)">
            <text:p/>
          </table:table-cell>
          <table:table-cell table:style-name="ce66"/>
          <table:table-cell table:style-name="ce66" table:formula="of:=SUM([.$V45:.$FM4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6]&lt;&gt;&quot;&quot;;[.$F46]=&quot;&quot;);&quot;E&quot;&amp;ROW();[.$B45])" office:value-type="string" office:string-value="E42" calcext:value-type="string">
            <text:p>E42</text:p>
          </table:table-cell>
          <table:table-cell table:style-name="ce13" table:formula="of:=IF(AND([.$D46]&lt;&gt;&quot;&quot;;[.$D46]&lt;&gt;&quot;○&quot;);MAX([.$C$3:.$C45])+1;[.$C45])" office:value-type="float" office:value="3" calcext:value-type="float">
            <text:p>3</text:p>
          </table:table-cell>
          <table:table-cell table:style-name="ce19"/>
          <table:table-cell table:style-name="ce27" table:formula="of:=IF(AND([.$F46]&lt;&gt;&quot;&quot;;[.$D45]&lt;&gt;&quot;&quot;);1;IF([.$F46]&lt;&gt;&quot;&quot;;MAX(INDIRECT([.$B46]):[.$E45])+1;&quot;&quot;))">
            <text:p/>
          </table:table-cell>
          <table:table-cell table:style-name="ce32"/>
          <table:table-cell table:style-name="ce32" table:formula="of:=IF([.$H46]=&quot;&quot;;&quot;&quot;;IF([.$G45]=&quot;&quot;;1;[.$G45]+1))" office:value-type="float" office:value="3" calcext:value-type="float">
            <text:p>3</text:p>
          </table:table-cell>
          <table:table-cell table:style-name="ce32" office:value-type="string" calcext:value-type="string">
            <text:p>要件定義書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6]&lt;&gt;&quot;&quot;;NETWORKDAYS([.$L46];[.$M46];[$休日.$B$4:.$B$304]);&quot;&quot;)" office:value-type="float" office:value="1" calcext:value-type="float">
            <text:p>1</text:p>
          </table:table-cell>
          <table:table-cell table:style-name="ce227" office:value-type="float" office:value="100" calcext:value-type="float">
            <text:p>100</text:p>
          </table:table-cell>
          <table:table-cell table:style-name="ce63" table:formula="of:=IF(OR(AND([.$N46]=&quot;&quot;;[.$L46]&lt;&gt;&quot;&quot;;[.$L46]&lt;=[.$U$1]);AND([.$M46]&lt;&gt;&quot;&quot;;[.Q46]&lt;100;[.$M46]&lt;=[.$U$1]));&quot;遅延&quot;;&quot;&quot;)">
            <text:p/>
          </table:table-cell>
          <table:table-cell table:style-name="ce66"/>
          <table:table-cell table:style-name="ce66" table:formula="of:=SUM([.$V46:.$FM4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7]&lt;&gt;&quot;&quot;;[.$F47]=&quot;&quot;);&quot;E&quot;&amp;ROW();[.$B46])" office:value-type="string" office:string-value="E42" calcext:value-type="string">
            <text:p>E42</text:p>
          </table:table-cell>
          <table:table-cell table:style-name="ce13" table:formula="of:=IF(AND([.$D47]&lt;&gt;&quot;&quot;;[.$D47]&lt;&gt;&quot;○&quot;);MAX([.$C$3:.$C46])+1;[.$C46])" office:value-type="float" office:value="3" calcext:value-type="float">
            <text:p>3</text:p>
          </table:table-cell>
          <table:table-cell table:style-name="ce19"/>
          <table:table-cell table:style-name="ce27" table:formula="of:=IF(AND([.$F47]&lt;&gt;&quot;&quot;;[.$D46]&lt;&gt;&quot;&quot;);1;IF([.$F47]&lt;&gt;&quot;&quot;;MAX(INDIRECT([.$B47]):[.$E46])+1;&quot;&quot;))">
            <text:p/>
          </table:table-cell>
          <table:table-cell table:style-name="ce32"/>
          <table:table-cell table:style-name="ce32" table:formula="of:=IF([.$H47]=&quot;&quot;;&quot;&quot;;IF([.$G46]=&quot;&quot;;1;[.$G46]+1))" office:value-type="float" office:value="4" calcext:value-type="float">
            <text:p>4</text:p>
          </table:table-cell>
          <table:table-cell table:style-name="ce32" office:value-type="string" calcext:value-type="string">
            <text:p>基本設計書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7]&lt;&gt;&quot;&quot;;NETWORKDAYS([.$L47];[.$M47];[$休日.$B$4:.$B$304]);&quot;&quot;)" office:value-type="float" office:value="1" calcext:value-type="float">
            <text:p>1</text:p>
          </table:table-cell>
          <table:table-cell table:style-name="ce227" office:value-type="float" office:value="100" calcext:value-type="float">
            <text:p>100</text:p>
          </table:table-cell>
          <table:table-cell table:style-name="ce63" table:formula="of:=IF(OR(AND([.$N47]=&quot;&quot;;[.$L47]&lt;&gt;&quot;&quot;;[.$L47]&lt;=[.$U$1]);AND([.$M47]&lt;&gt;&quot;&quot;;[.Q47]&lt;100;[.$M47]&lt;=[.$U$1]));&quot;遅延&quot;;&quot;&quot;)">
            <text:p/>
          </table:table-cell>
          <table:table-cell table:style-name="ce66"/>
          <table:table-cell table:style-name="ce66" table:formula="of:=SUM([.$V47:.$FM4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8]&lt;&gt;&quot;&quot;;[.$F48]=&quot;&quot;);&quot;E&quot;&amp;ROW();[.$B47])" office:value-type="string" office:string-value="E42" calcext:value-type="string">
            <text:p>E42</text:p>
          </table:table-cell>
          <table:table-cell table:style-name="ce13" table:formula="of:=IF(AND([.$D48]&lt;&gt;&quot;&quot;;[.$D48]&lt;&gt;&quot;○&quot;);MAX([.$C$3:.$C47])+1;[.$C47])" office:value-type="float" office:value="3" calcext:value-type="float">
            <text:p>3</text:p>
          </table:table-cell>
          <table:table-cell table:style-name="ce19"/>
          <table:table-cell table:style-name="ce27" table:formula="of:=IF(AND([.$F48]&lt;&gt;&quot;&quot;;[.$D47]&lt;&gt;&quot;&quot;);1;IF([.$F48]&lt;&gt;&quot;&quot;;MAX(INDIRECT([.$B48]):[.$E47])+1;&quot;&quot;))">
            <text:p/>
          </table:table-cell>
          <table:table-cell table:style-name="ce32"/>
          <table:table-cell table:style-name="ce32" table:formula="of:=IF([.$H48]=&quot;&quot;;&quot;&quot;;IF([.$G47]=&quot;&quot;;1;[.$G47]+1))" office:value-type="float" office:value="5" calcext:value-type="float">
            <text:p>5</text:p>
          </table:table-cell>
          <table:table-cell table:style-name="ce32" office:value-type="string" calcext:value-type="string">
            <text:p>画面遷移図、画面詳細、モック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8]&lt;&gt;&quot;&quot;;NETWORKDAYS([.$L48];[.$M48];[$休日.$B$4:.$B$304]);&quot;&quot;)" office:value-type="float" office:value="1" calcext:value-type="float">
            <text:p>1</text:p>
          </table:table-cell>
          <table:table-cell table:style-name="ce227" office:value-type="float" office:value="100" calcext:value-type="float">
            <text:p>100</text:p>
          </table:table-cell>
          <table:table-cell table:style-name="ce63" table:formula="of:=IF(OR(AND([.$N48]=&quot;&quot;;[.$L48]&lt;&gt;&quot;&quot;;[.$L48]&lt;=[.$U$1]);AND([.$M48]&lt;&gt;&quot;&quot;;[.Q48]&lt;100;[.$M48]&lt;=[.$U$1]));&quot;遅延&quot;;&quot;&quot;)">
            <text:p/>
          </table:table-cell>
          <table:table-cell table:style-name="ce66"/>
          <table:table-cell table:style-name="ce66" table:formula="of:=SUM([.$V48:.$FM4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9]&lt;&gt;&quot;&quot;;[.$F49]=&quot;&quot;);&quot;E&quot;&amp;ROW();[.$B48])" office:value-type="string" office:string-value="E42" calcext:value-type="string">
            <text:p>E42</text:p>
          </table:table-cell>
          <table:table-cell table:style-name="ce13" table:formula="of:=IF(AND([.$D49]&lt;&gt;&quot;&quot;;[.$D49]&lt;&gt;&quot;○&quot;);MAX([.$C$3:.$C48])+1;[.$C48])" office:value-type="float" office:value="3" calcext:value-type="float">
            <text:p>3</text:p>
          </table:table-cell>
          <table:table-cell table:style-name="ce19"/>
          <table:table-cell table:style-name="ce27" table:formula="of:=IF(AND([.$F49]&lt;&gt;&quot;&quot;;[.$D48]&lt;&gt;&quot;&quot;);1;IF([.$F49]&lt;&gt;&quot;&quot;;MAX(INDIRECT([.$B49]):[.$E48])+1;&quot;&quot;))">
            <text:p/>
          </table:table-cell>
          <table:table-cell table:style-name="ce32"/>
          <table:table-cell table:style-name="ce32" table:formula="of:=IF([.$H49]=&quot;&quot;;&quot;&quot;;IF([.$G48]=&quot;&quot;;1;[.$G48]+1))" office:value-type="float" office:value="6" calcext:value-type="float">
            <text:p>6</text:p>
          </table:table-cell>
          <table:table-cell table:style-name="ce32" office:value-type="string" calcext:value-type="string">
            <text:p>詳細設計書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9]&lt;&gt;&quot;&quot;;NETWORKDAYS([.$L49];[.$M49];[$休日.$B$4:.$B$304]);&quot;&quot;)" office:value-type="float" office:value="1" calcext:value-type="float">
            <text:p>1</text:p>
          </table:table-cell>
          <table:table-cell table:style-name="ce227" office:value-type="float" office:value="100" calcext:value-type="float">
            <text:p>100</text:p>
          </table:table-cell>
          <table:table-cell table:style-name="ce63" table:formula="of:=IF(OR(AND([.$N49]=&quot;&quot;;[.$L49]&lt;&gt;&quot;&quot;;[.$L49]&lt;=[.$U$1]);AND([.$M49]&lt;&gt;&quot;&quot;;[.Q49]&lt;100;[.$M49]&lt;=[.$U$1]));&quot;遅延&quot;;&quot;&quot;)">
            <text:p/>
          </table:table-cell>
          <table:table-cell table:style-name="ce66"/>
          <table:table-cell table:style-name="ce66" table:formula="of:=SUM([.$V49:.$FM4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50]&lt;&gt;&quot;&quot;;[.$F50]=&quot;&quot;);&quot;E&quot;&amp;ROW();[.$B49])" office:value-type="string" office:string-value="E42" calcext:value-type="string">
            <text:p>E42</text:p>
          </table:table-cell>
          <table:table-cell table:style-name="ce13" table:formula="of:=IF(AND([.$D50]&lt;&gt;&quot;&quot;;[.$D50]&lt;&gt;&quot;○&quot;);MAX([.$C$3:.$C49])+1;[.$C49])" office:value-type="float" office:value="3" calcext:value-type="float">
            <text:p>3</text:p>
          </table:table-cell>
          <table:table-cell table:style-name="ce19"/>
          <table:table-cell table:style-name="ce27" table:formula="of:=IF(AND([.$F50]&lt;&gt;&quot;&quot;;[.$D49]&lt;&gt;&quot;&quot;);1;IF([.$F50]&lt;&gt;&quot;&quot;;MAX(INDIRECT([.$B50]):[.$E49])+1;&quot;&quot;))">
            <text:p/>
          </table:table-cell>
          <table:table-cell table:style-name="ce32"/>
          <table:table-cell table:style-name="ce32" table:formula="of:=IF([.$H50]=&quot;&quot;;&quot;&quot;;IF([.$G49]=&quot;&quot;;1;[.$G4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50]&lt;&gt;&quot;&quot;;NETWORKDAYS([.$L50];[.$M5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50]=&quot;&quot;;[.$L50]&lt;&gt;&quot;&quot;;[.$L50]&lt;=[.$U$1]);AND([.$M50]&lt;&gt;&quot;&quot;;[.Q50]&lt;100;[.$M50]&lt;=[.$U$1]));&quot;遅延&quot;;&quot;&quot;)">
            <text:p/>
          </table:table-cell>
          <table:table-cell table:style-name="ce66"/>
          <table:table-cell table:style-name="ce66" table:formula="of:=SUM([.$V50:.$FM5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1]&lt;&gt;&quot;&quot;;[.$F51]=&quot;&quot;);&quot;E&quot;&amp;ROW();[.$B50])" office:value-type="string" office:string-value="E42" calcext:value-type="string">
            <text:p>E42</text:p>
          </table:table-cell>
          <table:table-cell table:style-name="ce13" table:formula="of:=IF(AND([.$D51]&lt;&gt;&quot;&quot;;[.$D51]&lt;&gt;&quot;○&quot;);MAX([.$C$3:.$C50])+1;[.$C50])" office:value-type="float" office:value="3" calcext:value-type="float">
            <text:p>3</text:p>
          </table:table-cell>
          <table:table-cell table:style-name="ce19"/>
          <table:table-cell table:style-name="ce27" table:formula="of:=IF(AND([.$F51]&lt;&gt;&quot;&quot;;[.$D50]&lt;&gt;&quot;&quot;);1;IF([.$F51]&lt;&gt;&quot;&quot;;MAX(INDIRECT([.$B51]):[.$E50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コンセプト・オリジナル機能検討</text:p>
          </table:table-cell>
          <table:table-cell table:style-name="ce32" table:formula="of:=IF([.$H51]=&quot;&quot;;&quot;&quot;;IF([.$G50]=&quot;&quot;;1;[.$G50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2" table:formula="of:=IF([.$L51]&lt;&gt;&quot;&quot;;NETWORKDAYS([.$L51];[.$M51];[$休日.$B$4:.$B$304]);&quot;&quot;)" office:value-type="float" office:value="2" calcext:value-type="float">
            <text:p>2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51]=&quot;&quot;;[.$L51]&lt;&gt;&quot;&quot;;[.$L51]&lt;=[.$U$1]);AND([.$M51]&lt;&gt;&quot;&quot;;[.Q51]&lt;100;[.$M51]&lt;=[.$U$1]));&quot;遅延&quot;;&quot;&quot;)">
            <text:p/>
          </table:table-cell>
          <table:table-cell table:style-name="ce66"/>
          <table:table-cell table:style-name="ce66" table:formula="of:=SUM([.$V51:.$FM5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2]&lt;&gt;&quot;&quot;;[.$F52]=&quot;&quot;);&quot;E&quot;&amp;ROW();[.$B51])" office:value-type="string" office:string-value="E42" calcext:value-type="string">
            <text:p>E42</text:p>
          </table:table-cell>
          <table:table-cell table:style-name="ce13" table:formula="of:=IF(AND([.$D52]&lt;&gt;&quot;&quot;;[.$D52]&lt;&gt;&quot;○&quot;);MAX([.$C$3:.$C51])+1;[.$C51])" office:value-type="float" office:value="3" calcext:value-type="float">
            <text:p>3</text:p>
          </table:table-cell>
          <table:table-cell table:style-name="ce19"/>
          <table:table-cell table:style-name="ce27" table:formula="of:=IF(AND([.$F52]&lt;&gt;&quot;&quot;;[.$D51]&lt;&gt;&quot;&quot;);1;IF([.$F52]&lt;&gt;&quot;&quot;;MAX(INDIRECT([.$B52]):[.$E51])+1;&quot;&quot;))">
            <text:p/>
          </table:table-cell>
          <table:table-cell table:style-name="ce32"/>
          <table:table-cell table:style-name="ce32" table:formula="of:=IF([.$H52]=&quot;&quot;;&quot;&quot;;IF([.$G51]=&quot;&quot;;1;[.$G51]+1))" office:value-type="float" office:value="1" calcext:value-type="float">
            <text:p>1</text:p>
          </table:table-cell>
          <table:table-cell table:style-name="ce32" office:value-type="string" calcext:value-type="string">
            <text:p>コンセプト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2" table:formula="of:=IF([.$L52]&lt;&gt;&quot;&quot;;NETWORKDAYS([.$L52];[.$M52];[$休日.$B$4:.$B$304]);&quot;&quot;)" office:value-type="float" office:value="2" calcext:value-type="float">
            <text:p>2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52]=&quot;&quot;;[.$L52]&lt;&gt;&quot;&quot;;[.$L52]&lt;=[.$U$1]);AND([.$M52]&lt;&gt;&quot;&quot;;[.Q52]&lt;100;[.$M52]&lt;=[.$U$1]));&quot;遅延&quot;;&quot;&quot;)">
            <text:p/>
          </table:table-cell>
          <table:table-cell table:style-name="ce66"/>
          <table:table-cell table:style-name="ce66" table:formula="of:=SUM([.$V52:.$FM5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53]&lt;&gt;&quot;&quot;;[.$F53]=&quot;&quot;);&quot;E&quot;&amp;ROW();[.$B52])" office:value-type="string" office:string-value="E42" calcext:value-type="string">
            <text:p>E42</text:p>
          </table:table-cell>
          <table:table-cell table:style-name="ce13" table:formula="of:=IF(AND([.$D53]&lt;&gt;&quot;&quot;;[.$D53]&lt;&gt;&quot;○&quot;);MAX([.$C$3:.$C52])+1;[.$C52])" office:value-type="float" office:value="3" calcext:value-type="float">
            <text:p>3</text:p>
          </table:table-cell>
          <table:table-cell table:style-name="ce19"/>
          <table:table-cell table:style-name="ce27" table:formula="of:=IF(AND([.$F53]&lt;&gt;&quot;&quot;;[.$D52]&lt;&gt;&quot;&quot;);1;IF([.$F53]&lt;&gt;&quot;&quot;;MAX(INDIRECT([.$B53]):[.$E52])+1;&quot;&quot;))">
            <text:p/>
          </table:table-cell>
          <table:table-cell table:style-name="ce32"/>
          <table:table-cell table:style-name="ce32" table:formula="of:=IF([.$H53]=&quot;&quot;;&quot;&quot;;IF([.$G52]=&quot;&quot;;1;[.$G52]+1))" office:value-type="float" office:value="2" calcext:value-type="float">
            <text:p>2</text:p>
          </table:table-cell>
          <table:table-cell table:style-name="ce32" office:value-type="string" calcext:value-type="string">
            <text:p>オリジナル機能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2" table:formula="of:=IF([.$L53]&lt;&gt;&quot;&quot;;NETWORKDAYS([.$L53];[.$M53];[$休日.$B$4:.$B$304]);&quot;&quot;)" office:value-type="float" office:value="2" calcext:value-type="float">
            <text:p>2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53]=&quot;&quot;;[.$L53]&lt;&gt;&quot;&quot;;[.$L53]&lt;=[.$U$1]);AND([.$M53]&lt;&gt;&quot;&quot;;[.Q53]&lt;100;[.$M53]&lt;=[.$U$1]));&quot;遅延&quot;;&quot;&quot;)">
            <text:p/>
          </table:table-cell>
          <table:table-cell table:style-name="ce66"/>
          <table:table-cell table:style-name="ce66" table:formula="of:=SUM([.$V53:.$FM5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/>
          <table:table-cell table:style-name="ce13"/>
          <table:table-cell table:style-name="ce19"/>
          <table:table-cell table:style-name="ce27" table:formula="of:=IF(AND([.$F54]&lt;&gt;&quot;&quot;;[.$D53]&lt;&gt;&quot;&quot;);1;IF([.$F54]&lt;&gt;&quot;&quot;;MAX(INDIRECT([.$B54]):[.$E53])+1;&quot;&quot;))">
            <text:p/>
          </table:table-cell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5]&lt;&gt;&quot;&quot;;[.$F55]=&quot;&quot;);&quot;E&quot;&amp;ROW();[.$B53])" office:value-type="string" office:string-value="E42" calcext:value-type="string">
            <text:p>E42</text:p>
          </table:table-cell>
          <table:table-cell table:style-name="ce13" table:formula="of:=IF(AND([.$D55]&lt;&gt;&quot;&quot;;[.$D55]&lt;&gt;&quot;○&quot;);MAX([.$C$3:.$C53])+1;[.$C53])" office:value-type="float" office:value="3" calcext:value-type="float">
            <text:p>3</text:p>
          </table:table-cell>
          <table:table-cell table:style-name="ce19"/>
          <table:table-cell table:style-name="ce27" table:formula="of:=IF(AND([.$F55]&lt;&gt;&quot;&quot;;[.$D54]&lt;&gt;&quot;&quot;);1;IF([.$F55]&lt;&gt;&quot;&quot;;MAX(INDIRECT([.$B55]):[.$E54])+1;&quot;&quot;))" office:value-type="float" office:value="3" calcext:value-type="float">
            <text:p>3</text:p>
          </table:table-cell>
          <table:table-cell table:style-name="ce32" office:value-type="string" calcext:value-type="string">
            <text:p>ソースコードリーディング</text:p>
          </table:table-cell>
          <table:table-cell table:style-name="ce32" table:formula="of:=IF([.$H55]=&quot;&quot;;&quot;&quot;;IF([.$G53]=&quot;&quot;;1;[.$G53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55]&lt;&gt;&quot;&quot;;NETWORKDAYS([.$L55];[.$M55];[$休日.$B$4:.$B$304]);&quot;&quot;)" office:value-type="float" office:value="1" calcext:value-type="float">
            <text:p>1</text:p>
          </table:table-cell>
          <table:table-cell table:style-name="ce230" office:value-type="float" office:value="100" calcext:value-type="float">
            <text:p>100</text:p>
          </table:table-cell>
          <table:table-cell table:style-name="ce63" table:formula="of:=IF(OR(AND([.$N55]=&quot;&quot;;[.$L55]&lt;&gt;&quot;&quot;;[.$L55]&lt;=[.$U$1]);AND([.$M55]&lt;&gt;&quot;&quot;;[.Q55]&lt;100;[.$M55]&lt;=[.$U$1]));&quot;遅延&quot;;&quot;&quot;)">
            <text:p/>
          </table:table-cell>
          <table:table-cell table:style-name="ce66"/>
          <table:table-cell table:style-name="ce66" table:formula="of:=SUM([.$V55:.$FM5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6]&lt;&gt;&quot;&quot;;[.$F56]=&quot;&quot;);&quot;E&quot;&amp;ROW();[.$B55])" office:value-type="string" office:string-value="E42" calcext:value-type="string">
            <text:p>E42</text:p>
          </table:table-cell>
          <table:table-cell table:style-name="ce13" table:formula="of:=IF(AND([.$D56]&lt;&gt;&quot;&quot;;[.$D56]&lt;&gt;&quot;○&quot;);MAX([.$C$3:.$C55])+1;[.$C55])" office:value-type="float" office:value="3" calcext:value-type="float">
            <text:p>3</text:p>
          </table:table-cell>
          <table:table-cell table:style-name="ce19"/>
          <table:table-cell table:style-name="ce27" table:formula="of:=IF(AND([.$F56]&lt;&gt;&quot;&quot;;[.$D55]&lt;&gt;&quot;&quot;);1;IF([.$F56]&lt;&gt;&quot;&quot;;MAX(INDIRECT([.$B56]):[.$E55])+1;&quot;&quot;))">
            <text:p/>
          </table:table-cell>
          <table:table-cell table:style-name="ce32"/>
          <table:table-cell table:style-name="ce32" table:formula="of:=IF([.$H56]=&quot;&quot;;&quot;&quot;;IF([.$G55]=&quot;&quot;;1;[.$G55]+1))" office:value-type="float" office:value="1" calcext:value-type="float">
            <text:p>1</text:p>
          </table:table-cell>
          <table:table-cell table:style-name="ce32" office:value-type="string" calcext:value-type="string">
            <text:p>既存機能の実装状況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56]&lt;&gt;&quot;&quot;;NETWORKDAYS([.$L56];[.$M56];[$休日.$B$4:.$B$304]);&quot;&quot;)" office:value-type="float" office:value="1" calcext:value-type="float">
            <text:p>1</text:p>
          </table:table-cell>
          <table:table-cell table:style-name="ce230" office:value-type="float" office:value="100" calcext:value-type="float">
            <text:p>100</text:p>
          </table:table-cell>
          <table:table-cell table:style-name="ce63" table:formula="of:=IF(OR(AND([.$N56]=&quot;&quot;;[.$L56]&lt;&gt;&quot;&quot;;[.$L56]&lt;=[.$U$1]);AND([.$M56]&lt;&gt;&quot;&quot;;[.Q56]&lt;100;[.$M56]&lt;=[.$U$1]));&quot;遅延&quot;;&quot;&quot;)">
            <text:p/>
          </table:table-cell>
          <table:table-cell table:style-name="ce66"/>
          <table:table-cell table:style-name="ce66" table:formula="of:=SUM([.$V56:.$FM5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7]&lt;&gt;&quot;&quot;;[.$F57]=&quot;&quot;);&quot;E&quot;&amp;ROW();[.$B56])" office:value-type="string" office:string-value="E42" calcext:value-type="string">
            <text:p>E42</text:p>
          </table:table-cell>
          <table:table-cell table:style-name="ce13" table:formula="of:=IF(AND([.$D57]&lt;&gt;&quot;&quot;;[.$D57]&lt;&gt;&quot;○&quot;);MAX([.$C$3:.$C56])+1;[.$C56])" office:value-type="float" office:value="3" calcext:value-type="float">
            <text:p>3</text:p>
          </table:table-cell>
          <table:table-cell table:style-name="ce19"/>
          <table:table-cell table:style-name="ce27" table:formula="of:=IF(AND([.$F57]&lt;&gt;&quot;&quot;;[.$D56]&lt;&gt;&quot;&quot;);1;IF([.$F57]&lt;&gt;&quot;&quot;;MAX(INDIRECT([.$B57]):[.$E56])+1;&quot;&quot;))">
            <text:p/>
          </table:table-cell>
          <table:table-cell table:style-name="ce32"/>
          <table:table-cell table:style-name="ce32" table:formula="of:=IF([.$H57]=&quot;&quot;;&quot;&quot;;IF([.$G56]=&quot;&quot;;1;[.$G56]+1))" office:value-type="float" office:value="2" calcext:value-type="float">
            <text:p>2</text:p>
          </table:table-cell>
          <table:table-cell table:style-name="ce32" office:value-type="string" calcext:value-type="string">
            <text:p>ソースコードの構成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57]&lt;&gt;&quot;&quot;;NETWORKDAYS([.$L57];[.$M57];[$休日.$B$4:.$B$304]);&quot;&quot;)" office:value-type="float" office:value="1" calcext:value-type="float">
            <text:p>1</text:p>
          </table:table-cell>
          <table:table-cell table:style-name="ce230" office:value-type="float" office:value="100" calcext:value-type="float">
            <text:p>100</text:p>
          </table:table-cell>
          <table:table-cell table:style-name="ce63" table:formula="of:=IF(OR(AND([.$N57]=&quot;&quot;;[.$L57]&lt;&gt;&quot;&quot;;[.$L57]&lt;=[.$U$1]);AND([.$M57]&lt;&gt;&quot;&quot;;[.Q57]&lt;100;[.$M57]&lt;=[.$U$1]));&quot;遅延&quot;;&quot;&quot;)">
            <text:p/>
          </table:table-cell>
          <table:table-cell table:style-name="ce66"/>
          <table:table-cell table:style-name="ce66" table:formula="of:=SUM([.$V57:.$FM5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8]&lt;&gt;&quot;&quot;;[.$F58]=&quot;&quot;);&quot;E&quot;&amp;ROW();[.$B57])" office:value-type="string" office:string-value="E42" calcext:value-type="string">
            <text:p>E42</text:p>
          </table:table-cell>
          <table:table-cell table:style-name="ce13" table:formula="of:=IF(AND([.$D58]&lt;&gt;&quot;&quot;;[.$D58]&lt;&gt;&quot;○&quot;);MAX([.$C$3:.$C57])+1;[.$C57])" office:value-type="float" office:value="3" calcext:value-type="float">
            <text:p>3</text:p>
          </table:table-cell>
          <table:table-cell table:style-name="ce19"/>
          <table:table-cell table:style-name="ce27" table:formula="of:=IF(AND([.$F58]&lt;&gt;&quot;&quot;;[.$D57]&lt;&gt;&quot;&quot;);1;IF([.$F58]&lt;&gt;&quot;&quot;;MAX(INDIRECT([.$B58]):[.$E57])+1;&quot;&quot;))">
            <text:p/>
          </table:table-cell>
          <table:table-cell table:style-name="ce32"/>
          <table:table-cell table:style-name="ce32" table:formula="of:=IF([.$H58]=&quot;&quot;;&quot;&quot;;IF([.$G57]=&quot;&quot;;1;[.$G57]+1))" office:value-type="float" office:value="3" calcext:value-type="float">
            <text:p>3</text:p>
          </table:table-cell>
          <table:table-cell table:style-name="ce32" office:value-type="string" calcext:value-type="string">
            <text:p>新規作成クラス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58]&lt;&gt;&quot;&quot;;NETWORKDAYS([.$L58];[.$M58];[$休日.$B$4:.$B$304]);&quot;&quot;)" office:value-type="float" office:value="1" calcext:value-type="float">
            <text:p>1</text:p>
          </table:table-cell>
          <table:table-cell table:style-name="ce230" office:value-type="float" office:value="100" calcext:value-type="float">
            <text:p>100</text:p>
          </table:table-cell>
          <table:table-cell table:style-name="ce63" table:formula="of:=IF(OR(AND([.$N58]=&quot;&quot;;[.$L58]&lt;&gt;&quot;&quot;;[.$L58]&lt;=[.$U$1]);AND([.$M58]&lt;&gt;&quot;&quot;;[.Q58]&lt;100;[.$M58]&lt;=[.$U$1]));&quot;遅延&quot;;&quot;&quot;)">
            <text:p/>
          </table:table-cell>
          <table:table-cell table:style-name="ce66"/>
          <table:table-cell table:style-name="ce66" table:formula="of:=SUM([.$V58:.$FM5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9]&lt;&gt;&quot;&quot;;[.$F59]=&quot;&quot;);&quot;E&quot;&amp;ROW();[.$B58])" office:value-type="string" office:string-value="E42" calcext:value-type="string">
            <text:p>E42</text:p>
          </table:table-cell>
          <table:table-cell table:style-name="ce13" table:formula="of:=IF(AND([.$D59]&lt;&gt;&quot;&quot;;[.$D59]&lt;&gt;&quot;○&quot;);MAX([.$C$3:.$C58])+1;[.$C58])" office:value-type="float" office:value="3" calcext:value-type="float">
            <text:p>3</text:p>
          </table:table-cell>
          <table:table-cell table:style-name="ce19"/>
          <table:table-cell table:style-name="ce27" table:formula="of:=IF(AND([.$F59]&lt;&gt;&quot;&quot;;[.$D58]&lt;&gt;&quot;&quot;);1;IF([.$F59]&lt;&gt;&quot;&quot;;MAX(INDIRECT([.$B59]):[.$E58])+1;&quot;&quot;))">
            <text:p/>
          </table:table-cell>
          <table:table-cell table:style-name="ce32"/>
          <table:table-cell table:style-name="ce32" table:formula="of:=IF([.$H59]=&quot;&quot;;&quot;&quot;;IF([.$G58]=&quot;&quot;;1;[.$G58]+1))" office:value-type="float" office:value="4" calcext:value-type="float">
            <text:p>4</text:p>
          </table:table-cell>
          <table:table-cell table:style-name="ce32" office:value-type="string" calcext:value-type="string">
            <text:p>編集対象クラス、設定ファイル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59]&lt;&gt;&quot;&quot;;NETWORKDAYS([.$L59];[.$M59];[$休日.$B$4:.$B$304]);&quot;&quot;)" office:value-type="float" office:value="1" calcext:value-type="float">
            <text:p>1</text:p>
          </table:table-cell>
          <table:table-cell table:style-name="ce230" office:value-type="float" office:value="100" calcext:value-type="float">
            <text:p>100</text:p>
          </table:table-cell>
          <table:table-cell table:style-name="ce63" table:formula="of:=IF(OR(AND([.$N59]=&quot;&quot;;[.$L59]&lt;&gt;&quot;&quot;;[.$L59]&lt;=[.$U$1]);AND([.$M59]&lt;&gt;&quot;&quot;;[.Q59]&lt;100;[.$M59]&lt;=[.$U$1]));&quot;遅延&quot;;&quot;&quot;)">
            <text:p/>
          </table:table-cell>
          <table:table-cell table:style-name="ce66"/>
          <table:table-cell table:style-name="ce66" table:formula="of:=SUM([.$V59:.$FM5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 table:formula="of:=IF(AND([.$F60]&lt;&gt;&quot;&quot;;[.$D59]&lt;&gt;&quot;&quot;);1;IF([.$F60]&lt;&gt;&quot;&quot;;MAX(INDIRECT([.$B60]):[.$E59])+1;&quot;&quot;))">
            <text:p/>
          </table:table-cell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1]&lt;&gt;&quot;&quot;;[.$F61]=&quot;&quot;);&quot;E&quot;&amp;ROW();[.$B59])" office:value-type="string" office:string-value="E42" calcext:value-type="string">
            <text:p>E42</text:p>
          </table:table-cell>
          <table:table-cell table:style-name="ce13" table:formula="of:=IF(AND([.$D61]&lt;&gt;&quot;&quot;;[.$D61]&lt;&gt;&quot;○&quot;);MAX([.$C$3:.$C59])+1;[.$C59])" office:value-type="float" office:value="3" calcext:value-type="float">
            <text:p>3</text:p>
          </table:table-cell>
          <table:table-cell table:style-name="ce19"/>
          <table:table-cell table:style-name="ce27" table:formula="of:=IF(AND([.$F61]&lt;&gt;&quot;&quot;;[.$D60]&lt;&gt;&quot;&quot;);1;IF([.$F61]&lt;&gt;&quot;&quot;;MAX(INDIRECT([.$B61]):[.$E60])+1;&quot;&quot;))" office:value-type="float" office:value="4" calcext:value-type="float">
            <text:p>4</text:p>
          </table:table-cell>
          <table:table-cell table:style-name="ce32" office:value-type="string" calcext:value-type="string">
            <text:p>設計書類の作成</text:p>
          </table:table-cell>
          <table:table-cell table:style-name="ce32" table:formula="of:=IF([.$H61]=&quot;&quot;;&quot;&quot;;IF([.$G59]=&quot;&quot;;1;[.$G59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5" calcext:value-type="date">
            <text:p>2026/06/05</text:p>
          </table:table-cell>
          <table:table-cell table:number-columns-repeated="2" table:style-name="ce38" office:value-type="date" office:date-value="2026-06-04" calcext:value-type="date">
            <text:p>2026/06/04</text:p>
          </table:table-cell>
          <table:table-cell table:style-name="ce32" table:formula="of:=IF([.$L61]&lt;&gt;&quot;&quot;;NETWORKDAYS([.$L61];[.$M61];[$休日.$B$4:.$B$304]);&quot;&quot;)" office:value-type="float" office:value="2" calcext:value-type="float">
            <text:p>2</text:p>
          </table:table-cell>
          <table:table-cell table:style-name="ce231" office:value-type="float" office:value="100" calcext:value-type="float">
            <text:p>100</text:p>
          </table:table-cell>
          <table:table-cell table:style-name="ce63" table:formula="of:=IF(OR(AND([.$N61]=&quot;&quot;;[.$L61]&lt;&gt;&quot;&quot;;[.$L61]&lt;=[.$U$1]);AND([.$M61]&lt;&gt;&quot;&quot;;[.Q61]&lt;100;[.$M61]&lt;=[.$U$1]));&quot;遅延&quot;;&quot;&quot;)">
            <text:p/>
          </table:table-cell>
          <table:table-cell table:style-name="ce66"/>
          <table:table-cell table:style-name="ce66" table:formula="of:=SUM([.$V61:.$FM6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2]&lt;&gt;&quot;&quot;;[.$F62]=&quot;&quot;);&quot;E&quot;&amp;ROW();[.$B61])" office:value-type="string" office:string-value="E42" calcext:value-type="string">
            <text:p>E42</text:p>
          </table:table-cell>
          <table:table-cell table:style-name="ce13" table:formula="of:=IF(AND([.$D62]&lt;&gt;&quot;&quot;;[.$D62]&lt;&gt;&quot;○&quot;);MAX([.$C$3:.$C61])+1;[.$C61])" office:value-type="float" office:value="3" calcext:value-type="float">
            <text:p>3</text:p>
          </table:table-cell>
          <table:table-cell table:style-name="ce19"/>
          <table:table-cell table:style-name="ce27" table:formula="of:=IF(AND([.$F62]&lt;&gt;&quot;&quot;;[.$D61]&lt;&gt;&quot;&quot;);1;IF([.$F62]&lt;&gt;&quot;&quot;;MAX(INDIRECT([.$B62]):[.$E61])+1;&quot;&quot;))">
            <text:p/>
          </table:table-cell>
          <table:table-cell table:style-name="ce32"/>
          <table:table-cell table:style-name="ce32" table:formula="of:=IF([.$H62]=&quot;&quot;;&quot;&quot;;IF([.$G61]=&quot;&quot;;1;[.$G61]+1))" office:value-type="float" office:value="1" calcext:value-type="float">
            <text:p>1</text:p>
          </table:table-cell>
          <table:table-cell table:style-name="ce32" office:value-type="string" calcext:value-type="string">
            <text:p>オリジナル機能の実装方法検討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4" calcext:value-type="date">
            <text:p>2026/06/04</text:p>
          </table:table-cell>
          <table:table-cell table:style-name="ce32" table:formula="of:=IF([.$L62]&lt;&gt;&quot;&quot;;NETWORKDAYS([.$L62];[.$M62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62]=&quot;&quot;;[.$L62]&lt;&gt;&quot;&quot;;[.$L62]&lt;=[.$U$1]);AND([.$M62]&lt;&gt;&quot;&quot;;[.Q62]&lt;100;[.$M62]&lt;=[.$U$1]));&quot;遅延&quot;;&quot;&quot;)">
            <text:p/>
          </table:table-cell>
          <table:table-cell table:style-name="ce66"/>
          <table:table-cell table:style-name="ce66" table:formula="of:=SUM([.$V62:.$FM6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3]&lt;&gt;&quot;&quot;;[.$F63]=&quot;&quot;);&quot;E&quot;&amp;ROW();[.$B62])" office:value-type="string" office:string-value="E42" calcext:value-type="string">
            <text:p>E42</text:p>
          </table:table-cell>
          <table:table-cell table:style-name="ce13" table:formula="of:=IF(AND([.$D63]&lt;&gt;&quot;&quot;;[.$D63]&lt;&gt;&quot;○&quot;);MAX([.$C$3:.$C62])+1;[.$C62])" office:value-type="float" office:value="3" calcext:value-type="float">
            <text:p>3</text:p>
          </table:table-cell>
          <table:table-cell table:style-name="ce19"/>
          <table:table-cell table:style-name="ce27" table:formula="of:=IF(AND([.$F63]&lt;&gt;&quot;&quot;;[.$D62]&lt;&gt;&quot;&quot;);1;IF([.$F63]&lt;&gt;&quot;&quot;;MAX(INDIRECT([.$B63]):[.$E62])+1;&quot;&quot;))">
            <text:p/>
          </table:table-cell>
          <table:table-cell table:style-name="ce32"/>
          <table:table-cell table:style-name="ce32" table:formula="of:=IF([.$H63]=&quot;&quot;;&quot;&quot;;IF([.$G62]=&quot;&quot;;1;[.$G62]+1))" office:value-type="float" office:value="2" calcext:value-type="float">
            <text:p>2</text:p>
          </table:table-cell>
          <table:table-cell table:style-name="ce32" office:value-type="string" calcext:value-type="string">
            <text:p>オリジナル機能の要件定義書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4" calcext:value-type="date">
            <text:p>2026/06/04</text:p>
          </table:table-cell>
          <table:table-cell table:style-name="ce32" table:formula="of:=IF([.$L63]&lt;&gt;&quot;&quot;;NETWORKDAYS([.$L63];[.$M63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63]=&quot;&quot;;[.$L63]&lt;&gt;&quot;&quot;;[.$L63]&lt;=[.$U$1]);AND([.$M63]&lt;&gt;&quot;&quot;;[.Q63]&lt;100;[.$M63]&lt;=[.$U$1]));&quot;遅延&quot;;&quot;&quot;)">
            <text:p/>
          </table:table-cell>
          <table:table-cell table:style-name="ce66"/>
          <table:table-cell table:style-name="ce66" table:formula="of:=SUM([.$V63:.$FM6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4]&lt;&gt;&quot;&quot;;[.$F64]=&quot;&quot;);&quot;E&quot;&amp;ROW();[.$B63])" office:value-type="string" office:string-value="E42" calcext:value-type="string">
            <text:p>E42</text:p>
          </table:table-cell>
          <table:table-cell table:style-name="ce13" table:formula="of:=IF(AND([.$D64]&lt;&gt;&quot;&quot;;[.$D64]&lt;&gt;&quot;○&quot;);MAX([.$C$3:.$C63])+1;[.$C63])" office:value-type="float" office:value="3" calcext:value-type="float">
            <text:p>3</text:p>
          </table:table-cell>
          <table:table-cell table:style-name="ce19"/>
          <table:table-cell table:style-name="ce27" table:formula="of:=IF(AND([.$F64]&lt;&gt;&quot;&quot;;[.$D63]&lt;&gt;&quot;&quot;);1;IF([.$F64]&lt;&gt;&quot;&quot;;MAX(INDIRECT([.$B64]):[.$E63])+1;&quot;&quot;))">
            <text:p/>
          </table:table-cell>
          <table:table-cell table:style-name="ce32"/>
          <table:table-cell table:style-name="ce32" table:formula="of:=IF([.$H64]=&quot;&quot;;&quot;&quot;;IF([.$G63]=&quot;&quot;;1;[.$G63]+1))" office:value-type="float" office:value="3" calcext:value-type="float">
            <text:p>3</text:p>
          </table:table-cell>
          <table:table-cell table:style-name="ce32" office:value-type="string" calcext:value-type="string">
            <text:p>オリジナル機能の基本設計書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5" calcext:value-type="date">
            <text:p>2026/06/05</text:p>
          </table:table-cell>
          <table:table-cell table:style-name="ce32" table:formula="of:=IF([.$L64]&lt;&gt;&quot;&quot;;NETWORKDAYS([.$L64];[.$M64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64]=&quot;&quot;;[.$L64]&lt;&gt;&quot;&quot;;[.$L64]&lt;=[.$U$1]);AND([.$M64]&lt;&gt;&quot;&quot;;[.Q64]&lt;100;[.$M64]&lt;=[.$U$1]));&quot;遅延&quot;;&quot;&quot;)">
            <text:p/>
          </table:table-cell>
          <table:table-cell table:style-name="ce66"/>
          <table:table-cell table:style-name="ce66" table:formula="of:=SUM([.$V64:.$FM6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5]&lt;&gt;&quot;&quot;;[.$F65]=&quot;&quot;);&quot;E&quot;&amp;ROW();[.$B64])" office:value-type="string" office:string-value="E42" calcext:value-type="string">
            <text:p>E42</text:p>
          </table:table-cell>
          <table:table-cell table:style-name="ce13" table:formula="of:=IF(AND([.$D65]&lt;&gt;&quot;&quot;;[.$D65]&lt;&gt;&quot;○&quot;);MAX([.$C$3:.$C64])+1;[.$C64])" office:value-type="float" office:value="3" calcext:value-type="float">
            <text:p>3</text:p>
          </table:table-cell>
          <table:table-cell table:style-name="ce19"/>
          <table:table-cell table:style-name="ce27" table:formula="of:=IF(AND([.$F65]&lt;&gt;&quot;&quot;;[.$D64]&lt;&gt;&quot;&quot;);1;IF([.$F65]&lt;&gt;&quot;&quot;;MAX(INDIRECT([.$B65]):[.$E64])+1;&quot;&quot;))">
            <text:p/>
          </table:table-cell>
          <table:table-cell table:style-name="ce32"/>
          <table:table-cell table:style-name="ce32" table:formula="of:=IF([.$H65]=&quot;&quot;;&quot;&quot;;IF([.$G64]=&quot;&quot;;1;[.$G64]+1))" office:value-type="float" office:value="4" calcext:value-type="float">
            <text:p>4</text:p>
          </table:table-cell>
          <table:table-cell table:style-name="ce32" office:value-type="string" calcext:value-type="string">
            <text:p>オリジナル機能の画面遷移、画面詳細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5" calcext:value-type="date">
            <text:p>2026/06/05</text:p>
          </table:table-cell>
          <table:table-cell table:style-name="ce32" table:formula="of:=IF([.$L65]&lt;&gt;&quot;&quot;;NETWORKDAYS([.$L65];[.$M65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65]=&quot;&quot;;[.$L65]&lt;&gt;&quot;&quot;;[.$L65]&lt;=[.$U$1]);AND([.$M65]&lt;&gt;&quot;&quot;;[.Q65]&lt;100;[.$M65]&lt;=[.$U$1]));&quot;遅延&quot;;&quot;&quot;)">
            <text:p/>
          </table:table-cell>
          <table:table-cell table:style-name="ce66"/>
          <table:table-cell table:style-name="ce66" table:formula="of:=SUM([.$V65:.$FM6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6]&lt;&gt;&quot;&quot;;[.$F66]=&quot;&quot;);&quot;E&quot;&amp;ROW();[.$B65])" office:value-type="string" office:string-value="E42" calcext:value-type="string">
            <text:p>E42</text:p>
          </table:table-cell>
          <table:table-cell table:style-name="ce13" table:formula="of:=IF(AND([.$D66]&lt;&gt;&quot;&quot;;[.$D66]&lt;&gt;&quot;○&quot;);MAX([.$C$3:.$C65])+1;[.$C65])" office:value-type="float" office:value="3" calcext:value-type="float">
            <text:p>3</text:p>
          </table:table-cell>
          <table:table-cell table:style-name="ce19"/>
          <table:table-cell table:style-name="ce27" table:formula="of:=IF(AND([.$F66]&lt;&gt;&quot;&quot;;[.$D65]&lt;&gt;&quot;&quot;);1;IF([.$F66]&lt;&gt;&quot;&quot;;MAX(INDIRECT([.$B66]):[.$E65])+1;&quot;&quot;))">
            <text:p/>
          </table:table-cell>
          <table:table-cell table:style-name="ce32"/>
          <table:table-cell table:style-name="ce32" table:formula="of:=IF([.$H66]=&quot;&quot;;&quot;&quot;;IF([.$G65]=&quot;&quot;;1;[.$G65]+1))" office:value-type="float" office:value="5" calcext:value-type="float">
            <text:p>5</text:p>
          </table:table-cell>
          <table:table-cell table:style-name="ce32" office:value-type="string" calcext:value-type="string">
            <text:p>オリジナル機能のモック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5" calcext:value-type="date">
            <text:p>2026/06/05</text:p>
          </table:table-cell>
          <table:table-cell table:number-columns-repeated="2" table:style-name="ce38" office:value-type="date" office:date-value="2026-06-04" calcext:value-type="date">
            <text:p>2026/06/04</text:p>
          </table:table-cell>
          <table:table-cell table:style-name="ce32" table:formula="of:=IF([.$L66]&lt;&gt;&quot;&quot;;NETWORKDAYS([.$L66];[.$M66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66]=&quot;&quot;;[.$L66]&lt;&gt;&quot;&quot;;[.$L66]&lt;=[.$U$1]);AND([.$M66]&lt;&gt;&quot;&quot;;[.Q66]&lt;100;[.$M66]&lt;=[.$U$1]));&quot;遅延&quot;;&quot;&quot;)">
            <text:p/>
          </table:table-cell>
          <table:table-cell table:style-name="ce66"/>
          <table:table-cell table:style-name="ce66" table:formula="of:=SUM([.$V66:.$FM6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7]&lt;&gt;&quot;&quot;;[.$F67]=&quot;&quot;);&quot;E&quot;&amp;ROW();[.$B66])" office:value-type="string" office:string-value="E42" calcext:value-type="string">
            <text:p>E42</text:p>
          </table:table-cell>
          <table:table-cell table:style-name="ce13" table:formula="of:=IF(AND([.$D67]&lt;&gt;&quot;&quot;;[.$D67]&lt;&gt;&quot;○&quot;);MAX([.$C$3:.$C66])+1;[.$C66])" office:value-type="float" office:value="3" calcext:value-type="float">
            <text:p>3</text:p>
          </table:table-cell>
          <table:table-cell table:style-name="ce19"/>
          <table:table-cell table:style-name="ce27" table:formula="of:=IF(AND([.$F67]&lt;&gt;&quot;&quot;;[.$D66]&lt;&gt;&quot;&quot;);1;IF([.$F67]&lt;&gt;&quot;&quot;;MAX(INDIRECT([.$B67]):[.$E66])+1;&quot;&quot;))">
            <text:p/>
          </table:table-cell>
          <table:table-cell table:style-name="ce32"/>
          <table:table-cell table:style-name="ce32" table:formula="of:=IF([.$H67]=&quot;&quot;;&quot;&quot;;IF([.$G66]=&quot;&quot;;1;[.$G66]+1))" office:value-type="float" office:value="6" calcext:value-type="float">
            <text:p>6</text:p>
          </table:table-cell>
          <table:table-cell table:style-name="ce32" office:value-type="string" calcext:value-type="string">
            <text:p>オリジナル機能の詳細設計書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5" calcext:value-type="date">
            <text:p>2026/06/05</text:p>
          </table:table-cell>
          <table:table-cell table:number-columns-repeated="2" table:style-name="ce38" office:value-type="date" office:date-value="2026-06-04" calcext:value-type="date">
            <text:p>2026/06/04</text:p>
          </table:table-cell>
          <table:table-cell table:style-name="ce32" table:formula="of:=IF([.$L67]&lt;&gt;&quot;&quot;;NETWORKDAYS([.$L67];[.$M67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67]=&quot;&quot;;[.$L67]&lt;&gt;&quot;&quot;;[.$L67]&lt;=[.$U$1]);AND([.$M67]&lt;&gt;&quot;&quot;;[.Q67]&lt;100;[.$M67]&lt;=[.$U$1]));&quot;遅延&quot;;&quot;&quot;)">
            <text:p/>
          </table:table-cell>
          <table:table-cell table:style-name="ce66"/>
          <table:table-cell table:style-name="ce66" table:formula="of:=SUM([.$V67:.$FM6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 table:formula="of:=IF(AND([.$F68]&lt;&gt;&quot;&quot;;[.$D67]&lt;&gt;&quot;&quot;);1;IF([.$F68]&lt;&gt;&quot;&quot;;MAX(INDIRECT([.$B68]):[.$E67])+1;&quot;&quot;))">
            <text:p/>
          </table:table-cell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9]&lt;&gt;&quot;&quot;;[.$F69]=&quot;&quot;);&quot;E&quot;&amp;ROW();[.$B66])" office:value-type="string" office:string-value="E42" calcext:value-type="string">
            <text:p>E42</text:p>
          </table:table-cell>
          <table:table-cell table:style-name="ce13" table:formula="of:=IF(AND([.$D69]&lt;&gt;&quot;&quot;;[.$D69]&lt;&gt;&quot;○&quot;);MAX([.$C$3:.$C67])+1;[.$C67])" office:value-type="float" office:value="3" calcext:value-type="float">
            <text:p>3</text:p>
          </table:table-cell>
          <table:table-cell table:style-name="ce19"/>
          <table:table-cell table:style-name="ce27" table:formula="of:=IF(AND([.$F69]&lt;&gt;&quot;&quot;;[.$D68]&lt;&gt;&quot;&quot;);1;IF([.$F69]&lt;&gt;&quot;&quot;;MAX(INDIRECT([.$B69]):[.$E68])+1;&quot;&quot;))" office:value-type="float" office:value="5" calcext:value-type="float">
            <text:p>5</text:p>
          </table:table-cell>
          <table:table-cell table:style-name="ce32" office:value-type="string" calcext:value-type="string">
            <text:p>仕様書レビュー</text:p>
          </table:table-cell>
          <table:table-cell table:style-name="ce32" table:formula="of:=IF([.$H69]=&quot;&quot;;&quot;&quot;;IF([.$G67]=&quot;&quot;;1;[.$G67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5" calcext:value-type="date">
            <text:p>2026/06/05</text:p>
          </table:table-cell>
          <table:table-cell table:style-name="ce38" office:value-type="date" office:date-value="2026-06-08" calcext:value-type="date">
            <text:p>2026/06/08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69]&lt;&gt;&quot;&quot;;NETWORKDAYS([.$L69];[.$M69];[$休日.$B$4:.$B$304]);&quot;&quot;)" office:value-type="float" office:value="2" calcext:value-type="float">
            <text:p>2</text:p>
          </table:table-cell>
          <table:table-cell table:style-name="ce232" office:value-type="float" office:value="100" calcext:value-type="float">
            <text:p>100</text:p>
          </table:table-cell>
          <table:table-cell table:style-name="ce63" table:formula="of:=IF(OR(AND([.$N69]=&quot;&quot;;[.$L69]&lt;&gt;&quot;&quot;;[.$L69]&lt;=[.$U$1]);AND([.$M69]&lt;&gt;&quot;&quot;;[.Q69]&lt;100;[.$M69]&lt;=[.$U$1]));&quot;遅延&quot;;&quot;&quot;)">
            <text:p/>
          </table:table-cell>
          <table:table-cell table:style-name="ce66"/>
          <table:table-cell table:style-name="ce66" table:formula="of:=SUM([.$V69:.$FM6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0]&lt;&gt;&quot;&quot;;[.$F70]=&quot;&quot;);&quot;E&quot;&amp;ROW();[.$B69])" office:value-type="string" office:string-value="E42" calcext:value-type="string">
            <text:p>E42</text:p>
          </table:table-cell>
          <table:table-cell table:style-name="ce13" table:formula="of:=IF(AND([.$D70]&lt;&gt;&quot;&quot;;[.$D70]&lt;&gt;&quot;○&quot;);MAX([.$C$3:.$C69])+1;[.$C69])" office:value-type="float" office:value="3" calcext:value-type="float">
            <text:p>3</text:p>
          </table:table-cell>
          <table:table-cell table:style-name="ce19"/>
          <table:table-cell table:style-name="ce27" table:formula="of:=IF(AND([.$F70]&lt;&gt;&quot;&quot;;[.$D69]&lt;&gt;&quot;&quot;);1;IF([.$F70]&lt;&gt;&quot;&quot;;MAX(INDIRECT([.$B70]):[.$E69])+1;&quot;&quot;))">
            <text:p/>
          </table:table-cell>
          <table:table-cell table:style-name="ce32"/>
          <table:table-cell table:style-name="ce32" table:formula="of:=IF([.$H70]=&quot;&quot;;&quot;&quot;;IF([.$G69]=&quot;&quot;;1;[.$G69]+1))" office:value-type="float" office:value="1" calcext:value-type="float">
            <text:p>1</text:p>
          </table:table-cell>
          <table:table-cell table:style-name="ce32" office:value-type="string" calcext:value-type="string">
            <text:p>発注者への仕様書の内容説明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5" calcext:value-type="date">
            <text:p>2026/06/05</text:p>
          </table:table-cell>
          <table:table-cell table:style-name="ce32" table:formula="of:=IF([.$L70]&lt;&gt;&quot;&quot;;NETWORKDAYS([.$L70];[.$M70];[$休日.$B$4:.$B$304]);&quot;&quot;)" office:value-type="float" office:value="1" calcext:value-type="float">
            <text:p>1</text:p>
          </table:table-cell>
          <table:table-cell table:style-name="ce232" office:value-type="float" office:value="100" calcext:value-type="float">
            <text:p>100</text:p>
          </table:table-cell>
          <table:table-cell table:style-name="ce63" table:formula="of:=IF(OR(AND([.$N70]=&quot;&quot;;[.$L70]&lt;&gt;&quot;&quot;;[.$L70]&lt;=[.$U$1]);AND([.$M70]&lt;&gt;&quot;&quot;;[.Q70]&lt;100;[.$M70]&lt;=[.$U$1]));&quot;遅延&quot;;&quot;&quot;)">
            <text:p/>
          </table:table-cell>
          <table:table-cell table:style-name="ce66"/>
          <table:table-cell table:style-name="ce66" table:formula="of:=SUM([.$V70:.$FM7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1]&lt;&gt;&quot;&quot;;[.$F71]=&quot;&quot;);&quot;E&quot;&amp;ROW();[.$B70])" office:value-type="string" office:string-value="E42" calcext:value-type="string">
            <text:p>E42</text:p>
          </table:table-cell>
          <table:table-cell table:style-name="ce13" table:formula="of:=IF(AND([.$D71]&lt;&gt;&quot;&quot;;[.$D71]&lt;&gt;&quot;○&quot;);MAX([.$C$3:.$C70])+1;[.$C70])" office:value-type="float" office:value="3" calcext:value-type="float">
            <text:p>3</text:p>
          </table:table-cell>
          <table:table-cell table:style-name="ce19"/>
          <table:table-cell table:style-name="ce27" table:formula="of:=IF(AND([.$F71]&lt;&gt;&quot;&quot;;[.$D70]&lt;&gt;&quot;&quot;);1;IF([.$F71]&lt;&gt;&quot;&quot;;MAX(INDIRECT([.$B71]):[.$E70])+1;&quot;&quot;))">
            <text:p/>
          </table:table-cell>
          <table:table-cell table:style-name="ce32"/>
          <table:table-cell table:style-name="ce32" table:formula="of:=IF([.$H71]=&quot;&quot;;&quot;&quot;;IF([.$G70]=&quot;&quot;;1;[.$G70]+1))" office:value-type="float" office:value="2" calcext:value-type="float">
            <text:p>2</text:p>
          </table:table-cell>
          <table:table-cell table:style-name="ce32" office:value-type="string" calcext:value-type="string">
            <text:p>設計書類へのレビュー内容反映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5" calcext:value-type="date">
            <text:p>2026/06/05</text:p>
          </table:table-cell>
          <table:table-cell table:style-name="ce32" table:formula="of:=IF([.$L71]&lt;&gt;&quot;&quot;;NETWORKDAYS([.$L71];[.$M71];[$休日.$B$4:.$B$304]);&quot;&quot;)" office:value-type="float" office:value="1" calcext:value-type="float">
            <text:p>1</text:p>
          </table:table-cell>
          <table:table-cell table:style-name="ce232" office:value-type="float" office:value="100" calcext:value-type="float">
            <text:p>100</text:p>
          </table:table-cell>
          <table:table-cell table:style-name="ce63" table:formula="of:=IF(OR(AND([.$N71]=&quot;&quot;;[.$L71]&lt;&gt;&quot;&quot;;[.$L71]&lt;=[.$U$1]);AND([.$M71]&lt;&gt;&quot;&quot;;[.Q71]&lt;100;[.$M71]&lt;=[.$U$1]));&quot;遅延&quot;;&quot;&quot;)">
            <text:p/>
          </table:table-cell>
          <table:table-cell table:style-name="ce66"/>
          <table:table-cell table:style-name="ce66" table:formula="of:=SUM([.$V71:.$FM7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 table:style-name="ce2"/>
          <table:table-cell table:style-name="ce7" table:formula="of:=IF(AND([.$D72]&lt;&gt;&quot;&quot;;[.$F72]=&quot;&quot;);&quot;E&quot;&amp;ROW();[.$B71])" office:value-type="string" office:string-value="E42" calcext:value-type="string">
            <text:p>E42</text:p>
          </table:table-cell>
          <table:table-cell table:style-name="ce13" table:formula="of:=IF(AND([.$D72]&lt;&gt;&quot;&quot;;[.$D72]&lt;&gt;&quot;○&quot;);MAX([.$C$3:.$C71])+1;[.$C71])" office:value-type="float" office:value="3" calcext:value-type="float">
            <text:p>3</text:p>
          </table:table-cell>
          <table:table-cell table:style-name="ce19"/>
          <table:table-cell table:style-name="ce27" table:formula="of:=IF(AND([.$F72]&lt;&gt;&quot;&quot;;[.$D71]&lt;&gt;&quot;&quot;);1;IF([.$F72]&lt;&gt;&quot;&quot;;MAX(INDIRECT([.$B72]):[.$E71])+1;&quot;&quot;))">
            <text:p/>
          </table:table-cell>
          <table:table-cell table:style-name="ce32"/>
          <table:table-cell table:style-name="ce32" table:formula="of:=IF([.$H72]=&quot;&quot;;&quot;&quot;;IF([.$G71]=&quot;&quot;;1;[.$G71]+1))" office:value-type="float" office:value="3" calcext:value-type="float">
            <text:p>3</text:p>
          </table:table-cell>
          <table:table-cell table:style-name="ce32" office:value-type="string" calcext:value-type="string">
            <text:p>再レビューの依頼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5" calcext:value-type="date">
            <text:p>2026/06/05</text:p>
          </table:table-cell>
          <table:table-cell table:style-name="ce32" table:formula="of:=IF([.$L72]&lt;&gt;&quot;&quot;;NETWORKDAYS([.$L72];[.$M72];[$休日.$B$4:.$B$304]);&quot;&quot;)" office:value-type="float" office:value="1" calcext:value-type="float">
            <text:p>1</text:p>
          </table:table-cell>
          <table:table-cell table:style-name="ce232" office:value-type="float" office:value="100" calcext:value-type="float">
            <text:p>100</text:p>
          </table:table-cell>
          <table:table-cell table:style-name="ce63" table:formula="of:=IF(OR(AND([.$N72]=&quot;&quot;;[.$L72]&lt;&gt;&quot;&quot;;[.$L72]&lt;=[.$U$1]);AND([.$M72]&lt;&gt;&quot;&quot;;[.Q72]&lt;100;[.$M72]&lt;=[.$U$1]));&quot;遅延&quot;;&quot;&quot;)">
            <text:p/>
          </table:table-cell>
          <table:table-cell table:style-name="ce66"/>
          <table:table-cell table:style-name="ce66" table:formula="of:=SUM([.$V72:.$FM7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3]&lt;&gt;&quot;&quot;;[.$F73]=&quot;&quot;);&quot;E&quot;&amp;ROW();[.$B72])" office:value-type="string" office:string-value="E42" calcext:value-type="string">
            <text:p>E42</text:p>
          </table:table-cell>
          <table:table-cell table:style-name="ce13" table:formula="of:=IF(AND([.$D73]&lt;&gt;&quot;&quot;;[.$D73]&lt;&gt;&quot;○&quot;);MAX([.$C$3:.$C72])+1;[.$C72])" office:value-type="float" office:value="3" calcext:value-type="float">
            <text:p>3</text:p>
          </table:table-cell>
          <table:table-cell table:style-name="ce19"/>
          <table:table-cell table:style-name="ce27" table:formula="of:=IF(AND([.$F73]&lt;&gt;&quot;&quot;;[.$D72]&lt;&gt;&quot;&quot;);1;IF([.$F73]&lt;&gt;&quot;&quot;;MAX(INDIRECT([.$B73]):[.$E72])+1;&quot;&quot;))">
            <text:p/>
          </table:table-cell>
          <table:table-cell table:style-name="ce32"/>
          <table:table-cell table:style-name="ce32" table:formula="of:=IF([.$H73]=&quot;&quot;;&quot;&quot;;IF([.$G72]=&quot;&quot;;1;[.$G72]+1))" office:value-type="float" office:value="4" calcext:value-type="float">
            <text:p>4</text:p>
          </table:table-cell>
          <table:table-cell table:style-name="ce32" office:value-type="string" calcext:value-type="string">
            <text:p>仕様書の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73]&lt;&gt;&quot;&quot;;NETWORKDAYS([.$L73];[.$M73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73]=&quot;&quot;;[.$L73]&lt;&gt;&quot;&quot;;[.$L73]&lt;=[.$U$1]);AND([.$M73]&lt;&gt;&quot;&quot;;[.Q73]&lt;100;[.$M73]&lt;=[.$U$1]));&quot;遅延&quot;;&quot;&quot;)">
            <text:p/>
          </table:table-cell>
          <table:table-cell table:style-name="ce66"/>
          <table:table-cell table:style-name="ce66" table:formula="of:=SUM([.$V73:.$FM7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 table:formula="of:=IF(AND([.$F74]&lt;&gt;&quot;&quot;;[.$D73]&lt;&gt;&quot;&quot;);1;IF([.$F74]&lt;&gt;&quot;&quot;;MAX(INDIRECT([.$B74]):[.$E73])+1;&quot;&quot;))">
            <text:p/>
          </table:table-cell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75]&lt;&gt;&quot;&quot;;[.$F75]=&quot;&quot;);&quot;E&quot;&amp;ROW();[.$B73])" office:value-type="string" office:string-value="E75" calcext:value-type="string">
            <text:p>E75</text:p>
          </table:table-cell>
          <table:table-cell table:style-name="ce13" table:formula="of:=IF(AND([.$D75]&lt;&gt;&quot;&quot;;[.$D75]&lt;&gt;&quot;○&quot;);MAX([.$C$3:.$C73])+1;[.$C41])" office:value-type="float" office:value="4" calcext:value-type="float">
            <text:p>4</text:p>
          </table:table-cell>
          <table:table-cell table:style-name="ce19" office:value-type="string" calcext:value-type="string">
            <text:p>準備</text:p>
          </table:table-cell>
          <table:table-cell table:style-name="ce27" table:formula="of:=IF(AND([.$F75]&lt;&gt;&quot;&quot;;[.$D74]&lt;&gt;&quot;&quot;);1;IF([.$F75]&lt;&gt;&quot;&quot;;MAX(INDIRECT([.$B75]):[.$E74])+1;&quot;&quot;))">
            <text:p/>
          </table:table-cell>
          <table:table-cell table:style-name="ce32"/>
          <table:table-cell table:style-name="ce32" table:formula="of:=IF([.$H75]=&quot;&quot;;&quot;&quot;;IF([.$G41]=&quot;&quot;;1;[.$G41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75]&lt;&gt;&quot;&quot;;NETWORKDAYS([.$L75];[.$M75];[$休日.$B$4:.$B$304]);&quot;&quot;)" office:value-type="float" office:value="1" calcext:value-type="float">
            <text:p>1</text:p>
          </table:table-cell>
          <table:table-cell table:style-name="ce235" office:value-type="float" office:value="100" calcext:value-type="float">
            <text:p>100</text:p>
          </table:table-cell>
          <table:table-cell table:style-name="ce63" table:formula="of:=IF(OR(AND([.$N75]=&quot;&quot;;[.$L75]&lt;&gt;&quot;&quot;;[.$L75]&lt;=[.$U$1]);AND([.$M75]&lt;&gt;&quot;&quot;;[.Q75]&lt;100;[.$M75]&lt;=[.$U$1]));&quot;遅延&quot;;&quot;&quot;)">
            <text:p/>
          </table:table-cell>
          <table:table-cell table:style-name="ce66"/>
          <table:table-cell table:style-name="ce66" table:formula="of:=SUM([.$V75:.$FM7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6]&lt;&gt;&quot;&quot;;[.$F76]=&quot;&quot;);&quot;E&quot;&amp;ROW();[.$B75])" office:value-type="string" office:string-value="E75" calcext:value-type="string">
            <text:p>E75</text:p>
          </table:table-cell>
          <table:table-cell table:style-name="ce13" table:formula="of:=IF(AND([.$D76]&lt;&gt;&quot;&quot;;[.$D76]&lt;&gt;&quot;○&quot;);MAX([.$C$3:.$C75])+1;[.$C75])" office:value-type="float" office:value="4" calcext:value-type="float">
            <text:p>4</text:p>
          </table:table-cell>
          <table:table-cell table:style-name="ce19"/>
          <table:table-cell table:style-name="ce27" table:formula="of:=IF(AND([.$F76]&lt;&gt;&quot;&quot;;[.$D75]&lt;&gt;&quot;&quot;);1;IF([.$F76]&lt;&gt;&quot;&quot;;MAX(INDIRECT([.$B76]):[.$E75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コーディング規約・命名規則の決定</text:p>
          </table:table-cell>
          <table:table-cell table:style-name="ce32" table:formula="of:=IF([.$H76]=&quot;&quot;;&quot;&quot;;IF([.$G75]=&quot;&quot;;1;[.$G75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76]&lt;&gt;&quot;&quot;;NETWORKDAYS([.$L76];[.$M76];[$休日.$B$4:.$B$304]);&quot;&quot;)" office:value-type="float" office:value="1" calcext:value-type="float">
            <text:p>1</text:p>
          </table:table-cell>
          <table:table-cell table:style-name="ce226" office:value-type="float" office:value="100" calcext:value-type="float">
            <text:p>100</text:p>
          </table:table-cell>
          <table:table-cell table:style-name="ce63" table:formula="of:=IF(OR(AND([.$N76]=&quot;&quot;;[.$L76]&lt;&gt;&quot;&quot;;[.$L76]&lt;=[.$U$1]);AND([.$M76]&lt;&gt;&quot;&quot;;[.Q76]&lt;100;[.$M76]&lt;=[.$U$1]));&quot;遅延&quot;;&quot;&quot;)">
            <text:p/>
          </table:table-cell>
          <table:table-cell table:style-name="ce66"/>
          <table:table-cell table:style-name="ce66" table:formula="of:=SUM([.$V76:.$FM7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7]&lt;&gt;&quot;&quot;;[.$F77]=&quot;&quot;);&quot;E&quot;&amp;ROW();[.$B76])" office:value-type="string" office:string-value="E75" calcext:value-type="string">
            <text:p>E75</text:p>
          </table:table-cell>
          <table:table-cell table:style-name="ce13" table:formula="of:=IF(AND([.$D77]&lt;&gt;&quot;&quot;;[.$D77]&lt;&gt;&quot;○&quot;);MAX([.$C$3:.$C76])+1;[.$C76])" office:value-type="float" office:value="4" calcext:value-type="float">
            <text:p>4</text:p>
          </table:table-cell>
          <table:table-cell table:style-name="ce19"/>
          <table:table-cell table:style-name="ce27" table:formula="of:=IF(AND([.$F77]&lt;&gt;&quot;&quot;;[.$D76]&lt;&gt;&quot;&quot;);1;IF([.$F77]&lt;&gt;&quot;&quot;;MAX(INDIRECT([.$B77]):[.$E76])+1;&quot;&quot;))">
            <text:p/>
          </table:table-cell>
          <table:table-cell table:style-name="ce32"/>
          <table:table-cell table:style-name="ce32" table:formula="of:=IF([.$H77]=&quot;&quot;;&quot;&quot;;IF([.$G76]=&quot;&quot;;1;[.$G76]+1))" office:value-type="float" office:value="1" calcext:value-type="float">
            <text:p>1</text:p>
          </table:table-cell>
          <table:table-cell table:style-name="ce32" office:value-type="string" calcext:value-type="string">
            <text:p>コーディング規約・命名規則の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77]&lt;&gt;&quot;&quot;;NETWORKDAYS([.$L77];[.$M77];[$休日.$B$4:.$B$304]);&quot;&quot;)" office:value-type="float" office:value="1" calcext:value-type="float">
            <text:p>1</text:p>
          </table:table-cell>
          <table:table-cell table:style-name="ce226" office:value-type="float" office:value="100" calcext:value-type="float">
            <text:p>100</text:p>
          </table:table-cell>
          <table:table-cell table:style-name="ce63" table:formula="of:=IF(OR(AND([.$N77]=&quot;&quot;;[.$L77]&lt;&gt;&quot;&quot;;[.$L77]&lt;=[.$U$1]);AND([.$M77]&lt;&gt;&quot;&quot;;[.Q77]&lt;100;[.$M77]&lt;=[.$U$1]));&quot;遅延&quot;;&quot;&quot;)">
            <text:p/>
          </table:table-cell>
          <table:table-cell table:style-name="ce66"/>
          <table:table-cell table:style-name="ce66" table:formula="of:=SUM([.$V77:.$FM7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78]&lt;&gt;&quot;&quot;;[.$F78]=&quot;&quot;);&quot;E&quot;&amp;ROW();[.$B77])" office:value-type="string" office:string-value="E75" calcext:value-type="string">
            <text:p>E75</text:p>
          </table:table-cell>
          <table:table-cell table:style-name="ce13" table:formula="of:=IF(AND([.$D78]&lt;&gt;&quot;&quot;;[.$D78]&lt;&gt;&quot;○&quot;);MAX([.$C$3:.$C77])+1;[.$C77])" office:value-type="float" office:value="4" calcext:value-type="float">
            <text:p>4</text:p>
          </table:table-cell>
          <table:table-cell table:style-name="ce19"/>
          <table:table-cell table:style-name="ce27" table:formula="of:=IF(AND([.$F78]&lt;&gt;&quot;&quot;;[.$D77]&lt;&gt;&quot;&quot;);1;IF([.$F78]&lt;&gt;&quot;&quot;;MAX(INDIRECT([.$B78]):[.$E77])+1;&quot;&quot;))">
            <text:p/>
          </table:table-cell>
          <table:table-cell table:style-name="ce32"/>
          <table:table-cell table:style-name="ce32" table:formula="of:=IF([.$H78]=&quot;&quot;;&quot;&quot;;IF([.$G77]=&quot;&quot;;1;[.$G77]+1))" office:value-type="float" office:value="2" calcext:value-type="float">
            <text:p>2</text:p>
          </table:table-cell>
          <table:table-cell table:style-name="ce32" office:value-type="string" calcext:value-type="string">
            <text:p>チーム内での認識合わせ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78]&lt;&gt;&quot;&quot;;NETWORKDAYS([.$L78];[.$M78];[$休日.$B$4:.$B$304]);&quot;&quot;)" office:value-type="float" office:value="1" calcext:value-type="float">
            <text:p>1</text:p>
          </table:table-cell>
          <table:table-cell table:style-name="ce226" office:value-type="float" office:value="100" calcext:value-type="float">
            <text:p>100</text:p>
          </table:table-cell>
          <table:table-cell table:style-name="ce63" table:formula="of:=IF(OR(AND([.$N78]=&quot;&quot;;[.$L78]&lt;&gt;&quot;&quot;;[.$L78]&lt;=[.$U$1]);AND([.$M78]&lt;&gt;&quot;&quot;;[.Q78]&lt;100;[.$M78]&lt;=[.$U$1]));&quot;遅延&quot;;&quot;&quot;)">
            <text:p/>
          </table:table-cell>
          <table:table-cell table:style-name="ce66"/>
          <table:table-cell table:style-name="ce66" table:formula="of:=SUM([.$V78:.$FM7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9]&lt;&gt;&quot;&quot;;[.$F79]=&quot;&quot;);&quot;E&quot;&amp;ROW();[.$B78])" office:value-type="string" office:string-value="E75" calcext:value-type="string">
            <text:p>E75</text:p>
          </table:table-cell>
          <table:table-cell table:style-name="ce13" table:formula="of:=IF(AND([.$D79]&lt;&gt;&quot;&quot;;[.$D79]&lt;&gt;&quot;○&quot;);MAX([.$C$3:.$C78])+1;[.$C78])" office:value-type="float" office:value="4" calcext:value-type="float">
            <text:p>4</text:p>
          </table:table-cell>
          <table:table-cell table:style-name="ce19"/>
          <table:table-cell table:style-name="ce27" table:formula="of:=IF(AND([.$F79]&lt;&gt;&quot;&quot;;[.$D78]&lt;&gt;&quot;&quot;);1;IF([.$F79]&lt;&gt;&quot;&quot;;MAX(INDIRECT([.$B79]):[.$E78])+1;&quot;&quot;))">
            <text:p/>
          </table:table-cell>
          <table:table-cell table:style-name="ce32"/>
          <table:table-cell table:style-name="ce32" table:formula="of:=IF([.$H79]=&quot;&quot;;&quot;&quot;;IF([.$G78]=&quot;&quot;;1;[.$G7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79]&lt;&gt;&quot;&quot;;NETWORKDAYS([.$L79];[.$M79];[$休日.$B$4:.$B$304]);&quot;&quot;)">
            <text:p/>
          </table:table-cell>
          <table:table-cell table:style-name="ce226"/>
          <table:table-cell table:style-name="ce63" table:formula="of:=IF(OR(AND([.$N79]=&quot;&quot;;[.$L79]&lt;&gt;&quot;&quot;;[.$L79]&lt;=[.$U$1]);AND([.$M79]&lt;&gt;&quot;&quot;;[.Q79]&lt;100;[.$M79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0]&lt;&gt;&quot;&quot;;[.$F80]=&quot;&quot;);&quot;E&quot;&amp;ROW();[.$B79])" office:value-type="string" office:string-value="E75" calcext:value-type="string">
            <text:p>E75</text:p>
          </table:table-cell>
          <table:table-cell table:style-name="ce13" table:formula="of:=IF(AND([.$D80]&lt;&gt;&quot;&quot;;[.$D80]&lt;&gt;&quot;○&quot;);MAX([.$C$3:.$C79])+1;[.$C79])" office:value-type="float" office:value="4" calcext:value-type="float">
            <text:p>4</text:p>
          </table:table-cell>
          <table:table-cell table:style-name="ce19"/>
          <table:table-cell table:style-name="ce27" table:formula="of:=IF(AND([.$F80]&lt;&gt;&quot;&quot;;[.$D79]&lt;&gt;&quot;&quot;);1;IF([.$F80]&lt;&gt;&quot;&quot;;MAX(INDIRECT([.$B80]):[.$E79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バージョン管理方法決定</text:p>
          </table:table-cell>
          <table:table-cell table:style-name="ce32" table:formula="of:=IF([.$H80]=&quot;&quot;;&quot;&quot;;IF([.$G79]=&quot;&quot;;1;[.$G79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80]&lt;&gt;&quot;&quot;;NETWORKDAYS([.$L80];[.$M80];[$休日.$B$4:.$B$304]);&quot;&quot;)" office:value-type="float" office:value="1" calcext:value-type="float">
            <text:p>1</text:p>
          </table:table-cell>
          <table:table-cell table:style-name="ce240" office:value-type="float" office:value="100" calcext:value-type="float">
            <text:p>100</text:p>
          </table:table-cell>
          <table:table-cell table:style-name="ce63" table:formula="of:=IF(OR(AND([.$N80]=&quot;&quot;;[.$L80]&lt;&gt;&quot;&quot;;[.$L80]&lt;=[.$U$1]);AND([.$M80]&lt;&gt;&quot;&quot;;[.Q80]&lt;100;[.$M80]&lt;=[.$U$1]));&quot;遅延&quot;;&quot;&quot;)">
            <text:p/>
          </table:table-cell>
          <table:table-cell table:style-name="ce66"/>
          <table:table-cell table:style-name="ce66" table:formula="of:=SUM([.$V80:.$FM8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1]&lt;&gt;&quot;&quot;;[.$F81]=&quot;&quot;);&quot;E&quot;&amp;ROW();[.$B80])" office:value-type="string" office:string-value="E75" calcext:value-type="string">
            <text:p>E75</text:p>
          </table:table-cell>
          <table:table-cell table:style-name="ce13" table:formula="of:=IF(AND([.$D81]&lt;&gt;&quot;&quot;;[.$D81]&lt;&gt;&quot;○&quot;);MAX([.$C$3:.$C80])+1;[.$C80])" office:value-type="float" office:value="4" calcext:value-type="float">
            <text:p>4</text:p>
          </table:table-cell>
          <table:table-cell table:style-name="ce19"/>
          <table:table-cell table:style-name="ce27" table:formula="of:=IF(AND([.$F81]&lt;&gt;&quot;&quot;;[.$D80]&lt;&gt;&quot;&quot;);1;IF([.$F81]&lt;&gt;&quot;&quot;;MAX(INDIRECT([.$B81]):[.$E80])+1;&quot;&quot;))">
            <text:p/>
          </table:table-cell>
          <table:table-cell table:style-name="ce32"/>
          <table:table-cell table:style-name="ce32" table:formula="of:=IF([.$H81]=&quot;&quot;;&quot;&quot;;IF([.$G80]=&quot;&quot;;1;[.$G80]+1))" office:value-type="float" office:value="1" calcext:value-type="float">
            <text:p>1</text:p>
          </table:table-cell>
          <table:table-cell table:style-name="ce32" office:value-type="string" calcext:value-type="string">
            <text:p>具体的なバージョン管理手順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81]&lt;&gt;&quot;&quot;;NETWORKDAYS([.$L81];[.$M81];[$休日.$B$4:.$B$304]);&quot;&quot;)" office:value-type="float" office:value="1" calcext:value-type="float">
            <text:p>1</text:p>
          </table:table-cell>
          <table:table-cell table:style-name="ce240" office:value-type="float" office:value="100" calcext:value-type="float">
            <text:p>100</text:p>
          </table:table-cell>
          <table:table-cell table:style-name="ce63" table:formula="of:=IF(OR(AND([.$N81]=&quot;&quot;;[.$L81]&lt;&gt;&quot;&quot;;[.$L81]&lt;=[.$U$1]);AND([.$M81]&lt;&gt;&quot;&quot;;[.Q81]&lt;100;[.$M81]&lt;=[.$U$1]));&quot;遅延&quot;;&quot;&quot;)">
            <text:p/>
          </table:table-cell>
          <table:table-cell table:style-name="ce66"/>
          <table:table-cell table:style-name="ce66" table:formula="of:=SUM([.$V81:.$FM8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2]&lt;&gt;&quot;&quot;;[.$F82]=&quot;&quot;);&quot;E&quot;&amp;ROW();[.$B81])" office:value-type="string" office:string-value="E75" calcext:value-type="string">
            <text:p>E75</text:p>
          </table:table-cell>
          <table:table-cell table:style-name="ce13" table:formula="of:=IF(AND([.$D82]&lt;&gt;&quot;&quot;;[.$D82]&lt;&gt;&quot;○&quot;);MAX([.$C$3:.$C81])+1;[.$C81])" office:value-type="float" office:value="4" calcext:value-type="float">
            <text:p>4</text:p>
          </table:table-cell>
          <table:table-cell table:style-name="ce19"/>
          <table:table-cell table:style-name="ce27" table:formula="of:=IF(AND([.$F82]&lt;&gt;&quot;&quot;;[.$D81]&lt;&gt;&quot;&quot;);1;IF([.$F82]&lt;&gt;&quot;&quot;;MAX(INDIRECT([.$B82]):[.$E81])+1;&quot;&quot;))">
            <text:p/>
          </table:table-cell>
          <table:table-cell table:style-name="ce32"/>
          <table:table-cell table:style-name="ce32" table:formula="of:=IF([.$H82]=&quot;&quot;;&quot;&quot;;IF([.$G81]=&quot;&quot;;1;[.$G81]+1))" office:value-type="float" office:value="2" calcext:value-type="float">
            <text:p>2</text:p>
          </table:table-cell>
          <table:table-cell table:style-name="ce32" office:value-type="string" calcext:value-type="string">
            <text:p>バージョン管理の操作方法確認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82]&lt;&gt;&quot;&quot;;NETWORKDAYS([.$L82];[.$M82];[$休日.$B$4:.$B$304]);&quot;&quot;)" office:value-type="float" office:value="1" calcext:value-type="float">
            <text:p>1</text:p>
          </table:table-cell>
          <table:table-cell table:style-name="ce240" office:value-type="float" office:value="100" calcext:value-type="float">
            <text:p>100</text:p>
          </table:table-cell>
          <table:table-cell table:style-name="ce63" table:formula="of:=IF(OR(AND([.$N82]=&quot;&quot;;[.$L82]&lt;&gt;&quot;&quot;;[.$L82]&lt;=[.$U$1]);AND([.$M82]&lt;&gt;&quot;&quot;;[.Q82]&lt;100;[.$M82]&lt;=[.$U$1]));&quot;遅延&quot;;&quot;&quot;)">
            <text:p/>
          </table:table-cell>
          <table:table-cell table:style-name="ce66"/>
          <table:table-cell table:style-name="ce66" table:formula="of:=SUM([.$V82:.$FM8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3]&lt;&gt;&quot;&quot;;[.$F83]=&quot;&quot;);&quot;E&quot;&amp;ROW();[.$B82])" office:value-type="string" office:string-value="E75" calcext:value-type="string">
            <text:p>E75</text:p>
          </table:table-cell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2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4]&lt;&gt;&quot;&quot;;[.$F84]=&quot;&quot;);&quot;E&quot;&amp;ROW();[.$B83])" office:value-type="string" office:string-value="E84" calcext:value-type="string">
            <text:p>E84</text:p>
          </table:table-cell>
          <table:table-cell table:style-name="ce13" table:formula="of:=IF(AND([.$D84]&lt;&gt;&quot;&quot;;[.$D84]&lt;&gt;&quot;○&quot;);MAX([.$C$3:.$C82])+1;[.$C82])" office:value-type="float" office:value="5" calcext:value-type="float">
            <text:p>5</text:p>
          </table:table-cell>
          <table:table-cell table:style-name="ce19" office:value-type="string" calcext:value-type="string">
            <text:p>汎用</text:p>
          </table:table-cell>
          <table:table-cell table:style-name="ce27"/>
          <table:table-cell table:style-name="ce32" table:number-columns-repeated="4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84]&lt;&gt;&quot;&quot;;NETWORKDAYS([.$L84];[.$M84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5]&lt;&gt;&quot;&quot;;[.$F85]=&quot;&quot;);&quot;E&quot;&amp;ROW();[.$B84])" office:value-type="string" office:string-value="E84" calcext:value-type="string">
            <text:p>E84</text:p>
          </table:table-cell>
          <table:table-cell table:style-name="ce13" table:formula="of:=IF(AND([.$D85]&lt;&gt;&quot;&quot;;[.$D85]&lt;&gt;&quot;○&quot;);MAX([.$C$3:.$C84])+1;[.$C84])" office:value-type="float" office:value="5" calcext:value-type="float">
            <text:p>5</text:p>
          </table:table-cell>
          <table:table-cell table:style-name="ce19"/>
          <table:table-cell table:style-name="ce27" table:formula="of:=IF(AND([.$F85]&lt;&gt;&quot;&quot;;[.$D84]&lt;&gt;&quot;&quot;);1;IF([.$F85]&lt;&gt;&quot;&quot;;MAX(INDIRECT([.$B85]):[.$E84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ログイン・ログアウト機能の実装</text:p>
          </table:table-cell>
          <table:table-cell table:style-name="ce32" table:formula="of:=IF([.$H85]=&quot;&quot;;&quot;&quot;;IF([.$G82]=&quot;&quot;;1;[.$G82]+1))">
            <text:p/>
          </table:table-cell>
          <table:table-cell table:style-name="ce32" table:number-columns-repeated="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85]&lt;&gt;&quot;&quot;;NETWORKDAYS([.$L85];[.$M85];[$休日.$B$4:.$B$304]);&quot;&quot;)" office:value-type="float" office:value="1" calcext:value-type="float">
            <text:p>1</text:p>
          </table:table-cell>
          <table:table-cell table:style-name="ce242" office:value-type="float" office:value="100" calcext:value-type="float">
            <text:p>100</text:p>
          </table:table-cell>
          <table:table-cell table:style-name="ce63" table:formula="of:=IF(OR(AND([.$N85]=&quot;&quot;;[.$L85]&lt;&gt;&quot;&quot;;[.$L85]&lt;=[.$U$1]);AND([.$M85]&lt;&gt;&quot;&quot;;[.Q85]&lt;100;[.$M85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5:.$FM8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6]&lt;&gt;&quot;&quot;;[.$F86]=&quot;&quot;);&quot;E&quot;&amp;ROW();[.$B85])" office:value-type="string" office:string-value="E84" calcext:value-type="string">
            <text:p>E84</text:p>
          </table:table-cell>
          <table:table-cell table:style-name="ce13" table:formula="of:=IF(AND([.$D86]&lt;&gt;&quot;&quot;;[.$D86]&lt;&gt;&quot;○&quot;);MAX([.$C$3:.$C85])+1;[.$C85])" office:value-type="float" office:value="5" calcext:value-type="float">
            <text:p>5</text:p>
          </table:table-cell>
          <table:table-cell table:style-name="ce19"/>
          <table:table-cell table:style-name="ce27" table:formula="of:=IF(AND([.$F86]&lt;&gt;&quot;&quot;;[.$D85]&lt;&gt;&quot;&quot;);1;IF([.$F86]&lt;&gt;&quot;&quot;;MAX(INDIRECT([.$B86]):[.$E85])+1;&quot;&quot;))">
            <text:p/>
          </table:table-cell>
          <table:table-cell table:style-name="ce32"/>
          <table:table-cell table:style-name="ce32" table:formula="of:=IF([.$H86]=&quot;&quot;;&quot;&quot;;IF([.$G85]=&quot;&quot;;1;[.$G85]+1))" office:value-type="float" office:value="1" calcext:value-type="float">
            <text:p>1</text:p>
          </table:table-cell>
          <table:table-cell table:style-name="ce32" office:value-type="string" calcext:value-type="string">
            <text:p>一覧表示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86]&lt;&gt;&quot;&quot;;NETWORKDAYS([.$L86];[.$M86];[$休日.$B$4:.$B$304]);&quot;&quot;)" office:value-type="float" office:value="1" calcext:value-type="float">
            <text:p>1</text:p>
          </table:table-cell>
          <table:table-cell table:style-name="ce242" office:value-type="float" office:value="100" calcext:value-type="float">
            <text:p>100</text:p>
          </table:table-cell>
          <table:table-cell table:style-name="ce63" table:formula="of:=IF(OR(AND([.$N86]=&quot;&quot;;[.$L86]&lt;&gt;&quot;&quot;;[.$L86]&lt;=[.$U$1]);AND([.$M86]&lt;&gt;&quot;&quot;;[.Q86]&lt;100;[.$M86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6:.$FM8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7]&lt;&gt;&quot;&quot;;[.$F87]=&quot;&quot;);&quot;E&quot;&amp;ROW();[.$B86])" office:value-type="string" office:string-value="E84" calcext:value-type="string">
            <text:p>E84</text:p>
          </table:table-cell>
          <table:table-cell table:style-name="ce13" table:formula="of:=IF(AND([.$D87]&lt;&gt;&quot;&quot;;[.$D87]&lt;&gt;&quot;○&quot;);MAX([.$C$3:.$C86])+1;[.$C86])" office:value-type="float" office:value="5" calcext:value-type="float">
            <text:p>5</text:p>
          </table:table-cell>
          <table:table-cell table:style-name="ce19"/>
          <table:table-cell table:style-name="ce27" table:formula="of:=IF(AND([.$F87]&lt;&gt;&quot;&quot;;[.$D86]&lt;&gt;&quot;&quot;);1;IF([.$F87]&lt;&gt;&quot;&quot;;MAX(INDIRECT([.$B87]):[.$E86])+1;&quot;&quot;))">
            <text:p/>
          </table:table-cell>
          <table:table-cell table:style-name="ce32"/>
          <table:table-cell table:style-name="ce32" table:formula="of:=IF([.$H87]=&quot;&quot;;&quot;&quot;;IF([.$G86]=&quot;&quot;;1;[.$G86]+1))" office:value-type="float" office:value="2" calcext:value-type="float">
            <text:p>2</text:p>
          </table:table-cell>
          <table:table-cell table:style-name="ce32" office:value-type="string" calcext:value-type="string">
            <text:p>コントローラの修正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87]&lt;&gt;&quot;&quot;;NETWORKDAYS([.$L87];[.$M87];[$休日.$B$4:.$B$304]);&quot;&quot;)" office:value-type="float" office:value="1" calcext:value-type="float">
            <text:p>1</text:p>
          </table:table-cell>
          <table:table-cell table:style-name="ce242" office:value-type="float" office:value="100" calcext:value-type="float">
            <text:p>100</text:p>
          </table:table-cell>
          <table:table-cell table:style-name="ce63" table:formula="of:=IF(OR(AND([.$N87]=&quot;&quot;;[.$L87]&lt;&gt;&quot;&quot;;[.$L87]&lt;=[.$U$1]);AND([.$M87]&lt;&gt;&quot;&quot;;[.Q87]&lt;100;[.$M87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7:.$FM8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8]&lt;&gt;&quot;&quot;;[.$F88]=&quot;&quot;);&quot;E&quot;&amp;ROW();[.$B87])" office:value-type="string" office:string-value="E84" calcext:value-type="string">
            <text:p>E84</text:p>
          </table:table-cell>
          <table:table-cell table:style-name="ce13" table:formula="of:=IF(AND([.$D88]&lt;&gt;&quot;&quot;;[.$D88]&lt;&gt;&quot;○&quot;);MAX([.$C$3:.$C87])+1;[.$C87])" office:value-type="float" office:value="5" calcext:value-type="float">
            <text:p>5</text:p>
          </table:table-cell>
          <table:table-cell table:style-name="ce19"/>
          <table:table-cell table:style-name="ce27" table:formula="of:=IF(AND([.$F88]&lt;&gt;&quot;&quot;;[.$D87]&lt;&gt;&quot;&quot;);1;IF([.$F88]&lt;&gt;&quot;&quot;;MAX(INDIRECT([.$B88]):[.$E87])+1;&quot;&quot;))">
            <text:p/>
          </table:table-cell>
          <table:table-cell table:style-name="ce32"/>
          <table:table-cell table:style-name="ce32" table:formula="of:=IF([.$H88]=&quot;&quot;;&quot;&quot;;IF([.$G87]=&quot;&quot;;1;[.$G87]+1))" office:value-type="float" office:value="3" calcext:value-type="float">
            <text:p>3</text:p>
          </table:table-cell>
          <table:table-cell table:style-name="ce32" office:value-type="string" calcext:value-type="string">
            <text:p>テンプレートファイルの修正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88]&lt;&gt;&quot;&quot;;NETWORKDAYS([.$L88];[.$M88];[$休日.$B$4:.$B$304]);&quot;&quot;)" office:value-type="float" office:value="1" calcext:value-type="float">
            <text:p>1</text:p>
          </table:table-cell>
          <table:table-cell table:style-name="ce242" office:value-type="float" office:value="100" calcext:value-type="float">
            <text:p>100</text:p>
          </table:table-cell>
          <table:table-cell table:style-name="ce63" table:formula="of:=IF(OR(AND([.$N88]=&quot;&quot;;[.$L88]&lt;&gt;&quot;&quot;;[.$L88]&lt;=[.$U$1]);AND([.$M88]&lt;&gt;&quot;&quot;;[.Q88]&lt;100;[.$M88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8:.$FM8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9]&lt;&gt;&quot;&quot;;[.$F89]=&quot;&quot;);&quot;E&quot;&amp;ROW();[.$B88])" office:value-type="string" office:string-value="E84" calcext:value-type="string">
            <text:p>E84</text:p>
          </table:table-cell>
          <table:table-cell table:style-name="ce13" table:formula="of:=IF(AND([.$D89]&lt;&gt;&quot;&quot;;[.$D89]&lt;&gt;&quot;○&quot;);MAX([.$C$3:.$C88])+1;[.$C88])" office:value-type="float" office:value="5" calcext:value-type="float">
            <text:p>5</text:p>
          </table:table-cell>
          <table:table-cell table:style-name="ce19"/>
          <table:table-cell table:style-name="ce27" table:formula="of:=IF(AND([.$F89]&lt;&gt;&quot;&quot;;[.$D88]&lt;&gt;&quot;&quot;);1;IF([.$F89]&lt;&gt;&quot;&quot;;MAX(INDIRECT([.$B89]):[.$E88])+1;&quot;&quot;))">
            <text:p/>
          </table:table-cell>
          <table:table-cell table:style-name="ce32"/>
          <table:table-cell table:style-name="ce32" table:formula="of:=IF([.$H89]=&quot;&quot;;&quot;&quot;;IF([.$G88]=&quot;&quot;;1;[.$G88]+1))" office:value-type="float" office:value="4" calcext:value-type="float">
            <text:p>4</text:p>
          </table:table-cell>
          <table:table-cell table:style-name="ce32" office:value-type="string" calcext:value-type="string">
            <text:p>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89]&lt;&gt;&quot;&quot;;NETWORKDAYS([.$L89];[.$M89];[$休日.$B$4:.$B$304]);&quot;&quot;)" office:value-type="float" office:value="1" calcext:value-type="float">
            <text:p>1</text:p>
          </table:table-cell>
          <table:table-cell table:style-name="ce242" office:value-type="float" office:value="100" calcext:value-type="float">
            <text:p>100</text:p>
          </table:table-cell>
          <table:table-cell table:style-name="ce63" table:formula="of:=IF(OR(AND([.$N89]=&quot;&quot;;[.$L89]&lt;&gt;&quot;&quot;;[.$L89]&lt;=[.$U$1]);AND([.$M89]&lt;&gt;&quot;&quot;;[.Q89]&lt;100;[.$M89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9:.$FM8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 table:style-name="ce3"/>
          <table:table-cell table:style-name="ce9" table:formula="of:=IF(AND([.$D90]&lt;&gt;&quot;&quot;;[.$F90]=&quot;&quot;);&quot;E&quot;&amp;ROW();[.$B89])" office:value-type="string" office:string-value="E84" calcext:value-type="string">
            <text:p>E84</text:p>
          </table:table-cell>
          <table:table-cell table:style-name="ce14" table:formula="of:=IF(AND([.$D90]&lt;&gt;&quot;&quot;;[.$D90]&lt;&gt;&quot;○&quot;);MAX([.$C$3:.$C89])+1;[.$C89])" office:value-type="float" office:value="5" calcext:value-type="float">
            <text:p>5</text:p>
          </table:table-cell>
          <table:table-cell table:style-name="ce21"/>
          <table:table-cell table:style-name="ce29" table:formula="of:=IF(AND([.$F90]&lt;&gt;&quot;&quot;;[.$D89]&lt;&gt;&quot;&quot;);1;IF([.$F90]&lt;&gt;&quot;&quot;;MAX(INDIRECT([.$B90]):[.$E89])+1;&quot;&quot;))">
            <text:p/>
          </table:table-cell>
          <table:table-cell table:style-name="ce33"/>
          <table:table-cell table:style-name="ce33" table:formula="of:=IF([.$H90]=&quot;&quot;;&quot;&quot;;IF([.$G89]=&quot;&quot;;1;[.$G89]+1))">
            <text:p/>
          </table:table-cell>
          <table:table-cell table:style-name="ce33" table:number-columns-repeated="4"/>
          <table:table-cell table:style-name="ce39" table:number-columns-repeated="4"/>
          <table:table-cell table:style-name="ce33" table:formula="of:=IF([.$L90]&lt;&gt;&quot;&quot;;NETWORKDAYS([.$L90];[.$M90];[$休日.$B$4:.$B$304]);&quot;&quot;)">
            <text:p/>
          </table:table-cell>
          <table:table-cell table:style-name="ce54" office:value-type="float" office:value="0" calcext:value-type="float">
            <text:p>0</text:p>
          </table:table-cell>
          <table:table-cell table:style-name="ce64" table:formula="of:=IF(OR(AND([.$N90]=&quot;&quot;;[.$L90]&lt;&gt;&quot;&quot;;[.$L90]&lt;=[.$U$1]);AND([.$M90]&lt;&gt;&quot;&quot;;[.Q90]&lt;100;[.$M90]&lt;=[.$U$1]));&quot;遅延&quot;;&quot;&quot;)">
            <text:p/>
          </table:table-cell>
          <table:table-cell table:style-name="ce67"/>
          <table:table-cell table:style-name="ce67" table:formula="of:=SUM([.$V90:.$FM90])" office:value-type="float" office:value="0" calcext:value-type="float">
            <text:p>0</text:p>
          </table:table-cell>
          <table:table-cell table:style-name="ce73"/>
          <table:table-cell table:style-name="ce83"/>
          <table:table-cell table:style-name="ce97" table:number-columns-repeated="2"/>
          <table:table-cell table:style-name="ce107" table:number-columns-repeated="2"/>
          <table:table-cell table:style-name="ce97" table:number-columns-repeated="5"/>
          <table:table-cell table:style-name="ce107" table:number-columns-repeated="2"/>
          <table:table-cell table:style-name="ce97" table:number-columns-repeated="5"/>
          <table:table-cell table:style-name="ce107" table:number-columns-repeated="2"/>
          <table:table-cell table:style-name="ce97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7" table:number-columns-repeated="120"/>
          <table:table-cell table:style-name="ce161"/>
          <table:table-cell table:style-name="ce3"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91]&lt;&gt;&quot;&quot;;[.$F91]=&quot;&quot;);&quot;E&quot;&amp;ROW();[.$B90])" office:value-type="string" office:string-value="E91" calcext:value-type="string">
            <text:p>E91</text:p>
          </table:table-cell>
          <table:table-cell table:style-name="ce13" table:formula="of:=IF(AND([.$D91]&lt;&gt;&quot;&quot;;[.$D91]&lt;&gt;&quot;○&quot;);MAX([.$C$3:.$C90])+1;[.$C90])" office:value-type="float" office:value="6" calcext:value-type="float">
            <text:p>6</text:p>
          </table:table-cell>
          <table:table-cell table:style-name="ce19" office:value-type="string" calcext:value-type="string">
            <text:p>商品管理</text:p>
          </table:table-cell>
          <table:table-cell table:style-name="ce27" table:formula="of:=IF(AND([.$F91]&lt;&gt;&quot;&quot;;[.$D90]&lt;&gt;&quot;&quot;);1;IF([.$F91]&lt;&gt;&quot;&quot;;MAX(INDIRECT([.$B91]):[.$E90])+1;&quot;&quot;))">
            <text:p/>
          </table:table-cell>
          <table:table-cell table:style-name="ce32"/>
          <table:table-cell table:style-name="ce32" table:formula="of:=IF([.$H91]=&quot;&quot;;&quot;&quot;;IF([.$G90]=&quot;&quot;;1;[.$G90]+1))">
            <text:p/>
          </table:table-cell>
          <table:table-cell table:style-name="ce32" table:number-columns-repeated="2"/>
          <table:table-cell table:style-name="ce32" office:value-type="string" calcext:value-type="string">
            <text:p>春山、伊藤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91]&lt;&gt;&quot;&quot;;NETWORKDAYS([.$L91];[.$M91];[$休日.$B$4:.$B$304]);&quot;&quot;)" office:value-type="float" office:value="7" calcext:value-type="float">
            <text:p>7</text:p>
          </table:table-cell>
          <table:table-cell table:style-name="ce255" office:value-type="float" office:value="100" calcext:value-type="float">
            <text:p>100</text:p>
          </table:table-cell>
          <table:table-cell table:style-name="ce63" table:formula="of:=IF(OR(AND([.$N91]=&quot;&quot;;[.$L91]&lt;&gt;&quot;&quot;;[.$L91]&lt;=[.$U$1]);AND([.$M91]&lt;&gt;&quot;&quot;;[.Q91]&lt;100;[.$M91]&lt;=[.$U$1]));&quot;遅延&quot;;&quot;&quot;)">
            <text:p/>
          </table:table-cell>
          <table:table-cell table:style-name="ce66"/>
          <table:table-cell table:style-name="ce66" table:formula="of:=SUM([.$V91:.$FM9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92]&lt;&gt;&quot;&quot;;[.$F92]=&quot;&quot;);&quot;E&quot;&amp;ROW();[.$B91])" office:value-type="string" office:string-value="E91" calcext:value-type="string">
            <text:p>E91</text:p>
          </table:table-cell>
          <table:table-cell table:style-name="ce13" table:formula="of:=IF(AND([.$D92]&lt;&gt;&quot;&quot;;[.$D92]&lt;&gt;&quot;○&quot;);MAX([.$C$3:.$C91])+1;[.$C91])" office:value-type="float" office:value="6" calcext:value-type="float">
            <text:p>6</text:p>
          </table:table-cell>
          <table:table-cell table:style-name="ce19"/>
          <table:table-cell table:style-name="ce27" table:formula="of:=IF(AND([.$F92]&lt;&gt;&quot;&quot;;[.$D91]&lt;&gt;&quot;&quot;);1;IF([.$F92]&lt;&gt;&quot;&quot;;MAX(INDIRECT([.$B92]):[.$E91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商品一覧表示</text:p>
          </table:table-cell>
          <table:table-cell table:style-name="ce32" table:formula="of:=IF([.$H92]=&quot;&quot;;&quot;&quot;;IF([.$G91]=&quot;&quot;;1;[.$G91]+1))">
            <text:p/>
          </table:table-cell>
          <table:table-cell table:style-name="ce32" table:number-columns-repeated="2"/>
          <table:table-cell table:style-name="ce32" office:value-type="string" calcext:value-type="string">
            <text:p>春山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92]&lt;&gt;&quot;&quot;;NETWORKDAYS([.$L92];[.$M92];[$休日.$B$4:.$B$304]);&quot;&quot;)" office:value-type="float" office:value="7" calcext:value-type="float">
            <text:p>7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92]=&quot;&quot;;[.$L92]&lt;&gt;&quot;&quot;;[.$L92]&lt;=[.$U$1]);AND([.$M92]&lt;&gt;&quot;&quot;;[.Q92]&lt;100;[.$M92]&lt;=[.$U$1]));&quot;遅延&quot;;&quot;&quot;)">
            <text:p/>
          </table:table-cell>
          <table:table-cell table:style-name="ce66" office:value-type="float" office:value="21" calcext:value-type="float">
            <text:p>21</text:p>
          </table:table-cell>
          <table:table-cell table:style-name="ce66" table:formula="of:=SUM([.$V92:.$FM9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 table:visibility="collapse">
          <table:table-cell/>
          <table:table-cell table:style-name="ce7" table:formula="of:=IF(AND([.$D93]&lt;&gt;&quot;&quot;;[.$F93]=&quot;&quot;);&quot;E&quot;&amp;ROW();[.$B91])" office:value-type="string" office:string-value="E91" calcext:value-type="string">
            <text:p>E91</text:p>
          </table:table-cell>
          <table:table-cell table:style-name="ce13" table:formula="of:=IF(AND([.$D93]&lt;&gt;&quot;&quot;;[.$D93]&lt;&gt;&quot;○&quot;);MAX([.$C$3:.$C92])+1;[.$C92])" office:value-type="float" office:value="6" calcext:value-type="float">
            <text:p>6</text:p>
          </table:table-cell>
          <table:table-cell table:style-name="ce19"/>
          <table:table-cell table:style-name="ce27" table:formula="of:=IF(AND([.$F93]&lt;&gt;&quot;&quot;;[.$D92]&lt;&gt;&quot;&quot;);1;IF([.$F93]&lt;&gt;&quot;&quot;;MAX(INDIRECT([.$B93]):[.$E92])+1;&quot;&quot;))">
            <text:p/>
          </table:table-cell>
          <table:table-cell table:style-name="ce32"/>
          <table:table-cell table:style-name="ce32" table:formula="of:=IF([.$H93]=&quot;&quot;;&quot;&quot;;IF([.$G92]=&quot;&quot;;1;[.$G92]+1))">
            <text:p/>
          </table:table-cell>
          <table:table-cell table:style-name="ce37"/>
          <table:table-cell table:style-name="ce32" table:number-columns-repeated="3"/>
          <table:table-cell table:style-name="ce38" table:number-columns-repeated="4"/>
          <table:table-cell table:style-name="ce32" table:formula="of:=IF([.$L93]&lt;&gt;&quot;&quot;;NETWORKDAYS([.$L93];[.$M93];[$休日.$B$4:.$B$304]);&quot;&quot;)">
            <text:p/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93]=&quot;&quot;;[.$L93]&lt;&gt;&quot;&quot;;[.$L93]&lt;=[.$U$1]);AND([.$M93]&lt;&gt;&quot;&quot;;[.Q93]&lt;100;[.$M93]&lt;=[.$U$1]));&quot;遅延&quot;;&quot;&quot;)">
            <text:p/>
          </table:table-cell>
          <table:table-cell table:style-name="ce66"/>
          <table:table-cell table:style-name="ce66" table:formula="of:=SUM([.$V93:.$FM93])" office:value-type="float" office:value="0" calcext:value-type="float">
            <text:p>0</text:p>
          </table:table-cell>
          <table:table-cell table:style-name="ce72"/>
          <table:table-cell table:style-name="ce84"/>
          <table:table-cell table:style-name="ce98" table:number-columns-repeated="2"/>
          <table:table-cell table:style-name="ce108" table:number-columns-repeated="2"/>
          <table:table-cell table:style-name="ce98" table:number-columns-repeated="5"/>
          <table:table-cell table:style-name="ce108" table:number-columns-repeated="2"/>
          <table:table-cell table:style-name="ce98" table:number-columns-repeated="5"/>
          <table:table-cell table:style-name="ce108" table:number-columns-repeated="2"/>
          <table:table-cell table:style-name="ce98" table:number-columns-repeated="4"/>
          <table:table-cell table:style-name="ce137"/>
          <table:table-cell table:style-name="ce108" table:number-columns-repeated="2"/>
          <table:table-cell table:style-name="ce151"/>
          <table:table-cell table:style-name="ce98" table:number-columns-repeated="120"/>
          <table:table-cell table:style-name="ce162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94]&lt;&gt;&quot;&quot;;[.$F94]=&quot;&quot;);&quot;E&quot;&amp;ROW();[.$B93])" office:value-type="string" office:string-value="E91" calcext:value-type="string">
            <text:p>E91</text:p>
          </table:table-cell>
          <table:table-cell table:style-name="ce13" table:formula="of:=IF(AND([.$D94]&lt;&gt;&quot;&quot;;[.$D94]&lt;&gt;&quot;○&quot;);MAX([.$C$3:.$C93])+1;[.$C93])" office:value-type="float" office:value="6" calcext:value-type="float">
            <text:p>6</text:p>
          </table:table-cell>
          <table:table-cell table:style-name="ce19"/>
          <table:table-cell table:style-name="ce27" table:formula="of:=IF(AND([.$F94]&lt;&gt;&quot;&quot;;[.$D93]&lt;&gt;&quot;&quot;);1;IF([.$F94]&lt;&gt;&quot;&quot;;MAX(INDIRECT([.$B94]):[.$E93])+1;&quot;&quot;))">
            <text:p/>
          </table:table-cell>
          <table:table-cell table:style-name="ce32"/>
          <table:table-cell table:style-name="ce32" table:formula="of:=IF([.$H94]=&quot;&quot;;&quot;&quot;;IF([.$G93]=&quot;&quot;;1;[.$G93]+1))" office:value-type="float" office:value="1" calcext:value-type="float">
            <text:p>1</text:p>
          </table:table-cell>
          <table:table-cell table:style-name="ce32" office:value-type="string" calcext:value-type="string">
            <text:p>商品一覧トップ画面コントローラの編集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94]&lt;&gt;&quot;&quot;;NETWORKDAYS([.$L94];[.$M94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94]=&quot;&quot;;[.$L94]&lt;&gt;&quot;&quot;;[.$L94]&lt;=[.$U$1]);AND([.$M94]&lt;&gt;&quot;&quot;;[.Q94]&lt;100;[.$M94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2"/>
          <table:table-cell table:style-name="ce95" office:value-type="float" office:value="1" calcext:value-type="float">
            <text:p>1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3.5" calcext:value-type="float">
            <text:p>3.5</text:p>
          </table:table-cell>
          <table:table-cell table:style-name="ce107" office:value-type="float" office:value="2" calcext:value-type="float">
            <text:p>2</text:p>
          </table:table-cell>
          <table:table-cell table:style-name="ce107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95]&lt;&gt;&quot;&quot;;[.$F95]=&quot;&quot;);&quot;E&quot;&amp;ROW();[.$B94])" office:value-type="string" office:string-value="E91" calcext:value-type="string">
            <text:p>E91</text:p>
          </table:table-cell>
          <table:table-cell table:style-name="ce13" table:formula="of:=IF(AND([.$D95]&lt;&gt;&quot;&quot;;[.$D95]&lt;&gt;&quot;○&quot;);MAX([.$C$3:.$C94])+1;[.$C94])" office:value-type="float" office:value="6" calcext:value-type="float">
            <text:p>6</text:p>
          </table:table-cell>
          <table:table-cell table:style-name="ce19"/>
          <table:table-cell table:style-name="ce27" table:formula="of:=IF(AND([.$F95]&lt;&gt;&quot;&quot;;[.$D94]&lt;&gt;&quot;&quot;);1;IF([.$F95]&lt;&gt;&quot;&quot;;MAX(INDIRECT([.$B95]):[.$E94])+1;&quot;&quot;))">
            <text:p/>
          </table:table-cell>
          <table:table-cell table:style-name="ce32"/>
          <table:table-cell table:style-name="ce32" table:formula="of:=IF([.$H95]=&quot;&quot;;&quot;&quot;;IF([.$G94]=&quot;&quot;;1;[.$G94]+1))" office:value-type="float" office:value="2" calcext:value-type="float">
            <text:p>2</text:p>
          </table:table-cell>
          <table:table-cell table:style-name="ce32" office:value-type="string" calcext:value-type="string">
            <text:p>商品一覧トップ画面テンプレート作成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95]&lt;&gt;&quot;&quot;;NETWORKDAYS([.$L95];[.$M95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95]=&quot;&quot;;[.$L95]&lt;&gt;&quot;&quot;;[.$L95]&lt;=[.$U$1]);AND([.$M95]&lt;&gt;&quot;&quot;;[.Q95]&lt;100;[.$M95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2"/>
          <table:table-cell table:style-name="ce95" office:value-type="float" office:value="1" calcext:value-type="float">
            <text:p>1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3.5" calcext:value-type="float">
            <text:p>3.5</text:p>
          </table:table-cell>
          <table:table-cell table:style-name="ce107" office:value-type="float" office:value="2" calcext:value-type="float">
            <text:p>2</text:p>
          </table:table-cell>
          <table:table-cell table:style-name="ce107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96]&lt;&gt;&quot;&quot;;[.$F96]=&quot;&quot;);&quot;E&quot;&amp;ROW();[.$B95])" office:value-type="string" office:string-value="E91" calcext:value-type="string">
            <text:p>E91</text:p>
          </table:table-cell>
          <table:table-cell table:style-name="ce13" table:formula="of:=IF(AND([.$D96]&lt;&gt;&quot;&quot;;[.$D96]&lt;&gt;&quot;○&quot;);MAX([.$C$3:.$C95])+1;[.$C95])" office:value-type="float" office:value="6" calcext:value-type="float">
            <text:p>6</text:p>
          </table:table-cell>
          <table:table-cell table:style-name="ce19"/>
          <table:table-cell table:style-name="ce27" table:formula="of:=IF(AND([.$F96]&lt;&gt;&quot;&quot;;[.$D95]&lt;&gt;&quot;&quot;);1;IF([.$F96]&lt;&gt;&quot;&quot;;MAX(INDIRECT([.$B96]):[.$E95])+1;&quot;&quot;))">
            <text:p/>
          </table:table-cell>
          <table:table-cell table:style-name="ce32"/>
          <table:table-cell table:style-name="ce32" table:formula="of:=IF([.$H96]=&quot;&quot;;&quot;&quot;;IF([.$G95]=&quot;&quot;;1;[.$G95]+1))" office:value-type="float" office:value="3" calcext:value-type="float">
            <text:p>3</text:p>
          </table:table-cell>
          <table:table-cell table:style-name="ce32" office:value-type="string" calcext:value-type="string">
            <text:p>商品一覧トップ画面動作確認、修正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96]&lt;&gt;&quot;&quot;;NETWORKDAYS([.$L96];[.$M96];[$休日.$B$4:.$B$304]);&quot;&quot;)" office:value-type="float" office:value="1" calcext:value-type="float">
            <text:p>1</text:p>
          </table:table-cell>
          <table:table-cell table:style-name="ce256" office:value-type="float" office:value="100" calcext:value-type="float">
            <text:p>100</text:p>
          </table:table-cell>
          <table:table-cell table:style-name="ce63" table:formula="of:=IF(OR(AND([.$N96]=&quot;&quot;;[.$L96]&lt;&gt;&quot;&quot;;[.$L96]&lt;=[.$U$1]);AND([.$M96]&lt;&gt;&quot;&quot;;[.Q96]&lt;100;[.$M96]&lt;=[.$U$1]));&quot;遅延&quot;;&quot;&quot;)">
            <text:p/>
          </table:table-cell>
          <table:table-cell table:style-name="ce66" office:value-type="float" office:value="4" calcext:value-type="float">
            <text:p>4</text:p>
          </table:table-cell>
          <table:table-cell table:style-name="ce66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office:value-type="float" office:value="1" calcext:value-type="float">
            <text:p>1</text:p>
          </table:table-cell>
          <table:table-cell table:style-name="ce107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97]&lt;&gt;&quot;&quot;;[.$F97]=&quot;&quot;);&quot;E&quot;&amp;ROW();[.$B96])" office:value-type="string" office:string-value="E91" calcext:value-type="string">
            <text:p>E91</text:p>
          </table:table-cell>
          <table:table-cell table:style-name="ce13" table:formula="of:=IF(AND([.$D97]&lt;&gt;&quot;&quot;;[.$D97]&lt;&gt;&quot;○&quot;);MAX([.$C$3:.$C96])+1;[.$C96])" office:value-type="float" office:value="6" calcext:value-type="float">
            <text:p>6</text:p>
          </table:table-cell>
          <table:table-cell table:style-name="ce19"/>
          <table:table-cell table:style-name="ce27" table:formula="of:=IF(AND([.$F97]&lt;&gt;&quot;&quot;;[.$D96]&lt;&gt;&quot;&quot;);1;IF([.$F97]&lt;&gt;&quot;&quot;;MAX(INDIRECT([.$B97]):[.$E96])+1;&quot;&quot;))">
            <text:p/>
          </table:table-cell>
          <table:table-cell table:style-name="ce32"/>
          <table:table-cell table:style-name="ce32" table:formula="of:=IF([.$H97]=&quot;&quot;;&quot;&quot;;IF([.$G96]=&quot;&quot;;1;[.$G96]+1))" office:value-type="float" office:value="4" calcext:value-type="float">
            <text:p>4</text:p>
          </table:table-cell>
          <table:table-cell table:style-name="ce32" office:value-type="string" calcext:value-type="string">
            <text:p>カテゴリ別商品一覧画面コントローラの作成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97]&lt;&gt;&quot;&quot;;NETWORKDAYS([.$L97];[.$M97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97]=&quot;&quot;;[.$L97]&lt;&gt;&quot;&quot;;[.$L97]&lt;=[.$U$1]);AND([.$M97]&lt;&gt;&quot;&quot;;[.Q97]&lt;100;[.$M97]&lt;=[.$U$1]));&quot;遅延&quot;;&quot;&quot;)">
            <text:p/>
          </table:table-cell>
          <table:table-cell table:style-name="ce66" office:value-type="float" office:value="5" calcext:value-type="float">
            <text:p>5</text:p>
          </table:table-cell>
          <table:table-cell table:style-name="ce66" table:formula="of:=SUM([.$V97:.$FM9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98]&lt;&gt;&quot;&quot;;[.$F98]=&quot;&quot;);&quot;E&quot;&amp;ROW();[.$B96])" office:value-type="string" office:string-value="E91" calcext:value-type="string">
            <text:p>E91</text:p>
          </table:table-cell>
          <table:table-cell table:style-name="ce13" table:formula="of:=IF(AND([.$D98]&lt;&gt;&quot;&quot;;[.$D98]&lt;&gt;&quot;○&quot;);MAX([.$C$3:.$C96])+1;[.$C96])" office:value-type="float" office:value="6" calcext:value-type="float">
            <text:p>6</text:p>
          </table:table-cell>
          <table:table-cell table:style-name="ce19"/>
          <table:table-cell table:style-name="ce27" table:formula="of:=IF(AND([.$F98]&lt;&gt;&quot;&quot;;[.$D97]&lt;&gt;&quot;&quot;);1;IF([.$F98]&lt;&gt;&quot;&quot;;MAX(INDIRECT([.$B98]):[.$E97])+1;&quot;&quot;))">
            <text:p/>
          </table:table-cell>
          <table:table-cell table:style-name="ce32"/>
          <table:table-cell table:style-name="ce32" table:formula="of:=IF([.$H98]=&quot;&quot;;&quot;&quot;;IF([.$G97]=&quot;&quot;;1;[.$G97]+1))" office:value-type="float" office:value="5" calcext:value-type="float">
            <text:p>5</text:p>
          </table:table-cell>
          <table:table-cell table:style-name="ce32" office:value-type="string" calcext:value-type="string">
            <text:p>カテゴリ別商品一覧画面（新着順）コントローラの編集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98]&lt;&gt;&quot;&quot;;NETWORKDAYS([.$L98];[.$M98];[$休日.$B$4:.$B$304]);&quot;&quot;)" office:value-type="float" office:value="1" calcext:value-type="float">
            <text:p>1</text:p>
          </table:table-cell>
          <table:table-cell table:style-name="ce257" office:value-type="float" office:value="100" calcext:value-type="float">
            <text:p>100</text:p>
          </table:table-cell>
          <table:table-cell table:style-name="ce63" table:formula="of:=IF(OR(AND([.$N98]=&quot;&quot;;[.$L98]&lt;&gt;&quot;&quot;;[.$L98]&lt;=[.$U$1]);AND([.$M98]&lt;&gt;&quot;&quot;;[.Q98]&lt;100;[.$M98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98:.$FM9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99]&lt;&gt;&quot;&quot;;[.$F99]=&quot;&quot;);&quot;E&quot;&amp;ROW();[.$B98])" office:value-type="string" office:string-value="E91" calcext:value-type="string">
            <text:p>E91</text:p>
          </table:table-cell>
          <table:table-cell table:style-name="ce13" table:formula="of:=IF(AND([.$D99]&lt;&gt;&quot;&quot;;[.$D99]&lt;&gt;&quot;○&quot;);MAX([.$C$3:.$C98])+1;[.$C98])" office:value-type="float" office:value="6" calcext:value-type="float">
            <text:p>6</text:p>
          </table:table-cell>
          <table:table-cell table:style-name="ce19"/>
          <table:table-cell table:style-name="ce27" table:formula="of:=IF(AND([.$F99]&lt;&gt;&quot;&quot;;[.$D98]&lt;&gt;&quot;&quot;);1;IF([.$F99]&lt;&gt;&quot;&quot;;MAX(INDIRECT([.$B99]):[.$E98])+1;&quot;&quot;))">
            <text:p/>
          </table:table-cell>
          <table:table-cell table:style-name="ce32"/>
          <table:table-cell table:style-name="ce32" table:formula="of:=IF([.$H99]=&quot;&quot;;&quot;&quot;;IF([.$G98]=&quot;&quot;;1;[.$G98]+1))" office:value-type="float" office:value="6" calcext:value-type="float">
            <text:p>6</text:p>
          </table:table-cell>
          <table:table-cell table:style-name="ce32" office:value-type="string" calcext:value-type="string">
            <text:p>カテゴリ別商品一覧画面（売れ筋順）コントローラの編集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99]&lt;&gt;&quot;&quot;;NETWORKDAYS([.$L99];[.$M99];[$休日.$B$4:.$B$304]);&quot;&quot;)" office:value-type="float" office:value="1" calcext:value-type="float">
            <text:p>1</text:p>
          </table:table-cell>
          <table:table-cell table:style-name="ce257" office:value-type="float" office:value="100" calcext:value-type="float">
            <text:p>100</text:p>
          </table:table-cell>
          <table:table-cell table:style-name="ce63" table:formula="of:=IF(OR(AND([.$N99]=&quot;&quot;;[.$L99]&lt;&gt;&quot;&quot;;[.$L99]&lt;=[.$U$1]);AND([.$M99]&lt;&gt;&quot;&quot;;[.Q99]&lt;100;[.$M99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99:.$FM9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0]&lt;&gt;&quot;&quot;;[.$F100]=&quot;&quot;);&quot;E&quot;&amp;ROW();[.$B99])" office:value-type="string" office:string-value="E91" calcext:value-type="string">
            <text:p>E91</text:p>
          </table:table-cell>
          <table:table-cell table:style-name="ce13" table:formula="of:=IF(AND([.$D100]&lt;&gt;&quot;&quot;;[.$D100]&lt;&gt;&quot;○&quot;);MAX([.$C$3:.$C99])+1;[.$C99])" office:value-type="float" office:value="6" calcext:value-type="float">
            <text:p>6</text:p>
          </table:table-cell>
          <table:table-cell table:style-name="ce19"/>
          <table:table-cell table:style-name="ce27" table:formula="of:=IF(AND([.$F100]&lt;&gt;&quot;&quot;;[.$D99]&lt;&gt;&quot;&quot;);1;IF([.$F100]&lt;&gt;&quot;&quot;;MAX(INDIRECT([.$B100]):[.$E99])+1;&quot;&quot;))">
            <text:p/>
          </table:table-cell>
          <table:table-cell table:style-name="ce32"/>
          <table:table-cell table:style-name="ce32" table:formula="of:=IF([.$H100]=&quot;&quot;;&quot;&quot;;IF([.$G99]=&quot;&quot;;1;[.$G99]+1))" office:value-type="float" office:value="7" calcext:value-type="float">
            <text:p>7</text:p>
          </table:table-cell>
          <table:table-cell table:style-name="ce32" office:value-type="string" calcext:value-type="string">
            <text:p>カテゴリ別商品一覧画面テンプレート作成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15" calcext:value-type="date">
            <text:p>2026/06/15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00]&lt;&gt;&quot;&quot;;NETWORKDAYS([.$L100];[.$M100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00]=&quot;&quot;;[.$L100]&lt;&gt;&quot;&quot;;[.$L100]&lt;=[.$U$1]);AND([.$M100]&lt;&gt;&quot;&quot;;[.Q100]&lt;100;[.$M100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00:.$FM10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1]&lt;&gt;&quot;&quot;;[.$F101]=&quot;&quot;);&quot;E&quot;&amp;ROW();[.$B100])" office:value-type="string" office:string-value="E91" calcext:value-type="string">
            <text:p>E91</text:p>
          </table:table-cell>
          <table:table-cell table:style-name="ce13" table:formula="of:=IF(AND([.$D101]&lt;&gt;&quot;&quot;;[.$D101]&lt;&gt;&quot;○&quot;);MAX([.$C$3:.$C100])+1;[.$C100])" office:value-type="float" office:value="6" calcext:value-type="float">
            <text:p>6</text:p>
          </table:table-cell>
          <table:table-cell table:style-name="ce19"/>
          <table:table-cell table:style-name="ce27" table:formula="of:=IF(AND([.$F101]&lt;&gt;&quot;&quot;;[.$D100]&lt;&gt;&quot;&quot;);1;IF([.$F101]&lt;&gt;&quot;&quot;;MAX(INDIRECT([.$B101]):[.$E100])+1;&quot;&quot;))">
            <text:p/>
          </table:table-cell>
          <table:table-cell table:style-name="ce32"/>
          <table:table-cell table:style-name="ce32" table:formula="of:=IF([.$H101]=&quot;&quot;;&quot;&quot;;IF([.$G100]=&quot;&quot;;1;[.$G100]+1))" office:value-type="float" office:value="8" calcext:value-type="float">
            <text:p>8</text:p>
          </table:table-cell>
          <table:table-cell table:style-name="ce32" office:value-type="string" calcext:value-type="string">
            <text:p>カテゴリ別商品一覧画面動作確認、修正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16" calcext:value-type="date">
            <text:p>2026/06/16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01]&lt;&gt;&quot;&quot;;NETWORKDAYS([.$L101];[.$M101];[$休日.$B$4:.$B$304]);&quot;&quot;)" office:value-type="float" office:value="1" calcext:value-type="float">
            <text:p>1</text:p>
          </table:table-cell>
          <table:table-cell table:style-name="ce258" office:value-type="float" office:value="100" calcext:value-type="float">
            <text:p>100</text:p>
          </table:table-cell>
          <table:table-cell table:style-name="ce63" table:formula="of:=IF(OR(AND([.$N101]=&quot;&quot;;[.$L101]&lt;&gt;&quot;&quot;;[.$L101]&lt;=[.$U$1]);AND([.$M101]&lt;&gt;&quot;&quot;;[.Q101]&lt;100;[.$M101]&lt;=[.$U$1]));&quot;遅延&quot;;&quot;&quot;)">
            <text:p/>
          </table:table-cell>
          <table:table-cell table:style-name="ce66" office:value-type="float" office:value="4" calcext:value-type="float">
            <text:p>4</text:p>
          </table:table-cell>
          <table:table-cell table:style-name="ce66" table:formula="of:=SUM([.$V101:.$FM10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102]&lt;&gt;&quot;&quot;;[.$F102]=&quot;&quot;);&quot;E&quot;&amp;ROW();[.$B101])" office:value-type="string" office:string-value="E91" calcext:value-type="string">
            <text:p>E91</text:p>
          </table:table-cell>
          <table:table-cell table:style-name="ce13" table:formula="of:=IF(AND([.$D102]&lt;&gt;&quot;&quot;;[.$D102]&lt;&gt;&quot;○&quot;);MAX([.$C$3:.$C101])+1;[.$C101])" office:value-type="float" office:value="6" calcext:value-type="float">
            <text:p>6</text:p>
          </table:table-cell>
          <table:table-cell table:style-name="ce19"/>
          <table:table-cell table:style-name="ce27" table:formula="of:=IF(AND([.$F102]&lt;&gt;&quot;&quot;;[.$D101]&lt;&gt;&quot;&quot;);1;IF([.$F102]&lt;&gt;&quot;&quot;;MAX(INDIRECT([.$B102]):[.$E101])+1;&quot;&quot;))">
            <text:p/>
          </table:table-cell>
          <table:table-cell table:style-name="ce32"/>
          <table:table-cell table:style-name="ce32" table:formula="of:=IF([.$H102]=&quot;&quot;;&quot;&quot;;IF([.$G101]=&quot;&quot;;1;[.$G101]+1))">
            <text:p/>
          </table:table-cell>
          <table:table-cell table:style-name="Default"/>
          <table:table-cell table:style-name="ce32" table:number-columns-repeated="3"/>
          <table:table-cell table:style-name="ce38" table:number-columns-repeated="4"/>
          <table:table-cell table:style-name="ce32" table:formula="of:=IF([.$L102]&lt;&gt;&quot;&quot;;NETWORKDAYS([.$L102];[.$M10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102]=&quot;&quot;;[.$L102]&lt;&gt;&quot;&quot;;[.$L102]&lt;=[.$U$1]);AND([.$M102]&lt;&gt;&quot;&quot;;[.Q102]&lt;100;[.$M102]&lt;=[.$U$1]));&quot;遅延&quot;;&quot;&quot;)">
            <text:p/>
          </table:table-cell>
          <table:table-cell table:style-name="ce66"/>
          <table:table-cell table:style-name="ce66" table:formula="of:=SUM([.$V102:.$FM10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 table:visibility="collapse">
          <table:table-cell/>
          <table:table-cell table:style-name="ce7" table:formula="of:=IF(AND([.$D103]&lt;&gt;&quot;&quot;;[.$F103]=&quot;&quot;);&quot;E&quot;&amp;ROW();[.$B102])" office:value-type="string" office:string-value="E91" calcext:value-type="string">
            <text:p>E91</text:p>
          </table:table-cell>
          <table:table-cell table:style-name="ce13" table:formula="of:=IF(AND([.$D103]&lt;&gt;&quot;&quot;;[.$D103]&lt;&gt;&quot;○&quot;);MAX([.$C$3:.$C102])+1;[.$C102])" office:value-type="float" office:value="6" calcext:value-type="float">
            <text:p>6</text:p>
          </table:table-cell>
          <table:table-cell table:style-name="ce19"/>
          <table:table-cell table:style-name="ce27" table:formula="of:=IF(AND([.$F103]&lt;&gt;&quot;&quot;;[.$D102]&lt;&gt;&quot;&quot;);1;IF([.$F103]&lt;&gt;&quot;&quot;;MAX(INDIRECT([.$B103]):[.$E102])+1;&quot;&quot;))">
            <text:p/>
          </table:table-cell>
          <table:table-cell table:style-name="ce32"/>
          <table:table-cell table:style-name="ce32" table:formula="of:=IF([.$H103]=&quot;&quot;;&quot;&quot;;IF([.$G102]=&quot;&quot;;1;[.$G10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03]&lt;&gt;&quot;&quot;;NETWORKDAYS([.$L103];[.$M10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103]=&quot;&quot;;[.$L103]&lt;&gt;&quot;&quot;;[.$L103]&lt;=[.$U$1]);AND([.$M103]&lt;&gt;&quot;&quot;;[.Q103]&lt;100;[.$M103]&lt;=[.$U$1]));&quot;遅延&quot;;&quot;&quot;)">
            <text:p/>
          </table:table-cell>
          <table:table-cell table:style-name="ce66"/>
          <table:table-cell table:style-name="ce66" table:formula="of:=SUM([.$V103:.$FM10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 table:visibility="collapse">
          <table:table-cell/>
          <table:table-cell table:style-name="ce7" table:formula="of:=IF(AND([.$D104]&lt;&gt;&quot;&quot;;[.$F104]=&quot;&quot;);&quot;E&quot;&amp;ROW();[.$B103])" office:value-type="string" office:string-value="E91" calcext:value-type="string">
            <text:p>E91</text:p>
          </table:table-cell>
          <table:table-cell table:style-name="ce13" table:formula="of:=IF(AND([.$D104]&lt;&gt;&quot;&quot;;[.$D104]&lt;&gt;&quot;○&quot;);MAX([.$C$3:.$C103])+1;[.$C103])" office:value-type="float" office:value="6" calcext:value-type="float">
            <text:p>6</text:p>
          </table:table-cell>
          <table:table-cell table:style-name="ce19"/>
          <table:table-cell table:style-name="ce27" table:formula="of:=IF(AND([.$F104]&lt;&gt;&quot;&quot;;[.$D103]&lt;&gt;&quot;&quot;);1;IF([.$F104]&lt;&gt;&quot;&quot;;MAX(INDIRECT([.$B104]):[.$E103])+1;&quot;&quot;))">
            <text:p/>
          </table:table-cell>
          <table:table-cell table:style-name="ce32"/>
          <table:table-cell table:style-name="ce32" table:formula="of:=IF([.$H104]=&quot;&quot;;&quot;&quot;;IF([.$G103]=&quot;&quot;;1;[.$G10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04]&lt;&gt;&quot;&quot;;NETWORKDAYS([.$L104];[.$M10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104]=&quot;&quot;;[.$L104]&lt;&gt;&quot;&quot;;[.$L104]&lt;=[.$U$1]);AND([.$M104]&lt;&gt;&quot;&quot;;[.Q104]&lt;100;[.$M104]&lt;=[.$U$1]));&quot;遅延&quot;;&quot;&quot;)">
            <text:p/>
          </table:table-cell>
          <table:table-cell table:style-name="ce66"/>
          <table:table-cell table:style-name="ce66" table:formula="of:=SUM([.$V104:.$FM10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 table:visibility="collapse">
          <table:table-cell/>
          <table:table-cell table:style-name="ce7" table:formula="of:=IF(AND([.$D105]&lt;&gt;&quot;&quot;;[.$F105]=&quot;&quot;);&quot;E&quot;&amp;ROW();[.$B104])" office:value-type="string" office:string-value="E91" calcext:value-type="string">
            <text:p>E91</text:p>
          </table:table-cell>
          <table:table-cell table:style-name="ce13" table:formula="of:=IF(AND([.$D105]&lt;&gt;&quot;&quot;;[.$D105]&lt;&gt;&quot;○&quot;);MAX([.$C$3:.$C104])+1;[.$C104])" office:value-type="float" office:value="6" calcext:value-type="float">
            <text:p>6</text:p>
          </table:table-cell>
          <table:table-cell table:style-name="ce18"/>
          <table:table-cell table:style-name="ce30" table:formula="of:=IF(AND([.$F105]&lt;&gt;&quot;&quot;;[.$D104]&lt;&gt;&quot;&quot;);1;IF([.$F105]&lt;&gt;&quot;&quot;;MAX(INDIRECT([.$B105]):[.$E104])+1;&quot;&quot;))">
            <text:p/>
          </table:table-cell>
          <table:table-cell table:style-name="ce32"/>
          <table:table-cell table:style-name="ce30" table:formula="of:=IF([.$H105]=&quot;&quot;;&quot;&quot;;IF([.$G104]=&quot;&quot;;1;[.$G104]+1))">
            <text:p/>
          </table:table-cell>
          <table:table-cell table:style-name="ce32"/>
          <table:table-cell table:style-name="ce18" table:number-columns-repeated="3"/>
          <table:table-cell table:style-name="ce40" table:number-columns-repeated="4"/>
          <table:table-cell table:style-name="ce18" table:formula="of:=IF([.$L105]&lt;&gt;&quot;&quot;;NETWORKDAYS([.$L105];[.$M10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105]=&quot;&quot;;[.$L105]&lt;&gt;&quot;&quot;;[.$L105]&lt;=[.$U$1]);AND([.$M105]&lt;&gt;&quot;&quot;;[.Q105]&lt;100;[.$M105]&lt;=[.$U$1]));&quot;遅延&quot;;&quot;&quot;)">
            <text:p/>
          </table:table-cell>
          <table:table-cell table:style-name="ce18"/>
          <table:table-cell table:style-name="ce18" table:formula="of:=SUM([.$V105:.$FM105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6]&lt;&gt;&quot;&quot;;[.$F106]=&quot;&quot;);&quot;E&quot;&amp;ROW();[.$B105])" office:value-type="string" office:string-value="E91" calcext:value-type="string">
            <text:p>E91</text:p>
          </table:table-cell>
          <table:table-cell table:style-name="ce13" table:formula="of:=IF(AND([.$D106]&lt;&gt;&quot;&quot;;[.$D106]&lt;&gt;&quot;○&quot;);MAX([.$C$3:.$C105])+1;[.$C105])" office:value-type="float" office:value="6" calcext:value-type="float">
            <text:p>6</text:p>
          </table:table-cell>
          <table:table-cell table:style-name="ce19"/>
          <table:table-cell table:style-name="ce27" table:formula="of:=IF(AND([.$F106]&lt;&gt;&quot;&quot;;[.$D105]&lt;&gt;&quot;&quot;);1;IF([.$F106]&lt;&gt;&quot;&quot;;MAX(INDIRECT([.$B106]):[.$E105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商品詳細表示</text:p>
          </table:table-cell>
          <table:table-cell table:style-name="ce32" table:formula="of:=IF([.$H106]=&quot;&quot;;&quot;&quot;;IF([.$G104]=&quot;&quot;;1;[.$G104]+1))">
            <text:p/>
          </table:table-cell>
          <table:table-cell table:style-name="ce32" table:number-columns-repeated="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5" calcext:value-type="date">
            <text:p>2026/06/15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06]&lt;&gt;&quot;&quot;;NETWORKDAYS([.$L106];[.$M106];[$休日.$B$4:.$B$304]);&quot;&quot;)" office:value-type="float" office:value="6" calcext:value-type="float">
            <text:p>6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06]=&quot;&quot;;[.$L106]&lt;&gt;&quot;&quot;;[.$L106]&lt;=[.$U$1]);AND([.$M106]&lt;&gt;&quot;&quot;;[.Q106]&lt;100;[.$M106]&lt;=[.$U$1]));&quot;遅延&quot;;&quot;&quot;)">
            <text:p/>
          </table:table-cell>
          <table:table-cell table:style-name="ce66" office:value-type="float" office:value="17" calcext:value-type="float">
            <text:p>17</text:p>
          </table:table-cell>
          <table:table-cell table:style-name="ce66" table:formula="of:=SUM([.$V106:.$FM10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7]&lt;&gt;&quot;&quot;;[.$F107]=&quot;&quot;);&quot;E&quot;&amp;ROW();[.$B106])" office:value-type="string" office:string-value="E91" calcext:value-type="string">
            <text:p>E91</text:p>
          </table:table-cell>
          <table:table-cell table:style-name="ce13" table:formula="of:=IF(AND([.$D107]&lt;&gt;&quot;&quot;;[.$D107]&lt;&gt;&quot;○&quot;);MAX([.$C$3:.$C106])+1;[.$C106])" office:value-type="float" office:value="6" calcext:value-type="float">
            <text:p>6</text:p>
          </table:table-cell>
          <table:table-cell table:style-name="ce19"/>
          <table:table-cell table:style-name="ce27" table:formula="of:=IF(AND([.$F107]&lt;&gt;&quot;&quot;;[.$D106]&lt;&gt;&quot;&quot;);1;IF([.$F107]&lt;&gt;&quot;&quot;;MAX(INDIRECT([.$B107]):[.$E106])+1;&quot;&quot;))">
            <text:p/>
          </table:table-cell>
          <table:table-cell table:style-name="ce32"/>
          <table:table-cell table:style-name="ce32" table:formula="of:=IF([.$H107]=&quot;&quot;;&quot;&quot;;IF([.$G106]=&quot;&quot;;1;[.$G106]+1))" office:value-type="float" office:value="1" calcext:value-type="float">
            <text:p>1</text:p>
          </table:table-cell>
          <table:table-cell table:style-name="ce32" office:value-type="string" calcext:value-type="string">
            <text:p>コントローラクラス編集（IDの取得・在庫数・会員種別の判定）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107]&lt;&gt;&quot;&quot;;NETWORKDAYS([.$L107];[.$M107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07]=&quot;&quot;;[.$L107]&lt;&gt;&quot;&quot;;[.$L107]&lt;=[.$U$1]);AND([.$M107]&lt;&gt;&quot;&quot;;[.Q107]&lt;100;[.$M107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07:.$FM10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8]&lt;&gt;&quot;&quot;;[.$F108]=&quot;&quot;);&quot;E&quot;&amp;ROW();[.$B107])" office:value-type="string" office:string-value="E91" calcext:value-type="string">
            <text:p>E91</text:p>
          </table:table-cell>
          <table:table-cell table:style-name="ce13" table:formula="of:=IF(AND([.$D108]&lt;&gt;&quot;&quot;;[.$D108]&lt;&gt;&quot;○&quot;);MAX([.$C$3:.$C107])+1;[.$C107])" office:value-type="float" office:value="6" calcext:value-type="float">
            <text:p>6</text:p>
          </table:table-cell>
          <table:table-cell table:style-name="ce19"/>
          <table:table-cell table:style-name="ce27" table:formula="of:=IF(AND([.$F108]&lt;&gt;&quot;&quot;;[.$D107]&lt;&gt;&quot;&quot;);1;IF([.$F108]&lt;&gt;&quot;&quot;;MAX(INDIRECT([.$B108]):[.$E107])+1;&quot;&quot;))">
            <text:p/>
          </table:table-cell>
          <table:table-cell table:style-name="ce32"/>
          <table:table-cell table:style-name="ce32" table:formula="of:=IF([.$H108]=&quot;&quot;;&quot;&quot;;IF([.$G107]=&quot;&quot;;1;[.$G107]+1))" office:value-type="float" office:value="2" calcext:value-type="float">
            <text:p>2</text:p>
          </table:table-cell>
          <table:table-cell table:style-name="ce32" office:value-type="string" calcext:value-type="string">
            <text:p>HTML編集(詳細表示)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08]&lt;&gt;&quot;&quot;;NETWORKDAYS([.$L108];[.$M108];[$休日.$B$4:.$B$304]);&quot;&quot;)" office:value-type="float" office:value="1" calcext:value-type="float">
            <text:p>1</text:p>
          </table:table-cell>
          <table:table-cell table:style-name="ce259" office:value-type="float" office:value="100" calcext:value-type="float">
            <text:p>100</text:p>
          </table:table-cell>
          <table:table-cell table:style-name="ce63" table:formula="of:=IF(OR(AND([.$N108]=&quot;&quot;;[.$L108]&lt;&gt;&quot;&quot;;[.$L108]&lt;=[.$U$1]);AND([.$M108]&lt;&gt;&quot;&quot;;[.Q108]&lt;100;[.$M108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08:.$FM10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9]&lt;&gt;&quot;&quot;;[.$F109]=&quot;&quot;);&quot;E&quot;&amp;ROW();[.$B108])" office:value-type="string" office:string-value="E91" calcext:value-type="string">
            <text:p>E91</text:p>
          </table:table-cell>
          <table:table-cell table:style-name="ce13" table:formula="of:=IF(AND([.$D109]&lt;&gt;&quot;&quot;;[.$D109]&lt;&gt;&quot;○&quot;);MAX([.$C$3:.$C108])+1;[.$C108])" office:value-type="float" office:value="6" calcext:value-type="float">
            <text:p>6</text:p>
          </table:table-cell>
          <table:table-cell table:style-name="ce19"/>
          <table:table-cell table:style-name="ce27" table:formula="of:=IF(AND([.$F109]&lt;&gt;&quot;&quot;;[.$D108]&lt;&gt;&quot;&quot;);1;IF([.$F109]&lt;&gt;&quot;&quot;;MAX(INDIRECT([.$B109]):[.$E108])+1;&quot;&quot;))">
            <text:p/>
          </table:table-cell>
          <table:table-cell table:style-name="ce32"/>
          <table:table-cell table:style-name="ce32" table:formula="of:=IF([.$H109]=&quot;&quot;;&quot;&quot;;IF([.$G108]=&quot;&quot;;1;[.$G108]+1))" office:value-type="float" office:value="3" calcext:value-type="float">
            <text:p>3</text:p>
          </table:table-cell>
          <table:table-cell table:style-name="ce32" office:value-type="string" calcext:value-type="string">
            <text:p>コントローラクラス編集(「買い物かごへ入れる」ボタン/「戻る」ボタン)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09]&lt;&gt;&quot;&quot;;NETWORKDAYS([.$L109];[.$M109];[$休日.$B$4:.$B$304]);&quot;&quot;)" office:value-type="float" office:value="1" calcext:value-type="float">
            <text:p>1</text:p>
          </table:table-cell>
          <table:table-cell table:style-name="ce259" office:value-type="float" office:value="100" calcext:value-type="float">
            <text:p>100</text:p>
          </table:table-cell>
          <table:table-cell table:style-name="ce63" table:formula="of:=IF(OR(AND([.$N109]=&quot;&quot;;[.$L109]&lt;&gt;&quot;&quot;;[.$L109]&lt;=[.$U$1]);AND([.$M109]&lt;&gt;&quot;&quot;;[.Q109]&lt;100;[.$M109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09:.$FM10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0]&lt;&gt;&quot;&quot;;[.$F110]=&quot;&quot;);&quot;E&quot;&amp;ROW();[.$B109])" office:value-type="string" office:string-value="E91" calcext:value-type="string">
            <text:p>E91</text:p>
          </table:table-cell>
          <table:table-cell table:style-name="ce13" table:formula="of:=IF(AND([.$D110]&lt;&gt;&quot;&quot;;[.$D110]&lt;&gt;&quot;○&quot;);MAX([.$C$3:.$C109])+1;[.$C109])" office:value-type="float" office:value="6" calcext:value-type="float">
            <text:p>6</text:p>
          </table:table-cell>
          <table:table-cell table:style-name="ce19"/>
          <table:table-cell table:style-name="ce27" table:formula="of:=IF(AND([.$F110]&lt;&gt;&quot;&quot;;[.$D109]&lt;&gt;&quot;&quot;);1;IF([.$F110]&lt;&gt;&quot;&quot;;MAX(INDIRECT([.$B110]):[.$E109])+1;&quot;&quot;))">
            <text:p/>
          </table:table-cell>
          <table:table-cell table:style-name="ce32"/>
          <table:table-cell table:style-name="ce32" table:formula="of:=IF([.$H110]=&quot;&quot;;&quot;&quot;;IF([.$G109]=&quot;&quot;;1;[.$G109]+1))" office:value-type="float" office:value="4" calcext:value-type="float">
            <text:p>4</text:p>
          </table:table-cell>
          <table:table-cell table:style-name="ce32" office:value-type="string" calcext:value-type="string">
            <text:p>コントローラクラス編集（ログイン画面or買い物かご画面）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10]&lt;&gt;&quot;&quot;;NETWORKDAYS([.$L110];[.$M110];[$休日.$B$4:.$B$304]);&quot;&quot;)" office:value-type="float" office:value="1" calcext:value-type="float">
            <text:p>1</text:p>
          </table:table-cell>
          <table:table-cell table:style-name="ce259" office:value-type="float" office:value="100" calcext:value-type="float">
            <text:p>100</text:p>
          </table:table-cell>
          <table:table-cell table:style-name="ce63" table:formula="of:=IF(OR(AND([.$N110]=&quot;&quot;;[.$L110]&lt;&gt;&quot;&quot;;[.$L110]&lt;=[.$U$1]);AND([.$M110]&lt;&gt;&quot;&quot;;[.Q110]&lt;100;[.$M110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10:.$FM11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1]&lt;&gt;&quot;&quot;;[.$F111]=&quot;&quot;);&quot;E&quot;&amp;ROW();[.$B110])" office:value-type="string" office:string-value="E91" calcext:value-type="string">
            <text:p>E91</text:p>
          </table:table-cell>
          <table:table-cell table:style-name="ce13" table:formula="of:=IF(AND([.$D111]&lt;&gt;&quot;&quot;;[.$D111]&lt;&gt;&quot;○&quot;);MAX([.$C$3:.$C110])+1;[.$C110])" office:value-type="float" office:value="6" calcext:value-type="float">
            <text:p>6</text:p>
          </table:table-cell>
          <table:table-cell table:style-name="ce19"/>
          <table:table-cell table:style-name="ce27" table:formula="of:=IF(AND([.$F111]&lt;&gt;&quot;&quot;;[.$D110]&lt;&gt;&quot;&quot;);1;IF([.$F111]&lt;&gt;&quot;&quot;;MAX(INDIRECT([.$B111]):[.$E110])+1;&quot;&quot;))">
            <text:p/>
          </table:table-cell>
          <table:table-cell table:style-name="ce32"/>
          <table:table-cell table:style-name="ce32" table:formula="of:=IF([.$H111]=&quot;&quot;;&quot;&quot;;IF([.$G110]=&quot;&quot;;1;[.$G110]+1))" office:value-type="float" office:value="5" calcext:value-type="float">
            <text:p>5</text:p>
          </table:table-cell>
          <table:table-cell table:style-name="ce32" office:value-type="string" calcext:value-type="string">
            <text:p>HTML編集（在庫欄：在庫なし、在庫数表示、在庫あり）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11]&lt;&gt;&quot;&quot;;NETWORKDAYS([.$L111];[.$M111];[$休日.$B$4:.$B$304]);&quot;&quot;)" office:value-type="float" office:value="1" calcext:value-type="float">
            <text:p>1</text:p>
          </table:table-cell>
          <table:table-cell table:style-name="ce259" office:value-type="float" office:value="100" calcext:value-type="float">
            <text:p>100</text:p>
          </table:table-cell>
          <table:table-cell table:style-name="ce63" table:formula="of:=IF(OR(AND([.$N111]=&quot;&quot;;[.$L111]&lt;&gt;&quot;&quot;;[.$L111]&lt;=[.$U$1]);AND([.$M111]&lt;&gt;&quot;&quot;;[.Q111]&lt;100;[.$M111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11:.$FM11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2]&lt;&gt;&quot;&quot;;[.$F112]=&quot;&quot;);&quot;E&quot;&amp;ROW();[.$B111])" office:value-type="string" office:string-value="E91" calcext:value-type="string">
            <text:p>E91</text:p>
          </table:table-cell>
          <table:table-cell table:style-name="ce13" table:formula="of:=IF(AND([.$D112]&lt;&gt;&quot;&quot;;[.$D112]&lt;&gt;&quot;○&quot;);MAX([.$C$3:.$C111])+1;[.$C111])" office:value-type="float" office:value="6" calcext:value-type="float">
            <text:p>6</text:p>
          </table:table-cell>
          <table:table-cell table:style-name="ce19"/>
          <table:table-cell table:style-name="ce27" table:formula="of:=IF(AND([.$F112]&lt;&gt;&quot;&quot;;[.$D111]&lt;&gt;&quot;&quot;);1;IF([.$F112]&lt;&gt;&quot;&quot;;MAX(INDIRECT([.$B112]):[.$E111])+1;&quot;&quot;))">
            <text:p/>
          </table:table-cell>
          <table:table-cell table:style-name="ce32"/>
          <table:table-cell table:style-name="ce32" table:formula="of:=IF([.$H112]=&quot;&quot;;&quot;&quot;;IF([.$G111]=&quot;&quot;;1;[.$G111]+1))" office:value-type="float" office:value="6" calcext:value-type="float">
            <text:p>6</text:p>
          </table:table-cell>
          <table:table-cell table:style-name="ce32" office:value-type="string" calcext:value-type="string">
            <text:p>動作確認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15" calcext:value-type="date">
            <text:p>2026/06/15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12]&lt;&gt;&quot;&quot;;NETWORKDAYS([.$L112];[.$M112];[$休日.$B$4:.$B$304]);&quot;&quot;)" office:value-type="float" office:value="1" calcext:value-type="float">
            <text:p>1</text:p>
          </table:table-cell>
          <table:table-cell table:style-name="ce259" office:value-type="float" office:value="100" calcext:value-type="float">
            <text:p>100</text:p>
          </table:table-cell>
          <table:table-cell table:style-name="ce63" table:formula="of:=IF(OR(AND([.$N112]=&quot;&quot;;[.$L112]&lt;&gt;&quot;&quot;;[.$L112]&lt;=[.$U$1]);AND([.$M112]&lt;&gt;&quot;&quot;;[.Q112]&lt;100;[.$M112]&lt;=[.$U$1]));&quot;遅延&quot;;&quot;&quot;)">
            <text:p/>
          </table:table-cell>
          <table:table-cell table:style-name="ce66" office:value-type="float" office:value="6" calcext:value-type="float">
            <text:p>6</text:p>
          </table:table-cell>
          <table:table-cell table:style-name="ce66" table:formula="of:=SUM([.$V112:.$FM11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3]&lt;&gt;&quot;&quot;;[.$F113]=&quot;&quot;);&quot;E&quot;&amp;ROW();[.$B112])" office:value-type="string" office:string-value="E91" calcext:value-type="string">
            <text:p>E91</text:p>
          </table:table-cell>
          <table:table-cell table:style-name="ce13" table:formula="of:=IF(AND([.$D113]&lt;&gt;&quot;&quot;;[.$D113]&lt;&gt;&quot;○&quot;);MAX([.$C$3:.$C112])+1;[.$C112])" office:value-type="float" office:value="6" calcext:value-type="float">
            <text:p>6</text:p>
          </table:table-cell>
          <table:table-cell table:style-name="ce19"/>
          <table:table-cell table:style-name="ce27" table:formula="of:=IF(AND([.$F113]&lt;&gt;&quot;&quot;;[.$D112]&lt;&gt;&quot;&quot;);1;IF([.$F113]&lt;&gt;&quot;&quot;;MAX(INDIRECT([.$B113]):[.$E112])+1;&quot;&quot;))">
            <text:p/>
          </table:table-cell>
          <table:table-cell table:style-name="ce32"/>
          <table:table-cell table:style-name="ce32" table:formula="of:=IF([.$H113]=&quot;&quot;;&quot;&quot;;IF([.$G112]=&quot;&quot;;1;[.$G11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13]&lt;&gt;&quot;&quot;;NETWORKDAYS([.$L113];[.$M113];[$休日.$B$4:.$B$304]);&quot;&quot;)">
            <text:p/>
          </table:table-cell>
          <table:table-cell table:style-name="ce216"/>
          <table:table-cell table:style-name="ce63" table:formula="of:=IF(OR(AND([.$N113]=&quot;&quot;;[.$L113]&lt;&gt;&quot;&quot;;[.$L113]&lt;=[.$U$1]);AND([.$M113]&lt;&gt;&quot;&quot;;[.Q113]&lt;100;[.$M113]&lt;=[.$U$1]));&quot;遅延&quot;;&quot;&quot;)">
            <text:p/>
          </table:table-cell>
          <table:table-cell table:style-name="ce66"/>
          <table:table-cell table:style-name="ce66" table:formula="of:=SUM([.$V113:.$FM11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 table:visibility="collapse">
          <table:table-cell/>
          <table:table-cell table:style-name="ce7" table:formula="of:=IF(AND([.$D114]&lt;&gt;&quot;&quot;;[.$F114]=&quot;&quot;);&quot;E&quot;&amp;ROW();[.$B113])" office:value-type="string" office:string-value="E91" calcext:value-type="string">
            <text:p>E91</text:p>
          </table:table-cell>
          <table:table-cell table:style-name="ce13" table:formula="of:=IF(AND([.$D114]&lt;&gt;&quot;&quot;;[.$D114]&lt;&gt;&quot;○&quot;);MAX([.$C$3:.$C113])+1;[.$C113])" office:value-type="float" office:value="6" calcext:value-type="float">
            <text:p>6</text:p>
          </table:table-cell>
          <table:table-cell table:style-name="ce19"/>
          <table:table-cell table:style-name="ce27" table:formula="of:=IF(AND([.$F114]&lt;&gt;&quot;&quot;;[.$D113]&lt;&gt;&quot;&quot;);1;IF([.$F114]&lt;&gt;&quot;&quot;;MAX(INDIRECT([.$B114]):[.$E113])+1;&quot;&quot;))">
            <text:p/>
          </table:table-cell>
          <table:table-cell table:style-name="ce32"/>
          <table:table-cell table:style-name="ce32" table:formula="of:=IF([.$H114]=&quot;&quot;;&quot;&quot;;IF([.$G113]=&quot;&quot;;1;[.$G11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14]&lt;&gt;&quot;&quot;;NETWORKDAYS([.$L114];[.$M114];[$休日.$B$4:.$B$304]);&quot;&quot;)">
            <text:p/>
          </table:table-cell>
          <table:table-cell table:style-name="ce216"/>
          <table:table-cell table:style-name="ce63" table:formula="of:=IF(OR(AND([.$N114]=&quot;&quot;;[.$L114]&lt;&gt;&quot;&quot;;[.$L114]&lt;=[.$U$1]);AND([.$M114]&lt;&gt;&quot;&quot;;[.Q114]&lt;100;[.$M114]&lt;=[.$U$1]));&quot;遅延&quot;;&quot;&quot;)">
            <text:p/>
          </table:table-cell>
          <table:table-cell table:style-name="ce66"/>
          <table:table-cell table:style-name="ce66" table:formula="of:=SUM([.$V114:.$FM11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5]&lt;&gt;&quot;&quot;;[.$F115]=&quot;&quot;);&quot;E&quot;&amp;ROW();[.$B114])" office:value-type="string" office:string-value="E115" calcext:value-type="string">
            <text:p>E115</text:p>
          </table:table-cell>
          <table:table-cell table:style-name="ce13" table:formula="of:=IF(AND([.$D115]&lt;&gt;&quot;&quot;;[.$D115]&lt;&gt;&quot;○&quot;);MAX([.$C$3:.$C114])+1;[.$C114])" office:value-type="float" office:value="7" calcext:value-type="float">
            <text:p>7</text:p>
          </table:table-cell>
          <table:table-cell table:style-name="ce19" office:value-type="string" calcext:value-type="string">
            <text:p>買い物かご管理</text:p>
          </table:table-cell>
          <table:table-cell table:style-name="ce27" table:formula="of:=IF(AND([.$F115]&lt;&gt;&quot;&quot;;[.$D114]&lt;&gt;&quot;&quot;);1;IF([.$F115]&lt;&gt;&quot;&quot;;MAX(INDIRECT([.$B115]):[.$E114])+1;&quot;&quot;))">
            <text:p/>
          </table:table-cell>
          <table:table-cell table:style-name="ce34"/>
          <table:table-cell table:style-name="ce32" table:formula="of:=IF([.$H115]=&quot;&quot;;&quot;&quot;;IF([.$G114]=&quot;&quot;;1;[.$G114]+1))">
            <text:p/>
          </table:table-cell>
          <table:table-cell table:style-name="ce32" table:number-columns-repeated="2"/>
          <table:table-cell table:style-name="ce32" office:value-type="string" calcext:value-type="string">
            <text:p>上田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15]&lt;&gt;&quot;&quot;;NETWORKDAYS([.$L115];[.$M115];[$休日.$B$4:.$B$304]);&quot;&quot;)" office:value-type="float" office:value="5" calcext:value-type="float">
            <text:p>5</text:p>
          </table:table-cell>
          <table:table-cell table:style-name="ce260" office:value-type="float" office:value="100" calcext:value-type="float">
            <text:p>100</text:p>
          </table:table-cell>
          <table:table-cell table:style-name="ce63" table:formula="of:=IF(OR(AND([.$N115]=&quot;&quot;;[.$L115]&lt;&gt;&quot;&quot;;[.$L115]&lt;=[.$U$1]);AND([.$M115]&lt;&gt;&quot;&quot;;[.Q115]&lt;100;[.$M115]&lt;=[.$U$1]));&quot;遅延&quot;;&quot;&quot;)">
            <text:p/>
          </table:table-cell>
          <table:table-cell table:style-name="ce66" office:value-type="float" office:value="29" calcext:value-type="float">
            <text:p>29</text:p>
          </table:table-cell>
          <table:table-cell table:style-name="ce66" table:formula="of:=SUM([.$V115:.$FM11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6]&lt;&gt;&quot;&quot;;[.$F116]=&quot;&quot;);&quot;E&quot;&amp;ROW();[.$B115])" office:value-type="string" office:string-value="E115" calcext:value-type="string">
            <text:p>E115</text:p>
          </table:table-cell>
          <table:table-cell table:style-name="ce13" table:formula="of:=IF(AND([.$D116]&lt;&gt;&quot;&quot;;[.$D116]&lt;&gt;&quot;○&quot;);MAX([.$C$3:.$C115])+1;[.$C115])" office:value-type="float" office:value="7" calcext:value-type="float">
            <text:p>7</text:p>
          </table:table-cell>
          <table:table-cell table:style-name="ce19"/>
          <table:table-cell table:style-name="ce27" table:formula="of:=IF(AND([.$F116]&lt;&gt;&quot;&quot;;[.$D115]&lt;&gt;&quot;&quot;);1;IF([.$F116]&lt;&gt;&quot;&quot;;MAX(INDIRECT([.$B116]):[.$E115])+1;&quot;&quot;))" office:value-type="float" office:value="1" calcext:value-type="float">
            <text:p>1</text:p>
          </table:table-cell>
          <table:table-cell table:style-name="ce35" office:value-type="string" calcext:value-type="string">
            <text:p>商品一覧表示</text:p>
          </table:table-cell>
          <table:table-cell table:style-name="ce32" table:formula="of:=IF([.$H116]=&quot;&quot;;&quot;&quot;;IF([.$G115]=&quot;&quot;;1;[.$G115]+1))">
            <text:p/>
          </table:table-cell>
          <table:table-cell table:style-name="ce32" table:number-columns-repeated="2"/>
          <table:table-cell table:style-name="ce32" office:value-type="string" calcext:value-type="string">
            <text:p>上田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16]&lt;&gt;&quot;&quot;;NETWORKDAYS([.$L116];[.$M116];[$休日.$B$4:.$B$304]);&quot;&quot;)" office:value-type="float" office:value="2" calcext:value-type="float">
            <text:p>2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16]=&quot;&quot;;[.$L116]&lt;&gt;&quot;&quot;;[.$L116]&lt;=[.$U$1]);AND([.$M116]&lt;&gt;&quot;&quot;;[.Q116]&lt;100;[.$M116]&lt;=[.$U$1]));&quot;遅延&quot;;&quot;&quot;)">
            <text:p/>
          </table:table-cell>
          <table:table-cell table:style-name="ce66" office:value-type="float" office:value="30" calcext:value-type="float">
            <text:p>30</text:p>
          </table:table-cell>
          <table:table-cell table:style-name="ce66" table:formula="of:=SUM([.$V116:.$FM11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7]&lt;&gt;&quot;&quot;;[.$F116]=&quot;&quot;);&quot;E&quot;&amp;ROW();[.$B115])" office:value-type="string" office:string-value="E115" calcext:value-type="string">
            <text:p>E115</text:p>
          </table:table-cell>
          <table:table-cell table:style-name="ce13" table:formula="of:=IF(AND([.$D117]&lt;&gt;&quot;&quot;;[.$D117]&lt;&gt;&quot;○&quot;);MAX([.$C$3:.$C115])+1;[.$C115])" office:value-type="float" office:value="7" calcext:value-type="float">
            <text:p>7</text:p>
          </table:table-cell>
          <table:table-cell table:style-name="ce19"/>
          <table:table-cell table:style-name="ce27" table:formula="of:=IF(AND([.$F117]&lt;&gt;&quot;&quot;;[.$D116]&lt;&gt;&quot;&quot;);1;IF([.$F117]&lt;&gt;&quot;&quot;;MAX(INDIRECT([.$B117]):[.$E116])+1;&quot;&quot;))">
            <text:p/>
          </table:table-cell>
          <table:table-cell table:style-name="Default"/>
          <table:table-cell table:style-name="ce32" table:formula="of:=IF([.$H117]=&quot;&quot;;&quot;&quot;;IF([.$G115]=&quot;&quot;;1;[.$G115]+1))" office:value-type="float" office:value="1" calcext:value-type="float">
            <text:p>1</text:p>
          </table:table-cell>
          <table:table-cell table:style-name="ce32" office:value-type="string" calcext:value-type="string">
            <text:p>商品一覧用　コントローラファイルの作成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17]&lt;&gt;&quot;&quot;;NETWORKDAYS([.$L117];[.$M117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17]=&quot;&quot;;[.$L117]&lt;&gt;&quot;&quot;;[.$L117]&lt;=[.$U$1]);AND([.$M117]&lt;&gt;&quot;&quot;;[.Q117]&lt;100;[.$M117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17:.$FM117])" office:value-type="float" office:value="0" calcext:value-type="float">
            <text:p>0</text:p>
          </table:table-cell>
          <table:table-cell table:style-name="ce72"/>
          <table:table-cell table:style-name="ce85"/>
          <table:table-cell table:style-name="ce99" table:number-columns-repeated="2"/>
          <table:table-cell table:style-name="ce109" table:number-columns-repeated="2"/>
          <table:table-cell table:style-name="ce99" table:number-columns-repeated="5"/>
          <table:table-cell table:style-name="ce109" table:number-columns-repeated="2"/>
          <table:table-cell table:style-name="ce99" table:number-columns-repeated="5"/>
          <table:table-cell table:style-name="ce109" table:number-columns-repeated="2"/>
          <table:table-cell table:style-name="ce99" table:number-columns-repeated="4"/>
          <table:table-cell table:style-name="ce138"/>
          <table:table-cell table:style-name="ce109" table:number-columns-repeated="2"/>
          <table:table-cell table:style-name="ce152"/>
          <table:table-cell table:style-name="ce99" table:number-columns-repeated="120"/>
          <table:table-cell table:style-name="ce163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118]&lt;&gt;&quot;&quot;;[.$F118]=&quot;&quot;);&quot;E&quot;&amp;ROW();[.$B117])" office:value-type="string" office:string-value="E115" calcext:value-type="string">
            <text:p>E115</text:p>
          </table:table-cell>
          <table:table-cell table:style-name="ce13" table:formula="of:=IF(AND([.$D118]&lt;&gt;&quot;&quot;;[.$D118]&lt;&gt;&quot;○&quot;);MAX([.$C$3:.$C117])+1;[.$C117])" office:value-type="float" office:value="7" calcext:value-type="float">
            <text:p>7</text:p>
          </table:table-cell>
          <table:table-cell table:style-name="ce19"/>
          <table:table-cell table:style-name="ce27" table:formula="of:=IF(AND([.$F118]&lt;&gt;&quot;&quot;;[.$D117]&lt;&gt;&quot;&quot;);1;IF([.$F118]&lt;&gt;&quot;&quot;;MAX(INDIRECT([.$B118]):[.$E117])+1;&quot;&quot;))">
            <text:p/>
          </table:table-cell>
          <table:table-cell table:style-name="ce32"/>
          <table:table-cell table:style-name="ce32" table:formula="of:=IF([.$H118]=&quot;&quot;;&quot;&quot;;IF([.$G117]=&quot;&quot;;1;[.$G117]+1))" office:value-type="float" office:value="2" calcext:value-type="float">
            <text:p>2</text:p>
          </table:table-cell>
          <table:table-cell table:style-name="ce32" office:value-type="string" calcext:value-type="string">
            <text:p>商品一覧用　テンプレートファイルの作成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18]&lt;&gt;&quot;&quot;;NETWORKDAYS([.$L118];[.$M118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18]=&quot;&quot;;[.$L118]&lt;&gt;&quot;&quot;;[.$L118]&lt;=[.$U$1]);AND([.$M118]&lt;&gt;&quot;&quot;;[.Q118]&lt;100;[.$M118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18:.$FM118])" office:value-type="float" office:value="0" calcext:value-type="float">
            <text:p>0</text:p>
          </table:table-cell>
          <table:table-cell table:style-name="ce72"/>
          <table:table-cell table:style-name="ce86"/>
          <table:table-cell table:style-name="ce100" table:number-columns-repeated="2"/>
          <table:table-cell table:style-name="ce110" table:number-columns-repeated="2"/>
          <table:table-cell table:style-name="ce100" table:number-columns-repeated="5"/>
          <table:table-cell table:style-name="ce110" table:number-columns-repeated="2"/>
          <table:table-cell table:style-name="ce100" table:number-columns-repeated="5"/>
          <table:table-cell table:style-name="ce110" table:number-columns-repeated="2"/>
          <table:table-cell table:style-name="ce100" table:number-columns-repeated="4"/>
          <table:table-cell table:style-name="ce139"/>
          <table:table-cell table:style-name="ce110" table:number-columns-repeated="2"/>
          <table:table-cell table:style-name="ce153"/>
          <table:table-cell table:style-name="ce100" table:number-columns-repeated="120"/>
          <table:table-cell table:style-name="ce164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9]&lt;&gt;&quot;&quot;;[.$F119]=&quot;&quot;);&quot;E&quot;&amp;ROW();[.$B118])" office:value-type="string" office:string-value="E115" calcext:value-type="string">
            <text:p>E115</text:p>
          </table:table-cell>
          <table:table-cell table:style-name="ce13" table:formula="of:=IF(AND([.$D119]&lt;&gt;&quot;&quot;;[.$D119]&lt;&gt;&quot;○&quot;);MAX([.$C$3:.$C118])+1;[.$C118])" office:value-type="float" office:value="7" calcext:value-type="float">
            <text:p>7</text:p>
          </table:table-cell>
          <table:table-cell table:style-name="ce19"/>
          <table:table-cell table:style-name="ce27" table:formula="of:=IF(AND([.$F119]&lt;&gt;&quot;&quot;;[.$D118]&lt;&gt;&quot;&quot;);1;IF([.$F119]&lt;&gt;&quot;&quot;;MAX(INDIRECT([.$B119]):[.$E118])+1;&quot;&quot;))">
            <text:p/>
          </table:table-cell>
          <table:table-cell table:style-name="ce32"/>
          <table:table-cell table:style-name="ce32" table:formula="of:=IF([.$H119]=&quot;&quot;;&quot;&quot;;IF([.$G118]=&quot;&quot;;1;[.$G118]+1))" office:value-type="float" office:value="3" calcext:value-type="float">
            <text:p>3</text:p>
          </table:table-cell>
          <table:table-cell table:style-name="ce32" office:value-type="string" calcext:value-type="string">
            <text:p>商品一覧用　コントローラファイルの編集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19]&lt;&gt;&quot;&quot;;NETWORKDAYS([.$L119];[.$M119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19]=&quot;&quot;;[.$L119]&lt;&gt;&quot;&quot;;[.$L119]&lt;=[.$U$1]);AND([.$M119]&lt;&gt;&quot;&quot;;[.Q119]&lt;100;[.$M119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19:.$FM119])" office:value-type="float" office:value="0" calcext:value-type="float">
            <text:p>0</text:p>
          </table:table-cell>
          <table:table-cell table:style-name="ce72"/>
          <table:table-cell table:style-name="ce87"/>
          <table:table-cell table:style-name="ce101" table:number-columns-repeated="2"/>
          <table:table-cell table:style-name="ce111" table:number-columns-repeated="2"/>
          <table:table-cell table:style-name="ce101" table:number-columns-repeated="5"/>
          <table:table-cell table:style-name="ce111" table:number-columns-repeated="2"/>
          <table:table-cell table:style-name="ce101" table:number-columns-repeated="5"/>
          <table:table-cell table:style-name="ce111" table:number-columns-repeated="2"/>
          <table:table-cell table:style-name="ce101" table:number-columns-repeated="4"/>
          <table:table-cell table:style-name="ce140"/>
          <table:table-cell table:style-name="ce111" table:number-columns-repeated="2"/>
          <table:table-cell table:style-name="ce154"/>
          <table:table-cell table:style-name="ce101" table:number-columns-repeated="120"/>
          <table:table-cell table:style-name="ce165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120]&lt;&gt;&quot;&quot;;[.$F120]=&quot;&quot;);&quot;E&quot;&amp;ROW();[.$B119])" office:value-type="string" office:string-value="E115" calcext:value-type="string">
            <text:p>E115</text:p>
          </table:table-cell>
          <table:table-cell table:style-name="ce13" table:formula="of:=IF(AND([.$D120]&lt;&gt;&quot;&quot;;[.$D120]&lt;&gt;&quot;○&quot;);MAX([.$C$3:.$C119])+1;[.$C119])" office:value-type="float" office:value="7" calcext:value-type="float">
            <text:p>7</text:p>
          </table:table-cell>
          <table:table-cell table:style-name="ce19"/>
          <table:table-cell table:style-name="ce27" table:formula="of:=IF(AND([.$F120]&lt;&gt;&quot;&quot;;[.$D119]&lt;&gt;&quot;&quot;);1;IF([.$F120]&lt;&gt;&quot;&quot;;MAX(INDIRECT([.$B120]):[.$E119])+1;&quot;&quot;))">
            <text:p/>
          </table:table-cell>
          <table:table-cell table:style-name="ce32"/>
          <table:table-cell table:style-name="ce32" table:formula="of:=IF([.$H120]=&quot;&quot;;&quot;&quot;;IF([.$G119]=&quot;&quot;;1;[.$G119]+1))" office:value-type="float" office:value="4" calcext:value-type="float">
            <text:p>4</text:p>
          </table:table-cell>
          <table:table-cell table:style-name="ce32" office:value-type="string" calcext:value-type="string">
            <text:p>商品一覧用　テンプレートファイルの編集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20]&lt;&gt;&quot;&quot;;NETWORKDAYS([.$L120];[.$M120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20]=&quot;&quot;;[.$L120]&lt;&gt;&quot;&quot;;[.$L120]&lt;=[.$U$1]);AND([.$M120]&lt;&gt;&quot;&quot;;[.Q120]&lt;100;[.$M120]&lt;=[.$U$1]));&quot;遅延&quot;;&quot;&quot;)">
            <text:p/>
          </table:table-cell>
          <table:table-cell table:style-name="ce66" office:value-type="float" office:value="7" calcext:value-type="float">
            <text:p>7</text:p>
          </table:table-cell>
          <table:table-cell table:style-name="ce66" table:formula="of:=SUM([.$V120:.$FM12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1]&lt;&gt;&quot;&quot;;[.$F121]=&quot;&quot;);&quot;E&quot;&amp;ROW();[.$B120])" office:value-type="string" office:string-value="E115" calcext:value-type="string">
            <text:p>E115</text:p>
          </table:table-cell>
          <table:table-cell table:style-name="ce13" table:formula="of:=IF(AND([.$D121]&lt;&gt;&quot;&quot;;[.$D121]&lt;&gt;&quot;○&quot;);MAX([.$C$3:.$C120])+1;[.$C120])" office:value-type="float" office:value="7" calcext:value-type="float">
            <text:p>7</text:p>
          </table:table-cell>
          <table:table-cell table:style-name="ce19"/>
          <table:table-cell table:style-name="ce27" table:formula="of:=IF(AND([.$F121]&lt;&gt;&quot;&quot;;[.$D120]&lt;&gt;&quot;&quot;);1;IF([.$F121]&lt;&gt;&quot;&quot;;MAX(INDIRECT([.$B121]):[.$E120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商品追加</text:p>
          </table:table-cell>
          <table:table-cell table:style-name="ce32" table:formula="of:=IF([.$H121]=&quot;&quot;;&quot;&quot;;IF([.$G120]=&quot;&quot;;1;[.$G120]+1))" office:value-type="float" office:value="5" calcext:value-type="float">
            <text:p>5</text:p>
          </table:table-cell>
          <table:table-cell table:style-name="ce32" office:value-type="string" calcext:value-type="string">
            <text:p>商品追加用　コントローラファイルの編集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21]&lt;&gt;&quot;&quot;;NETWORKDAYS([.$L121];[.$M121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21]=&quot;&quot;;[.$L121]&lt;&gt;&quot;&quot;;[.$L121]&lt;=[.$U$1]);AND([.$M121]&lt;&gt;&quot;&quot;;[.Q121]&lt;100;[.$M121]&lt;=[.$U$1]));&quot;遅延&quot;;&quot;&quot;)">
            <text:p/>
          </table:table-cell>
          <table:table-cell table:style-name="ce66" office:value-type="float" office:value="4" calcext:value-type="float">
            <text:p>4</text:p>
          </table:table-cell>
          <table:table-cell table:style-name="ce66" table:formula="of:=SUM([.$V121:.$FM12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2]&lt;&gt;&quot;&quot;;[.$F122]=&quot;&quot;);&quot;E&quot;&amp;ROW();[.$B121])" office:value-type="string" office:string-value="E115" calcext:value-type="string">
            <text:p>E115</text:p>
          </table:table-cell>
          <table:table-cell table:style-name="ce13" table:formula="of:=IF(AND([.$D122]&lt;&gt;&quot;&quot;;[.$D122]&lt;&gt;&quot;○&quot;);MAX([.$C$3:.$C121])+1;[.$C121])" office:value-type="float" office:value="7" calcext:value-type="float">
            <text:p>7</text:p>
          </table:table-cell>
          <table:table-cell table:style-name="ce19"/>
          <table:table-cell table:style-name="ce27" table:formula="of:=IF(AND([.$F122]&lt;&gt;&quot;&quot;;[.$D121]&lt;&gt;&quot;&quot;);1;IF([.$F122]&lt;&gt;&quot;&quot;;MAX(INDIRECT([.$B122]):[.$E121])+1;&quot;&quot;))" office:value-type="float" office:value="3" calcext:value-type="float">
            <text:p>3</text:p>
          </table:table-cell>
          <table:table-cell table:style-name="ce32" office:value-type="string" calcext:value-type="string">
            <text:p>商品削除</text:p>
          </table:table-cell>
          <table:table-cell table:style-name="ce32" table:formula="of:=IF([.$H122]=&quot;&quot;;&quot;&quot;;IF([.$G121]=&quot;&quot;;1;[.$G121]+1))" office:value-type="float" office:value="6" calcext:value-type="float">
            <text:p>6</text:p>
          </table:table-cell>
          <table:table-cell table:style-name="ce32" office:value-type="string" calcext:value-type="string">
            <text:p>商品削除用　コントローラファイルの編集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22]&lt;&gt;&quot;&quot;;NETWORKDAYS([.$L122];[.$M122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22]=&quot;&quot;;[.$L122]&lt;&gt;&quot;&quot;;[.$L122]&lt;=[.$U$1]);AND([.$M122]&lt;&gt;&quot;&quot;;[.Q122]&lt;100;[.$M122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22:.$FM12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3]&lt;&gt;&quot;&quot;;[.$F123]=&quot;&quot;);&quot;E&quot;&amp;ROW();[.$B122])" office:value-type="string" office:string-value="E115" calcext:value-type="string">
            <text:p>E115</text:p>
          </table:table-cell>
          <table:table-cell table:style-name="ce13" table:formula="of:=IF(AND([.$D123]&lt;&gt;&quot;&quot;;[.$D123]&lt;&gt;&quot;○&quot;);MAX([.$C$3:.$C122])+1;[.$C122])" office:value-type="float" office:value="7" calcext:value-type="float">
            <text:p>7</text:p>
          </table:table-cell>
          <table:table-cell table:style-name="ce19"/>
          <table:table-cell table:style-name="ce27" table:formula="of:=IF(AND([.$F123]&lt;&gt;&quot;&quot;;[.$D122]&lt;&gt;&quot;&quot;);1;IF([.$F123]&lt;&gt;&quot;&quot;;MAX(INDIRECT([.$B123]):[.$E122])+1;&quot;&quot;))" office:value-type="float" office:value="4" calcext:value-type="float">
            <text:p>4</text:p>
          </table:table-cell>
          <table:table-cell table:style-name="ce32" office:value-type="string" calcext:value-type="string">
            <text:p>買い物かご全体</text:p>
          </table:table-cell>
          <table:table-cell table:style-name="ce32" table:formula="of:=IF([.$H123]=&quot;&quot;;&quot;&quot;;IF([.$G122]=&quot;&quot;;1;[.$G122]+1))" office:value-type="float" office:value="7" calcext:value-type="float">
            <text:p>7</text:p>
          </table:table-cell>
          <table:table-cell table:style-name="ce32" office:value-type="string" calcext:value-type="string">
            <text:p>動作確認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2" table:formula="of:=IF([.$L123]&lt;&gt;&quot;&quot;;NETWORKDAYS([.$L123];[.$M123];[$休日.$B$4:.$B$304]);&quot;&quot;)" office:value-type="float" office:value="2" calcext:value-type="float">
            <text:p>2</text:p>
          </table:table-cell>
          <table:table-cell table:style-name="ce236" office:value-type="float" office:value="100" calcext:value-type="float">
            <text:p>100</text:p>
          </table:table-cell>
          <table:table-cell table:style-name="ce63" table:formula="of:=IF(OR(AND([.$N123]=&quot;&quot;;[.$L123]&lt;&gt;&quot;&quot;;[.$L123]&lt;=[.$U$1]);AND([.$M123]&lt;&gt;&quot;&quot;;[.Q123]&lt;100;[.$M123]&lt;=[.$U$1]));&quot;遅延&quot;;&quot;&quot;)">
            <text:p/>
          </table:table-cell>
          <table:table-cell table:style-name="ce66" office:value-type="float" office:value="12" calcext:value-type="float">
            <text:p>12</text:p>
          </table:table-cell>
          <table:table-cell table:style-name="ce66" table:formula="of:=SUM([.$V123:.$FM12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4]&lt;&gt;&quot;&quot;;[.$F124]=&quot;&quot;);&quot;E&quot;&amp;ROW();[.$B123])" office:value-type="string" office:string-value="E115" calcext:value-type="string">
            <text:p>E115</text:p>
          </table:table-cell>
          <table:table-cell table:style-name="ce13" table:formula="of:=IF(AND([.$D124]&lt;&gt;&quot;&quot;;[.$D124]&lt;&gt;&quot;○&quot;);MAX([.$C$3:.$C123])+1;[.$C123])" office:value-type="float" office:value="7" calcext:value-type="float">
            <text:p>7</text:p>
          </table:table-cell>
          <table:table-cell table:style-name="ce19"/>
          <table:table-cell table:style-name="ce27" table:formula="of:=IF(AND([.$F124]&lt;&gt;&quot;&quot;;[.$D123]&lt;&gt;&quot;&quot;);1;IF([.$F124]&lt;&gt;&quot;&quot;;MAX(INDIRECT([.$B124]):[.$E123])+1;&quot;&quot;))">
            <text:p/>
          </table:table-cell>
          <table:table-cell table:style-name="ce32"/>
          <table:table-cell table:style-name="ce32" table:formula="of:=IF([.$H124]=&quot;&quot;;&quot;&quot;;IF([.$G123]=&quot;&quot;;1;[.$G12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24]&lt;&gt;&quot;&quot;;NETWORKDAYS([.$L124];[.$M124];[$休日.$B$4:.$B$304]);&quot;&quot;)">
            <text:p/>
          </table:table-cell>
          <table:table-cell table:style-name="ce236"/>
          <table:table-cell table:style-name="ce63" table:formula="of:=IF(OR(AND([.$N124]=&quot;&quot;;[.$L124]&lt;&gt;&quot;&quot;;[.$L124]&lt;=[.$U$1]);AND([.$M124]&lt;&gt;&quot;&quot;;[.Q124]&lt;100;[.$M124]&lt;=[.$U$1]));&quot;遅延&quot;;&quot;&quot;)">
            <text:p/>
          </table:table-cell>
          <table:table-cell table:style-name="ce66"/>
          <table:table-cell table:style-name="ce66" table:formula="of:=SUM([.$V124:.$FM124])" office:value-type="float" office:value="0" calcext:value-type="float">
            <text:p>0</text:p>
          </table:table-cell>
          <table:table-cell table:style-name="ce72"/>
          <table:table-cell table:style-name="ce88"/>
          <table:table-cell table:style-name="ce102" table:number-columns-repeated="2"/>
          <table:table-cell table:style-name="ce112" table:number-columns-repeated="2"/>
          <table:table-cell table:style-name="ce102" table:number-columns-repeated="5"/>
          <table:table-cell table:style-name="ce112" table:number-columns-repeated="2"/>
          <table:table-cell table:style-name="ce102" table:number-columns-repeated="5"/>
          <table:table-cell table:style-name="ce112" table:number-columns-repeated="2"/>
          <table:table-cell table:style-name="ce102" table:number-columns-repeated="4"/>
          <table:table-cell table:style-name="ce141"/>
          <table:table-cell table:style-name="ce112" table:number-columns-repeated="2"/>
          <table:table-cell table:style-name="ce155"/>
          <table:table-cell table:style-name="ce102" table:number-columns-repeated="120"/>
          <table:table-cell table:style-name="ce166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5]&lt;&gt;&quot;&quot;;[.$F125]=&quot;&quot;);&quot;E&quot;&amp;ROW();[.$B124])" office:value-type="string" office:string-value="E125" calcext:value-type="string">
            <text:p>E125</text:p>
          </table:table-cell>
          <table:table-cell table:style-name="ce13" table:formula="of:=IF(AND([.$D125]&lt;&gt;&quot;&quot;;[.$D125]&lt;&gt;&quot;○&quot;);MAX([.$C$3:.$C124])+1;[.$C124])" office:value-type="float" office:value="8" calcext:value-type="float">
            <text:p>8</text:p>
          </table:table-cell>
          <table:table-cell table:style-name="ce19" office:value-type="string" calcext:value-type="string">
            <text:p>注文管理</text:p>
          </table:table-cell>
          <table:table-cell table:style-name="ce27" table:formula="of:=IF(AND([.$F125]&lt;&gt;&quot;&quot;;[.$D124]&lt;&gt;&quot;&quot;);1;IF([.$F125]&lt;&gt;&quot;&quot;;MAX(INDIRECT([.$B125]):[.$E124])+1;&quot;&quot;))">
            <text:p/>
          </table:table-cell>
          <table:table-cell table:style-name="ce32"/>
          <table:table-cell table:style-name="ce32" table:formula="of:=IF([.$H125]=&quot;&quot;;&quot;&quot;;IF([.$G124]=&quot;&quot;;1;[.$G124]+1))">
            <text:p/>
          </table:table-cell>
          <table:table-cell table:style-name="ce32" table:number-columns-repeated="2"/>
          <table:table-cell table:style-name="ce32" office:value-type="string" calcext:value-type="string">
            <text:p>小林、大湾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125]&lt;&gt;&quot;&quot;;NETWORKDAYS([.$L125];[.$M125];[$休日.$B$4:.$B$304]);&quot;&quot;)" office:value-type="float" office:value="7" calcext:value-type="float">
            <text:p>7</text:p>
          </table:table-cell>
          <table:table-cell table:style-name="ce236" office:value-type="float" office:value="100" calcext:value-type="float">
            <text:p>100</text:p>
          </table:table-cell>
          <table:table-cell table:style-name="ce63" table:formula="of:=IF(OR(AND([.$N125]=&quot;&quot;;[.$L125]&lt;&gt;&quot;&quot;;[.$L125]&lt;=[.$U$1]);AND([.$M125]&lt;&gt;&quot;&quot;;[.Q125]&lt;100;[.$M125]&lt;=[.$U$1]));&quot;遅延&quot;;&quot;&quot;)">
            <text:p/>
          </table:table-cell>
          <table:table-cell table:style-name="ce66"/>
          <table:table-cell table:style-name="ce66" table:formula="of:=SUM([.$V125:.$FM12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6]&lt;&gt;&quot;&quot;;[.$F126]=&quot;&quot;);&quot;E&quot;&amp;ROW();[.$B125])" office:value-type="string" office:string-value="E125" calcext:value-type="string">
            <text:p>E125</text:p>
          </table:table-cell>
          <table:table-cell table:style-name="ce13" table:formula="of:=IF(AND([.$D126]&lt;&gt;&quot;&quot;;[.$D126]&lt;&gt;&quot;○&quot;);MAX([.$C$3:.$C125])+1;[.$C125])" office:value-type="float" office:value="8" calcext:value-type="float">
            <text:p>8</text:p>
          </table:table-cell>
          <table:table-cell table:style-name="ce19"/>
          <table:table-cell table:style-name="ce27" table:formula="of:=IF(AND([.$F126]&lt;&gt;&quot;&quot;;[.$D125]&lt;&gt;&quot;&quot;);1;IF([.$F126]&lt;&gt;&quot;&quot;;MAX(INDIRECT([.$B126]):[.$E125])+1;&quot;&quot;))" office:value-type="float" office:value="1" calcext:value-type="float">
            <text:p>1</text:p>
          </table:table-cell>
          <table:table-cell table:style-name="ce34" office:value-type="string" calcext:value-type="string">
            <text:p>注文一覧表示・注文詳細</text:p>
          </table:table-cell>
          <table:table-cell table:style-name="ce32" table:formula="of:=IF([.$H126]=&quot;&quot;;&quot;&quot;;IF([.$G125]=&quot;&quot;;1;[.$G125]+1))">
            <text:p/>
          </table:table-cell>
          <table:table-cell table:style-name="ce32" table:number-columns-repeated="2"/>
          <table:table-cell table:style-name="ce32" office:value-type="string" calcext:value-type="string">
            <text:p>小林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126]&lt;&gt;&quot;&quot;;NETWORKDAYS([.$L126];[.$M126];[$休日.$B$4:.$B$304]);&quot;&quot;)" office:value-type="float" office:value="5" calcext:value-type="float">
            <text:p>5</text:p>
          </table:table-cell>
          <table:table-cell table:style-name="ce236" office:value-type="float" office:value="100" calcext:value-type="float">
            <text:p>100</text:p>
          </table:table-cell>
          <table:table-cell table:style-name="ce63" table:formula="of:=IF(OR(AND([.$N126]=&quot;&quot;;[.$L126]&lt;&gt;&quot;&quot;;[.$L126]&lt;=[.$U$1]);AND([.$M126]&lt;&gt;&quot;&quot;;[.Q126]&lt;100;[.$M126]&lt;=[.$U$1]));&quot;遅延&quot;;&quot;&quot;)">
            <text:p/>
          </table:table-cell>
          <table:table-cell table:style-name="ce66" table:formula="of:=SUM([.S127:.S136])" office:value-type="float" office:value="19" calcext:value-type="float">
            <text:p>19</text:p>
          </table:table-cell>
          <table:table-cell table:style-name="ce66" table:formula="of:=SUM([.$V126:.$FM12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7]&lt;&gt;&quot;&quot;;[.$F127]=&quot;&quot;);&quot;E&quot;&amp;ROW();[.$B126])" office:value-type="string" office:string-value="E125" calcext:value-type="string">
            <text:p>E125</text:p>
          </table:table-cell>
          <table:table-cell table:style-name="ce13" table:formula="of:=IF(AND([.$D127]&lt;&gt;&quot;&quot;;[.$D127]&lt;&gt;&quot;○&quot;);MAX([.$C$3:.$C126])+1;[.$C126])" office:value-type="float" office:value="8" calcext:value-type="float">
            <text:p>8</text:p>
          </table:table-cell>
          <table:table-cell table:style-name="ce19"/>
          <table:table-cell table:style-name="ce27" table:formula="of:=IF(AND([.$F127]&lt;&gt;&quot;&quot;;[.$D126]&lt;&gt;&quot;&quot;);1;IF([.$F127]&lt;&gt;&quot;&quot;;MAX(INDIRECT([.$B127]):[.$E126])+1;&quot;&quot;))">
            <text:p/>
          </table:table-cell>
          <table:table-cell table:style-name="ce32"/>
          <table:table-cell table:style-name="ce32" table:formula="of:=IF([.$H127]=&quot;&quot;;&quot;&quot;;IF([.$G126]=&quot;&quot;;1;[.$G126]+1))" office:value-type="float" office:value="1" calcext:value-type="float">
            <text:p>1</text:p>
          </table:table-cell>
          <table:table-cell table:style-name="ce32" office:value-type="string" calcext:value-type="string">
            <text:p>注文エンティティの確認・編集(データベース)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27]&lt;&gt;&quot;&quot;;NETWORKDAYS([.$L127];[.$M127];[$休日.$B$4:.$B$304]);&quot;&quot;)" office:value-type="float" office:value="1" calcext:value-type="float">
            <text:p>1</text:p>
          </table:table-cell>
          <table:table-cell table:style-name="ce236" office:value-type="float" office:value="100" calcext:value-type="float">
            <text:p>100</text:p>
          </table:table-cell>
          <table:table-cell table:style-name="ce63" table:formula="of:=IF(OR(AND([.$N127]=&quot;&quot;;[.$L127]&lt;&gt;&quot;&quot;;[.$L127]&lt;=[.$U$1]);AND([.$M127]&lt;&gt;&quot;&quot;;[.Q127]&lt;100;[.$M127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27:.$FM12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8]&lt;&gt;&quot;&quot;;[.$F128]=&quot;&quot;);&quot;E&quot;&amp;ROW();[.$B127])" office:value-type="string" office:string-value="E125" calcext:value-type="string">
            <text:p>E125</text:p>
          </table:table-cell>
          <table:table-cell table:style-name="ce13" table:formula="of:=IF(AND([.$D128]&lt;&gt;&quot;&quot;;[.$D128]&lt;&gt;&quot;○&quot;);MAX([.$C$3:.$C127])+1;[.$C127])" office:value-type="float" office:value="8" calcext:value-type="float">
            <text:p>8</text:p>
          </table:table-cell>
          <table:table-cell table:style-name="ce19"/>
          <table:table-cell table:style-name="ce27" table:formula="of:=IF(AND([.$F128]&lt;&gt;&quot;&quot;;[.$D127]&lt;&gt;&quot;&quot;);1;IF([.$F128]&lt;&gt;&quot;&quot;;MAX(INDIRECT([.$B128]):[.$E127])+1;&quot;&quot;))">
            <text:p/>
          </table:table-cell>
          <table:table-cell table:style-name="ce32"/>
          <table:table-cell table:style-name="ce32" table:formula="of:=IF([.$H128]=&quot;&quot;;&quot;&quot;;IF([.$G127]=&quot;&quot;;1;[.$G127]+1))" office:value-type="float" office:value="2" calcext:value-type="float">
            <text:p>2</text:p>
          </table:table-cell>
          <table:table-cell table:style-name="ce34" office:value-type="string" calcext:value-type="string">
            <text:p>注文詳細エンティティの確認・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28]&lt;&gt;&quot;&quot;;NETWORKDAYS([.$L128];[.$M128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28]=&quot;&quot;;[.$L128]&lt;&gt;&quot;&quot;;[.$L128]&lt;=[.$U$1]);AND([.$M128]&lt;&gt;&quot;&quot;;[.Q128]&lt;100;[.$M128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28:.$FM12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9]&lt;&gt;&quot;&quot;;[.$F129]=&quot;&quot;);&quot;E&quot;&amp;ROW();[.$B128])" office:value-type="string" office:string-value="E125" calcext:value-type="string">
            <text:p>E125</text:p>
          </table:table-cell>
          <table:table-cell table:style-name="ce13" table:formula="of:=IF(AND([.$D129]&lt;&gt;&quot;&quot;;[.$D129]&lt;&gt;&quot;○&quot;);MAX([.$C$3:.$C128])+1;[.$C128])" office:value-type="float" office:value="8" calcext:value-type="float">
            <text:p>8</text:p>
          </table:table-cell>
          <table:table-cell table:style-name="ce19"/>
          <table:table-cell table:style-name="ce27" table:formula="of:=IF(AND([.$F129]&lt;&gt;&quot;&quot;;[.$D128]&lt;&gt;&quot;&quot;);1;IF([.$F129]&lt;&gt;&quot;&quot;;MAX(INDIRECT([.$B129]):[.$E128])+1;&quot;&quot;))">
            <text:p/>
          </table:table-cell>
          <table:table-cell table:style-name="ce32"/>
          <table:table-cell table:style-name="ce32" table:formula="of:=IF([.$H129]=&quot;&quot;;&quot;&quot;;IF([.$G128]=&quot;&quot;;1;[.$G128]+1))" office:value-type="float" office:value="3" calcext:value-type="float">
            <text:p>3</text:p>
          </table:table-cell>
          <table:table-cell table:style-name="ce32" office:value-type="string" calcext:value-type="string">
            <text:p>リポジトリ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29]&lt;&gt;&quot;&quot;;NETWORKDAYS([.$L129];[.$M129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29]=&quot;&quot;;[.$L129]&lt;&gt;&quot;&quot;;[.$L129]&lt;=[.$U$1]);AND([.$M129]&lt;&gt;&quot;&quot;;[.Q129]&lt;100;[.$M129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29:.$FM12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0]&lt;&gt;&quot;&quot;;[.$F130]=&quot;&quot;);&quot;E&quot;&amp;ROW();[.$B129])" office:value-type="string" office:string-value="E125" calcext:value-type="string">
            <text:p>E125</text:p>
          </table:table-cell>
          <table:table-cell table:style-name="ce13" table:formula="of:=IF(AND([.$D130]&lt;&gt;&quot;&quot;;[.$D130]&lt;&gt;&quot;○&quot;);MAX([.$C$3:.$C129])+1;[.$C129])" office:value-type="float" office:value="8" calcext:value-type="float">
            <text:p>8</text:p>
          </table:table-cell>
          <table:table-cell table:style-name="ce19"/>
          <table:table-cell table:style-name="ce27" table:formula="of:=IF(AND([.$F130]&lt;&gt;&quot;&quot;;[.$D129]&lt;&gt;&quot;&quot;);1;IF([.$F130]&lt;&gt;&quot;&quot;;MAX(INDIRECT([.$B130]):[.$E129])+1;&quot;&quot;))">
            <text:p/>
          </table:table-cell>
          <table:table-cell table:style-name="ce32"/>
          <table:table-cell table:style-name="ce32" table:formula="of:=IF([.$H130]=&quot;&quot;;&quot;&quot;;IF([.$G129]=&quot;&quot;;1;[.$G129]+1))" office:value-type="float" office:value="4" calcext:value-type="float">
            <text:p>4</text:p>
          </table:table-cell>
          <table:table-cell table:style-name="ce32" office:value-type="string" calcext:value-type="string">
            <text:p>注文一覧画面用コントローラ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30]&lt;&gt;&quot;&quot;;NETWORKDAYS([.$L130];[.$M130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30]=&quot;&quot;;[.$L130]&lt;&gt;&quot;&quot;;[.$L130]&lt;=[.$U$1]);AND([.$M130]&lt;&gt;&quot;&quot;;[.Q130]&lt;100;[.$M130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30:.$FM13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1]&lt;&gt;&quot;&quot;;[.$F131]=&quot;&quot;);&quot;E&quot;&amp;ROW();[.$B130])" office:value-type="string" office:string-value="E125" calcext:value-type="string">
            <text:p>E125</text:p>
          </table:table-cell>
          <table:table-cell table:style-name="ce13" table:formula="of:=IF(AND([.$D131]&lt;&gt;&quot;&quot;;[.$D131]&lt;&gt;&quot;○&quot;);MAX([.$C$3:.$C130])+1;[.$C130])" office:value-type="float" office:value="8" calcext:value-type="float">
            <text:p>8</text:p>
          </table:table-cell>
          <table:table-cell table:style-name="ce19"/>
          <table:table-cell table:style-name="ce27" table:formula="of:=IF(AND([.$F131]&lt;&gt;&quot;&quot;;[.$D130]&lt;&gt;&quot;&quot;);1;IF([.$F131]&lt;&gt;&quot;&quot;;MAX(INDIRECT([.$B131]):[.$E130])+1;&quot;&quot;))">
            <text:p/>
          </table:table-cell>
          <table:table-cell table:style-name="ce32"/>
          <table:table-cell table:style-name="ce32" table:formula="of:=IF([.$H131]=&quot;&quot;;&quot;&quot;;IF([.$G130]=&quot;&quot;;1;[.$G130]+1))" office:value-type="float" office:value="5" calcext:value-type="float">
            <text:p>5</text:p>
          </table:table-cell>
          <table:table-cell table:style-name="ce32" office:value-type="string" calcext:value-type="string">
            <text:p>注文一覧画面テンプレートファイルの作成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31]&lt;&gt;&quot;&quot;;NETWORKDAYS([.$L131];[.$M131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31]=&quot;&quot;;[.$L131]&lt;&gt;&quot;&quot;;[.$L131]&lt;=[.$U$1]);AND([.$M131]&lt;&gt;&quot;&quot;;[.Q131]&lt;100;[.$M131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31:.$FM13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2]&lt;&gt;&quot;&quot;;[.$F132]=&quot;&quot;);&quot;E&quot;&amp;ROW();[.$B131])" office:value-type="string" office:string-value="E125" calcext:value-type="string">
            <text:p>E125</text:p>
          </table:table-cell>
          <table:table-cell table:style-name="ce13" table:formula="of:=IF(AND([.$D132]&lt;&gt;&quot;&quot;;[.$D132]&lt;&gt;&quot;○&quot;);MAX([.$C$3:.$C131])+1;[.$C131])" office:value-type="float" office:value="8" calcext:value-type="float">
            <text:p>8</text:p>
          </table:table-cell>
          <table:table-cell table:style-name="ce19"/>
          <table:table-cell table:style-name="ce27" table:formula="of:=IF(AND([.$F132]&lt;&gt;&quot;&quot;;[.$D131]&lt;&gt;&quot;&quot;);1;IF([.$F132]&lt;&gt;&quot;&quot;;MAX(INDIRECT([.$B132]):[.$E131])+1;&quot;&quot;))">
            <text:p/>
          </table:table-cell>
          <table:table-cell table:style-name="ce32"/>
          <table:table-cell table:style-name="ce32" table:formula="of:=IF([.$H132]=&quot;&quot;;&quot;&quot;;IF([.$G131]=&quot;&quot;;1;[.$G131]+1))" office:value-type="float" office:value="6" calcext:value-type="float">
            <text:p>6</text:p>
          </table:table-cell>
          <table:table-cell table:style-name="ce32" office:value-type="string" calcext:value-type="string">
            <text:p>注文一覧画面の動作確認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32]&lt;&gt;&quot;&quot;;NETWORKDAYS([.$L132];[.$M132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32]=&quot;&quot;;[.$L132]&lt;&gt;&quot;&quot;;[.$L132]&lt;=[.$U$1]);AND([.$M132]&lt;&gt;&quot;&quot;;[.Q132]&lt;100;[.$M132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32:.$FM13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3]&lt;&gt;&quot;&quot;;[.$F133]=&quot;&quot;);&quot;E&quot;&amp;ROW();[.$B132])" office:value-type="string" office:string-value="E125" calcext:value-type="string">
            <text:p>E125</text:p>
          </table:table-cell>
          <table:table-cell table:style-name="ce13" table:formula="of:=IF(AND([.$D133]&lt;&gt;&quot;&quot;;[.$D133]&lt;&gt;&quot;○&quot;);MAX([.$C$3:.$C132])+1;[.$C132])" office:value-type="float" office:value="8" calcext:value-type="float">
            <text:p>8</text:p>
          </table:table-cell>
          <table:table-cell table:style-name="ce19"/>
          <table:table-cell table:style-name="ce27" table:formula="of:=IF(AND([.$F133]&lt;&gt;&quot;&quot;;[.$D132]&lt;&gt;&quot;&quot;);1;IF([.$F133]&lt;&gt;&quot;&quot;;MAX(INDIRECT([.$B133]):[.$E132])+1;&quot;&quot;))">
            <text:p/>
          </table:table-cell>
          <table:table-cell table:style-name="ce32"/>
          <table:table-cell table:style-name="ce32" table:formula="of:=IF([.$H133]=&quot;&quot;;&quot;&quot;;IF([.$G132]=&quot;&quot;;1;[.$G132]+1))" office:value-type="float" office:value="7" calcext:value-type="float">
            <text:p>7</text:p>
          </table:table-cell>
          <table:table-cell table:style-name="ce32" office:value-type="string" calcext:value-type="string">
            <text:p>注文詳細画面用コントローラ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33]&lt;&gt;&quot;&quot;;NETWORKDAYS([.$L133];[.$M133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33]=&quot;&quot;;[.$L133]&lt;&gt;&quot;&quot;;[.$L133]&lt;=[.$U$1]);AND([.$M133]&lt;&gt;&quot;&quot;;[.Q133]&lt;100;[.$M133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33:.$FM13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4]&lt;&gt;&quot;&quot;;[.$F134]=&quot;&quot;);&quot;E&quot;&amp;ROW();[.$B133])" office:value-type="string" office:string-value="E125" calcext:value-type="string">
            <text:p>E125</text:p>
          </table:table-cell>
          <table:table-cell table:style-name="ce13" table:formula="of:=IF(AND([.$D134]&lt;&gt;&quot;&quot;;[.$D134]&lt;&gt;&quot;○&quot;);MAX([.$C$3:.$C133])+1;[.$C133])" office:value-type="float" office:value="8" calcext:value-type="float">
            <text:p>8</text:p>
          </table:table-cell>
          <table:table-cell table:style-name="ce19"/>
          <table:table-cell table:style-name="ce27" table:formula="of:=IF(AND([.$F134]&lt;&gt;&quot;&quot;;[.$D133]&lt;&gt;&quot;&quot;);1;IF([.$F134]&lt;&gt;&quot;&quot;;MAX(INDIRECT([.$B134]):[.$E133])+1;&quot;&quot;))">
            <text:p/>
          </table:table-cell>
          <table:table-cell table:style-name="ce32"/>
          <table:table-cell table:style-name="ce32" table:formula="of:=IF([.$H134]=&quot;&quot;;&quot;&quot;;IF([.$G133]=&quot;&quot;;1;[.$G133]+1))" office:value-type="float" office:value="8" calcext:value-type="float">
            <text:p>8</text:p>
          </table:table-cell>
          <table:table-cell table:style-name="ce32" office:value-type="string" calcext:value-type="string">
            <text:p>注文詳細画面テンプレートファイルの作成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34]&lt;&gt;&quot;&quot;;NETWORKDAYS([.$L134];[.$M134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34]=&quot;&quot;;[.$L134]&lt;&gt;&quot;&quot;;[.$L134]&lt;=[.$U$1]);AND([.$M134]&lt;&gt;&quot;&quot;;[.Q134]&lt;100;[.$M134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34:.$FM13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5]&lt;&gt;&quot;&quot;;[.$F135]=&quot;&quot;);&quot;E&quot;&amp;ROW();[.$B134])" office:value-type="string" office:string-value="E125" calcext:value-type="string">
            <text:p>E125</text:p>
          </table:table-cell>
          <table:table-cell table:style-name="ce13" table:formula="of:=IF(AND([.$D135]&lt;&gt;&quot;&quot;;[.$D135]&lt;&gt;&quot;○&quot;);MAX([.$C$3:.$C134])+1;[.$C134])" office:value-type="float" office:value="8" calcext:value-type="float">
            <text:p>8</text:p>
          </table:table-cell>
          <table:table-cell table:style-name="ce19"/>
          <table:table-cell table:style-name="ce27" table:formula="of:=IF(AND([.$F135]&lt;&gt;&quot;&quot;;[.$D134]&lt;&gt;&quot;&quot;);1;IF([.$F135]&lt;&gt;&quot;&quot;;MAX(INDIRECT([.$B135]):[.$E134])+1;&quot;&quot;))">
            <text:p/>
          </table:table-cell>
          <table:table-cell table:style-name="ce32"/>
          <table:table-cell table:style-name="ce32" table:formula="of:=IF([.$H135]=&quot;&quot;;&quot;&quot;;IF([.$G134]=&quot;&quot;;1;[.$G134]+1))" office:value-type="float" office:value="9" calcext:value-type="float">
            <text:p>9</text:p>
          </table:table-cell>
          <table:table-cell table:style-name="ce32" office:value-type="string" calcext:value-type="string">
            <text:p>注文詳細画面の動作確認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135]&lt;&gt;&quot;&quot;;NETWORKDAYS([.$L135];[.$M135];[$休日.$B$4:.$B$304]);&quot;&quot;)" office:value-type="float" office:value="1" calcext:value-type="float">
            <text:p>1</text:p>
          </table:table-cell>
          <table:table-cell table:style-name="ce265" office:value-type="float" office:value="100" calcext:value-type="float">
            <text:p>100</text:p>
          </table:table-cell>
          <table:table-cell table:style-name="ce63" table:formula="of:=IF(OR(AND([.$N135]=&quot;&quot;;[.$L135]&lt;&gt;&quot;&quot;;[.$L135]&lt;=[.$U$1]);AND([.$M135]&lt;&gt;&quot;&quot;;[.Q135]&lt;100;[.$M135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35:.$FM13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6]&lt;&gt;&quot;&quot;;[.$F136]=&quot;&quot;);&quot;E&quot;&amp;ROW();[.$B135])" office:value-type="string" office:string-value="E125" calcext:value-type="string">
            <text:p>E125</text:p>
          </table:table-cell>
          <table:table-cell table:style-name="ce13" table:formula="of:=IF(AND([.$D136]&lt;&gt;&quot;&quot;;[.$D136]&lt;&gt;&quot;○&quot;);MAX([.$C$3:.$C135])+1;[.$C135])" office:value-type="float" office:value="8" calcext:value-type="float">
            <text:p>8</text:p>
          </table:table-cell>
          <table:table-cell table:style-name="ce19"/>
          <table:table-cell table:style-name="ce27" table:formula="of:=IF(AND([.$F136]&lt;&gt;&quot;&quot;;[.$D135]&lt;&gt;&quot;&quot;);1;IF([.$F136]&lt;&gt;&quot;&quot;;MAX(INDIRECT([.$B136]):[.$E135])+1;&quot;&quot;))">
            <text:p/>
          </table:table-cell>
          <table:table-cell table:style-name="ce32"/>
          <table:table-cell table:style-name="ce32" table:formula="of:=IF([.$H136]=&quot;&quot;;&quot;&quot;;IF([.$G135]=&quot;&quot;;1;[.$G135]+1))" office:value-type="float" office:value="10" calcext:value-type="float">
            <text:p>10</text:p>
          </table:table-cell>
          <table:table-cell table:style-name="ce32" office:value-type="string" calcext:value-type="string">
            <text:p>注文一覧・詳細機能全体あわせる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36]&lt;&gt;&quot;&quot;;NETWORKDAYS([.$L136];[.$M136];[$休日.$B$4:.$B$304]);&quot;&quot;)" office:value-type="float" office:value="1" calcext:value-type="float">
            <text:p>1</text:p>
          </table:table-cell>
          <table:table-cell table:style-name="ce265" office:value-type="float" office:value="100" calcext:value-type="float">
            <text:p>100</text:p>
          </table:table-cell>
          <table:table-cell table:style-name="ce63" table:formula="of:=IF(OR(AND([.$N136]=&quot;&quot;;[.$L136]&lt;&gt;&quot;&quot;;[.$L136]&lt;=[.$U$1]);AND([.$M136]&lt;&gt;&quot;&quot;;[.Q136]&lt;100;[.$M136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36:.$FM13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7]&lt;&gt;&quot;&quot;;[.$F137]=&quot;&quot;);&quot;E&quot;&amp;ROW();[.$B136])" office:value-type="string" office:string-value="E125" calcext:value-type="string">
            <text:p>E125</text:p>
          </table:table-cell>
          <table:table-cell table:style-name="ce13" table:formula="of:=IF(AND([.$D137]&lt;&gt;&quot;&quot;;[.$D137]&lt;&gt;&quot;○&quot;);MAX([.$C$3:.$C136])+1;[.$C136])" office:value-type="float" office:value="8" calcext:value-type="float">
            <text:p>8</text:p>
          </table:table-cell>
          <table:table-cell table:style-name="ce19"/>
          <table:table-cell table:style-name="ce27" table:formula="of:=IF(AND([.$F137]&lt;&gt;&quot;&quot;;[.$D136]&lt;&gt;&quot;&quot;);1;IF([.$F137]&lt;&gt;&quot;&quot;;MAX(INDIRECT([.$B137]):[.$E136])+1;&quot;&quot;))">
            <text:p/>
          </table:table-cell>
          <table:table-cell table:style-name="ce32"/>
          <table:table-cell table:style-name="ce32" table:formula="of:=IF([.$H137]=&quot;&quot;;&quot;&quot;;IF([.$G136]=&quot;&quot;;1;[.$G13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37]&lt;&gt;&quot;&quot;;NETWORKDAYS([.$L137];[.$M137];[$休日.$B$4:.$B$304]);&quot;&quot;)">
            <text:p/>
          </table:table-cell>
          <table:table-cell table:style-name="ce216"/>
          <table:table-cell table:style-name="ce63" table:formula="of:=IF(OR(AND([.$N137]=&quot;&quot;;[.$L137]&lt;&gt;&quot;&quot;;[.$L137]&lt;=[.$U$1]);AND([.$M137]&lt;&gt;&quot;&quot;;[.Q137]&lt;100;[.$M137]&lt;=[.$U$1]));&quot;遅延&quot;;&quot;&quot;)">
            <text:p/>
          </table:table-cell>
          <table:table-cell table:style-name="ce66"/>
          <table:table-cell table:style-name="ce66" table:formula="of:=SUM([.$V137:.$FM13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8]&lt;&gt;&quot;&quot;;[.$F138]=&quot;&quot;);&quot;E&quot;&amp;ROW();[.$B137])" office:value-type="string" office:string-value="E125" calcext:value-type="string">
            <text:p>E125</text:p>
          </table:table-cell>
          <table:table-cell table:style-name="ce13" table:formula="of:=IF(AND([.$D138]&lt;&gt;&quot;&quot;;[.$D138]&lt;&gt;&quot;○&quot;);MAX([.$C$3:.$C137])+1;[.$C137])" office:value-type="float" office:value="8" calcext:value-type="float">
            <text:p>8</text:p>
          </table:table-cell>
          <table:table-cell table:style-name="ce19"/>
          <table:table-cell table:style-name="ce27" table:formula="of:=IF(AND([.$F138]&lt;&gt;&quot;&quot;;[.$D137]&lt;&gt;&quot;&quot;);1;IF([.$F138]&lt;&gt;&quot;&quot;;MAX(INDIRECT([.$B138]):[.$E137])+1;&quot;&quot;))">
            <text:p/>
          </table:table-cell>
          <table:table-cell table:style-name="ce32"/>
          <table:table-cell table:style-name="ce32" table:formula="of:=IF([.$H138]=&quot;&quot;;&quot;&quot;;IF([.$G137]=&quot;&quot;;1;[.$G13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38]&lt;&gt;&quot;&quot;;NETWORKDAYS([.$L138];[.$M138];[$休日.$B$4:.$B$304]);&quot;&quot;)">
            <text:p/>
          </table:table-cell>
          <table:table-cell table:style-name="ce216"/>
          <table:table-cell table:style-name="ce63" table:formula="of:=IF(OR(AND([.$N138]=&quot;&quot;;[.$L138]&lt;&gt;&quot;&quot;;[.$L138]&lt;=[.$U$1]);AND([.$M138]&lt;&gt;&quot;&quot;;[.Q138]&lt;100;[.$M138]&lt;=[.$U$1]));&quot;遅延&quot;;&quot;&quot;)">
            <text:p/>
          </table:table-cell>
          <table:table-cell table:style-name="ce66"/>
          <table:table-cell table:style-name="ce66" table:formula="of:=SUM([.$V138:.$FM13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9]&lt;&gt;&quot;&quot;;[.$F139]=&quot;&quot;);&quot;E&quot;&amp;ROW();[.$B138])" office:value-type="string" office:string-value="E125" calcext:value-type="string">
            <text:p>E125</text:p>
          </table:table-cell>
          <table:table-cell table:style-name="ce13" table:formula="of:=IF(AND([.$D139]&lt;&gt;&quot;&quot;;[.$D139]&lt;&gt;&quot;○&quot;);MAX([.$C$3:.$C138])+1;[.$C138])" office:value-type="float" office:value="8" calcext:value-type="float">
            <text:p>8</text:p>
          </table:table-cell>
          <table:table-cell table:style-name="ce19"/>
          <table:table-cell table:style-name="ce27" table:formula="of:=IF(AND([.$F139]&lt;&gt;&quot;&quot;;[.$D138]&lt;&gt;&quot;&quot;);1;IF([.$F139]&lt;&gt;&quot;&quot;;MAX(INDIRECT([.$B139]):[.$E138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注文登録</text:p>
          </table:table-cell>
          <table:table-cell table:style-name="ce32" table:formula="of:=IF([.$H139]=&quot;&quot;;&quot;&quot;;IF([.$G138]=&quot;&quot;;1;[.$G138]+1))">
            <text:p/>
          </table:table-cell>
          <table:table-cell table:style-name="ce32" table:number-columns-repeated="2"/>
          <table:table-cell table:style-name="ce32" office:value-type="string" calcext:value-type="string">
            <text:p>大湾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139]&lt;&gt;&quot;&quot;;NETWORKDAYS([.$L139];[.$M139];[$休日.$B$4:.$B$304]);&quot;&quot;)" office:value-type="float" office:value="7" calcext:value-type="float">
            <text:p>7</text:p>
          </table:table-cell>
          <table:table-cell table:style-name="ce266" office:value-type="float" office:value="100" calcext:value-type="float">
            <text:p>100</text:p>
          </table:table-cell>
          <table:table-cell table:style-name="ce63" table:formula="of:=IF(OR(AND([.$N139]=&quot;&quot;;[.$L139]&lt;&gt;&quot;&quot;;[.$L139]&lt;=[.$U$1]);AND([.$M139]&lt;&gt;&quot;&quot;;[.Q139]&lt;100;[.$M139]&lt;=[.$U$1]));&quot;遅延&quot;;&quot;&quot;)">
            <text:p/>
          </table:table-cell>
          <table:table-cell table:style-name="ce66"/>
          <table:table-cell table:style-name="ce66" table:formula="of:=SUM([.$V139:.$FM13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0]&lt;&gt;&quot;&quot;;[.$F140]=&quot;&quot;);&quot;E&quot;&amp;ROW();[.$B139])" office:value-type="string" office:string-value="E125" calcext:value-type="string">
            <text:p>E125</text:p>
          </table:table-cell>
          <table:table-cell table:style-name="ce13" table:formula="of:=IF(AND([.$D140]&lt;&gt;&quot;&quot;;[.$D140]&lt;&gt;&quot;○&quot;);MAX([.$C$3:.$C139])+1;[.$C139])" office:value-type="float" office:value="8" calcext:value-type="float">
            <text:p>8</text:p>
          </table:table-cell>
          <table:table-cell table:style-name="ce19"/>
          <table:table-cell table:style-name="ce27" table:formula="of:=IF(AND([.$F140]&lt;&gt;&quot;&quot;;[.$D139]&lt;&gt;&quot;&quot;);1;IF([.$F140]&lt;&gt;&quot;&quot;;MAX(INDIRECT([.$B140]):[.$E139])+1;&quot;&quot;))">
            <text:p/>
          </table:table-cell>
          <table:table-cell table:style-name="ce32"/>
          <table:table-cell table:style-name="ce32" table:formula="of:=IF([.$H140]=&quot;&quot;;&quot;&quot;;IF([.$G139]=&quot;&quot;;1;[.$G139]+1))" office:value-type="float" office:value="1" calcext:value-type="float">
            <text:p>1</text:p>
          </table:table-cell>
          <table:table-cell table:style-name="ce34" office:value-type="string" calcext:value-type="string">
            <text:p>届け先入力画面　コントローラー編集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140]&lt;&gt;&quot;&quot;;NETWORKDAYS([.$L140];[.$M140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40]=&quot;&quot;;[.$L140]&lt;&gt;&quot;&quot;;[.$L140]&lt;=[.$U$1]);AND([.$M140]&lt;&gt;&quot;&quot;;[.Q140]&lt;100;[.$M140]&lt;=[.$U$1]));&quot;遅延&quot;;&quot;&quot;)">
            <text:p/>
          </table:table-cell>
          <table:table-cell table:style-name="ce66" office:value-type="float" office:value="7" calcext:value-type="float">
            <text:p>7</text:p>
          </table:table-cell>
          <table:table-cell table:style-name="ce66" table:formula="of:=SUM([.$V140:.$FM14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1]&lt;&gt;&quot;&quot;;[.$F141]=&quot;&quot;);&quot;E&quot;&amp;ROW();[.$B140])" office:value-type="string" office:string-value="E125" calcext:value-type="string">
            <text:p>E125</text:p>
          </table:table-cell>
          <table:table-cell table:style-name="ce13" table:formula="of:=IF(AND([.$D141]&lt;&gt;&quot;&quot;;[.$D141]&lt;&gt;&quot;○&quot;);MAX([.$C$3:.$C140])+1;[.$C140])" office:value-type="float" office:value="8" calcext:value-type="float">
            <text:p>8</text:p>
          </table:table-cell>
          <table:table-cell table:style-name="ce19"/>
          <table:table-cell table:style-name="ce27" table:formula="of:=IF(AND([.$F141]&lt;&gt;&quot;&quot;;[.$D140]&lt;&gt;&quot;&quot;);1;IF([.$F141]&lt;&gt;&quot;&quot;;MAX(INDIRECT([.$B141]):[.$E140])+1;&quot;&quot;))">
            <text:p/>
          </table:table-cell>
          <table:table-cell table:style-name="ce32"/>
          <table:table-cell table:style-name="ce32" table:formula="of:=IF([.$H141]=&quot;&quot;;&quot;&quot;;IF([.$G140]=&quot;&quot;;1;[.$G140]+1))" office:value-type="float" office:value="2" calcext:value-type="float">
            <text:p>2</text:p>
          </table:table-cell>
          <table:table-cell table:style-name="ce32" office:value-type="string" calcext:value-type="string">
            <text:p>届け先入力画面　テンプレートファイル作成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141]&lt;&gt;&quot;&quot;;NETWORKDAYS([.$L141];[.$M141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41]=&quot;&quot;;[.$L141]&lt;&gt;&quot;&quot;;[.$L141]&lt;=[.$U$1]);AND([.$M141]&lt;&gt;&quot;&quot;;[.Q141]&lt;100;[.$M141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41:.$FM14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2]&lt;&gt;&quot;&quot;;[.$F142]=&quot;&quot;);&quot;E&quot;&amp;ROW();[.$B141])" office:value-type="string" office:string-value="E125" calcext:value-type="string">
            <text:p>E125</text:p>
          </table:table-cell>
          <table:table-cell table:style-name="ce13" table:formula="of:=IF(AND([.$D142]&lt;&gt;&quot;&quot;;[.$D142]&lt;&gt;&quot;○&quot;);MAX([.$C$3:.$C141])+1;[.$C141])" office:value-type="float" office:value="8" calcext:value-type="float">
            <text:p>8</text:p>
          </table:table-cell>
          <table:table-cell table:style-name="ce19"/>
          <table:table-cell table:style-name="ce27" table:formula="of:=IF(AND([.$F142]&lt;&gt;&quot;&quot;;[.$D141]&lt;&gt;&quot;&quot;);1;IF([.$F142]&lt;&gt;&quot;&quot;;MAX(INDIRECT([.$B142]):[.$E141])+1;&quot;&quot;))">
            <text:p/>
          </table:table-cell>
          <table:table-cell table:style-name="ce32"/>
          <table:table-cell table:style-name="ce32" table:formula="of:=IF([.$H142]=&quot;&quot;;&quot;&quot;;IF([.$G141]=&quot;&quot;;1;[.$G141]+1))" office:value-type="float" office:value="3" calcext:value-type="float">
            <text:p>3</text:p>
          </table:table-cell>
          <table:table-cell table:style-name="ce32" office:value-type="string" calcext:value-type="string">
            <text:p>届け先入力画面動作確認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42]&lt;&gt;&quot;&quot;;NETWORKDAYS([.$L142];[.$M142];[$休日.$B$4:.$B$304]);&quot;&quot;)" office:value-type="float" office:value="1" calcext:value-type="float">
            <text:p>1</text:p>
          </table:table-cell>
          <table:table-cell table:style-name="ce267" office:value-type="float" office:value="100" calcext:value-type="float">
            <text:p>100</text:p>
          </table:table-cell>
          <table:table-cell table:style-name="ce63" table:formula="of:=IF(OR(AND([.$N142]=&quot;&quot;;[.$L142]&lt;&gt;&quot;&quot;;[.$L142]&lt;=[.$U$1]);AND([.$M142]&lt;&gt;&quot;&quot;;[.Q142]&lt;100;[.$M142]&lt;=[.$U$1]));&quot;遅延&quot;;&quot;&quot;)">
            <text:p/>
          </table:table-cell>
          <table:table-cell table:style-name="ce66" office:value-type="float" office:value="4" calcext:value-type="float">
            <text:p>4</text:p>
          </table:table-cell>
          <table:table-cell table:style-name="ce66" table:formula="of:=SUM([.$V142:.$FM14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3]&lt;&gt;&quot;&quot;;[.$F143]=&quot;&quot;);&quot;E&quot;&amp;ROW();[.$B142])" office:value-type="string" office:string-value="E125" calcext:value-type="string">
            <text:p>E125</text:p>
          </table:table-cell>
          <table:table-cell table:style-name="ce13" table:formula="of:=IF(AND([.$D143]&lt;&gt;&quot;&quot;;[.$D143]&lt;&gt;&quot;○&quot;);MAX([.$C$3:.$C142])+1;[.$C142])" office:value-type="float" office:value="8" calcext:value-type="float">
            <text:p>8</text:p>
          </table:table-cell>
          <table:table-cell table:style-name="ce19"/>
          <table:table-cell table:style-name="ce27" table:formula="of:=IF(AND([.$F143]&lt;&gt;&quot;&quot;;[.$D142]&lt;&gt;&quot;&quot;);1;IF([.$F143]&lt;&gt;&quot;&quot;;MAX(INDIRECT([.$B143]):[.$E142])+1;&quot;&quot;))">
            <text:p/>
          </table:table-cell>
          <table:table-cell table:style-name="ce32"/>
          <table:table-cell table:style-name="ce32" table:formula="of:=IF([.$H143]=&quot;&quot;;&quot;&quot;;IF([.$G142]=&quot;&quot;;1;[.$G142]+1))" office:value-type="float" office:value="4" calcext:value-type="float">
            <text:p>4</text:p>
          </table:table-cell>
          <table:table-cell table:style-name="ce32" office:value-type="string" calcext:value-type="string">
            <text:p>支払方法入力画面コントローラー編集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43]&lt;&gt;&quot;&quot;;NETWORKDAYS([.$L143];[.$M143];[$休日.$B$4:.$B$304]);&quot;&quot;)" office:value-type="float" office:value="1" calcext:value-type="float">
            <text:p>1</text:p>
          </table:table-cell>
          <table:table-cell table:style-name="ce267" office:value-type="float" office:value="100" calcext:value-type="float">
            <text:p>100</text:p>
          </table:table-cell>
          <table:table-cell table:style-name="ce63" table:formula="of:=IF(OR(AND([.$N143]=&quot;&quot;;[.$L143]&lt;&gt;&quot;&quot;;[.$L143]&lt;=[.$U$1]);AND([.$M143]&lt;&gt;&quot;&quot;;[.Q143]&lt;100;[.$M143]&lt;=[.$U$1]));&quot;遅延&quot;;&quot;&quot;)">
            <text:p/>
          </table:table-cell>
          <table:table-cell table:style-name="ce66" office:value-type="float" office:value="5" calcext:value-type="float">
            <text:p>5</text:p>
          </table:table-cell>
          <table:table-cell table:style-name="ce66" table:formula="of:=SUM([.$V143:.$FM14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4]&lt;&gt;&quot;&quot;;[.$F144]=&quot;&quot;);&quot;E&quot;&amp;ROW();[.$B143])" office:value-type="string" office:string-value="E125" calcext:value-type="string">
            <text:p>E125</text:p>
          </table:table-cell>
          <table:table-cell table:style-name="ce13" table:formula="of:=IF(AND([.$D144]&lt;&gt;&quot;&quot;;[.$D144]&lt;&gt;&quot;○&quot;);MAX([.$C$3:.$C143])+1;[.$C143])" office:value-type="float" office:value="8" calcext:value-type="float">
            <text:p>8</text:p>
          </table:table-cell>
          <table:table-cell table:style-name="ce19"/>
          <table:table-cell table:style-name="ce27" table:formula="of:=IF(AND([.$F144]&lt;&gt;&quot;&quot;;[.$D143]&lt;&gt;&quot;&quot;);1;IF([.$F144]&lt;&gt;&quot;&quot;;MAX(INDIRECT([.$B144]):[.$E143])+1;&quot;&quot;))">
            <text:p/>
          </table:table-cell>
          <table:table-cell table:style-name="ce32"/>
          <table:table-cell table:style-name="ce32" table:formula="of:=IF([.$H144]=&quot;&quot;;&quot;&quot;;IF([.$G143]=&quot;&quot;;1;[.$G143]+1))" office:value-type="float" office:value="5" calcext:value-type="float">
            <text:p>5</text:p>
          </table:table-cell>
          <table:table-cell table:style-name="ce32" office:value-type="string" calcext:value-type="string">
            <text:p>支払方法入力画面テンプレート作成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44]&lt;&gt;&quot;&quot;;NETWORKDAYS([.$L144];[.$M144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44]=&quot;&quot;;[.$L144]&lt;&gt;&quot;&quot;;[.$L144]&lt;=[.$U$1]);AND([.$M144]&lt;&gt;&quot;&quot;;[.Q144]&lt;100;[.$M144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44:.$FM14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5]&lt;&gt;&quot;&quot;;[.$F145]=&quot;&quot;);&quot;E&quot;&amp;ROW();[.$B144])" office:value-type="string" office:string-value="E125" calcext:value-type="string">
            <text:p>E125</text:p>
          </table:table-cell>
          <table:table-cell table:style-name="ce13" table:formula="of:=IF(AND([.$D145]&lt;&gt;&quot;&quot;;[.$D145]&lt;&gt;&quot;○&quot;);MAX([.$C$3:.$C144])+1;[.$C144])" office:value-type="float" office:value="8" calcext:value-type="float">
            <text:p>8</text:p>
          </table:table-cell>
          <table:table-cell table:style-name="ce19"/>
          <table:table-cell table:style-name="ce27" table:formula="of:=IF(AND([.$F145]&lt;&gt;&quot;&quot;;[.$D144]&lt;&gt;&quot;&quot;);1;IF([.$F145]&lt;&gt;&quot;&quot;;MAX(INDIRECT([.$B145]):[.$E144])+1;&quot;&quot;))">
            <text:p/>
          </table:table-cell>
          <table:table-cell table:style-name="ce32"/>
          <table:table-cell table:style-name="ce32" table:formula="of:=IF([.$H145]=&quot;&quot;;&quot;&quot;;IF([.$G144]=&quot;&quot;;1;[.$G144]+1))" office:value-type="float" office:value="6" calcext:value-type="float">
            <text:p>6</text:p>
          </table:table-cell>
          <table:table-cell table:style-name="ce32" office:value-type="string" calcext:value-type="string">
            <text:p>支払方法入力画面動作確認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45]&lt;&gt;&quot;&quot;;NETWORKDAYS([.$L145];[.$M145];[$休日.$B$4:.$B$304]);&quot;&quot;)" office:value-type="float" office:value="1" calcext:value-type="float">
            <text:p>1</text:p>
          </table:table-cell>
          <table:table-cell table:style-name="ce268" office:value-type="float" office:value="100" calcext:value-type="float">
            <text:p>100</text:p>
          </table:table-cell>
          <table:table-cell table:style-name="ce63" table:formula="of:=IF(OR(AND([.$N145]=&quot;&quot;;[.$L145]&lt;&gt;&quot;&quot;;[.$L145]&lt;=[.$U$1]);AND([.$M145]&lt;&gt;&quot;&quot;;[.Q145]&lt;100;[.$M145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45:.$FM14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6]&lt;&gt;&quot;&quot;;[.$F146]=&quot;&quot;);&quot;E&quot;&amp;ROW();[.$B145])" office:value-type="string" office:string-value="E125" calcext:value-type="string">
            <text:p>E125</text:p>
          </table:table-cell>
          <table:table-cell table:style-name="ce13" table:formula="of:=IF(AND([.$D146]&lt;&gt;&quot;&quot;;[.$D146]&lt;&gt;&quot;○&quot;);MAX([.$C$3:.$C145])+1;[.$C145])" office:value-type="float" office:value="8" calcext:value-type="float">
            <text:p>8</text:p>
          </table:table-cell>
          <table:table-cell table:style-name="ce19"/>
          <table:table-cell table:style-name="ce27" table:formula="of:=IF(AND([.$F146]&lt;&gt;&quot;&quot;;[.$D145]&lt;&gt;&quot;&quot;);1;IF([.$F146]&lt;&gt;&quot;&quot;;MAX(INDIRECT([.$B146]):[.$E145])+1;&quot;&quot;))">
            <text:p/>
          </table:table-cell>
          <table:table-cell table:style-name="ce32"/>
          <table:table-cell table:style-name="ce32" table:formula="of:=IF([.$H146]=&quot;&quot;;&quot;&quot;;IF([.$G145]=&quot;&quot;;1;[.$G145]+1))" office:value-type="float" office:value="7" calcext:value-type="float">
            <text:p>7</text:p>
          </table:table-cell>
          <table:table-cell table:style-name="ce32" office:value-type="string" calcext:value-type="string">
            <text:p>確認画面コントローラー編集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46]&lt;&gt;&quot;&quot;;NETWORKDAYS([.$L146];[.$M146];[$休日.$B$4:.$B$304]);&quot;&quot;)" office:value-type="float" office:value="1" calcext:value-type="float">
            <text:p>1</text:p>
          </table:table-cell>
          <table:table-cell table:style-name="ce268" office:value-type="float" office:value="100" calcext:value-type="float">
            <text:p>100</text:p>
          </table:table-cell>
          <table:table-cell table:style-name="ce63" table:formula="of:=IF(OR(AND([.$N146]=&quot;&quot;;[.$L146]&lt;&gt;&quot;&quot;;[.$L146]&lt;=[.$U$1]);AND([.$M146]&lt;&gt;&quot;&quot;;[.Q146]&lt;100;[.$M146]&lt;=[.$U$1]));&quot;遅延&quot;;&quot;&quot;)">
            <text:p/>
          </table:table-cell>
          <table:table-cell table:style-name="ce66" office:value-type="float" office:value="13" calcext:value-type="float">
            <text:p>13</text:p>
          </table:table-cell>
          <table:table-cell table:style-name="ce66" table:formula="of:=SUM([.$V146:.$FM14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7]&lt;&gt;&quot;&quot;;[.$F147]=&quot;&quot;);&quot;E&quot;&amp;ROW();[.$B146])" office:value-type="string" office:string-value="E125" calcext:value-type="string">
            <text:p>E125</text:p>
          </table:table-cell>
          <table:table-cell table:style-name="ce13" table:formula="of:=IF(AND([.$D147]&lt;&gt;&quot;&quot;;[.$D147]&lt;&gt;&quot;○&quot;);MAX([.$C$3:.$C146])+1;[.$C146])" office:value-type="float" office:value="8" calcext:value-type="float">
            <text:p>8</text:p>
          </table:table-cell>
          <table:table-cell table:style-name="ce19"/>
          <table:table-cell table:style-name="ce27" table:formula="of:=IF(AND([.$F147]&lt;&gt;&quot;&quot;;[.$D146]&lt;&gt;&quot;&quot;);1;IF([.$F147]&lt;&gt;&quot;&quot;;MAX(INDIRECT([.$B147]):[.$E146])+1;&quot;&quot;))">
            <text:p/>
          </table:table-cell>
          <table:table-cell table:style-name="ce32"/>
          <table:table-cell table:style-name="ce32" table:formula="of:=IF([.$H147]=&quot;&quot;;&quot;&quot;;IF([.$G146]=&quot;&quot;;1;[.$G146]+1))" office:value-type="float" office:value="8" calcext:value-type="float">
            <text:p>8</text:p>
          </table:table-cell>
          <table:table-cell table:style-name="ce32" office:value-type="string" calcext:value-type="string">
            <text:p>確認画面テンプレート作成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47]&lt;&gt;&quot;&quot;;NETWORKDAYS([.$L147];[.$M147];[$休日.$B$4:.$B$304]);&quot;&quot;)" office:value-type="float" office:value="1" calcext:value-type="float">
            <text:p>1</text:p>
          </table:table-cell>
          <table:table-cell table:style-name="ce268" office:value-type="float" office:value="100" calcext:value-type="float">
            <text:p>100</text:p>
          </table:table-cell>
          <table:table-cell table:style-name="ce63" table:formula="of:=IF(OR(AND([.$N147]=&quot;&quot;;[.$L147]&lt;&gt;&quot;&quot;;[.$L147]&lt;=[.$U$1]);AND([.$M147]&lt;&gt;&quot;&quot;;[.Q147]&lt;100;[.$M147]&lt;=[.$U$1]));&quot;遅延&quot;;&quot;&quot;)">
            <text:p/>
          </table:table-cell>
          <table:table-cell table:style-name="ce66" office:value-type="float" office:value="13" calcext:value-type="float">
            <text:p>13</text:p>
          </table:table-cell>
          <table:table-cell table:style-name="ce66" table:formula="of:=SUM([.$V147:.$FM14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8]&lt;&gt;&quot;&quot;;[.$F148]=&quot;&quot;);&quot;E&quot;&amp;ROW();[.$B147])" office:value-type="string" office:string-value="E125" calcext:value-type="string">
            <text:p>E125</text:p>
          </table:table-cell>
          <table:table-cell table:style-name="ce13" table:formula="of:=IF(AND([.$D148]&lt;&gt;&quot;&quot;;[.$D148]&lt;&gt;&quot;○&quot;);MAX([.$C$3:.$C147])+1;[.$C147])" office:value-type="float" office:value="8" calcext:value-type="float">
            <text:p>8</text:p>
          </table:table-cell>
          <table:table-cell table:style-name="ce19"/>
          <table:table-cell table:style-name="ce27" table:formula="of:=IF(AND([.$F148]&lt;&gt;&quot;&quot;;[.$D147]&lt;&gt;&quot;&quot;);1;IF([.$F148]&lt;&gt;&quot;&quot;;MAX(INDIRECT([.$B148]):[.$E147])+1;&quot;&quot;))">
            <text:p/>
          </table:table-cell>
          <table:table-cell table:style-name="ce32"/>
          <table:table-cell table:style-name="ce32" table:formula="of:=IF([.$H148]=&quot;&quot;;&quot;&quot;;IF([.$G147]=&quot;&quot;;1;[.$G147]+1))" office:value-type="float" office:value="9" calcext:value-type="float">
            <text:p>9</text:p>
          </table:table-cell>
          <table:table-cell table:style-name="ce32" office:value-type="string" calcext:value-type="string">
            <text:p>確認画面動作確認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48]&lt;&gt;&quot;&quot;;NETWORKDAYS([.$L148];[.$M148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48]=&quot;&quot;;[.$L148]&lt;&gt;&quot;&quot;;[.$L148]&lt;=[.$U$1]);AND([.$M148]&lt;&gt;&quot;&quot;;[.Q148]&lt;100;[.$M148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48:.$FM14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9]&lt;&gt;&quot;&quot;;[.$F149]=&quot;&quot;);&quot;E&quot;&amp;ROW();[.$B148])" office:value-type="string" office:string-value="E125" calcext:value-type="string">
            <text:p>E125</text:p>
          </table:table-cell>
          <table:table-cell table:style-name="ce13" table:formula="of:=IF(AND([.$D149]&lt;&gt;&quot;&quot;;[.$D149]&lt;&gt;&quot;○&quot;);MAX([.$C$3:.$C148])+1;[.$C148])" office:value-type="float" office:value="8" calcext:value-type="float">
            <text:p>8</text:p>
          </table:table-cell>
          <table:table-cell table:style-name="ce19"/>
          <table:table-cell table:style-name="ce27" table:formula="of:=IF(AND([.$F149]&lt;&gt;&quot;&quot;;[.$D148]&lt;&gt;&quot;&quot;);1;IF([.$F149]&lt;&gt;&quot;&quot;;MAX(INDIRECT([.$B149]):[.$E148])+1;&quot;&quot;))">
            <text:p/>
          </table:table-cell>
          <table:table-cell table:style-name="ce32"/>
          <table:table-cell table:style-name="ce32" table:formula="of:=IF([.$H149]=&quot;&quot;;&quot;&quot;;IF([.$G148]=&quot;&quot;;1;[.$G148]+1))" office:value-type="float" office:value="10" calcext:value-type="float">
            <text:p>10</text:p>
          </table:table-cell>
          <table:table-cell table:style-name="ce32" office:value-type="string" calcext:value-type="string">
            <text:p>完了画面コントローラー編集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5" calcext:value-type="date">
            <text:p>2026/06/15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49]&lt;&gt;&quot;&quot;;NETWORKDAYS([.$L149];[.$M149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49]=&quot;&quot;;[.$L149]&lt;&gt;&quot;&quot;;[.$L149]&lt;=[.$U$1]);AND([.$M149]&lt;&gt;&quot;&quot;;[.Q149]&lt;100;[.$M149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49:.$FM14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0]&lt;&gt;&quot;&quot;;[.$F150]=&quot;&quot;);&quot;E&quot;&amp;ROW();[.$B149])" office:value-type="string" office:string-value="E125" calcext:value-type="string">
            <text:p>E125</text:p>
          </table:table-cell>
          <table:table-cell table:style-name="ce13" table:formula="of:=IF(AND([.$D150]&lt;&gt;&quot;&quot;;[.$D150]&lt;&gt;&quot;○&quot;);MAX([.$C$3:.$C149])+1;[.$C149])" office:value-type="float" office:value="8" calcext:value-type="float">
            <text:p>8</text:p>
          </table:table-cell>
          <table:table-cell table:style-name="ce19"/>
          <table:table-cell table:style-name="ce27" table:formula="of:=IF(AND([.$F150]&lt;&gt;&quot;&quot;;[.$D149]&lt;&gt;&quot;&quot;);1;IF([.$F150]&lt;&gt;&quot;&quot;;MAX(INDIRECT([.$B150]):[.$E149])+1;&quot;&quot;))">
            <text:p/>
          </table:table-cell>
          <table:table-cell table:style-name="ce32"/>
          <table:table-cell table:style-name="ce32" table:formula="of:=IF([.$H150]=&quot;&quot;;&quot;&quot;;IF([.$G149]=&quot;&quot;;1;[.$G149]+1))" office:value-type="float" office:value="11" calcext:value-type="float">
            <text:p>11</text:p>
          </table:table-cell>
          <table:table-cell table:style-name="ce32" office:value-type="string" calcext:value-type="string">
            <text:p>完了画面テンプレート作成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5" calcext:value-type="date">
            <text:p>2026/06/15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50]&lt;&gt;&quot;&quot;;NETWORKDAYS([.$L150];[.$M150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50]=&quot;&quot;;[.$L150]&lt;&gt;&quot;&quot;;[.$L150]&lt;=[.$U$1]);AND([.$M150]&lt;&gt;&quot;&quot;;[.Q150]&lt;100;[.$M150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50:.$FM15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1]&lt;&gt;&quot;&quot;;[.$F151]=&quot;&quot;);&quot;E&quot;&amp;ROW();[.$B150])" office:value-type="string" office:string-value="E125" calcext:value-type="string">
            <text:p>E125</text:p>
          </table:table-cell>
          <table:table-cell table:style-name="ce13" table:formula="of:=IF(AND([.$D151]&lt;&gt;&quot;&quot;;[.$D151]&lt;&gt;&quot;○&quot;);MAX([.$C$3:.$C150])+1;[.$C150])" office:value-type="float" office:value="8" calcext:value-type="float">
            <text:p>8</text:p>
          </table:table-cell>
          <table:table-cell table:style-name="ce19"/>
          <table:table-cell table:style-name="ce27" table:formula="of:=IF(AND([.$F151]&lt;&gt;&quot;&quot;;[.$D150]&lt;&gt;&quot;&quot;);1;IF([.$F151]&lt;&gt;&quot;&quot;;MAX(INDIRECT([.$B151]):[.$E150])+1;&quot;&quot;))">
            <text:p/>
          </table:table-cell>
          <table:table-cell table:style-name="ce32"/>
          <table:table-cell table:style-name="ce32" table:formula="of:=IF([.$H151]=&quot;&quot;;&quot;&quot;;IF([.$G150]=&quot;&quot;;1;[.$G150]+1))" office:value-type="float" office:value="12" calcext:value-type="float">
            <text:p>12</text:p>
          </table:table-cell>
          <table:table-cell table:style-name="ce32" office:value-type="string" calcext:value-type="string">
            <text:p>完了画面動作確認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6" calcext:value-type="date">
            <text:p>2026/06/16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51]&lt;&gt;&quot;&quot;;NETWORKDAYS([.$L151];[.$M151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51]=&quot;&quot;;[.$L151]&lt;&gt;&quot;&quot;;[.$L151]&lt;=[.$U$1]);AND([.$M151]&lt;&gt;&quot;&quot;;[.Q151]&lt;100;[.$M151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51:.$FM15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2]&lt;&gt;&quot;&quot;;[.$F152]=&quot;&quot;);&quot;E&quot;&amp;ROW();[.$B151])" office:value-type="string" office:string-value="E125" calcext:value-type="string">
            <text:p>E125</text:p>
          </table:table-cell>
          <table:table-cell table:style-name="ce13" table:formula="of:=IF(AND([.$D152]&lt;&gt;&quot;&quot;;[.$D152]&lt;&gt;&quot;○&quot;);MAX([.$C$3:.$C151])+1;[.$C151])" office:value-type="float" office:value="8" calcext:value-type="float">
            <text:p>8</text:p>
          </table:table-cell>
          <table:table-cell table:style-name="ce19"/>
          <table:table-cell table:style-name="ce27" table:formula="of:=IF(AND([.$F152]&lt;&gt;&quot;&quot;;[.$D151]&lt;&gt;&quot;&quot;);1;IF([.$F152]&lt;&gt;&quot;&quot;;MAX(INDIRECT([.$B152]):[.$E151])+1;&quot;&quot;))">
            <text:p/>
          </table:table-cell>
          <table:table-cell table:style-name="ce32"/>
          <table:table-cell table:style-name="ce32" table:formula="of:=IF([.$H152]=&quot;&quot;;&quot;&quot;;IF([.$G151]=&quot;&quot;;1;[.$G15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52]&lt;&gt;&quot;&quot;;NETWORKDAYS([.$L152];[.$M152];[$休日.$B$4:.$B$304]);&quot;&quot;)">
            <text:p/>
          </table:table-cell>
          <table:table-cell table:style-name="ce216"/>
          <table:table-cell table:style-name="ce63" table:formula="of:=IF(OR(AND([.$N152]=&quot;&quot;;[.$L152]&lt;&gt;&quot;&quot;;[.$L152]&lt;=[.$U$1]);AND([.$M152]&lt;&gt;&quot;&quot;;[.Q152]&lt;100;[.$M152]&lt;=[.$U$1]));&quot;遅延&quot;;&quot;&quot;)">
            <text:p/>
          </table:table-cell>
          <table:table-cell table:style-name="ce66"/>
          <table:table-cell table:style-name="ce66" table:formula="of:=SUM([.$V152:.$FM15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3]&lt;&gt;&quot;&quot;;[.$F153]=&quot;&quot;);&quot;E&quot;&amp;ROW();[.$B152])" office:value-type="string" office:string-value="E153" calcext:value-type="string">
            <text:p>E153</text:p>
          </table:table-cell>
          <table:table-cell table:style-name="ce13" table:formula="of:=IF(AND([.$D153]&lt;&gt;&quot;&quot;;[.$D153]&lt;&gt;&quot;○&quot;);MAX([.$C$3:.$C152])+1;[.$C152])" office:value-type="float" office:value="9" calcext:value-type="float">
            <text:p>9</text:p>
          </table:table-cell>
          <table:table-cell table:style-name="ce19" office:value-type="string" calcext:value-type="string">
            <text:p>会員管理</text:p>
          </table:table-cell>
          <table:table-cell table:style-name="ce27" table:formula="of:=IF(AND([.$F153]&lt;&gt;&quot;&quot;;[.$D152]&lt;&gt;&quot;&quot;);1;IF([.$F153]&lt;&gt;&quot;&quot;;MAX(INDIRECT([.$B153]):[.$E152])+1;&quot;&quot;))">
            <text:p/>
          </table:table-cell>
          <table:table-cell table:style-name="ce32"/>
          <table:table-cell table:style-name="ce32" table:formula="of:=IF([.$H153]=&quot;&quot;;&quot;&quot;;IF([.$G152]=&quot;&quot;;1;[.$G152]+1))">
            <text:p/>
          </table:table-cell>
          <table:table-cell table:style-name="ce32" table:number-columns-repeated="2"/>
          <table:table-cell table:style-name="ce32" office:value-type="string" calcext:value-type="string">
            <text:p>東山、小林</text:p>
          </table:table-cell>
          <table:table-cell table:style-name="ce32"/>
          <table:table-cell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05" calcext:value-type="date">
            <text:p>2026/06/05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153]&lt;&gt;&quot;&quot;;NETWORKDAYS([.$L153];[.$M153];[$休日.$B$4:.$B$304]);&quot;&quot;)" office:value-type="float" office:value="4" calcext:value-type="float">
            <text:p>4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53]=&quot;&quot;;[.$L153]&lt;&gt;&quot;&quot;;[.$L153]&lt;=[.$U$1]);AND([.$M153]&lt;&gt;&quot;&quot;;[.Q153]&lt;100;[.$M153]&lt;=[.$U$1]));&quot;遅延&quot;;&quot;&quot;)">
            <text:p/>
          </table:table-cell>
          <table:table-cell table:style-name="ce66"/>
          <table:table-cell table:style-name="ce66" table:formula="of:=SUM([.$V153:.$FM15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3]&lt;&gt;&quot;&quot;;[.$F154]=&quot;&quot;);&quot;E&quot;&amp;ROW();[.$B153])" office:value-type="string" office:string-value="E153" calcext:value-type="string">
            <text:p>E153</text:p>
          </table:table-cell>
          <table:table-cell table:style-name="ce13" table:formula="of:=IF(AND([.$D154]&lt;&gt;&quot;&quot;;[.$D154]&lt;&gt;&quot;○&quot;);MAX([.$C$3:.$C153])+1;[.$C153])" office:value-type="float" office:value="9" calcext:value-type="float">
            <text:p>9</text:p>
          </table:table-cell>
          <table:table-cell table:style-name="Default"/>
          <table:table-cell table:style-name="ce27" table:formula="of:=IF(AND([.$F154]&lt;&gt;&quot;&quot;;[.$D153]&lt;&gt;&quot;&quot;);1;IF([.$F154]&lt;&gt;&quot;&quot;;MAX(INDIRECT([.$B154]):[.$E153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会員登録</text:p>
          </table:table-cell>
          <table:table-cell table:style-name="ce32" table:formula="of:=IF([.$H154]=&quot;&quot;;&quot;&quot;;IF([.$G153]=&quot;&quot;;1;[.$G153]+1))">
            <text:p/>
          </table:table-cell>
          <table:table-cell table:style-name="ce32" table:number-columns-repeated="2"/>
          <table:table-cell table:style-name="ce32" office:value-type="string" calcext:value-type="string">
            <text:p>東山</text:p>
          </table:table-cell>
          <table:table-cell table:style-name="ce32"/>
          <table:table-cell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54]&lt;&gt;&quot;&quot;;NETWORKDAYS([.$L154];[.$M154];[$休日.$B$4:.$B$304]);&quot;&quot;)" office:value-type="float" office:value="2" calcext:value-type="float">
            <text:p>2</text:p>
          </table:table-cell>
          <table:table-cell table:style-name="ce269" office:value-type="float" office:value="100" calcext:value-type="float">
            <text:p>100</text:p>
          </table:table-cell>
          <table:table-cell table:style-name="ce63" table:formula="of:=IF(OR(AND([.$N154]=&quot;&quot;;[.$L154]&lt;&gt;&quot;&quot;;[.$L154]&lt;=[.$U$1]);AND([.$M154]&lt;&gt;&quot;&quot;;[.Q154]&lt;100;[.$M154]&lt;=[.$U$1]));&quot;遅延&quot;;&quot;&quot;)">
            <text:p/>
          </table:table-cell>
          <table:table-cell table:style-name="ce66"/>
          <table:table-cell table:style-name="ce66" table:formula="of:=SUM([.$V154:.$FM15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5]&lt;&gt;&quot;&quot;;[.$F155]=&quot;&quot;);&quot;E&quot;&amp;ROW();[.$B154])" office:value-type="string" office:string-value="E153" calcext:value-type="string">
            <text:p>E153</text:p>
          </table:table-cell>
          <table:table-cell table:style-name="ce13" table:formula="of:=IF(AND([.$D155]&lt;&gt;&quot;&quot;;[.$D155]&lt;&gt;&quot;○&quot;);MAX([.$C$3:.$C154])+1;[.$C154])" office:value-type="float" office:value="9" calcext:value-type="float">
            <text:p>9</text:p>
          </table:table-cell>
          <table:table-cell table:style-name="ce19"/>
          <table:table-cell table:style-name="ce27" table:formula="of:=IF(AND([.$F155]&lt;&gt;&quot;&quot;;[.$D153]&lt;&gt;&quot;&quot;);1;IF([.$F155]&lt;&gt;&quot;&quot;;MAX(INDIRECT([.$B155]):[.$E154])+1;&quot;&quot;))">
            <text:p/>
          </table:table-cell>
          <table:table-cell table:style-name="ce32"/>
          <table:table-cell table:style-name="ce32" table:formula="of:=IF([.$H155]=&quot;&quot;;&quot;&quot;;IF([.$G154]=&quot;&quot;;1;[.$G154]+1))" office:value-type="float" office:value="1" calcext:value-type="float">
            <text:p>1</text:p>
          </table:table-cell>
          <table:table-cell table:style-name="ce34" office:value-type="string" calcext:value-type="string">
            <text:p>会員フォーム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55]&lt;&gt;&quot;&quot;;NETWORKDAYS([.$L155];[.$M155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55]=&quot;&quot;;[.$L155]&lt;&gt;&quot;&quot;;[.$L155]&lt;=[.$U$1]);AND([.$M155]&lt;&gt;&quot;&quot;;[.Q155]&lt;100;[.$M155]&lt;=[.$U$1]));&quot;遅延&quot;;&quot;&quot;)">
            <text:p/>
          </table:table-cell>
          <table:table-cell table:style-name="ce66"/>
          <table:table-cell table:style-name="ce66" table:formula="of:=SUM([.$V155:.$FM15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6]&lt;&gt;&quot;&quot;;[.$F156]=&quot;&quot;);&quot;E&quot;&amp;ROW();[.$B155])" office:value-type="string" office:string-value="E153" calcext:value-type="string">
            <text:p>E153</text:p>
          </table:table-cell>
          <table:table-cell table:style-name="ce13" table:formula="of:=IF(AND([.$D156]&lt;&gt;&quot;&quot;;[.$D156]&lt;&gt;&quot;○&quot;);MAX([.$C$3:.$C155])+1;[.$C155])" office:value-type="float" office:value="9" calcext:value-type="float">
            <text:p>9</text:p>
          </table:table-cell>
          <table:table-cell table:style-name="ce19"/>
          <table:table-cell table:style-name="ce27" table:formula="of:=IF(AND([.$F156]&lt;&gt;&quot;&quot;;[.$D155]&lt;&gt;&quot;&quot;);1;IF([.$F156]&lt;&gt;&quot;&quot;;MAX(INDIRECT([.$B156]):[.$E155])+1;&quot;&quot;))">
            <text:p/>
          </table:table-cell>
          <table:table-cell table:style-name="ce32"/>
          <table:table-cell table:style-name="ce32" table:formula="of:=IF([.$H156]=&quot;&quot;;&quot;&quot;;IF([.$G155]=&quot;&quot;;1;[.$G155]+1))" office:value-type="float" office:value="2" calcext:value-type="float">
            <text:p>2</text:p>
          </table:table-cell>
          <table:table-cell table:style-name="ce32" office:value-type="string" calcext:value-type="string">
            <text:p>会員エンティティ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56]&lt;&gt;&quot;&quot;;NETWORKDAYS([.$L156];[.$M156];[$休日.$B$4:.$B$304]);&quot;&quot;)" office:value-type="float" office:value="1" calcext:value-type="float">
            <text:p>1</text:p>
          </table:table-cell>
          <table:table-cell table:style-name="ce270" office:value-type="float" office:value="100" calcext:value-type="float">
            <text:p>100</text:p>
          </table:table-cell>
          <table:table-cell table:style-name="ce63" table:formula="of:=IF(OR(AND([.$N156]=&quot;&quot;;[.$L156]&lt;&gt;&quot;&quot;;[.$L156]&lt;=[.$U$1]);AND([.$M156]&lt;&gt;&quot;&quot;;[.Q156]&lt;100;[.$M156]&lt;=[.$U$1]));&quot;遅延&quot;;&quot;&quot;)">
            <text:p/>
          </table:table-cell>
          <table:table-cell table:style-name="ce66"/>
          <table:table-cell table:style-name="ce66" table:formula="of:=SUM([.$V156:.$FM15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7]&lt;&gt;&quot;&quot;;[.$F157]=&quot;&quot;);&quot;E&quot;&amp;ROW();[.$B156])" office:value-type="string" office:string-value="E153" calcext:value-type="string">
            <text:p>E153</text:p>
          </table:table-cell>
          <table:table-cell table:style-name="ce13" table:formula="of:=IF(AND([.$D157]&lt;&gt;&quot;&quot;;[.$D157]&lt;&gt;&quot;○&quot;);MAX([.$C$3:.$C156])+1;[.$C156])" office:value-type="float" office:value="9" calcext:value-type="float">
            <text:p>9</text:p>
          </table:table-cell>
          <table:table-cell table:style-name="ce19"/>
          <table:table-cell table:style-name="ce27" table:formula="of:=IF(AND([.$F157]&lt;&gt;&quot;&quot;;[.$D156]&lt;&gt;&quot;&quot;);1;IF([.$F157]&lt;&gt;&quot;&quot;;MAX(INDIRECT([.$B157]):[.$E156])+1;&quot;&quot;))">
            <text:p/>
          </table:table-cell>
          <table:table-cell table:style-name="ce32"/>
          <table:table-cell table:style-name="ce32" table:formula="of:=IF([.$H157]=&quot;&quot;;&quot;&quot;;IF([.$G156]=&quot;&quot;;1;[.$G156]+1))" office:value-type="float" office:value="3" calcext:value-type="float">
            <text:p>3</text:p>
          </table:table-cell>
          <table:table-cell table:style-name="ce32" office:value-type="string" calcext:value-type="string">
            <text:p>リポジトリ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57]&lt;&gt;&quot;&quot;;NETWORKDAYS([.$L157];[.$M157];[$休日.$B$4:.$B$304]);&quot;&quot;)" office:value-type="float" office:value="1" calcext:value-type="float">
            <text:p>1</text:p>
          </table:table-cell>
          <table:table-cell table:style-name="ce270" office:value-type="float" office:value="100" calcext:value-type="float">
            <text:p>100</text:p>
          </table:table-cell>
          <table:table-cell table:style-name="ce63" table:formula="of:=IF(OR(AND([.$N157]=&quot;&quot;;[.$L157]&lt;&gt;&quot;&quot;;[.$L157]&lt;=[.$U$1]);AND([.$M157]&lt;&gt;&quot;&quot;;[.Q157]&lt;100;[.$M157]&lt;=[.$U$1]));&quot;遅延&quot;;&quot;&quot;)">
            <text:p/>
          </table:table-cell>
          <table:table-cell table:style-name="ce66"/>
          <table:table-cell table:style-name="ce66" table:formula="of:=SUM([.$V157:.$FM15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8]&lt;&gt;&quot;&quot;;[.$F158]=&quot;&quot;);&quot;E&quot;&amp;ROW();[.$B157])" office:value-type="string" office:string-value="E153" calcext:value-type="string">
            <text:p>E153</text:p>
          </table:table-cell>
          <table:table-cell table:style-name="ce13" table:formula="of:=IF(AND([.$D158]&lt;&gt;&quot;&quot;;[.$D158]&lt;&gt;&quot;○&quot;);MAX([.$C$3:.$C157])+1;[.$C157])" office:value-type="float" office:value="9" calcext:value-type="float">
            <text:p>9</text:p>
          </table:table-cell>
          <table:table-cell table:style-name="ce19"/>
          <table:table-cell table:style-name="ce27" table:formula="of:=IF(AND([.$F158]&lt;&gt;&quot;&quot;;[.$D157]&lt;&gt;&quot;&quot;);1;IF([.$F158]&lt;&gt;&quot;&quot;;MAX(INDIRECT([.$B158]):[.$E157])+1;&quot;&quot;))">
            <text:p/>
          </table:table-cell>
          <table:table-cell table:style-name="ce32"/>
          <table:table-cell table:style-name="ce32" table:formula="of:=IF([.$H158]=&quot;&quot;;&quot;&quot;;IF([.$G157]=&quot;&quot;;1;[.$G157]+1))" office:value-type="float" office:value="4" calcext:value-type="float">
            <text:p>4</text:p>
          </table:table-cell>
          <table:table-cell table:style-name="ce32" office:value-type="string" calcext:value-type="string">
            <text:p>会員登録入力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58]&lt;&gt;&quot;&quot;;NETWORKDAYS([.$L158];[.$M158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58]=&quot;&quot;;[.$L158]&lt;&gt;&quot;&quot;;[.$L158]&lt;=[.$U$1]);AND([.$M158]&lt;&gt;&quot;&quot;;[.Q158]&lt;100;[.$M158]&lt;=[.$U$1]));&quot;遅延&quot;;&quot;&quot;)">
            <text:p/>
          </table:table-cell>
          <table:table-cell table:style-name="ce66"/>
          <table:table-cell table:style-name="ce66" table:formula="of:=SUM([.$V158:.$FM15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9]&lt;&gt;&quot;&quot;;[.$F159]=&quot;&quot;);&quot;E&quot;&amp;ROW();[.$B158])" office:value-type="string" office:string-value="E153" calcext:value-type="string">
            <text:p>E153</text:p>
          </table:table-cell>
          <table:table-cell table:style-name="ce13" table:formula="of:=IF(AND([.$D159]&lt;&gt;&quot;&quot;;[.$D159]&lt;&gt;&quot;○&quot;);MAX([.$C$3:.$C158])+1;[.$C158])" office:value-type="float" office:value="9" calcext:value-type="float">
            <text:p>9</text:p>
          </table:table-cell>
          <table:table-cell table:style-name="ce19"/>
          <table:table-cell table:style-name="ce27" table:formula="of:=IF(AND([.$F159]&lt;&gt;&quot;&quot;;[.$D158]&lt;&gt;&quot;&quot;);1;IF([.$F159]&lt;&gt;&quot;&quot;;MAX(INDIRECT([.$B159]):[.$E158])+1;&quot;&quot;))">
            <text:p/>
          </table:table-cell>
          <table:table-cell table:style-name="ce32"/>
          <table:table-cell table:style-name="ce32" table:formula="of:=IF([.$H159]=&quot;&quot;;&quot;&quot;;IF([.$G158]=&quot;&quot;;1;[.$G158]+1))" office:value-type="float" office:value="5" calcext:value-type="float">
            <text:p>5</text:p>
          </table:table-cell>
          <table:table-cell table:style-name="ce32" office:value-type="string" calcext:value-type="string">
            <text:p>会員登録入力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59]&lt;&gt;&quot;&quot;;NETWORKDAYS([.$L159];[.$M159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59]=&quot;&quot;;[.$L159]&lt;&gt;&quot;&quot;;[.$L159]&lt;=[.$U$1]);AND([.$M159]&lt;&gt;&quot;&quot;;[.Q159]&lt;100;[.$M159]&lt;=[.$U$1]));&quot;遅延&quot;;&quot;&quot;)">
            <text:p/>
          </table:table-cell>
          <table:table-cell table:style-name="ce66"/>
          <table:table-cell table:style-name="ce66" table:formula="of:=SUM([.$V159:.$FM15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0]&lt;&gt;&quot;&quot;;[.$F160]=&quot;&quot;);&quot;E&quot;&amp;ROW();[.$B159])" office:value-type="string" office:string-value="E153" calcext:value-type="string">
            <text:p>E153</text:p>
          </table:table-cell>
          <table:table-cell table:style-name="ce13" table:formula="of:=IF(AND([.$D160]&lt;&gt;&quot;&quot;;[.$D160]&lt;&gt;&quot;○&quot;);MAX([.$C$3:.$C159])+1;[.$C159])" office:value-type="float" office:value="9" calcext:value-type="float">
            <text:p>9</text:p>
          </table:table-cell>
          <table:table-cell table:style-name="ce19"/>
          <table:table-cell table:style-name="ce27" table:formula="of:=IF(AND([.$F160]&lt;&gt;&quot;&quot;;[.$D159]&lt;&gt;&quot;&quot;);1;IF([.$F160]&lt;&gt;&quot;&quot;;MAX(INDIRECT([.$B160]):[.$E159])+1;&quot;&quot;))">
            <text:p/>
          </table:table-cell>
          <table:table-cell table:style-name="ce32"/>
          <table:table-cell table:style-name="ce32" table:formula="of:=IF([.$H160]=&quot;&quot;;&quot;&quot;;IF([.$G159]=&quot;&quot;;1;[.$G159]+1))" office:value-type="float" office:value="6" calcext:value-type="float">
            <text:p>6</text:p>
          </table:table-cell>
          <table:table-cell table:style-name="ce32" office:value-type="string" calcext:value-type="string">
            <text:p>会員登録入力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4" table:style-name="ce38" office:value-type="date" office:date-value="2026-06-09" calcext:value-type="date">
            <text:p>2026/06/09</text:p>
          </table:table-cell>
          <table:table-cell table:style-name="ce32" table:formula="of:=IF([.$L160]&lt;&gt;&quot;&quot;;NETWORKDAYS([.$L160];[.$M160];[$休日.$B$4:.$B$304]);&quot;&quot;)" office:value-type="float" office:value="1" calcext:value-type="float">
            <text:p>1</text:p>
          </table:table-cell>
          <table:table-cell table:style-name="ce271" office:value-type="float" office:value="100" calcext:value-type="float">
            <text:p>100</text:p>
          </table:table-cell>
          <table:table-cell table:style-name="ce63" table:formula="of:=IF(OR(AND([.$N160]=&quot;&quot;;[.$L160]&lt;&gt;&quot;&quot;;[.$L160]&lt;=[.$U$1]);AND([.$M160]&lt;&gt;&quot;&quot;;[.Q160]&lt;100;[.$M160]&lt;=[.$U$1]));&quot;遅延&quot;;&quot;&quot;)">
            <text:p/>
          </table:table-cell>
          <table:table-cell table:style-name="ce66"/>
          <table:table-cell table:style-name="ce66" table:formula="of:=SUM([.$V160:.$FM16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1]&lt;&gt;&quot;&quot;;[.$F161]=&quot;&quot;);&quot;E&quot;&amp;ROW();[.$B160])" office:value-type="string" office:string-value="E153" calcext:value-type="string">
            <text:p>E153</text:p>
          </table:table-cell>
          <table:table-cell table:style-name="ce13" table:formula="of:=IF(AND([.$D161]&lt;&gt;&quot;&quot;;[.$D161]&lt;&gt;&quot;○&quot;);MAX([.$C$3:.$C160])+1;[.$C160])" office:value-type="float" office:value="9" calcext:value-type="float">
            <text:p>9</text:p>
          </table:table-cell>
          <table:table-cell table:style-name="ce19"/>
          <table:table-cell table:style-name="ce27" table:formula="of:=IF(AND([.$F161]&lt;&gt;&quot;&quot;;[.$D160]&lt;&gt;&quot;&quot;);1;IF([.$F161]&lt;&gt;&quot;&quot;;MAX(INDIRECT([.$B161]):[.$E160])+1;&quot;&quot;))">
            <text:p/>
          </table:table-cell>
          <table:table-cell table:style-name="ce32"/>
          <table:table-cell table:style-name="ce32" table:formula="of:=IF([.$H161]=&quot;&quot;;&quot;&quot;;IF([.$G160]=&quot;&quot;;1;[.$G160]+1))" office:value-type="float" office:value="7" calcext:value-type="float">
            <text:p>7</text:p>
          </table:table-cell>
          <table:table-cell table:style-name="ce32" office:value-type="string" calcext:value-type="string">
            <text:p>会員登録確認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2" table:formula="of:=IF([.$L161]&lt;&gt;&quot;&quot;;NETWORKDAYS([.$L161];[.$M161];[$休日.$B$4:.$B$304]);&quot;&quot;)" office:value-type="float" office:value="1" calcext:value-type="float">
            <text:p>1</text:p>
          </table:table-cell>
          <table:table-cell table:style-name="ce271" office:value-type="float" office:value="100" calcext:value-type="float">
            <text:p>100</text:p>
          </table:table-cell>
          <table:table-cell table:style-name="ce63" table:formula="of:=IF(OR(AND([.$N161]=&quot;&quot;;[.$L161]&lt;&gt;&quot;&quot;;[.$L161]&lt;=[.$U$1]);AND([.$M161]&lt;&gt;&quot;&quot;;[.Q161]&lt;100;[.$M161]&lt;=[.$U$1]));&quot;遅延&quot;;&quot;&quot;)">
            <text:p/>
          </table:table-cell>
          <table:table-cell table:style-name="ce66"/>
          <table:table-cell table:style-name="ce66" table:formula="of:=SUM([.$V161:.$FM16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2]&lt;&gt;&quot;&quot;;[.$F162]=&quot;&quot;);&quot;E&quot;&amp;ROW();[.$B161])" office:value-type="string" office:string-value="E153" calcext:value-type="string">
            <text:p>E153</text:p>
          </table:table-cell>
          <table:table-cell table:style-name="ce13" table:formula="of:=IF(AND([.$D162]&lt;&gt;&quot;&quot;;[.$D162]&lt;&gt;&quot;○&quot;);MAX([.$C$3:.$C161])+1;[.$C161])" office:value-type="float" office:value="9" calcext:value-type="float">
            <text:p>9</text:p>
          </table:table-cell>
          <table:table-cell table:style-name="ce19"/>
          <table:table-cell table:style-name="ce27" table:formula="of:=IF(AND([.$F162]&lt;&gt;&quot;&quot;;[.$D161]&lt;&gt;&quot;&quot;);1;IF([.$F162]&lt;&gt;&quot;&quot;;MAX(INDIRECT([.$B162]):[.$E161])+1;&quot;&quot;))">
            <text:p/>
          </table:table-cell>
          <table:table-cell table:style-name="ce32"/>
          <table:table-cell table:style-name="ce32" table:formula="of:=IF([.$H162]=&quot;&quot;;&quot;&quot;;IF([.$G161]=&quot;&quot;;1;[.$G161]+1))" office:value-type="float" office:value="8" calcext:value-type="float">
            <text:p>8</text:p>
          </table:table-cell>
          <table:table-cell table:style-name="ce32" office:value-type="string" calcext:value-type="string">
            <text:p>会員登録確認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62]&lt;&gt;&quot;&quot;;NETWORKDAYS([.$L162];[.$M162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62]=&quot;&quot;;[.$L162]&lt;&gt;&quot;&quot;;[.$L162]&lt;=[.$U$1]);AND([.$M162]&lt;&gt;&quot;&quot;;[.Q162]&lt;100;[.$M162]&lt;=[.$U$1]));&quot;遅延&quot;;&quot;&quot;)">
            <text:p/>
          </table:table-cell>
          <table:table-cell table:style-name="ce66"/>
          <table:table-cell table:style-name="ce66" table:formula="of:=SUM([.$V162:.$FM16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3]&lt;&gt;&quot;&quot;;[.$F163]=&quot;&quot;);&quot;E&quot;&amp;ROW();[.$B162])" office:value-type="string" office:string-value="E153" calcext:value-type="string">
            <text:p>E153</text:p>
          </table:table-cell>
          <table:table-cell table:style-name="ce13" table:formula="of:=IF(AND([.$D163]&lt;&gt;&quot;&quot;;[.$D163]&lt;&gt;&quot;○&quot;);MAX([.$C$3:.$C162])+1;[.$C162])" office:value-type="float" office:value="9" calcext:value-type="float">
            <text:p>9</text:p>
          </table:table-cell>
          <table:table-cell table:style-name="ce19"/>
          <table:table-cell table:style-name="ce27" table:formula="of:=IF(AND([.$F163]&lt;&gt;&quot;&quot;;[.$D162]&lt;&gt;&quot;&quot;);1;IF([.$F163]&lt;&gt;&quot;&quot;;MAX(INDIRECT([.$B163]):[.$E162])+1;&quot;&quot;))">
            <text:p/>
          </table:table-cell>
          <table:table-cell table:style-name="ce32"/>
          <table:table-cell table:style-name="ce32" table:formula="of:=IF([.$H163]=&quot;&quot;;&quot;&quot;;IF([.$G162]=&quot;&quot;;1;[.$G162]+1))" office:value-type="float" office:value="9" calcext:value-type="float">
            <text:p>9</text:p>
          </table:table-cell>
          <table:table-cell table:style-name="ce32" office:value-type="string" calcext:value-type="string">
            <text:p>会員登録確認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2" table:formula="of:=IF([.$L163]&lt;&gt;&quot;&quot;;NETWORKDAYS([.$L163];[.$M163];[$休日.$B$4:.$B$304]);&quot;&quot;)" office:value-type="float" office:value="1" calcext:value-type="float">
            <text:p>1</text:p>
          </table:table-cell>
          <table:table-cell table:style-name="ce272" office:value-type="float" office:value="100" calcext:value-type="float">
            <text:p>100</text:p>
          </table:table-cell>
          <table:table-cell table:style-name="ce63" table:formula="of:=IF(OR(AND([.$N163]=&quot;&quot;;[.$L163]&lt;&gt;&quot;&quot;;[.$L163]&lt;=[.$U$1]);AND([.$M163]&lt;&gt;&quot;&quot;;[.Q163]&lt;100;[.$M163]&lt;=[.$U$1]));&quot;遅延&quot;;&quot;&quot;)">
            <text:p/>
          </table:table-cell>
          <table:table-cell table:style-name="ce66"/>
          <table:table-cell table:style-name="ce66" table:formula="of:=SUM([.$V163:.$FM16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4]&lt;&gt;&quot;&quot;;[.$F164]=&quot;&quot;);&quot;E&quot;&amp;ROW();[.$B163])" office:value-type="string" office:string-value="E153" calcext:value-type="string">
            <text:p>E153</text:p>
          </table:table-cell>
          <table:table-cell table:style-name="ce13" table:formula="of:=IF(AND([.$D164]&lt;&gt;&quot;&quot;;[.$D164]&lt;&gt;&quot;○&quot;);MAX([.$C$3:.$C163])+1;[.$C163])" office:value-type="float" office:value="9" calcext:value-type="float">
            <text:p>9</text:p>
          </table:table-cell>
          <table:table-cell table:style-name="ce19"/>
          <table:table-cell table:style-name="ce27" table:formula="of:=IF(AND([.$F164]&lt;&gt;&quot;&quot;;[.$D163]&lt;&gt;&quot;&quot;);1;IF([.$F164]&lt;&gt;&quot;&quot;;MAX(INDIRECT([.$B164]):[.$E163])+1;&quot;&quot;))">
            <text:p/>
          </table:table-cell>
          <table:table-cell table:style-name="ce32"/>
          <table:table-cell table:style-name="ce32" table:formula="of:=IF([.$H164]=&quot;&quot;;&quot;&quot;;IF([.$G163]=&quot;&quot;;1;[.$G163]+1))" office:value-type="float" office:value="10" calcext:value-type="float">
            <text:p>10</text:p>
          </table:table-cell>
          <table:table-cell table:style-name="ce32" office:value-type="string" calcext:value-type="string">
            <text:p>会員登録完了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2" table:formula="of:=IF([.$L164]&lt;&gt;&quot;&quot;;NETWORKDAYS([.$L164];[.$M164];[$休日.$B$4:.$B$304]);&quot;&quot;)" office:value-type="float" office:value="1" calcext:value-type="float">
            <text:p>1</text:p>
          </table:table-cell>
          <table:table-cell table:style-name="ce272" office:value-type="float" office:value="100" calcext:value-type="float">
            <text:p>100</text:p>
          </table:table-cell>
          <table:table-cell table:style-name="ce63" table:formula="of:=IF(OR(AND([.$N164]=&quot;&quot;;[.$L164]&lt;&gt;&quot;&quot;;[.$L164]&lt;=[.$U$1]);AND([.$M164]&lt;&gt;&quot;&quot;;[.Q164]&lt;100;[.$M164]&lt;=[.$U$1]));&quot;遅延&quot;;&quot;&quot;)">
            <text:p/>
          </table:table-cell>
          <table:table-cell table:style-name="ce66"/>
          <table:table-cell table:style-name="ce66" table:formula="of:=SUM([.$V164:.$FM16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5]&lt;&gt;&quot;&quot;;[.$F165]=&quot;&quot;);&quot;E&quot;&amp;ROW();[.$B164])" office:value-type="string" office:string-value="E153" calcext:value-type="string">
            <text:p>E153</text:p>
          </table:table-cell>
          <table:table-cell table:style-name="ce13" table:formula="of:=IF(AND([.$D165]&lt;&gt;&quot;&quot;;[.$D165]&lt;&gt;&quot;○&quot;);MAX([.$C$3:.$C164])+1;[.$C164])" office:value-type="float" office:value="9" calcext:value-type="float">
            <text:p>9</text:p>
          </table:table-cell>
          <table:table-cell table:style-name="ce19"/>
          <table:table-cell table:style-name="ce27" table:formula="of:=IF(AND([.$F165]&lt;&gt;&quot;&quot;;[.$D164]&lt;&gt;&quot;&quot;);1;IF([.$F165]&lt;&gt;&quot;&quot;;MAX(INDIRECT([.$B165]):[.$E164])+1;&quot;&quot;))">
            <text:p/>
          </table:table-cell>
          <table:table-cell table:style-name="ce32"/>
          <table:table-cell table:style-name="ce32" table:formula="of:=IF([.$H165]=&quot;&quot;;&quot;&quot;;IF([.$G164]=&quot;&quot;;1;[.$G164]+1))" office:value-type="float" office:value="11" calcext:value-type="float">
            <text:p>11</text:p>
          </table:table-cell>
          <table:table-cell table:style-name="ce32" office:value-type="string" calcext:value-type="string">
            <text:p>会員登録完了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65]&lt;&gt;&quot;&quot;;NETWORKDAYS([.$L165];[.$M165];[$休日.$B$4:.$B$304]);&quot;&quot;)" office:value-type="float" office:value="1" calcext:value-type="float">
            <text:p>1</text:p>
          </table:table-cell>
          <table:table-cell table:style-name="ce272" office:value-type="float" office:value="100" calcext:value-type="float">
            <text:p>100</text:p>
          </table:table-cell>
          <table:table-cell table:style-name="ce63" table:formula="of:=IF(OR(AND([.$N165]=&quot;&quot;;[.$L165]&lt;&gt;&quot;&quot;;[.$L165]&lt;=[.$U$1]);AND([.$M165]&lt;&gt;&quot;&quot;;[.Q165]&lt;100;[.$M165]&lt;=[.$U$1]));&quot;遅延&quot;;&quot;&quot;)">
            <text:p/>
          </table:table-cell>
          <table:table-cell table:style-name="ce66"/>
          <table:table-cell table:style-name="ce66" table:formula="of:=SUM([.$V165:.$FM16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6]&lt;&gt;&quot;&quot;;[.$F166]=&quot;&quot;);&quot;E&quot;&amp;ROW();[.$B165])" office:value-type="string" office:string-value="E153" calcext:value-type="string">
            <text:p>E153</text:p>
          </table:table-cell>
          <table:table-cell table:style-name="ce13" table:formula="of:=IF(AND([.$D166]&lt;&gt;&quot;&quot;;[.$D166]&lt;&gt;&quot;○&quot;);MAX([.$C$3:.$C165])+1;[.$C165])" office:value-type="float" office:value="9" calcext:value-type="float">
            <text:p>9</text:p>
          </table:table-cell>
          <table:table-cell table:style-name="ce19"/>
          <table:table-cell table:style-name="ce27" table:formula="of:=IF(AND([.$F166]&lt;&gt;&quot;&quot;;[.$D165]&lt;&gt;&quot;&quot;);1;IF([.$F166]&lt;&gt;&quot;&quot;;MAX(INDIRECT([.$B166]):[.$E165])+1;&quot;&quot;))">
            <text:p/>
          </table:table-cell>
          <table:table-cell table:style-name="ce32"/>
          <table:table-cell table:style-name="ce32" table:formula="of:=IF([.$H166]=&quot;&quot;;&quot;&quot;;IF([.$G165]=&quot;&quot;;1;[.$G165]+1))" office:value-type="float" office:value="12" calcext:value-type="float">
            <text:p>12</text:p>
          </table:table-cell>
          <table:table-cell table:style-name="ce32" office:value-type="string" calcext:value-type="string">
            <text:p>会員登録完了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2" table:formula="of:=IF([.$L166]&lt;&gt;&quot;&quot;;NETWORKDAYS([.$L166];[.$M166];[$休日.$B$4:.$B$304]);&quot;&quot;)" office:value-type="float" office:value="1" calcext:value-type="float">
            <text:p>1</text:p>
          </table:table-cell>
          <table:table-cell table:style-name="ce272" office:value-type="float" office:value="100" calcext:value-type="float">
            <text:p>100</text:p>
          </table:table-cell>
          <table:table-cell table:style-name="ce63" table:formula="of:=IF(OR(AND([.$N166]=&quot;&quot;;[.$L166]&lt;&gt;&quot;&quot;;[.$L166]&lt;=[.$U$1]);AND([.$M166]&lt;&gt;&quot;&quot;;[.Q166]&lt;100;[.$M166]&lt;=[.$U$1]));&quot;遅延&quot;;&quot;&quot;)">
            <text:p/>
          </table:table-cell>
          <table:table-cell table:style-name="ce66"/>
          <table:table-cell table:style-name="ce66" table:formula="of:=SUM([.$V166:.$FM16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7]&lt;&gt;&quot;&quot;;[.$F167]=&quot;&quot;);&quot;E&quot;&amp;ROW();[.$B166])" office:value-type="string" office:string-value="E153" calcext:value-type="string">
            <text:p>E153</text:p>
          </table:table-cell>
          <table:table-cell table:style-name="ce13" table:formula="of:=IF(AND([.$D167]&lt;&gt;&quot;&quot;;[.$D167]&lt;&gt;&quot;○&quot;);MAX([.$C$3:.$C166])+1;[.$C166])" office:value-type="float" office:value="9" calcext:value-type="float">
            <text:p>9</text:p>
          </table:table-cell>
          <table:table-cell table:style-name="ce19"/>
          <table:table-cell table:style-name="ce27" table:formula="of:=IF(AND([.$F167]&lt;&gt;&quot;&quot;;[.$D166]&lt;&gt;&quot;&quot;);1;IF([.$F167]&lt;&gt;&quot;&quot;;MAX(INDIRECT([.$B167]):[.$E166])+1;&quot;&quot;))">
            <text:p/>
          </table:table-cell>
          <table:table-cell table:style-name="ce32"/>
          <table:table-cell table:style-name="ce32" table:formula="of:=IF([.$H167]=&quot;&quot;;&quot;&quot;;IF([.$G166]=&quot;&quot;;1;[.$G16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67]&lt;&gt;&quot;&quot;;NETWORKDAYS([.$L167];[.$M167];[$休日.$B$4:.$B$304]);&quot;&quot;)">
            <text:p/>
          </table:table-cell>
          <table:table-cell table:style-name="ce216"/>
          <table:table-cell table:style-name="ce63" table:formula="of:=IF(OR(AND([.$N167]=&quot;&quot;;[.$L167]&lt;&gt;&quot;&quot;;[.$L167]&lt;=[.$U$1]);AND([.$M167]&lt;&gt;&quot;&quot;;[.Q167]&lt;100;[.$M167]&lt;=[.$U$1]));&quot;遅延&quot;;&quot;&quot;)">
            <text:p/>
          </table:table-cell>
          <table:table-cell table:style-name="ce66"/>
          <table:table-cell table:style-name="ce66" table:formula="of:=SUM([.$V167:.$FM16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8]&lt;&gt;&quot;&quot;;[.$F168]=&quot;&quot;);&quot;E&quot;&amp;ROW();[.$B167])" office:value-type="string" office:string-value="E153" calcext:value-type="string">
            <text:p>E153</text:p>
          </table:table-cell>
          <table:table-cell table:style-name="ce13" table:formula="of:=IF(AND([.$D168]&lt;&gt;&quot;&quot;;[.$D168]&lt;&gt;&quot;○&quot;);MAX([.$C$3:.$C167])+1;[.$C167])" office:value-type="float" office:value="9" calcext:value-type="float">
            <text:p>9</text:p>
          </table:table-cell>
          <table:table-cell table:style-name="ce19"/>
          <table:table-cell table:style-name="ce27" table:formula="of:=IF(AND([.$F168]&lt;&gt;&quot;&quot;;[.$D167]&lt;&gt;&quot;&quot;);1;IF([.$F168]&lt;&gt;&quot;&quot;;MAX(INDIRECT([.$B168]):[.$E167])+1;&quot;&quot;))">
            <text:p/>
          </table:table-cell>
          <table:table-cell table:style-name="ce32"/>
          <table:table-cell table:style-name="ce32" table:formula="of:=IF([.$H168]=&quot;&quot;;&quot;&quot;;IF([.$G167]=&quot;&quot;;1;[.$G16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68]&lt;&gt;&quot;&quot;;NETWORKDAYS([.$L168];[.$M168];[$休日.$B$4:.$B$304]);&quot;&quot;)">
            <text:p/>
          </table:table-cell>
          <table:table-cell table:style-name="ce216"/>
          <table:table-cell table:style-name="ce63" table:formula="of:=IF(OR(AND([.$N168]=&quot;&quot;;[.$L168]&lt;&gt;&quot;&quot;;[.$L168]&lt;=[.$U$1]);AND([.$M168]&lt;&gt;&quot;&quot;;[.Q168]&lt;100;[.$M168]&lt;=[.$U$1]));&quot;遅延&quot;;&quot;&quot;)">
            <text:p/>
          </table:table-cell>
          <table:table-cell table:style-name="ce66"/>
          <table:table-cell table:style-name="ce66" table:formula="of:=SUM([.$V168:.$FM16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9]&lt;&gt;&quot;&quot;;[.$F169]=&quot;&quot;);&quot;E&quot;&amp;ROW();[.$B168])" office:value-type="string" office:string-value="E153" calcext:value-type="string">
            <text:p>E153</text:p>
          </table:table-cell>
          <table:table-cell table:style-name="ce13" table:formula="of:=IF(AND([.$D169]&lt;&gt;&quot;&quot;;[.$D169]&lt;&gt;&quot;○&quot;);MAX([.$C$3:.$C168])+1;[.$C168])" office:value-type="float" office:value="9" calcext:value-type="float">
            <text:p>9</text:p>
          </table:table-cell>
          <table:table-cell table:style-name="ce19"/>
          <table:table-cell table:style-name="ce27" table:formula="of:=IF(AND([.$F169]&lt;&gt;&quot;&quot;;[.$D168]&lt;&gt;&quot;&quot;);1;IF([.$F169]&lt;&gt;&quot;&quot;;MAX(INDIRECT([.$B169]):[.$E168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会員変更</text:p>
          </table:table-cell>
          <table:table-cell table:style-name="Default" table:number-columns-repeated="2"/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05" calcext:value-type="date">
            <text:p>2026/06/05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169]&lt;&gt;&quot;&quot;;NETWORKDAYS([.$L169];[.$M169];[$休日.$B$4:.$B$304]);&quot;&quot;)" office:value-type="float" office:value="2" calcext:value-type="float">
            <text:p>2</text:p>
          </table:table-cell>
          <table:table-cell table:style-name="ce275" office:value-type="float" office:value="100" calcext:value-type="float">
            <text:p>100</text:p>
          </table:table-cell>
          <table:table-cell table:style-name="ce63" table:formula="of:=IF(OR(AND([.$N169]=&quot;&quot;;[.$L169]&lt;&gt;&quot;&quot;;[.$L169]&lt;=[.$U$1]);AND([.$M169]&lt;&gt;&quot;&quot;;[.Q169]&lt;100;[.$M169]&lt;=[.$U$1]));&quot;遅延&quot;;&quot;&quot;)">
            <text:p/>
          </table:table-cell>
          <table:table-cell table:style-name="ce66"/>
          <table:table-cell table:style-name="ce66" table:formula="of:=SUM([.$V169:.$FM16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0]&lt;&gt;&quot;&quot;;[.$F170]=&quot;&quot;);&quot;E&quot;&amp;ROW();[.$B169])" office:value-type="string" office:string-value="E153" calcext:value-type="string">
            <text:p>E153</text:p>
          </table:table-cell>
          <table:table-cell table:style-name="ce13" table:formula="of:=IF(AND([.$D170]&lt;&gt;&quot;&quot;;[.$D170]&lt;&gt;&quot;○&quot;);MAX([.$C$3:.$C169])+1;[.$C169])" office:value-type="float" office:value="9" calcext:value-type="float">
            <text:p>9</text:p>
          </table:table-cell>
          <table:table-cell table:style-name="ce19"/>
          <table:table-cell table:style-name="ce27" table:formula="of:=IF(AND([.$F170]&lt;&gt;&quot;&quot;;[.$D169]&lt;&gt;&quot;&quot;);1;IF([.$F170]&lt;&gt;&quot;&quot;;MAX(INDIRECT([.$B170]):[.$E169])+1;&quot;&quot;))">
            <text:p/>
          </table:table-cell>
          <table:table-cell table:style-name="ce32"/>
          <table:table-cell table:style-name="ce32" table:formula="of:=IF([.$H170]=&quot;&quot;;&quot;&quot;;IF([.$G168]=&quot;&quot;;1;[.$G168]+1))" office:value-type="float" office:value="1" calcext:value-type="float">
            <text:p>1</text:p>
          </table:table-cell>
          <table:table-cell table:style-name="ce32" office:value-type="string" calcext:value-type="string">
            <text:p>リポジトリ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2" table:formula="of:=IF([.$L170]&lt;&gt;&quot;&quot;;NETWORKDAYS([.$L170];[.$M170];[$休日.$B$4:.$B$304]);&quot;&quot;)" office:value-type="float" office:value="1" calcext:value-type="float">
            <text:p>1</text:p>
          </table:table-cell>
          <table:table-cell table:style-name="ce275" office:value-type="float" office:value="100" calcext:value-type="float">
            <text:p>100</text:p>
          </table:table-cell>
          <table:table-cell table:style-name="ce63" table:formula="of:=IF(OR(AND([.$N170]=&quot;&quot;;[.$L170]&lt;&gt;&quot;&quot;;[.$L170]&lt;=[.$U$1]);AND([.$M170]&lt;&gt;&quot;&quot;;[.Q170]&lt;100;[.$M170]&lt;=[.$U$1]));&quot;遅延&quot;;&quot;&quot;)">
            <text:p/>
          </table:table-cell>
          <table:table-cell table:style-name="ce66"/>
          <table:table-cell table:style-name="ce66" table:formula="of:=SUM([.$V170:.$FM17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1]&lt;&gt;&quot;&quot;;[.$F171]=&quot;&quot;);&quot;E&quot;&amp;ROW();[.$B170])" office:value-type="string" office:string-value="E153" calcext:value-type="string">
            <text:p>E153</text:p>
          </table:table-cell>
          <table:table-cell table:style-name="ce13" table:formula="of:=IF(AND([.$D171]&lt;&gt;&quot;&quot;;[.$D171]&lt;&gt;&quot;○&quot;);MAX([.$C$3:.$C170])+1;[.$C170])" office:value-type="float" office:value="9" calcext:value-type="float">
            <text:p>9</text:p>
          </table:table-cell>
          <table:table-cell table:style-name="ce19"/>
          <table:table-cell table:style-name="ce27" table:formula="of:=IF(AND([.$F171]&lt;&gt;&quot;&quot;;[.$D170]&lt;&gt;&quot;&quot;);1;IF([.$F171]&lt;&gt;&quot;&quot;;MAX(INDIRECT([.$B171]):[.$E170])+1;&quot;&quot;))">
            <text:p/>
          </table:table-cell>
          <table:table-cell table:style-name="ce32"/>
          <table:table-cell table:style-name="ce32" table:formula="of:=IF([.$H171]=&quot;&quot;;&quot;&quot;;IF([.$G170]=&quot;&quot;;1;[.$G170]+1))" office:value-type="float" office:value="2" calcext:value-type="float">
            <text:p>2</text:p>
          </table:table-cell>
          <table:table-cell table:style-name="ce32" office:value-type="string" calcext:value-type="string">
            <text:p>会員変更入力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2" table:formula="of:=IF([.$L171]&lt;&gt;&quot;&quot;;NETWORKDAYS([.$L171];[.$M171];[$休日.$B$4:.$B$304]);&quot;&quot;)" office:value-type="float" office:value="1" calcext:value-type="float">
            <text:p>1</text:p>
          </table:table-cell>
          <table:table-cell table:style-name="ce275" office:value-type="float" office:value="100" calcext:value-type="float">
            <text:p>100</text:p>
          </table:table-cell>
          <table:table-cell table:style-name="ce63" table:formula="of:=IF(OR(AND([.$N171]=&quot;&quot;;[.$L171]&lt;&gt;&quot;&quot;;[.$L171]&lt;=[.$U$1]);AND([.$M171]&lt;&gt;&quot;&quot;;[.Q171]&lt;100;[.$M171]&lt;=[.$U$1]));&quot;遅延&quot;;&quot;&quot;)">
            <text:p/>
          </table:table-cell>
          <table:table-cell table:style-name="ce66"/>
          <table:table-cell table:style-name="ce66" table:formula="of:=SUM([.$V171:.$FM17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2]&lt;&gt;&quot;&quot;;[.$F172]=&quot;&quot;);&quot;E&quot;&amp;ROW();[.$B171])" office:value-type="string" office:string-value="E153" calcext:value-type="string">
            <text:p>E153</text:p>
          </table:table-cell>
          <table:table-cell table:style-name="ce13" table:formula="of:=IF(AND([.$D172]&lt;&gt;&quot;&quot;;[.$D172]&lt;&gt;&quot;○&quot;);MAX([.$C$3:.$C171])+1;[.$C171])" office:value-type="float" office:value="9" calcext:value-type="float">
            <text:p>9</text:p>
          </table:table-cell>
          <table:table-cell table:style-name="ce19"/>
          <table:table-cell table:style-name="ce27" table:formula="of:=IF(AND([.$F172]&lt;&gt;&quot;&quot;;[.$D171]&lt;&gt;&quot;&quot;);1;IF([.$F172]&lt;&gt;&quot;&quot;;MAX(INDIRECT([.$B172]):[.$E171])+1;&quot;&quot;))">
            <text:p/>
          </table:table-cell>
          <table:table-cell table:style-name="ce32"/>
          <table:table-cell table:style-name="ce32" table:formula="of:=IF([.$H172]=&quot;&quot;;&quot;&quot;;IF([.$G171]=&quot;&quot;;1;[.$G171]+1))" office:value-type="float" office:value="3" calcext:value-type="float">
            <text:p>3</text:p>
          </table:table-cell>
          <table:table-cell table:style-name="ce32" office:value-type="string" calcext:value-type="string">
            <text:p>会員変更入力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72]&lt;&gt;&quot;&quot;;NETWORKDAYS([.$L172];[.$M172];[$休日.$B$4:.$B$304]);&quot;&quot;)" office:value-type="float" office:value="1" calcext:value-type="float">
            <text:p>1</text:p>
          </table:table-cell>
          <table:table-cell table:style-name="ce275" office:value-type="float" office:value="100" calcext:value-type="float">
            <text:p>100</text:p>
          </table:table-cell>
          <table:table-cell table:style-name="ce63" table:formula="of:=IF(OR(AND([.$N172]=&quot;&quot;;[.$L172]&lt;&gt;&quot;&quot;;[.$L172]&lt;=[.$U$1]);AND([.$M172]&lt;&gt;&quot;&quot;;[.Q172]&lt;100;[.$M172]&lt;=[.$U$1]));&quot;遅延&quot;;&quot;&quot;)">
            <text:p/>
          </table:table-cell>
          <table:table-cell table:style-name="ce66"/>
          <table:table-cell table:style-name="ce66" table:formula="of:=SUM([.$V172:.$FM17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3]&lt;&gt;&quot;&quot;;[.$F173]=&quot;&quot;);&quot;E&quot;&amp;ROW();[.$B172])" office:value-type="string" office:string-value="E153" calcext:value-type="string">
            <text:p>E153</text:p>
          </table:table-cell>
          <table:table-cell table:style-name="ce13" table:formula="of:=IF(AND([.$D173]&lt;&gt;&quot;&quot;;[.$D173]&lt;&gt;&quot;○&quot;);MAX([.$C$3:.$C172])+1;[.$C172])" office:value-type="float" office:value="9" calcext:value-type="float">
            <text:p>9</text:p>
          </table:table-cell>
          <table:table-cell table:style-name="ce19"/>
          <table:table-cell table:style-name="ce27" table:formula="of:=IF(AND([.$F173]&lt;&gt;&quot;&quot;;[.$D172]&lt;&gt;&quot;&quot;);1;IF([.$F173]&lt;&gt;&quot;&quot;;MAX(INDIRECT([.$B173]):[.$E172])+1;&quot;&quot;))">
            <text:p/>
          </table:table-cell>
          <table:table-cell table:style-name="ce32"/>
          <table:table-cell table:style-name="ce32" table:formula="of:=IF([.$H173]=&quot;&quot;;&quot;&quot;;IF([.$G172]=&quot;&quot;;1;[.$G172]+1))" office:value-type="float" office:value="4" calcext:value-type="float">
            <text:p>4</text:p>
          </table:table-cell>
          <table:table-cell table:style-name="ce32" office:value-type="string" calcext:value-type="string">
            <text:p>会員変更入力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2" table:formula="of:=IF([.$L173]&lt;&gt;&quot;&quot;;NETWORKDAYS([.$L173];[.$M173];[$休日.$B$4:.$B$304]);&quot;&quot;)" office:value-type="float" office:value="1" calcext:value-type="float">
            <text:p>1</text:p>
          </table:table-cell>
          <table:table-cell table:style-name="ce275" office:value-type="float" office:value="100" calcext:value-type="float">
            <text:p>100</text:p>
          </table:table-cell>
          <table:table-cell table:style-name="ce63" table:formula="of:=IF(OR(AND([.$N173]=&quot;&quot;;[.$L173]&lt;&gt;&quot;&quot;;[.$L173]&lt;=[.$U$1]);AND([.$M173]&lt;&gt;&quot;&quot;;[.Q173]&lt;100;[.$M173]&lt;=[.$U$1]));&quot;遅延&quot;;&quot;&quot;)">
            <text:p/>
          </table:table-cell>
          <table:table-cell table:style-name="ce66"/>
          <table:table-cell table:style-name="ce66" table:formula="of:=SUM([.$V173:.$FM17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4]&lt;&gt;&quot;&quot;;[.$F174]=&quot;&quot;);&quot;E&quot;&amp;ROW();[.$B173])" office:value-type="string" office:string-value="E153" calcext:value-type="string">
            <text:p>E153</text:p>
          </table:table-cell>
          <table:table-cell table:style-name="ce13" table:formula="of:=IF(AND([.$D174]&lt;&gt;&quot;&quot;;[.$D174]&lt;&gt;&quot;○&quot;);MAX([.$C$3:.$C173])+1;[.$C173])" office:value-type="float" office:value="9" calcext:value-type="float">
            <text:p>9</text:p>
          </table:table-cell>
          <table:table-cell table:style-name="ce19"/>
          <table:table-cell table:style-name="ce27" table:formula="of:=IF(AND([.$F174]&lt;&gt;&quot;&quot;;[.$D173]&lt;&gt;&quot;&quot;);1;IF([.$F174]&lt;&gt;&quot;&quot;;MAX(INDIRECT([.$B174]):[.$E173])+1;&quot;&quot;))">
            <text:p/>
          </table:table-cell>
          <table:table-cell table:style-name="ce32"/>
          <table:table-cell table:style-name="ce32" table:formula="of:=IF([.$H174]=&quot;&quot;;&quot;&quot;;IF([.$G173]=&quot;&quot;;1;[.$G173]+1))" office:value-type="float" office:value="5" calcext:value-type="float">
            <text:p>5</text:p>
          </table:table-cell>
          <table:table-cell table:style-name="ce32" office:value-type="string" calcext:value-type="string">
            <text:p>会員変更確認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174]&lt;&gt;&quot;&quot;;NETWORKDAYS([.$L174];[.$M174];[$休日.$B$4:.$B$304]);&quot;&quot;)" office:value-type="float" office:value="1" calcext:value-type="float">
            <text:p>1</text:p>
          </table:table-cell>
          <table:table-cell table:style-name="ce275" office:value-type="float" office:value="100" calcext:value-type="float">
            <text:p>100</text:p>
          </table:table-cell>
          <table:table-cell table:style-name="ce63" table:formula="of:=IF(OR(AND([.$N174]=&quot;&quot;;[.$L174]&lt;&gt;&quot;&quot;;[.$L174]&lt;=[.$U$1]);AND([.$M174]&lt;&gt;&quot;&quot;;[.Q174]&lt;100;[.$M174]&lt;=[.$U$1]));&quot;遅延&quot;;&quot;&quot;)">
            <text:p/>
          </table:table-cell>
          <table:table-cell table:style-name="ce66"/>
          <table:table-cell table:style-name="ce66" table:formula="of:=SUM([.$V174:.$FM17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5]&lt;&gt;&quot;&quot;;[.$F175]=&quot;&quot;);&quot;E&quot;&amp;ROW();[.$B174])" office:value-type="string" office:string-value="E153" calcext:value-type="string">
            <text:p>E153</text:p>
          </table:table-cell>
          <table:table-cell table:style-name="ce13" table:formula="of:=IF(AND([.$D175]&lt;&gt;&quot;&quot;;[.$D175]&lt;&gt;&quot;○&quot;);MAX([.$C$3:.$C174])+1;[.$C174])" office:value-type="float" office:value="9" calcext:value-type="float">
            <text:p>9</text:p>
          </table:table-cell>
          <table:table-cell table:style-name="ce19"/>
          <table:table-cell table:style-name="ce27" table:formula="of:=IF(AND([.$F175]&lt;&gt;&quot;&quot;;[.$D174]&lt;&gt;&quot;&quot;);1;IF([.$F175]&lt;&gt;&quot;&quot;;MAX(INDIRECT([.$B175]):[.$E174])+1;&quot;&quot;))">
            <text:p/>
          </table:table-cell>
          <table:table-cell table:style-name="ce32"/>
          <table:table-cell table:style-name="ce32" table:formula="of:=IF([.$H175]=&quot;&quot;;&quot;&quot;;IF([.$G174]=&quot;&quot;;1;[.$G174]+1))" office:value-type="float" office:value="6" calcext:value-type="float">
            <text:p>6</text:p>
          </table:table-cell>
          <table:table-cell table:style-name="ce32" office:value-type="string" calcext:value-type="string">
            <text:p>会員変更確認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75]&lt;&gt;&quot;&quot;;NETWORKDAYS([.$L175];[.$M175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75]=&quot;&quot;;[.$L175]&lt;&gt;&quot;&quot;;[.$L175]&lt;=[.$U$1]);AND([.$M175]&lt;&gt;&quot;&quot;;[.Q175]&lt;100;[.$M175]&lt;=[.$U$1]));&quot;遅延&quot;;&quot;&quot;)">
            <text:p/>
          </table:table-cell>
          <table:table-cell table:style-name="ce66"/>
          <table:table-cell table:style-name="ce66" table:formula="of:=SUM([.$V175:.$FM17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6]&lt;&gt;&quot;&quot;;[.$F176]=&quot;&quot;);&quot;E&quot;&amp;ROW();[.$B175])" office:value-type="string" office:string-value="E153" calcext:value-type="string">
            <text:p>E153</text:p>
          </table:table-cell>
          <table:table-cell table:style-name="ce13" table:formula="of:=IF(AND([.$D176]&lt;&gt;&quot;&quot;;[.$D176]&lt;&gt;&quot;○&quot;);MAX([.$C$3:.$C175])+1;[.$C175])" office:value-type="float" office:value="9" calcext:value-type="float">
            <text:p>9</text:p>
          </table:table-cell>
          <table:table-cell table:style-name="ce19"/>
          <table:table-cell table:style-name="ce27" table:formula="of:=IF(AND([.$F176]&lt;&gt;&quot;&quot;;[.$D175]&lt;&gt;&quot;&quot;);1;IF([.$F176]&lt;&gt;&quot;&quot;;MAX(INDIRECT([.$B176]):[.$E175])+1;&quot;&quot;))">
            <text:p/>
          </table:table-cell>
          <table:table-cell table:style-name="ce32"/>
          <table:table-cell table:style-name="ce32" table:formula="of:=IF([.$H176]=&quot;&quot;;&quot;&quot;;IF([.$G175]=&quot;&quot;;1;[.$G175]+1))" office:value-type="float" office:value="7" calcext:value-type="float">
            <text:p>7</text:p>
          </table:table-cell>
          <table:table-cell table:style-name="ce32" office:value-type="string" calcext:value-type="string">
            <text:p>会員変更確認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76]&lt;&gt;&quot;&quot;;NETWORKDAYS([.$L176];[.$M176];[$休日.$B$4:.$B$304]);&quot;&quot;)" office:value-type="float" office:value="1" calcext:value-type="float">
            <text:p>1</text:p>
          </table:table-cell>
          <table:table-cell table:style-name="ce276" office:value-type="float" office:value="100" calcext:value-type="float">
            <text:p>100</text:p>
          </table:table-cell>
          <table:table-cell table:style-name="ce63" table:formula="of:=IF(OR(AND([.$N176]=&quot;&quot;;[.$L176]&lt;&gt;&quot;&quot;;[.$L176]&lt;=[.$U$1]);AND([.$M176]&lt;&gt;&quot;&quot;;[.Q176]&lt;100;[.$M176]&lt;=[.$U$1]));&quot;遅延&quot;;&quot;&quot;)">
            <text:p/>
          </table:table-cell>
          <table:table-cell table:style-name="ce66"/>
          <table:table-cell table:style-name="ce66" table:formula="of:=SUM([.$V176:.$FM17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7]&lt;&gt;&quot;&quot;;[.$F177]=&quot;&quot;);&quot;E&quot;&amp;ROW();[.$B176])" office:value-type="string" office:string-value="E153" calcext:value-type="string">
            <text:p>E153</text:p>
          </table:table-cell>
          <table:table-cell table:style-name="ce13" table:formula="of:=IF(AND([.$D177]&lt;&gt;&quot;&quot;;[.$D177]&lt;&gt;&quot;○&quot;);MAX([.$C$3:.$C176])+1;[.$C176])" office:value-type="float" office:value="9" calcext:value-type="float">
            <text:p>9</text:p>
          </table:table-cell>
          <table:table-cell table:style-name="ce19"/>
          <table:table-cell table:style-name="ce27" table:formula="of:=IF(AND([.$F177]&lt;&gt;&quot;&quot;;[.$D176]&lt;&gt;&quot;&quot;);1;IF([.$F177]&lt;&gt;&quot;&quot;;MAX(INDIRECT([.$B177]):[.$E176])+1;&quot;&quot;))">
            <text:p/>
          </table:table-cell>
          <table:table-cell table:style-name="ce32"/>
          <table:table-cell table:style-name="ce32" table:formula="of:=IF([.$H177]=&quot;&quot;;&quot;&quot;;IF([.$G176]=&quot;&quot;;1;[.$G176]+1))" office:value-type="float" office:value="8" calcext:value-type="float">
            <text:p>8</text:p>
          </table:table-cell>
          <table:table-cell table:style-name="ce32" office:value-type="string" calcext:value-type="string">
            <text:p>会員変更完了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77]&lt;&gt;&quot;&quot;;NETWORKDAYS([.$L177];[.$M177];[$休日.$B$4:.$B$304]);&quot;&quot;)" office:value-type="float" office:value="1" calcext:value-type="float">
            <text:p>1</text:p>
          </table:table-cell>
          <table:table-cell table:style-name="ce276" office:value-type="float" office:value="100" calcext:value-type="float">
            <text:p>100</text:p>
          </table:table-cell>
          <table:table-cell table:style-name="ce63" table:formula="of:=IF(OR(AND([.$N177]=&quot;&quot;;[.$L177]&lt;&gt;&quot;&quot;;[.$L177]&lt;=[.$U$1]);AND([.$M177]&lt;&gt;&quot;&quot;;[.Q177]&lt;100;[.$M177]&lt;=[.$U$1]));&quot;遅延&quot;;&quot;&quot;)">
            <text:p/>
          </table:table-cell>
          <table:table-cell table:style-name="ce66"/>
          <table:table-cell table:style-name="ce66" table:formula="of:=SUM([.$V177:.$FM17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8]&lt;&gt;&quot;&quot;;[.$F178]=&quot;&quot;);&quot;E&quot;&amp;ROW();[.$B177])" office:value-type="string" office:string-value="E153" calcext:value-type="string">
            <text:p>E153</text:p>
          </table:table-cell>
          <table:table-cell table:style-name="ce13" table:formula="of:=IF(AND([.$D178]&lt;&gt;&quot;&quot;;[.$D178]&lt;&gt;&quot;○&quot;);MAX([.$C$3:.$C177])+1;[.$C177])" office:value-type="float" office:value="9" calcext:value-type="float">
            <text:p>9</text:p>
          </table:table-cell>
          <table:table-cell table:style-name="ce19"/>
          <table:table-cell table:style-name="ce27" table:formula="of:=IF(AND([.$F178]&lt;&gt;&quot;&quot;;[.$D177]&lt;&gt;&quot;&quot;);1;IF([.$F178]&lt;&gt;&quot;&quot;;MAX(INDIRECT([.$B178]):[.$E177])+1;&quot;&quot;))">
            <text:p/>
          </table:table-cell>
          <table:table-cell table:style-name="ce32"/>
          <table:table-cell table:style-name="ce32" table:formula="of:=IF([.$H178]=&quot;&quot;;&quot;&quot;;IF([.$G177]=&quot;&quot;;1;[.$G177]+1))" office:value-type="float" office:value="9" calcext:value-type="float">
            <text:p>9</text:p>
          </table:table-cell>
          <table:table-cell table:style-name="ce32" office:value-type="string" calcext:value-type="string">
            <text:p>会員変更完了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78]&lt;&gt;&quot;&quot;;NETWORKDAYS([.$L178];[.$M178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78]=&quot;&quot;;[.$L178]&lt;&gt;&quot;&quot;;[.$L178]&lt;=[.$U$1]);AND([.$M178]&lt;&gt;&quot;&quot;;[.Q178]&lt;100;[.$M178]&lt;=[.$U$1]));&quot;遅延&quot;;&quot;&quot;)">
            <text:p/>
          </table:table-cell>
          <table:table-cell table:style-name="ce66"/>
          <table:table-cell table:style-name="ce66" table:formula="of:=SUM([.$V178:.$FM17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9]&lt;&gt;&quot;&quot;;[.$F179]=&quot;&quot;);&quot;E&quot;&amp;ROW();[.$B178])" office:value-type="string" office:string-value="E153" calcext:value-type="string">
            <text:p>E153</text:p>
          </table:table-cell>
          <table:table-cell table:style-name="ce13" table:formula="of:=IF(AND([.$D179]&lt;&gt;&quot;&quot;;[.$D179]&lt;&gt;&quot;○&quot;);MAX([.$C$3:.$C178])+1;[.$C178])" office:value-type="float" office:value="9" calcext:value-type="float">
            <text:p>9</text:p>
          </table:table-cell>
          <table:table-cell table:style-name="ce19"/>
          <table:table-cell table:style-name="ce27" table:formula="of:=IF(AND([.$F179]&lt;&gt;&quot;&quot;;[.$D178]&lt;&gt;&quot;&quot;);1;IF([.$F179]&lt;&gt;&quot;&quot;;MAX(INDIRECT([.$B179]):[.$E178])+1;&quot;&quot;))">
            <text:p/>
          </table:table-cell>
          <table:table-cell table:style-name="ce32"/>
          <table:table-cell table:style-name="ce32" table:formula="of:=IF([.$H179]=&quot;&quot;;&quot;&quot;;IF([.$G178]=&quot;&quot;;1;[.$G178]+1))" office:value-type="float" office:value="10" calcext:value-type="float">
            <text:p>10</text:p>
          </table:table-cell>
          <table:table-cell table:style-name="ce32" office:value-type="string" calcext:value-type="string">
            <text:p>会員変更完了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79]&lt;&gt;&quot;&quot;;NETWORKDAYS([.$L179];[.$M179];[$休日.$B$4:.$B$304]);&quot;&quot;)" office:value-type="float" office:value="1" calcext:value-type="float">
            <text:p>1</text:p>
          </table:table-cell>
          <table:table-cell table:style-name="ce278" office:value-type="float" office:value="100" calcext:value-type="float">
            <text:p>100</text:p>
          </table:table-cell>
          <table:table-cell table:style-name="ce63" table:formula="of:=IF(OR(AND([.$N179]=&quot;&quot;;[.$L179]&lt;&gt;&quot;&quot;;[.$L179]&lt;=[.$U$1]);AND([.$M179]&lt;&gt;&quot;&quot;;[.Q179]&lt;100;[.$M179]&lt;=[.$U$1]));&quot;遅延&quot;;&quot;&quot;)">
            <text:p/>
          </table:table-cell>
          <table:table-cell table:style-name="ce66"/>
          <table:table-cell table:style-name="ce66" table:formula="of:=SUM([.$V179:.$FM17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0]&lt;&gt;&quot;&quot;;[.$F180]=&quot;&quot;);&quot;E&quot;&amp;ROW();[.$B179])" office:value-type="string" office:string-value="E153" calcext:value-type="string">
            <text:p>E153</text:p>
          </table:table-cell>
          <table:table-cell table:style-name="ce13" table:formula="of:=IF(AND([.$D180]&lt;&gt;&quot;&quot;;[.$D180]&lt;&gt;&quot;○&quot;);MAX([.$C$3:.$C179])+1;[.$C179])" office:value-type="float" office:value="9" calcext:value-type="float">
            <text:p>9</text:p>
          </table:table-cell>
          <table:table-cell table:style-name="ce19"/>
          <table:table-cell table:style-name="ce27" table:formula="of:=IF(AND([.$F180]&lt;&gt;&quot;&quot;;[.$D179]&lt;&gt;&quot;&quot;);1;IF([.$F180]&lt;&gt;&quot;&quot;;MAX(INDIRECT([.$B180]):[.$E179])+1;&quot;&quot;))">
            <text:p/>
          </table:table-cell>
          <table:table-cell table:style-name="ce32"/>
          <table:table-cell table:style-name="ce32" table:formula="of:=IF([.$H180]=&quot;&quot;;&quot;&quot;;IF([.$G179]=&quot;&quot;;1;[.$G17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80]&lt;&gt;&quot;&quot;;NETWORKDAYS([.$L180];[.$M180];[$休日.$B$4:.$B$304]);&quot;&quot;)">
            <text:p/>
          </table:table-cell>
          <table:table-cell table:style-name="ce216"/>
          <table:table-cell table:style-name="ce63" table:formula="of:=IF(OR(AND([.$N180]=&quot;&quot;;[.$L180]&lt;&gt;&quot;&quot;;[.$L180]&lt;=[.$U$1]);AND([.$M180]&lt;&gt;&quot;&quot;;[.Q180]&lt;100;[.$M180]&lt;=[.$U$1]));&quot;遅延&quot;;&quot;&quot;)">
            <text:p/>
          </table:table-cell>
          <table:table-cell table:style-name="ce66"/>
          <table:table-cell table:style-name="ce66" table:formula="of:=SUM([.$V180:.$FM18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1]&lt;&gt;&quot;&quot;;[.$F181]=&quot;&quot;);&quot;E&quot;&amp;ROW();[.$B180])" office:value-type="string" office:string-value="E153" calcext:value-type="string">
            <text:p>E153</text:p>
          </table:table-cell>
          <table:table-cell table:style-name="ce13" table:formula="of:=IF(AND([.$D181]&lt;&gt;&quot;&quot;;[.$D181]&lt;&gt;&quot;○&quot;);MAX([.$C$3:.$C180])+1;[.$C180])" office:value-type="float" office:value="9" calcext:value-type="float">
            <text:p>9</text:p>
          </table:table-cell>
          <table:table-cell table:style-name="ce19"/>
          <table:table-cell table:style-name="ce27" table:formula="of:=IF(AND([.$F181]&lt;&gt;&quot;&quot;;[.$D180]&lt;&gt;&quot;&quot;);1;IF([.$F181]&lt;&gt;&quot;&quot;;MAX(INDIRECT([.$B181]):[.$E180])+1;&quot;&quot;))">
            <text:p/>
          </table:table-cell>
          <table:table-cell table:style-name="ce32"/>
          <table:table-cell table:style-name="ce32" table:formula="of:=IF([.$H181]=&quot;&quot;;&quot;&quot;;IF([.$G180]=&quot;&quot;;1;[.$G18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81]&lt;&gt;&quot;&quot;;NETWORKDAYS([.$L181];[.$M181];[$休日.$B$4:.$B$304]);&quot;&quot;)">
            <text:p/>
          </table:table-cell>
          <table:table-cell table:style-name="ce216"/>
          <table:table-cell table:style-name="ce63" table:formula="of:=IF(OR(AND([.$N181]=&quot;&quot;;[.$L181]&lt;&gt;&quot;&quot;;[.$L181]&lt;=[.$U$1]);AND([.$M181]&lt;&gt;&quot;&quot;;[.Q181]&lt;100;[.$M181]&lt;=[.$U$1]));&quot;遅延&quot;;&quot;&quot;)">
            <text:p/>
          </table:table-cell>
          <table:table-cell table:style-name="ce66"/>
          <table:table-cell table:style-name="ce66" table:formula="of:=SUM([.$V181:.$FM18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2]&lt;&gt;&quot;&quot;;[.$F182]=&quot;&quot;);&quot;E&quot;&amp;ROW();[.$B181])" office:value-type="string" office:string-value="E153" calcext:value-type="string">
            <text:p>E153</text:p>
          </table:table-cell>
          <table:table-cell table:style-name="ce13" table:formula="of:=IF(AND([.$D182]&lt;&gt;&quot;&quot;;[.$D182]&lt;&gt;&quot;○&quot;);MAX([.$C$3:.$C181])+1;[.$C181])" office:value-type="float" office:value="9" calcext:value-type="float">
            <text:p>9</text:p>
          </table:table-cell>
          <table:table-cell table:style-name="ce19"/>
          <table:table-cell table:style-name="ce27" table:formula="of:=IF(AND([.$F182]&lt;&gt;&quot;&quot;;[.$D181]&lt;&gt;&quot;&quot;);1;IF([.$F182]&lt;&gt;&quot;&quot;;MAX(INDIRECT([.$B182]):[.$E181])+1;&quot;&quot;))" office:value-type="float" office:value="3" calcext:value-type="float">
            <text:p>3</text:p>
          </table:table-cell>
          <table:table-cell table:style-name="ce32" office:value-type="string" calcext:value-type="string">
            <text:p>会員退会</text:p>
          </table:table-cell>
          <table:table-cell table:style-name="ce32" table:formula="of:=IF([.$H182]=&quot;&quot;;&quot;&quot;;IF([.$G181]=&quot;&quot;;1;[.$G181]+1))">
            <text:p/>
          </table:table-cell>
          <table:table-cell table:style-name="ce32" table:number-columns-repeated="2"/>
          <table:table-cell table:style-name="ce32" office:value-type="string" calcext:value-type="string">
            <text:p>小林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82]&lt;&gt;&quot;&quot;;NETWORKDAYS([.$L182];[.$M182];[$休日.$B$4:.$B$304]);&quot;&quot;)" office:value-type="float" office:value="3" calcext:value-type="float">
            <text:p>3</text:p>
          </table:table-cell>
          <table:table-cell table:style-name="ce279" office:value-type="float" office:value="100" calcext:value-type="float">
            <text:p>100</text:p>
          </table:table-cell>
          <table:table-cell table:style-name="ce63" table:formula="of:=IF(OR(AND([.$N182]=&quot;&quot;;[.$L182]&lt;&gt;&quot;&quot;;[.$L182]&lt;=[.$U$1]);AND([.$M182]&lt;&gt;&quot;&quot;;[.Q182]&lt;100;[.$M182]&lt;=[.$U$1]));&quot;遅延&quot;;&quot;&quot;)">
            <text:p/>
          </table:table-cell>
          <table:table-cell table:style-name="ce66"/>
          <table:table-cell table:style-name="ce66" table:formula="of:=SUM([.$V182:.$FM18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3]&lt;&gt;&quot;&quot;;[.$F183]=&quot;&quot;);&quot;E&quot;&amp;ROW();[.$B182])" office:value-type="string" office:string-value="E153" calcext:value-type="string">
            <text:p>E153</text:p>
          </table:table-cell>
          <table:table-cell table:style-name="ce13" table:formula="of:=IF(AND([.$D183]&lt;&gt;&quot;&quot;;[.$D183]&lt;&gt;&quot;○&quot;);MAX([.$C$3:.$C182])+1;[.$C182])" office:value-type="float" office:value="9" calcext:value-type="float">
            <text:p>9</text:p>
          </table:table-cell>
          <table:table-cell table:style-name="ce19"/>
          <table:table-cell table:style-name="ce27" table:formula="of:=IF(AND([.$F183]&lt;&gt;&quot;&quot;;[.$D182]&lt;&gt;&quot;&quot;);1;IF([.$F183]&lt;&gt;&quot;&quot;;MAX(INDIRECT([.$B183]):[.$E182])+1;&quot;&quot;))">
            <text:p/>
          </table:table-cell>
          <table:table-cell table:style-name="ce32"/>
          <table:table-cell table:style-name="ce32" table:formula="of:=IF([.$H183]=&quot;&quot;;&quot;&quot;;IF([.$G182]=&quot;&quot;;1;[.$G182]+1))" office:value-type="float" office:value="1" calcext:value-type="float">
            <text:p>1</text:p>
          </table:table-cell>
          <table:table-cell table:style-name="ce185" office:value-type="string" calcext:value-type="string">
            <text:p>会員フォーム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83]&lt;&gt;&quot;&quot;;NETWORKDAYS([.$L183];[.$M183];[$休日.$B$4:.$B$304]);&quot;&quot;)" office:value-type="float" office:value="1" calcext:value-type="float">
            <text:p>1</text:p>
          </table:table-cell>
          <table:table-cell table:style-name="ce279" office:value-type="float" office:value="100" calcext:value-type="float">
            <text:p>100</text:p>
          </table:table-cell>
          <table:table-cell table:style-name="ce63" table:formula="of:=IF(OR(AND([.$N183]=&quot;&quot;;[.$L183]&lt;&gt;&quot;&quot;;[.$L183]&lt;=[.$U$1]);AND([.$M183]&lt;&gt;&quot;&quot;;[.Q183]&lt;100;[.$M183]&lt;=[.$U$1]));&quot;遅延&quot;;&quot;&quot;)">
            <text:p/>
          </table:table-cell>
          <table:table-cell table:style-name="ce66"/>
          <table:table-cell table:style-name="ce66" table:formula="of:=SUM([.$V183:.$FM18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4]&lt;&gt;&quot;&quot;;[.$F184]=&quot;&quot;);&quot;E&quot;&amp;ROW();[.$B183])" office:value-type="string" office:string-value="E153" calcext:value-type="string">
            <text:p>E153</text:p>
          </table:table-cell>
          <table:table-cell table:style-name="ce13" table:formula="of:=IF(AND([.$D184]&lt;&gt;&quot;&quot;;[.$D184]&lt;&gt;&quot;○&quot;);MAX([.$C$3:.$C183])+1;[.$C183])" office:value-type="float" office:value="9" calcext:value-type="float">
            <text:p>9</text:p>
          </table:table-cell>
          <table:table-cell table:style-name="ce19"/>
          <table:table-cell table:style-name="ce27" table:formula="of:=IF(AND([.$F184]&lt;&gt;&quot;&quot;;[.$D183]&lt;&gt;&quot;&quot;);1;IF([.$F184]&lt;&gt;&quot;&quot;;MAX(INDIRECT([.$B184]):[.$E183])+1;&quot;&quot;))">
            <text:p/>
          </table:table-cell>
          <table:table-cell table:style-name="ce32"/>
          <table:table-cell table:style-name="ce32" table:formula="of:=IF([.$H184]=&quot;&quot;;&quot;&quot;;IF([.$G183]=&quot;&quot;;1;[.$G183]+1))" office:value-type="float" office:value="2" calcext:value-type="float">
            <text:p>2</text:p>
          </table:table-cell>
          <table:table-cell table:style-name="ce32" office:value-type="string" calcext:value-type="string">
            <text:p>会員エンティティ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84]&lt;&gt;&quot;&quot;;NETWORKDAYS([.$L184];[.$M184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84]=&quot;&quot;;[.$L184]&lt;&gt;&quot;&quot;;[.$L184]&lt;=[.$U$1]);AND([.$M184]&lt;&gt;&quot;&quot;;[.Q184]&lt;100;[.$M184]&lt;=[.$U$1]));&quot;遅延&quot;;&quot;&quot;)">
            <text:p/>
          </table:table-cell>
          <table:table-cell table:style-name="ce66"/>
          <table:table-cell table:style-name="ce66" table:formula="of:=SUM([.$V184:.$FM18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5]&lt;&gt;&quot;&quot;;[.$F185]=&quot;&quot;);&quot;E&quot;&amp;ROW();[.$B184])" office:value-type="string" office:string-value="E153" calcext:value-type="string">
            <text:p>E153</text:p>
          </table:table-cell>
          <table:table-cell table:style-name="ce13" table:formula="of:=IF(AND([.$D185]&lt;&gt;&quot;&quot;;[.$D185]&lt;&gt;&quot;○&quot;);MAX([.$C$3:.$C184])+1;[.$C184])" office:value-type="float" office:value="9" calcext:value-type="float">
            <text:p>9</text:p>
          </table:table-cell>
          <table:table-cell table:style-name="ce19"/>
          <table:table-cell table:style-name="ce27" table:formula="of:=IF(AND([.$F185]&lt;&gt;&quot;&quot;;[.$D184]&lt;&gt;&quot;&quot;);1;IF([.$F185]&lt;&gt;&quot;&quot;;MAX(INDIRECT([.$B185]):[.$E184])+1;&quot;&quot;))">
            <text:p/>
          </table:table-cell>
          <table:table-cell table:style-name="ce32"/>
          <table:table-cell table:style-name="ce32" table:formula="of:=IF([.$H185]=&quot;&quot;;&quot;&quot;;IF([.$G184]=&quot;&quot;;1;[.$G184]+1))" office:value-type="float" office:value="3" calcext:value-type="float">
            <text:p>3</text:p>
          </table:table-cell>
          <table:table-cell table:style-name="ce32" office:value-type="string" calcext:value-type="string">
            <text:p>リポジトリ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85]&lt;&gt;&quot;&quot;;NETWORKDAYS([.$L185];[.$M185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85]=&quot;&quot;;[.$L185]&lt;&gt;&quot;&quot;;[.$L185]&lt;=[.$U$1]);AND([.$M185]&lt;&gt;&quot;&quot;;[.Q185]&lt;100;[.$M185]&lt;=[.$U$1]));&quot;遅延&quot;;&quot;&quot;)">
            <text:p/>
          </table:table-cell>
          <table:table-cell table:style-name="ce66"/>
          <table:table-cell table:style-name="ce66" table:formula="of:=SUM([.$V185:.$FM18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6]&lt;&gt;&quot;&quot;;[.$F186]=&quot;&quot;);&quot;E&quot;&amp;ROW();[.$B185])" office:value-type="string" office:string-value="E153" calcext:value-type="string">
            <text:p>E153</text:p>
          </table:table-cell>
          <table:table-cell table:style-name="ce13" table:formula="of:=IF(AND([.$D186]&lt;&gt;&quot;&quot;;[.$D186]&lt;&gt;&quot;○&quot;);MAX([.$C$3:.$C185])+1;[.$C185])" office:value-type="float" office:value="9" calcext:value-type="float">
            <text:p>9</text:p>
          </table:table-cell>
          <table:table-cell table:style-name="ce19"/>
          <table:table-cell table:style-name="ce27" table:formula="of:=IF(AND([.$F186]&lt;&gt;&quot;&quot;;[.$D185]&lt;&gt;&quot;&quot;);1;IF([.$F186]&lt;&gt;&quot;&quot;;MAX(INDIRECT([.$B186]):[.$E185])+1;&quot;&quot;))">
            <text:p/>
          </table:table-cell>
          <table:table-cell table:style-name="ce32"/>
          <table:table-cell table:style-name="ce32" table:formula="of:=IF([.$H186]=&quot;&quot;;&quot;&quot;;IF([.$G185]=&quot;&quot;;1;[.$G185]+1))" office:value-type="float" office:value="4" calcext:value-type="float">
            <text:p>4</text:p>
          </table:table-cell>
          <table:table-cell table:style-name="ce32" office:value-type="string" calcext:value-type="string">
            <text:p>会員退会入力画面用　コントローラ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86]&lt;&gt;&quot;&quot;;NETWORKDAYS([.$L186];[.$M186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86]=&quot;&quot;;[.$L186]&lt;&gt;&quot;&quot;;[.$L186]&lt;=[.$U$1]);AND([.$M186]&lt;&gt;&quot;&quot;;[.Q186]&lt;100;[.$M186]&lt;=[.$U$1]));&quot;遅延&quot;;&quot;&quot;)">
            <text:p/>
          </table:table-cell>
          <table:table-cell table:style-name="ce66"/>
          <table:table-cell table:style-name="ce66" table:formula="of:=SUM([.$V186:.$FM18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7]&lt;&gt;&quot;&quot;;[.$F187]=&quot;&quot;);&quot;E&quot;&amp;ROW();[.$B186])" office:value-type="string" office:string-value="E153" calcext:value-type="string">
            <text:p>E153</text:p>
          </table:table-cell>
          <table:table-cell table:style-name="ce13" table:formula="of:=IF(AND([.$D187]&lt;&gt;&quot;&quot;;[.$D187]&lt;&gt;&quot;○&quot;);MAX([.$C$3:.$C186])+1;[.$C186])" office:value-type="float" office:value="9" calcext:value-type="float">
            <text:p>9</text:p>
          </table:table-cell>
          <table:table-cell table:style-name="ce19"/>
          <table:table-cell table:style-name="ce27" table:formula="of:=IF(AND([.$F187]&lt;&gt;&quot;&quot;;[.$D186]&lt;&gt;&quot;&quot;);1;IF([.$F187]&lt;&gt;&quot;&quot;;MAX(INDIRECT([.$B187]):[.$E186])+1;&quot;&quot;))">
            <text:p/>
          </table:table-cell>
          <table:table-cell table:style-name="ce32"/>
          <table:table-cell table:style-name="ce32" table:formula="of:=IF([.$H187]=&quot;&quot;;&quot;&quot;;IF([.$G186]=&quot;&quot;;1;[.$G186]+1))" office:value-type="float" office:value="5" calcext:value-type="float">
            <text:p>5</text:p>
          </table:table-cell>
          <table:table-cell table:style-name="ce32" office:value-type="string" calcext:value-type="string">
            <text:p>会員退会入力画面テンプレートファイルの作成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87]&lt;&gt;&quot;&quot;;NETWORKDAYS([.$L187];[.$M187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87]=&quot;&quot;;[.$L187]&lt;&gt;&quot;&quot;;[.$L187]&lt;=[.$U$1]);AND([.$M187]&lt;&gt;&quot;&quot;;[.Q187]&lt;100;[.$M187]&lt;=[.$U$1]));&quot;遅延&quot;;&quot;&quot;)">
            <text:p/>
          </table:table-cell>
          <table:table-cell table:style-name="ce66"/>
          <table:table-cell table:style-name="ce66" table:formula="of:=SUM([.$V187:.$FM18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8]&lt;&gt;&quot;&quot;;[.$F188]=&quot;&quot;);&quot;E&quot;&amp;ROW();[.$B187])" office:value-type="string" office:string-value="E153" calcext:value-type="string">
            <text:p>E153</text:p>
          </table:table-cell>
          <table:table-cell table:style-name="ce13" table:formula="of:=IF(AND([.$D188]&lt;&gt;&quot;&quot;;[.$D188]&lt;&gt;&quot;○&quot;);MAX([.$C$3:.$C187])+1;[.$C187])" office:value-type="float" office:value="9" calcext:value-type="float">
            <text:p>9</text:p>
          </table:table-cell>
          <table:table-cell table:style-name="ce19"/>
          <table:table-cell table:style-name="ce27" table:formula="of:=IF(AND([.$F188]&lt;&gt;&quot;&quot;;[.$D187]&lt;&gt;&quot;&quot;);1;IF([.$F188]&lt;&gt;&quot;&quot;;MAX(INDIRECT([.$B188]):[.$E187])+1;&quot;&quot;))">
            <text:p/>
          </table:table-cell>
          <table:table-cell table:style-name="ce32"/>
          <table:table-cell table:style-name="ce32" table:formula="of:=IF([.$H188]=&quot;&quot;;&quot;&quot;;IF([.$G187]=&quot;&quot;;1;[.$G187]+1))" office:value-type="float" office:value="6" calcext:value-type="float">
            <text:p>6</text:p>
          </table:table-cell>
          <table:table-cell table:style-name="ce32" office:value-type="string" calcext:value-type="string">
            <text:p>会員退会入力画面の動作確認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88]&lt;&gt;&quot;&quot;;NETWORKDAYS([.$L188];[.$M188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88]=&quot;&quot;;[.$L188]&lt;&gt;&quot;&quot;;[.$L188]&lt;=[.$U$1]);AND([.$M188]&lt;&gt;&quot;&quot;;[.Q188]&lt;100;[.$M188]&lt;=[.$U$1]));&quot;遅延&quot;;&quot;&quot;)">
            <text:p/>
          </table:table-cell>
          <table:table-cell table:style-name="ce66"/>
          <table:table-cell table:style-name="ce66" table:formula="of:=SUM([.$V188:.$FM18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9]&lt;&gt;&quot;&quot;;[.$F189]=&quot;&quot;);&quot;E&quot;&amp;ROW();[.$B188])" office:value-type="string" office:string-value="E153" calcext:value-type="string">
            <text:p>E153</text:p>
          </table:table-cell>
          <table:table-cell table:style-name="ce13" table:formula="of:=IF(AND([.$D189]&lt;&gt;&quot;&quot;;[.$D189]&lt;&gt;&quot;○&quot;);MAX([.$C$3:.$C188])+1;[.$C188])" office:value-type="float" office:value="9" calcext:value-type="float">
            <text:p>9</text:p>
          </table:table-cell>
          <table:table-cell table:style-name="ce19"/>
          <table:table-cell table:style-name="ce27" table:formula="of:=IF(AND([.$F189]&lt;&gt;&quot;&quot;;[.$D188]&lt;&gt;&quot;&quot;);1;IF([.$F189]&lt;&gt;&quot;&quot;;MAX(INDIRECT([.$B189]):[.$E188])+1;&quot;&quot;))">
            <text:p/>
          </table:table-cell>
          <table:table-cell table:style-name="ce32"/>
          <table:table-cell table:style-name="ce32" table:formula="of:=IF([.$H189]=&quot;&quot;;&quot;&quot;;IF([.$G188]=&quot;&quot;;1;[.$G188]+1))" office:value-type="float" office:value="7" calcext:value-type="float">
            <text:p>7</text:p>
          </table:table-cell>
          <table:table-cell table:style-name="ce32" office:value-type="string" calcext:value-type="string">
            <text:p><text:span text:style-name="T10">会員退会</text:span>確認画面用　コントローラ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89]&lt;&gt;&quot;&quot;;NETWORKDAYS([.$L189];[.$M189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89]=&quot;&quot;;[.$L189]&lt;&gt;&quot;&quot;;[.$L189]&lt;=[.$U$1]);AND([.$M189]&lt;&gt;&quot;&quot;;[.Q189]&lt;100;[.$M189]&lt;=[.$U$1]));&quot;遅延&quot;;&quot;&quot;)">
            <text:p/>
          </table:table-cell>
          <table:table-cell table:style-name="ce66"/>
          <table:table-cell table:style-name="ce66" table:formula="of:=SUM([.$V189:.$FM18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0]&lt;&gt;&quot;&quot;;[.$F190]=&quot;&quot;);&quot;E&quot;&amp;ROW();[.$B112])" office:value-type="string" office:string-value="E91" calcext:value-type="string">
            <text:p>E91</text:p>
          </table:table-cell>
          <table:table-cell table:style-name="ce13" table:formula="of:=IF(AND([.$D190]&lt;&gt;&quot;&quot;;[.$D190]&lt;&gt;&quot;○&quot;);MAX([.$C$3:.$C189])+1;[.$C189])" office:value-type="float" office:value="9" calcext:value-type="float">
            <text:p>9</text:p>
          </table:table-cell>
          <table:table-cell table:style-name="ce19"/>
          <table:table-cell table:style-name="ce27" table:formula="of:=IF(AND([.$F190]&lt;&gt;&quot;&quot;;[.$D189]&lt;&gt;&quot;&quot;);1;IF([.$F190]&lt;&gt;&quot;&quot;;MAX(INDIRECT([.$B190]):[.$E189])+1;&quot;&quot;))">
            <text:p/>
          </table:table-cell>
          <table:table-cell table:style-name="ce32"/>
          <table:table-cell table:style-name="ce32" table:formula="of:=IF([.$H190]=&quot;&quot;;&quot;&quot;;IF([.$G189]=&quot;&quot;;1;[.$G189]+1))" office:value-type="float" office:value="8" calcext:value-type="float">
            <text:p>8</text:p>
          </table:table-cell>
          <table:table-cell table:style-name="ce32" office:value-type="string" calcext:value-type="string">
            <text:p><text:span text:style-name="T10">会員退会</text:span>確認画面テンプレートファイルの作成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90]&lt;&gt;&quot;&quot;;NETWORKDAYS([.$L190];[.$M190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90]=&quot;&quot;;[.$L190]&lt;&gt;&quot;&quot;;[.$L190]&lt;=[.$U$1]);AND([.$M190]&lt;&gt;&quot;&quot;;[.Q190]&lt;100;[.$M190]&lt;=[.$U$1]));&quot;遅延&quot;;&quot;&quot;)">
            <text:p/>
          </table:table-cell>
          <table:table-cell table:style-name="ce66"/>
          <table:table-cell table:style-name="ce66" table:formula="of:=SUM([.$V190:.$FM19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1]&lt;&gt;&quot;&quot;;[.$F191]=&quot;&quot;);&quot;E&quot;&amp;ROW();[.$B113])" office:value-type="string" office:string-value="E91" calcext:value-type="string">
            <text:p>E91</text:p>
          </table:table-cell>
          <table:table-cell table:style-name="ce13" table:formula="of:=IF(AND([.$D191]&lt;&gt;&quot;&quot;;[.$D191]&lt;&gt;&quot;○&quot;);MAX([.$C$3:.$C190])+1;[.$C190])" office:value-type="float" office:value="9" calcext:value-type="float">
            <text:p>9</text:p>
          </table:table-cell>
          <table:table-cell table:style-name="ce19"/>
          <table:table-cell table:style-name="ce27" table:formula="of:=IF(AND([.$F191]&lt;&gt;&quot;&quot;;[.$D190]&lt;&gt;&quot;&quot;);1;IF([.$F191]&lt;&gt;&quot;&quot;;MAX(INDIRECT([.$B191]):[.$E190])+1;&quot;&quot;))">
            <text:p/>
          </table:table-cell>
          <table:table-cell table:style-name="ce32"/>
          <table:table-cell table:style-name="ce32" table:formula="of:=IF([.$H191]=&quot;&quot;;&quot;&quot;;IF([.$G190]=&quot;&quot;;1;[.$G190]+1))" office:value-type="float" office:value="9" calcext:value-type="float">
            <text:p>9</text:p>
          </table:table-cell>
          <table:table-cell table:style-name="ce32" office:value-type="string" calcext:value-type="string">
            <text:p><text:span text:style-name="T10">会員退会</text:span>確認画面の動作確認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91]&lt;&gt;&quot;&quot;;NETWORKDAYS([.$L191];[.$M191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91]=&quot;&quot;;[.$L191]&lt;&gt;&quot;&quot;;[.$L191]&lt;=[.$U$1]);AND([.$M191]&lt;&gt;&quot;&quot;;[.Q191]&lt;100;[.$M191]&lt;=[.$U$1]));&quot;遅延&quot;;&quot;&quot;)">
            <text:p/>
          </table:table-cell>
          <table:table-cell table:style-name="ce66"/>
          <table:table-cell table:style-name="ce66" table:formula="of:=SUM([.$V191:.$FM19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2]&lt;&gt;&quot;&quot;;[.$F192]=&quot;&quot;);&quot;E&quot;&amp;ROW();[.$B114])" office:value-type="string" office:string-value="E91" calcext:value-type="string">
            <text:p>E91</text:p>
          </table:table-cell>
          <table:table-cell table:style-name="ce13" table:formula="of:=IF(AND([.$D192]&lt;&gt;&quot;&quot;;[.$D192]&lt;&gt;&quot;○&quot;);MAX([.$C$3:.$C191])+1;[.$C191])" office:value-type="float" office:value="9" calcext:value-type="float">
            <text:p>9</text:p>
          </table:table-cell>
          <table:table-cell table:style-name="ce19"/>
          <table:table-cell table:style-name="ce27" table:formula="of:=IF(AND([.$F192]&lt;&gt;&quot;&quot;;[.$D191]&lt;&gt;&quot;&quot;);1;IF([.$F192]&lt;&gt;&quot;&quot;;MAX(INDIRECT([.$B192]):[.$E191])+1;&quot;&quot;))">
            <text:p/>
          </table:table-cell>
          <table:table-cell table:style-name="ce32"/>
          <table:table-cell table:style-name="ce32" table:formula="of:=IF([.$H192]=&quot;&quot;;&quot;&quot;;IF([.$G191]=&quot;&quot;;1;[.$G191]+1))" office:value-type="float" office:value="10" calcext:value-type="float">
            <text:p>10</text:p>
          </table:table-cell>
          <table:table-cell table:style-name="ce32" office:value-type="string" calcext:value-type="string">
            <text:p><text:span text:style-name="T10">会員退会</text:span>完了画面用　コントローラ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92]&lt;&gt;&quot;&quot;;NETWORKDAYS([.$L192];[.$M192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92]=&quot;&quot;;[.$L192]&lt;&gt;&quot;&quot;;[.$L192]&lt;=[.$U$1]);AND([.$M192]&lt;&gt;&quot;&quot;;[.Q192]&lt;100;[.$M192]&lt;=[.$U$1]));&quot;遅延&quot;;&quot;&quot;)">
            <text:p/>
          </table:table-cell>
          <table:table-cell table:style-name="ce66"/>
          <table:table-cell table:style-name="ce66" table:formula="of:=SUM([.$V192:.$FM19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3]&lt;&gt;&quot;&quot;;[.$F193]=&quot;&quot;);&quot;E&quot;&amp;ROW();[.$B115])" office:value-type="string" office:string-value="E115" calcext:value-type="string">
            <text:p>E115</text:p>
          </table:table-cell>
          <table:table-cell table:style-name="ce13" table:formula="of:=IF(AND([.$D193]&lt;&gt;&quot;&quot;;[.$D193]&lt;&gt;&quot;○&quot;);MAX([.$C$3:.$C192])+1;[.$C192])" office:value-type="float" office:value="9" calcext:value-type="float">
            <text:p>9</text:p>
          </table:table-cell>
          <table:table-cell table:style-name="ce19"/>
          <table:table-cell table:style-name="ce27" table:formula="of:=IF(AND([.$F193]&lt;&gt;&quot;&quot;;[.$D192]&lt;&gt;&quot;&quot;);1;IF([.$F193]&lt;&gt;&quot;&quot;;MAX(INDIRECT([.$B193]):[.$E192])+1;&quot;&quot;))">
            <text:p/>
          </table:table-cell>
          <table:table-cell table:style-name="ce32"/>
          <table:table-cell table:style-name="ce32" table:formula="of:=IF([.$H193]=&quot;&quot;;&quot;&quot;;IF([.$G192]=&quot;&quot;;1;[.$G192]+1))" office:value-type="float" office:value="11" calcext:value-type="float">
            <text:p>11</text:p>
          </table:table-cell>
          <table:table-cell table:style-name="ce32" office:value-type="string" calcext:value-type="string">
            <text:p><text:span text:style-name="T10">会員退会</text:span>完了画面テンプレートファイルの作成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93]&lt;&gt;&quot;&quot;;NETWORKDAYS([.$L193];[.$M193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93]=&quot;&quot;;[.$L193]&lt;&gt;&quot;&quot;;[.$L193]&lt;=[.$U$1]);AND([.$M193]&lt;&gt;&quot;&quot;;[.Q193]&lt;100;[.$M193]&lt;=[.$U$1]));&quot;遅延&quot;;&quot;&quot;)">
            <text:p/>
          </table:table-cell>
          <table:table-cell table:style-name="ce66"/>
          <table:table-cell table:style-name="ce66" table:formula="of:=SUM([.$V193:.$FM19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4]&lt;&gt;&quot;&quot;;[.$F194]=&quot;&quot;);&quot;E&quot;&amp;ROW();[.$B117])" office:value-type="string" office:string-value="E115" calcext:value-type="string">
            <text:p>E115</text:p>
          </table:table-cell>
          <table:table-cell table:style-name="ce13" table:formula="of:=IF(AND([.$D194]&lt;&gt;&quot;&quot;;[.$D194]&lt;&gt;&quot;○&quot;);MAX([.$C$3:.$C193])+1;[.$C193])" office:value-type="float" office:value="9" calcext:value-type="float">
            <text:p>9</text:p>
          </table:table-cell>
          <table:table-cell table:style-name="ce19"/>
          <table:table-cell table:style-name="ce27" table:formula="of:=IF(AND([.$F194]&lt;&gt;&quot;&quot;;[.$D193]&lt;&gt;&quot;&quot;);1;IF([.$F194]&lt;&gt;&quot;&quot;;MAX(INDIRECT([.$B194]):[.$E193])+1;&quot;&quot;))">
            <text:p/>
          </table:table-cell>
          <table:table-cell table:style-name="ce32"/>
          <table:table-cell table:style-name="ce32" table:formula="of:=IF([.$H194]=&quot;&quot;;&quot;&quot;;IF([.$G193]=&quot;&quot;;1;[.$G193]+1))" office:value-type="float" office:value="12" calcext:value-type="float">
            <text:p>12</text:p>
          </table:table-cell>
          <table:table-cell table:style-name="ce32" office:value-type="string" calcext:value-type="string">
            <text:p><text:span text:style-name="T10">会員退会</text:span>完了画面の動作確認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94]&lt;&gt;&quot;&quot;;NETWORKDAYS([.$L194];[.$M194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94]=&quot;&quot;;[.$L194]&lt;&gt;&quot;&quot;;[.$L194]&lt;=[.$U$1]);AND([.$M194]&lt;&gt;&quot;&quot;;[.Q194]&lt;100;[.$M194]&lt;=[.$U$1]));&quot;遅延&quot;;&quot;&quot;)">
            <text:p/>
          </table:table-cell>
          <table:table-cell table:style-name="ce66"/>
          <table:table-cell table:style-name="ce66" table:formula="of:=SUM([.$V194:.$FM19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5]&lt;&gt;&quot;&quot;;[.$F195]=&quot;&quot;);&quot;E&quot;&amp;ROW();[.$B118])" office:value-type="string" office:string-value="E115" calcext:value-type="string">
            <text:p>E115</text:p>
          </table:table-cell>
          <table:table-cell table:style-name="ce13" table:formula="of:=IF(AND([.$D195]&lt;&gt;&quot;&quot;;[.$D195]&lt;&gt;&quot;○&quot;);MAX([.$C$3:.$C194])+1;[.$C194])" office:value-type="float" office:value="9" calcext:value-type="float">
            <text:p>9</text:p>
          </table:table-cell>
          <table:table-cell table:style-name="ce19"/>
          <table:table-cell table:style-name="ce27" table:formula="of:=IF(AND([.$F195]&lt;&gt;&quot;&quot;;[.$D194]&lt;&gt;&quot;&quot;);1;IF([.$F195]&lt;&gt;&quot;&quot;;MAX(INDIRECT([.$B195]):[.$E194])+1;&quot;&quot;))">
            <text:p/>
          </table:table-cell>
          <table:table-cell table:style-name="ce32"/>
          <table:table-cell table:style-name="ce32" table:formula="of:=IF([.$H195]=&quot;&quot;;&quot;&quot;;IF([.$G194]=&quot;&quot;;1;[.$G19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95]&lt;&gt;&quot;&quot;;NETWORKDAYS([.$L195];[.$M195];[$休日.$B$4:.$B$304]);&quot;&quot;)">
            <text:p/>
          </table:table-cell>
          <table:table-cell table:style-name="ce216"/>
          <table:table-cell table:style-name="ce63" table:formula="of:=IF(OR(AND([.$N195]=&quot;&quot;;[.$L195]&lt;&gt;&quot;&quot;;[.$L195]&lt;=[.$U$1]);AND([.$M195]&lt;&gt;&quot;&quot;;[.Q195]&lt;100;[.$M195]&lt;=[.$U$1]));&quot;遅延&quot;;&quot;&quot;)">
            <text:p/>
          </table:table-cell>
          <table:table-cell table:style-name="ce66"/>
          <table:table-cell table:style-name="ce66" table:formula="of:=SUM([.$V195:.$FM19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6]&lt;&gt;&quot;&quot;;[.$F196]=&quot;&quot;);&quot;E&quot;&amp;ROW();[.$B119])" office:value-type="string" office:string-value="E196" calcext:value-type="string">
            <text:p>E196</text:p>
          </table:table-cell>
          <table:table-cell table:style-name="ce13" table:formula="of:=IF(AND([.$D196]&lt;&gt;&quot;&quot;;[.$D196]&lt;&gt;&quot;○&quot;);MAX([.$C$3:.$C195])+1;[.$C195])" office:value-type="float" office:value="10" calcext:value-type="float">
            <text:p>10</text:p>
          </table:table-cell>
          <table:table-cell table:style-name="ce19" office:value-type="string" calcext:value-type="string">
            <text:p>オリジナル機能</text:p>
          </table:table-cell>
          <table:table-cell table:style-name="ce27" table:formula="of:=IF(AND([.$F196]&lt;&gt;&quot;&quot;;[.$D195]&lt;&gt;&quot;&quot;);1;IF([.$F196]&lt;&gt;&quot;&quot;;MAX(INDIRECT([.$B196]):[.$E195])+1;&quot;&quot;))">
            <text:p/>
          </table:table-cell>
          <table:table-cell table:style-name="ce32"/>
          <table:table-cell table:style-name="ce32" table:formula="of:=IF([.$H196]=&quot;&quot;;&quot;&quot;;IF([.$G195]=&quot;&quot;;1;[.$G19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96]&lt;&gt;&quot;&quot;;NETWORKDAYS([.$L196];[.$M196];[$休日.$B$4:.$B$304]);&quot;&quot;)">
            <text:p/>
          </table:table-cell>
          <table:table-cell table:style-name="ce216"/>
          <table:table-cell table:style-name="ce63" table:formula="of:=IF(OR(AND([.$N196]=&quot;&quot;;[.$L196]&lt;&gt;&quot;&quot;;[.$L196]&lt;=[.$U$1]);AND([.$M196]&lt;&gt;&quot;&quot;;[.Q196]&lt;100;[.$M196]&lt;=[.$U$1]));&quot;遅延&quot;;&quot;&quot;)">
            <text:p/>
          </table:table-cell>
          <table:table-cell table:style-name="ce66"/>
          <table:table-cell table:style-name="ce66" table:formula="of:=SUM([.$V196:.$FM19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6">
          <table:table-cell/>
          <table:table-cell table:style-name="ce7" table:formula="of:=IF(AND([.$D197]&lt;&gt;&quot;&quot;;[.$F197]=&quot;&quot;);&quot;E&quot;&amp;ROW();[.$B120])" office:value-type="string" office:string-value="E115" calcext:value-type="string">
            <text:p>E115</text:p>
          </table:table-cell>
          <table:table-cell table:style-name="ce13" table:formula="of:=IF(AND([.$D197]&lt;&gt;&quot;&quot;;[.$D197]&lt;&gt;&quot;○&quot;);MAX([.$C$3:.$C196])+1;[.$C196])" office:value-type="float" office:value="10" calcext:value-type="float">
            <text:p>10</text:p>
          </table:table-cell>
          <table:table-cell table:style-name="ce19"/>
          <table:table-cell table:style-name="ce27" table:formula="of:=IF(AND([.$F197]&lt;&gt;&quot;&quot;;[.$D196]&lt;&gt;&quot;&quot;);1;IF([.$F197]&lt;&gt;&quot;&quot;;MAX(INDIRECT([.$B197]):[.$E196])+1;&quot;&quot;))" office:value-type="float" office:value="1" calcext:value-type="float">
            <text:p>1</text:p>
          </table:table-cell>
          <table:table-cell table:style-name="ce33" office:value-type="string" calcext:value-type="string">
            <text:p>クーポン機能・タイムセール機能</text:p>
          </table:table-cell>
          <table:table-cell table:style-name="ce33" table:formula="of:=IF([.$H197]=&quot;&quot;;&quot;&quot;;IF([.$G196]=&quot;&quot;;1;[.$G196]+1))">
            <text:p/>
          </table:table-cell>
          <table:table-cell table:style-name="ce33"/>
          <table:table-cell table:style-name="ce32"/>
          <table:table-cell table:style-name="ce192" office:value-type="string" calcext:value-type="string">
            <text:p>伊藤、小林、上田、大湾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2" table:formula="of:=IF([.$L197]&lt;&gt;&quot;&quot;;NETWORKDAYS([.$L197];[.$M197];[$休日.$B$4:.$B$304]);&quot;&quot;)" office:value-type="float" office:value="5" calcext:value-type="float">
            <text:p>5</text:p>
          </table:table-cell>
          <table:table-cell table:style-name="ce280" office:value-type="float" office:value="100" calcext:value-type="float">
            <text:p>100</text:p>
          </table:table-cell>
          <table:table-cell table:style-name="ce63" table:formula="of:=IF(OR(AND([.$N197]=&quot;&quot;;[.$L197]&lt;&gt;&quot;&quot;;[.$L197]&lt;=[.$U$1]);AND([.$M197]&lt;&gt;&quot;&quot;;[.Q197]&lt;100;[.$M197]&lt;=[.$U$1]));&quot;遅延&quot;;&quot;&quot;)">
            <text:p/>
          </table:table-cell>
          <table:table-cell table:style-name="ce66"/>
          <table:table-cell table:style-name="ce66" table:formula="of:=SUM([.$V197:.$FM19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8]&lt;&gt;&quot;&quot;;[.$F198]=&quot;&quot;);&quot;E&quot;&amp;ROW();[.$B121])" office:value-type="string" office:string-value="E115" calcext:value-type="string">
            <text:p>E115</text:p>
          </table:table-cell>
          <table:table-cell table:style-name="ce13" table:formula="of:=IF(AND([.$D198]&lt;&gt;&quot;&quot;;[.$D198]&lt;&gt;&quot;○&quot;);MAX([.$C$3:.$C197])+1;[.$C197])" office:value-type="float" office:value="10" calcext:value-type="float">
            <text:p>10</text:p>
          </table:table-cell>
          <table:table-cell table:style-name="ce19"/>
          <table:table-cell table:style-name="ce27" table:formula="of:=IF(AND([.$F198]&lt;&gt;&quot;&quot;;[.$D197]&lt;&gt;&quot;&quot;);1;IF([.$F198]&lt;&gt;&quot;&quot;;MAX(INDIRECT([.$B198]):[.$E197])+1;&quot;&quot;))">
            <text:p/>
          </table:table-cell>
          <table:table-cell table:style-name="ce32"/>
          <table:table-cell table:style-name="ce32" table:formula="of:=IF([.$H198]=&quot;&quot;;&quot;&quot;;IF([.$G197]=&quot;&quot;;1;[.$G197]+1))" office:value-type="float" office:value="1" calcext:value-type="float">
            <text:p>1</text:p>
          </table:table-cell>
          <table:table-cell table:style-name="ce186" office:value-type="string" calcext:value-type="string">
            <text:p>支払方法選択画面 表示処理用　コントローラーの編集</text:p>
          </table:table-cell>
          <table:table-cell table:style-name="ce32"/>
          <table:table-cell table:style-name="ce192" office:value-type="string" calcext:value-type="string">
            <text:p>伊藤、上田、大湾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2" table:formula="of:=IF([.$L198]&lt;&gt;&quot;&quot;;NETWORKDAYS([.$L198];[.$M198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98]=&quot;&quot;;[.$L198]&lt;&gt;&quot;&quot;;[.$L198]&lt;=[.$U$1]);AND([.$M198]&lt;&gt;&quot;&quot;;[.Q198]&lt;100;[.$M198]&lt;=[.$U$1]));&quot;遅延&quot;;&quot;&quot;)">
            <text:p/>
          </table:table-cell>
          <table:table-cell table:style-name="ce66"/>
          <table:table-cell table:style-name="ce66" table:formula="of:=SUM([.$V198:.$FM19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9]&lt;&gt;&quot;&quot;;[.$F199]=&quot;&quot;);&quot;E&quot;&amp;ROW();[.$B122])" office:value-type="string" office:string-value="E115" calcext:value-type="string">
            <text:p>E115</text:p>
          </table:table-cell>
          <table:table-cell table:style-name="ce13" table:formula="of:=IF(AND([.$D199]&lt;&gt;&quot;&quot;;[.$D199]&lt;&gt;&quot;○&quot;);MAX([.$C$3:.$C198])+1;[.$C198])" office:value-type="float" office:value="10" calcext:value-type="float">
            <text:p>10</text:p>
          </table:table-cell>
          <table:table-cell table:style-name="ce19"/>
          <table:table-cell table:style-name="ce27" table:formula="of:=IF(AND([.$F199]&lt;&gt;&quot;&quot;;[.$D198]&lt;&gt;&quot;&quot;);1;IF([.$F199]&lt;&gt;&quot;&quot;;MAX(INDIRECT([.$B199]):[.$E198])+1;&quot;&quot;))">
            <text:p/>
          </table:table-cell>
          <table:table-cell table:style-name="ce32"/>
          <table:table-cell table:style-name="ce46" table:formula="of:=IF([.$H199]=&quot;&quot;;&quot;&quot;;IF([.$G198]=&quot;&quot;;1;[.$G198]+1))" office:value-type="float" office:value="2" calcext:value-type="float">
            <text:p>2</text:p>
          </table:table-cell>
          <table:table-cell table:style-name="ce187" office:value-type="string" calcext:value-type="string">
            <text:p><text:span text:style-name="T11">支払方法選択画面　テンプレート</text:span><text:span text:style-name="T12">ファイルの編集</text:span></text:p>
          </table:table-cell>
          <table:table-cell table:style-name="ce32"/>
          <table:table-cell table:style-name="ce192" office:value-type="string" calcext:value-type="string">
            <text:p>伊藤、上田、大湾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2" table:formula="of:=IF([.$L199]&lt;&gt;&quot;&quot;;NETWORKDAYS([.$L199];[.$M199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99]=&quot;&quot;;[.$L199]&lt;&gt;&quot;&quot;;[.$L199]&lt;=[.$U$1]);AND([.$M199]&lt;&gt;&quot;&quot;;[.Q199]&lt;100;[.$M199]&lt;=[.$U$1]));&quot;遅延&quot;;&quot;&quot;)">
            <text:p/>
          </table:table-cell>
          <table:table-cell table:style-name="ce66"/>
          <table:table-cell table:style-name="ce66" table:formula="of:=SUM([.$V199:.$FM19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0]&lt;&gt;&quot;&quot;;[.$F200]=&quot;&quot;);&quot;E&quot;&amp;ROW();[.$B123])" office:value-type="string" office:string-value="E115" calcext:value-type="string">
            <text:p>E115</text:p>
          </table:table-cell>
          <table:table-cell table:style-name="ce13" table:formula="of:=IF(AND([.$D200]&lt;&gt;&quot;&quot;;[.$D200]&lt;&gt;&quot;○&quot;);MAX([.$C$3:.$C199])+1;[.$C199])" office:value-type="float" office:value="10" calcext:value-type="float">
            <text:p>10</text:p>
          </table:table-cell>
          <table:table-cell table:style-name="ce19"/>
          <table:table-cell table:style-name="ce27" table:formula="of:=IF(AND([.$F200]&lt;&gt;&quot;&quot;;[.$D199]&lt;&gt;&quot;&quot;);1;IF([.$F200]&lt;&gt;&quot;&quot;;MAX(INDIRECT([.$B200]):[.$E199])+1;&quot;&quot;))">
            <text:p/>
          </table:table-cell>
          <table:table-cell table:style-name="ce32"/>
          <table:table-cell table:style-name="ce32" table:formula="of:=IF([.$H206]=&quot;&quot;;&quot;&quot;;IF([.$G199]=&quot;&quot;;1;[.$G199]+1))" office:value-type="float" office:value="3" calcext:value-type="float">
            <text:p>3</text:p>
          </table:table-cell>
          <table:table-cell table:style-name="ce188" office:value-type="string" calcext:value-type="string">
            <text:p><text:span text:style-name="T13">支払方法選択画面　動作確認</text:span></text:p>
          </table:table-cell>
          <table:table-cell table:style-name="ce32"/>
          <table:table-cell table:style-name="ce192" office:value-type="string" calcext:value-type="string">
            <text:p>伊藤、上田、大湾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2" table:formula="of:=IF([.$L200]&lt;&gt;&quot;&quot;;NETWORKDAYS([.$L200];[.$M200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00]=&quot;&quot;;[.$L200]&lt;&gt;&quot;&quot;;[.$L200]&lt;=[.$U$1]);AND([.$M200]&lt;&gt;&quot;&quot;;[.Q200]&lt;100;[.$M200]&lt;=[.$U$1]));&quot;遅延&quot;;&quot;&quot;)">
            <text:p/>
          </table:table-cell>
          <table:table-cell table:style-name="ce66"/>
          <table:table-cell table:style-name="ce66" table:formula="of:=SUM([.$V200:.$FM20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1]&lt;&gt;&quot;&quot;;[.$F201]=&quot;&quot;);&quot;E&quot;&amp;ROW();[.$B124])" office:value-type="string" office:string-value="E115" calcext:value-type="string">
            <text:p>E115</text:p>
          </table:table-cell>
          <table:table-cell table:style-name="ce13" table:formula="of:=IF(AND([.$D201]&lt;&gt;&quot;&quot;;[.$D201]&lt;&gt;&quot;○&quot;);MAX([.$C$3:.$C200])+1;[.$C200])" office:value-type="float" office:value="10" calcext:value-type="float">
            <text:p>10</text:p>
          </table:table-cell>
          <table:table-cell table:style-name="ce19"/>
          <table:table-cell table:style-name="ce27" table:formula="of:=IF(AND([.$F201]&lt;&gt;&quot;&quot;;[.$D200]&lt;&gt;&quot;&quot;);1;IF([.$F201]&lt;&gt;&quot;&quot;;MAX(INDIRECT([.$B201]):[.$E200])+1;&quot;&quot;))">
            <text:p/>
          </table:table-cell>
          <table:table-cell table:style-name="ce32"/>
          <table:table-cell table:style-name="ce32" table:formula="of:=IF([.$H207]=&quot;&quot;;&quot;&quot;;IF([.$G200]=&quot;&quot;;1;[.$G200]+1))" office:value-type="float" office:value="4" calcext:value-type="float">
            <text:p>4</text:p>
          </table:table-cell>
          <table:table-cell table:style-name="ce32" office:value-type="string" calcext:value-type="string">
            <text:p>会員詳細画面 表示処理用　コントローラーの編集</text:p>
          </table:table-cell>
          <table:table-cell table:style-name="ce32"/>
          <table:table-cell table:style-name="ce192" office:value-type="string" calcext:value-type="string">
            <text:p>小林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4" calcext:value-type="date">
            <text:p>2026/06/14</text:p>
          </table:table-cell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2" table:formula="of:=IF([.$L201]&lt;&gt;&quot;&quot;;NETWORKDAYS([.$L201];[.$M201];[$休日.$B$4:.$B$304]);&quot;&quot;)" office:value-type="float" office:value="3" calcext:value-type="float">
            <text:p>3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01]=&quot;&quot;;[.$L201]&lt;&gt;&quot;&quot;;[.$L201]&lt;=[.$U$1]);AND([.$M201]&lt;&gt;&quot;&quot;;[.Q201]&lt;100;[.$M201]&lt;=[.$U$1]));&quot;遅延&quot;;&quot;&quot;)">
            <text:p/>
          </table:table-cell>
          <table:table-cell table:style-name="ce66"/>
          <table:table-cell table:style-name="ce66" table:formula="of:=SUM([.$V201:.$FM20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2]&lt;&gt;&quot;&quot;;[.$F202]=&quot;&quot;);&quot;E&quot;&amp;ROW();[.$B125])" office:value-type="string" office:string-value="E125" calcext:value-type="string">
            <text:p>E125</text:p>
          </table:table-cell>
          <table:table-cell table:style-name="ce13" table:formula="of:=IF(AND([.$D202]&lt;&gt;&quot;&quot;;[.$D202]&lt;&gt;&quot;○&quot;);MAX([.$C$3:.$C201])+1;[.$C201])" office:value-type="float" office:value="10" calcext:value-type="float">
            <text:p>10</text:p>
          </table:table-cell>
          <table:table-cell table:style-name="ce19"/>
          <table:table-cell table:style-name="ce27" table:formula="of:=IF(AND([.$F202]&lt;&gt;&quot;&quot;;[.$D201]&lt;&gt;&quot;&quot;);1;IF([.$F202]&lt;&gt;&quot;&quot;;MAX(INDIRECT([.$B202]):[.$E201])+1;&quot;&quot;))">
            <text:p/>
          </table:table-cell>
          <table:table-cell table:style-name="ce32"/>
          <table:table-cell table:style-name="ce46" table:formula="of:=IF([.$H207]=&quot;&quot;;&quot;&quot;;IF([.$G201]=&quot;&quot;;1;[.$G201]+1))" office:value-type="float" office:value="5" calcext:value-type="float">
            <text:p>5</text:p>
          </table:table-cell>
          <table:table-cell table:style-name="ce189" office:value-type="string" calcext:value-type="string">
            <text:p>会員詳細画面 表示処理用　エンティティの編集</text:p>
          </table:table-cell>
          <table:table-cell table:style-name="ce32"/>
          <table:table-cell table:style-name="ce192" office:value-type="string" calcext:value-type="string">
            <text:p>小林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4" calcext:value-type="date">
            <text:p>2026/06/14</text:p>
          </table:table-cell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2" table:formula="of:=IF([.$L202]&lt;&gt;&quot;&quot;;NETWORKDAYS([.$L202];[.$M202];[$休日.$B$4:.$B$304]);&quot;&quot;)" office:value-type="float" office:value="3" calcext:value-type="float">
            <text:p>3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02]=&quot;&quot;;[.$L202]&lt;&gt;&quot;&quot;;[.$L202]&lt;=[.$U$1]);AND([.$M202]&lt;&gt;&quot;&quot;;[.Q202]&lt;100;[.$M202]&lt;=[.$U$1]));&quot;遅延&quot;;&quot;&quot;)">
            <text:p/>
          </table:table-cell>
          <table:table-cell table:style-name="ce66"/>
          <table:table-cell table:style-name="ce66" table:formula="of:=SUM([.$V202:.$FM20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3]&lt;&gt;&quot;&quot;;[.$F203]=&quot;&quot;);&quot;E&quot;&amp;ROW();[.$B126])" office:value-type="string" office:string-value="E125" calcext:value-type="string">
            <text:p>E125</text:p>
          </table:table-cell>
          <table:table-cell table:style-name="ce13" table:formula="of:=IF(AND([.$D203]&lt;&gt;&quot;&quot;;[.$D203]&lt;&gt;&quot;○&quot;);MAX([.$C$3:.$C202])+1;[.$C202])" office:value-type="float" office:value="10" calcext:value-type="float">
            <text:p>10</text:p>
          </table:table-cell>
          <table:table-cell table:style-name="ce19"/>
          <table:table-cell table:style-name="ce27" table:formula="of:=IF(AND([.$F203]&lt;&gt;&quot;&quot;;[.$D202]&lt;&gt;&quot;&quot;);1;IF([.$F203]&lt;&gt;&quot;&quot;;MAX(INDIRECT([.$B203]):[.$E202])+1;&quot;&quot;))">
            <text:p/>
          </table:table-cell>
          <table:table-cell table:style-name="ce32"/>
          <table:table-cell table:style-name="ce32" table:formula="of:=IF([.$H208]=&quot;&quot;;&quot;&quot;;IF([.$G202]=&quot;&quot;;1;[.$G202]+1))" office:value-type="float" office:value="6" calcext:value-type="float">
            <text:p>6</text:p>
          </table:table-cell>
          <table:table-cell table:style-name="ce189" office:value-type="string" calcext:value-type="string">
            <text:p>会員詳細画面 表示処理用　データベースの編集</text:p>
          </table:table-cell>
          <table:table-cell table:style-name="ce32"/>
          <table:table-cell table:style-name="ce192" office:value-type="string" calcext:value-type="string">
            <text:p>小林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4" calcext:value-type="date">
            <text:p>2026/06/14</text:p>
          </table:table-cell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2" table:formula="of:=IF([.$L203]&lt;&gt;&quot;&quot;;NETWORKDAYS([.$L203];[.$M203];[$休日.$B$4:.$B$304]);&quot;&quot;)" office:value-type="float" office:value="3" calcext:value-type="float">
            <text:p>3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03]=&quot;&quot;;[.$L203]&lt;&gt;&quot;&quot;;[.$L203]&lt;=[.$U$1]);AND([.$M203]&lt;&gt;&quot;&quot;;[.Q203]&lt;100;[.$M203]&lt;=[.$U$1]));&quot;遅延&quot;;&quot;&quot;)">
            <text:p/>
          </table:table-cell>
          <table:table-cell table:style-name="ce66"/>
          <table:table-cell table:style-name="ce66" table:formula="of:=SUM([.$V203:.$FM20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4]&lt;&gt;&quot;&quot;;[.$F204]=&quot;&quot;);&quot;E&quot;&amp;ROW();[.$B127])" office:value-type="string" office:string-value="E125" calcext:value-type="string">
            <text:p>E125</text:p>
          </table:table-cell>
          <table:table-cell table:style-name="ce13" table:formula="of:=IF(AND([.$D204]&lt;&gt;&quot;&quot;;[.$D204]&lt;&gt;&quot;○&quot;);MAX([.$C$3:.$C203])+1;[.$C203])" office:value-type="float" office:value="10" calcext:value-type="float">
            <text:p>10</text:p>
          </table:table-cell>
          <table:table-cell table:style-name="ce19"/>
          <table:table-cell table:style-name="ce27" table:formula="of:=IF(AND([.$F204]&lt;&gt;&quot;&quot;;[.$D203]&lt;&gt;&quot;&quot;);1;IF([.$F204]&lt;&gt;&quot;&quot;;MAX(INDIRECT([.$B204]):[.$E203])+1;&quot;&quot;))">
            <text:p/>
          </table:table-cell>
          <table:table-cell table:style-name="ce32"/>
          <table:table-cell table:style-name="ce32" table:formula="of:=IF([.$H209]=&quot;&quot;;&quot;&quot;;IF([.$G203]=&quot;&quot;;1;[.$G203]+1))" office:value-type="float" office:value="7" calcext:value-type="float">
            <text:p>7</text:p>
          </table:table-cell>
          <table:table-cell table:style-name="ce32" office:value-type="string" calcext:value-type="string">
            <text:p><text:span text:style-name="T10">会員詳細画面　</text:span><text:span text:style-name="T14">テンプレート</text:span><text:span text:style-name="T15">ファイルの編集</text:span></text:p>
          </table:table-cell>
          <table:table-cell table:style-name="ce32"/>
          <table:table-cell table:style-name="ce192" office:value-type="string" calcext:value-type="string">
            <text:p>小林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4" calcext:value-type="date">
            <text:p>2026/06/14</text:p>
          </table:table-cell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2" table:formula="of:=IF([.$L204]&lt;&gt;&quot;&quot;;NETWORKDAYS([.$L204];[.$M204];[$休日.$B$4:.$B$304]);&quot;&quot;)" office:value-type="float" office:value="3" calcext:value-type="float">
            <text:p>3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04]=&quot;&quot;;[.$L204]&lt;&gt;&quot;&quot;;[.$L204]&lt;=[.$U$1]);AND([.$M204]&lt;&gt;&quot;&quot;;[.Q204]&lt;100;[.$M204]&lt;=[.$U$1]));&quot;遅延&quot;;&quot;&quot;)">
            <text:p/>
          </table:table-cell>
          <table:table-cell table:style-name="ce66"/>
          <table:table-cell table:style-name="ce66" table:formula="of:=SUM([.$V204:.$FM20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5]&lt;&gt;&quot;&quot;;[.$F205]=&quot;&quot;);&quot;E&quot;&amp;ROW();[.$B128])" office:value-type="string" office:string-value="E125" calcext:value-type="string">
            <text:p>E125</text:p>
          </table:table-cell>
          <table:table-cell table:style-name="ce13" table:formula="of:=IF(AND([.$D205]&lt;&gt;&quot;&quot;;[.$D205]&lt;&gt;&quot;○&quot;);MAX([.$C$3:.$C204])+1;[.$C204])" office:value-type="float" office:value="10" calcext:value-type="float">
            <text:p>10</text:p>
          </table:table-cell>
          <table:table-cell table:style-name="ce19"/>
          <table:table-cell table:style-name="ce27" table:formula="of:=IF(AND([.$F205]&lt;&gt;&quot;&quot;;[.$D204]&lt;&gt;&quot;&quot;);1;IF([.$F205]&lt;&gt;&quot;&quot;;MAX(INDIRECT([.$B205]):[.$E204])+1;&quot;&quot;))">
            <text:p/>
          </table:table-cell>
          <table:table-cell table:style-name="ce32"/>
          <table:table-cell table:style-name="ce32" table:formula="of:=IF([.$H210]=&quot;&quot;;&quot;&quot;;IF([.$G204]=&quot;&quot;;1;[.$G204]+1))" office:value-type="float" office:value="8" calcext:value-type="float">
            <text:p>8</text:p>
          </table:table-cell>
          <table:table-cell table:style-name="ce32" office:value-type="string" calcext:value-type="string">
            <text:p>会員詳細画面　動作確認</text:p>
          </table:table-cell>
          <table:table-cell table:style-name="ce32"/>
          <table:table-cell table:style-name="ce192" office:value-type="string" calcext:value-type="string">
            <text:p>小林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4" calcext:value-type="date">
            <text:p>2026/06/14</text:p>
          </table:table-cell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2" table:formula="of:=IF([.$L205]&lt;&gt;&quot;&quot;;NETWORKDAYS([.$L205];[.$M205];[$休日.$B$4:.$B$304]);&quot;&quot;)" office:value-type="float" office:value="3" calcext:value-type="float">
            <text:p>3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05]=&quot;&quot;;[.$L205]&lt;&gt;&quot;&quot;;[.$L205]&lt;=[.$U$1]);AND([.$M205]&lt;&gt;&quot;&quot;;[.Q205]&lt;100;[.$M205]&lt;=[.$U$1]));&quot;遅延&quot;;&quot;&quot;)">
            <text:p/>
          </table:table-cell>
          <table:table-cell table:style-name="ce66"/>
          <table:table-cell table:style-name="ce66" table:formula="of:=SUM([.$V205:.$FM20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6]&lt;&gt;&quot;&quot;;[.$F206]=&quot;&quot;);&quot;E&quot;&amp;ROW();[.$B129])" office:value-type="string" office:string-value="E125" calcext:value-type="string">
            <text:p>E125</text:p>
          </table:table-cell>
          <table:table-cell table:style-name="ce13" table:formula="of:=IF(AND([.$D206]&lt;&gt;&quot;&quot;;[.$D206]&lt;&gt;&quot;○&quot;);MAX([.$C$3:.$C205])+1;[.$C205])" office:value-type="float" office:value="10" calcext:value-type="float">
            <text:p>10</text:p>
          </table:table-cell>
          <table:table-cell table:style-name="ce19"/>
          <table:table-cell table:style-name="ce27" table:formula="of:=IF(AND([.$F206]&lt;&gt;&quot;&quot;;[.$D205]&lt;&gt;&quot;&quot;);1;IF([.$F206]&lt;&gt;&quot;&quot;;MAX(INDIRECT([.$B206]):[.$E205])+1;&quot;&quot;))">
            <text:p/>
          </table:table-cell>
          <table:table-cell table:style-name="ce32"/>
          <table:table-cell table:style-name="ce32" table:formula="of:=IF([.$H211]=&quot;&quot;;&quot;&quot;;IF([.$G205]=&quot;&quot;;1;[.$G205]+1))" office:value-type="float" office:value="9" calcext:value-type="float">
            <text:p>9</text:p>
          </table:table-cell>
          <table:table-cell table:style-name="ce190" office:value-type="string" calcext:value-type="string">
            <text:p><text:span text:style-name="T16">注文確認画面 表示処理用</text:span><text:span text:style-name="T17">　コントローラーの編集</text:span></text:p>
          </table:table-cell>
          <table:table-cell table:style-name="ce32"/>
          <table:table-cell table:style-name="ce192" office:value-type="string" calcext:value-type="string">
            <text:p>伊藤、上田、大湾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3" calcext:value-type="date">
            <text:p>2026/06/13</text:p>
          </table:table-cell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2" table:formula="of:=IF([.$L206]&lt;&gt;&quot;&quot;;NETWORKDAYS([.$L206];[.$M206];[$休日.$B$4:.$B$304]);&quot;&quot;)" office:value-type="float" office:value="3" calcext:value-type="float">
            <text:p>3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06]=&quot;&quot;;[.$L206]&lt;&gt;&quot;&quot;;[.$L206]&lt;=[.$U$1]);AND([.$M206]&lt;&gt;&quot;&quot;;[.Q206]&lt;100;[.$M206]&lt;=[.$U$1]));&quot;遅延&quot;;&quot;&quot;)">
            <text:p/>
          </table:table-cell>
          <table:table-cell table:style-name="ce66"/>
          <table:table-cell table:style-name="ce66" table:formula="of:=SUM([.$V206:.$FM20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7]&lt;&gt;&quot;&quot;;[.$F207]=&quot;&quot;);&quot;E&quot;&amp;ROW();[.$B130])" office:value-type="string" office:string-value="E125" calcext:value-type="string">
            <text:p>E125</text:p>
          </table:table-cell>
          <table:table-cell table:style-name="ce13" table:formula="of:=IF(AND([.$D207]&lt;&gt;&quot;&quot;;[.$D207]&lt;&gt;&quot;○&quot;);MAX([.$C$3:.$C206])+1;[.$C206])" office:value-type="float" office:value="10" calcext:value-type="float">
            <text:p>10</text:p>
          </table:table-cell>
          <table:table-cell table:style-name="ce19"/>
          <table:table-cell table:style-name="ce27" table:formula="of:=IF(AND([.$F207]&lt;&gt;&quot;&quot;;[.$D206]&lt;&gt;&quot;&quot;);1;IF([.$F207]&lt;&gt;&quot;&quot;;MAX(INDIRECT([.$B207]):[.$E206])+1;&quot;&quot;))">
            <text:p/>
          </table:table-cell>
          <table:table-cell table:style-name="ce32"/>
          <table:table-cell table:style-name="ce32" table:formula="of:=IF([.$H201]=&quot;&quot;;&quot;&quot;;IF([.$G206]=&quot;&quot;;1;[.$G206]+1))" office:value-type="float" office:value="10" calcext:value-type="float">
            <text:p>10</text:p>
          </table:table-cell>
          <table:table-cell table:style-name="ce186" office:value-type="string" calcext:value-type="string">
            <text:p><text:span text:style-name="T18">注文確認画面</text:span><text:span text:style-name="T19">　</text:span><text:span text:style-name="T20">テンプレート</text:span><text:span text:style-name="T21">ファイルの編集</text:span></text:p>
          </table:table-cell>
          <table:table-cell table:style-name="ce32"/>
          <table:table-cell table:style-name="ce192" office:value-type="string" calcext:value-type="string">
            <text:p>伊藤、上田、大湾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3" calcext:value-type="date">
            <text:p>2026/06/13</text:p>
          </table:table-cell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2" table:formula="of:=IF([.$L201]&lt;&gt;&quot;&quot;;NETWORKDAYS([.$L201];[.$M201];[$休日.$B$4:.$B$304]);&quot;&quot;)" office:value-type="float" office:value="3" calcext:value-type="float">
            <text:p>3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07]=&quot;&quot;;[.$L201]&lt;&gt;&quot;&quot;;[.$L201]&lt;=[.$U$1]);AND([.$M201]&lt;&gt;&quot;&quot;;[.Q207]&lt;100;[.$M201]&lt;=[.$U$1]));&quot;遅延&quot;;&quot;&quot;)">
            <text:p/>
          </table:table-cell>
          <table:table-cell table:style-name="ce66"/>
          <table:table-cell table:style-name="ce66" table:formula="of:=SUM([.$V207:.$FM20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8]&lt;&gt;&quot;&quot;;[.$F208]=&quot;&quot;);&quot;E&quot;&amp;ROW();[.$B131])" office:value-type="string" office:string-value="E125" calcext:value-type="string">
            <text:p>E125</text:p>
          </table:table-cell>
          <table:table-cell table:style-name="ce13" table:formula="of:=IF(AND([.$D208]&lt;&gt;&quot;&quot;;[.$D208]&lt;&gt;&quot;○&quot;);MAX([.$C$3:.$C207])+1;[.$C207])" office:value-type="float" office:value="10" calcext:value-type="float">
            <text:p>10</text:p>
          </table:table-cell>
          <table:table-cell table:style-name="ce19"/>
          <table:table-cell table:style-name="ce27" table:formula="of:=IF(AND([.$F208]&lt;&gt;&quot;&quot;;[.$D207]&lt;&gt;&quot;&quot;);1;IF([.$F208]&lt;&gt;&quot;&quot;;MAX(INDIRECT([.$B208]):[.$E207])+1;&quot;&quot;))">
            <text:p/>
          </table:table-cell>
          <table:table-cell table:style-name="ce32"/>
          <table:table-cell table:style-name="ce32" table:formula="of:=IF([.$H204]=&quot;&quot;;&quot;&quot;;IF([.$G207]=&quot;&quot;;1;[.$G207]+1))" office:value-type="float" office:value="11" calcext:value-type="float">
            <text:p>11</text:p>
          </table:table-cell>
          <table:table-cell table:style-name="ce191" office:value-type="string" calcext:value-type="string">
            <text:p><text:span text:style-name="T22">注文確認画面　動作確認</text:span></text:p>
          </table:table-cell>
          <table:table-cell table:style-name="ce32"/>
          <table:table-cell table:style-name="ce192" office:value-type="string" calcext:value-type="string">
            <text:p>伊藤、上田、大湾</text:p>
          </table:table-cell>
          <table:table-cell table:style-name="ce32"/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2" table:formula="of:=IF([.$L202]&lt;&gt;&quot;&quot;;NETWORKDAYS([.$L202];[.$M202];[$休日.$B$4:.$B$304]);&quot;&quot;)" office:value-type="float" office:value="3" calcext:value-type="float">
            <text:p>3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08]=&quot;&quot;;[.$L202]&lt;&gt;&quot;&quot;;[.$L202]&lt;=[.$U$1]);AND([.$M202]&lt;&gt;&quot;&quot;;[.Q208]&lt;100;[.$M202]&lt;=[.$U$1]));&quot;遅延&quot;;&quot;&quot;)">
            <text:p/>
          </table:table-cell>
          <table:table-cell table:style-name="ce66"/>
          <table:table-cell table:style-name="ce66" table:formula="of:=SUM([.$V208:.$FM20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9]&lt;&gt;&quot;&quot;;[.$F209]=&quot;&quot;);&quot;E&quot;&amp;ROW();[.$B132])" office:value-type="string" office:string-value="E125" calcext:value-type="string">
            <text:p>E125</text:p>
          </table:table-cell>
          <table:table-cell table:style-name="ce13" table:formula="of:=IF(AND([.$D209]&lt;&gt;&quot;&quot;;[.$D209]&lt;&gt;&quot;○&quot;);MAX([.$C$3:.$C208])+1;[.$C208])" office:value-type="float" office:value="10" calcext:value-type="float">
            <text:p>10</text:p>
          </table:table-cell>
          <table:table-cell table:style-name="ce19"/>
          <table:table-cell table:style-name="ce27" table:formula="of:=IF(AND([.$F209]&lt;&gt;&quot;&quot;;[.$D208]&lt;&gt;&quot;&quot;);1;IF([.$F209]&lt;&gt;&quot;&quot;;MAX(INDIRECT([.$B209]):[.$E208])+1;&quot;&quot;))">
            <text:p/>
          </table:table-cell>
          <table:table-cell table:style-name="ce32"/>
          <table:table-cell table:style-name="ce32" table:formula="of:=IF([.$H205]=&quot;&quot;;&quot;&quot;;IF([.$G208]=&quot;&quot;;1;[.$G208]+1))" office:value-type="float" office:value="12" calcext:value-type="float">
            <text:p>12</text:p>
          </table:table-cell>
          <table:table-cell table:style-name="ce190" office:value-type="string" calcext:value-type="string">
            <text:p><text:span text:style-name="T23">ご注文の確定ボタン 押下時処理用　コントローラーの編集</text:span></text:p>
          </table:table-cell>
          <table:table-cell table:style-name="ce32"/>
          <table:table-cell table:style-name="ce192" office:value-type="string" calcext:value-type="string">
            <text:p>伊藤、上田、大湾</text:p>
          </table:table-cell>
          <table:table-cell table:style-name="ce32"/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2" table:formula="of:=IF([.$L203]&lt;&gt;&quot;&quot;;NETWORKDAYS([.$L203];[.$M203];[$休日.$B$4:.$B$304]);&quot;&quot;)" office:value-type="float" office:value="3" calcext:value-type="float">
            <text:p>3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09]=&quot;&quot;;[.$L203]&lt;&gt;&quot;&quot;;[.$L203]&lt;=[.$U$1]);AND([.$M203]&lt;&gt;&quot;&quot;;[.Q209]&lt;100;[.$M203]&lt;=[.$U$1]));&quot;遅延&quot;;&quot;&quot;)">
            <text:p/>
          </table:table-cell>
          <table:table-cell table:style-name="ce66"/>
          <table:table-cell table:style-name="ce66" table:formula="of:=SUM([.$V209:.$FM20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0]&lt;&gt;&quot;&quot;;[.$F210]=&quot;&quot;);&quot;E&quot;&amp;ROW();[.$B133])" office:value-type="string" office:string-value="E125" calcext:value-type="string">
            <text:p>E125</text:p>
          </table:table-cell>
          <table:table-cell table:style-name="ce13" table:formula="of:=IF(AND([.$D210]&lt;&gt;&quot;&quot;;[.$D210]&lt;&gt;&quot;○&quot;);MAX([.$C$3:.$C209])+1;[.$C209])" office:value-type="float" office:value="10" calcext:value-type="float">
            <text:p>10</text:p>
          </table:table-cell>
          <table:table-cell table:style-name="ce19"/>
          <table:table-cell table:style-name="ce27" table:formula="of:=IF(AND([.$F210]&lt;&gt;&quot;&quot;;[.$D209]&lt;&gt;&quot;&quot;);1;IF([.$F210]&lt;&gt;&quot;&quot;;MAX(INDIRECT([.$B210]):[.$E209])+1;&quot;&quot;))">
            <text:p/>
          </table:table-cell>
          <table:table-cell table:style-name="ce32"/>
          <table:table-cell table:style-name="ce32" table:formula="of:=IF([.$H213]=&quot;&quot;;&quot;&quot;;IF([.$G209]=&quot;&quot;;1;[.$G209]+1))" office:value-type="float" office:value="13" calcext:value-type="float">
            <text:p>13</text:p>
          </table:table-cell>
          <table:table-cell table:style-name="ce190" office:value-type="string" calcext:value-type="string">
            <text:p><text:span text:style-name="T23">注文完了画面 表示処理用　コントローラーの編集</text:span></text:p>
          </table:table-cell>
          <table:table-cell table:style-name="ce32"/>
          <table:table-cell table:style-name="ce192" office:value-type="string" calcext:value-type="string">
            <text:p>伊藤、上田、大湾</text:p>
          </table:table-cell>
          <table:table-cell table:style-name="ce32"/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2" table:formula="of:=IF([.$L210]&lt;&gt;&quot;&quot;;NETWORKDAYS([.$L210];[.$M210];[$休日.$B$4:.$B$304]);&quot;&quot;)" office:value-type="float" office:value="4" calcext:value-type="float">
            <text:p>4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10]=&quot;&quot;;[.$L210]&lt;&gt;&quot;&quot;;[.$L210]&lt;=[.$U$1]);AND([.$M210]&lt;&gt;&quot;&quot;;[.Q210]&lt;100;[.$M210]&lt;=[.$U$1]));&quot;遅延&quot;;&quot;&quot;)">
            <text:p/>
          </table:table-cell>
          <table:table-cell table:style-name="ce66"/>
          <table:table-cell table:style-name="ce66" table:formula="of:=SUM([.$V210:.$FM21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1]&lt;&gt;&quot;&quot;;[.$F211]=&quot;&quot;);&quot;E&quot;&amp;ROW();[.$B134])" office:value-type="string" office:string-value="E125" calcext:value-type="string">
            <text:p>E125</text:p>
          </table:table-cell>
          <table:table-cell table:style-name="ce13" table:formula="of:=IF(AND([.$D211]&lt;&gt;&quot;&quot;;[.$D211]&lt;&gt;&quot;○&quot;);MAX([.$C$3:.$C210])+1;[.$C210])" office:value-type="float" office:value="10" calcext:value-type="float">
            <text:p>10</text:p>
          </table:table-cell>
          <table:table-cell table:style-name="ce19"/>
          <table:table-cell table:style-name="ce27" table:formula="of:=IF(AND([.$F211]&lt;&gt;&quot;&quot;;[.$D210]&lt;&gt;&quot;&quot;);1;IF([.$F211]&lt;&gt;&quot;&quot;;MAX(INDIRECT([.$B211]):[.$E210])+1;&quot;&quot;))">
            <text:p/>
          </table:table-cell>
          <table:table-cell table:style-name="ce32"/>
          <table:table-cell table:style-name="ce32" table:formula="of:=IF([.$H212]=&quot;&quot;;&quot;&quot;;IF([.$G210]=&quot;&quot;;1;[.$G210]+1))" office:value-type="float" office:value="14" calcext:value-type="float">
            <text:p>14</text:p>
          </table:table-cell>
          <table:table-cell table:style-name="ce32" office:value-type="string" calcext:value-type="string">
            <text:p><text:span text:style-name="T24">注文完了画面　</text:span><text:span text:style-name="T27">テンプレート</text:span><text:span text:style-name="T28">ファイルの編集</text:span></text:p>
          </table:table-cell>
          <table:table-cell table:style-name="ce32"/>
          <table:table-cell table:style-name="ce192" office:value-type="string" calcext:value-type="string">
            <text:p>伊藤、上田、大湾</text:p>
          </table:table-cell>
          <table:table-cell table:style-name="ce32"/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2" table:formula="of:=IF([.$L211]&lt;&gt;&quot;&quot;;NETWORKDAYS([.$L211];[.$M211];[$休日.$B$4:.$B$304]);&quot;&quot;)" office:value-type="float" office:value="4" calcext:value-type="float">
            <text:p>4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11]=&quot;&quot;;[.$L211]&lt;&gt;&quot;&quot;;[.$L211]&lt;=[.$U$1]);AND([.$M211]&lt;&gt;&quot;&quot;;[.Q211]&lt;100;[.$M211]&lt;=[.$U$1]));&quot;遅延&quot;;&quot;&quot;)">
            <text:p/>
          </table:table-cell>
          <table:table-cell table:style-name="ce66"/>
          <table:table-cell table:style-name="ce66" table:formula="of:=SUM([.$V211:.$FM21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2]&lt;&gt;&quot;&quot;;[.$F212]=&quot;&quot;);&quot;E&quot;&amp;ROW();[.$B135])" office:value-type="string" office:string-value="E125" calcext:value-type="string">
            <text:p>E125</text:p>
          </table:table-cell>
          <table:table-cell table:style-name="ce13" table:formula="of:=IF(AND([.$D212]&lt;&gt;&quot;&quot;;[.$D212]&lt;&gt;&quot;○&quot;);MAX([.$C$3:.$C211])+1;[.$C211])" office:value-type="float" office:value="10" calcext:value-type="float">
            <text:p>10</text:p>
          </table:table-cell>
          <table:table-cell table:style-name="ce19"/>
          <table:table-cell table:style-name="ce27" table:formula="of:=IF(AND([.$F212]&lt;&gt;&quot;&quot;;[.$D211]&lt;&gt;&quot;&quot;);1;IF([.$F212]&lt;&gt;&quot;&quot;;MAX(INDIRECT([.$B212]):[.$E211])+1;&quot;&quot;))">
            <text:p/>
          </table:table-cell>
          <table:table-cell table:style-name="ce32"/>
          <table:table-cell table:style-name="ce32" table:formula="of:=IF([.$H212]=&quot;&quot;;&quot;&quot;;IF([.$G211]=&quot;&quot;;1;[.$G211]+1))" office:value-type="float" office:value="15" calcext:value-type="float">
            <text:p>15</text:p>
          </table:table-cell>
          <table:table-cell table:style-name="ce32" office:value-type="string" calcext:value-type="string">
            <text:p>ヘッダーテンプレート　HTMLの編集</text:p>
          </table:table-cell>
          <table:table-cell table:style-name="ce32"/>
          <table:table-cell table:style-name="ce192" office:value-type="string" calcext:value-type="string">
            <text:p>伊藤、上田、大湾</text:p>
          </table:table-cell>
          <table:table-cell table:style-name="ce32"/>
          <table:table-cell table:number-columns-repeated="2" table:style-name="ce38" office:value-type="date" office:date-value="2626-06-10" calcext:value-type="date">
            <text:p>2626/06/10</text:p>
          </table:table-cell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2" table:formula="of:=IF([.$L212]&lt;&gt;&quot;&quot;;NETWORKDAYS([.$L212];[.$M212];[$休日.$B$4:.$B$304]);&quot;&quot;)" office:value-type="float" office:value="0" calcext:value-type="float">
            <text:p>0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12]=&quot;&quot;;[.$L212]&lt;&gt;&quot;&quot;;[.$L212]&lt;=[.$U$1]);AND([.$M212]&lt;&gt;&quot;&quot;;[.Q212]&lt;100;[.$M212]&lt;=[.$U$1]));&quot;遅延&quot;;&quot;&quot;)">
            <text:p/>
          </table:table-cell>
          <table:table-cell table:style-name="ce66"/>
          <table:table-cell table:style-name="ce66" table:formula="of:=SUM([.$V212:.$FM21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3]&lt;&gt;&quot;&quot;;[.$F213]=&quot;&quot;);&quot;E&quot;&amp;ROW();[.$B136])" office:value-type="string" office:string-value="E125" calcext:value-type="string">
            <text:p>E125</text:p>
          </table:table-cell>
          <table:table-cell table:style-name="ce13" table:formula="of:=IF(AND([.$D213]&lt;&gt;&quot;&quot;;[.$D213]&lt;&gt;&quot;○&quot;);MAX([.$C$3:.$C212])+1;[.$C212])" office:value-type="float" office:value="10" calcext:value-type="float">
            <text:p>10</text:p>
          </table:table-cell>
          <table:table-cell table:style-name="ce19"/>
          <table:table-cell table:style-name="ce27" table:formula="of:=IF(AND([.$F213]&lt;&gt;&quot;&quot;;[.$D212]&lt;&gt;&quot;&quot;);1;IF([.$F213]&lt;&gt;&quot;&quot;;MAX(INDIRECT([.$B213]):[.$E212])+1;&quot;&quot;))">
            <text:p/>
          </table:table-cell>
          <table:table-cell table:style-name="ce32"/>
          <table:table-cell table:style-name="ce32" table:formula="of:=IF([.$H201]=&quot;&quot;;&quot;&quot;;IF([.$G212]=&quot;&quot;;1;[.$G212]+1))" office:value-type="float" office:value="16" calcext:value-type="float">
            <text:p>16</text:p>
          </table:table-cell>
          <table:table-cell table:style-name="ce32" office:value-type="string" calcext:value-type="string">
            <text:p>クーポン機能・タイムセール機能　動作確認</text:p>
          </table:table-cell>
          <table:table-cell table:style-name="ce32"/>
          <table:table-cell table:style-name="ce192" office:value-type="string" calcext:value-type="string">
            <text:p>伊藤、上田、大湾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2" table:formula="of:=IF([.$L213]&lt;&gt;&quot;&quot;;NETWORKDAYS([.$L213];[.$M213];[$休日.$B$4:.$B$304]);&quot;&quot;)" office:value-type="float" office:value="5" calcext:value-type="float">
            <text:p>5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13]=&quot;&quot;;[.$L213]&lt;&gt;&quot;&quot;;[.$L213]&lt;=[.$U$1]);AND([.$M213]&lt;&gt;&quot;&quot;;[.Q213]&lt;100;[.$M213]&lt;=[.$U$1]));&quot;遅延&quot;;&quot;&quot;)">
            <text:p/>
          </table:table-cell>
          <table:table-cell table:style-name="ce66"/>
          <table:table-cell table:style-name="ce66" table:formula="of:=SUM([.$V213:.$FM21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5]&lt;&gt;&quot;&quot;;[.$F215]=&quot;&quot;);&quot;E&quot;&amp;ROW();[.$B137])" office:value-type="string" office:string-value="E125" calcext:value-type="string">
            <text:p>E125</text:p>
          </table:table-cell>
          <table:table-cell table:style-name="ce13" table:formula="of:=IF(AND([.$D215]&lt;&gt;&quot;&quot;;[.$D215]&lt;&gt;&quot;○&quot;);MAX([.$C$3:.$C213])+1;[.$C213])" office:value-type="float" office:value="10" calcext:value-type="float">
            <text:p>10</text:p>
          </table:table-cell>
          <table:table-cell table:style-name="ce19"/>
          <table:table-cell table:style-name="ce27" office:value-type="float" office:value="2" calcext:value-type="float">
            <text:p>2</text:p>
          </table:table-cell>
          <table:table-cell table:style-name="Default" office:value-type="string" calcext:value-type="string">
            <text:p>CSSの編集</text:p>
          </table:table-cell>
          <table:table-cell table:style-name="ce32"/>
          <table:table-cell table:style-name="Default"/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3"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19" calcext:value-type="date">
            <text:p>2026/06/19</text:p>
          </table:table-cell>
          <table:table-cell table:style-name="ce32" table:formula="of:=IF([.$L215]&lt;&gt;&quot;&quot;;NETWORKDAYS([.$L215];[.$M215];[$休日.$B$4:.$B$304]);&quot;&quot;)" office:value-type="float" office:value="1" calcext:value-type="float">
            <text:p>1</text:p>
          </table:table-cell>
          <table:table-cell table:style-name="ce284" office:value-type="float" office:value="100" calcext:value-type="float">
            <text:p>100</text:p>
          </table:table-cell>
          <table:table-cell table:style-name="ce63" table:formula="of:=IF(OR(AND([.$N215]=&quot;&quot;;[.$L215]&lt;&gt;&quot;&quot;;[.$L215]&lt;=[.$U$1]);AND([.$M215]&lt;&gt;&quot;&quot;;[.Q215]&lt;100;[.$M215]&lt;=[.$U$1]));&quot;遅延&quot;;&quot;&quot;)">
            <text:p/>
          </table:table-cell>
          <table:table-cell table:style-name="ce66"/>
          <table:table-cell table:style-name="ce66" table:formula="of:=SUM([.$V215:.$FM21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6]&lt;&gt;&quot;&quot;;[.$F216]=&quot;&quot;);&quot;E&quot;&amp;ROW();[.$B138])" office:value-type="string" office:string-value="E125" calcext:value-type="string">
            <text:p>E125</text:p>
          </table:table-cell>
          <table:table-cell table:style-name="ce13" table:formula="of:=IF(AND([.$D216]&lt;&gt;&quot;&quot;;[.$D216]&lt;&gt;&quot;○&quot;);MAX([.$C$3:.$C215])+1;[.$C215])" office:value-type="float" office:value="10" calcext:value-type="float">
            <text:p>10</text:p>
          </table:table-cell>
          <table:table-cell table:style-name="ce19"/>
          <table:table-cell table:style-name="ce27" table:formula="of:=IF(AND([.$F216]&lt;&gt;&quot;&quot;;[.$D215]&lt;&gt;&quot;&quot;);1;IF([.$F216]&lt;&gt;&quot;&quot;;MAX(INDIRECT([.$B216]):[.$E215])+1;&quot;&quot;))">
            <text:p/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ヘッダー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4" table:style-name="ce38" office:value-type="date" office:date-value="2026-06-12" calcext:value-type="date">
            <text:p>2026/06/12</text:p>
          </table:table-cell>
          <table:table-cell table:style-name="ce32" table:formula="of:=IF([.$L216]&lt;&gt;&quot;&quot;;NETWORKDAYS([.$L216];[.$M216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16]=&quot;&quot;;[.$L216]&lt;&gt;&quot;&quot;;[.$L216]&lt;=[.$U$1]);AND([.$M216]&lt;&gt;&quot;&quot;;[.Q216]&lt;100;[.$M216]&lt;=[.$U$1]));&quot;遅延&quot;;&quot;&quot;)">
            <text:p/>
          </table:table-cell>
          <table:table-cell table:style-name="ce66"/>
          <table:table-cell table:style-name="ce66" table:formula="of:=SUM([.$V216:.$FM21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7]&lt;&gt;&quot;&quot;;[.$F217]=&quot;&quot;);&quot;E&quot;&amp;ROW();[.$B139])" office:value-type="string" office:string-value="E125" calcext:value-type="string">
            <text:p>E125</text:p>
          </table:table-cell>
          <table:table-cell table:style-name="ce13" table:formula="of:=IF(AND([.$D217]&lt;&gt;&quot;&quot;;[.$D217]&lt;&gt;&quot;○&quot;);MAX([.$C$3:.$C216])+1;[.$C216])" office:value-type="float" office:value="10" calcext:value-type="float">
            <text:p>10</text:p>
          </table:table-cell>
          <table:table-cell table:style-name="ce19"/>
          <table:table-cell table:style-name="ce27" table:formula="of:=IF(AND([.$F217]&lt;&gt;&quot;&quot;;[.$D216]&lt;&gt;&quot;&quot;);1;IF([.$F217]&lt;&gt;&quot;&quot;;MAX(INDIRECT([.$B217]):[.$E216])+1;&quot;&quot;))">
            <text:p/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フッター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3"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15" calcext:value-type="date">
            <text:p>2026/06/15</text:p>
          </table:table-cell>
          <table:table-cell table:style-name="ce32" table:formula="of:=IF([.$L217]&lt;&gt;&quot;&quot;;NETWORKDAYS([.$L217];[.$M217];[$休日.$B$4:.$B$304]);&quot;&quot;)" office:value-type="float" office:value="1" calcext:value-type="float">
            <text:p>1</text:p>
          </table:table-cell>
          <table:table-cell table:style-name="ce283" office:value-type="float" office:value="100" calcext:value-type="float">
            <text:p>100</text:p>
          </table:table-cell>
          <table:table-cell table:style-name="ce63" table:formula="of:=IF(OR(AND([.$N217]=&quot;&quot;;[.$L217]&lt;&gt;&quot;&quot;;[.$L217]&lt;=[.$U$1]);AND([.$M217]&lt;&gt;&quot;&quot;;[.Q215]&lt;100;[.$M217]&lt;=[.$U$1]));&quot;遅延&quot;;&quot;&quot;)">
            <text:p/>
          </table:table-cell>
          <table:table-cell table:style-name="ce66"/>
          <table:table-cell table:style-name="ce66" table:formula="of:=SUM([.$V217:.$FM21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8]&lt;&gt;&quot;&quot;;[.$F218]=&quot;&quot;);&quot;E&quot;&amp;ROW();[.$B140])" office:value-type="string" office:string-value="E125" calcext:value-type="string">
            <text:p>E125</text:p>
          </table:table-cell>
          <table:table-cell table:style-name="ce13" table:formula="of:=IF(AND([.$D218]&lt;&gt;&quot;&quot;;[.$D218]&lt;&gt;&quot;○&quot;);MAX([.$C$3:.$C217])+1;[.$C217])" office:value-type="float" office:value="10" calcext:value-type="float">
            <text:p>10</text:p>
          </table:table-cell>
          <table:table-cell table:style-name="ce19"/>
          <table:table-cell table:style-name="ce27"/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 office:value-type="string" calcext:value-type="string">
            <text:p>ナビゲーションバー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16" calcext:value-type="date">
            <text:p>2026/06/16</text:p>
          </table:table-cell>
          <table:table-cell table:number-columns-repeated="2" table:style-name="ce38" office:value-type="date" office:date-value="2026-06-15" calcext:value-type="date">
            <text:p>2026/06/15</text:p>
          </table:table-cell>
          <table:table-cell table:style-name="ce32" office:value-type="float" office:value="1" calcext:value-type="float">
            <text:p>1</text:p>
          </table:table-cell>
          <table:table-cell table:style-name="ce283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9]&lt;&gt;&quot;&quot;;[.$F219]=&quot;&quot;);&quot;E&quot;&amp;ROW();[.$B141])" office:value-type="string" office:string-value="E125" calcext:value-type="string">
            <text:p>E125</text:p>
          </table:table-cell>
          <table:table-cell table:style-name="ce13" table:formula="of:=IF(AND([.$D219]&lt;&gt;&quot;&quot;;[.$D219]&lt;&gt;&quot;○&quot;);MAX([.$C$3:.$C218])+1;[.$C218])" office:value-type="float" office:value="10" calcext:value-type="float">
            <text:p>10</text:p>
          </table:table-cell>
          <table:table-cell table:style-name="ce19"/>
          <table:table-cell table:style-name="ce27"/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 office:value-type="string" calcext:value-type="string">
            <text:p>サイドバー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15" calcext:value-type="date">
            <text:p>2026/06/15</text:p>
          </table:table-cell>
          <table:table-cell table:style-name="ce38" office:value-type="date" office:date-value="2026-06-17" calcext:value-type="date">
            <text:p>2026/06/17</text:p>
          </table:table-cell>
          <table:table-cell table:style-name="ce32" office:value-type="float" office:value="1" calcext:value-type="float">
            <text:p>1</text:p>
          </table:table-cell>
          <table:table-cell table:style-name="ce283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0]&lt;&gt;&quot;&quot;;[.$F220]=&quot;&quot;);&quot;E&quot;&amp;ROW();[.$B142])" office:value-type="string" office:string-value="E125" calcext:value-type="string">
            <text:p>E125</text:p>
          </table:table-cell>
          <table:table-cell table:style-name="ce13" table:formula="of:=IF(AND([.$D220]&lt;&gt;&quot;&quot;;[.$D220]&lt;&gt;&quot;○&quot;);MAX([.$C$3:.$C219])+1;[.$C219])" office:value-type="float" office:value="10" calcext:value-type="float">
            <text:p>10</text:p>
          </table:table-cell>
          <table:table-cell table:style-name="ce19"/>
          <table:table-cell table:style-name="ce27"/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string" calcext:value-type="string">
            <text:p>フォント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4" table:style-name="ce38" office:value-type="date" office:date-value="2026-06-12" calcext:value-type="date">
            <text:p>2026/06/12</text:p>
          </table:table-cell>
          <table:table-cell table:style-name="ce32" office:value-type="float" office:value="1" calcext:value-type="float">
            <text:p>1</text:p>
          </table:table-cell>
          <table:table-cell table:style-name="ce288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1]&lt;&gt;&quot;&quot;;[.$F221]=&quot;&quot;);&quot;E&quot;&amp;ROW();[.$B143])" office:value-type="string" office:string-value="E125" calcext:value-type="string">
            <text:p>E125</text:p>
          </table:table-cell>
          <table:table-cell table:style-name="ce13" table:formula="of:=IF(AND([.$D221]&lt;&gt;&quot;&quot;;[.$D221]&lt;&gt;&quot;○&quot;);MAX([.$C$3:.$C220])+1;[.$C220])" office:value-type="float" office:value="10" calcext:value-type="float">
            <text:p>10</text:p>
          </table:table-cell>
          <table:table-cell table:style-name="ce19"/>
          <table:table-cell table:style-name="ce27"/>
          <table:table-cell table:style-name="ce32"/>
          <table:table-cell table:style-name="ce32" office:value-type="float" office:value="6" calcext:value-type="float">
            <text:p>6</text:p>
          </table:table-cell>
          <table:table-cell table:style-name="ce32" office:value-type="string" calcext:value-type="string">
            <text:p>ボタン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16" calcext:value-type="date">
            <text:p>2026/06/16</text:p>
          </table:table-cell>
          <table:table-cell table:number-columns-repeated="2" table:style-name="ce38" office:value-type="date" office:date-value="2026-06-15" calcext:value-type="date">
            <text:p>2026/06/15</text:p>
          </table:table-cell>
          <table:table-cell table:style-name="ce32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2]&lt;&gt;&quot;&quot;;[.$F222]=&quot;&quot;);&quot;E&quot;&amp;ROW();[.$B144])" office:value-type="string" office:string-value="E125" calcext:value-type="string">
            <text:p>E125</text:p>
          </table:table-cell>
          <table:table-cell table:style-name="ce13" table:formula="of:=IF(AND([.$D222]&lt;&gt;&quot;&quot;;[.$D222]&lt;&gt;&quot;○&quot;);MAX([.$C$3:.$C221])+1;[.$C221])" office:value-type="float" office:value="10" calcext:value-type="float">
            <text:p>10</text:p>
          </table:table-cell>
          <table:table-cell table:style-name="ce19"/>
          <table:table-cell table:style-name="ce27"/>
          <table:table-cell table:style-name="ce32"/>
          <table:table-cell table:style-name="ce32" office:value-type="float" office:value="7" calcext:value-type="float">
            <text:p>7</text:p>
          </table:table-cell>
          <table:table-cell table:style-name="ce32" office:value-type="string" calcext:value-type="string">
            <text:p>トップ画面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16" calcext:value-type="date">
            <text:p>2026/06/16</text:p>
          </table:table-cell>
          <table:table-cell table:number-columns-repeated="2" table:style-name="ce38" office:value-type="date" office:date-value="2026-06-15" calcext:value-type="date">
            <text:p>2026/06/15</text:p>
          </table:table-cell>
          <table:table-cell table:style-name="ce32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3]&lt;&gt;&quot;&quot;;[.$F223]=&quot;&quot;);&quot;E&quot;&amp;ROW();[.$B145])" office:value-type="string" office:string-value="E125" calcext:value-type="string">
            <text:p>E125</text:p>
          </table:table-cell>
          <table:table-cell table:style-name="ce13" table:formula="of:=IF(AND([.$D223]&lt;&gt;&quot;&quot;;[.$D223]&lt;&gt;&quot;○&quot;);MAX([.$C$3:.$C222])+1;[.$C222])" office:value-type="float" office:value="10" calcext:value-type="float">
            <text:p>10</text:p>
          </table:table-cell>
          <table:table-cell table:style-name="ce19"/>
          <table:table-cell table:style-name="ce27"/>
          <table:table-cell table:style-name="ce32"/>
          <table:table-cell table:style-name="ce32" office:value-type="float" office:value="8" calcext:value-type="float">
            <text:p>8</text:p>
          </table:table-cell>
          <table:table-cell table:style-name="ce32" office:value-type="string" calcext:value-type="string">
            <text:p>商品一覧画面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16" calcext:value-type="date">
            <text:p>2026/06/16</text:p>
          </table:table-cell>
          <table:table-cell table:number-columns-repeated="2" table:style-name="ce38" office:value-type="date" office:date-value="2026-06-15" calcext:value-type="date">
            <text:p>2026/06/15</text:p>
          </table:table-cell>
          <table:table-cell table:style-name="ce32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4]&lt;&gt;&quot;&quot;;[.$F224]=&quot;&quot;);&quot;E&quot;&amp;ROW();[.$B146])" office:value-type="string" office:string-value="E125" calcext:value-type="string">
            <text:p>E125</text:p>
          </table:table-cell>
          <table:table-cell table:style-name="ce13" table:formula="of:=IF(AND([.$D224]&lt;&gt;&quot;&quot;;[.$D224]&lt;&gt;&quot;○&quot;);MAX([.$C$3:.$C223])+1;[.$C223])" office:value-type="float" office:value="10" calcext:value-type="float">
            <text:p>10</text:p>
          </table:table-cell>
          <table:table-cell table:style-name="ce19"/>
          <table:table-cell table:style-name="ce27"/>
          <table:table-cell table:style-name="ce32"/>
          <table:table-cell table:style-name="ce32" office:value-type="float" office:value="9" calcext:value-type="float">
            <text:p>9</text:p>
          </table:table-cell>
          <table:table-cell table:style-name="ce32" office:value-type="string" calcext:value-type="string">
            <text:p>商品詳細画面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15" calcext:value-type="date">
            <text:p>2026/06/15</text:p>
          </table:table-cell>
          <table:table-cell table:style-name="ce38" office:value-type="date" office:date-value="2026-06-19" calcext:value-type="date">
            <text:p>2026/06/19</text:p>
          </table:table-cell>
          <table:table-cell table:style-name="ce32" office:value-type="float" office:value="1" calcext:value-type="float">
            <text:p>1</text:p>
          </table:table-cell>
          <table:table-cell table:style-name="ce286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5]&lt;&gt;&quot;&quot;;[.$F225]=&quot;&quot;);&quot;E&quot;&amp;ROW();[.$B147])" office:value-type="string" office:string-value="E125" calcext:value-type="string">
            <text:p>E125</text:p>
          </table:table-cell>
          <table:table-cell table:style-name="ce13" table:formula="of:=IF(AND([.$D225]&lt;&gt;&quot;&quot;;[.$D225]&lt;&gt;&quot;○&quot;);MAX([.$C$3:.$C224])+1;[.$C224])" office:value-type="float" office:value="10" calcext:value-type="float">
            <text:p>10</text:p>
          </table:table-cell>
          <table:table-cell table:style-name="ce19"/>
          <table:table-cell table:style-name="ce27"/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 office:value-type="string" calcext:value-type="string">
            <text:p>ログイン画面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15" calcext:value-type="date">
            <text:p>2026/06/15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2" office:value-type="float" office:value="1" calcext:value-type="float">
            <text:p>1</text:p>
          </table:table-cell>
          <table:table-cell table:style-name="ce286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6]&lt;&gt;&quot;&quot;;[.$F226]=&quot;&quot;);&quot;E&quot;&amp;ROW();[.$B148])" office:value-type="string" office:string-value="E125" calcext:value-type="string">
            <text:p>E125</text:p>
          </table:table-cell>
          <table:table-cell table:style-name="ce13" table:formula="of:=IF(AND([.$D226]&lt;&gt;&quot;&quot;;[.$D226]&lt;&gt;&quot;○&quot;);MAX([.$C$3:.$C225])+1;[.$C225])" office:value-type="float" office:value="10" calcext:value-type="float">
            <text:p>10</text:p>
          </table:table-cell>
          <table:table-cell table:style-name="ce19"/>
          <table:table-cell table:style-name="ce27"/>
          <table:table-cell table:style-name="ce32"/>
          <table:table-cell table:style-name="ce32" office:value-type="float" office:value="11" calcext:value-type="float">
            <text:p>11</text:p>
          </table:table-cell>
          <table:table-cell table:style-name="ce32" office:value-type="string" calcext:value-type="string">
            <text:p>会員登録画面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15" calcext:value-type="date">
            <text:p>2026/06/15</text:p>
          </table:table-cell>
          <table:table-cell table:style-name="ce38" office:value-type="date" office:date-value="2026-06-17" calcext:value-type="date">
            <text:p>2026/06/17</text:p>
          </table:table-cell>
          <table:table-cell table:style-name="ce32" office:value-type="float" office:value="1" calcext:value-type="float">
            <text:p>1</text:p>
          </table:table-cell>
          <table:table-cell table:style-name="ce289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7]&lt;&gt;&quot;&quot;;[.$F227]=&quot;&quot;);&quot;E&quot;&amp;ROW();[.$B149])" office:value-type="string" office:string-value="E125" calcext:value-type="string">
            <text:p>E125</text:p>
          </table:table-cell>
          <table:table-cell table:style-name="ce13" table:formula="of:=IF(AND([.$D227]&lt;&gt;&quot;&quot;;[.$D227]&lt;&gt;&quot;○&quot;);MAX([.$C$3:.$C226])+1;[.$C226])" office:value-type="float" office:value="10" calcext:value-type="float">
            <text:p>10</text:p>
          </table:table-cell>
          <table:table-cell table:style-name="ce19"/>
          <table:table-cell table:style-name="ce27"/>
          <table:table-cell table:style-name="ce32"/>
          <table:table-cell table:style-name="ce32" office:value-type="float" office:value="12" calcext:value-type="float">
            <text:p>12</text:p>
          </table:table-cell>
          <table:table-cell table:style-name="ce32" office:value-type="string" calcext:value-type="string">
            <text:p>買い物かご画面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16" calcext:value-type="date">
            <text:p>2026/06/16</text:p>
          </table:table-cell>
          <table:table-cell table:number-columns-repeated="2" table:style-name="ce38" office:value-type="date" office:date-value="2026-06-15" calcext:value-type="date">
            <text:p>2026/06/15</text:p>
          </table:table-cell>
          <table:table-cell table:style-name="ce32" office:value-type="float" office:value="1" calcext:value-type="float">
            <text:p>1</text:p>
          </table:table-cell>
          <table:table-cell table:style-name="ce289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8]&lt;&gt;&quot;&quot;;[.$F228]=&quot;&quot;);&quot;E&quot;&amp;ROW();[.$B150])" office:value-type="string" office:string-value="E125" calcext:value-type="string">
            <text:p>E125</text:p>
          </table:table-cell>
          <table:table-cell table:style-name="ce13" table:formula="of:=IF(AND([.$D228]&lt;&gt;&quot;&quot;;[.$D228]&lt;&gt;&quot;○&quot;);MAX([.$C$3:.$C227])+1;[.$C227])" office:value-type="float" office:value="10" calcext:value-type="float">
            <text:p>10</text:p>
          </table:table-cell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9]&lt;&gt;&quot;&quot;;[.$F229]=&quot;&quot;);&quot;E&quot;&amp;ROW();[.$B153])" office:value-type="string" office:string-value="E229" calcext:value-type="string">
            <text:p>E229</text:p>
          </table:table-cell>
          <table:table-cell table:style-name="ce13" table:formula="of:=IF(AND([.$D229]&lt;&gt;&quot;&quot;;[.$D229]&lt;&gt;&quot;○&quot;);MAX([.$C$3:.$C228])+1;#REF!)" office:value-type="float" office:value="11" calcext:value-type="float">
            <text:p>11</text:p>
          </table:table-cell>
          <table:table-cell table:style-name="ce19" office:value-type="string" calcext:value-type="string">
            <text:p>テスト</text:p>
          </table:table-cell>
          <table:table-cell table:style-name="ce27" table:formula="of:=IF(AND([.$F229]&lt;&gt;&quot;&quot;;[.$D262]&lt;&gt;&quot;&quot;);1;IF([.$F229]&lt;&gt;&quot;&quot;;MAX(INDIRECT([.$B229]):[.$E262])+1;&quot;&quot;))">
            <text:p/>
          </table:table-cell>
          <table:table-cell table:style-name="ce32" table:number-columns-repeated="4"/>
          <table:table-cell table:style-name="ce32" office:value-type="string" calcext:value-type="string">
            <text:p>全員</text:p>
          </table:table-cell>
          <table:table-cell table:style-name="ce34"/>
          <table:table-cell table:style-name="ce38" office:value-type="date" office:date-value="2026-06-17" calcext:value-type="date">
            <text:p>2026/06/17</text:p>
          </table:table-cell>
          <table:table-cell table:style-name="ce38" office:value-type="date" office:date-value="2026-06-22" calcext:value-type="date">
            <text:p>2026/06/22</text:p>
          </table:table-cell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9" calcext:value-type="date">
            <text:p>2026/06/19</text:p>
          </table:table-cell>
          <table:table-cell table:style-name="ce32" table:formula="of:=IF([.$L229]&lt;&gt;&quot;&quot;;NETWORKDAYS([.$L229];[.$M229];[$休日.$B$4:.$B$304]);&quot;&quot;)" office:value-type="float" office:value="4" calcext:value-type="float">
            <text:p>4</text:p>
          </table:table-cell>
          <table:table-cell table:style-name="ce295" office:value-type="float" office:value="100" calcext:value-type="float">
            <text:p>100</text:p>
          </table:table-cell>
          <table:table-cell table:style-name="ce63" table:formula="of:=IF(OR(AND([.$N229]=&quot;&quot;;[.$L229]&lt;&gt;&quot;&quot;;[.$L229]&lt;=[.$U$1]);AND([.$M229]&lt;&gt;&quot;&quot;;[.Q229]&lt;100;[.$M229]&lt;=[.$U$1]));&quot;遅延&quot;;&quot;&quot;)">
            <text:p/>
          </table:table-cell>
          <table:table-cell table:style-name="ce66"/>
          <table:table-cell table:style-name="ce66" table:formula="of:=SUM([.$V229:.$FM22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0]&lt;&gt;&quot;&quot;;[.$F230]=&quot;&quot;);&quot;E&quot;&amp;ROW();[.$B154])" office:value-type="string" office:string-value="E153" calcext:value-type="string">
            <text:p>E153</text:p>
          </table:table-cell>
          <table:table-cell table:style-name="ce13" table:formula="of:=IF(AND([.$D230]&lt;&gt;&quot;&quot;;[.$D230]&lt;&gt;&quot;○&quot;);MAX([.$C$3:.$C229])+1;[.$C229])" office:value-type="float" office:value="11" calcext:value-type="float">
            <text:p>11</text:p>
          </table:table-cell>
          <table:table-cell table:style-name="ce19"/>
          <table:table-cell table:style-name="ce27" table:formula="of:=IF(AND([.$F230]&lt;&gt;&quot;&quot;;[.$D229]&lt;&gt;&quot;&quot;);1;IF([.$F230]&lt;&gt;&quot;&quot;;MAX(INDIRECT([.$B230]):[.$E229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テスト仕様書の作成</text:p>
          </table:table-cell>
          <table:table-cell table:style-name="ce32" table:formula="of:=IF([.$H230]=&quot;&quot;;&quot;&quot;;IF([.$G229]=&quot;&quot;;1;[.$G229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office:value-type="date" office:date-value="2626-06-11" calcext:value-type="date">
            <text:p>2626/06/11</text:p>
          </table:table-cell>
          <table:table-cell table:style-name="ce38" office:value-type="date" office:date-value="2026-06-17" calcext:value-type="date">
            <text:p>2026/06/17</text:p>
          </table:table-cell>
          <table:table-cell table:style-name="ce32" table:formula="of:=IF([.$L230]&lt;&gt;&quot;&quot;;NETWORKDAYS([.$L230];[.$M230];[$休日.$B$4:.$B$304]);&quot;&quot;)" office:value-type="float" office:value="1" calcext:value-type="float">
            <text:p>1</text:p>
          </table:table-cell>
          <table:table-cell table:style-name="ce295" office:value-type="float" office:value="100" calcext:value-type="float">
            <text:p>100</text:p>
          </table:table-cell>
          <table:table-cell table:style-name="ce63" table:formula="of:=IF(OR(AND([.$N230]=&quot;&quot;;[.$L230]&lt;&gt;&quot;&quot;;[.$L230]&lt;=[.$U$1]);AND([.$M230]&lt;&gt;&quot;&quot;;[.Q230]&lt;100;[.$M230]&lt;=[.$U$1]));&quot;遅延&quot;;&quot;&quot;)">
            <text:p/>
          </table:table-cell>
          <table:table-cell table:style-name="ce66"/>
          <table:table-cell table:style-name="ce66" table:formula="of:=SUM([.$V230:.$FM23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1]&lt;&gt;&quot;&quot;;[.$F231]=&quot;&quot;);&quot;E&quot;&amp;ROW();[.$B155])" office:value-type="string" office:string-value="E153" calcext:value-type="string">
            <text:p>E153</text:p>
          </table:table-cell>
          <table:table-cell table:style-name="ce13" table:formula="of:=IF(AND([.$D231]&lt;&gt;&quot;&quot;;[.$D231]&lt;&gt;&quot;○&quot;);MAX([.$C$3:.$C230])+1;[.$C230])" office:value-type="float" office:value="11" calcext:value-type="float">
            <text:p>11</text:p>
          </table:table-cell>
          <table:table-cell table:style-name="ce19"/>
          <table:table-cell table:style-name="ce27" table:formula="of:=IF(AND([.$F231]&lt;&gt;&quot;&quot;;[.$D230]&lt;&gt;&quot;&quot;);1;IF([.$F231]&lt;&gt;&quot;&quot;;MAX(INDIRECT([.$B231]):[.$E230])+1;&quot;&quot;))">
            <text:p/>
          </table:table-cell>
          <table:table-cell table:style-name="ce32"/>
          <table:table-cell table:style-name="ce32" table:formula="of:=IF([.$H231]=&quot;&quot;;&quot;&quot;;IF([.$G230]=&quot;&quot;;1;[.$G230]+1))" office:value-type="float" office:value="1" calcext:value-type="float">
            <text:p>1</text:p>
          </table:table-cell>
          <table:table-cell table:style-name="ce32" office:value-type="string" calcext:value-type="string">
            <text:p>既存機能のテスト仕様書の把握</text:p>
          </table:table-cell>
          <table:table-cell table:style-name="ce32"/>
          <table:table-cell table:style-name="ce32" office:value-type="string" calcext:value-type="string">
            <text:p>小林、東山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number-columns-repeated="2" table:style-name="ce38" office:value-type="date" office:date-value="2626-06-11" calcext:value-type="date">
            <text:p>2626/06/11</text:p>
          </table:table-cell>
          <table:table-cell table:style-name="ce32" table:formula="of:=IF([.$L231]&lt;&gt;&quot;&quot;;NETWORKDAYS([.$L231];[.$M231];[$休日.$B$4:.$B$304]);&quot;&quot;)" office:value-type="float" office:value="1" calcext:value-type="float">
            <text:p>1</text:p>
          </table:table-cell>
          <table:table-cell table:style-name="ce295" office:value-type="float" office:value="100" calcext:value-type="float">
            <text:p>100</text:p>
          </table:table-cell>
          <table:table-cell table:style-name="ce63" table:formula="of:=IF(OR(AND([.$N231]=&quot;&quot;;[.$L231]&lt;&gt;&quot;&quot;;[.$L231]&lt;=[.$U$1]);AND([.$M231]&lt;&gt;&quot;&quot;;[.Q231]&lt;100;[.$M231]&lt;=[.$U$1]));&quot;遅延&quot;;&quot;&quot;)">
            <text:p/>
          </table:table-cell>
          <table:table-cell table:style-name="ce66"/>
          <table:table-cell table:style-name="ce66" table:formula="of:=SUM([.$V231:.$FM23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2]&lt;&gt;&quot;&quot;;[.$F232]=&quot;&quot;);&quot;E&quot;&amp;ROW();[.$B156])" office:value-type="string" office:string-value="E153" calcext:value-type="string">
            <text:p>E153</text:p>
          </table:table-cell>
          <table:table-cell table:style-name="ce13" table:formula="of:=IF(AND([.$D232]&lt;&gt;&quot;&quot;;[.$D232]&lt;&gt;&quot;○&quot;);MAX([.$C$3:.$C231])+1;[.$C231])" office:value-type="float" office:value="11" calcext:value-type="float">
            <text:p>11</text:p>
          </table:table-cell>
          <table:table-cell table:style-name="ce19"/>
          <table:table-cell table:style-name="ce27" table:formula="of:=IF(AND([.$F232]&lt;&gt;&quot;&quot;;[.$D231]&lt;&gt;&quot;&quot;);1;IF([.$F232]&lt;&gt;&quot;&quot;;MAX(INDIRECT([.$B232]):[.$E231])+1;&quot;&quot;))">
            <text:p/>
          </table:table-cell>
          <table:table-cell table:style-name="ce32"/>
          <table:table-cell table:style-name="ce32" table:formula="of:=IF([.$H232]=&quot;&quot;;&quot;&quot;;IF([.$G231]=&quot;&quot;;1;[.$G231]+1))" office:value-type="float" office:value="2" calcext:value-type="float">
            <text:p>2</text:p>
          </table:table-cell>
          <table:table-cell table:style-name="ce32" office:value-type="string" calcext:value-type="string">
            <text:p>作成方法の決定</text:p>
          </table:table-cell>
          <table:table-cell table:style-name="ce32"/>
          <table:table-cell table:style-name="ce32" office:value-type="string" calcext:value-type="string">
            <text:p>小林、東山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number-columns-repeated="2" table:style-name="ce38" office:value-type="date" office:date-value="2626-06-11" calcext:value-type="date">
            <text:p>2626/06/11</text:p>
          </table:table-cell>
          <table:table-cell table:style-name="ce32" table:formula="of:=IF([.$L232]&lt;&gt;&quot;&quot;;NETWORKDAYS([.$L232];[.$M232];[$休日.$B$4:.$B$304]);&quot;&quot;)" office:value-type="float" office:value="1" calcext:value-type="float">
            <text:p>1</text:p>
          </table:table-cell>
          <table:table-cell table:style-name="ce295" office:value-type="float" office:value="100" calcext:value-type="float">
            <text:p>100</text:p>
          </table:table-cell>
          <table:table-cell table:style-name="ce63" table:formula="of:=IF(OR(AND([.$N232]=&quot;&quot;;[.$L232]&lt;&gt;&quot;&quot;;[.$L232]&lt;=[.$U$1]);AND([.$M232]&lt;&gt;&quot;&quot;;[.Q232]&lt;100;[.$M232]&lt;=[.$U$1]));&quot;遅延&quot;;&quot;&quot;)">
            <text:p/>
          </table:table-cell>
          <table:table-cell table:style-name="ce66"/>
          <table:table-cell table:style-name="ce66" table:formula="of:=SUM([.$V232:.$FM23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33]&lt;&gt;&quot;&quot;;[.$F233]=&quot;&quot;);&quot;E&quot;&amp;ROW();[.$B157])" office:value-type="string" office:string-value="E153" calcext:value-type="string">
            <text:p>E153</text:p>
          </table:table-cell>
          <table:table-cell table:style-name="ce13" table:formula="of:=IF(AND([.$D233]&lt;&gt;&quot;&quot;;[.$D233]&lt;&gt;&quot;○&quot;);MAX([.$C$3:.$C232])+1;[.$C232])" office:value-type="float" office:value="11" calcext:value-type="float">
            <text:p>11</text:p>
          </table:table-cell>
          <table:table-cell table:style-name="ce19"/>
          <table:table-cell table:style-name="ce27" table:formula="of:=IF(AND([.$F233]&lt;&gt;&quot;&quot;;[.$D232]&lt;&gt;&quot;&quot;);1;IF([.$F233]&lt;&gt;&quot;&quot;;MAX(INDIRECT([.$B233]):[.$E232])+1;&quot;&quot;))">
            <text:p/>
          </table:table-cell>
          <table:table-cell table:style-name="ce32"/>
          <table:table-cell table:style-name="ce32" table:formula="of:=IF([.$H234]=&quot;&quot;;&quot;&quot;;IF([.$G232]=&quot;&quot;;1;[.$G232]+1))" office:value-type="float" office:value="3" calcext:value-type="float">
            <text:p>3</text:p>
          </table:table-cell>
          <table:table-cell office:value-type="string" calcext:value-type="string">
            <text:p>テストデータの作成</text:p>
          </table:table-cell>
          <table:table-cell table:style-name="ce32"/>
          <table:table-cell table:style-name="ce32" office:value-type="string" calcext:value-type="string">
            <text:p>小林、東山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office:value-type="date" office:date-value="2626-06-11" calcext:value-type="date">
            <text:p>2626/06/11</text:p>
          </table:table-cell>
          <table:table-cell table:style-name="ce38" office:value-type="date" office:date-value="2026-06-17" calcext:value-type="date">
            <text:p>2026/06/17</text:p>
          </table:table-cell>
          <table:table-cell table:style-name="ce32" table:formula="of:=IF([.$L233]&lt;&gt;&quot;&quot;;NETWORKDAYS([.$L233];[.$M233];[$休日.$B$4:.$B$304]);&quot;&quot;)" office:value-type="float" office:value="1" calcext:value-type="float">
            <text:p>1</text:p>
          </table:table-cell>
          <table:table-cell table:style-name="ce295" office:value-type="float" office:value="100" calcext:value-type="float">
            <text:p>100</text:p>
          </table:table-cell>
          <table:table-cell table:style-name="ce63" table:formula="of:=IF(OR(AND([.$N233]=&quot;&quot;;[.$L233]&lt;&gt;&quot;&quot;;[.$L233]&lt;=[.$U$1]);AND([.$M233]&lt;&gt;&quot;&quot;;[.Q233]&lt;100;[.$M233]&lt;=[.$U$1]));&quot;遅延&quot;;&quot;&quot;)">
            <text:p/>
          </table:table-cell>
          <table:table-cell table:style-name="ce66"/>
          <table:table-cell table:style-name="ce66" table:formula="of:=SUM([.$V233:.$FM23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4]&lt;&gt;&quot;&quot;;[.$F234]=&quot;&quot;);&quot;E&quot;&amp;ROW();[.$B158])" office:value-type="string" office:string-value="E153" calcext:value-type="string">
            <text:p>E153</text:p>
          </table:table-cell>
          <table:table-cell table:style-name="ce13" table:formula="of:=IF(AND([.$D234]&lt;&gt;&quot;&quot;;[.$D234]&lt;&gt;&quot;○&quot;);MAX([.$C$3:.$C233])+1;[.$C233])" office:value-type="float" office:value="11" calcext:value-type="float">
            <text:p>11</text:p>
          </table:table-cell>
          <table:table-cell table:style-name="ce19"/>
          <table:table-cell table:style-name="ce27" table:formula="of:=IF(AND([.$F234]&lt;&gt;&quot;&quot;;[.$D233]&lt;&gt;&quot;&quot;);1;IF([.$F234]&lt;&gt;&quot;&quot;;MAX(INDIRECT([.$B234]):[.$E233])+1;&quot;&quot;))">
            <text:p/>
          </table:table-cell>
          <table:table-cell table:style-name="ce32"/>
          <table:table-cell table:style-name="ce32" table:formula="of:=IF([.$H235]=&quot;&quot;;&quot;&quot;;IF([.$G233]=&quot;&quot;;1;[.$G233]+1))" office:value-type="float" office:value="4" calcext:value-type="float">
            <text:p>4</text:p>
          </table:table-cell>
          <table:table-cell table:style-name="ce32" office:value-type="string" calcext:value-type="string">
            <text:p>テスト仕様書の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office:value-type="date" office:date-value="2626-06-11" calcext:value-type="date">
            <text:p>2626/06/11</text:p>
          </table:table-cell>
          <table:table-cell table:style-name="ce38" office:value-type="date" office:date-value="2026-06-17" calcext:value-type="date">
            <text:p>2026/06/17</text:p>
          </table:table-cell>
          <table:table-cell table:style-name="ce32" table:formula="of:=IF([.$L234]&lt;&gt;&quot;&quot;;NETWORKDAYS([.$L234];[.$M234];[$休日.$B$4:.$B$304]);&quot;&quot;)" office:value-type="float" office:value="1" calcext:value-type="float">
            <text:p>1</text:p>
          </table:table-cell>
          <table:table-cell table:style-name="ce298" office:value-type="float" office:value="100" calcext:value-type="float">
            <text:p>100</text:p>
          </table:table-cell>
          <table:table-cell table:style-name="ce63" table:formula="of:=IF(OR(AND([.$N234]=&quot;&quot;;[.$L234]&lt;&gt;&quot;&quot;;[.$L234]&lt;=[.$U$1]);AND([.$M234]&lt;&gt;&quot;&quot;;[.Q234]&lt;100;[.$M234]&lt;=[.$U$1]));&quot;遅延&quot;;&quot;&quot;)">
            <text:p/>
          </table:table-cell>
          <table:table-cell table:style-name="ce66"/>
          <table:table-cell table:style-name="ce66" table:formula="of:=SUM([.$V234:.$FM23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5]&lt;&gt;&quot;&quot;;[.$F235]=&quot;&quot;);&quot;E&quot;&amp;ROW();[.$B159])" office:value-type="string" office:string-value="E153" calcext:value-type="string">
            <text:p>E153</text:p>
          </table:table-cell>
          <table:table-cell table:style-name="ce13" table:formula="of:=IF(AND([.$D235]&lt;&gt;&quot;&quot;;[.$D235]&lt;&gt;&quot;○&quot;);MAX([.$C$3:.$C234])+1;[.$C234])" office:value-type="float" office:value="11" calcext:value-type="float">
            <text:p>11</text:p>
          </table:table-cell>
          <table:table-cell table:style-name="ce19"/>
          <table:table-cell table:style-name="ce27" table:formula="of:=IF(AND([.$F235]&lt;&gt;&quot;&quot;;[.$D234]&lt;&gt;&quot;&quot;);1;IF([.$F235]&lt;&gt;&quot;&quot;;MAX(INDIRECT([.$B235]):[.$E234])+1;&quot;&quot;))">
            <text:p/>
          </table:table-cell>
          <table:table-cell table:style-name="ce32"/>
          <table:table-cell table:style-name="ce32" table:formula="of:=IF([.$H235]=&quot;&quot;;&quot;&quot;;IF([.$G234]=&quot;&quot;;1;[.$G234]+1))" office:value-type="float" office:value="5" calcext:value-type="float">
            <text:p>5</text:p>
          </table:table-cell>
          <table:table-cell table:style-name="ce32" office:value-type="string" calcext:value-type="string">
            <text:p>テスト仕様書チーム内レビュー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17" calcext:value-type="date">
            <text:p>2026/06/17</text:p>
          </table:table-cell>
          <table:table-cell table:style-name="ce32" table:formula="of:=IF([.$L235]&lt;&gt;&quot;&quot;;NETWORKDAYS([.$L235];[.$M235];[$休日.$B$4:.$B$304]);&quot;&quot;)" office:value-type="float" office:value="1" calcext:value-type="float">
            <text:p>1</text:p>
          </table:table-cell>
          <table:table-cell table:style-name="ce296" office:value-type="float" office:value="100" calcext:value-type="float">
            <text:p>100</text:p>
          </table:table-cell>
          <table:table-cell table:style-name="ce63" table:formula="of:=IF(OR(AND([.$N235]=&quot;&quot;;[.$L235]&lt;&gt;&quot;&quot;;[.$L235]&lt;=[.$U$1]);AND([.$M235]&lt;&gt;&quot;&quot;;[.Q235]&lt;100;[.$M235]&lt;=[.$U$1]));&quot;遅延&quot;;&quot;&quot;)">
            <text:p/>
          </table:table-cell>
          <table:table-cell table:style-name="ce66"/>
          <table:table-cell table:style-name="ce66" table:formula="of:=SUM([.$V235:.$FM23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6]&lt;&gt;&quot;&quot;;[.$F236]=&quot;&quot;);&quot;E&quot;&amp;ROW();[.$B160])" office:value-type="string" office:string-value="E153" calcext:value-type="string">
            <text:p>E153</text:p>
          </table:table-cell>
          <table:table-cell table:style-name="ce13" table:formula="of:=IF(AND([.$D236]&lt;&gt;&quot;&quot;;[.$D236]&lt;&gt;&quot;○&quot;);MAX([.$C$3:.$C235])+1;[.$C235])" office:value-type="float" office:value="11" calcext:value-type="float">
            <text:p>11</text:p>
          </table:table-cell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97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7]&lt;&gt;&quot;&quot;;[.$F237]=&quot;&quot;);&quot;E&quot;&amp;ROW();[.$B160])" office:value-type="string" office:string-value="E153" calcext:value-type="string">
            <text:p>E153</text:p>
          </table:table-cell>
          <table:table-cell table:style-name="ce13" table:formula="of:=IF(AND([.$D237]&lt;&gt;&quot;&quot;;[.$D237]&lt;&gt;&quot;○&quot;);MAX([.$C$3:.$C235])+1;[.$C235])" office:value-type="float" office:value="11" calcext:value-type="float">
            <text:p>11</text:p>
          </table:table-cell>
          <table:table-cell table:style-name="ce19"/>
          <table:table-cell table:style-name="ce27" office:value-type="float" office:value="2" calcext:value-type="float">
            <text:p>2</text:p>
          </table:table-cell>
          <table:table-cell table:style-name="ce32" office:value-type="string" calcext:value-type="string">
            <text:p>テスト実施</text:p>
          </table:table-cell>
          <table:table-cell table:style-name="ce32" table:formula="of:=IF([.$H237]=&quot;&quot;;&quot;&quot;;IF([.$G235]=&quot;&quot;;1;[.$G235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8" calcext:value-type="date">
            <text:p>2026/06/18</text:p>
          </table:table-cell>
          <table:table-cell table:style-name="ce38" office:value-type="date" office:date-value="2026-06-17" calcext:value-type="date">
            <text:p>2026/06/17</text:p>
          </table:table-cell>
          <table:table-cell table:style-name="ce38" office:value-type="date" office:date-value="2026-06-19" calcext:value-type="date">
            <text:p>2026/06/19</text:p>
          </table:table-cell>
          <table:table-cell table:style-name="ce32" table:formula="of:=IF([.$L237]&lt;&gt;&quot;&quot;;NETWORKDAYS([.$L237];[.$M237];[$休日.$B$4:.$B$304]);&quot;&quot;)" office:value-type="float" office:value="1" calcext:value-type="float">
            <text:p>1</text:p>
          </table:table-cell>
          <table:table-cell table:style-name="ce302" office:value-type="float" office:value="100" calcext:value-type="float">
            <text:p>100</text:p>
          </table:table-cell>
          <table:table-cell table:style-name="ce63" table:formula="of:=IF(OR(AND([.$N237]=&quot;&quot;;[.$L237]&lt;&gt;&quot;&quot;;[.$L237]&lt;=[.$U$1]);AND([.$M237]&lt;&gt;&quot;&quot;;[.Q237]&lt;100;[.$M237]&lt;=[.$U$1]));&quot;遅延&quot;;&quot;&quot;)">
            <text:p/>
          </table:table-cell>
          <table:table-cell table:style-name="ce66"/>
          <table:table-cell table:style-name="ce66" table:formula="of:=SUM([.$V237:.$FM23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38]&lt;&gt;&quot;&quot;;[.$F238]=&quot;&quot;);&quot;E&quot;&amp;ROW();[.$B161])" office:value-type="string" office:string-value="E153" calcext:value-type="string">
            <text:p>E153</text:p>
          </table:table-cell>
          <table:table-cell table:style-name="ce13" table:formula="of:=IF(AND([.$D238]&lt;&gt;&quot;&quot;;[.$D238]&lt;&gt;&quot;○&quot;);MAX([.$C$3:.$C237])+1;[.$C237])" office:value-type="float" office:value="11" calcext:value-type="float">
            <text:p>11</text:p>
          </table:table-cell>
          <table:table-cell table:style-name="ce19"/>
          <table:table-cell table:style-name="ce27"/>
          <table:table-cell table:style-name="ce32"/>
          <table:table-cell table:style-name="ce32" table:formula="of:=IF([.$H238]=&quot;&quot;;&quot;&quot;;IF([.$G237]=&quot;&quot;;1;[.$G237]+1))" office:value-type="float" office:value="1" calcext:value-type="float">
            <text:p>1</text:p>
          </table:table-cell>
          <table:table-cell table:style-name="ce32" office:value-type="string" calcext:value-type="string">
            <text:p>テストデータの準備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8" calcext:value-type="date">
            <text:p>2026/06/18</text:p>
          </table:table-cell>
          <table:table-cell table:style-name="ce38" office:value-type="date" office:date-value="2026-06-17" calcext:value-type="date">
            <text:p>2026/06/17</text:p>
          </table:table-cell>
          <table:table-cell table:style-name="ce38" office:value-type="date" office:date-value="2026-06-19" calcext:value-type="date">
            <text:p>2026/06/19</text:p>
          </table:table-cell>
          <table:table-cell table:style-name="ce32" table:formula="of:=IF([.$L238]&lt;&gt;&quot;&quot;;NETWORKDAYS([.$L238];[.$M238];[$休日.$B$4:.$B$304]);&quot;&quot;)" office:value-type="float" office:value="1" calcext:value-type="float">
            <text:p>1</text:p>
          </table:table-cell>
          <table:table-cell table:style-name="ce302" office:value-type="float" office:value="100" calcext:value-type="float">
            <text:p>100</text:p>
          </table:table-cell>
          <table:table-cell table:style-name="ce63" table:formula="of:=IF(OR(AND([.$N238]=&quot;&quot;;[.$L238]&lt;&gt;&quot;&quot;;[.$L238]&lt;=[.$U$1]);AND([.$M238]&lt;&gt;&quot;&quot;;[.Q238]&lt;100;[.$M238]&lt;=[.$U$1]));&quot;遅延&quot;;&quot;&quot;)">
            <text:p/>
          </table:table-cell>
          <table:table-cell table:style-name="ce66"/>
          <table:table-cell table:style-name="ce66" table:formula="of:=SUM([.$V238:.$FM23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39]&lt;&gt;&quot;&quot;;[.$F239]=&quot;&quot;);&quot;E&quot;&amp;ROW();[.$B162])" office:value-type="string" office:string-value="E153" calcext:value-type="string">
            <text:p>E153</text:p>
          </table:table-cell>
          <table:table-cell table:style-name="ce13" table:formula="of:=IF(AND([.$D239]&lt;&gt;&quot;&quot;;[.$D239]&lt;&gt;&quot;○&quot;);MAX([.$C$3:.$C238])+1;[.$C238])" office:value-type="float" office:value="11" calcext:value-type="float">
            <text:p>11</text:p>
          </table:table-cell>
          <table:table-cell table:style-name="ce19"/>
          <table:table-cell table:style-name="ce27" table:formula="of:=IF(AND([.$F239]&lt;&gt;&quot;&quot;;[.$D238]&lt;&gt;&quot;&quot;);1;IF([.$F239]&lt;&gt;&quot;&quot;;MAX(INDIRECT([.$B239]):[.$E238])+1;&quot;&quot;))">
            <text:p/>
          </table:table-cell>
          <table:table-cell table:style-name="ce32"/>
          <table:table-cell table:style-name="ce32" table:formula="of:=IF([.$H239]=&quot;&quot;;&quot;&quot;;IF([.$G238]=&quot;&quot;;1;[.$G238]+1))" office:value-type="float" office:value="2" calcext:value-type="float">
            <text:p>2</text:p>
          </table:table-cell>
          <table:table-cell table:style-name="ce32" office:value-type="string" calcext:value-type="string">
            <text:p>テストの実施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8" calcext:value-type="date">
            <text:p>2026/06/18</text:p>
          </table:table-cell>
          <table:table-cell table:style-name="ce38" office:value-type="date" office:date-value="2026-06-17" calcext:value-type="date">
            <text:p>2026/06/17</text:p>
          </table:table-cell>
          <table:table-cell table:style-name="ce38" office:value-type="date" office:date-value="2026-06-19" calcext:value-type="date">
            <text:p>2026/06/19</text:p>
          </table:table-cell>
          <table:table-cell table:style-name="ce32" table:formula="of:=IF([.$L239]&lt;&gt;&quot;&quot;;NETWORKDAYS([.$L239];[.$M239];[$休日.$B$4:.$B$304]);&quot;&quot;)" office:value-type="float" office:value="1" calcext:value-type="float">
            <text:p>1</text:p>
          </table:table-cell>
          <table:table-cell table:style-name="ce302" office:value-type="float" office:value="100" calcext:value-type="float">
            <text:p>100</text:p>
          </table:table-cell>
          <table:table-cell table:style-name="ce63" table:formula="of:=IF(OR(AND([.$N239]=&quot;&quot;;[.$L239]&lt;&gt;&quot;&quot;;[.$L239]&lt;=[.$U$1]);AND([.$M239]&lt;&gt;&quot;&quot;;[.Q239]&lt;100;[.$M239]&lt;=[.$U$1]));&quot;遅延&quot;;&quot;&quot;)">
            <text:p/>
          </table:table-cell>
          <table:table-cell table:style-name="ce66"/>
          <table:table-cell table:style-name="ce66" table:formula="of:=SUM([.$V239:.$FM23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40]&lt;&gt;&quot;&quot;;[.$F240]=&quot;&quot;);&quot;E&quot;&amp;ROW();[.$B163])" office:value-type="string" office:string-value="E153" calcext:value-type="string">
            <text:p>E153</text:p>
          </table:table-cell>
          <table:table-cell table:style-name="ce13" table:formula="of:=IF(AND([.$D240]&lt;&gt;&quot;&quot;;[.$D240]&lt;&gt;&quot;○&quot;);MAX([.$C$3:.$C239])+1;[.$C239])" office:value-type="float" office:value="11" calcext:value-type="float">
            <text:p>11</text:p>
          </table:table-cell>
          <table:table-cell table:style-name="ce19"/>
          <table:table-cell table:style-name="ce27" table:formula="of:=IF(AND([.$F240]&lt;&gt;&quot;&quot;;[.$D239]&lt;&gt;&quot;&quot;);1;IF([.$F240]&lt;&gt;&quot;&quot;;MAX(INDIRECT([.$B240]):[.$E239])+1;&quot;&quot;))">
            <text:p/>
          </table:table-cell>
          <table:table-cell table:style-name="ce32"/>
          <table:table-cell table:style-name="ce32" table:formula="of:=IF([.$H240]=&quot;&quot;;&quot;&quot;;IF([.$G239]=&quot;&quot;;1;[.$G239]+1))" office:value-type="float" office:value="3" calcext:value-type="float">
            <text:p>3</text:p>
          </table:table-cell>
          <table:table-cell table:style-name="ce32" office:value-type="string" calcext:value-type="string">
            <text:p>テスト証跡の確認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8" calcext:value-type="date">
            <text:p>2026/06/18</text:p>
          </table:table-cell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2" table:formula="of:=IF([.$L240]&lt;&gt;&quot;&quot;;NETWORKDAYS([.$L240];[.$M240];[$休日.$B$4:.$B$304]);&quot;&quot;)" office:value-type="float" office:value="1" calcext:value-type="float">
            <text:p>1</text:p>
          </table:table-cell>
          <table:table-cell table:style-name="ce302" office:value-type="float" office:value="100" calcext:value-type="float">
            <text:p>100</text:p>
          </table:table-cell>
          <table:table-cell table:style-name="ce63" table:formula="of:=IF(OR(AND([.$N240]=&quot;&quot;;[.$L240]&lt;&gt;&quot;&quot;;[.$L240]&lt;=[.$U$1]);AND([.$M240]&lt;&gt;&quot;&quot;;[.Q240]&lt;100;[.$M240]&lt;=[.$U$1]));&quot;遅延&quot;;&quot;&quot;)">
            <text:p/>
          </table:table-cell>
          <table:table-cell table:style-name="ce66"/>
          <table:table-cell table:style-name="ce66" table:formula="of:=SUM([.$V240:.$FM24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41]&lt;&gt;&quot;&quot;;[.$F241]=&quot;&quot;);&quot;E&quot;&amp;ROW();[.$B164])" office:value-type="string" office:string-value="E153" calcext:value-type="string">
            <text:p>E153</text:p>
          </table:table-cell>
          <table:table-cell table:style-name="ce13" table:formula="of:=IF(AND([.$D241]&lt;&gt;&quot;&quot;;[.$D241]&lt;&gt;&quot;○&quot;);MAX([.$C$3:.$C240])+1;[.$C240])" office:value-type="float" office:value="11" calcext:value-type="float">
            <text:p>11</text:p>
          </table:table-cell>
          <table:table-cell table:style-name="ce19"/>
          <table:table-cell table:style-name="ce27" table:formula="of:=IF(AND([.$F241]&lt;&gt;&quot;&quot;;[.$D240]&lt;&gt;&quot;&quot;);1;IF([.$F241]&lt;&gt;&quot;&quot;;MAX(INDIRECT([.$B241]):[.$E240])+1;&quot;&quot;))">
            <text:p/>
          </table:table-cell>
          <table:table-cell table:style-name="ce32"/>
          <table:table-cell table:style-name="ce32" table:formula="of:=IF([.$H241]=&quot;&quot;;&quot;&quot;;IF([.$G240]=&quot;&quot;;1;[.$G240]+1))" office:value-type="float" office:value="4" calcext:value-type="float">
            <text:p>4</text:p>
          </table:table-cell>
          <table:table-cell table:style-name="ce32" office:value-type="string" calcext:value-type="string">
            <text:p>不具合の修正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1" calcext:value-type="date">
            <text:p>2026/06/21</text:p>
          </table:table-cell>
          <table:table-cell table:style-name="ce38" office:value-type="date" office:date-value="2026-06-22" calcext:value-type="date">
            <text:p>2026/06/22</text:p>
          </table:table-cell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2" table:formula="of:=IF([.$L241]&lt;&gt;&quot;&quot;;NETWORKDAYS([.$L241];[.$M241];[$休日.$B$4:.$B$304]);&quot;&quot;)" office:value-type="float" office:value="1" calcext:value-type="float">
            <text:p>1</text:p>
          </table:table-cell>
          <table:table-cell table:style-name="ce302" office:value-type="float" office:value="100" calcext:value-type="float">
            <text:p>100</text:p>
          </table:table-cell>
          <table:table-cell table:style-name="ce63" table:formula="of:=IF(OR(AND([.$N241]=&quot;&quot;;[.$L241]&lt;&gt;&quot;&quot;;[.$L241]&lt;=[.$U$1]);AND([.$M241]&lt;&gt;&quot;&quot;;[.Q241]&lt;100;[.$M241]&lt;=[.$U$1]));&quot;遅延&quot;;&quot;&quot;)">
            <text:p/>
          </table:table-cell>
          <table:table-cell table:style-name="ce66"/>
          <table:table-cell table:style-name="ce66" table:formula="of:=SUM([.$V241:.$FM24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42]&lt;&gt;&quot;&quot;;[.$F242]=&quot;&quot;);&quot;E&quot;&amp;ROW();[.$B165])" office:value-type="string" office:string-value="E153" calcext:value-type="string">
            <text:p>E153</text:p>
          </table:table-cell>
          <table:table-cell table:style-name="ce13" table:formula="of:=IF(AND([.$D242]&lt;&gt;&quot;&quot;;[.$D242]&lt;&gt;&quot;○&quot;);MAX([.$C$3:.$C241])+1;[.$C241])" office:value-type="float" office:value="11" calcext:value-type="float">
            <text:p>11</text:p>
          </table:table-cell>
          <table:table-cell table:style-name="ce19"/>
          <table:table-cell table:style-name="ce27" table:formula="of:=IF(AND([.$F242]&lt;&gt;&quot;&quot;;[.$D241]&lt;&gt;&quot;&quot;);1;IF([.$F242]&lt;&gt;&quot;&quot;;MAX(INDIRECT([.$B242]):[.$E241])+1;&quot;&quot;))">
            <text:p/>
          </table:table-cell>
          <table:table-cell table:style-name="ce32"/>
          <table:table-cell table:style-name="ce32" table:formula="of:=IF([.$H242]=&quot;&quot;;&quot;&quot;;IF([.$G241]=&quot;&quot;;1;[.$G241]+1))" office:value-type="float" office:value="5" calcext:value-type="float">
            <text:p>5</text:p>
          </table:table-cell>
          <table:table-cell table:style-name="ce32" office:value-type="string" calcext:value-type="string">
            <text:p>テストの項目の見直し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1" calcext:value-type="date">
            <text:p>2026/06/21</text:p>
          </table:table-cell>
          <table:table-cell table:style-name="ce38" office:value-type="date" office:date-value="2026-06-22" calcext:value-type="date">
            <text:p>2026/06/22</text:p>
          </table:table-cell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2" table:formula="of:=IF([.$L242]&lt;&gt;&quot;&quot;;NETWORKDAYS([.$L242];[.$M242];[$休日.$B$4:.$B$304]);&quot;&quot;)" office:value-type="float" office:value="1" calcext:value-type="float">
            <text:p>1</text:p>
          </table:table-cell>
          <table:table-cell table:style-name="ce302" office:value-type="float" office:value="100" calcext:value-type="float">
            <text:p>100</text:p>
          </table:table-cell>
          <table:table-cell table:style-name="ce63" table:formula="of:=IF(OR(AND([.$N242]=&quot;&quot;;[.$L242]&lt;&gt;&quot;&quot;;[.$L242]&lt;=[.$U$1]);AND([.$M242]&lt;&gt;&quot;&quot;;[.Q242]&lt;100;[.$M242]&lt;=[.$U$1]));&quot;遅延&quot;;&quot;&quot;)">
            <text:p/>
          </table:table-cell>
          <table:table-cell table:style-name="ce66"/>
          <table:table-cell table:style-name="ce66" table:formula="of:=SUM([.$V242:.$FM24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43]&lt;&gt;&quot;&quot;;[.$F243]=&quot;&quot;);&quot;E&quot;&amp;ROW();[.$B166])" office:value-type="string" office:string-value="E153" calcext:value-type="string">
            <text:p>E153</text:p>
          </table:table-cell>
          <table:table-cell table:style-name="ce13" table:formula="of:=IF(AND([.$D243]&lt;&gt;&quot;&quot;;[.$D243]&lt;&gt;&quot;○&quot;);MAX([.$C$3:.$C242])+1;[.$C242])" office:value-type="float" office:value="11" calcext:value-type="float">
            <text:p>11</text:p>
          </table:table-cell>
          <table:table-cell table:style-name="ce19"/>
          <table:table-cell table:style-name="ce27" table:formula="of:=IF(AND([.$F243]&lt;&gt;&quot;&quot;;[.$D242]&lt;&gt;&quot;&quot;);1;IF([.$F243]&lt;&gt;&quot;&quot;;MAX(INDIRECT([.$B243]):[.$E242])+1;&quot;&quot;))">
            <text:p/>
          </table:table-cell>
          <table:table-cell table:style-name="ce32"/>
          <table:table-cell table:style-name="ce32" table:formula="of:=IF([.$H243]=&quot;&quot;;&quot;&quot;;IF([.$G242]=&quot;&quot;;1;[.$G242]+1))" office:value-type="float" office:value="6" calcext:value-type="float">
            <text:p>6</text:p>
          </table:table-cell>
          <table:table-cell table:style-name="ce32" office:value-type="string" calcext:value-type="string">
            <text:p>テストの再実施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2" calcext:value-type="date">
            <text:p>2026/06/22</text:p>
          </table:table-cell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2" table:formula="of:=IF([.$L243]&lt;&gt;&quot;&quot;;NETWORKDAYS([.$L243];[.$M243];[$休日.$B$4:.$B$304]);&quot;&quot;)" office:value-type="float" office:value="1" calcext:value-type="float">
            <text:p>1</text:p>
          </table:table-cell>
          <table:table-cell table:style-name="ce302" office:value-type="float" office:value="100" calcext:value-type="float">
            <text:p>100</text:p>
          </table:table-cell>
          <table:table-cell table:style-name="ce63" table:formula="of:=IF(OR(AND([.$N243]=&quot;&quot;;[.$L243]&lt;&gt;&quot;&quot;;[.$L243]&lt;=[.$U$1]);AND([.$M243]&lt;&gt;&quot;&quot;;[.Q243]&lt;100;[.$M243]&lt;=[.$U$1]));&quot;遅延&quot;;&quot;&quot;)">
            <text:p/>
          </table:table-cell>
          <table:table-cell table:style-name="ce66"/>
          <table:table-cell table:style-name="ce66" table:formula="of:=SUM([.$V243:.$FM24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44]&lt;&gt;&quot;&quot;;[.$F244]=&quot;&quot;);&quot;E&quot;&amp;ROW();[.$B167])" office:value-type="string" office:string-value="E153" calcext:value-type="string">
            <text:p>E153</text:p>
          </table:table-cell>
          <table:table-cell table:style-name="ce13" table:formula="of:=IF(AND([.$D244]&lt;&gt;&quot;&quot;;[.$D244]&lt;&gt;&quot;○&quot;);MAX([.$C$3:.$C243])+1;[.$C243])" office:value-type="float" office:value="11" calcext:value-type="float">
            <text:p>11</text:p>
          </table:table-cell>
          <table:table-cell table:style-name="ce19"/>
          <table:table-cell table:style-name="ce27" table:formula="of:=IF(AND([.$F244]&lt;&gt;&quot;&quot;;[.$D243]&lt;&gt;&quot;&quot;);1;IF([.$F244]&lt;&gt;&quot;&quot;;MAX(INDIRECT([.$B244]):[.$E243])+1;&quot;&quot;))">
            <text:p/>
          </table:table-cell>
          <table:table-cell table:style-name="ce32"/>
          <table:table-cell table:style-name="ce32" table:formula="of:=IF([.$H244]=&quot;&quot;;&quot;&quot;;IF([.$G243]=&quot;&quot;;1;[.$G24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44]&lt;&gt;&quot;&quot;;NETWORKDAYS([.$L244];[.$M244];[$休日.$B$4:.$B$304]);&quot;&quot;)">
            <text:p/>
          </table:table-cell>
          <table:table-cell table:style-name="ce297"/>
          <table:table-cell table:style-name="ce63" table:formula="of:=IF(OR(AND([.$N244]=&quot;&quot;;[.$L244]&lt;&gt;&quot;&quot;;[.$L244]&lt;=[.$U$1]);AND([.$M244]&lt;&gt;&quot;&quot;;[.Q244]&lt;100;[.$M244]&lt;=[.$U$1]));&quot;遅延&quot;;&quot;&quot;)">
            <text:p/>
          </table:table-cell>
          <table:table-cell table:style-name="ce66"/>
          <table:table-cell table:style-name="ce66" table:formula="of:=SUM([.$V244:.$FM24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45]&lt;&gt;&quot;&quot;;[.$F245]=&quot;&quot;);&quot;E&quot;&amp;ROW();[.$B168])" office:value-type="string" office:string-value="E153" calcext:value-type="string">
            <text:p>E153</text:p>
          </table:table-cell>
          <table:table-cell table:style-name="ce13" table:formula="of:=IF(AND([.$D245]&lt;&gt;&quot;&quot;;[.$D245]&lt;&gt;&quot;○&quot;);MAX([.$C$3:.$C244])+1;[.$C244])" office:value-type="float" office:value="11" calcext:value-type="float">
            <text:p>11</text:p>
          </table:table-cell>
          <table:table-cell table:style-name="ce19"/>
          <table:table-cell table:style-name="ce27" office:value-type="float" office:value="3" calcext:value-type="float">
            <text:p>3</text:p>
          </table:table-cell>
          <table:table-cell table:style-name="ce32" office:value-type="string" calcext:value-type="string">
            <text:p>テスト成績書の作成</text:p>
          </table:table-cell>
          <table:table-cell table:style-name="ce32" table:formula="of:=IF([.$H245]=&quot;&quot;;&quot;&quot;;IF([.$G244]=&quot;&quot;;1;[.$G244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38" office:value-type="date" office:date-value="2026-06-22" calcext:value-type="date">
            <text:p>2026/06/22</text:p>
          </table:table-cell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2" table:formula="of:=IF([.$L245]&lt;&gt;&quot;&quot;;NETWORKDAYS([.$L245];[.$M245];[$休日.$B$4:.$B$304]);&quot;&quot;)" office:value-type="float" office:value="1" calcext:value-type="float">
            <text:p>1</text:p>
          </table:table-cell>
          <table:table-cell table:style-name="ce304" office:value-type="float" office:value="100" calcext:value-type="float">
            <text:p>100</text:p>
          </table:table-cell>
          <table:table-cell table:style-name="ce63" table:formula="of:=IF(OR(AND([.$N245]=&quot;&quot;;[.$L245]&lt;&gt;&quot;&quot;;[.$L245]&lt;=[.$U$1]);AND([.$M245]&lt;&gt;&quot;&quot;;[.Q245]&lt;100;[.$M245]&lt;=[.$U$1]));&quot;遅延&quot;;&quot;&quot;)">
            <text:p/>
          </table:table-cell>
          <table:table-cell table:style-name="ce66"/>
          <table:table-cell table:style-name="ce66" table:formula="of:=SUM([.$V245:.$FM24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46]&lt;&gt;&quot;&quot;;[.$F246]=&quot;&quot;);&quot;E&quot;&amp;ROW();[.$B169])" office:value-type="string" office:string-value="E153" calcext:value-type="string">
            <text:p>E153</text:p>
          </table:table-cell>
          <table:table-cell table:style-name="ce13" table:formula="of:=IF(AND([.$D246]&lt;&gt;&quot;&quot;;[.$D246]&lt;&gt;&quot;○&quot;);MAX([.$C$3:.$C245])+1;[.$C245])" office:value-type="float" office:value="11" calcext:value-type="float">
            <text:p>11</text:p>
          </table:table-cell>
          <table:table-cell table:style-name="ce19"/>
          <table:table-cell table:style-name="ce27" table:formula="of:=IF(AND([.$F246]&lt;&gt;&quot;&quot;;[.$D245]&lt;&gt;&quot;&quot;);1;IF([.$F246]&lt;&gt;&quot;&quot;;MAX(INDIRECT([.$B246]):[.$E245])+1;&quot;&quot;))">
            <text:p/>
          </table:table-cell>
          <table:table-cell table:style-name="ce32"/>
          <table:table-cell table:style-name="ce32" table:formula="of:=IF([.$H246]=&quot;&quot;;&quot;&quot;;IF([.$G245]=&quot;&quot;;1;[.$G245]+1))" office:value-type="float" office:value="1" calcext:value-type="float">
            <text:p>1</text:p>
          </table:table-cell>
          <table:table-cell table:style-name="ce32" office:value-type="string" calcext:value-type="string">
            <text:p>テスト記録・テスト証跡の確認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2" calcext:value-type="date">
            <text:p>2026/06/22</text:p>
          </table:table-cell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2" table:formula="of:=IF([.$L246]&lt;&gt;&quot;&quot;;NETWORKDAYS([.$L246];[.$M246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46]=&quot;&quot;;[.$L246]&lt;&gt;&quot;&quot;;[.$L246]&lt;=[.$U$1]);AND([.$M246]&lt;&gt;&quot;&quot;;[.Q246]&lt;100;[.$M246]&lt;=[.$U$1]));&quot;遅延&quot;;&quot;&quot;)">
            <text:p/>
          </table:table-cell>
          <table:table-cell table:style-name="ce66"/>
          <table:table-cell table:style-name="ce66" table:formula="of:=SUM([.$V246:.$FM24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47]&lt;&gt;&quot;&quot;;[.$F247]=&quot;&quot;);&quot;E&quot;&amp;ROW();[.$B170])" office:value-type="string" office:string-value="E153" calcext:value-type="string">
            <text:p>E153</text:p>
          </table:table-cell>
          <table:table-cell table:style-name="ce13" table:formula="of:=IF(AND([.$D247]&lt;&gt;&quot;&quot;;[.$D247]&lt;&gt;&quot;○&quot;);MAX([.$C$3:.$C246])+1;[.$C246])" office:value-type="float" office:value="11" calcext:value-type="float">
            <text:p>11</text:p>
          </table:table-cell>
          <table:table-cell table:style-name="ce19"/>
          <table:table-cell table:style-name="ce27" table:formula="of:=IF(AND([.$F247]&lt;&gt;&quot;&quot;;[.$D246]&lt;&gt;&quot;&quot;);1;IF([.$F247]&lt;&gt;&quot;&quot;;MAX(INDIRECT([.$B247]):[.$E246])+1;&quot;&quot;))">
            <text:p/>
          </table:table-cell>
          <table:table-cell table:style-name="ce32"/>
          <table:table-cell table:style-name="ce32" table:formula="of:=IF([.$H247]=&quot;&quot;;&quot;&quot;;IF([.$G246]=&quot;&quot;;1;[.$G246]+1))" office:value-type="float" office:value="2" calcext:value-type="float">
            <text:p>2</text:p>
          </table:table-cell>
          <table:table-cell table:style-name="ce32" office:value-type="string" calcext:value-type="string">
            <text:p>テスト成績書のチーム内レビュー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2" calcext:value-type="date">
            <text:p>2026/06/22</text:p>
          </table:table-cell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2" table:formula="of:=IF([.$L247]&lt;&gt;&quot;&quot;;NETWORKDAYS([.$L247];[.$M247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47]=&quot;&quot;;[.$L247]&lt;&gt;&quot;&quot;;[.$L247]&lt;=[.$U$1]);AND([.$M247]&lt;&gt;&quot;&quot;;[.Q247]&lt;100;[.$M247]&lt;=[.$U$1]));&quot;遅延&quot;;&quot;&quot;)">
            <text:p/>
          </table:table-cell>
          <table:table-cell table:style-name="ce66"/>
          <table:table-cell table:style-name="ce66" table:formula="of:=SUM([.$V247:.$FM24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48]&lt;&gt;&quot;&quot;;[.$F248]=&quot;&quot;);&quot;E&quot;&amp;ROW();[.$B171])" office:value-type="string" office:string-value="E153" calcext:value-type="string">
            <text:p>E153</text:p>
          </table:table-cell>
          <table:table-cell table:style-name="ce13" table:formula="of:=IF(AND([.$D248]&lt;&gt;&quot;&quot;;[.$D248]&lt;&gt;&quot;○&quot;);MAX([.$C$3:.$C247])+1;[.$C247])" office:value-type="float" office:value="11" calcext:value-type="float">
            <text:p>11</text:p>
          </table:table-cell>
          <table:table-cell table:style-name="ce19"/>
          <table:table-cell table:style-name="ce27" table:formula="of:=IF(AND([.$F248]&lt;&gt;&quot;&quot;;[.$D247]&lt;&gt;&quot;&quot;);1;IF([.$F248]&lt;&gt;&quot;&quot;;MAX(INDIRECT([.$B248]):[.$E247])+1;&quot;&quot;))">
            <text:p/>
          </table:table-cell>
          <table:table-cell table:style-name="ce32"/>
          <table:table-cell table:style-name="ce32" table:formula="of:=IF([.$H248]=&quot;&quot;;&quot;&quot;;IF([.$G247]=&quot;&quot;;1;[.$G247]+1))" office:value-type="float" office:value="3" calcext:value-type="float">
            <text:p>3</text:p>
          </table:table-cell>
          <table:table-cell table:style-name="ce32" office:value-type="string" calcext:value-type="string">
            <text:p>テスト成績書の編集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2" calcext:value-type="date">
            <text:p>2026/06/22</text:p>
          </table:table-cell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2" table:formula="of:=IF([.$L248]&lt;&gt;&quot;&quot;;NETWORKDAYS([.$L248];[.$M248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48]=&quot;&quot;;[.$L248]&lt;&gt;&quot;&quot;;[.$L248]&lt;=[.$U$1]);AND([.$M248]&lt;&gt;&quot;&quot;;[.Q248]&lt;100;[.$M248]&lt;=[.$U$1]));&quot;遅延&quot;;&quot;&quot;)">
            <text:p/>
          </table:table-cell>
          <table:table-cell table:style-name="ce66"/>
          <table:table-cell table:style-name="ce66" table:formula="of:=SUM([.$V248:.$FM24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49]&lt;&gt;&quot;&quot;;[.$F249]=&quot;&quot;);&quot;E&quot;&amp;ROW();[.$B172])" office:value-type="string" office:string-value="E153" calcext:value-type="string">
            <text:p>E153</text:p>
          </table:table-cell>
          <table:table-cell table:style-name="ce13" table:formula="of:=IF(AND([.$D249]&lt;&gt;&quot;&quot;;[.$D249]&lt;&gt;&quot;○&quot;);MAX([.$C$3:.$C248])+1;[.$C248])" office:value-type="float" office:value="11" calcext:value-type="float">
            <text:p>11</text:p>
          </table:table-cell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0]&lt;&gt;&quot;&quot;;[.$F250]=&quot;&quot;);&quot;E&quot;&amp;ROW();[.$B173])" office:value-type="string" office:string-value="E250" calcext:value-type="string">
            <text:p>E250</text:p>
          </table:table-cell>
          <table:table-cell table:style-name="ce13" table:formula="of:=IF(AND([.$D250]&lt;&gt;&quot;&quot;;[.$D250]&lt;&gt;&quot;○&quot;);MAX([.$C$3:.$C249])+1;[.$C249])" office:value-type="float" office:value="12" calcext:value-type="float">
            <text:p>12</text:p>
          </table:table-cell>
          <table:table-cell table:style-name="ce19" office:value-type="string" calcext:value-type="string">
            <text:p>デプロイ</text:p>
          </table:table-cell>
          <table:table-cell table:style-name="ce27" table:formula="of:=IF(AND([.$F250]&lt;&gt;&quot;&quot;;[.$D217]&lt;&gt;&quot;&quot;);1;IF([.$F250]&lt;&gt;&quot;&quot;;MAX(INDIRECT(#REF!):[.$E217])+1;&quot;&quot;))">
            <text:p/>
          </table:table-cell>
          <table:table-cell table:style-name="ce32"/>
          <table:table-cell table:style-name="ce32" table:formula="of:=IF([.$H250]=&quot;&quot;;&quot;&quot;;IF([.$G217]=&quot;&quot;;1;[.$G217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office:value-type="date" office:date-value="2626-06-11" calcext:value-type="date">
            <text:p>2626/06/11</text:p>
          </table:table-cell>
          <table:table-cell table:style-name="ce38" office:value-type="date" office:date-value="2026-06-19" calcext:value-type="date">
            <text:p>2026/06/19</text:p>
          </table:table-cell>
          <table:table-cell table:style-name="ce32" table:formula="of:=IF([.$L250]&lt;&gt;&quot;&quot;;NETWORKDAYS([.$L250];[.$M250];[$休日.$B$4:.$B$304]);&quot;&quot;)" office:value-type="float" office:value="1" calcext:value-type="float">
            <text:p>1</text:p>
          </table:table-cell>
          <table:table-cell table:style-name="ce305" office:value-type="float" office:value="100" calcext:value-type="float">
            <text:p>100</text:p>
          </table:table-cell>
          <table:table-cell table:style-name="ce63" table:formula="of:=IF(OR(AND([.$N250]=&quot;&quot;;[.$L250]&lt;&gt;&quot;&quot;;[.$L250]&lt;=[.$U$1]);AND([.$M250]&lt;&gt;&quot;&quot;;[.Q250]&lt;100;[.$M250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1]&lt;&gt;&quot;&quot;;[.$F251]=&quot;&quot;);&quot;E&quot;&amp;ROW();[.$B174])" office:value-type="string" office:string-value="E153" calcext:value-type="string">
            <text:p>E153</text:p>
          </table:table-cell>
          <table:table-cell table:style-name="ce13" table:formula="of:=IF(AND([.$D251]&lt;&gt;&quot;&quot;;[.$D251]&lt;&gt;&quot;○&quot;);MAX([.$C$3:.$C250])+1;[.$C250])" office:value-type="float" office:value="12" calcext:value-type="float">
            <text:p>12</text:p>
          </table:table-cell>
          <table:table-cell table:style-name="ce19"/>
          <table:table-cell table:style-name="ce27" table:formula="of:=IF(AND([.$F251]&lt;&gt;&quot;&quot;;[.$D250]&lt;&gt;&quot;&quot;);1;IF([.$F251]&lt;&gt;&quot;&quot;;MAX(INDIRECT(#REF!):[.$E250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デプロイ手順書の読み込み</text:p>
          </table:table-cell>
          <table:table-cell table:style-name="ce32" table:formula="of:=IF([.$H251]=&quot;&quot;;&quot;&quot;;IF([.$G250]=&quot;&quot;;1;[.$G250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2" table:formula="of:=IF([.$L251]&lt;&gt;&quot;&quot;;NETWORKDAYS([.$L251];[.$M251];[$休日.$B$4:.$B$304]);&quot;&quot;)" office:value-type="float" office:value="1" calcext:value-type="float">
            <text:p>1</text:p>
          </table:table-cell>
          <table:table-cell table:style-name="ce300" office:value-type="float" office:value="100" calcext:value-type="float">
            <text:p>100</text:p>
          </table:table-cell>
          <table:table-cell table:style-name="ce63" table:formula="of:=IF(OR(AND([.$N251]=&quot;&quot;;[.$L251]&lt;&gt;&quot;&quot;;[.$L251]&lt;=[.$U$1]);AND([.$M251]&lt;&gt;&quot;&quot;;[.Q251]&lt;100;[.$M251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2]&lt;&gt;&quot;&quot;;[.$F252]=&quot;&quot;);&quot;E&quot;&amp;ROW();[.$B175])" office:value-type="string" office:string-value="E153" calcext:value-type="string">
            <text:p>E153</text:p>
          </table:table-cell>
          <table:table-cell table:style-name="ce13" table:formula="of:=IF(AND([.$D252]&lt;&gt;&quot;&quot;;[.$D252]&lt;&gt;&quot;○&quot;);MAX([.$C$3:.$C251])+1;[.$C251])" office:value-type="float" office:value="12" calcext:value-type="float">
            <text:p>12</text:p>
          </table:table-cell>
          <table:table-cell table:style-name="ce19"/>
          <table:table-cell table:style-name="ce27" table:formula="of:=IF(AND([.$F252]&lt;&gt;&quot;&quot;;[.$D251]&lt;&gt;&quot;&quot;);1;IF([.$F252]&lt;&gt;&quot;&quot;;MAX(INDIRECT(#REF!):[.$E251])+1;&quot;&quot;))">
            <text:p/>
          </table:table-cell>
          <table:table-cell table:style-name="ce32"/>
          <table:table-cell table:style-name="ce32" table:formula="of:=IF([.$H252]=&quot;&quot;;&quot;&quot;;IF([.$G251]=&quot;&quot;;1;[.$G251]+1))" office:value-type="float" office:value="1" calcext:value-type="float">
            <text:p>1</text:p>
          </table:table-cell>
          <table:table-cell table:style-name="ce32" office:value-type="string" calcext:value-type="string">
            <text:p>デプロイ手順書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2" table:formula="of:=IF([.$L252]&lt;&gt;&quot;&quot;;NETWORKDAYS([.$L252];[.$M252];[$休日.$B$4:.$B$304]);&quot;&quot;)" office:value-type="float" office:value="1" calcext:value-type="float">
            <text:p>1</text:p>
          </table:table-cell>
          <table:table-cell table:style-name="ce300" office:value-type="float" office:value="100" calcext:value-type="float">
            <text:p>100</text:p>
          </table:table-cell>
          <table:table-cell table:style-name="ce63" table:formula="of:=IF(OR(AND([.$N252]=&quot;&quot;;[.$L252]&lt;&gt;&quot;&quot;;[.$L252]&lt;=[.$U$1]);AND([.$M252]&lt;&gt;&quot;&quot;;[.Q252]&lt;100;[.$M252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3]&lt;&gt;&quot;&quot;;[.$F253]=&quot;&quot;);&quot;E&quot;&amp;ROW();[.$B176])" office:value-type="string" office:string-value="E153" calcext:value-type="string">
            <text:p>E153</text:p>
          </table:table-cell>
          <table:table-cell table:style-name="ce13" table:formula="of:=IF(AND([.$D253]&lt;&gt;&quot;&quot;;[.$D253]&lt;&gt;&quot;○&quot;);MAX([.$C$3:.$C252])+1;[.$C252])" office:value-type="float" office:value="12" calcext:value-type="float">
            <text:p>12</text:p>
          </table:table-cell>
          <table:table-cell table:style-name="ce19"/>
          <table:table-cell table:style-name="ce27" table:formula="of:=IF(AND([.$F253]&lt;&gt;&quot;&quot;;[.$D252]&lt;&gt;&quot;&quot;);1;IF([.$F253]&lt;&gt;&quot;&quot;;MAX(INDIRECT(#REF!):[.$E252])+1;&quot;&quot;))">
            <text:p/>
          </table:table-cell>
          <table:table-cell table:style-name="ce32"/>
          <table:table-cell table:style-name="ce32" table:formula="of:=IF([.$H253]=&quot;&quot;;&quot;&quot;;IF([.$G252]=&quot;&quot;;1;[.$G252]+1))" office:value-type="float" office:value="2" calcext:value-type="float">
            <text:p>2</text:p>
          </table:table-cell>
          <table:table-cell table:style-name="ce32" office:value-type="string" calcext:value-type="string">
            <text:p>実行環境に必要なデータ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2" table:formula="of:=IF([.$L253]&lt;&gt;&quot;&quot;;NETWORKDAYS([.$L253];[.$M253];[$休日.$B$4:.$B$304]);&quot;&quot;)" office:value-type="float" office:value="1" calcext:value-type="float">
            <text:p>1</text:p>
          </table:table-cell>
          <table:table-cell table:style-name="ce300" office:value-type="float" office:value="100" calcext:value-type="float">
            <text:p>100</text:p>
          </table:table-cell>
          <table:table-cell table:style-name="ce63" table:formula="of:=IF(OR(AND([.$N253]=&quot;&quot;;[.$L253]&lt;&gt;&quot;&quot;;[.$L253]&lt;=[.$U$1]);AND([.$M253]&lt;&gt;&quot;&quot;;[.Q253]&lt;100;[.$M253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4]&lt;&gt;&quot;&quot;;[.$F254]=&quot;&quot;);&quot;E&quot;&amp;ROW();[.$B177])" office:value-type="string" office:string-value="E153" calcext:value-type="string">
            <text:p>E153</text:p>
          </table:table-cell>
          <table:table-cell table:style-name="ce13" table:formula="of:=IF(AND([.$D254]&lt;&gt;&quot;&quot;;[.$D254]&lt;&gt;&quot;○&quot;);MAX([.$C$3:.$C253])+1;[.$C253])" office:value-type="float" office:value="12" calcext:value-type="float">
            <text:p>12</text:p>
          </table:table-cell>
          <table:table-cell table:style-name="ce19"/>
          <table:table-cell table:style-name="ce27" office:value-type="float" office:value="2" calcext:value-type="float">
            <text:p>2</text:p>
          </table:table-cell>
          <table:table-cell table:style-name="ce32" office:value-type="string" calcext:value-type="string">
            <text:p>必要なデータの準備</text:p>
          </table:table-cell>
          <table:table-cell table:style-name="ce32" table:formula="of:=IF([.$H254]=&quot;&quot;;&quot;&quot;;IF([.$G253]=&quot;&quot;;1;[.$G253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office:value-type="date" office:date-value="2626-06-11" calcext:value-type="date">
            <text:p>2626/06/11</text:p>
          </table:table-cell>
          <table:table-cell table:style-name="ce38" office:value-type="date" office:date-value="2026-06-19" calcext:value-type="date">
            <text:p>2026/06/19</text:p>
          </table:table-cell>
          <table:table-cell table:style-name="ce32" table:formula="of:=IF([.$L254]&lt;&gt;&quot;&quot;;NETWORKDAYS([.$L254];[.$M254];[$休日.$B$4:.$B$304]);&quot;&quot;)" office:value-type="float" office:value="1" calcext:value-type="float">
            <text:p>1</text:p>
          </table:table-cell>
          <table:table-cell table:style-name="ce300" office:value-type="float" office:value="100" calcext:value-type="float">
            <text:p>100</text:p>
          </table:table-cell>
          <table:table-cell table:style-name="ce63" table:formula="of:=IF(OR(AND([.$N254]=&quot;&quot;;[.$L254]&lt;&gt;&quot;&quot;;[.$L254]&lt;=[.$U$1]);AND([.$M254]&lt;&gt;&quot;&quot;;[.Q254]&lt;100;[.$M254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5]&lt;&gt;&quot;&quot;;[.$F255]=&quot;&quot;);&quot;E&quot;&amp;ROW();[.$B178])" office:value-type="string" office:string-value="E153" calcext:value-type="string">
            <text:p>E153</text:p>
          </table:table-cell>
          <table:table-cell table:style-name="ce13" table:formula="of:=IF(AND([.$D255]&lt;&gt;&quot;&quot;;[.$D255]&lt;&gt;&quot;○&quot;);MAX([.$C$3:.$C254])+1;[.$C254])" office:value-type="float" office:value="12" calcext:value-type="float">
            <text:p>12</text:p>
          </table:table-cell>
          <table:table-cell table:style-name="ce19"/>
          <table:table-cell table:style-name="ce27" table:formula="of:=IF(AND([.$F255]&lt;&gt;&quot;&quot;;[.$D254]&lt;&gt;&quot;&quot;);1;IF([.$F255]&lt;&gt;&quot;&quot;;MAX(INDIRECT(#REF!):[.$E254])+1;&quot;&quot;))">
            <text:p/>
          </table:table-cell>
          <table:table-cell table:style-name="ce32"/>
          <table:table-cell table:style-name="ce32" table:formula="of:=IF([.$H255]=&quot;&quot;;&quot;&quot;;IF([.$G254]=&quot;&quot;;1;[.$G254]+1))" office:value-type="float" office:value="1" calcext:value-type="float">
            <text:p>1</text:p>
          </table:table-cell>
          <table:table-cell table:style-name="ce32" office:value-type="string" calcext:value-type="string">
            <text:p>SQL文の準備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office:value-type="date" office:date-value="2626-06-11" calcext:value-type="date">
            <text:p>2626/06/11</text:p>
          </table:table-cell>
          <table:table-cell table:style-name="ce38" office:value-type="date" office:date-value="2626-06-12" calcext:value-type="date">
            <text:p>2626/06/12</text:p>
          </table:table-cell>
          <table:table-cell table:style-name="ce32" table:formula="of:=IF([.$L255]&lt;&gt;&quot;&quot;;NETWORKDAYS([.$L255];[.$M255];[$休日.$B$4:.$B$304]);&quot;&quot;)" office:value-type="float" office:value="1" calcext:value-type="float">
            <text:p>1</text:p>
          </table:table-cell>
          <table:table-cell table:style-name="ce300" office:value-type="float" office:value="100" calcext:value-type="float">
            <text:p>100</text:p>
          </table:table-cell>
          <table:table-cell table:style-name="ce63" table:formula="of:=IF(OR(AND([.$N255]=&quot;&quot;;[.$L255]&lt;&gt;&quot;&quot;;[.$L255]&lt;=[.$U$1]);AND([.$M255]&lt;&gt;&quot;&quot;;[.Q255]&lt;100;[.$M255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6]&lt;&gt;&quot;&quot;;[.$F256]=&quot;&quot;);&quot;E&quot;&amp;ROW();[.$B179])" office:value-type="string" office:string-value="E153" calcext:value-type="string">
            <text:p>E153</text:p>
          </table:table-cell>
          <table:table-cell table:style-name="ce13" table:formula="of:=IF(AND([.$D256]&lt;&gt;&quot;&quot;;[.$D256]&lt;&gt;&quot;○&quot;);MAX([.$C$3:.$C255])+1;[.$C255])" office:value-type="float" office:value="12" calcext:value-type="float">
            <text:p>12</text:p>
          </table:table-cell>
          <table:table-cell table:style-name="ce19"/>
          <table:table-cell table:style-name="ce27" table:formula="of:=IF(AND([.$F256]&lt;&gt;&quot;&quot;;[.$D255]&lt;&gt;&quot;&quot;);1;IF([.$F256]&lt;&gt;&quot;&quot;;MAX(INDIRECT(#REF!):[.$E255])+1;&quot;&quot;))">
            <text:p/>
          </table:table-cell>
          <table:table-cell table:style-name="ce32"/>
          <table:table-cell table:style-name="ce32" table:formula="of:=IF([.$H256]=&quot;&quot;;&quot;&quot;;IF([.$G255]=&quot;&quot;;1;[.$G255]+1))" office:value-type="float" office:value="2" calcext:value-type="float">
            <text:p>2</text:p>
          </table:table-cell>
          <table:table-cell table:style-name="ce32" office:value-type="string" calcext:value-type="string">
            <text:p>デプロイ用のソースコード、画像ファイルの準備</text:p>
          </table:table-cell>
          <table:table-cell table:style-name="ce32"/>
          <table:table-cell table:style-name="ce32" office:value-type="string" calcext:value-type="string">
            <text:p>春山、伊藤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number-columns-repeated="2" table:style-name="ce38" office:value-type="date" office:date-value="2626-06-11" calcext:value-type="date">
            <text:p>2626/06/11</text:p>
          </table:table-cell>
          <table:table-cell table:style-name="ce32" table:formula="of:=IF([.$L256]&lt;&gt;&quot;&quot;;NETWORKDAYS([.$L256];[.$M256];[$休日.$B$4:.$B$304]);&quot;&quot;)" office:value-type="float" office:value="1" calcext:value-type="float">
            <text:p>1</text:p>
          </table:table-cell>
          <table:table-cell table:style-name="ce300" office:value-type="float" office:value="100" calcext:value-type="float">
            <text:p>100</text:p>
          </table:table-cell>
          <table:table-cell table:style-name="ce63" table:formula="of:=IF(OR(AND([.$N256]=&quot;&quot;;[.$L256]&lt;&gt;&quot;&quot;;[.$L256]&lt;=[.$U$1]);AND([.$M256]&lt;&gt;&quot;&quot;;[.Q256]&lt;100;[.$M256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7]&lt;&gt;&quot;&quot;;[.$F257]=&quot;&quot;);&quot;E&quot;&amp;ROW();[.$B180])" office:value-type="string" office:string-value="E153" calcext:value-type="string">
            <text:p>E153</text:p>
          </table:table-cell>
          <table:table-cell table:style-name="ce13" table:formula="of:=IF(AND([.$D257]&lt;&gt;&quot;&quot;;[.$D257]&lt;&gt;&quot;○&quot;);MAX([.$C$3:.$C256])+1;[.$C256])" office:value-type="float" office:value="12" calcext:value-type="float">
            <text:p>12</text:p>
          </table:table-cell>
          <table:table-cell table:style-name="ce19"/>
          <table:table-cell table:style-name="ce27" table:formula="of:=IF(AND([.$F257]&lt;&gt;&quot;&quot;;[.$D256]&lt;&gt;&quot;&quot;);1;IF([.$F257]&lt;&gt;&quot;&quot;;MAX(INDIRECT(#REF!):[.$E256])+1;&quot;&quot;))">
            <text:p/>
          </table:table-cell>
          <table:table-cell table:style-name="ce32"/>
          <table:table-cell table:style-name="ce32" table:formula="of:=IF([.$H257]=&quot;&quot;;&quot;&quot;;IF([.$G256]=&quot;&quot;;1;[.$G256]+1))" office:value-type="float" office:value="3" calcext:value-type="float">
            <text:p>3</text:p>
          </table:table-cell>
          <table:table-cell table:style-name="ce32" office:value-type="string" calcext:value-type="string">
            <text:p>Linux用RPMファイルの準備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2" table:formula="of:=IF([.$L257]&lt;&gt;&quot;&quot;;NETWORKDAYS([.$L257];[.$M257];[$休日.$B$4:.$B$304]);&quot;&quot;)" office:value-type="float" office:value="1" calcext:value-type="float">
            <text:p>1</text:p>
          </table:table-cell>
          <table:table-cell table:style-name="ce307" office:value-type="float" office:value="100" calcext:value-type="float">
            <text:p>100</text:p>
          </table:table-cell>
          <table:table-cell table:style-name="ce63" table:formula="of:=IF(OR(AND([.$N257]=&quot;&quot;;[.$L257]&lt;&gt;&quot;&quot;;[.$L257]&lt;=[.$U$1]);AND([.$M257]&lt;&gt;&quot;&quot;;[.Q257]&lt;100;[.$M257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8]&lt;&gt;&quot;&quot;;[.$F258]=&quot;&quot;);&quot;E&quot;&amp;ROW();[.$B181])" office:value-type="string" office:string-value="E153" calcext:value-type="string">
            <text:p>E153</text:p>
          </table:table-cell>
          <table:table-cell table:style-name="ce13" table:formula="of:=IF(AND([.$D258]&lt;&gt;&quot;&quot;;[.$D258]&lt;&gt;&quot;○&quot;);MAX([.$C$3:.$C257])+1;[.$C257])" office:value-type="float" office:value="12" calcext:value-type="float">
            <text:p>12</text:p>
          </table:table-cell>
          <table:table-cell table:style-name="ce19"/>
          <table:table-cell table:style-name="ce27" table:formula="of:=IF(AND([.$F258]&lt;&gt;&quot;&quot;;[.$D257]&lt;&gt;&quot;&quot;);1;IF([.$F258]&lt;&gt;&quot;&quot;;MAX(INDIRECT(#REF!):[.$E257])+1;&quot;&quot;))">
            <text:p/>
          </table:table-cell>
          <table:table-cell table:style-name="ce32"/>
          <table:table-cell table:style-name="ce32" table:formula="of:=IF([.$H258]=&quot;&quot;;&quot;&quot;;IF([.$G257]=&quot;&quot;;1;[.$G257]+1))" office:value-type="float" office:value="4" calcext:value-type="float">
            <text:p>4</text:p>
          </table:table-cell>
          <table:table-cell table:style-name="ce32" office:value-type="string" calcext:value-type="string">
            <text:p>安心サンドボックスへの接続準備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2" table:formula="of:=IF([.$L258]&lt;&gt;&quot;&quot;;NETWORKDAYS([.$L258];[.$M258];[$休日.$B$4:.$B$304]);&quot;&quot;)" office:value-type="float" office:value="1" calcext:value-type="float">
            <text:p>1</text:p>
          </table:table-cell>
          <table:table-cell table:style-name="ce300" office:value-type="float" office:value="100" calcext:value-type="float">
            <text:p>100</text:p>
          </table:table-cell>
          <table:table-cell table:style-name="ce63" table:formula="of:=IF(OR(AND([.$N258]=&quot;&quot;;[.$L258]&lt;&gt;&quot;&quot;;[.$L258]&lt;=[.$U$1]);AND([.$M258]&lt;&gt;&quot;&quot;;[.Q258]&lt;100;[.$M258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9]&lt;&gt;&quot;&quot;;[.$F259]=&quot;&quot;);&quot;E&quot;&amp;ROW();[.$B182])" office:value-type="string" office:string-value="E153" calcext:value-type="string">
            <text:p>E153</text:p>
          </table:table-cell>
          <table:table-cell table:style-name="ce13" table:formula="of:=IF(AND([.$D259]&lt;&gt;&quot;&quot;;[.$D259]&lt;&gt;&quot;○&quot;);MAX([.$C$3:.$C258])+1;[.$C258])" office:value-type="float" office:value="12" calcext:value-type="float">
            <text:p>12</text:p>
          </table:table-cell>
          <table:table-cell table:style-name="ce19"/>
          <table:table-cell table:style-name="ce27" office:value-type="float" office:value="3" calcext:value-type="float">
            <text:p>3</text:p>
          </table:table-cell>
          <table:table-cell table:style-name="ce32" office:value-type="string" calcext:value-type="string">
            <text:p>AWSサービスによるデプロイ</text:p>
          </table:table-cell>
          <table:table-cell table:style-name="ce32" table:formula="of:=IF([.$H259]=&quot;&quot;;&quot;&quot;;IF([.$G258]=&quot;&quot;;1;[.$G258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2" table:formula="of:=IF([.$L259]&lt;&gt;&quot;&quot;;NETWORKDAYS([.$L259];[.$M259];[$休日.$B$4:.$B$304]);&quot;&quot;)" office:value-type="float" office:value="1" calcext:value-type="float">
            <text:p>1</text:p>
          </table:table-cell>
          <table:table-cell table:style-name="ce300" office:value-type="float" office:value="100" calcext:value-type="float">
            <text:p>100</text:p>
          </table:table-cell>
          <table:table-cell table:style-name="ce63" table:formula="of:=IF(OR(AND([.$N259]=&quot;&quot;;[.$L259]&lt;&gt;&quot;&quot;;[.$L259]&lt;=[.$U$1]);AND([.$M259]&lt;&gt;&quot;&quot;;[.Q259]&lt;100;[.$M259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0]&lt;&gt;&quot;&quot;;[.$F260]=&quot;&quot;);&quot;E&quot;&amp;ROW();[.$B183])" office:value-type="string" office:string-value="E153" calcext:value-type="string">
            <text:p>E153</text:p>
          </table:table-cell>
          <table:table-cell table:style-name="ce13" table:formula="of:=IF(AND([.$D260]&lt;&gt;&quot;&quot;;[.$D260]&lt;&gt;&quot;○&quot;);MAX([.$C$3:.$C259])+1;[.$C259])" office:value-type="float" office:value="12" calcext:value-type="float">
            <text:p>12</text:p>
          </table:table-cell>
          <table:table-cell table:style-name="ce19"/>
          <table:table-cell table:style-name="ce27" table:formula="of:=IF(AND([.$F260]&lt;&gt;&quot;&quot;;[.$D259]&lt;&gt;&quot;&quot;);1;IF([.$F260]&lt;&gt;&quot;&quot;;MAX(INDIRECT(#REF!):[.$E259])+1;&quot;&quot;))">
            <text:p/>
          </table:table-cell>
          <table:table-cell table:style-name="ce32"/>
          <table:table-cell table:style-name="ce32" table:formula="of:=IF([.$H260]=&quot;&quot;;&quot;&quot;;IF([.$G259]=&quot;&quot;;1;[.$G259]+1))" office:value-type="float" office:value="1" calcext:value-type="float">
            <text:p>1</text:p>
          </table:table-cell>
          <table:table-cell table:style-name="ce32" office:value-type="string" calcext:value-type="string">
            <text:p>環境構築作業の実施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2" table:formula="of:=IF([.$L260]&lt;&gt;&quot;&quot;;NETWORKDAYS([.$L260];[.$M260];[$休日.$B$4:.$B$304]);&quot;&quot;)" office:value-type="float" office:value="1" calcext:value-type="float">
            <text:p>1</text:p>
          </table:table-cell>
          <table:table-cell table:style-name="ce300" office:value-type="float" office:value="100" calcext:value-type="float">
            <text:p>100</text:p>
          </table:table-cell>
          <table:table-cell table:style-name="ce63" table:formula="of:=IF(OR(AND([.$N260]=&quot;&quot;;[.$L260]&lt;&gt;&quot;&quot;;[.$L260]&lt;=[.$U$1]);AND([.$M260]&lt;&gt;&quot;&quot;;[.Q260]&lt;100;[.$M260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1]&lt;&gt;&quot;&quot;;[.$F261]=&quot;&quot;);&quot;E&quot;&amp;ROW();[.$B184])" office:value-type="string" office:string-value="E153" calcext:value-type="string">
            <text:p>E153</text:p>
          </table:table-cell>
          <table:table-cell table:style-name="ce13" table:formula="of:=IF(AND([.$D261]&lt;&gt;&quot;&quot;;[.$D261]&lt;&gt;&quot;○&quot;);MAX([.$C$3:.$C260])+1;[.$C260])" office:value-type="float" office:value="12" calcext:value-type="float">
            <text:p>12</text:p>
          </table:table-cell>
          <table:table-cell table:style-name="ce19"/>
          <table:table-cell table:style-name="ce27" table:formula="of:=IF(AND([.$F261]&lt;&gt;&quot;&quot;;[.$D260]&lt;&gt;&quot;&quot;);1;IF([.$F261]&lt;&gt;&quot;&quot;;MAX(INDIRECT(#REF!):[.$E260])+1;&quot;&quot;))">
            <text:p/>
          </table:table-cell>
          <table:table-cell table:style-name="ce32"/>
          <table:table-cell table:style-name="ce32" table:formula="of:=IF([.$H261]=&quot;&quot;;&quot;&quot;;IF([.$G260]=&quot;&quot;;1;[.$G260]+1))" office:value-type="float" office:value="2" calcext:value-type="float">
            <text:p>2</text:p>
          </table:table-cell>
          <table:table-cell table:style-name="ce32" office:value-type="string" calcext:value-type="string">
            <text:p>Webアプリケーションの準備作業の実施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2" table:formula="of:=IF([.$L261]&lt;&gt;&quot;&quot;;NETWORKDAYS([.$L261];[.$M261];[$休日.$B$4:.$B$304]);&quot;&quot;)" office:value-type="float" office:value="1" calcext:value-type="float">
            <text:p>1</text:p>
          </table:table-cell>
          <table:table-cell table:style-name="ce300" office:value-type="float" office:value="100" calcext:value-type="float">
            <text:p>100</text:p>
          </table:table-cell>
          <table:table-cell table:style-name="ce63" table:formula="of:=IF(OR(AND([.$N261]=&quot;&quot;;[.$L261]&lt;&gt;&quot;&quot;;[.$L261]&lt;=[.$U$1]);AND([.$M261]&lt;&gt;&quot;&quot;;[.Q261]&lt;100;[.$M261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2]&lt;&gt;&quot;&quot;;[.$F262]=&quot;&quot;);&quot;E&quot;&amp;ROW();[.$B185])" office:value-type="string" office:string-value="E153" calcext:value-type="string">
            <text:p>E153</text:p>
          </table:table-cell>
          <table:table-cell table:style-name="ce13" table:formula="of:=IF(AND([.$D262]&lt;&gt;&quot;&quot;;[.$D262]&lt;&gt;&quot;○&quot;);MAX([.$C$3:.$C261])+1;[.$C261])" office:value-type="float" office:value="12" calcext:value-type="float">
            <text:p>12</text:p>
          </table:table-cell>
          <table:table-cell table:style-name="ce19"/>
          <table:table-cell table:style-name="ce27" table:formula="of:=IF(AND([.$F262]&lt;&gt;&quot;&quot;;[.$D261]&lt;&gt;&quot;&quot;);1;IF([.$F262]&lt;&gt;&quot;&quot;;MAX(INDIRECT(#REF!):[.$E261])+1;&quot;&quot;))">
            <text:p/>
          </table:table-cell>
          <table:table-cell table:style-name="ce32"/>
          <table:table-cell table:style-name="ce32" table:formula="of:=IF([.$H262]=&quot;&quot;;&quot;&quot;;IF([.$G261]=&quot;&quot;;1;[.$G261]+1))" office:value-type="float" office:value="3" calcext:value-type="float">
            <text:p>3</text:p>
          </table:table-cell>
          <table:table-cell table:style-name="ce32" office:value-type="string" calcext:value-type="string">
            <text:p>Webアプリケーションのデプロイ作業の実施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2" table:formula="of:=IF([.$L262]&lt;&gt;&quot;&quot;;NETWORKDAYS([.$L262];[.$M262];[$休日.$B$4:.$B$304]);&quot;&quot;)" office:value-type="float" office:value="1" calcext:value-type="float">
            <text:p>1</text:p>
          </table:table-cell>
          <table:table-cell table:style-name="ce300" office:value-type="float" office:value="100" calcext:value-type="float">
            <text:p>100</text:p>
          </table:table-cell>
          <table:table-cell table:style-name="ce63" table:formula="of:=IF(OR(AND([.$N262]=&quot;&quot;;[.$L262]&lt;&gt;&quot;&quot;;[.$L262]&lt;=[.$U$1]);AND([.$M262]&lt;&gt;&quot;&quot;;[.Q262]&lt;100;[.$M262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3]&lt;&gt;&quot;&quot;;[.$F263]=&quot;&quot;);&quot;E&quot;&amp;ROW();[.$B186])" office:value-type="string" office:string-value="E263" calcext:value-type="string">
            <text:p>E263</text:p>
          </table:table-cell>
          <table:table-cell table:style-name="ce13" table:formula="of:=IF(AND([.$D263]&lt;&gt;&quot;&quot;;[.$D263]&lt;&gt;&quot;○&quot;);MAX([.$C$3:.$C262])+1;[.$C262])" office:value-type="float" office:value="13" calcext:value-type="float">
            <text:p>13</text:p>
          </table:table-cell>
          <table:table-cell table:style-name="ce19" office:value-type="string" calcext:value-type="string">
            <text:p>デプロイ後テスト</text:p>
          </table:table-cell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Default"/>
          <table:table-cell table:style-name="ce27"/>
          <table:table-cell table:style-name="ce124" office:value-type="string" calcext:value-type="string">
            <text:p>バグ探し兼URLテスト</text:p>
          </table:table-cell>
          <table:table-cell table:style-name="ce32" table:number-columns-repeated="5"/>
          <table:table-cell table:style-name="ce38" office:value-type="date" office:date-value="2026-06-19" calcext:value-type="date">
            <text:p>2026/06/19</text:p>
          </table:table-cell>
          <table:table-cell table:style-name="ce38" office:value-type="date" office:date-value="2026-06-23" calcext:value-type="date">
            <text:p>2026/06/23</text:p>
          </table:table-cell>
          <table:table-cell table:style-name="ce38" office:value-type="date" office:date-value="2026-06-19" calcext:value-type="date">
            <text:p>2026/06/19</text:p>
          </table:table-cell>
          <table:table-cell table:style-name="ce38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URLテスト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19" calcext:value-type="date">
            <text:p>2026/06/19</text:p>
          </table:table-cell>
          <table:table-cell table:style-name="ce38" office:value-type="date" office:date-value="2026-06-23" calcext:value-type="date">
            <text:p>2026/06/23</text:p>
          </table:table-cell>
          <table:table-cell table:style-name="ce38" office:value-type="date" office:date-value="2026-06-19" calcext:value-type="date">
            <text:p>2026/06/19</text:p>
          </table:table-cell>
          <table:table-cell table:style-name="ce38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バグ探し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19" calcext:value-type="date">
            <text:p>2026/06/19</text:p>
          </table:table-cell>
          <table:table-cell table:style-name="ce38" office:value-type="date" office:date-value="2026-06-23" calcext:value-type="date">
            <text:p>2026/06/23</text:p>
          </table:table-cell>
          <table:table-cell table:style-name="ce38" office:value-type="date" office:date-value="2026-06-19" calcext:value-type="date">
            <text:p>2026/06/19</text:p>
          </table:table-cell>
          <table:table-cell table:style-name="ce38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 office:value-type="string" calcext:value-type="string">
            <text:p>バグ修正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19" calcext:value-type="date">
            <text:p>2026/06/19</text:p>
          </table:table-cell>
          <table:table-cell table:style-name="ce38" office:value-type="date" office:date-value="2026-06-23" calcext:value-type="date">
            <text:p>2026/06/23</text:p>
          </table:table-cell>
          <table:table-cell table:style-name="ce38" office:value-type="date" office:date-value="2026-06-19" calcext:value-type="date">
            <text:p>2026/06/19</text:p>
          </table:table-cell>
          <table:table-cell table:style-name="ce38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9]&lt;&gt;&quot;&quot;;[.$F269]=&quot;&quot;);&quot;E&quot;&amp;ROW();[.$B187])" office:value-type="string" office:string-value="E153" calcext:value-type="string">
            <text:p>E153</text:p>
          </table:table-cell>
          <table:table-cell table:style-name="ce13" table:formula="of:=IF(AND([.$D269]&lt;&gt;&quot;&quot;;[.$D269]&lt;&gt;&quot;○&quot;);MAX([.$C$3:.$C263])+1;[.$C263])" office:value-type="float" office:value="13" calcext:value-type="float">
            <text:p>13</text:p>
          </table:table-cell>
          <table:table-cell table:style-name="ce19"/>
          <table:table-cell table:style-name="ce27" table:formula="of:=IF(AND([.$F269]&lt;&gt;&quot;&quot;;[.$D248]&lt;&gt;&quot;&quot;);1;IF([.$F269]&lt;&gt;&quot;&quot;;MAX(INDIRECT([.$B269]):[.$E248])+1;&quot;&quot;))">
            <text:p/>
          </table:table-cell>
          <table:table-cell table:style-name="ce32"/>
          <table:table-cell table:style-name="ce32" table:formula="of:=IF([.$H269]=&quot;&quot;;&quot;&quot;;IF([.$G248]=&quot;&quot;;1;[.$G24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69]&lt;&gt;&quot;&quot;;NETWORKDAYS([.$L269];[.$M26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69]=&quot;&quot;;[.$L269]&lt;&gt;&quot;&quot;;[.$L269]&lt;=[.$U$1]);AND([.$M269]&lt;&gt;&quot;&quot;;[.Q269]&lt;100;[.$M269]&lt;=[.$U$1]));&quot;遅延&quot;;&quot;&quot;)">
            <text:p/>
          </table:table-cell>
          <table:table-cell table:style-name="ce66"/>
          <table:table-cell table:style-name="ce66" table:formula="of:=SUM([.$V269:.$FM26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0]&lt;&gt;&quot;&quot;;[.$F270]=&quot;&quot;);&quot;E&quot;&amp;ROW();[.$B188])" office:value-type="string" office:string-value="E270" calcext:value-type="string">
            <text:p>E270</text:p>
          </table:table-cell>
          <table:table-cell table:style-name="ce13" table:formula="of:=IF(AND([.$D270]&lt;&gt;&quot;&quot;;[.$D270]&lt;&gt;&quot;○&quot;);MAX([.$C$3:.$C269])+1;[.$C269])" office:value-type="float" office:value="14" calcext:value-type="float">
            <text:p>14</text:p>
          </table:table-cell>
          <table:table-cell table:style-name="ce19" office:value-type="string" calcext:value-type="string">
            <text:p>成果報告準備</text:p>
          </table:table-cell>
          <table:table-cell table:style-name="ce27" table:formula="of:=IF(AND([.$F270]&lt;&gt;&quot;&quot;;[.$D269]&lt;&gt;&quot;&quot;);1;IF([.$F270]&lt;&gt;&quot;&quot;;MAX(INDIRECT([.$B270]):[.$E269])+1;&quot;&quot;))">
            <text:p/>
          </table:table-cell>
          <table:table-cell table:style-name="ce32"/>
          <table:table-cell table:style-name="ce32" table:formula="of:=IF([.$H270]=&quot;&quot;;&quot;&quot;;IF([.$G269]=&quot;&quot;;1;[.$G269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26" calcext:value-type="date">
            <text:p>2026/06/26</text:p>
          </table:table-cell>
          <table:table-cell table:style-name="ce38" table:number-columns-repeated="2"/>
          <table:table-cell table:style-name="ce32" table:formula="of:=IF([.$L270]&lt;&gt;&quot;&quot;;NETWORKDAYS([.$L270];[.$M270];[$休日.$B$4:.$B$304]);&quot;&quot;)" office:value-type="float" office:value="3" calcext:value-type="float">
            <text:p>3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70]=&quot;&quot;;[.$L270]&lt;&gt;&quot;&quot;;[.$L270]&lt;=[.$U$1]);AND([.$M270]&lt;&gt;&quot;&quot;;[.Q270]&lt;100;[.$M270]&lt;=[.$U$1]));&quot;遅延&quot;;&quot;&quot;)">
            <text:p/>
          </table:table-cell>
          <table:table-cell table:style-name="ce66"/>
          <table:table-cell table:style-name="ce66" table:formula="of:=SUM([.$V270:.$FM27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1]&lt;&gt;&quot;&quot;;[.$F271]=&quot;&quot;);&quot;E&quot;&amp;ROW();[.$B189])" office:value-type="string" office:string-value="E153" calcext:value-type="string">
            <text:p>E153</text:p>
          </table:table-cell>
          <table:table-cell table:style-name="ce13" table:formula="of:=IF(AND([.$D271]&lt;&gt;&quot;&quot;;[.$D271]&lt;&gt;&quot;○&quot;);MAX([.$C$3:.$C270])+1;[.$C270])" office:value-type="float" office:value="14" calcext:value-type="float">
            <text:p>14</text:p>
          </table:table-cell>
          <table:table-cell table:style-name="ce19"/>
          <table:table-cell table:style-name="ce27" table:formula="of:=IF(AND([.$F271]&lt;&gt;&quot;&quot;;[.$D270]&lt;&gt;&quot;&quot;);1;IF([.$F271]&lt;&gt;&quot;&quot;;MAX(INDIRECT([.$B271]):[.$E270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成果報告資料の作成</text:p>
          </table:table-cell>
          <table:table-cell table:style-name="ce32" table:formula="of:=IF([.$H271]=&quot;&quot;;&quot;&quot;;IF([.$G270]=&quot;&quot;;1;[.$G270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25" calcext:value-type="date">
            <text:p>2026/06/25</text:p>
          </table:table-cell>
          <table:table-cell table:style-name="ce38" office:value-type="date" office:date-value="2026-06-15" calcext:value-type="date">
            <text:p>2026/06/15</text:p>
          </table:table-cell>
          <table:table-cell table:style-name="ce38"/>
          <table:table-cell table:style-name="ce32" table:formula="of:=IF([.$L271]&lt;&gt;&quot;&quot;;NETWORKDAYS([.$L271];[.$M271];[$休日.$B$4:.$B$304]);&quot;&quot;)" office:value-type="float" office:value="2" calcext:value-type="float">
            <text:p>2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71]=&quot;&quot;;[.$L271]&lt;&gt;&quot;&quot;;[.$L271]&lt;=[.$U$1]);AND([.$M271]&lt;&gt;&quot;&quot;;[.Q271]&lt;100;[.$M271]&lt;=[.$U$1]));&quot;遅延&quot;;&quot;&quot;)">
            <text:p/>
          </table:table-cell>
          <table:table-cell table:style-name="ce66"/>
          <table:table-cell table:style-name="ce66" table:formula="of:=SUM([.$V271:.$FM27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2]&lt;&gt;&quot;&quot;;[.$F272]=&quot;&quot;);&quot;E&quot;&amp;ROW();[.$B190])" office:value-type="string" office:string-value="E91" calcext:value-type="string">
            <text:p>E91</text:p>
          </table:table-cell>
          <table:table-cell table:style-name="ce13" table:formula="of:=IF(AND([.$D272]&lt;&gt;&quot;&quot;;[.$D272]&lt;&gt;&quot;○&quot;);MAX([.$C$3:.$C271])+1;[.$C271])" office:value-type="float" office:value="14" calcext:value-type="float">
            <text:p>14</text:p>
          </table:table-cell>
          <table:table-cell table:style-name="ce19"/>
          <table:table-cell table:style-name="ce27" table:formula="of:=IF(AND([.$F272]&lt;&gt;&quot;&quot;;[.$D271]&lt;&gt;&quot;&quot;);1;IF([.$F272]&lt;&gt;&quot;&quot;;MAX(INDIRECT([.$B272]):[.$E271])+1;&quot;&quot;))">
            <text:p/>
          </table:table-cell>
          <table:table-cell table:style-name="ce32"/>
          <table:table-cell table:style-name="ce32" table:formula="of:=IF([.$H272]=&quot;&quot;;&quot;&quot;;IF([.$G271]=&quot;&quot;;1;[.$G271]+1))" office:value-type="float" office:value="1" calcext:value-type="float">
            <text:p>1</text:p>
          </table:table-cell>
          <table:table-cell table:style-name="ce32" office:value-type="string" calcext:value-type="string">
            <text:p>成果報告資料の役割分担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4" calcext:value-type="date">
            <text:p>2026/06/24</text:p>
          </table:table-cell>
          <table:table-cell table:style-name="ce38" table:number-columns-repeated="2"/>
          <table:table-cell table:style-name="ce32" table:formula="of:=IF([.$L272]&lt;&gt;&quot;&quot;;NETWORKDAYS([.$L272];[.$M272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72]=&quot;&quot;;[.$L272]&lt;&gt;&quot;&quot;;[.$L272]&lt;=[.$U$1]);AND([.$M272]&lt;&gt;&quot;&quot;;[.Q272]&lt;100;[.$M272]&lt;=[.$U$1]));&quot;遅延&quot;;&quot;&quot;)">
            <text:p/>
          </table:table-cell>
          <table:table-cell table:style-name="ce66"/>
          <table:table-cell table:style-name="ce66" table:formula="of:=SUM([.$V272:.$FM27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3]&lt;&gt;&quot;&quot;;[.$F273]=&quot;&quot;);&quot;E&quot;&amp;ROW();[.$B191])" office:value-type="string" office:string-value="E91" calcext:value-type="string">
            <text:p>E91</text:p>
          </table:table-cell>
          <table:table-cell table:style-name="ce13" table:formula="of:=IF(AND([.$D273]&lt;&gt;&quot;&quot;;[.$D273]&lt;&gt;&quot;○&quot;);MAX([.$C$3:.$C272])+1;[.$C272])" office:value-type="float" office:value="14" calcext:value-type="float">
            <text:p>14</text:p>
          </table:table-cell>
          <table:table-cell table:style-name="ce19"/>
          <table:table-cell table:style-name="ce27" table:formula="of:=IF(AND([.$F273]&lt;&gt;&quot;&quot;;[.$D272]&lt;&gt;&quot;&quot;);1;IF([.$F273]&lt;&gt;&quot;&quot;;MAX(INDIRECT([.$B273]):[.$E272])+1;&quot;&quot;))">
            <text:p/>
          </table:table-cell>
          <table:table-cell table:style-name="ce32"/>
          <table:table-cell table:style-name="ce32" table:formula="of:=IF([.$H273]=&quot;&quot;;&quot;&quot;;IF([.$G272]=&quot;&quot;;1;[.$G272]+1))" office:value-type="float" office:value="2" calcext:value-type="float">
            <text:p>2</text:p>
          </table:table-cell>
          <table:table-cell table:style-name="ce32" office:value-type="string" calcext:value-type="string">
            <text:p>書式やレイアウト、フォントサイズなど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4" calcext:value-type="date">
            <text:p>2026/06/24</text:p>
          </table:table-cell>
          <table:table-cell table:number-columns-repeated="2" table:style-name="ce38" office:value-type="date" office:date-value="2026-06-15" calcext:value-type="date">
            <text:p>2026/06/15</text:p>
          </table:table-cell>
          <table:table-cell table:style-name="ce32" table:formula="of:=IF([.$L273]&lt;&gt;&quot;&quot;;NETWORKDAYS([.$L273];[.$M273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73]=&quot;&quot;;[.$L273]&lt;&gt;&quot;&quot;;[.$L273]&lt;=[.$U$1]);AND([.$M273]&lt;&gt;&quot;&quot;;[.Q273]&lt;100;[.$M273]&lt;=[.$U$1]));&quot;遅延&quot;;&quot;&quot;)">
            <text:p/>
          </table:table-cell>
          <table:table-cell table:style-name="ce66"/>
          <table:table-cell table:style-name="ce66" table:formula="of:=SUM([.$V273:.$FM27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2"/>
          <table:table-cell table:style-name="ce131"/>
          <table:table-cell table:style-name="ce95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4]&lt;&gt;&quot;&quot;;[.$F274]=&quot;&quot;);&quot;E&quot;&amp;ROW();[.$B192])" office:value-type="string" office:string-value="E91" calcext:value-type="string">
            <text:p>E91</text:p>
          </table:table-cell>
          <table:table-cell table:style-name="ce13" table:formula="of:=IF(AND([.$D274]&lt;&gt;&quot;&quot;;[.$D274]&lt;&gt;&quot;○&quot;);MAX([.$C$3:.$C273])+1;[.$C273])" office:value-type="float" office:value="14" calcext:value-type="float">
            <text:p>14</text:p>
          </table:table-cell>
          <table:table-cell table:style-name="ce19"/>
          <table:table-cell table:style-name="ce27" table:formula="of:=IF(AND([.$F274]&lt;&gt;&quot;&quot;;[.$D273]&lt;&gt;&quot;&quot;);1;IF([.$F274]&lt;&gt;&quot;&quot;;MAX(INDIRECT([.$B274]):[.$E273])+1;&quot;&quot;))">
            <text:p/>
          </table:table-cell>
          <table:table-cell table:style-name="ce32"/>
          <table:table-cell table:style-name="ce32" table:formula="of:=IF([.$H274]=&quot;&quot;;&quot;&quot;;IF([.$G273]=&quot;&quot;;1;[.$G273]+1))" office:value-type="float" office:value="3" calcext:value-type="float">
            <text:p>3</text:p>
          </table:table-cell>
          <table:table-cell table:style-name="ce32" office:value-type="string" calcext:value-type="string">
            <text:p>各担当箇所の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25" calcext:value-type="date">
            <text:p>2026/06/25</text:p>
          </table:table-cell>
          <table:table-cell table:style-name="ce38" office:value-type="date" office:date-value="2026-06-19" calcext:value-type="date">
            <text:p>2026/06/19</text:p>
          </table:table-cell>
          <table:table-cell table:style-name="ce38"/>
          <table:table-cell table:style-name="ce32" table:formula="of:=IF([.$L274]&lt;&gt;&quot;&quot;;NETWORKDAYS([.$L274];[.$M274];[$休日.$B$4:.$B$304]);&quot;&quot;)" office:value-type="float" office:value="2" calcext:value-type="float">
            <text:p>2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74]=&quot;&quot;;[.$L274]&lt;&gt;&quot;&quot;;[.$L274]&lt;=[.$U$1]);AND([.$M274]&lt;&gt;&quot;&quot;;[.Q274]&lt;100;[.$M274]&lt;=[.$U$1]));&quot;遅延&quot;;&quot;&quot;)">
            <text:p/>
          </table:table-cell>
          <table:table-cell table:style-name="ce66"/>
          <table:table-cell table:style-name="ce66" table:formula="of:=SUM([.$V274:.$FM27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5]&lt;&gt;&quot;&quot;;[.$F275]=&quot;&quot;);&quot;E&quot;&amp;ROW();[.$B193])" office:value-type="string" office:string-value="E115" calcext:value-type="string">
            <text:p>E115</text:p>
          </table:table-cell>
          <table:table-cell table:style-name="ce13" table:formula="of:=IF(AND([.$D275]&lt;&gt;&quot;&quot;;[.$D275]&lt;&gt;&quot;○&quot;);MAX([.$C$3:.$C274])+1;[.$C274])" office:value-type="float" office:value="14" calcext:value-type="float">
            <text:p>14</text:p>
          </table:table-cell>
          <table:table-cell table:style-name="ce19"/>
          <table:table-cell table:style-name="ce27" table:formula="of:=IF(AND([.$F275]&lt;&gt;&quot;&quot;;[.$D274]&lt;&gt;&quot;&quot;);1;IF([.$F275]&lt;&gt;&quot;&quot;;MAX(INDIRECT([.$B275]):[.$E274])+1;&quot;&quot;))">
            <text:p/>
          </table:table-cell>
          <table:table-cell table:style-name="ce32"/>
          <table:table-cell table:style-name="ce32" table:formula="of:=IF([.$H275]=&quot;&quot;;&quot;&quot;;IF([.$G274]=&quot;&quot;;1;[.$G274]+1))" office:value-type="float" office:value="4" calcext:value-type="float">
            <text:p>4</text:p>
          </table:table-cell>
          <table:table-cell table:style-name="ce32" office:value-type="string" calcext:value-type="string">
            <text:p>成果報告資料の統合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25" calcext:value-type="date">
            <text:p>2026/06/25</text:p>
          </table:table-cell>
          <table:table-cell table:style-name="ce38" office:value-type="date" office:date-value="2026-06-22" calcext:value-type="date">
            <text:p>2026/06/22</text:p>
          </table:table-cell>
          <table:table-cell table:style-name="ce38"/>
          <table:table-cell table:style-name="ce32" table:formula="of:=IF([.$L275]&lt;&gt;&quot;&quot;;NETWORKDAYS([.$L275];[.$M275];[$休日.$B$4:.$B$304]);&quot;&quot;)" office:value-type="float" office:value="2" calcext:value-type="float">
            <text:p>2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75]=&quot;&quot;;[.$L275]&lt;&gt;&quot;&quot;;[.$L275]&lt;=[.$U$1]);AND([.$M275]&lt;&gt;&quot;&quot;;[.Q275]&lt;100;[.$M275]&lt;=[.$U$1]));&quot;遅延&quot;;&quot;&quot;)">
            <text:p/>
          </table:table-cell>
          <table:table-cell table:style-name="ce66"/>
          <table:table-cell table:style-name="ce66" table:formula="of:=SUM([.$V275:.$FM27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6]&lt;&gt;&quot;&quot;;[.$F276]=&quot;&quot;);&quot;E&quot;&amp;ROW();[.$B194])" office:value-type="string" office:string-value="E115" calcext:value-type="string">
            <text:p>E115</text:p>
          </table:table-cell>
          <table:table-cell table:style-name="ce13" table:formula="of:=IF(AND([.$D276]&lt;&gt;&quot;&quot;;[.$D276]&lt;&gt;&quot;○&quot;);MAX([.$C$3:.$C275])+1;[.$C275])" office:value-type="float" office:value="14" calcext:value-type="float">
            <text:p>14</text:p>
          </table:table-cell>
          <table:table-cell table:style-name="ce18"/>
          <table:table-cell table:style-name="ce27" table:formula="of:=IF(AND([.$F276]&lt;&gt;&quot;&quot;;[.$D275]&lt;&gt;&quot;&quot;);1;IF([.$F276]&lt;&gt;&quot;&quot;;MAX(INDIRECT([.$B276]):[.$E275])+1;&quot;&quot;))">
            <text:p/>
          </table:table-cell>
          <table:table-cell table:style-name="ce18"/>
          <table:table-cell table:style-name="ce30" table:formula="of:=IF([.$H276]=&quot;&quot;;&quot;&quot;;IF([.$G275]=&quot;&quot;;1;[.$G275]+1))" office:value-type="float" office:value="5" calcext:value-type="float">
            <text:p>5</text:p>
          </table:table-cell>
          <table:table-cell table:style-name="ce18" office:value-type="string" calcext:value-type="string">
            <text:p>成果報告資料のチーム内レビュー</text:p>
          </table:table-cell>
          <table:table-cell table:style-name="ce18"/>
          <table:table-cell table:style-name="ce32" office:value-type="string" calcext:value-type="string">
            <text:p>全員</text:p>
          </table:table-cell>
          <table:table-cell table:style-name="ce18"/>
          <table:table-cell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25" calcext:value-type="date">
            <text:p>2026/06/25</text:p>
          </table:table-cell>
          <table:table-cell table:style-name="ce40" table:number-columns-repeated="2"/>
          <table:table-cell table:style-name="ce18" table:formula="of:=IF([.$L276]&lt;&gt;&quot;&quot;;NETWORKDAYS([.$L276];[.$M276];[$休日.$B$4:.$B$304]);&quot;&quot;)" office:value-type="float" office:value="2" calcext:value-type="float">
            <text:p>2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76]=&quot;&quot;;[.$L276]&lt;&gt;&quot;&quot;;[.$L276]&lt;=[.$U$1]);AND([.$M276]&lt;&gt;&quot;&quot;;[.Q276]&lt;100;[.$M276]&lt;=[.$U$1]));&quot;遅延&quot;;&quot;&quot;)">
            <text:p/>
          </table:table-cell>
          <table:table-cell table:style-name="ce18"/>
          <table:table-cell table:style-name="ce18" table:formula="of:=SUM([.$V276:.$FM276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7]&lt;&gt;&quot;&quot;;[.$F277]=&quot;&quot;);&quot;E&quot;&amp;ROW();[.$B195])" office:value-type="string" office:string-value="E115" calcext:value-type="string">
            <text:p>E115</text:p>
          </table:table-cell>
          <table:table-cell table:style-name="ce13" table:formula="of:=IF(AND([.$D277]&lt;&gt;&quot;&quot;;[.$D277]&lt;&gt;&quot;○&quot;);MAX([.$C$3:.$C276])+1;[.$C276])" office:value-type="float" office:value="14" calcext:value-type="float">
            <text:p>14</text:p>
          </table:table-cell>
          <table:table-cell table:style-name="ce18"/>
          <table:table-cell table:style-name="ce27" table:formula="of:=IF(AND([.$F277]&lt;&gt;&quot;&quot;;[.$D276]&lt;&gt;&quot;&quot;);1;IF([.$F277]&lt;&gt;&quot;&quot;;MAX(INDIRECT([.$B277]):[.$E276])+1;&quot;&quot;))">
            <text:p/>
          </table:table-cell>
          <table:table-cell table:style-name="ce18"/>
          <table:table-cell table:style-name="ce30"/>
          <table:table-cell table:style-name="ce18" table:number-columns-repeated="2"/>
          <table:table-cell table:style-name="ce32"/>
          <table:table-cell table:style-name="ce18"/>
          <table:table-cell table:style-name="ce40" table:number-columns-repeated="4"/>
          <table:table-cell table:style-name="ce18"/>
          <table:table-cell table:style-name="ce216"/>
          <table:table-cell table:style-name="ce63"/>
          <table:table-cell table:style-name="ce18" table:number-columns-repeated="2"/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8"/>
          <table:table-cell table:style-name="ce27"/>
          <table:table-cell table:style-name="ce18"/>
          <table:table-cell table:style-name="ce30"/>
          <table:table-cell table:style-name="ce18" table:number-columns-repeated="2"/>
          <table:table-cell table:style-name="ce32"/>
          <table:table-cell table:style-name="ce18"/>
          <table:table-cell table:style-name="ce40" table:number-columns-repeated="4"/>
          <table:table-cell table:style-name="ce18"/>
          <table:table-cell table:style-name="ce216"/>
          <table:table-cell table:style-name="ce63"/>
          <table:table-cell table:style-name="ce18" table:number-columns-repeated="2"/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9]&lt;&gt;&quot;&quot;;[.$F279]=&quot;&quot;);&quot;E&quot;&amp;ROW();[.$B196])" office:value-type="string" office:string-value="E196" calcext:value-type="string">
            <text:p>E196</text:p>
          </table:table-cell>
          <table:table-cell table:style-name="ce13" table:formula="of:=IF(AND([.$D279]&lt;&gt;&quot;&quot;;[.$D279]&lt;&gt;&quot;○&quot;);MAX([.$C$3:.$C277])+1;[.$C277])" office:value-type="float" office:value="14" calcext:value-type="float">
            <text:p>14</text:p>
          </table:table-cell>
          <table:table-cell table:style-name="ce19"/>
          <table:table-cell table:style-name="ce27" office:value-type="float" office:value="2" calcext:value-type="float">
            <text:p>2</text:p>
          </table:table-cell>
          <table:table-cell table:style-name="ce32" office:value-type="string" calcext:value-type="string">
            <text:p>リハーサル</text:p>
          </table:table-cell>
          <table:table-cell table:style-name="ce32" table:formula="of:=IF([.$H279]=&quot;&quot;;&quot;&quot;;IF([.$G275]=&quot;&quot;;1;[.$G275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6" calcext:value-type="date">
            <text:p>2026/06/26</text:p>
          </table:table-cell>
          <table:table-cell table:style-name="ce38" table:number-columns-repeated="2"/>
          <table:table-cell table:style-name="ce32" table:formula="of:=IF([.$L279]&lt;&gt;&quot;&quot;;NETWORKDAYS([.$L279];[.$M279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79]=&quot;&quot;;[.$L279]&lt;&gt;&quot;&quot;;[.$L279]&lt;=[.$U$1]);AND([.$M279]&lt;&gt;&quot;&quot;;[.Q279]&lt;100;[.$M279]&lt;=[.$U$1]));&quot;遅延&quot;;&quot;&quot;)">
            <text:p/>
          </table:table-cell>
          <table:table-cell table:style-name="ce66"/>
          <table:table-cell table:style-name="ce66" table:formula="of:=SUM([.$V279:.$FM279])" office:value-type="float" office:value="0" calcext:value-type="float">
            <text:p>0</text:p>
          </table:table-cell>
          <table:table-cell table:style-name="ce72" office:value-type="string" calcext:value-type="string">
            <text:p>資料完成</text:p>
          </table:table-cell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0]&lt;&gt;&quot;&quot;;[.$F280]=&quot;&quot;);&quot;E&quot;&amp;ROW();[.$B197])" office:value-type="string" office:string-value="E115" calcext:value-type="string">
            <text:p>E115</text:p>
          </table:table-cell>
          <table:table-cell table:style-name="ce13" table:formula="of:=IF(AND([.$D280]&lt;&gt;&quot;&quot;;[.$D280]&lt;&gt;&quot;○&quot;);MAX([.$C$3:.$C279])+1;[.$C279])" office:value-type="float" office:value="14" calcext:value-type="float">
            <text:p>14</text:p>
          </table:table-cell>
          <table:table-cell table:style-name="ce19"/>
          <table:table-cell table:style-name="ce27" table:formula="of:=IF(AND([.$F280]&lt;&gt;&quot;&quot;;[.$D279]&lt;&gt;&quot;&quot;);1;IF([.$F280]&lt;&gt;&quot;&quot;;MAX(INDIRECT([.$B280]):[.$E279])+1;&quot;&quot;))">
            <text:p/>
          </table:table-cell>
          <table:table-cell table:style-name="ce32"/>
          <table:table-cell table:style-name="ce32" table:formula="of:=IF([.$H280]=&quot;&quot;;&quot;&quot;;IF([.$G279]=&quot;&quot;;1;[.$G27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0]&lt;&gt;&quot;&quot;;NETWORKDAYS([.$L280];[.$M28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0]=&quot;&quot;;[.$L280]&lt;&gt;&quot;&quot;;[.$L280]&lt;=[.$U$1]);AND([.$M280]&lt;&gt;&quot;&quot;;[.Q280]&lt;100;[.$M280]&lt;=[.$U$1]));&quot;遅延&quot;;&quot;&quot;)">
            <text:p/>
          </table:table-cell>
          <table:table-cell table:style-name="ce66"/>
          <table:table-cell table:style-name="ce66" table:formula="of:=SUM([.$V280:.$FM28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1]&lt;&gt;&quot;&quot;;[.$F281]=&quot;&quot;);&quot;E&quot;&amp;ROW();[.$B198])" office:value-type="string" office:string-value="E281" calcext:value-type="string">
            <text:p>E281</text:p>
          </table:table-cell>
          <table:table-cell table:style-name="ce13" table:formula="of:=IF(AND([.$D281]&lt;&gt;&quot;&quot;;[.$D281]&lt;&gt;&quot;○&quot;);MAX([.$C$3:.$C280])+1;[.$C280])" office:value-type="float" office:value="15" calcext:value-type="float">
            <text:p>15</text:p>
          </table:table-cell>
          <table:table-cell table:style-name="ce22" office:value-type="string" calcext:value-type="string">
            <text:p>成果報告会</text:p>
          </table:table-cell>
          <table:table-cell table:style-name="ce27"/>
          <table:table-cell table:style-name="Default"/>
          <table:table-cell table:style-name="ce32" table:formula="of:=IF([.$H281]=&quot;&quot;;&quot;&quot;;IF([.$G280]=&quot;&quot;;1;[.$G280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9" calcext:value-type="date">
            <text:p>2026/06/29</text:p>
          </table:table-cell>
          <table:table-cell table:style-name="ce38" table:number-columns-repeated="2"/>
          <table:table-cell table:style-name="ce32" table:formula="of:=IF([.$L281]&lt;&gt;&quot;&quot;;NETWORKDAYS([.$L281];[.$M281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1]=&quot;&quot;;[.$L281]&lt;&gt;&quot;&quot;;[.$L281]&lt;=[.$U$1]);AND([.$M281]&lt;&gt;&quot;&quot;;[.Q281]&lt;100;[.$M281]&lt;=[.$U$1]));&quot;遅延&quot;;&quot;&quot;)">
            <text:p/>
          </table:table-cell>
          <table:table-cell table:style-name="ce66"/>
          <table:table-cell table:style-name="ce66" table:formula="of:=SUM([.$V281:.$FM28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2]&lt;&gt;&quot;&quot;;[.$F282]=&quot;&quot;);&quot;E&quot;&amp;ROW();[.$B199])" office:value-type="string" office:string-value="E115" calcext:value-type="string">
            <text:p>E115</text:p>
          </table:table-cell>
          <table:table-cell table:style-name="ce13" table:formula="of:=IF(AND([.$D282]&lt;&gt;&quot;&quot;;[.$D282]&lt;&gt;&quot;○&quot;);MAX([.$C$3:.$C281])+1;[.$C281])" office:value-type="float" office:value="15" calcext:value-type="float">
            <text:p>15</text:p>
          </table:table-cell>
          <table:table-cell table:style-name="ce19"/>
          <table:table-cell table:style-name="ce27" table:formula="of:=IF(AND([.$F282]&lt;&gt;&quot;&quot;;[.$D281]&lt;&gt;&quot;&quot;);1;IF([.$F282]&lt;&gt;&quot;&quot;;MAX(INDIRECT([.$B282]):[.$E281])+1;&quot;&quot;))">
            <text:p/>
          </table:table-cell>
          <table:table-cell table:style-name="ce32"/>
          <table:table-cell table:style-name="ce32" table:formula="of:=IF([.$H282]=&quot;&quot;;&quot;&quot;;IF([.$G281]=&quot;&quot;;1;[.$G28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2]&lt;&gt;&quot;&quot;;NETWORKDAYS([.$L282];[.$M28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2]=&quot;&quot;;[.$L282]&lt;&gt;&quot;&quot;;[.$L282]&lt;=[.$U$1]);AND([.$M282]&lt;&gt;&quot;&quot;;[.Q282]&lt;100;[.$M282]&lt;=[.$U$1]));&quot;遅延&quot;;&quot;&quot;)">
            <text:p/>
          </table:table-cell>
          <table:table-cell table:style-name="ce66"/>
          <table:table-cell table:style-name="ce66" table:formula="of:=SUM([.$V282:.$FM28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3]&lt;&gt;&quot;&quot;;[.$F283]=&quot;&quot;);&quot;E&quot;&amp;ROW();[.$B200])" office:value-type="string" office:string-value="E115" calcext:value-type="string">
            <text:p>E115</text:p>
          </table:table-cell>
          <table:table-cell table:style-name="ce13" table:formula="of:=IF(AND([.$D283]&lt;&gt;&quot;&quot;;[.$D283]&lt;&gt;&quot;○&quot;);MAX([.$C$3:.$C282])+1;[.$C282])" office:value-type="float" office:value="15" calcext:value-type="float">
            <text:p>15</text:p>
          </table:table-cell>
          <table:table-cell table:style-name="ce19"/>
          <table:table-cell table:style-name="ce27" table:formula="of:=IF(AND([.$F283]&lt;&gt;&quot;&quot;;[.$D282]&lt;&gt;&quot;&quot;);1;IF([.$F283]&lt;&gt;&quot;&quot;;MAX(INDIRECT([.$B283]):[.$E282])+1;&quot;&quot;))">
            <text:p/>
          </table:table-cell>
          <table:table-cell table:style-name="ce32"/>
          <table:table-cell table:style-name="ce32" table:formula="of:=IF([.$H283]=&quot;&quot;;&quot;&quot;;IF([.$G282]=&quot;&quot;;1;[.$G28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3]&lt;&gt;&quot;&quot;;NETWORKDAYS([.$L283];[.$M28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3]=&quot;&quot;;[.$L283]&lt;&gt;&quot;&quot;;[.$L283]&lt;=[.$U$1]);AND([.$M283]&lt;&gt;&quot;&quot;;[.Q283]&lt;100;[.$M283]&lt;=[.$U$1]));&quot;遅延&quot;;&quot;&quot;)">
            <text:p/>
          </table:table-cell>
          <table:table-cell table:style-name="ce66"/>
          <table:table-cell table:style-name="ce66" table:formula="of:=SUM([.$V283:.$FM28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4]&lt;&gt;&quot;&quot;;[.$F284]=&quot;&quot;);&quot;E&quot;&amp;ROW();[.$B201])" office:value-type="string" office:string-value="E115" calcext:value-type="string">
            <text:p>E115</text:p>
          </table:table-cell>
          <table:table-cell table:style-name="ce13" table:formula="of:=IF(AND([.$D284]&lt;&gt;&quot;&quot;;[.$D284]&lt;&gt;&quot;○&quot;);MAX([.$C$3:.$C283])+1;[.$C283])" office:value-type="float" office:value="15" calcext:value-type="float">
            <text:p>15</text:p>
          </table:table-cell>
          <table:table-cell table:style-name="ce19"/>
          <table:table-cell table:style-name="ce27" table:formula="of:=IF(AND([.$F284]&lt;&gt;&quot;&quot;;[.$D283]&lt;&gt;&quot;&quot;);1;IF([.$F284]&lt;&gt;&quot;&quot;;MAX(INDIRECT([.$B284]):[.$E283])+1;&quot;&quot;))">
            <text:p/>
          </table:table-cell>
          <table:table-cell table:style-name="ce32"/>
          <table:table-cell table:style-name="ce32" table:formula="of:=IF([.$H284]=&quot;&quot;;&quot;&quot;;IF([.$G283]=&quot;&quot;;1;[.$G28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4]&lt;&gt;&quot;&quot;;NETWORKDAYS([.$L284];[.$M28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4]=&quot;&quot;;[.$L284]&lt;&gt;&quot;&quot;;[.$L284]&lt;=[.$U$1]);AND([.$M284]&lt;&gt;&quot;&quot;;[.Q284]&lt;100;[.$M284]&lt;=[.$U$1]));&quot;遅延&quot;;&quot;&quot;)">
            <text:p/>
          </table:table-cell>
          <table:table-cell table:style-name="ce66"/>
          <table:table-cell table:style-name="ce66" table:formula="of:=SUM([.$V284:.$FM28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5]&lt;&gt;&quot;&quot;;[.$F285]=&quot;&quot;);&quot;E&quot;&amp;ROW();[.$B202])" office:value-type="string" office:string-value="E125" calcext:value-type="string">
            <text:p>E125</text:p>
          </table:table-cell>
          <table:table-cell table:style-name="ce13" table:formula="of:=IF(AND([.$D285]&lt;&gt;&quot;&quot;;[.$D285]&lt;&gt;&quot;○&quot;);MAX([.$C$3:.$C284])+1;[.$C284])" office:value-type="float" office:value="15" calcext:value-type="float">
            <text:p>15</text:p>
          </table:table-cell>
          <table:table-cell table:style-name="ce19"/>
          <table:table-cell table:style-name="ce27" table:formula="of:=IF(AND([.$F285]&lt;&gt;&quot;&quot;;[.$D284]&lt;&gt;&quot;&quot;);1;IF([.$F285]&lt;&gt;&quot;&quot;;MAX(INDIRECT([.$B285]):[.$E284])+1;&quot;&quot;))">
            <text:p/>
          </table:table-cell>
          <table:table-cell table:style-name="ce32"/>
          <table:table-cell table:style-name="ce32" table:formula="of:=IF([.$H285]=&quot;&quot;;&quot;&quot;;IF([.$G284]=&quot;&quot;;1;[.$G28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5]&lt;&gt;&quot;&quot;;NETWORKDAYS([.$L285];[.$M28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5]=&quot;&quot;;[.$L285]&lt;&gt;&quot;&quot;;[.$L285]&lt;=[.$U$1]);AND([.$M285]&lt;&gt;&quot;&quot;;[.Q285]&lt;100;[.$M285]&lt;=[.$U$1]));&quot;遅延&quot;;&quot;&quot;)">
            <text:p/>
          </table:table-cell>
          <table:table-cell table:style-name="ce66"/>
          <table:table-cell table:style-name="ce66" table:formula="of:=SUM([.$V285:.$FM28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6]&lt;&gt;&quot;&quot;;[.$F286]=&quot;&quot;);&quot;E&quot;&amp;ROW();[.$B203])" office:value-type="string" office:string-value="E125" calcext:value-type="string">
            <text:p>E125</text:p>
          </table:table-cell>
          <table:table-cell table:style-name="ce13" table:formula="of:=IF(AND([.$D286]&lt;&gt;&quot;&quot;;[.$D286]&lt;&gt;&quot;○&quot;);MAX([.$C$3:.$C285])+1;[.$C285])" office:value-type="float" office:value="15" calcext:value-type="float">
            <text:p>15</text:p>
          </table:table-cell>
          <table:table-cell table:style-name="ce19"/>
          <table:table-cell table:style-name="ce27" table:formula="of:=IF(AND([.$F286]&lt;&gt;&quot;&quot;;[.$D285]&lt;&gt;&quot;&quot;);1;IF([.$F286]&lt;&gt;&quot;&quot;;MAX(INDIRECT([.$B286]):[.$E285])+1;&quot;&quot;))">
            <text:p/>
          </table:table-cell>
          <table:table-cell table:style-name="ce32"/>
          <table:table-cell table:style-name="ce32" table:formula="of:=IF([.$H286]=&quot;&quot;;&quot;&quot;;IF([.$G285]=&quot;&quot;;1;[.$G28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6]&lt;&gt;&quot;&quot;;NETWORKDAYS([.$L286];[.$M28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6]=&quot;&quot;;[.$L286]&lt;&gt;&quot;&quot;;[.$L286]&lt;=[.$U$1]);AND([.$M286]&lt;&gt;&quot;&quot;;[.Q286]&lt;100;[.$M286]&lt;=[.$U$1]));&quot;遅延&quot;;&quot;&quot;)">
            <text:p/>
          </table:table-cell>
          <table:table-cell table:style-name="ce66"/>
          <table:table-cell table:style-name="ce66" table:formula="of:=SUM([.$V286:.$FM28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7]&lt;&gt;&quot;&quot;;[.$F287]=&quot;&quot;);&quot;E&quot;&amp;ROW();[.$B204])" office:value-type="string" office:string-value="E125" calcext:value-type="string">
            <text:p>E125</text:p>
          </table:table-cell>
          <table:table-cell table:style-name="ce13" table:formula="of:=IF(AND([.$D287]&lt;&gt;&quot;&quot;;[.$D287]&lt;&gt;&quot;○&quot;);MAX([.$C$3:.$C286])+1;[.$C286])" office:value-type="float" office:value="15" calcext:value-type="float">
            <text:p>15</text:p>
          </table:table-cell>
          <table:table-cell table:style-name="ce19"/>
          <table:table-cell table:style-name="ce27" table:formula="of:=IF(AND([.$F287]&lt;&gt;&quot;&quot;;[.$D286]&lt;&gt;&quot;&quot;);1;IF([.$F287]&lt;&gt;&quot;&quot;;MAX(INDIRECT([.$B287]):[.$E286])+1;&quot;&quot;))">
            <text:p/>
          </table:table-cell>
          <table:table-cell table:style-name="ce32"/>
          <table:table-cell table:style-name="ce32" table:formula="of:=IF([.$H287]=&quot;&quot;;&quot;&quot;;IF([.$G286]=&quot;&quot;;1;[.$G28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7]&lt;&gt;&quot;&quot;;NETWORKDAYS([.$L287];[.$M28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7]=&quot;&quot;;[.$L287]&lt;&gt;&quot;&quot;;[.$L287]&lt;=[.$U$1]);AND([.$M287]&lt;&gt;&quot;&quot;;[.Q287]&lt;100;[.$M287]&lt;=[.$U$1]));&quot;遅延&quot;;&quot;&quot;)">
            <text:p/>
          </table:table-cell>
          <table:table-cell table:style-name="ce66"/>
          <table:table-cell table:style-name="ce66" table:formula="of:=SUM([.$V287:.$FM28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8]&lt;&gt;&quot;&quot;;[.$F288]=&quot;&quot;);&quot;E&quot;&amp;ROW();[.$B205])" office:value-type="string" office:string-value="E125" calcext:value-type="string">
            <text:p>E125</text:p>
          </table:table-cell>
          <table:table-cell table:style-name="ce13" table:formula="of:=IF(AND([.$D288]&lt;&gt;&quot;&quot;;[.$D288]&lt;&gt;&quot;○&quot;);MAX([.$C$3:.$C287])+1;[.$C287])" office:value-type="float" office:value="15" calcext:value-type="float">
            <text:p>15</text:p>
          </table:table-cell>
          <table:table-cell table:style-name="ce19"/>
          <table:table-cell table:style-name="ce27" table:formula="of:=IF(AND([.$F288]&lt;&gt;&quot;&quot;;[.$D287]&lt;&gt;&quot;&quot;);1;IF([.$F288]&lt;&gt;&quot;&quot;;MAX(INDIRECT([.$B288]):[.$E287])+1;&quot;&quot;))">
            <text:p/>
          </table:table-cell>
          <table:table-cell table:style-name="ce32"/>
          <table:table-cell table:style-name="ce32" table:formula="of:=IF([.$H288]=&quot;&quot;;&quot;&quot;;IF([.$G287]=&quot;&quot;;1;[.$G28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8]&lt;&gt;&quot;&quot;;NETWORKDAYS([.$L288];[.$M28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8]=&quot;&quot;;[.$L288]&lt;&gt;&quot;&quot;;[.$L288]&lt;=[.$U$1]);AND([.$M288]&lt;&gt;&quot;&quot;;[.Q288]&lt;100;[.$M288]&lt;=[.$U$1]));&quot;遅延&quot;;&quot;&quot;)">
            <text:p/>
          </table:table-cell>
          <table:table-cell table:style-name="ce66"/>
          <table:table-cell table:style-name="ce66" table:formula="of:=SUM([.$V288:.$FM28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9]&lt;&gt;&quot;&quot;;[.$F289]=&quot;&quot;);&quot;E&quot;&amp;ROW();[.$B206])" office:value-type="string" office:string-value="E125" calcext:value-type="string">
            <text:p>E125</text:p>
          </table:table-cell>
          <table:table-cell table:style-name="ce13" table:formula="of:=IF(AND([.$D289]&lt;&gt;&quot;&quot;;[.$D289]&lt;&gt;&quot;○&quot;);MAX([.$C$3:.$C288])+1;[.$C288])" office:value-type="float" office:value="15" calcext:value-type="float">
            <text:p>15</text:p>
          </table:table-cell>
          <table:table-cell table:style-name="ce19"/>
          <table:table-cell table:style-name="ce27" table:formula="of:=IF(AND([.$F289]&lt;&gt;&quot;&quot;;[.$D288]&lt;&gt;&quot;&quot;);1;IF([.$F289]&lt;&gt;&quot;&quot;;MAX(INDIRECT([.$B289]):[.$E288])+1;&quot;&quot;))">
            <text:p/>
          </table:table-cell>
          <table:table-cell table:style-name="ce32"/>
          <table:table-cell table:style-name="ce32" table:formula="of:=IF([.$H289]=&quot;&quot;;&quot;&quot;;IF([.$G288]=&quot;&quot;;1;[.$G28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9]&lt;&gt;&quot;&quot;;NETWORKDAYS([.$L289];[.$M28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9]=&quot;&quot;;[.$L289]&lt;&gt;&quot;&quot;;[.$L289]&lt;=[.$U$1]);AND([.$M289]&lt;&gt;&quot;&quot;;[.Q289]&lt;100;[.$M289]&lt;=[.$U$1]));&quot;遅延&quot;;&quot;&quot;)">
            <text:p/>
          </table:table-cell>
          <table:table-cell table:style-name="ce66"/>
          <table:table-cell table:style-name="ce66" table:formula="of:=SUM([.$V289:.$FM28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0]&lt;&gt;&quot;&quot;;[.$F290]=&quot;&quot;);&quot;E&quot;&amp;ROW();[.$B207])" office:value-type="string" office:string-value="E125" calcext:value-type="string">
            <text:p>E125</text:p>
          </table:table-cell>
          <table:table-cell table:style-name="ce13" table:formula="of:=IF(AND([.$D290]&lt;&gt;&quot;&quot;;[.$D290]&lt;&gt;&quot;○&quot;);MAX([.$C$3:.$C289])+1;[.$C289])" office:value-type="float" office:value="15" calcext:value-type="float">
            <text:p>15</text:p>
          </table:table-cell>
          <table:table-cell table:style-name="ce19"/>
          <table:table-cell table:style-name="ce27" table:formula="of:=IF(AND([.$F290]&lt;&gt;&quot;&quot;;[.$D289]&lt;&gt;&quot;&quot;);1;IF([.$F290]&lt;&gt;&quot;&quot;;MAX(INDIRECT([.$B290]):[.$E289])+1;&quot;&quot;))">
            <text:p/>
          </table:table-cell>
          <table:table-cell table:style-name="ce32"/>
          <table:table-cell table:style-name="ce32" table:formula="of:=IF([.$H290]=&quot;&quot;;&quot;&quot;;IF([.$G289]=&quot;&quot;;1;[.$G28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0]&lt;&gt;&quot;&quot;;NETWORKDAYS([.$L290];[.$M29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90]=&quot;&quot;;[.$L290]&lt;&gt;&quot;&quot;;[.$L290]&lt;=[.$U$1]);AND([.$M290]&lt;&gt;&quot;&quot;;[.Q290]&lt;100;[.$M290]&lt;=[.$U$1]));&quot;遅延&quot;;&quot;&quot;)">
            <text:p/>
          </table:table-cell>
          <table:table-cell table:style-name="ce66"/>
          <table:table-cell table:style-name="ce66" table:formula="of:=SUM([.$V290:.$FM29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1]&lt;&gt;&quot;&quot;;[.$F291]=&quot;&quot;);&quot;E&quot;&amp;ROW();[.$B208])" office:value-type="string" office:string-value="E125" calcext:value-type="string">
            <text:p>E125</text:p>
          </table:table-cell>
          <table:table-cell table:style-name="ce13" table:formula="of:=IF(AND([.$D291]&lt;&gt;&quot;&quot;;[.$D291]&lt;&gt;&quot;○&quot;);MAX([.$C$3:.$C290])+1;[.$C290])" office:value-type="float" office:value="15" calcext:value-type="float">
            <text:p>15</text:p>
          </table:table-cell>
          <table:table-cell table:style-name="ce19"/>
          <table:table-cell table:style-name="ce27" table:formula="of:=IF(AND([.$F291]&lt;&gt;&quot;&quot;;[.$D290]&lt;&gt;&quot;&quot;);1;IF([.$F291]&lt;&gt;&quot;&quot;;MAX(INDIRECT([.$B291]):[.$E290])+1;&quot;&quot;))">
            <text:p/>
          </table:table-cell>
          <table:table-cell table:style-name="ce32"/>
          <table:table-cell table:style-name="ce32" table:formula="of:=IF([.$H291]=&quot;&quot;;&quot;&quot;;IF([.$G290]=&quot;&quot;;1;[.$G29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1]&lt;&gt;&quot;&quot;;NETWORKDAYS([.$L291];[.$M29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91]=&quot;&quot;;[.$L291]&lt;&gt;&quot;&quot;;[.$L291]&lt;=[.$U$1]);AND([.$M291]&lt;&gt;&quot;&quot;;[.Q291]&lt;100;[.$M291]&lt;=[.$U$1]));&quot;遅延&quot;;&quot;&quot;)">
            <text:p/>
          </table:table-cell>
          <table:table-cell table:style-name="ce66"/>
          <table:table-cell table:style-name="ce66" table:formula="of:=SUM([.$V291:.$FM29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2]&lt;&gt;&quot;&quot;;[.$F292]=&quot;&quot;);&quot;E&quot;&amp;ROW();[.$B209])" office:value-type="string" office:string-value="E125" calcext:value-type="string">
            <text:p>E125</text:p>
          </table:table-cell>
          <table:table-cell table:style-name="ce13" table:formula="of:=IF(AND([.$D292]&lt;&gt;&quot;&quot;;[.$D292]&lt;&gt;&quot;○&quot;);MAX([.$C$3:.$C291])+1;[.$C291])" office:value-type="float" office:value="15" calcext:value-type="float">
            <text:p>15</text:p>
          </table:table-cell>
          <table:table-cell table:style-name="ce19"/>
          <table:table-cell table:style-name="ce27" table:formula="of:=IF(AND([.$F292]&lt;&gt;&quot;&quot;;[.$D291]&lt;&gt;&quot;&quot;);1;IF([.$F292]&lt;&gt;&quot;&quot;;MAX(INDIRECT([.$B292]):[.$E291])+1;&quot;&quot;))">
            <text:p/>
          </table:table-cell>
          <table:table-cell table:style-name="ce32"/>
          <table:table-cell table:style-name="ce32" table:formula="of:=IF([.$H292]=&quot;&quot;;&quot;&quot;;IF([.$G291]=&quot;&quot;;1;[.$G29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2]&lt;&gt;&quot;&quot;;NETWORKDAYS([.$L292];[.$M29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92]=&quot;&quot;;[.$L292]&lt;&gt;&quot;&quot;;[.$L292]&lt;=[.$U$1]);AND([.$M292]&lt;&gt;&quot;&quot;;[.Q292]&lt;100;[.$M292]&lt;=[.$U$1]));&quot;遅延&quot;;&quot;&quot;)">
            <text:p/>
          </table:table-cell>
          <table:table-cell table:style-name="ce66"/>
          <table:table-cell table:style-name="ce66" table:formula="of:=SUM([.$V292:.$FM29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3]&lt;&gt;&quot;&quot;;[.$F293]=&quot;&quot;);&quot;E&quot;&amp;ROW();[.$B210])" office:value-type="string" office:string-value="E125" calcext:value-type="string">
            <text:p>E125</text:p>
          </table:table-cell>
          <table:table-cell table:style-name="ce13" table:formula="of:=IF(AND([.$D293]&lt;&gt;&quot;&quot;;[.$D293]&lt;&gt;&quot;○&quot;);MAX([.$C$3:.$C292])+1;[.$C292])" office:value-type="float" office:value="15" calcext:value-type="float">
            <text:p>15</text:p>
          </table:table-cell>
          <table:table-cell table:style-name="ce19"/>
          <table:table-cell table:style-name="ce27" table:formula="of:=IF(AND([.$F293]&lt;&gt;&quot;&quot;;[.$D292]&lt;&gt;&quot;&quot;);1;IF([.$F293]&lt;&gt;&quot;&quot;;MAX(INDIRECT([.$B293]):[.$E292])+1;&quot;&quot;))">
            <text:p/>
          </table:table-cell>
          <table:table-cell table:style-name="ce32"/>
          <table:table-cell table:style-name="ce32" table:formula="of:=IF([.$H293]=&quot;&quot;;&quot;&quot;;IF([.$G292]=&quot;&quot;;1;[.$G29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3]&lt;&gt;&quot;&quot;;NETWORKDAYS([.$L293];[.$M29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93]=&quot;&quot;;[.$L293]&lt;&gt;&quot;&quot;;[.$L293]&lt;=[.$U$1]);AND([.$M293]&lt;&gt;&quot;&quot;;[.Q293]&lt;100;[.$M293]&lt;=[.$U$1]));&quot;遅延&quot;;&quot;&quot;)">
            <text:p/>
          </table:table-cell>
          <table:table-cell table:style-name="ce66"/>
          <table:table-cell table:style-name="ce66" table:formula="of:=SUM([.$V293:.$FM29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4]&lt;&gt;&quot;&quot;;[.$F294]=&quot;&quot;);&quot;E&quot;&amp;ROW();[.$B211])" office:value-type="string" office:string-value="E125" calcext:value-type="string">
            <text:p>E125</text:p>
          </table:table-cell>
          <table:table-cell table:style-name="ce13" table:formula="of:=IF(AND([.$D294]&lt;&gt;&quot;&quot;;[.$D294]&lt;&gt;&quot;○&quot;);MAX([.$C$3:.$C293])+1;[.$C293])" office:value-type="float" office:value="15" calcext:value-type="float">
            <text:p>15</text:p>
          </table:table-cell>
          <table:table-cell table:style-name="ce19"/>
          <table:table-cell table:style-name="ce27" table:formula="of:=IF(AND([.$F294]&lt;&gt;&quot;&quot;;[.$D293]&lt;&gt;&quot;&quot;);1;IF([.$F294]&lt;&gt;&quot;&quot;;MAX(INDIRECT([.$B294]):[.$E293])+1;&quot;&quot;))">
            <text:p/>
          </table:table-cell>
          <table:table-cell table:style-name="ce32"/>
          <table:table-cell table:style-name="ce32" table:formula="of:=IF([.$H294]=&quot;&quot;;&quot;&quot;;IF([.$G293]=&quot;&quot;;1;[.$G29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4]&lt;&gt;&quot;&quot;;NETWORKDAYS([.$L294];[.$M29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94]=&quot;&quot;;[.$L294]&lt;&gt;&quot;&quot;;[.$L294]&lt;=[.$U$1]);AND([.$M294]&lt;&gt;&quot;&quot;;[.Q294]&lt;100;[.$M294]&lt;=[.$U$1]));&quot;遅延&quot;;&quot;&quot;)">
            <text:p/>
          </table:table-cell>
          <table:table-cell table:style-name="ce66"/>
          <table:table-cell table:style-name="ce66" table:formula="of:=SUM([.$V294:.$FM29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5]&lt;&gt;&quot;&quot;;[.$F295]=&quot;&quot;);&quot;E&quot;&amp;ROW();[.$B212])" office:value-type="string" office:string-value="E125" calcext:value-type="string">
            <text:p>E125</text:p>
          </table:table-cell>
          <table:table-cell table:style-name="ce13" table:formula="of:=IF(AND([.$D295]&lt;&gt;&quot;&quot;;[.$D295]&lt;&gt;&quot;○&quot;);MAX([.$C$3:.$C294])+1;[.$C294])" office:value-type="float" office:value="15" calcext:value-type="float">
            <text:p>15</text:p>
          </table:table-cell>
          <table:table-cell table:style-name="ce19"/>
          <table:table-cell table:style-name="ce27" table:formula="of:=IF(AND([.$F295]&lt;&gt;&quot;&quot;;[.$D294]&lt;&gt;&quot;&quot;);1;IF([.$F295]&lt;&gt;&quot;&quot;;MAX(INDIRECT([.$B295]):[.$E294])+1;&quot;&quot;))">
            <text:p/>
          </table:table-cell>
          <table:table-cell table:style-name="ce32"/>
          <table:table-cell table:style-name="ce32" table:formula="of:=IF([.$H295]=&quot;&quot;;&quot;&quot;;IF([.$G294]=&quot;&quot;;1;[.$G29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5]&lt;&gt;&quot;&quot;;NETWORKDAYS([.$L295];[.$M29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95]=&quot;&quot;;[.$L295]&lt;&gt;&quot;&quot;;[.$L295]&lt;=[.$U$1]);AND([.$M295]&lt;&gt;&quot;&quot;;[.Q295]&lt;100;[.$M295]&lt;=[.$U$1]));&quot;遅延&quot;;&quot;&quot;)">
            <text:p/>
          </table:table-cell>
          <table:table-cell table:style-name="ce66"/>
          <table:table-cell table:style-name="ce66" table:formula="of:=SUM([.$V295:.$FM29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6]&lt;&gt;&quot;&quot;;[.$F296]=&quot;&quot;);&quot;E&quot;&amp;ROW();[.$B213])" office:value-type="string" office:string-value="E125" calcext:value-type="string">
            <text:p>E125</text:p>
          </table:table-cell>
          <table:table-cell table:style-name="ce13" table:formula="of:=IF(AND([.$D296]&lt;&gt;&quot;&quot;;[.$D296]&lt;&gt;&quot;○&quot;);MAX([.$C$3:.$C295])+1;[.$C295])" office:value-type="float" office:value="15" calcext:value-type="float">
            <text:p>15</text:p>
          </table:table-cell>
          <table:table-cell table:style-name="ce19"/>
          <table:table-cell table:style-name="ce27" table:formula="of:=IF(AND([.$F296]&lt;&gt;&quot;&quot;;[.$D295]&lt;&gt;&quot;&quot;);1;IF([.$F296]&lt;&gt;&quot;&quot;;MAX(INDIRECT([.$B296]):[.$E295])+1;&quot;&quot;))">
            <text:p/>
          </table:table-cell>
          <table:table-cell table:style-name="ce32"/>
          <table:table-cell table:style-name="ce32" table:formula="of:=IF([.$H296]=&quot;&quot;;&quot;&quot;;IF([.$G295]=&quot;&quot;;1;[.$G29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6]&lt;&gt;&quot;&quot;;NETWORKDAYS([.$L296];[.$M29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96]=&quot;&quot;;[.$L296]&lt;&gt;&quot;&quot;;[.$L296]&lt;=[.$U$1]);AND([.$M296]&lt;&gt;&quot;&quot;;[.Q296]&lt;100;[.$M296]&lt;=[.$U$1]));&quot;遅延&quot;;&quot;&quot;)">
            <text:p/>
          </table:table-cell>
          <table:table-cell table:style-name="ce66"/>
          <table:table-cell table:style-name="ce66" table:formula="of:=SUM([.$V296:.$FM29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7]&lt;&gt;&quot;&quot;;[.$F297]=&quot;&quot;);&quot;E&quot;&amp;ROW();[.$B214])" office:value-type="float" office:value="0" calcext:value-type="float">
            <text:p>0</text:p>
          </table:table-cell>
          <table:table-cell table:style-name="ce13" table:formula="of:=IF(AND([.$D297]&lt;&gt;&quot;&quot;;[.$D297]&lt;&gt;&quot;○&quot;);MAX([.$C$3:.$C296])+1;[.$C296])" office:value-type="float" office:value="15" calcext:value-type="float">
            <text:p>15</text:p>
          </table:table-cell>
          <table:table-cell table:style-name="ce19"/>
          <table:table-cell table:style-name="ce27" table:formula="of:=IF(AND([.$F297]&lt;&gt;&quot;&quot;;[.$D296]&lt;&gt;&quot;&quot;);1;IF([.$F297]&lt;&gt;&quot;&quot;;MAX(INDIRECT([.$B297]):[.$E296])+1;&quot;&quot;))">
            <text:p/>
          </table:table-cell>
          <table:table-cell table:style-name="ce32"/>
          <table:table-cell table:style-name="ce32" table:formula="of:=IF([.$H297]=&quot;&quot;;&quot;&quot;;IF([.$G296]=&quot;&quot;;1;[.$G29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7]&lt;&gt;&quot;&quot;;NETWORKDAYS([.$L297];[.$M29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97]=&quot;&quot;;[.$L297]&lt;&gt;&quot;&quot;;[.$L297]&lt;=[.$U$1]);AND([.$M297]&lt;&gt;&quot;&quot;;[.Q297]&lt;100;[.$M297]&lt;=[.$U$1]));&quot;遅延&quot;;&quot;&quot;)">
            <text:p/>
          </table:table-cell>
          <table:table-cell table:style-name="ce66"/>
          <table:table-cell table:style-name="ce66" table:formula="of:=SUM([.$V297:.$FM29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8]&lt;&gt;&quot;&quot;;[.$F298]=&quot;&quot;);&quot;E&quot;&amp;ROW();[.$B215])" office:value-type="string" office:string-value="E125" calcext:value-type="string">
            <text:p>E125</text:p>
          </table:table-cell>
          <table:table-cell table:style-name="ce13" table:formula="of:=IF(AND([.$D298]&lt;&gt;&quot;&quot;;[.$D298]&lt;&gt;&quot;○&quot;);MAX([.$C$3:.$C297])+1;[.$C297])" office:value-type="float" office:value="15" calcext:value-type="float">
            <text:p>15</text:p>
          </table:table-cell>
          <table:table-cell table:style-name="ce19"/>
          <table:table-cell table:style-name="ce27" table:formula="of:=IF(AND([.$F298]&lt;&gt;&quot;&quot;;[.$D297]&lt;&gt;&quot;&quot;);1;IF([.$F298]&lt;&gt;&quot;&quot;;MAX(INDIRECT([.$B298]):[.$E297])+1;&quot;&quot;))">
            <text:p/>
          </table:table-cell>
          <table:table-cell table:style-name="ce32"/>
          <table:table-cell table:style-name="ce32" table:formula="of:=IF([.$H298]=&quot;&quot;;&quot;&quot;;IF([.$G297]=&quot;&quot;;1;[.$G29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8]&lt;&gt;&quot;&quot;;NETWORKDAYS([.$L298];[.$M29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98]=&quot;&quot;;[.$L298]&lt;&gt;&quot;&quot;;[.$L298]&lt;=[.$U$1]);AND([.$M298]&lt;&gt;&quot;&quot;;[.Q298]&lt;100;[.$M298]&lt;=[.$U$1]));&quot;遅延&quot;;&quot;&quot;)">
            <text:p/>
          </table:table-cell>
          <table:table-cell table:style-name="ce66"/>
          <table:table-cell table:style-name="ce66" table:formula="of:=SUM([.$V298:.$FM29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9]&lt;&gt;&quot;&quot;;[.$F299]=&quot;&quot;);&quot;E&quot;&amp;ROW();[.$B216])" office:value-type="string" office:string-value="E125" calcext:value-type="string">
            <text:p>E125</text:p>
          </table:table-cell>
          <table:table-cell table:style-name="ce13" table:formula="of:=IF(AND([.$D299]&lt;&gt;&quot;&quot;;[.$D299]&lt;&gt;&quot;○&quot;);MAX([.$C$3:.$C298])+1;[.$C298])" office:value-type="float" office:value="15" calcext:value-type="float">
            <text:p>15</text:p>
          </table:table-cell>
          <table:table-cell table:style-name="ce18"/>
          <table:table-cell table:style-name="ce30" table:formula="of:=IF(AND([.$F299]&lt;&gt;&quot;&quot;;[.$D298]&lt;&gt;&quot;&quot;);1;IF([.$F299]&lt;&gt;&quot;&quot;;MAX(INDIRECT([.$B299]):[.$E298])+1;&quot;&quot;))">
            <text:p/>
          </table:table-cell>
          <table:table-cell table:style-name="ce18"/>
          <table:table-cell table:style-name="ce30" table:formula="of:=IF([.$H299]=&quot;&quot;;&quot;&quot;;IF([.$G298]=&quot;&quot;;1;[.$G298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299]&lt;&gt;&quot;&quot;;NETWORKDAYS([.$L299];[.$M299];[$休日.$B$4:.$B$304]);&quot;&quot;)">
            <text:p/>
          </table:table-cell>
          <table:table-cell table:style-name="ce47"/>
          <table:table-cell table:style-name="ce18" table:formula="of:=IF(OR(AND([.$N299]=&quot;&quot;;[.$L299]&lt;&gt;&quot;&quot;;[.$L299]&lt;=[.$U$1]);AND([.$M299]&lt;&gt;&quot;&quot;;[.Q299]&lt;100;[.$M299]&lt;=[.$U$1]));&quot;遅延&quot;;&quot;&quot;)">
            <text:p/>
          </table:table-cell>
          <table:table-cell table:style-name="ce18"/>
          <table:table-cell table:style-name="ce18" table:formula="of:=SUM([.$V299:.$FM299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0]&lt;&gt;&quot;&quot;;[.$F300]=&quot;&quot;);&quot;E&quot;&amp;ROW();[.$B217])" office:value-type="string" office:string-value="E125" calcext:value-type="string">
            <text:p>E125</text:p>
          </table:table-cell>
          <table:table-cell table:style-name="ce13" table:formula="of:=IF(AND([.$D300]&lt;&gt;&quot;&quot;;[.$D300]&lt;&gt;&quot;○&quot;);MAX([.$C$3:.$C299])+1;[.$C299])" office:value-type="float" office:value="15" calcext:value-type="float">
            <text:p>15</text:p>
          </table:table-cell>
          <table:table-cell table:style-name="ce19"/>
          <table:table-cell table:style-name="ce27" table:formula="of:=IF(AND([.$F300]&lt;&gt;&quot;&quot;;[.$D299]&lt;&gt;&quot;&quot;);1;IF([.$F300]&lt;&gt;&quot;&quot;;MAX(INDIRECT([.$B300]):[.$E299])+1;&quot;&quot;))">
            <text:p/>
          </table:table-cell>
          <table:table-cell table:style-name="ce32"/>
          <table:table-cell table:style-name="ce32" table:formula="of:=IF([.$H300]=&quot;&quot;;&quot;&quot;;IF([.$G299]=&quot;&quot;;1;[.$G29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0]&lt;&gt;&quot;&quot;;NETWORKDAYS([.$L300];[.$M30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0]=&quot;&quot;;[.$L300]&lt;&gt;&quot;&quot;;[.$L300]&lt;=[.$U$1]);AND([.$M300]&lt;&gt;&quot;&quot;;[.Q300]&lt;100;[.$M300]&lt;=[.$U$1]));&quot;遅延&quot;;&quot;&quot;)">
            <text:p/>
          </table:table-cell>
          <table:table-cell table:style-name="ce66"/>
          <table:table-cell table:style-name="ce66" table:formula="of:=SUM([.$V300:.$FM30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1]&lt;&gt;&quot;&quot;;[.$F301]=&quot;&quot;);&quot;E&quot;&amp;ROW();[.$B218])" office:value-type="string" office:string-value="E125" calcext:value-type="string">
            <text:p>E125</text:p>
          </table:table-cell>
          <table:table-cell table:style-name="ce13" table:formula="of:=IF(AND([.$D301]&lt;&gt;&quot;&quot;;[.$D301]&lt;&gt;&quot;○&quot;);MAX([.$C$3:.$C300])+1;[.$C300])" office:value-type="float" office:value="15" calcext:value-type="float">
            <text:p>15</text:p>
          </table:table-cell>
          <table:table-cell table:style-name="ce19"/>
          <table:table-cell table:style-name="ce27" table:formula="of:=IF(AND([.$F301]&lt;&gt;&quot;&quot;;[.$D300]&lt;&gt;&quot;&quot;);1;IF([.$F301]&lt;&gt;&quot;&quot;;MAX(INDIRECT([.$B301]):[.$E300])+1;&quot;&quot;))">
            <text:p/>
          </table:table-cell>
          <table:table-cell table:style-name="ce32"/>
          <table:table-cell table:style-name="ce32" table:formula="of:=IF([.$H301]=&quot;&quot;;&quot;&quot;;IF([.$G300]=&quot;&quot;;1;[.$G30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1]&lt;&gt;&quot;&quot;;NETWORKDAYS([.$L301];[.$M30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1]=&quot;&quot;;[.$L301]&lt;&gt;&quot;&quot;;[.$L301]&lt;=[.$U$1]);AND([.$M301]&lt;&gt;&quot;&quot;;[.Q301]&lt;100;[.$M301]&lt;=[.$U$1]));&quot;遅延&quot;;&quot;&quot;)">
            <text:p/>
          </table:table-cell>
          <table:table-cell table:style-name="ce66"/>
          <table:table-cell table:style-name="ce66" table:formula="of:=SUM([.$V301:.$FM30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2]&lt;&gt;&quot;&quot;;[.$F302]=&quot;&quot;);&quot;E&quot;&amp;ROW();[.$B203])" office:value-type="string" office:string-value="E125" calcext:value-type="string">
            <text:p>E125</text:p>
          </table:table-cell>
          <table:table-cell table:style-name="ce13" table:formula="of:=IF(AND([.$D302]&lt;&gt;&quot;&quot;;[.$D302]&lt;&gt;&quot;○&quot;);MAX([.$C$3:.$C301])+1;[.$C301])" office:value-type="float" office:value="15" calcext:value-type="float">
            <text:p>15</text:p>
          </table:table-cell>
          <table:table-cell table:style-name="ce19"/>
          <table:table-cell table:style-name="ce27" table:formula="of:=IF(AND([.$F302]&lt;&gt;&quot;&quot;;[.$D301]&lt;&gt;&quot;&quot;);1;IF([.$F302]&lt;&gt;&quot;&quot;;MAX(INDIRECT([.$B302]):[.$E301])+1;&quot;&quot;))">
            <text:p/>
          </table:table-cell>
          <table:table-cell table:style-name="ce32"/>
          <table:table-cell table:style-name="ce32" table:formula="of:=IF([.$H302]=&quot;&quot;;&quot;&quot;;IF([.$G301]=&quot;&quot;;1;[.$G30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2]&lt;&gt;&quot;&quot;;NETWORKDAYS([.$L302];[.$M30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2]=&quot;&quot;;[.$L302]&lt;&gt;&quot;&quot;;[.$L302]&lt;=[.$U$1]);AND([.$M302]&lt;&gt;&quot;&quot;;[.Q302]&lt;100;[.$M302]&lt;=[.$U$1]));&quot;遅延&quot;;&quot;&quot;)">
            <text:p/>
          </table:table-cell>
          <table:table-cell table:style-name="ce66"/>
          <table:table-cell table:style-name="ce66" table:formula="of:=SUM([.$V302:.$FM30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3]&lt;&gt;&quot;&quot;;[.$F303]=&quot;&quot;);&quot;E&quot;&amp;ROW();[.$B204])" office:value-type="string" office:string-value="E125" calcext:value-type="string">
            <text:p>E125</text:p>
          </table:table-cell>
          <table:table-cell table:style-name="ce13" table:formula="of:=IF(AND([.$D303]&lt;&gt;&quot;&quot;;[.$D303]&lt;&gt;&quot;○&quot;);MAX([.$C$3:.$C302])+1;[.$C302])" office:value-type="float" office:value="15" calcext:value-type="float">
            <text:p>15</text:p>
          </table:table-cell>
          <table:table-cell table:style-name="ce19"/>
          <table:table-cell table:style-name="ce27" table:formula="of:=IF(AND([.$F303]&lt;&gt;&quot;&quot;;[.$D302]&lt;&gt;&quot;&quot;);1;IF([.$F303]&lt;&gt;&quot;&quot;;MAX(INDIRECT([.$B303]):[.$E302])+1;&quot;&quot;))">
            <text:p/>
          </table:table-cell>
          <table:table-cell table:style-name="ce32"/>
          <table:table-cell table:style-name="ce32" table:formula="of:=IF([.$H303]=&quot;&quot;;&quot;&quot;;IF([.$G302]=&quot;&quot;;1;[.$G30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3]&lt;&gt;&quot;&quot;;NETWORKDAYS([.$L303];[.$M30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3]=&quot;&quot;;[.$L303]&lt;&gt;&quot;&quot;;[.$L303]&lt;=[.$U$1]);AND([.$M303]&lt;&gt;&quot;&quot;;[.Q303]&lt;100;[.$M303]&lt;=[.$U$1]));&quot;遅延&quot;;&quot;&quot;)">
            <text:p/>
          </table:table-cell>
          <table:table-cell table:style-name="ce66"/>
          <table:table-cell table:style-name="ce66" table:formula="of:=SUM([.$V303:.$FM30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4]&lt;&gt;&quot;&quot;;[.$F304]=&quot;&quot;);&quot;E&quot;&amp;ROW();[.$B205])" office:value-type="string" office:string-value="E125" calcext:value-type="string">
            <text:p>E125</text:p>
          </table:table-cell>
          <table:table-cell table:style-name="ce13" table:formula="of:=IF(AND([.$D304]&lt;&gt;&quot;&quot;;[.$D304]&lt;&gt;&quot;○&quot;);MAX([.$C$3:.$C303])+1;[.$C303])" office:value-type="float" office:value="15" calcext:value-type="float">
            <text:p>15</text:p>
          </table:table-cell>
          <table:table-cell table:style-name="ce19"/>
          <table:table-cell table:style-name="ce27" table:formula="of:=IF(AND([.$F304]&lt;&gt;&quot;&quot;;[.$D303]&lt;&gt;&quot;&quot;);1;IF([.$F304]&lt;&gt;&quot;&quot;;MAX(INDIRECT([.$B304]):[.$E303])+1;&quot;&quot;))">
            <text:p/>
          </table:table-cell>
          <table:table-cell table:style-name="ce32"/>
          <table:table-cell table:style-name="ce32" table:formula="of:=IF([.$H304]=&quot;&quot;;&quot;&quot;;IF([.$G303]=&quot;&quot;;1;[.$G30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4]&lt;&gt;&quot;&quot;;NETWORKDAYS([.$L304];[.$M30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4]=&quot;&quot;;[.$L304]&lt;&gt;&quot;&quot;;[.$L304]&lt;=[.$U$1]);AND([.$M304]&lt;&gt;&quot;&quot;;[.Q304]&lt;100;[.$M304]&lt;=[.$U$1]));&quot;遅延&quot;;&quot;&quot;)">
            <text:p/>
          </table:table-cell>
          <table:table-cell table:style-name="ce66"/>
          <table:table-cell table:style-name="ce66" table:formula="of:=SUM([.$V304:.$FM30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5]&lt;&gt;&quot;&quot;;[.$F305]=&quot;&quot;);&quot;E&quot;&amp;ROW();[.$B206])" office:value-type="string" office:string-value="E125" calcext:value-type="string">
            <text:p>E125</text:p>
          </table:table-cell>
          <table:table-cell table:style-name="ce13" table:formula="of:=IF(AND([.$D305]&lt;&gt;&quot;&quot;;[.$D305]&lt;&gt;&quot;○&quot;);MAX([.$C$3:.$C304])+1;[.$C304])" office:value-type="float" office:value="15" calcext:value-type="float">
            <text:p>15</text:p>
          </table:table-cell>
          <table:table-cell table:style-name="ce19"/>
          <table:table-cell table:style-name="ce27" table:formula="of:=IF(AND([.$F305]&lt;&gt;&quot;&quot;;[.$D304]&lt;&gt;&quot;&quot;);1;IF([.$F305]&lt;&gt;&quot;&quot;;MAX(INDIRECT([.$B305]):[.$E304])+1;&quot;&quot;))">
            <text:p/>
          </table:table-cell>
          <table:table-cell table:style-name="ce32"/>
          <table:table-cell table:style-name="ce32" table:formula="of:=IF([.$H305]=&quot;&quot;;&quot;&quot;;IF([.$G304]=&quot;&quot;;1;[.$G30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5]&lt;&gt;&quot;&quot;;NETWORKDAYS([.$L305];[.$M30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5]=&quot;&quot;;[.$L305]&lt;&gt;&quot;&quot;;[.$L305]&lt;=[.$U$1]);AND([.$M305]&lt;&gt;&quot;&quot;;[.Q305]&lt;100;[.$M305]&lt;=[.$U$1]));&quot;遅延&quot;;&quot;&quot;)">
            <text:p/>
          </table:table-cell>
          <table:table-cell table:style-name="ce66"/>
          <table:table-cell table:style-name="ce66" table:formula="of:=SUM([.$V305:.$FM30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6]&lt;&gt;&quot;&quot;;[.$F306]=&quot;&quot;);&quot;E&quot;&amp;ROW();[.$B207])" office:value-type="string" office:string-value="E125" calcext:value-type="string">
            <text:p>E125</text:p>
          </table:table-cell>
          <table:table-cell table:style-name="ce13" table:formula="of:=IF(AND([.$D306]&lt;&gt;&quot;&quot;;[.$D306]&lt;&gt;&quot;○&quot;);MAX([.$C$3:.$C305])+1;[.$C305])" office:value-type="float" office:value="15" calcext:value-type="float">
            <text:p>15</text:p>
          </table:table-cell>
          <table:table-cell table:style-name="ce19"/>
          <table:table-cell table:style-name="ce27" table:formula="of:=IF(AND([.$F306]&lt;&gt;&quot;&quot;;[.$D305]&lt;&gt;&quot;&quot;);1;IF([.$F306]&lt;&gt;&quot;&quot;;MAX(INDIRECT([.$B306]):[.$E305])+1;&quot;&quot;))">
            <text:p/>
          </table:table-cell>
          <table:table-cell table:style-name="ce32"/>
          <table:table-cell table:style-name="ce32" table:formula="of:=IF([.$H306]=&quot;&quot;;&quot;&quot;;IF([.$G305]=&quot;&quot;;1;[.$G30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6]&lt;&gt;&quot;&quot;;NETWORKDAYS([.$L306];[.$M30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6]=&quot;&quot;;[.$L306]&lt;&gt;&quot;&quot;;[.$L306]&lt;=[.$U$1]);AND([.$M306]&lt;&gt;&quot;&quot;;[.Q306]&lt;100;[.$M306]&lt;=[.$U$1]));&quot;遅延&quot;;&quot;&quot;)">
            <text:p/>
          </table:table-cell>
          <table:table-cell table:style-name="ce66"/>
          <table:table-cell table:style-name="ce66" table:formula="of:=SUM([.$V306:.$FM30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7]&lt;&gt;&quot;&quot;;[.$F307]=&quot;&quot;);&quot;E&quot;&amp;ROW();[.$B208])" office:value-type="string" office:string-value="E125" calcext:value-type="string">
            <text:p>E125</text:p>
          </table:table-cell>
          <table:table-cell table:style-name="ce13" table:formula="of:=IF(AND([.$D307]&lt;&gt;&quot;&quot;;[.$D307]&lt;&gt;&quot;○&quot;);MAX([.$C$3:.$C306])+1;[.$C306])" office:value-type="float" office:value="15" calcext:value-type="float">
            <text:p>15</text:p>
          </table:table-cell>
          <table:table-cell table:style-name="ce19"/>
          <table:table-cell table:style-name="ce27" table:formula="of:=IF(AND([.$F307]&lt;&gt;&quot;&quot;;[.$D306]&lt;&gt;&quot;&quot;);1;IF([.$F307]&lt;&gt;&quot;&quot;;MAX(INDIRECT([.$B307]):[.$E306])+1;&quot;&quot;))">
            <text:p/>
          </table:table-cell>
          <table:table-cell table:style-name="ce32"/>
          <table:table-cell table:style-name="ce32" table:formula="of:=IF([.$H307]=&quot;&quot;;&quot;&quot;;IF([.$G306]=&quot;&quot;;1;[.$G30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7]&lt;&gt;&quot;&quot;;NETWORKDAYS([.$L307];[.$M30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7]=&quot;&quot;;[.$L307]&lt;&gt;&quot;&quot;;[.$L307]&lt;=[.$U$1]);AND([.$M307]&lt;&gt;&quot;&quot;;[.Q307]&lt;100;[.$M307]&lt;=[.$U$1]));&quot;遅延&quot;;&quot;&quot;)">
            <text:p/>
          </table:table-cell>
          <table:table-cell table:style-name="ce66"/>
          <table:table-cell table:style-name="ce66" table:formula="of:=SUM([.$V307:.$FM30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8]&lt;&gt;&quot;&quot;;[.$F308]=&quot;&quot;);&quot;E&quot;&amp;ROW();[.$B209])" office:value-type="string" office:string-value="E125" calcext:value-type="string">
            <text:p>E125</text:p>
          </table:table-cell>
          <table:table-cell table:style-name="ce13" table:formula="of:=IF(AND([.$D308]&lt;&gt;&quot;&quot;;[.$D308]&lt;&gt;&quot;○&quot;);MAX([.$C$3:.$C307])+1;[.$C307])" office:value-type="float" office:value="15" calcext:value-type="float">
            <text:p>15</text:p>
          </table:table-cell>
          <table:table-cell table:style-name="ce19"/>
          <table:table-cell table:style-name="ce27" table:formula="of:=IF(AND([.$F308]&lt;&gt;&quot;&quot;;[.$D307]&lt;&gt;&quot;&quot;);1;IF([.$F308]&lt;&gt;&quot;&quot;;MAX(INDIRECT([.$B308]):[.$E307])+1;&quot;&quot;))">
            <text:p/>
          </table:table-cell>
          <table:table-cell table:style-name="ce32"/>
          <table:table-cell table:style-name="ce32" table:formula="of:=IF([.$H308]=&quot;&quot;;&quot;&quot;;IF([.$G307]=&quot;&quot;;1;[.$G30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8]&lt;&gt;&quot;&quot;;NETWORKDAYS([.$L308];[.$M30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8]=&quot;&quot;;[.$L308]&lt;&gt;&quot;&quot;;[.$L308]&lt;=[.$U$1]);AND([.$M308]&lt;&gt;&quot;&quot;;[.Q308]&lt;100;[.$M308]&lt;=[.$U$1]));&quot;遅延&quot;;&quot;&quot;)">
            <text:p/>
          </table:table-cell>
          <table:table-cell table:style-name="ce66"/>
          <table:table-cell table:style-name="ce66" table:formula="of:=SUM([.$V308:.$FM30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9]&lt;&gt;&quot;&quot;;[.$F309]=&quot;&quot;);&quot;E&quot;&amp;ROW();[.$B210])" office:value-type="string" office:string-value="E125" calcext:value-type="string">
            <text:p>E125</text:p>
          </table:table-cell>
          <table:table-cell table:style-name="ce13" table:formula="of:=IF(AND([.$D309]&lt;&gt;&quot;&quot;;[.$D309]&lt;&gt;&quot;○&quot;);MAX([.$C$3:.$C308])+1;[.$C308])" office:value-type="float" office:value="15" calcext:value-type="float">
            <text:p>15</text:p>
          </table:table-cell>
          <table:table-cell table:style-name="ce19"/>
          <table:table-cell table:style-name="ce27" table:formula="of:=IF(AND([.$F309]&lt;&gt;&quot;&quot;;[.$D308]&lt;&gt;&quot;&quot;);1;IF([.$F309]&lt;&gt;&quot;&quot;;MAX(INDIRECT([.$B309]):[.$E308])+1;&quot;&quot;))">
            <text:p/>
          </table:table-cell>
          <table:table-cell table:style-name="ce32"/>
          <table:table-cell table:style-name="ce32" table:formula="of:=IF([.$H309]=&quot;&quot;;&quot;&quot;;IF([.$G308]=&quot;&quot;;1;[.$G30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9]&lt;&gt;&quot;&quot;;NETWORKDAYS([.$L309];[.$M30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9]=&quot;&quot;;[.$L309]&lt;&gt;&quot;&quot;;[.$L309]&lt;=[.$U$1]);AND([.$M309]&lt;&gt;&quot;&quot;;[.Q309]&lt;100;[.$M309]&lt;=[.$U$1]));&quot;遅延&quot;;&quot;&quot;)">
            <text:p/>
          </table:table-cell>
          <table:table-cell table:style-name="ce66"/>
          <table:table-cell table:style-name="ce66" table:formula="of:=SUM([.$V309:.$FM30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0]&lt;&gt;&quot;&quot;;[.$F310]=&quot;&quot;);&quot;E&quot;&amp;ROW();[.$B211])" office:value-type="string" office:string-value="E125" calcext:value-type="string">
            <text:p>E125</text:p>
          </table:table-cell>
          <table:table-cell table:style-name="ce13" table:formula="of:=IF(AND([.$D310]&lt;&gt;&quot;&quot;;[.$D310]&lt;&gt;&quot;○&quot;);MAX([.$C$3:.$C309])+1;[.$C309])" office:value-type="float" office:value="15" calcext:value-type="float">
            <text:p>15</text:p>
          </table:table-cell>
          <table:table-cell table:style-name="ce19"/>
          <table:table-cell table:style-name="ce27" table:formula="of:=IF(AND([.$F310]&lt;&gt;&quot;&quot;;[.$D309]&lt;&gt;&quot;&quot;);1;IF([.$F310]&lt;&gt;&quot;&quot;;MAX(INDIRECT([.$B310]):[.$E309])+1;&quot;&quot;))">
            <text:p/>
          </table:table-cell>
          <table:table-cell table:style-name="ce32"/>
          <table:table-cell table:style-name="ce32" table:formula="of:=IF([.$H310]=&quot;&quot;;&quot;&quot;;IF([.$G309]=&quot;&quot;;1;[.$G30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0]&lt;&gt;&quot;&quot;;NETWORKDAYS([.$L310];[.$M31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10]=&quot;&quot;;[.$L310]&lt;&gt;&quot;&quot;;[.$L310]&lt;=[.$U$1]);AND([.$M310]&lt;&gt;&quot;&quot;;[.Q310]&lt;100;[.$M310]&lt;=[.$U$1]));&quot;遅延&quot;;&quot;&quot;)">
            <text:p/>
          </table:table-cell>
          <table:table-cell table:style-name="ce66"/>
          <table:table-cell table:style-name="ce66" table:formula="of:=SUM([.$V310:.$FM31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1]&lt;&gt;&quot;&quot;;[.$F311]=&quot;&quot;);&quot;E&quot;&amp;ROW();[.$B212])" office:value-type="string" office:string-value="E125" calcext:value-type="string">
            <text:p>E125</text:p>
          </table:table-cell>
          <table:table-cell table:style-name="ce13" table:formula="of:=IF(AND([.$D311]&lt;&gt;&quot;&quot;;[.$D311]&lt;&gt;&quot;○&quot;);MAX([.$C$3:.$C310])+1;[.$C310])" office:value-type="float" office:value="15" calcext:value-type="float">
            <text:p>15</text:p>
          </table:table-cell>
          <table:table-cell table:style-name="ce19"/>
          <table:table-cell table:style-name="ce27" table:formula="of:=IF(AND([.$F311]&lt;&gt;&quot;&quot;;[.$D310]&lt;&gt;&quot;&quot;);1;IF([.$F311]&lt;&gt;&quot;&quot;;MAX(INDIRECT([.$B311]):[.$E310])+1;&quot;&quot;))">
            <text:p/>
          </table:table-cell>
          <table:table-cell table:style-name="ce32"/>
          <table:table-cell table:style-name="ce32" table:formula="of:=IF([.$H311]=&quot;&quot;;&quot;&quot;;IF([.$G310]=&quot;&quot;;1;[.$G31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1]&lt;&gt;&quot;&quot;;NETWORKDAYS([.$L311];[.$M31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11]=&quot;&quot;;[.$L311]&lt;&gt;&quot;&quot;;[.$L311]&lt;=[.$U$1]);AND([.$M311]&lt;&gt;&quot;&quot;;[.Q311]&lt;100;[.$M311]&lt;=[.$U$1]));&quot;遅延&quot;;&quot;&quot;)">
            <text:p/>
          </table:table-cell>
          <table:table-cell table:style-name="ce66"/>
          <table:table-cell table:style-name="ce66" table:formula="of:=SUM([.$V311:.$FM31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2]&lt;&gt;&quot;&quot;;[.$F312]=&quot;&quot;);&quot;E&quot;&amp;ROW();[.$B213])" office:value-type="string" office:string-value="E125" calcext:value-type="string">
            <text:p>E125</text:p>
          </table:table-cell>
          <table:table-cell table:style-name="ce13" table:formula="of:=IF(AND([.$D312]&lt;&gt;&quot;&quot;;[.$D312]&lt;&gt;&quot;○&quot;);MAX([.$C$3:.$C311])+1;[.$C311])" office:value-type="float" office:value="15" calcext:value-type="float">
            <text:p>15</text:p>
          </table:table-cell>
          <table:table-cell table:style-name="ce19"/>
          <table:table-cell table:style-name="ce27" table:formula="of:=IF(AND([.$F312]&lt;&gt;&quot;&quot;;[.$D311]&lt;&gt;&quot;&quot;);1;IF([.$F312]&lt;&gt;&quot;&quot;;MAX(INDIRECT([.$B312]):[.$E311])+1;&quot;&quot;))">
            <text:p/>
          </table:table-cell>
          <table:table-cell table:style-name="ce32"/>
          <table:table-cell table:style-name="ce32" table:formula="of:=IF([.$H312]=&quot;&quot;;&quot;&quot;;IF([.$G311]=&quot;&quot;;1;[.$G31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2]&lt;&gt;&quot;&quot;;NETWORKDAYS([.$L312];[.$M31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12]=&quot;&quot;;[.$L312]&lt;&gt;&quot;&quot;;[.$L312]&lt;=[.$U$1]);AND([.$M312]&lt;&gt;&quot;&quot;;[.Q312]&lt;100;[.$M312]&lt;=[.$U$1]));&quot;遅延&quot;;&quot;&quot;)">
            <text:p/>
          </table:table-cell>
          <table:table-cell table:style-name="ce66"/>
          <table:table-cell table:style-name="ce66" table:formula="of:=SUM([.$V312:.$FM31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3]&lt;&gt;&quot;&quot;;[.$F313]=&quot;&quot;);&quot;E&quot;&amp;ROW();[.$B215])" office:value-type="string" office:string-value="E125" calcext:value-type="string">
            <text:p>E125</text:p>
          </table:table-cell>
          <table:table-cell table:style-name="ce13" table:formula="of:=IF(AND([.$D313]&lt;&gt;&quot;&quot;;[.$D313]&lt;&gt;&quot;○&quot;);MAX([.$C$3:.$C312])+1;[.$C312])" office:value-type="float" office:value="15" calcext:value-type="float">
            <text:p>15</text:p>
          </table:table-cell>
          <table:table-cell table:style-name="ce19"/>
          <table:table-cell table:style-name="ce27" table:formula="of:=IF(AND([.$F313]&lt;&gt;&quot;&quot;;[.$D312]&lt;&gt;&quot;&quot;);1;IF([.$F313]&lt;&gt;&quot;&quot;;MAX(INDIRECT([.$B313]):[.$E312])+1;&quot;&quot;))">
            <text:p/>
          </table:table-cell>
          <table:table-cell table:style-name="ce32"/>
          <table:table-cell table:style-name="ce32" table:formula="of:=IF([.$H313]=&quot;&quot;;&quot;&quot;;IF([.$G312]=&quot;&quot;;1;[.$G31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3]&lt;&gt;&quot;&quot;;NETWORKDAYS([.$L313];[.$M31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13]=&quot;&quot;;[.$L313]&lt;&gt;&quot;&quot;;[.$L313]&lt;=[.$U$1]);AND([.$M313]&lt;&gt;&quot;&quot;;[.Q313]&lt;100;[.$M313]&lt;=[.$U$1]));&quot;遅延&quot;;&quot;&quot;)">
            <text:p/>
          </table:table-cell>
          <table:table-cell table:style-name="ce66"/>
          <table:table-cell table:style-name="ce66" table:formula="of:=SUM([.$V313:.$FM31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4]&lt;&gt;&quot;&quot;;[.$F314]=&quot;&quot;);&quot;E&quot;&amp;ROW();[.$B216])" office:value-type="string" office:string-value="E125" calcext:value-type="string">
            <text:p>E125</text:p>
          </table:table-cell>
          <table:table-cell table:style-name="ce13" table:formula="of:=IF(AND([.$D314]&lt;&gt;&quot;&quot;;[.$D314]&lt;&gt;&quot;○&quot;);MAX([.$C$3:.$C313])+1;[.$C313])" office:value-type="float" office:value="15" calcext:value-type="float">
            <text:p>15</text:p>
          </table:table-cell>
          <table:table-cell table:style-name="ce19"/>
          <table:table-cell table:style-name="ce27" table:formula="of:=IF(AND([.$F314]&lt;&gt;&quot;&quot;;[.$D313]&lt;&gt;&quot;&quot;);1;IF([.$F314]&lt;&gt;&quot;&quot;;MAX(INDIRECT([.$B314]):[.$E313])+1;&quot;&quot;))">
            <text:p/>
          </table:table-cell>
          <table:table-cell table:style-name="ce32"/>
          <table:table-cell table:style-name="ce32" table:formula="of:=IF([.$H314]=&quot;&quot;;&quot;&quot;;IF([.$G313]=&quot;&quot;;1;[.$G31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4]&lt;&gt;&quot;&quot;;NETWORKDAYS([.$L314];[.$M31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14]=&quot;&quot;;[.$L314]&lt;&gt;&quot;&quot;;[.$L314]&lt;=[.$U$1]);AND([.$M314]&lt;&gt;&quot;&quot;;[.Q314]&lt;100;[.$M314]&lt;=[.$U$1]));&quot;遅延&quot;;&quot;&quot;)">
            <text:p/>
          </table:table-cell>
          <table:table-cell table:style-name="ce66"/>
          <table:table-cell table:style-name="ce66" table:formula="of:=SUM([.$V314:.$FM31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5]&lt;&gt;&quot;&quot;;[.$F315]=&quot;&quot;);&quot;E&quot;&amp;ROW();[.$B217])" office:value-type="string" office:string-value="E125" calcext:value-type="string">
            <text:p>E125</text:p>
          </table:table-cell>
          <table:table-cell table:style-name="ce13" table:formula="of:=IF(AND([.$D315]&lt;&gt;&quot;&quot;;[.$D315]&lt;&gt;&quot;○&quot;);MAX([.$C$3:.$C314])+1;[.$C314])" office:value-type="float" office:value="15" calcext:value-type="float">
            <text:p>15</text:p>
          </table:table-cell>
          <table:table-cell table:style-name="ce19"/>
          <table:table-cell table:style-name="ce27" table:formula="of:=IF(AND([.$F315]&lt;&gt;&quot;&quot;;[.$D314]&lt;&gt;&quot;&quot;);1;IF([.$F315]&lt;&gt;&quot;&quot;;MAX(INDIRECT([.$B315]):[.$E314])+1;&quot;&quot;))">
            <text:p/>
          </table:table-cell>
          <table:table-cell table:style-name="ce32"/>
          <table:table-cell table:style-name="ce32" table:formula="of:=IF([.$H315]=&quot;&quot;;&quot;&quot;;IF([.$G314]=&quot;&quot;;1;[.$G31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5]&lt;&gt;&quot;&quot;;NETWORKDAYS([.$L315];[.$M31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15]=&quot;&quot;;[.$L315]&lt;&gt;&quot;&quot;;[.$L315]&lt;=[.$U$1]);AND([.$M315]&lt;&gt;&quot;&quot;;[.Q315]&lt;100;[.$M315]&lt;=[.$U$1]));&quot;遅延&quot;;&quot;&quot;)">
            <text:p/>
          </table:table-cell>
          <table:table-cell table:style-name="ce66"/>
          <table:table-cell table:style-name="ce66" table:formula="of:=SUM([.$V315:.$FM31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6]&lt;&gt;&quot;&quot;;[.$F316]=&quot;&quot;);&quot;E&quot;&amp;ROW();#REF!)" office:value-type="string" office:string-value="" calcext:value-type="error">
            <text:p>#REF!</text:p>
          </table:table-cell>
          <table:table-cell table:style-name="ce13" table:formula="of:=IF(AND([.$D316]&lt;&gt;&quot;&quot;;[.$D316]&lt;&gt;&quot;○&quot;);MAX([.$C$3:.$C315])+1;[.$C315])" office:value-type="float" office:value="15" calcext:value-type="float">
            <text:p>15</text:p>
          </table:table-cell>
          <table:table-cell table:style-name="ce19"/>
          <table:table-cell table:style-name="ce27" table:formula="of:=IF(AND([.$F316]&lt;&gt;&quot;&quot;;[.$D315]&lt;&gt;&quot;&quot;);1;IF([.$F316]&lt;&gt;&quot;&quot;;MAX(INDIRECT([.$B316]):[.$E315])+1;&quot;&quot;))">
            <text:p/>
          </table:table-cell>
          <table:table-cell table:style-name="ce32"/>
          <table:table-cell table:style-name="ce32" table:formula="of:=IF([.$H316]=&quot;&quot;;&quot;&quot;;IF([.$G315]=&quot;&quot;;1;[.$G31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6]&lt;&gt;&quot;&quot;;NETWORKDAYS([.$L316];[.$M31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16]=&quot;&quot;;[.$L316]&lt;&gt;&quot;&quot;;[.$L316]&lt;=[.$U$1]);AND([.$M316]&lt;&gt;&quot;&quot;;[.Q316]&lt;100;[.$M316]&lt;=[.$U$1]));&quot;遅延&quot;;&quot;&quot;)">
            <text:p/>
          </table:table-cell>
          <table:table-cell table:style-name="ce66"/>
          <table:table-cell table:style-name="ce66" table:formula="of:=SUM([.$V316:.$FM31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7]&lt;&gt;&quot;&quot;;[.$F317]=&quot;&quot;);&quot;E&quot;&amp;ROW();#REF!)" office:value-type="string" office:string-value="" calcext:value-type="error">
            <text:p>#REF!</text:p>
          </table:table-cell>
          <table:table-cell table:style-name="ce13" table:formula="of:=IF(AND([.$D317]&lt;&gt;&quot;&quot;;[.$D317]&lt;&gt;&quot;○&quot;);MAX([.$C$3:.$C316])+1;[.$C316])" office:value-type="float" office:value="15" calcext:value-type="float">
            <text:p>15</text:p>
          </table:table-cell>
          <table:table-cell table:style-name="ce19"/>
          <table:table-cell table:style-name="ce27" table:formula="of:=IF(AND([.$F317]&lt;&gt;&quot;&quot;;[.$D316]&lt;&gt;&quot;&quot;);1;IF([.$F317]&lt;&gt;&quot;&quot;;MAX(INDIRECT([.$B317]):[.$E316])+1;&quot;&quot;))">
            <text:p/>
          </table:table-cell>
          <table:table-cell table:style-name="ce32"/>
          <table:table-cell table:style-name="ce32" table:formula="of:=IF([.$H317]=&quot;&quot;;&quot;&quot;;IF([.$G316]=&quot;&quot;;1;[.$G31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7]&lt;&gt;&quot;&quot;;NETWORKDAYS([.$L317];[.$M31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17]=&quot;&quot;;[.$L317]&lt;&gt;&quot;&quot;;[.$L317]&lt;=[.$U$1]);AND([.$M317]&lt;&gt;&quot;&quot;;[.Q317]&lt;100;[.$M317]&lt;=[.$U$1]));&quot;遅延&quot;;&quot;&quot;)">
            <text:p/>
          </table:table-cell>
          <table:table-cell table:style-name="ce66"/>
          <table:table-cell table:style-name="ce66" table:formula="of:=SUM([.$V317:.$FM31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8]&lt;&gt;&quot;&quot;;[.$F318]=&quot;&quot;);&quot;E&quot;&amp;ROW();#REF!)" office:value-type="string" office:string-value="" calcext:value-type="error">
            <text:p>#REF!</text:p>
          </table:table-cell>
          <table:table-cell table:style-name="ce13" table:formula="of:=IF(AND([.$D318]&lt;&gt;&quot;&quot;;[.$D318]&lt;&gt;&quot;○&quot;);MAX([.$C$3:.$C317])+1;[.$C317])" office:value-type="float" office:value="15" calcext:value-type="float">
            <text:p>15</text:p>
          </table:table-cell>
          <table:table-cell table:style-name="ce18"/>
          <table:table-cell table:style-name="ce30" table:formula="of:=IF(AND([.$F318]&lt;&gt;&quot;&quot;;[.$D317]&lt;&gt;&quot;&quot;);1;IF([.$F318]&lt;&gt;&quot;&quot;;MAX(INDIRECT([.$B318]):[.$E317])+1;&quot;&quot;))">
            <text:p/>
          </table:table-cell>
          <table:table-cell table:style-name="ce18"/>
          <table:table-cell table:style-name="ce30" table:formula="of:=IF([.$H318]=&quot;&quot;;&quot;&quot;;IF([.$G317]=&quot;&quot;;1;[.$G317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18]&lt;&gt;&quot;&quot;;NETWORKDAYS([.$L318];[.$M318];[$休日.$B$4:.$B$304]);&quot;&quot;)">
            <text:p/>
          </table:table-cell>
          <table:table-cell table:style-name="ce47"/>
          <table:table-cell table:style-name="ce18" table:formula="of:=IF(OR(AND([.$N318]=&quot;&quot;;[.$L318]&lt;&gt;&quot;&quot;;[.$L318]&lt;=[.$U$1]);AND([.$M318]&lt;&gt;&quot;&quot;;[.Q318]&lt;100;[.$M318]&lt;=[.$U$1]));&quot;遅延&quot;;&quot;&quot;)">
            <text:p/>
          </table:table-cell>
          <table:table-cell table:style-name="ce18"/>
          <table:table-cell table:style-name="ce18" table:formula="of:=SUM([.$V318:.$FM318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9]&lt;&gt;&quot;&quot;;[.$F319]=&quot;&quot;);&quot;E&quot;&amp;ROW();#REF!)" office:value-type="string" office:string-value="" calcext:value-type="error">
            <text:p>#REF!</text:p>
          </table:table-cell>
          <table:table-cell table:style-name="ce13" table:formula="of:=IF(AND([.$D319]&lt;&gt;&quot;&quot;;[.$D319]&lt;&gt;&quot;○&quot;);MAX([.$C$3:.$C318])+1;[.$C318])" office:value-type="float" office:value="15" calcext:value-type="float">
            <text:p>15</text:p>
          </table:table-cell>
          <table:table-cell table:style-name="ce19"/>
          <table:table-cell table:style-name="ce27" table:formula="of:=IF(AND([.$F319]&lt;&gt;&quot;&quot;;[.$D318]&lt;&gt;&quot;&quot;);1;IF([.$F319]&lt;&gt;&quot;&quot;;MAX(INDIRECT([.$B319]):[.$E318])+1;&quot;&quot;))">
            <text:p/>
          </table:table-cell>
          <table:table-cell table:style-name="ce32"/>
          <table:table-cell table:style-name="ce32" table:formula="of:=IF([.$H319]=&quot;&quot;;&quot;&quot;;IF([.$G318]=&quot;&quot;;1;[.$G31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9]&lt;&gt;&quot;&quot;;NETWORKDAYS([.$L319];[.$M31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19]=&quot;&quot;;[.$L319]&lt;&gt;&quot;&quot;;[.$L319]&lt;=[.$U$1]);AND([.$M319]&lt;&gt;&quot;&quot;;[.Q319]&lt;100;[.$M319]&lt;=[.$U$1]));&quot;遅延&quot;;&quot;&quot;)">
            <text:p/>
          </table:table-cell>
          <table:table-cell table:style-name="ce66"/>
          <table:table-cell table:style-name="ce66" table:formula="of:=SUM([.$V319:.$FM31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0]&lt;&gt;&quot;&quot;;[.$F320]=&quot;&quot;);&quot;E&quot;&amp;ROW();#REF!)" office:value-type="string" office:string-value="" calcext:value-type="error">
            <text:p>#REF!</text:p>
          </table:table-cell>
          <table:table-cell table:style-name="ce13" table:formula="of:=IF(AND([.$D320]&lt;&gt;&quot;&quot;;[.$D320]&lt;&gt;&quot;○&quot;);MAX([.$C$3:.$C319])+1;[.$C319])" office:value-type="float" office:value="15" calcext:value-type="float">
            <text:p>15</text:p>
          </table:table-cell>
          <table:table-cell table:style-name="ce19"/>
          <table:table-cell table:style-name="ce27" table:formula="of:=IF(AND([.$F320]&lt;&gt;&quot;&quot;;[.$D319]&lt;&gt;&quot;&quot;);1;IF([.$F320]&lt;&gt;&quot;&quot;;MAX(INDIRECT([.$B320]):[.$E319])+1;&quot;&quot;))">
            <text:p/>
          </table:table-cell>
          <table:table-cell table:style-name="ce32"/>
          <table:table-cell table:style-name="ce32" table:formula="of:=IF([.$H320]=&quot;&quot;;&quot;&quot;;IF([.$G319]=&quot;&quot;;1;[.$G31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0]&lt;&gt;&quot;&quot;;NETWORKDAYS([.$L320];[.$M32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20]=&quot;&quot;;[.$L320]&lt;&gt;&quot;&quot;;[.$L320]&lt;=[.$U$1]);AND([.$M320]&lt;&gt;&quot;&quot;;[.Q320]&lt;100;[.$M320]&lt;=[.$U$1]));&quot;遅延&quot;;&quot;&quot;)">
            <text:p/>
          </table:table-cell>
          <table:table-cell table:style-name="ce66"/>
          <table:table-cell table:style-name="ce66" table:formula="of:=SUM([.$V320:.$FM32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1]&lt;&gt;&quot;&quot;;[.$F321]=&quot;&quot;);&quot;E&quot;&amp;ROW();#REF!)" office:value-type="string" office:string-value="" calcext:value-type="error">
            <text:p>#REF!</text:p>
          </table:table-cell>
          <table:table-cell table:style-name="ce13" table:formula="of:=IF(AND([.$D321]&lt;&gt;&quot;&quot;;[.$D321]&lt;&gt;&quot;○&quot;);MAX([.$C$3:.$C320])+1;[.$C320])" office:value-type="float" office:value="15" calcext:value-type="float">
            <text:p>15</text:p>
          </table:table-cell>
          <table:table-cell table:style-name="ce19"/>
          <table:table-cell table:style-name="ce27" table:formula="of:=IF(AND([.$F321]&lt;&gt;&quot;&quot;;[.$D320]&lt;&gt;&quot;&quot;);1;IF([.$F321]&lt;&gt;&quot;&quot;;MAX(INDIRECT([.$B321]):[.$E320])+1;&quot;&quot;))">
            <text:p/>
          </table:table-cell>
          <table:table-cell table:style-name="ce32"/>
          <table:table-cell table:style-name="ce32" table:formula="of:=IF([.$H321]=&quot;&quot;;&quot;&quot;;IF([.$G320]=&quot;&quot;;1;[.$G32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1]&lt;&gt;&quot;&quot;;NETWORKDAYS([.$L321];[.$M32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21]=&quot;&quot;;[.$L321]&lt;&gt;&quot;&quot;;[.$L321]&lt;=[.$U$1]);AND([.$M321]&lt;&gt;&quot;&quot;;[.Q321]&lt;100;[.$M321]&lt;=[.$U$1]));&quot;遅延&quot;;&quot;&quot;)">
            <text:p/>
          </table:table-cell>
          <table:table-cell table:style-name="ce66"/>
          <table:table-cell table:style-name="ce66" table:formula="of:=SUM([.$V321:.$FM32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2]&lt;&gt;&quot;&quot;;[.$F322]=&quot;&quot;);&quot;E&quot;&amp;ROW();#REF!)" office:value-type="string" office:string-value="" calcext:value-type="error">
            <text:p>#REF!</text:p>
          </table:table-cell>
          <table:table-cell table:style-name="ce13" table:formula="of:=IF(AND([.$D322]&lt;&gt;&quot;&quot;;[.$D322]&lt;&gt;&quot;○&quot;);MAX([.$C$3:.$C321])+1;[.$C321])" office:value-type="float" office:value="15" calcext:value-type="float">
            <text:p>15</text:p>
          </table:table-cell>
          <table:table-cell table:style-name="ce19"/>
          <table:table-cell table:style-name="ce27" table:formula="of:=IF(AND([.$F322]&lt;&gt;&quot;&quot;;[.$D321]&lt;&gt;&quot;&quot;);1;IF([.$F322]&lt;&gt;&quot;&quot;;MAX(INDIRECT([.$B322]):[.$E321])+1;&quot;&quot;))">
            <text:p/>
          </table:table-cell>
          <table:table-cell table:style-name="ce32"/>
          <table:table-cell table:style-name="ce32" table:formula="of:=IF([.$H322]=&quot;&quot;;&quot;&quot;;IF([.$G321]=&quot;&quot;;1;[.$G32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2]&lt;&gt;&quot;&quot;;NETWORKDAYS([.$L322];[.$M32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22]=&quot;&quot;;[.$L322]&lt;&gt;&quot;&quot;;[.$L322]&lt;=[.$U$1]);AND([.$M322]&lt;&gt;&quot;&quot;;[.Q322]&lt;100;[.$M322]&lt;=[.$U$1]));&quot;遅延&quot;;&quot;&quot;)">
            <text:p/>
          </table:table-cell>
          <table:table-cell table:style-name="ce66"/>
          <table:table-cell table:style-name="ce66" table:formula="of:=SUM([.$V322:.$FM32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3]&lt;&gt;&quot;&quot;;[.$F323]=&quot;&quot;);&quot;E&quot;&amp;ROW();#REF!)" office:value-type="string" office:string-value="" calcext:value-type="error">
            <text:p>#REF!</text:p>
          </table:table-cell>
          <table:table-cell table:style-name="ce13" table:formula="of:=IF(AND([.$D323]&lt;&gt;&quot;&quot;;[.$D323]&lt;&gt;&quot;○&quot;);MAX([.$C$3:.$C322])+1;[.$C322])" office:value-type="float" office:value="15" calcext:value-type="float">
            <text:p>15</text:p>
          </table:table-cell>
          <table:table-cell table:style-name="ce19"/>
          <table:table-cell table:style-name="ce27" table:formula="of:=IF(AND([.$F323]&lt;&gt;&quot;&quot;;[.$D322]&lt;&gt;&quot;&quot;);1;IF([.$F323]&lt;&gt;&quot;&quot;;MAX(INDIRECT([.$B323]):[.$E322])+1;&quot;&quot;))">
            <text:p/>
          </table:table-cell>
          <table:table-cell table:style-name="ce32"/>
          <table:table-cell table:style-name="ce32" table:formula="of:=IF([.$H323]=&quot;&quot;;&quot;&quot;;IF([.$G322]=&quot;&quot;;1;[.$G32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3]&lt;&gt;&quot;&quot;;NETWORKDAYS([.$L323];[.$M32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23]=&quot;&quot;;[.$L323]&lt;&gt;&quot;&quot;;[.$L323]&lt;=[.$U$1]);AND([.$M323]&lt;&gt;&quot;&quot;;[.Q323]&lt;100;[.$M323]&lt;=[.$U$1]));&quot;遅延&quot;;&quot;&quot;)">
            <text:p/>
          </table:table-cell>
          <table:table-cell table:style-name="ce66"/>
          <table:table-cell table:style-name="ce66" table:formula="of:=SUM([.$V323:.$FM32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4]&lt;&gt;&quot;&quot;;[.$F324]=&quot;&quot;);&quot;E&quot;&amp;ROW();#REF!)" office:value-type="string" office:string-value="" calcext:value-type="error">
            <text:p>#REF!</text:p>
          </table:table-cell>
          <table:table-cell table:style-name="ce13" table:formula="of:=IF(AND([.$D324]&lt;&gt;&quot;&quot;;[.$D324]&lt;&gt;&quot;○&quot;);MAX([.$C$3:.$C323])+1;[.$C323])" office:value-type="float" office:value="15" calcext:value-type="float">
            <text:p>15</text:p>
          </table:table-cell>
          <table:table-cell table:style-name="ce19"/>
          <table:table-cell table:style-name="ce27" table:formula="of:=IF(AND([.$F324]&lt;&gt;&quot;&quot;;[.$D323]&lt;&gt;&quot;&quot;);1;IF([.$F324]&lt;&gt;&quot;&quot;;MAX(INDIRECT([.$B324]):[.$E323])+1;&quot;&quot;))">
            <text:p/>
          </table:table-cell>
          <table:table-cell table:style-name="ce32"/>
          <table:table-cell table:style-name="ce32" table:formula="of:=IF([.$H324]=&quot;&quot;;&quot;&quot;;IF([.$G323]=&quot;&quot;;1;[.$G32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4]&lt;&gt;&quot;&quot;;NETWORKDAYS([.$L324];[.$M32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24]=&quot;&quot;;[.$L324]&lt;&gt;&quot;&quot;;[.$L324]&lt;=[.$U$1]);AND([.$M324]&lt;&gt;&quot;&quot;;[.Q324]&lt;100;[.$M324]&lt;=[.$U$1]));&quot;遅延&quot;;&quot;&quot;)">
            <text:p/>
          </table:table-cell>
          <table:table-cell table:style-name="ce66"/>
          <table:table-cell table:style-name="ce66" table:formula="of:=SUM([.$V324:.$FM32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5]&lt;&gt;&quot;&quot;;[.$F325]=&quot;&quot;);&quot;E&quot;&amp;ROW();#REF!)" office:value-type="string" office:string-value="" calcext:value-type="error">
            <text:p>#REF!</text:p>
          </table:table-cell>
          <table:table-cell table:style-name="ce13" table:formula="of:=IF(AND([.$D325]&lt;&gt;&quot;&quot;;[.$D325]&lt;&gt;&quot;○&quot;);MAX([.$C$3:.$C324])+1;[.$C324])" office:value-type="float" office:value="15" calcext:value-type="float">
            <text:p>15</text:p>
          </table:table-cell>
          <table:table-cell table:style-name="ce19"/>
          <table:table-cell table:style-name="ce27" table:formula="of:=IF(AND([.$F325]&lt;&gt;&quot;&quot;;[.$D324]&lt;&gt;&quot;&quot;);1;IF([.$F325]&lt;&gt;&quot;&quot;;MAX(INDIRECT([.$B325]):[.$E324])+1;&quot;&quot;))">
            <text:p/>
          </table:table-cell>
          <table:table-cell table:style-name="ce32"/>
          <table:table-cell table:style-name="ce32" table:formula="of:=IF([.$H325]=&quot;&quot;;&quot;&quot;;IF([.$G324]=&quot;&quot;;1;[.$G32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5]&lt;&gt;&quot;&quot;;NETWORKDAYS([.$L325];[.$M32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25]=&quot;&quot;;[.$L325]&lt;&gt;&quot;&quot;;[.$L325]&lt;=[.$U$1]);AND([.$M325]&lt;&gt;&quot;&quot;;[.Q325]&lt;100;[.$M325]&lt;=[.$U$1]));&quot;遅延&quot;;&quot;&quot;)">
            <text:p/>
          </table:table-cell>
          <table:table-cell table:style-name="ce66"/>
          <table:table-cell table:style-name="ce66" table:formula="of:=SUM([.$V325:.$FM32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6]&lt;&gt;&quot;&quot;;[.$F326]=&quot;&quot;);&quot;E&quot;&amp;ROW();#REF!)" office:value-type="string" office:string-value="" calcext:value-type="error">
            <text:p>#REF!</text:p>
          </table:table-cell>
          <table:table-cell table:style-name="ce13" table:formula="of:=IF(AND([.$D326]&lt;&gt;&quot;&quot;;[.$D326]&lt;&gt;&quot;○&quot;);MAX([.$C$3:.$C325])+1;[.$C325])" office:value-type="float" office:value="15" calcext:value-type="float">
            <text:p>15</text:p>
          </table:table-cell>
          <table:table-cell table:style-name="ce19"/>
          <table:table-cell table:style-name="ce27" table:formula="of:=IF(AND([.$F326]&lt;&gt;&quot;&quot;;[.$D325]&lt;&gt;&quot;&quot;);1;IF([.$F326]&lt;&gt;&quot;&quot;;MAX(INDIRECT([.$B326]):[.$E325])+1;&quot;&quot;))">
            <text:p/>
          </table:table-cell>
          <table:table-cell table:style-name="ce32"/>
          <table:table-cell table:style-name="ce32" table:formula="of:=IF([.$H326]=&quot;&quot;;&quot;&quot;;IF([.$G325]=&quot;&quot;;1;[.$G32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6]&lt;&gt;&quot;&quot;;NETWORKDAYS([.$L326];[.$M32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26]=&quot;&quot;;[.$L326]&lt;&gt;&quot;&quot;;[.$L326]&lt;=[.$U$1]);AND([.$M326]&lt;&gt;&quot;&quot;;[.Q326]&lt;100;[.$M326]&lt;=[.$U$1]));&quot;遅延&quot;;&quot;&quot;)">
            <text:p/>
          </table:table-cell>
          <table:table-cell table:style-name="ce66"/>
          <table:table-cell table:style-name="ce66" table:formula="of:=SUM([.$V326:.$FM32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7]&lt;&gt;&quot;&quot;;[.$F327]=&quot;&quot;);&quot;E&quot;&amp;ROW();#REF!)" office:value-type="string" office:string-value="" calcext:value-type="error">
            <text:p>#REF!</text:p>
          </table:table-cell>
          <table:table-cell table:style-name="ce13" table:formula="of:=IF(AND([.$D327]&lt;&gt;&quot;&quot;;[.$D327]&lt;&gt;&quot;○&quot;);MAX([.$C$3:.$C326])+1;[.$C326])" office:value-type="float" office:value="15" calcext:value-type="float">
            <text:p>15</text:p>
          </table:table-cell>
          <table:table-cell table:style-name="ce19"/>
          <table:table-cell table:style-name="ce27" table:formula="of:=IF(AND([.$F327]&lt;&gt;&quot;&quot;;[.$D326]&lt;&gt;&quot;&quot;);1;IF([.$F327]&lt;&gt;&quot;&quot;;MAX(INDIRECT([.$B327]):[.$E326])+1;&quot;&quot;))">
            <text:p/>
          </table:table-cell>
          <table:table-cell table:style-name="ce32"/>
          <table:table-cell table:style-name="ce32" table:formula="of:=IF([.$H327]=&quot;&quot;;&quot;&quot;;IF([.$G326]=&quot;&quot;;1;[.$G32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7]&lt;&gt;&quot;&quot;;NETWORKDAYS([.$L327];[.$M32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27]=&quot;&quot;;[.$L327]&lt;&gt;&quot;&quot;;[.$L327]&lt;=[.$U$1]);AND([.$M327]&lt;&gt;&quot;&quot;;[.Q327]&lt;100;[.$M327]&lt;=[.$U$1]));&quot;遅延&quot;;&quot;&quot;)">
            <text:p/>
          </table:table-cell>
          <table:table-cell table:style-name="ce66"/>
          <table:table-cell table:style-name="ce66" table:formula="of:=SUM([.$V327:.$FM32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8]&lt;&gt;&quot;&quot;;[.$F328]=&quot;&quot;);&quot;E&quot;&amp;ROW();#REF!)" office:value-type="string" office:string-value="" calcext:value-type="error">
            <text:p>#REF!</text:p>
          </table:table-cell>
          <table:table-cell table:style-name="ce13" table:formula="of:=IF(AND([.$D328]&lt;&gt;&quot;&quot;;[.$D328]&lt;&gt;&quot;○&quot;);MAX([.$C$3:.$C327])+1;[.$C327])" office:value-type="float" office:value="15" calcext:value-type="float">
            <text:p>15</text:p>
          </table:table-cell>
          <table:table-cell table:style-name="ce19"/>
          <table:table-cell table:style-name="ce27" table:formula="of:=IF(AND([.$F328]&lt;&gt;&quot;&quot;;[.$D327]&lt;&gt;&quot;&quot;);1;IF([.$F328]&lt;&gt;&quot;&quot;;MAX(INDIRECT([.$B328]):[.$E327])+1;&quot;&quot;))">
            <text:p/>
          </table:table-cell>
          <table:table-cell table:style-name="ce32"/>
          <table:table-cell table:style-name="ce32" table:formula="of:=IF([.$H328]=&quot;&quot;;&quot;&quot;;IF([.$G327]=&quot;&quot;;1;[.$G32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8]&lt;&gt;&quot;&quot;;NETWORKDAYS([.$L328];[.$M32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28]=&quot;&quot;;[.$L328]&lt;&gt;&quot;&quot;;[.$L328]&lt;=[.$U$1]);AND([.$M328]&lt;&gt;&quot;&quot;;[.Q328]&lt;100;[.$M328]&lt;=[.$U$1]));&quot;遅延&quot;;&quot;&quot;)">
            <text:p/>
          </table:table-cell>
          <table:table-cell table:style-name="ce66"/>
          <table:table-cell table:style-name="ce66" table:formula="of:=SUM([.$V328:.$FM32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9]&lt;&gt;&quot;&quot;;[.$F329]=&quot;&quot;);&quot;E&quot;&amp;ROW();[.$B229])" office:value-type="string" office:string-value="E229" calcext:value-type="string">
            <text:p>E229</text:p>
          </table:table-cell>
          <table:table-cell table:style-name="ce13" table:formula="of:=IF(AND([.$D329]&lt;&gt;&quot;&quot;;[.$D329]&lt;&gt;&quot;○&quot;);MAX([.$C$3:.$C328])+1;[.$C328])" office:value-type="float" office:value="15" calcext:value-type="float">
            <text:p>15</text:p>
          </table:table-cell>
          <table:table-cell table:style-name="ce20"/>
          <table:table-cell table:style-name="ce28" table:formula="of:=IF(AND([.$F329]&lt;&gt;&quot;&quot;;[.$D328]&lt;&gt;&quot;&quot;);1;IF([.$F329]&lt;&gt;&quot;&quot;;MAX(INDIRECT([.$B329]):[.$E328])+1;&quot;&quot;))">
            <text:p/>
          </table:table-cell>
          <table:table-cell table:style-name="ce20"/>
          <table:table-cell table:style-name="ce28" table:formula="of:=IF([.$H329]=&quot;&quot;;&quot;&quot;;IF([.$G328]=&quot;&quot;;1;[.$G328]+1))">
            <text:p/>
          </table:table-cell>
          <table:table-cell table:style-name="ce20" table:number-columns-repeated="3"/>
          <table:table-cell table:style-name="ce18"/>
          <table:table-cell table:style-name="ce41" table:number-columns-repeated="4"/>
          <table:table-cell table:style-name="ce20" table:formula="of:=IF([.$L329]&lt;&gt;&quot;&quot;;NETWORKDAYS([.$L329];[.$M32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20" table:formula="of:=IF(OR(AND([.$N329]=&quot;&quot;;[.$L329]&lt;&gt;&quot;&quot;;[.$L329]&lt;=[.$U$1]);AND([.$M329]&lt;&gt;&quot;&quot;;[.Q329]&lt;100;[.$M329]&lt;=[.$U$1]));&quot;遅延&quot;;&quot;&quot;)">
            <text:p/>
          </table:table-cell>
          <table:table-cell table:style-name="ce20"/>
          <table:table-cell table:style-name="ce20" table:formula="of:=SUM([.$V329:.$FM329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0]&lt;&gt;&quot;&quot;;[.$F330]=&quot;&quot;);&quot;E&quot;&amp;ROW();[.$B230])" office:value-type="string" office:string-value="E153" calcext:value-type="string">
            <text:p>E153</text:p>
          </table:table-cell>
          <table:table-cell table:style-name="ce13" table:formula="of:=IF(AND([.$D330]&lt;&gt;&quot;&quot;;[.$D330]&lt;&gt;&quot;○&quot;);MAX([.$C$3:.$C329])+1;[.$C329])" office:value-type="float" office:value="15" calcext:value-type="float">
            <text:p>15</text:p>
          </table:table-cell>
          <table:table-cell table:style-name="ce19"/>
          <table:table-cell table:style-name="ce27" table:formula="of:=IF(AND([.$F330]&lt;&gt;&quot;&quot;;[.$D329]&lt;&gt;&quot;&quot;);1;IF([.$F330]&lt;&gt;&quot;&quot;;MAX(INDIRECT([.$B330]):[.$E329])+1;&quot;&quot;))">
            <text:p/>
          </table:table-cell>
          <table:table-cell table:style-name="ce32"/>
          <table:table-cell table:style-name="ce32" table:formula="of:=IF([.$H330]=&quot;&quot;;&quot;&quot;;IF([.$G329]=&quot;&quot;;1;[.$G32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0]&lt;&gt;&quot;&quot;;NETWORKDAYS([.$L330];[.$M33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0]=&quot;&quot;;[.$L330]&lt;&gt;&quot;&quot;;[.$L330]&lt;=[.$U$1]);AND([.$M330]&lt;&gt;&quot;&quot;;[.Q330]&lt;100;[.$M330]&lt;=[.$U$1]));&quot;遅延&quot;;&quot;&quot;)">
            <text:p/>
          </table:table-cell>
          <table:table-cell table:style-name="ce66"/>
          <table:table-cell table:style-name="ce66" table:formula="of:=SUM([.$V330:.$FM33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1]&lt;&gt;&quot;&quot;;[.$F331]=&quot;&quot;);&quot;E&quot;&amp;ROW();[.$B231])" office:value-type="string" office:string-value="E153" calcext:value-type="string">
            <text:p>E153</text:p>
          </table:table-cell>
          <table:table-cell table:style-name="ce13" table:formula="of:=IF(AND([.$D331]&lt;&gt;&quot;&quot;;[.$D331]&lt;&gt;&quot;○&quot;);MAX([.$C$3:.$C330])+1;[.$C330])" office:value-type="float" office:value="15" calcext:value-type="float">
            <text:p>15</text:p>
          </table:table-cell>
          <table:table-cell table:style-name="ce19"/>
          <table:table-cell table:style-name="ce27" table:formula="of:=IF(AND([.$F331]&lt;&gt;&quot;&quot;;[.$D330]&lt;&gt;&quot;&quot;);1;IF([.$F331]&lt;&gt;&quot;&quot;;MAX(INDIRECT([.$B331]):[.$E330])+1;&quot;&quot;))">
            <text:p/>
          </table:table-cell>
          <table:table-cell table:style-name="ce32"/>
          <table:table-cell table:style-name="ce32" table:formula="of:=IF([.$H331]=&quot;&quot;;&quot;&quot;;IF([.$G330]=&quot;&quot;;1;[.$G33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1]&lt;&gt;&quot;&quot;;NETWORKDAYS([.$L331];[.$M33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1]=&quot;&quot;;[.$L331]&lt;&gt;&quot;&quot;;[.$L331]&lt;=[.$U$1]);AND([.$M331]&lt;&gt;&quot;&quot;;[.Q331]&lt;100;[.$M331]&lt;=[.$U$1]));&quot;遅延&quot;;&quot;&quot;)">
            <text:p/>
          </table:table-cell>
          <table:table-cell table:style-name="ce66"/>
          <table:table-cell table:style-name="ce66" table:formula="of:=SUM([.$V331:.$FM33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2]&lt;&gt;&quot;&quot;;[.$F332]=&quot;&quot;);&quot;E&quot;&amp;ROW();[.$B232])" office:value-type="string" office:string-value="E153" calcext:value-type="string">
            <text:p>E153</text:p>
          </table:table-cell>
          <table:table-cell table:style-name="ce13" table:formula="of:=IF(AND([.$D332]&lt;&gt;&quot;&quot;;[.$D332]&lt;&gt;&quot;○&quot;);MAX([.$C$3:.$C331])+1;[.$C331])" office:value-type="float" office:value="15" calcext:value-type="float">
            <text:p>15</text:p>
          </table:table-cell>
          <table:table-cell table:style-name="ce19"/>
          <table:table-cell table:style-name="ce27" table:formula="of:=IF(AND([.$F332]&lt;&gt;&quot;&quot;;[.$D331]&lt;&gt;&quot;&quot;);1;IF([.$F332]&lt;&gt;&quot;&quot;;MAX(INDIRECT([.$B332]):[.$E331])+1;&quot;&quot;))">
            <text:p/>
          </table:table-cell>
          <table:table-cell table:style-name="ce32"/>
          <table:table-cell table:style-name="ce32" table:formula="of:=IF([.$H332]=&quot;&quot;;&quot;&quot;;IF([.$G331]=&quot;&quot;;1;[.$G33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2]&lt;&gt;&quot;&quot;;NETWORKDAYS([.$L332];[.$M33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2]=&quot;&quot;;[.$L332]&lt;&gt;&quot;&quot;;[.$L332]&lt;=[.$U$1]);AND([.$M332]&lt;&gt;&quot;&quot;;[.Q332]&lt;100;[.$M332]&lt;=[.$U$1]));&quot;遅延&quot;;&quot;&quot;)">
            <text:p/>
          </table:table-cell>
          <table:table-cell table:style-name="ce66"/>
          <table:table-cell table:style-name="ce66" table:formula="of:=SUM([.$V332:.$FM33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3]&lt;&gt;&quot;&quot;;[.$F333]=&quot;&quot;);&quot;E&quot;&amp;ROW();[.$B233])" office:value-type="string" office:string-value="E153" calcext:value-type="string">
            <text:p>E153</text:p>
          </table:table-cell>
          <table:table-cell table:style-name="ce13" table:formula="of:=IF(AND([.$D333]&lt;&gt;&quot;&quot;;[.$D333]&lt;&gt;&quot;○&quot;);MAX([.$C$3:.$C332])+1;[.$C332])" office:value-type="float" office:value="15" calcext:value-type="float">
            <text:p>15</text:p>
          </table:table-cell>
          <table:table-cell table:style-name="ce19"/>
          <table:table-cell table:style-name="ce27" table:formula="of:=IF(AND([.$F333]&lt;&gt;&quot;&quot;;[.$D332]&lt;&gt;&quot;&quot;);1;IF([.$F333]&lt;&gt;&quot;&quot;;MAX(INDIRECT([.$B333]):[.$E332])+1;&quot;&quot;))">
            <text:p/>
          </table:table-cell>
          <table:table-cell table:style-name="ce32"/>
          <table:table-cell table:style-name="ce32" table:formula="of:=IF([.$H333]=&quot;&quot;;&quot;&quot;;IF([.$G332]=&quot;&quot;;1;[.$G33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3]&lt;&gt;&quot;&quot;;NETWORKDAYS([.$L333];[.$M33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3]=&quot;&quot;;[.$L333]&lt;&gt;&quot;&quot;;[.$L333]&lt;=[.$U$1]);AND([.$M333]&lt;&gt;&quot;&quot;;[.Q333]&lt;100;[.$M333]&lt;=[.$U$1]));&quot;遅延&quot;;&quot;&quot;)">
            <text:p/>
          </table:table-cell>
          <table:table-cell table:style-name="ce66"/>
          <table:table-cell table:style-name="ce66" table:formula="of:=SUM([.$V333:.$FM33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4]&lt;&gt;&quot;&quot;;[.$F334]=&quot;&quot;);&quot;E&quot;&amp;ROW();[.$B234])" office:value-type="string" office:string-value="E153" calcext:value-type="string">
            <text:p>E153</text:p>
          </table:table-cell>
          <table:table-cell table:style-name="ce13" table:formula="of:=IF(AND([.$D334]&lt;&gt;&quot;&quot;;[.$D334]&lt;&gt;&quot;○&quot;);MAX([.$C$3:.$C333])+1;[.$C333])" office:value-type="float" office:value="15" calcext:value-type="float">
            <text:p>15</text:p>
          </table:table-cell>
          <table:table-cell table:style-name="ce19"/>
          <table:table-cell table:style-name="ce27" table:formula="of:=IF(AND([.$F334]&lt;&gt;&quot;&quot;;[.$D333]&lt;&gt;&quot;&quot;);1;IF([.$F334]&lt;&gt;&quot;&quot;;MAX(INDIRECT([.$B334]):[.$E333])+1;&quot;&quot;))">
            <text:p/>
          </table:table-cell>
          <table:table-cell table:style-name="ce32"/>
          <table:table-cell table:style-name="ce32" table:formula="of:=IF([.$H334]=&quot;&quot;;&quot;&quot;;IF([.$G333]=&quot;&quot;;1;[.$G33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4]&lt;&gt;&quot;&quot;;NETWORKDAYS([.$L334];[.$M33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4]=&quot;&quot;;[.$L334]&lt;&gt;&quot;&quot;;[.$L334]&lt;=[.$U$1]);AND([.$M334]&lt;&gt;&quot;&quot;;[.Q334]&lt;100;[.$M334]&lt;=[.$U$1]));&quot;遅延&quot;;&quot;&quot;)">
            <text:p/>
          </table:table-cell>
          <table:table-cell table:style-name="ce66"/>
          <table:table-cell table:style-name="ce66" table:formula="of:=SUM([.$V334:.$FM33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5]&lt;&gt;&quot;&quot;;[.$F335]=&quot;&quot;);&quot;E&quot;&amp;ROW();[.$B235])" office:value-type="string" office:string-value="E153" calcext:value-type="string">
            <text:p>E153</text:p>
          </table:table-cell>
          <table:table-cell table:style-name="ce13" table:formula="of:=IF(AND([.$D335]&lt;&gt;&quot;&quot;;[.$D335]&lt;&gt;&quot;○&quot;);MAX([.$C$3:.$C334])+1;[.$C334])" office:value-type="float" office:value="15" calcext:value-type="float">
            <text:p>15</text:p>
          </table:table-cell>
          <table:table-cell table:style-name="ce19"/>
          <table:table-cell table:style-name="ce27" table:formula="of:=IF(AND([.$F335]&lt;&gt;&quot;&quot;;[.$D334]&lt;&gt;&quot;&quot;);1;IF([.$F335]&lt;&gt;&quot;&quot;;MAX(INDIRECT([.$B335]):[.$E334])+1;&quot;&quot;))">
            <text:p/>
          </table:table-cell>
          <table:table-cell table:style-name="ce32"/>
          <table:table-cell table:style-name="ce32" table:formula="of:=IF([.$H335]=&quot;&quot;;&quot;&quot;;IF([.$G334]=&quot;&quot;;1;[.$G33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5]&lt;&gt;&quot;&quot;;NETWORKDAYS([.$L335];[.$M33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5]=&quot;&quot;;[.$L335]&lt;&gt;&quot;&quot;;[.$L335]&lt;=[.$U$1]);AND([.$M335]&lt;&gt;&quot;&quot;;[.Q335]&lt;100;[.$M335]&lt;=[.$U$1]));&quot;遅延&quot;;&quot;&quot;)">
            <text:p/>
          </table:table-cell>
          <table:table-cell table:style-name="ce66"/>
          <table:table-cell table:style-name="ce66" table:formula="of:=SUM([.$V335:.$FM33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6]&lt;&gt;&quot;&quot;;[.$F336]=&quot;&quot;);&quot;E&quot;&amp;ROW();[.$B237])" office:value-type="string" office:string-value="E153" calcext:value-type="string">
            <text:p>E153</text:p>
          </table:table-cell>
          <table:table-cell table:style-name="ce13" table:formula="of:=IF(AND([.$D336]&lt;&gt;&quot;&quot;;[.$D336]&lt;&gt;&quot;○&quot;);MAX([.$C$3:.$C335])+1;[.$C335])" office:value-type="float" office:value="15" calcext:value-type="float">
            <text:p>15</text:p>
          </table:table-cell>
          <table:table-cell table:style-name="ce19"/>
          <table:table-cell table:style-name="ce27" table:formula="of:=IF(AND([.$F336]&lt;&gt;&quot;&quot;;[.$D335]&lt;&gt;&quot;&quot;);1;IF([.$F336]&lt;&gt;&quot;&quot;;MAX(INDIRECT([.$B336]):[.$E335])+1;&quot;&quot;))">
            <text:p/>
          </table:table-cell>
          <table:table-cell table:style-name="ce32"/>
          <table:table-cell table:style-name="ce32" table:formula="of:=IF([.$H336]=&quot;&quot;;&quot;&quot;;IF([.$G335]=&quot;&quot;;1;[.$G33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6]&lt;&gt;&quot;&quot;;NETWORKDAYS([.$L336];[.$M33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6]=&quot;&quot;;[.$L336]&lt;&gt;&quot;&quot;;[.$L336]&lt;=[.$U$1]);AND([.$M336]&lt;&gt;&quot;&quot;;[.Q336]&lt;100;[.$M336]&lt;=[.$U$1]));&quot;遅延&quot;;&quot;&quot;)">
            <text:p/>
          </table:table-cell>
          <table:table-cell table:style-name="ce66"/>
          <table:table-cell table:style-name="ce66" table:formula="of:=SUM([.$V336:.$FM33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7]&lt;&gt;&quot;&quot;;[.$F337]=&quot;&quot;);&quot;E&quot;&amp;ROW();[.$B238])" office:value-type="string" office:string-value="E153" calcext:value-type="string">
            <text:p>E153</text:p>
          </table:table-cell>
          <table:table-cell table:style-name="ce13" table:formula="of:=IF(AND([.$D337]&lt;&gt;&quot;&quot;;[.$D337]&lt;&gt;&quot;○&quot;);MAX([.$C$3:.$C336])+1;[.$C336])" office:value-type="float" office:value="15" calcext:value-type="float">
            <text:p>15</text:p>
          </table:table-cell>
          <table:table-cell table:style-name="ce19"/>
          <table:table-cell table:style-name="ce27" table:formula="of:=IF(AND([.$F337]&lt;&gt;&quot;&quot;;[.$D336]&lt;&gt;&quot;&quot;);1;IF([.$F337]&lt;&gt;&quot;&quot;;MAX(INDIRECT([.$B337]):[.$E336])+1;&quot;&quot;))">
            <text:p/>
          </table:table-cell>
          <table:table-cell table:style-name="ce32"/>
          <table:table-cell table:style-name="ce32" table:formula="of:=IF([.$H337]=&quot;&quot;;&quot;&quot;;IF([.$G336]=&quot;&quot;;1;[.$G33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7]&lt;&gt;&quot;&quot;;NETWORKDAYS([.$L337];[.$M33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7]=&quot;&quot;;[.$L337]&lt;&gt;&quot;&quot;;[.$L337]&lt;=[.$U$1]);AND([.$M337]&lt;&gt;&quot;&quot;;[.Q337]&lt;100;[.$M337]&lt;=[.$U$1]));&quot;遅延&quot;;&quot;&quot;)">
            <text:p/>
          </table:table-cell>
          <table:table-cell table:style-name="ce66"/>
          <table:table-cell table:style-name="ce66" table:formula="of:=SUM([.$V337:.$FM33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8]&lt;&gt;&quot;&quot;;[.$F338]=&quot;&quot;);&quot;E&quot;&amp;ROW();[.$B239])" office:value-type="string" office:string-value="E153" calcext:value-type="string">
            <text:p>E153</text:p>
          </table:table-cell>
          <table:table-cell table:style-name="ce13" table:formula="of:=IF(AND([.$D338]&lt;&gt;&quot;&quot;;[.$D338]&lt;&gt;&quot;○&quot;);MAX([.$C$3:.$C337])+1;[.$C337])" office:value-type="float" office:value="15" calcext:value-type="float">
            <text:p>15</text:p>
          </table:table-cell>
          <table:table-cell table:style-name="ce19"/>
          <table:table-cell table:style-name="ce27" table:formula="of:=IF(AND([.$F338]&lt;&gt;&quot;&quot;;[.$D337]&lt;&gt;&quot;&quot;);1;IF([.$F338]&lt;&gt;&quot;&quot;;MAX(INDIRECT([.$B338]):[.$E337])+1;&quot;&quot;))">
            <text:p/>
          </table:table-cell>
          <table:table-cell table:style-name="ce32"/>
          <table:table-cell table:style-name="ce32" table:formula="of:=IF([.$H338]=&quot;&quot;;&quot;&quot;;IF([.$G337]=&quot;&quot;;1;[.$G33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8]&lt;&gt;&quot;&quot;;NETWORKDAYS([.$L338];[.$M33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8]=&quot;&quot;;[.$L338]&lt;&gt;&quot;&quot;;[.$L338]&lt;=[.$U$1]);AND([.$M338]&lt;&gt;&quot;&quot;;[.Q338]&lt;100;[.$M338]&lt;=[.$U$1]));&quot;遅延&quot;;&quot;&quot;)">
            <text:p/>
          </table:table-cell>
          <table:table-cell table:style-name="ce66"/>
          <table:table-cell table:style-name="ce66" table:formula="of:=SUM([.$V338:.$FM33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9]&lt;&gt;&quot;&quot;;[.$F339]=&quot;&quot;);&quot;E&quot;&amp;ROW();[.$B240])" office:value-type="string" office:string-value="E153" calcext:value-type="string">
            <text:p>E153</text:p>
          </table:table-cell>
          <table:table-cell table:style-name="ce13" table:formula="of:=IF(AND([.$D339]&lt;&gt;&quot;&quot;;[.$D339]&lt;&gt;&quot;○&quot;);MAX([.$C$3:.$C338])+1;[.$C338])" office:value-type="float" office:value="15" calcext:value-type="float">
            <text:p>15</text:p>
          </table:table-cell>
          <table:table-cell table:style-name="ce19"/>
          <table:table-cell table:style-name="ce27" table:formula="of:=IF(AND([.$F339]&lt;&gt;&quot;&quot;;[.$D338]&lt;&gt;&quot;&quot;);1;IF([.$F339]&lt;&gt;&quot;&quot;;MAX(INDIRECT([.$B339]):[.$E338])+1;&quot;&quot;))">
            <text:p/>
          </table:table-cell>
          <table:table-cell table:style-name="ce32"/>
          <table:table-cell table:style-name="ce32" table:formula="of:=IF([.$H339]=&quot;&quot;;&quot;&quot;;IF([.$G338]=&quot;&quot;;1;[.$G33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9]&lt;&gt;&quot;&quot;;NETWORKDAYS([.$L339];[.$M33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9]=&quot;&quot;;[.$L339]&lt;&gt;&quot;&quot;;[.$L339]&lt;=[.$U$1]);AND([.$M339]&lt;&gt;&quot;&quot;;[.Q339]&lt;100;[.$M339]&lt;=[.$U$1]));&quot;遅延&quot;;&quot;&quot;)">
            <text:p/>
          </table:table-cell>
          <table:table-cell table:style-name="ce66"/>
          <table:table-cell table:style-name="ce66" table:formula="of:=SUM([.$V339:.$FM33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0]&lt;&gt;&quot;&quot;;[.$F340]=&quot;&quot;);&quot;E&quot;&amp;ROW();[.$B241])" office:value-type="string" office:string-value="E153" calcext:value-type="string">
            <text:p>E153</text:p>
          </table:table-cell>
          <table:table-cell table:style-name="ce13" table:formula="of:=IF(AND([.$D340]&lt;&gt;&quot;&quot;;[.$D340]&lt;&gt;&quot;○&quot;);MAX([.$C$3:.$C339])+1;[.$C339])" office:value-type="float" office:value="15" calcext:value-type="float">
            <text:p>15</text:p>
          </table:table-cell>
          <table:table-cell table:style-name="ce19"/>
          <table:table-cell table:style-name="ce27" table:formula="of:=IF(AND([.$F340]&lt;&gt;&quot;&quot;;[.$D339]&lt;&gt;&quot;&quot;);1;IF([.$F340]&lt;&gt;&quot;&quot;;MAX(INDIRECT([.$B340]):[.$E339])+1;&quot;&quot;))">
            <text:p/>
          </table:table-cell>
          <table:table-cell table:style-name="ce32"/>
          <table:table-cell table:style-name="ce32" table:formula="of:=IF([.$H340]=&quot;&quot;;&quot;&quot;;IF([.$G339]=&quot;&quot;;1;[.$G33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0]&lt;&gt;&quot;&quot;;NETWORKDAYS([.$L340];[.$M34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40]=&quot;&quot;;[.$L340]&lt;&gt;&quot;&quot;;[.$L340]&lt;=[.$U$1]);AND([.$M340]&lt;&gt;&quot;&quot;;[.Q340]&lt;100;[.$M340]&lt;=[.$U$1]));&quot;遅延&quot;;&quot;&quot;)">
            <text:p/>
          </table:table-cell>
          <table:table-cell table:style-name="ce66"/>
          <table:table-cell table:style-name="ce66" table:formula="of:=SUM([.$V340:.$FM34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1]&lt;&gt;&quot;&quot;;[.$F341]=&quot;&quot;);&quot;E&quot;&amp;ROW();[.$B242])" office:value-type="string" office:string-value="E153" calcext:value-type="string">
            <text:p>E153</text:p>
          </table:table-cell>
          <table:table-cell table:style-name="ce13" table:formula="of:=IF(AND([.$D341]&lt;&gt;&quot;&quot;;[.$D341]&lt;&gt;&quot;○&quot;);MAX([.$C$3:.$C340])+1;[.$C340])" office:value-type="float" office:value="15" calcext:value-type="float">
            <text:p>15</text:p>
          </table:table-cell>
          <table:table-cell table:style-name="ce19"/>
          <table:table-cell table:style-name="ce27" table:formula="of:=IF(AND([.$F341]&lt;&gt;&quot;&quot;;[.$D340]&lt;&gt;&quot;&quot;);1;IF([.$F341]&lt;&gt;&quot;&quot;;MAX(INDIRECT([.$B341]):[.$E340])+1;&quot;&quot;))">
            <text:p/>
          </table:table-cell>
          <table:table-cell table:style-name="ce32"/>
          <table:table-cell table:style-name="ce32" table:formula="of:=IF([.$H341]=&quot;&quot;;&quot;&quot;;IF([.$G340]=&quot;&quot;;1;[.$G34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1]&lt;&gt;&quot;&quot;;NETWORKDAYS([.$L341];[.$M34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41]=&quot;&quot;;[.$L341]&lt;&gt;&quot;&quot;;[.$L341]&lt;=[.$U$1]);AND([.$M341]&lt;&gt;&quot;&quot;;[.Q341]&lt;100;[.$M341]&lt;=[.$U$1]));&quot;遅延&quot;;&quot;&quot;)">
            <text:p/>
          </table:table-cell>
          <table:table-cell table:style-name="ce66"/>
          <table:table-cell table:style-name="ce66" table:formula="of:=SUM([.$V341:.$FM34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2]&lt;&gt;&quot;&quot;;[.$F342]=&quot;&quot;);&quot;E&quot;&amp;ROW();[.$B243])" office:value-type="string" office:string-value="E153" calcext:value-type="string">
            <text:p>E153</text:p>
          </table:table-cell>
          <table:table-cell table:style-name="ce13" table:formula="of:=IF(AND([.$D342]&lt;&gt;&quot;&quot;;[.$D342]&lt;&gt;&quot;○&quot;);MAX([.$C$3:.$C341])+1;[.$C341])" office:value-type="float" office:value="15" calcext:value-type="float">
            <text:p>15</text:p>
          </table:table-cell>
          <table:table-cell table:style-name="ce19"/>
          <table:table-cell table:style-name="ce27" table:formula="of:=IF(AND([.$F342]&lt;&gt;&quot;&quot;;[.$D341]&lt;&gt;&quot;&quot;);1;IF([.$F342]&lt;&gt;&quot;&quot;;MAX(INDIRECT([.$B342]):[.$E341])+1;&quot;&quot;))">
            <text:p/>
          </table:table-cell>
          <table:table-cell table:style-name="ce32"/>
          <table:table-cell table:style-name="ce32" table:formula="of:=IF([.$H342]=&quot;&quot;;&quot;&quot;;IF([.$G341]=&quot;&quot;;1;[.$G34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2]&lt;&gt;&quot;&quot;;NETWORKDAYS([.$L342];[.$M34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42]=&quot;&quot;;[.$L342]&lt;&gt;&quot;&quot;;[.$L342]&lt;=[.$U$1]);AND([.$M342]&lt;&gt;&quot;&quot;;[.Q342]&lt;100;[.$M342]&lt;=[.$U$1]));&quot;遅延&quot;;&quot;&quot;)">
            <text:p/>
          </table:table-cell>
          <table:table-cell table:style-name="ce66"/>
          <table:table-cell table:style-name="ce66" table:formula="of:=SUM([.$V342:.$FM34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3]&lt;&gt;&quot;&quot;;[.$F343]=&quot;&quot;);&quot;E&quot;&amp;ROW();[.$B244])" office:value-type="string" office:string-value="E153" calcext:value-type="string">
            <text:p>E153</text:p>
          </table:table-cell>
          <table:table-cell table:style-name="ce13" table:formula="of:=IF(AND([.$D343]&lt;&gt;&quot;&quot;;[.$D343]&lt;&gt;&quot;○&quot;);MAX([.$C$3:.$C342])+1;[.$C342])" office:value-type="float" office:value="15" calcext:value-type="float">
            <text:p>15</text:p>
          </table:table-cell>
          <table:table-cell table:style-name="ce19"/>
          <table:table-cell table:style-name="ce27" table:formula="of:=IF(AND([.$F343]&lt;&gt;&quot;&quot;;[.$D342]&lt;&gt;&quot;&quot;);1;IF([.$F343]&lt;&gt;&quot;&quot;;MAX(INDIRECT([.$B343]):[.$E342])+1;&quot;&quot;))">
            <text:p/>
          </table:table-cell>
          <table:table-cell table:style-name="ce32"/>
          <table:table-cell table:style-name="ce32" table:formula="of:=IF([.$H343]=&quot;&quot;;&quot;&quot;;IF([.$G342]=&quot;&quot;;1;[.$G34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3]&lt;&gt;&quot;&quot;;NETWORKDAYS([.$L343];[.$M34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43]=&quot;&quot;;[.$L343]&lt;&gt;&quot;&quot;;[.$L343]&lt;=[.$U$1]);AND([.$M343]&lt;&gt;&quot;&quot;;[.Q343]&lt;100;[.$M343]&lt;=[.$U$1]));&quot;遅延&quot;;&quot;&quot;)">
            <text:p/>
          </table:table-cell>
          <table:table-cell table:style-name="ce66"/>
          <table:table-cell table:style-name="ce66" table:formula="of:=SUM([.$V343:.$FM34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4]&lt;&gt;&quot;&quot;;[.$F344]=&quot;&quot;);&quot;E&quot;&amp;ROW();[.$B245])" office:value-type="string" office:string-value="E153" calcext:value-type="string">
            <text:p>E153</text:p>
          </table:table-cell>
          <table:table-cell table:style-name="ce13" table:formula="of:=IF(AND([.$D344]&lt;&gt;&quot;&quot;;[.$D344]&lt;&gt;&quot;○&quot;);MAX([.$C$3:.$C343])+1;[.$C343])" office:value-type="float" office:value="15" calcext:value-type="float">
            <text:p>15</text:p>
          </table:table-cell>
          <table:table-cell table:style-name="ce19"/>
          <table:table-cell table:style-name="ce27" table:formula="of:=IF(AND([.$F344]&lt;&gt;&quot;&quot;;[.$D343]&lt;&gt;&quot;&quot;);1;IF([.$F344]&lt;&gt;&quot;&quot;;MAX(INDIRECT([.$B344]):[.$E343])+1;&quot;&quot;))">
            <text:p/>
          </table:table-cell>
          <table:table-cell table:style-name="ce32"/>
          <table:table-cell table:style-name="ce32" table:formula="of:=IF([.$H344]=&quot;&quot;;&quot;&quot;;IF([.$G343]=&quot;&quot;;1;[.$G34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4]&lt;&gt;&quot;&quot;;NETWORKDAYS([.$L344];[.$M34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44]=&quot;&quot;;[.$L344]&lt;&gt;&quot;&quot;;[.$L344]&lt;=[.$U$1]);AND([.$M344]&lt;&gt;&quot;&quot;;[.Q344]&lt;100;[.$M344]&lt;=[.$U$1]));&quot;遅延&quot;;&quot;&quot;)">
            <text:p/>
          </table:table-cell>
          <table:table-cell table:style-name="ce66"/>
          <table:table-cell table:style-name="ce66" table:formula="of:=SUM([.$V344:.$FM34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5]&lt;&gt;&quot;&quot;;[.$F345]=&quot;&quot;);&quot;E&quot;&amp;ROW();[.$B246])" office:value-type="string" office:string-value="E153" calcext:value-type="string">
            <text:p>E153</text:p>
          </table:table-cell>
          <table:table-cell table:style-name="ce13" table:formula="of:=IF(AND([.$D345]&lt;&gt;&quot;&quot;;[.$D345]&lt;&gt;&quot;○&quot;);MAX([.$C$3:.$C344])+1;[.$C344])" office:value-type="float" office:value="15" calcext:value-type="float">
            <text:p>15</text:p>
          </table:table-cell>
          <table:table-cell table:style-name="ce19"/>
          <table:table-cell table:style-name="ce27" table:formula="of:=IF(AND([.$F345]&lt;&gt;&quot;&quot;;[.$D344]&lt;&gt;&quot;&quot;);1;IF([.$F345]&lt;&gt;&quot;&quot;;MAX(INDIRECT([.$B345]):[.$E344])+1;&quot;&quot;))">
            <text:p/>
          </table:table-cell>
          <table:table-cell table:style-name="ce32"/>
          <table:table-cell table:style-name="ce32" table:formula="of:=IF([.$H345]=&quot;&quot;;&quot;&quot;;IF([.$G344]=&quot;&quot;;1;[.$G34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5]&lt;&gt;&quot;&quot;;NETWORKDAYS([.$L345];[.$M34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45]=&quot;&quot;;[.$L345]&lt;&gt;&quot;&quot;;[.$L345]&lt;=[.$U$1]);AND([.$M345]&lt;&gt;&quot;&quot;;[.Q345]&lt;100;[.$M345]&lt;=[.$U$1]));&quot;遅延&quot;;&quot;&quot;)">
            <text:p/>
          </table:table-cell>
          <table:table-cell table:style-name="ce66"/>
          <table:table-cell table:style-name="ce66" table:formula="of:=SUM([.$V345:.$FM34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6]&lt;&gt;&quot;&quot;;[.$F346]=&quot;&quot;);&quot;E&quot;&amp;ROW();[.$B247])" office:value-type="string" office:string-value="E153" calcext:value-type="string">
            <text:p>E153</text:p>
          </table:table-cell>
          <table:table-cell table:style-name="ce13" table:formula="of:=IF(AND([.$D346]&lt;&gt;&quot;&quot;;[.$D346]&lt;&gt;&quot;○&quot;);MAX([.$C$3:.$C345])+1;[.$C345])" office:value-type="float" office:value="15" calcext:value-type="float">
            <text:p>15</text:p>
          </table:table-cell>
          <table:table-cell table:style-name="ce19"/>
          <table:table-cell table:style-name="ce27" table:formula="of:=IF(AND([.$F346]&lt;&gt;&quot;&quot;;[.$D345]&lt;&gt;&quot;&quot;);1;IF([.$F346]&lt;&gt;&quot;&quot;;MAX(INDIRECT([.$B346]):[.$E345])+1;&quot;&quot;))">
            <text:p/>
          </table:table-cell>
          <table:table-cell table:style-name="ce32"/>
          <table:table-cell table:style-name="ce32" table:formula="of:=IF([.$H346]=&quot;&quot;;&quot;&quot;;IF([.$G345]=&quot;&quot;;1;[.$G34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6]&lt;&gt;&quot;&quot;;NETWORKDAYS([.$L346];[.$M34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46]=&quot;&quot;;[.$L346]&lt;&gt;&quot;&quot;;[.$L346]&lt;=[.$U$1]);AND([.$M346]&lt;&gt;&quot;&quot;;[.Q346]&lt;100;[.$M346]&lt;=[.$U$1]));&quot;遅延&quot;;&quot;&quot;)">
            <text:p/>
          </table:table-cell>
          <table:table-cell table:style-name="ce66"/>
          <table:table-cell table:style-name="ce66" table:formula="of:=SUM([.$V346:.$FM34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7]&lt;&gt;&quot;&quot;;[.$F347]=&quot;&quot;);&quot;E&quot;&amp;ROW();[.$B248])" office:value-type="string" office:string-value="E153" calcext:value-type="string">
            <text:p>E153</text:p>
          </table:table-cell>
          <table:table-cell table:style-name="ce13" table:formula="of:=IF(AND([.$D347]&lt;&gt;&quot;&quot;;[.$D347]&lt;&gt;&quot;○&quot;);MAX([.$C$3:.$C346])+1;[.$C346])" office:value-type="float" office:value="15" calcext:value-type="float">
            <text:p>15</text:p>
          </table:table-cell>
          <table:table-cell table:style-name="ce19"/>
          <table:table-cell table:style-name="ce27" table:formula="of:=IF(AND([.$F347]&lt;&gt;&quot;&quot;;[.$D346]&lt;&gt;&quot;&quot;);1;IF([.$F347]&lt;&gt;&quot;&quot;;MAX(INDIRECT([.$B347]):[.$E346])+1;&quot;&quot;))">
            <text:p/>
          </table:table-cell>
          <table:table-cell table:style-name="ce32"/>
          <table:table-cell table:style-name="ce32" table:formula="of:=IF([.$H347]=&quot;&quot;;&quot;&quot;;IF([.$G346]=&quot;&quot;;1;[.$G34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7]&lt;&gt;&quot;&quot;;NETWORKDAYS([.$L347];[.$M34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47]=&quot;&quot;;[.$L347]&lt;&gt;&quot;&quot;;[.$L347]&lt;=[.$U$1]);AND([.$M347]&lt;&gt;&quot;&quot;;[.Q347]&lt;100;[.$M347]&lt;=[.$U$1]));&quot;遅延&quot;;&quot;&quot;)">
            <text:p/>
          </table:table-cell>
          <table:table-cell table:style-name="ce66"/>
          <table:table-cell table:style-name="ce66" table:formula="of:=SUM([.$V347:.$FM34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8]&lt;&gt;&quot;&quot;;[.$F348]=&quot;&quot;);&quot;E&quot;&amp;ROW();[.$B269])" office:value-type="string" office:string-value="E153" calcext:value-type="string">
            <text:p>E153</text:p>
          </table:table-cell>
          <table:table-cell table:style-name="ce13" table:formula="of:=IF(AND([.$D348]&lt;&gt;&quot;&quot;;[.$D348]&lt;&gt;&quot;○&quot;);MAX([.$C$3:.$C347])+1;[.$C347])" office:value-type="float" office:value="15" calcext:value-type="float">
            <text:p>15</text:p>
          </table:table-cell>
          <table:table-cell table:style-name="ce19"/>
          <table:table-cell table:style-name="ce27" table:formula="of:=IF(AND([.$F348]&lt;&gt;&quot;&quot;;[.$D347]&lt;&gt;&quot;&quot;);1;IF([.$F348]&lt;&gt;&quot;&quot;;MAX(INDIRECT([.$B348]):[.$E347])+1;&quot;&quot;))">
            <text:p/>
          </table:table-cell>
          <table:table-cell table:style-name="ce32"/>
          <table:table-cell table:style-name="ce32" table:formula="of:=IF([.$H348]=&quot;&quot;;&quot;&quot;;IF([.$G347]=&quot;&quot;;1;[.$G34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8]&lt;&gt;&quot;&quot;;NETWORKDAYS([.$L348];[.$M34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48]=&quot;&quot;;[.$L348]&lt;&gt;&quot;&quot;;[.$L348]&lt;=[.$U$1]);AND([.$M348]&lt;&gt;&quot;&quot;;[.Q348]&lt;100;[.$M348]&lt;=[.$U$1]));&quot;遅延&quot;;&quot;&quot;)">
            <text:p/>
          </table:table-cell>
          <table:table-cell table:style-name="ce66"/>
          <table:table-cell table:style-name="ce66" table:formula="of:=SUM([.$V348:.$FM34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9]&lt;&gt;&quot;&quot;;[.$F349]=&quot;&quot;);&quot;E&quot;&amp;ROW();[.$B270])" office:value-type="string" office:string-value="E270" calcext:value-type="string">
            <text:p>E270</text:p>
          </table:table-cell>
          <table:table-cell table:style-name="ce13" table:formula="of:=IF(AND([.$D349]&lt;&gt;&quot;&quot;;[.$D349]&lt;&gt;&quot;○&quot;);MAX([.$C$3:.$C348])+1;[.$C348])" office:value-type="float" office:value="15" calcext:value-type="float">
            <text:p>15</text:p>
          </table:table-cell>
          <table:table-cell table:style-name="ce19"/>
          <table:table-cell table:style-name="ce27" table:formula="of:=IF(AND([.$F349]&lt;&gt;&quot;&quot;;[.$D348]&lt;&gt;&quot;&quot;);1;IF([.$F349]&lt;&gt;&quot;&quot;;MAX(INDIRECT([.$B349]):[.$E348])+1;&quot;&quot;))">
            <text:p/>
          </table:table-cell>
          <table:table-cell table:style-name="ce32"/>
          <table:table-cell table:style-name="ce32" table:formula="of:=IF([.$H349]=&quot;&quot;;&quot;&quot;;IF([.$G348]=&quot;&quot;;1;[.$G34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9]&lt;&gt;&quot;&quot;;NETWORKDAYS([.$L349];[.$M34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49]=&quot;&quot;;[.$L349]&lt;&gt;&quot;&quot;;[.$L349]&lt;=[.$U$1]);AND([.$M349]&lt;&gt;&quot;&quot;;[.Q349]&lt;100;[.$M349]&lt;=[.$U$1]));&quot;遅延&quot;;&quot;&quot;)">
            <text:p/>
          </table:table-cell>
          <table:table-cell table:style-name="ce66"/>
          <table:table-cell table:style-name="ce66" table:formula="of:=SUM([.$V349:.$FM34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0]&lt;&gt;&quot;&quot;;[.$F350]=&quot;&quot;);&quot;E&quot;&amp;ROW();[.$B271])" office:value-type="string" office:string-value="E153" calcext:value-type="string">
            <text:p>E153</text:p>
          </table:table-cell>
          <table:table-cell table:style-name="ce13" table:formula="of:=IF(AND([.$D350]&lt;&gt;&quot;&quot;;[.$D350]&lt;&gt;&quot;○&quot;);MAX([.$C$3:.$C349])+1;[.$C349])" office:value-type="float" office:value="15" calcext:value-type="float">
            <text:p>15</text:p>
          </table:table-cell>
          <table:table-cell table:style-name="ce19"/>
          <table:table-cell table:style-name="ce27" table:formula="of:=IF(AND([.$F350]&lt;&gt;&quot;&quot;;[.$D349]&lt;&gt;&quot;&quot;);1;IF([.$F350]&lt;&gt;&quot;&quot;;MAX(INDIRECT([.$B350]):[.$E349])+1;&quot;&quot;))">
            <text:p/>
          </table:table-cell>
          <table:table-cell table:style-name="ce32"/>
          <table:table-cell table:style-name="ce32" table:formula="of:=IF([.$H350]=&quot;&quot;;&quot;&quot;;IF([.$G349]=&quot;&quot;;1;[.$G34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0]&lt;&gt;&quot;&quot;;NETWORKDAYS([.$L350];[.$M35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50]=&quot;&quot;;[.$L350]&lt;&gt;&quot;&quot;;[.$L350]&lt;=[.$U$1]);AND([.$M350]&lt;&gt;&quot;&quot;;[.Q350]&lt;100;[.$M350]&lt;=[.$U$1]));&quot;遅延&quot;;&quot;&quot;)">
            <text:p/>
          </table:table-cell>
          <table:table-cell table:style-name="ce66"/>
          <table:table-cell table:style-name="ce66" table:formula="of:=SUM([.$V350:.$FM35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1]&lt;&gt;&quot;&quot;;[.$F351]=&quot;&quot;);&quot;E&quot;&amp;ROW();[.$B272])" office:value-type="string" office:string-value="E91" calcext:value-type="string">
            <text:p>E91</text:p>
          </table:table-cell>
          <table:table-cell table:style-name="ce13" table:formula="of:=IF(AND([.$D351]&lt;&gt;&quot;&quot;;[.$D351]&lt;&gt;&quot;○&quot;);MAX([.$C$3:.$C350])+1;[.$C350])" office:value-type="float" office:value="15" calcext:value-type="float">
            <text:p>15</text:p>
          </table:table-cell>
          <table:table-cell table:style-name="ce19"/>
          <table:table-cell table:style-name="ce27" table:formula="of:=IF(AND([.$F351]&lt;&gt;&quot;&quot;;[.$D350]&lt;&gt;&quot;&quot;);1;IF([.$F351]&lt;&gt;&quot;&quot;;MAX(INDIRECT([.$B351]):[.$E350])+1;&quot;&quot;))">
            <text:p/>
          </table:table-cell>
          <table:table-cell table:style-name="ce32"/>
          <table:table-cell table:style-name="ce32" table:formula="of:=IF([.$H351]=&quot;&quot;;&quot;&quot;;IF([.$G350]=&quot;&quot;;1;[.$G35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1]&lt;&gt;&quot;&quot;;NETWORKDAYS([.$L351];[.$M35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51]=&quot;&quot;;[.$L351]&lt;&gt;&quot;&quot;;[.$L351]&lt;=[.$U$1]);AND([.$M351]&lt;&gt;&quot;&quot;;[.Q351]&lt;100;[.$M351]&lt;=[.$U$1]));&quot;遅延&quot;;&quot;&quot;)">
            <text:p/>
          </table:table-cell>
          <table:table-cell table:style-name="ce66"/>
          <table:table-cell table:style-name="ce66" table:formula="of:=SUM([.$V351:.$FM35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2]&lt;&gt;&quot;&quot;;[.$F352]=&quot;&quot;);&quot;E&quot;&amp;ROW();[.$B273])" office:value-type="string" office:string-value="E91" calcext:value-type="string">
            <text:p>E91</text:p>
          </table:table-cell>
          <table:table-cell table:style-name="ce13" table:formula="of:=IF(AND([.$D352]&lt;&gt;&quot;&quot;;[.$D352]&lt;&gt;&quot;○&quot;);MAX([.$C$3:.$C351])+1;[.$C351])" office:value-type="float" office:value="15" calcext:value-type="float">
            <text:p>15</text:p>
          </table:table-cell>
          <table:table-cell table:style-name="ce19"/>
          <table:table-cell table:style-name="ce27" table:formula="of:=IF(AND([.$F352]&lt;&gt;&quot;&quot;;[.$D351]&lt;&gt;&quot;&quot;);1;IF([.$F352]&lt;&gt;&quot;&quot;;MAX(INDIRECT([.$B352]):[.$E351])+1;&quot;&quot;))">
            <text:p/>
          </table:table-cell>
          <table:table-cell table:style-name="ce32"/>
          <table:table-cell table:style-name="ce32" table:formula="of:=IF([.$H352]=&quot;&quot;;&quot;&quot;;IF([.$G351]=&quot;&quot;;1;[.$G35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2]&lt;&gt;&quot;&quot;;NETWORKDAYS([.$L352];[.$M35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52]=&quot;&quot;;[.$L352]&lt;&gt;&quot;&quot;;[.$L352]&lt;=[.$U$1]);AND([.$M352]&lt;&gt;&quot;&quot;;[.Q352]&lt;100;[.$M352]&lt;=[.$U$1]));&quot;遅延&quot;;&quot;&quot;)">
            <text:p/>
          </table:table-cell>
          <table:table-cell table:style-name="ce66"/>
          <table:table-cell table:style-name="ce66" table:formula="of:=SUM([.$V352:.$FM35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3]&lt;&gt;&quot;&quot;;[.$F353]=&quot;&quot;);&quot;E&quot;&amp;ROW();[.$B274])" office:value-type="string" office:string-value="E91" calcext:value-type="string">
            <text:p>E91</text:p>
          </table:table-cell>
          <table:table-cell table:style-name="ce13" table:formula="of:=IF(AND([.$D353]&lt;&gt;&quot;&quot;;[.$D353]&lt;&gt;&quot;○&quot;);MAX([.$C$3:.$C352])+1;[.$C352])" office:value-type="float" office:value="15" calcext:value-type="float">
            <text:p>15</text:p>
          </table:table-cell>
          <table:table-cell table:style-name="ce19"/>
          <table:table-cell table:style-name="ce27" table:formula="of:=IF(AND([.$F353]&lt;&gt;&quot;&quot;;[.$D352]&lt;&gt;&quot;&quot;);1;IF([.$F353]&lt;&gt;&quot;&quot;;MAX(INDIRECT([.$B353]):[.$E352])+1;&quot;&quot;))">
            <text:p/>
          </table:table-cell>
          <table:table-cell table:style-name="ce32"/>
          <table:table-cell table:style-name="ce32" table:formula="of:=IF([.$H353]=&quot;&quot;;&quot;&quot;;IF([.$G352]=&quot;&quot;;1;[.$G35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3]&lt;&gt;&quot;&quot;;NETWORKDAYS([.$L353];[.$M35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53]=&quot;&quot;;[.$L353]&lt;&gt;&quot;&quot;;[.$L353]&lt;=[.$U$1]);AND([.$M353]&lt;&gt;&quot;&quot;;[.Q353]&lt;100;[.$M353]&lt;=[.$U$1]));&quot;遅延&quot;;&quot;&quot;)">
            <text:p/>
          </table:table-cell>
          <table:table-cell table:style-name="ce66"/>
          <table:table-cell table:style-name="ce66" table:formula="of:=SUM([.$V353:.$FM35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4]&lt;&gt;&quot;&quot;;[.$F354]=&quot;&quot;);&quot;E&quot;&amp;ROW();[.$B275])" office:value-type="string" office:string-value="E115" calcext:value-type="string">
            <text:p>E115</text:p>
          </table:table-cell>
          <table:table-cell table:style-name="ce13" table:formula="of:=IF(AND([.$D354]&lt;&gt;&quot;&quot;;[.$D354]&lt;&gt;&quot;○&quot;);MAX([.$C$3:.$C353])+1;[.$C353])" office:value-type="float" office:value="15" calcext:value-type="float">
            <text:p>15</text:p>
          </table:table-cell>
          <table:table-cell table:style-name="ce18"/>
          <table:table-cell table:style-name="ce30" table:formula="of:=IF(AND([.$F354]&lt;&gt;&quot;&quot;;[.$D353]&lt;&gt;&quot;&quot;);1;IF([.$F354]&lt;&gt;&quot;&quot;;MAX(INDIRECT([.$B354]):[.$E353])+1;&quot;&quot;))">
            <text:p/>
          </table:table-cell>
          <table:table-cell table:style-name="ce18"/>
          <table:table-cell table:style-name="ce30" table:formula="of:=IF([.$H354]=&quot;&quot;;&quot;&quot;;IF([.$G353]=&quot;&quot;;1;[.$G353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54]&lt;&gt;&quot;&quot;;NETWORKDAYS([.$L354];[.$M354];[$休日.$B$4:.$B$304]);&quot;&quot;)">
            <text:p/>
          </table:table-cell>
          <table:table-cell table:style-name="ce47"/>
          <table:table-cell table:style-name="ce18" table:formula="of:=IF(OR(AND([.$N354]=&quot;&quot;;[.$L354]&lt;&gt;&quot;&quot;;[.$L354]&lt;=[.$U$1]);AND([.$M354]&lt;&gt;&quot;&quot;;[.Q354]&lt;100;[.$M354]&lt;=[.$U$1]));&quot;遅延&quot;;&quot;&quot;)">
            <text:p/>
          </table:table-cell>
          <table:table-cell table:style-name="ce18"/>
          <table:table-cell table:style-name="ce18" table:formula="of:=SUM([.$V354:.$FM354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5]&lt;&gt;&quot;&quot;;[.$F355]=&quot;&quot;);&quot;E&quot;&amp;ROW();[.$B276])" office:value-type="string" office:string-value="E115" calcext:value-type="string">
            <text:p>E115</text:p>
          </table:table-cell>
          <table:table-cell table:style-name="ce13" table:formula="of:=IF(AND([.$D355]&lt;&gt;&quot;&quot;;[.$D355]&lt;&gt;&quot;○&quot;);MAX([.$C$3:.$C354])+1;[.$C354])" office:value-type="float" office:value="15" calcext:value-type="float">
            <text:p>15</text:p>
          </table:table-cell>
          <table:table-cell table:style-name="ce19"/>
          <table:table-cell table:style-name="ce27" table:formula="of:=IF(AND([.$F355]&lt;&gt;&quot;&quot;;[.$D354]&lt;&gt;&quot;&quot;);1;IF([.$F355]&lt;&gt;&quot;&quot;;MAX(INDIRECT([.$B355]):[.$E354])+1;&quot;&quot;))">
            <text:p/>
          </table:table-cell>
          <table:table-cell table:style-name="ce32"/>
          <table:table-cell table:style-name="ce32" table:formula="of:=IF([.$H355]=&quot;&quot;;&quot;&quot;;IF([.$G354]=&quot;&quot;;1;[.$G35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5]&lt;&gt;&quot;&quot;;NETWORKDAYS([.$L355];[.$M35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55]=&quot;&quot;;[.$L355]&lt;&gt;&quot;&quot;;[.$L355]&lt;=[.$U$1]);AND([.$M355]&lt;&gt;&quot;&quot;;[.Q355]&lt;100;[.$M355]&lt;=[.$U$1]));&quot;遅延&quot;;&quot;&quot;)">
            <text:p/>
          </table:table-cell>
          <table:table-cell table:style-name="ce66"/>
          <table:table-cell table:style-name="ce66" table:formula="of:=SUM([.$V355:.$FM35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6]&lt;&gt;&quot;&quot;;[.$F356]=&quot;&quot;);&quot;E&quot;&amp;ROW();[.$B279])" office:value-type="string" office:string-value="E196" calcext:value-type="string">
            <text:p>E196</text:p>
          </table:table-cell>
          <table:table-cell table:style-name="ce13" table:formula="of:=IF(AND([.$D356]&lt;&gt;&quot;&quot;;[.$D356]&lt;&gt;&quot;○&quot;);MAX([.$C$3:.$C355])+1;[.$C355])" office:value-type="float" office:value="15" calcext:value-type="float">
            <text:p>15</text:p>
          </table:table-cell>
          <table:table-cell table:style-name="ce19"/>
          <table:table-cell table:style-name="ce27" table:formula="of:=IF(AND([.$F356]&lt;&gt;&quot;&quot;;[.$D355]&lt;&gt;&quot;&quot;);1;IF([.$F356]&lt;&gt;&quot;&quot;;MAX(INDIRECT([.$B356]):[.$E355])+1;&quot;&quot;))">
            <text:p/>
          </table:table-cell>
          <table:table-cell table:style-name="ce32"/>
          <table:table-cell table:style-name="ce32" table:formula="of:=IF([.$H356]=&quot;&quot;;&quot;&quot;;IF([.$G355]=&quot;&quot;;1;[.$G35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6]&lt;&gt;&quot;&quot;;NETWORKDAYS([.$L356];[.$M35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56]=&quot;&quot;;[.$L356]&lt;&gt;&quot;&quot;;[.$L356]&lt;=[.$U$1]);AND([.$M356]&lt;&gt;&quot;&quot;;[.Q356]&lt;100;[.$M356]&lt;=[.$U$1]));&quot;遅延&quot;;&quot;&quot;)">
            <text:p/>
          </table:table-cell>
          <table:table-cell table:style-name="ce66"/>
          <table:table-cell table:style-name="ce66" table:formula="of:=SUM([.$V356:.$FM35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7]&lt;&gt;&quot;&quot;;[.$F357]=&quot;&quot;);&quot;E&quot;&amp;ROW();[.$B280])" office:value-type="string" office:string-value="E115" calcext:value-type="string">
            <text:p>E115</text:p>
          </table:table-cell>
          <table:table-cell table:style-name="ce13" table:formula="of:=IF(AND([.$D357]&lt;&gt;&quot;&quot;;[.$D357]&lt;&gt;&quot;○&quot;);MAX([.$C$3:.$C356])+1;[.$C356])" office:value-type="float" office:value="15" calcext:value-type="float">
            <text:p>15</text:p>
          </table:table-cell>
          <table:table-cell table:style-name="ce19"/>
          <table:table-cell table:style-name="ce27" table:formula="of:=IF(AND([.$F357]&lt;&gt;&quot;&quot;;[.$D356]&lt;&gt;&quot;&quot;);1;IF([.$F357]&lt;&gt;&quot;&quot;;MAX(INDIRECT([.$B357]):[.$E356])+1;&quot;&quot;))">
            <text:p/>
          </table:table-cell>
          <table:table-cell table:style-name="ce32"/>
          <table:table-cell table:style-name="ce32" table:formula="of:=IF([.$H357]=&quot;&quot;;&quot;&quot;;IF([.$G356]=&quot;&quot;;1;[.$G35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7]&lt;&gt;&quot;&quot;;NETWORKDAYS([.$L357];[.$M35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57]=&quot;&quot;;[.$L357]&lt;&gt;&quot;&quot;;[.$L357]&lt;=[.$U$1]);AND([.$M357]&lt;&gt;&quot;&quot;;[.Q357]&lt;100;[.$M357]&lt;=[.$U$1]));&quot;遅延&quot;;&quot;&quot;)">
            <text:p/>
          </table:table-cell>
          <table:table-cell table:style-name="ce66"/>
          <table:table-cell table:style-name="ce66" table:formula="of:=SUM([.$V357:.$FM35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8]&lt;&gt;&quot;&quot;;[.$F358]=&quot;&quot;);&quot;E&quot;&amp;ROW();[.$B281])" office:value-type="string" office:string-value="E281" calcext:value-type="string">
            <text:p>E281</text:p>
          </table:table-cell>
          <table:table-cell table:style-name="ce13" table:formula="of:=IF(AND([.$D358]&lt;&gt;&quot;&quot;;[.$D358]&lt;&gt;&quot;○&quot;);MAX([.$C$3:.$C357])+1;[.$C357])" office:value-type="float" office:value="15" calcext:value-type="float">
            <text:p>15</text:p>
          </table:table-cell>
          <table:table-cell table:style-name="ce19"/>
          <table:table-cell table:style-name="ce27" table:formula="of:=IF(AND([.$F358]&lt;&gt;&quot;&quot;;[.$D357]&lt;&gt;&quot;&quot;);1;IF([.$F358]&lt;&gt;&quot;&quot;;MAX(INDIRECT([.$B358]):[.$E357])+1;&quot;&quot;))">
            <text:p/>
          </table:table-cell>
          <table:table-cell table:style-name="ce32"/>
          <table:table-cell table:style-name="ce32" table:formula="of:=IF([.$H358]=&quot;&quot;;&quot;&quot;;IF([.$G357]=&quot;&quot;;1;[.$G35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8]&lt;&gt;&quot;&quot;;NETWORKDAYS([.$L358];[.$M35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58]=&quot;&quot;;[.$L358]&lt;&gt;&quot;&quot;;[.$L358]&lt;=[.$U$1]);AND([.$M358]&lt;&gt;&quot;&quot;;[.Q358]&lt;100;[.$M358]&lt;=[.$U$1]));&quot;遅延&quot;;&quot;&quot;)">
            <text:p/>
          </table:table-cell>
          <table:table-cell table:style-name="ce66"/>
          <table:table-cell table:style-name="ce66" table:formula="of:=SUM([.$V358:.$FM35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9]&lt;&gt;&quot;&quot;;[.$F359]=&quot;&quot;);&quot;E&quot;&amp;ROW();[.$B282])" office:value-type="string" office:string-value="E115" calcext:value-type="string">
            <text:p>E115</text:p>
          </table:table-cell>
          <table:table-cell table:style-name="ce13" table:formula="of:=IF(AND([.$D359]&lt;&gt;&quot;&quot;;[.$D359]&lt;&gt;&quot;○&quot;);MAX([.$C$3:.$C358])+1;[.$C358])" office:value-type="float" office:value="15" calcext:value-type="float">
            <text:p>15</text:p>
          </table:table-cell>
          <table:table-cell table:style-name="ce19"/>
          <table:table-cell table:style-name="ce27" table:formula="of:=IF(AND([.$F359]&lt;&gt;&quot;&quot;;[.$D358]&lt;&gt;&quot;&quot;);1;IF([.$F359]&lt;&gt;&quot;&quot;;MAX(INDIRECT([.$B359]):[.$E358])+1;&quot;&quot;))">
            <text:p/>
          </table:table-cell>
          <table:table-cell table:style-name="ce32"/>
          <table:table-cell table:style-name="ce32" table:formula="of:=IF([.$H359]=&quot;&quot;;&quot;&quot;;IF([.$G358]=&quot;&quot;;1;[.$G35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9]&lt;&gt;&quot;&quot;;NETWORKDAYS([.$L359];[.$M35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59]=&quot;&quot;;[.$L359]&lt;&gt;&quot;&quot;;[.$L359]&lt;=[.$U$1]);AND([.$M359]&lt;&gt;&quot;&quot;;[.Q359]&lt;100;[.$M359]&lt;=[.$U$1]));&quot;遅延&quot;;&quot;&quot;)">
            <text:p/>
          </table:table-cell>
          <table:table-cell table:style-name="ce66"/>
          <table:table-cell table:style-name="ce66" table:formula="of:=SUM([.$V359:.$FM35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0]&lt;&gt;&quot;&quot;;[.$F360]=&quot;&quot;);&quot;E&quot;&amp;ROW();[.$B283])" office:value-type="string" office:string-value="E115" calcext:value-type="string">
            <text:p>E115</text:p>
          </table:table-cell>
          <table:table-cell table:style-name="ce13" table:formula="of:=IF(AND([.$D360]&lt;&gt;&quot;&quot;;[.$D360]&lt;&gt;&quot;○&quot;);MAX([.$C$3:.$C359])+1;[.$C359])" office:value-type="float" office:value="15" calcext:value-type="float">
            <text:p>15</text:p>
          </table:table-cell>
          <table:table-cell table:style-name="ce19"/>
          <table:table-cell table:style-name="ce27" table:formula="of:=IF(AND([.$F360]&lt;&gt;&quot;&quot;;[.$D359]&lt;&gt;&quot;&quot;);1;IF([.$F360]&lt;&gt;&quot;&quot;;MAX(INDIRECT([.$B360]):[.$E359])+1;&quot;&quot;))">
            <text:p/>
          </table:table-cell>
          <table:table-cell table:style-name="ce32"/>
          <table:table-cell table:style-name="ce32" table:formula="of:=IF([.$H360]=&quot;&quot;;&quot;&quot;;IF([.$G359]=&quot;&quot;;1;[.$G35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0]&lt;&gt;&quot;&quot;;NETWORKDAYS([.$L360];[.$M36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60]=&quot;&quot;;[.$L360]&lt;&gt;&quot;&quot;;[.$L360]&lt;=[.$U$1]);AND([.$M360]&lt;&gt;&quot;&quot;;[.Q360]&lt;100;[.$M360]&lt;=[.$U$1]));&quot;遅延&quot;;&quot;&quot;)">
            <text:p/>
          </table:table-cell>
          <table:table-cell table:style-name="ce66"/>
          <table:table-cell table:style-name="ce66" table:formula="of:=SUM([.$V360:.$FM36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1]&lt;&gt;&quot;&quot;;[.$F361]=&quot;&quot;);&quot;E&quot;&amp;ROW();[.$B284])" office:value-type="string" office:string-value="E115" calcext:value-type="string">
            <text:p>E115</text:p>
          </table:table-cell>
          <table:table-cell table:style-name="ce13" table:formula="of:=IF(AND([.$D361]&lt;&gt;&quot;&quot;;[.$D361]&lt;&gt;&quot;○&quot;);MAX([.$C$3:.$C360])+1;[.$C360])" office:value-type="float" office:value="15" calcext:value-type="float">
            <text:p>15</text:p>
          </table:table-cell>
          <table:table-cell table:style-name="ce19"/>
          <table:table-cell table:style-name="ce27" table:formula="of:=IF(AND([.$F361]&lt;&gt;&quot;&quot;;[.$D360]&lt;&gt;&quot;&quot;);1;IF([.$F361]&lt;&gt;&quot;&quot;;MAX(INDIRECT([.$B361]):[.$E360])+1;&quot;&quot;))">
            <text:p/>
          </table:table-cell>
          <table:table-cell table:style-name="ce32"/>
          <table:table-cell table:style-name="ce32" table:formula="of:=IF([.$H361]=&quot;&quot;;&quot;&quot;;IF([.$G360]=&quot;&quot;;1;[.$G36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1]&lt;&gt;&quot;&quot;;NETWORKDAYS([.$L361];[.$M36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61]=&quot;&quot;;[.$L361]&lt;&gt;&quot;&quot;;[.$L361]&lt;=[.$U$1]);AND([.$M361]&lt;&gt;&quot;&quot;;[.Q361]&lt;100;[.$M361]&lt;=[.$U$1]));&quot;遅延&quot;;&quot;&quot;)">
            <text:p/>
          </table:table-cell>
          <table:table-cell table:style-name="ce66"/>
          <table:table-cell table:style-name="ce66" table:formula="of:=SUM([.$V361:.$FM36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2]&lt;&gt;&quot;&quot;;[.$F362]=&quot;&quot;);&quot;E&quot;&amp;ROW();[.$B285])" office:value-type="string" office:string-value="E125" calcext:value-type="string">
            <text:p>E125</text:p>
          </table:table-cell>
          <table:table-cell table:style-name="ce13" table:formula="of:=IF(AND([.$D362]&lt;&gt;&quot;&quot;;[.$D362]&lt;&gt;&quot;○&quot;);MAX([.$C$3:.$C361])+1;[.$C361])" office:value-type="float" office:value="15" calcext:value-type="float">
            <text:p>15</text:p>
          </table:table-cell>
          <table:table-cell table:style-name="ce18"/>
          <table:table-cell table:style-name="ce30" table:formula="of:=IF(AND([.$F362]&lt;&gt;&quot;&quot;;[.$D361]&lt;&gt;&quot;&quot;);1;IF([.$F362]&lt;&gt;&quot;&quot;;MAX(INDIRECT([.$B362]):[.$E361])+1;&quot;&quot;))">
            <text:p/>
          </table:table-cell>
          <table:table-cell table:style-name="ce18"/>
          <table:table-cell table:style-name="ce30" table:formula="of:=IF([.$H362]=&quot;&quot;;&quot;&quot;;IF([.$G361]=&quot;&quot;;1;[.$G361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62]&lt;&gt;&quot;&quot;;NETWORKDAYS([.$L362];[.$M362];[$休日.$B$4:.$B$304]);&quot;&quot;)">
            <text:p/>
          </table:table-cell>
          <table:table-cell table:style-name="ce47"/>
          <table:table-cell table:style-name="ce18" table:formula="of:=IF(OR(AND([.$N362]=&quot;&quot;;[.$L362]&lt;&gt;&quot;&quot;;[.$L362]&lt;=[.$U$1]);AND([.$M362]&lt;&gt;&quot;&quot;;[.Q362]&lt;100;[.$M362]&lt;=[.$U$1]));&quot;遅延&quot;;&quot;&quot;)">
            <text:p/>
          </table:table-cell>
          <table:table-cell table:style-name="ce18"/>
          <table:table-cell table:style-name="ce18" table:formula="of:=SUM([.$V362:.$FM362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3]&lt;&gt;&quot;&quot;;[.$F363]=&quot;&quot;);&quot;E&quot;&amp;ROW();[.$B286])" office:value-type="string" office:string-value="E125" calcext:value-type="string">
            <text:p>E125</text:p>
          </table:table-cell>
          <table:table-cell table:style-name="ce13" table:formula="of:=IF(AND([.$D363]&lt;&gt;&quot;&quot;;[.$D363]&lt;&gt;&quot;○&quot;);MAX([.$C$3:.$C362])+1;[.$C362])" office:value-type="float" office:value="15" calcext:value-type="float">
            <text:p>15</text:p>
          </table:table-cell>
          <table:table-cell table:style-name="ce19"/>
          <table:table-cell table:style-name="ce27" table:formula="of:=IF(AND([.$F363]&lt;&gt;&quot;&quot;;[.$D362]&lt;&gt;&quot;&quot;);1;IF([.$F363]&lt;&gt;&quot;&quot;;MAX(INDIRECT([.$B363]):[.$E362])+1;&quot;&quot;))">
            <text:p/>
          </table:table-cell>
          <table:table-cell table:style-name="ce32"/>
          <table:table-cell table:style-name="ce32" table:formula="of:=IF([.$H363]=&quot;&quot;;&quot;&quot;;IF([.$G362]=&quot;&quot;;1;[.$G36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3]&lt;&gt;&quot;&quot;;NETWORKDAYS([.$L363];[.$M36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63]=&quot;&quot;;[.$L363]&lt;&gt;&quot;&quot;;[.$L363]&lt;=[.$U$1]);AND([.$M363]&lt;&gt;&quot;&quot;;[.Q363]&lt;100;[.$M363]&lt;=[.$U$1]));&quot;遅延&quot;;&quot;&quot;)">
            <text:p/>
          </table:table-cell>
          <table:table-cell table:style-name="ce66"/>
          <table:table-cell table:style-name="ce66" table:formula="of:=SUM([.$V363:.$FM36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4]&lt;&gt;&quot;&quot;;[.$F364]=&quot;&quot;);&quot;E&quot;&amp;ROW();[.$B287])" office:value-type="string" office:string-value="E125" calcext:value-type="string">
            <text:p>E125</text:p>
          </table:table-cell>
          <table:table-cell table:style-name="ce13" table:formula="of:=IF(AND([.$D364]&lt;&gt;&quot;&quot;;[.$D364]&lt;&gt;&quot;○&quot;);MAX([.$C$3:.$C363])+1;[.$C363])" office:value-type="float" office:value="15" calcext:value-type="float">
            <text:p>15</text:p>
          </table:table-cell>
          <table:table-cell table:style-name="ce19"/>
          <table:table-cell table:style-name="ce27" table:formula="of:=IF(AND([.$F364]&lt;&gt;&quot;&quot;;[.$D363]&lt;&gt;&quot;&quot;);1;IF([.$F364]&lt;&gt;&quot;&quot;;MAX(INDIRECT([.$B364]):[.$E363])+1;&quot;&quot;))">
            <text:p/>
          </table:table-cell>
          <table:table-cell table:style-name="ce32"/>
          <table:table-cell table:style-name="ce32" table:formula="of:=IF([.$H364]=&quot;&quot;;&quot;&quot;;IF([.$G363]=&quot;&quot;;1;[.$G36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4]&lt;&gt;&quot;&quot;;NETWORKDAYS([.$L364];[.$M36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64]=&quot;&quot;;[.$L364]&lt;&gt;&quot;&quot;;[.$L364]&lt;=[.$U$1]);AND([.$M364]&lt;&gt;&quot;&quot;;[.Q364]&lt;100;[.$M364]&lt;=[.$U$1]));&quot;遅延&quot;;&quot;&quot;)">
            <text:p/>
          </table:table-cell>
          <table:table-cell table:style-name="ce66"/>
          <table:table-cell table:style-name="ce66" table:formula="of:=SUM([.$V364:.$FM36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5]&lt;&gt;&quot;&quot;;[.$F365]=&quot;&quot;);&quot;E&quot;&amp;ROW();[.$B288])" office:value-type="string" office:string-value="E125" calcext:value-type="string">
            <text:p>E125</text:p>
          </table:table-cell>
          <table:table-cell table:style-name="ce13" table:formula="of:=IF(AND([.$D365]&lt;&gt;&quot;&quot;;[.$D365]&lt;&gt;&quot;○&quot;);MAX([.$C$3:.$C364])+1;[.$C364])" office:value-type="float" office:value="15" calcext:value-type="float">
            <text:p>15</text:p>
          </table:table-cell>
          <table:table-cell table:style-name="ce19"/>
          <table:table-cell table:style-name="ce27" table:formula="of:=IF(AND([.$F365]&lt;&gt;&quot;&quot;;[.$D364]&lt;&gt;&quot;&quot;);1;IF([.$F365]&lt;&gt;&quot;&quot;;MAX(INDIRECT([.$B365]):[.$E364])+1;&quot;&quot;))">
            <text:p/>
          </table:table-cell>
          <table:table-cell table:style-name="ce32"/>
          <table:table-cell table:style-name="ce32" table:formula="of:=IF([.$H365]=&quot;&quot;;&quot;&quot;;IF([.$G364]=&quot;&quot;;1;[.$G36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5]&lt;&gt;&quot;&quot;;NETWORKDAYS([.$L365];[.$M36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65]=&quot;&quot;;[.$L365]&lt;&gt;&quot;&quot;;[.$L365]&lt;=[.$U$1]);AND([.$M365]&lt;&gt;&quot;&quot;;[.Q365]&lt;100;[.$M365]&lt;=[.$U$1]));&quot;遅延&quot;;&quot;&quot;)">
            <text:p/>
          </table:table-cell>
          <table:table-cell table:style-name="ce66"/>
          <table:table-cell table:style-name="ce66" table:formula="of:=SUM([.$V365:.$FM36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6]&lt;&gt;&quot;&quot;;[.$F366]=&quot;&quot;);&quot;E&quot;&amp;ROW();[.$B289])" office:value-type="string" office:string-value="E125" calcext:value-type="string">
            <text:p>E125</text:p>
          </table:table-cell>
          <table:table-cell table:style-name="ce13" table:formula="of:=IF(AND([.$D366]&lt;&gt;&quot;&quot;;[.$D366]&lt;&gt;&quot;○&quot;);MAX([.$C$3:.$C365])+1;[.$C365])" office:value-type="float" office:value="15" calcext:value-type="float">
            <text:p>15</text:p>
          </table:table-cell>
          <table:table-cell table:style-name="ce19"/>
          <table:table-cell table:style-name="ce27" table:formula="of:=IF(AND([.$F366]&lt;&gt;&quot;&quot;;[.$D365]&lt;&gt;&quot;&quot;);1;IF([.$F366]&lt;&gt;&quot;&quot;;MAX(INDIRECT([.$B366]):[.$E365])+1;&quot;&quot;))">
            <text:p/>
          </table:table-cell>
          <table:table-cell table:style-name="ce32"/>
          <table:table-cell table:style-name="ce32" table:formula="of:=IF([.$H366]=&quot;&quot;;&quot;&quot;;IF([.$G365]=&quot;&quot;;1;[.$G36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6]&lt;&gt;&quot;&quot;;NETWORKDAYS([.$L366];[.$M36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66]=&quot;&quot;;[.$L366]&lt;&gt;&quot;&quot;;[.$L366]&lt;=[.$U$1]);AND([.$M366]&lt;&gt;&quot;&quot;;[.Q366]&lt;100;[.$M366]&lt;=[.$U$1]));&quot;遅延&quot;;&quot;&quot;)">
            <text:p/>
          </table:table-cell>
          <table:table-cell table:style-name="ce66"/>
          <table:table-cell table:style-name="ce66" table:formula="of:=SUM([.$V366:.$FM36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7]&lt;&gt;&quot;&quot;;[.$F367]=&quot;&quot;);&quot;E&quot;&amp;ROW();[.$B290])" office:value-type="string" office:string-value="E125" calcext:value-type="string">
            <text:p>E125</text:p>
          </table:table-cell>
          <table:table-cell table:style-name="ce13" table:formula="of:=IF(AND([.$D367]&lt;&gt;&quot;&quot;;[.$D367]&lt;&gt;&quot;○&quot;);MAX([.$C$3:.$C366])+1;[.$C366])" office:value-type="float" office:value="15" calcext:value-type="float">
            <text:p>15</text:p>
          </table:table-cell>
          <table:table-cell table:style-name="ce19"/>
          <table:table-cell table:style-name="ce27" table:formula="of:=IF(AND([.$F367]&lt;&gt;&quot;&quot;;[.$D366]&lt;&gt;&quot;&quot;);1;IF([.$F367]&lt;&gt;&quot;&quot;;MAX(INDIRECT([.$B367]):[.$E366])+1;&quot;&quot;))">
            <text:p/>
          </table:table-cell>
          <table:table-cell table:style-name="ce32"/>
          <table:table-cell table:style-name="ce32" table:formula="of:=IF([.$H367]=&quot;&quot;;&quot;&quot;;IF([.$G366]=&quot;&quot;;1;[.$G36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7]&lt;&gt;&quot;&quot;;NETWORKDAYS([.$L367];[.$M36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67]=&quot;&quot;;[.$L367]&lt;&gt;&quot;&quot;;[.$L367]&lt;=[.$U$1]);AND([.$M367]&lt;&gt;&quot;&quot;;[.Q367]&lt;100;[.$M367]&lt;=[.$U$1]));&quot;遅延&quot;;&quot;&quot;)">
            <text:p/>
          </table:table-cell>
          <table:table-cell table:style-name="ce66"/>
          <table:table-cell table:style-name="ce66" table:formula="of:=SUM([.$V367:.$FM36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8]&lt;&gt;&quot;&quot;;[.$F368]=&quot;&quot;);&quot;E&quot;&amp;ROW();[.$B291])" office:value-type="string" office:string-value="E125" calcext:value-type="string">
            <text:p>E125</text:p>
          </table:table-cell>
          <table:table-cell table:style-name="ce13" table:formula="of:=IF(AND([.$D368]&lt;&gt;&quot;&quot;;[.$D368]&lt;&gt;&quot;○&quot;);MAX([.$C$3:.$C367])+1;[.$C367])" office:value-type="float" office:value="15" calcext:value-type="float">
            <text:p>15</text:p>
          </table:table-cell>
          <table:table-cell table:style-name="ce19"/>
          <table:table-cell table:style-name="ce27" table:formula="of:=IF(AND([.$F368]&lt;&gt;&quot;&quot;;[.$D367]&lt;&gt;&quot;&quot;);1;IF([.$F368]&lt;&gt;&quot;&quot;;MAX(INDIRECT([.$B368]):[.$E367])+1;&quot;&quot;))">
            <text:p/>
          </table:table-cell>
          <table:table-cell table:style-name="ce32"/>
          <table:table-cell table:style-name="ce32" table:formula="of:=IF([.$H368]=&quot;&quot;;&quot;&quot;;IF([.$G367]=&quot;&quot;;1;[.$G36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8]&lt;&gt;&quot;&quot;;NETWORKDAYS([.$L368];[.$M36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68]=&quot;&quot;;[.$L368]&lt;&gt;&quot;&quot;;[.$L368]&lt;=[.$U$1]);AND([.$M368]&lt;&gt;&quot;&quot;;[.Q368]&lt;100;[.$M368]&lt;=[.$U$1]));&quot;遅延&quot;;&quot;&quot;)">
            <text:p/>
          </table:table-cell>
          <table:table-cell table:style-name="ce66"/>
          <table:table-cell table:style-name="ce66" table:formula="of:=SUM([.$V368:.$FM36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9]&lt;&gt;&quot;&quot;;[.$F369]=&quot;&quot;);&quot;E&quot;&amp;ROW();[.$B292])" office:value-type="string" office:string-value="E125" calcext:value-type="string">
            <text:p>E125</text:p>
          </table:table-cell>
          <table:table-cell table:style-name="ce13" table:formula="of:=IF(AND([.$D369]&lt;&gt;&quot;&quot;;[.$D369]&lt;&gt;&quot;○&quot;);MAX([.$C$3:.$C368])+1;[.$C368])" office:value-type="float" office:value="15" calcext:value-type="float">
            <text:p>15</text:p>
          </table:table-cell>
          <table:table-cell table:style-name="ce19"/>
          <table:table-cell table:style-name="ce27" table:formula="of:=IF(AND([.$F369]&lt;&gt;&quot;&quot;;[.$D368]&lt;&gt;&quot;&quot;);1;IF([.$F369]&lt;&gt;&quot;&quot;;MAX(INDIRECT([.$B369]):[.$E368])+1;&quot;&quot;))">
            <text:p/>
          </table:table-cell>
          <table:table-cell table:style-name="ce32"/>
          <table:table-cell table:style-name="ce32" table:formula="of:=IF([.$H369]=&quot;&quot;;&quot;&quot;;IF([.$G368]=&quot;&quot;;1;[.$G36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9]&lt;&gt;&quot;&quot;;NETWORKDAYS([.$L369];[.$M36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69]=&quot;&quot;;[.$L369]&lt;&gt;&quot;&quot;;[.$L369]&lt;=[.$U$1]);AND([.$M369]&lt;&gt;&quot;&quot;;[.Q369]&lt;100;[.$M369]&lt;=[.$U$1]));&quot;遅延&quot;;&quot;&quot;)">
            <text:p/>
          </table:table-cell>
          <table:table-cell table:style-name="ce66"/>
          <table:table-cell table:style-name="ce66" table:formula="of:=SUM([.$V369:.$FM36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0]&lt;&gt;&quot;&quot;;[.$F370]=&quot;&quot;);&quot;E&quot;&amp;ROW();[.$B293])" office:value-type="string" office:string-value="E125" calcext:value-type="string">
            <text:p>E125</text:p>
          </table:table-cell>
          <table:table-cell table:style-name="ce13" table:formula="of:=IF(AND([.$D370]&lt;&gt;&quot;&quot;;[.$D370]&lt;&gt;&quot;○&quot;);MAX([.$C$3:.$C369])+1;[.$C369])" office:value-type="float" office:value="15" calcext:value-type="float">
            <text:p>15</text:p>
          </table:table-cell>
          <table:table-cell table:style-name="ce19"/>
          <table:table-cell table:style-name="ce27" table:formula="of:=IF(AND([.$F370]&lt;&gt;&quot;&quot;;[.$D369]&lt;&gt;&quot;&quot;);1;IF([.$F370]&lt;&gt;&quot;&quot;;MAX(INDIRECT([.$B370]):[.$E369])+1;&quot;&quot;))">
            <text:p/>
          </table:table-cell>
          <table:table-cell table:style-name="ce32"/>
          <table:table-cell table:style-name="ce32" table:formula="of:=IF([.$H370]=&quot;&quot;;&quot;&quot;;IF([.$G369]=&quot;&quot;;1;[.$G36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0]&lt;&gt;&quot;&quot;;NETWORKDAYS([.$L370];[.$M37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70]=&quot;&quot;;[.$L370]&lt;&gt;&quot;&quot;;[.$L370]&lt;=[.$U$1]);AND([.$M370]&lt;&gt;&quot;&quot;;[.Q370]&lt;100;[.$M370]&lt;=[.$U$1]));&quot;遅延&quot;;&quot;&quot;)">
            <text:p/>
          </table:table-cell>
          <table:table-cell table:style-name="ce66"/>
          <table:table-cell table:style-name="ce66" table:formula="of:=SUM([.$V370:.$FM37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1]&lt;&gt;&quot;&quot;;[.$F371]=&quot;&quot;);&quot;E&quot;&amp;ROW();[.$B294])" office:value-type="string" office:string-value="E125" calcext:value-type="string">
            <text:p>E125</text:p>
          </table:table-cell>
          <table:table-cell table:style-name="ce13" table:formula="of:=IF(AND([.$D371]&lt;&gt;&quot;&quot;;[.$D371]&lt;&gt;&quot;○&quot;);MAX([.$C$3:.$C370])+1;[.$C370])" office:value-type="float" office:value="15" calcext:value-type="float">
            <text:p>15</text:p>
          </table:table-cell>
          <table:table-cell table:style-name="ce19"/>
          <table:table-cell table:style-name="ce27" table:formula="of:=IF(AND([.$F371]&lt;&gt;&quot;&quot;;[.$D370]&lt;&gt;&quot;&quot;);1;IF([.$F371]&lt;&gt;&quot;&quot;;MAX(INDIRECT([.$B371]):[.$E370])+1;&quot;&quot;))">
            <text:p/>
          </table:table-cell>
          <table:table-cell table:style-name="ce32"/>
          <table:table-cell table:style-name="ce32" table:formula="of:=IF([.$H371]=&quot;&quot;;&quot;&quot;;IF([.$G370]=&quot;&quot;;1;[.$G37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1]&lt;&gt;&quot;&quot;;NETWORKDAYS([.$L371];[.$M37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71]=&quot;&quot;;[.$L371]&lt;&gt;&quot;&quot;;[.$L371]&lt;=[.$U$1]);AND([.$M371]&lt;&gt;&quot;&quot;;[.Q371]&lt;100;[.$M371]&lt;=[.$U$1]));&quot;遅延&quot;;&quot;&quot;)">
            <text:p/>
          </table:table-cell>
          <table:table-cell table:style-name="ce66"/>
          <table:table-cell table:style-name="ce66" table:formula="of:=SUM([.$V371:.$FM37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2]&lt;&gt;&quot;&quot;;[.$F372]=&quot;&quot;);&quot;E&quot;&amp;ROW();[.$B295])" office:value-type="string" office:string-value="E125" calcext:value-type="string">
            <text:p>E125</text:p>
          </table:table-cell>
          <table:table-cell table:style-name="ce13" table:formula="of:=IF(AND([.$D372]&lt;&gt;&quot;&quot;;[.$D372]&lt;&gt;&quot;○&quot;);MAX([.$C$3:.$C371])+1;[.$C371])" office:value-type="float" office:value="15" calcext:value-type="float">
            <text:p>15</text:p>
          </table:table-cell>
          <table:table-cell table:style-name="ce18"/>
          <table:table-cell table:style-name="ce30" table:formula="of:=IF(AND([.$F372]&lt;&gt;&quot;&quot;;[.$D371]&lt;&gt;&quot;&quot;);1;IF([.$F372]&lt;&gt;&quot;&quot;;MAX(INDIRECT([.$B372]):[.$E371])+1;&quot;&quot;))">
            <text:p/>
          </table:table-cell>
          <table:table-cell table:style-name="ce18"/>
          <table:table-cell table:style-name="ce30" table:formula="of:=IF([.$H372]=&quot;&quot;;&quot;&quot;;IF([.$G371]=&quot;&quot;;1;[.$G371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72]&lt;&gt;&quot;&quot;;NETWORKDAYS([.$L372];[.$M372];[$休日.$B$4:.$B$304]);&quot;&quot;)">
            <text:p/>
          </table:table-cell>
          <table:table-cell table:style-name="ce47"/>
          <table:table-cell table:style-name="ce18" table:formula="of:=IF(OR(AND([.$N372]=&quot;&quot;;[.$L372]&lt;&gt;&quot;&quot;;[.$L372]&lt;=[.$U$1]);AND([.$M372]&lt;&gt;&quot;&quot;;[.Q372]&lt;100;[.$M372]&lt;=[.$U$1]));&quot;遅延&quot;;&quot;&quot;)">
            <text:p/>
          </table:table-cell>
          <table:table-cell table:style-name="ce18"/>
          <table:table-cell table:style-name="ce18" table:formula="of:=SUM([.$V372:.$FM372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3]&lt;&gt;&quot;&quot;;[.$F373]=&quot;&quot;);&quot;E&quot;&amp;ROW();[.$B296])" office:value-type="string" office:string-value="E125" calcext:value-type="string">
            <text:p>E125</text:p>
          </table:table-cell>
          <table:table-cell table:style-name="ce13" table:formula="of:=IF(AND([.$D373]&lt;&gt;&quot;&quot;;[.$D373]&lt;&gt;&quot;○&quot;);MAX([.$C$3:.$C372])+1;[.$C372])" office:value-type="float" office:value="15" calcext:value-type="float">
            <text:p>15</text:p>
          </table:table-cell>
          <table:table-cell table:style-name="ce19"/>
          <table:table-cell table:style-name="ce27" table:formula="of:=IF(AND([.$F373]&lt;&gt;&quot;&quot;;[.$D372]&lt;&gt;&quot;&quot;);1;IF([.$F373]&lt;&gt;&quot;&quot;;MAX(INDIRECT([.$B373]):[.$E372])+1;&quot;&quot;))">
            <text:p/>
          </table:table-cell>
          <table:table-cell table:style-name="ce32"/>
          <table:table-cell table:style-name="ce32" table:formula="of:=IF([.$H373]=&quot;&quot;;&quot;&quot;;IF([.$G372]=&quot;&quot;;1;[.$G37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3]&lt;&gt;&quot;&quot;;NETWORKDAYS([.$L373];[.$M37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73]=&quot;&quot;;[.$L373]&lt;&gt;&quot;&quot;;[.$L373]&lt;=[.$U$1]);AND([.$M373]&lt;&gt;&quot;&quot;;[.Q373]&lt;100;[.$M373]&lt;=[.$U$1]));&quot;遅延&quot;;&quot;&quot;)">
            <text:p/>
          </table:table-cell>
          <table:table-cell table:style-name="ce66"/>
          <table:table-cell table:style-name="ce66" table:formula="of:=SUM([.$V373:.$FM37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4]&lt;&gt;&quot;&quot;;[.$F374]=&quot;&quot;);&quot;E&quot;&amp;ROW();[.$B297])" office:value-type="float" office:value="0" calcext:value-type="float">
            <text:p>0</text:p>
          </table:table-cell>
          <table:table-cell table:style-name="ce13" table:formula="of:=IF(AND([.$D374]&lt;&gt;&quot;&quot;;[.$D374]&lt;&gt;&quot;○&quot;);MAX([.$C$3:.$C373])+1;[.$C373])" office:value-type="float" office:value="15" calcext:value-type="float">
            <text:p>15</text:p>
          </table:table-cell>
          <table:table-cell table:style-name="ce19"/>
          <table:table-cell table:style-name="ce27" table:formula="of:=IF(AND([.$F374]&lt;&gt;&quot;&quot;;[.$D373]&lt;&gt;&quot;&quot;);1;IF([.$F374]&lt;&gt;&quot;&quot;;MAX(INDIRECT([.$B374]):[.$E373])+1;&quot;&quot;))">
            <text:p/>
          </table:table-cell>
          <table:table-cell table:style-name="ce32"/>
          <table:table-cell table:style-name="ce32" table:formula="of:=IF([.$H374]=&quot;&quot;;&quot;&quot;;IF([.$G373]=&quot;&quot;;1;[.$G37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4]&lt;&gt;&quot;&quot;;NETWORKDAYS([.$L374];[.$M37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74]=&quot;&quot;;[.$L374]&lt;&gt;&quot;&quot;;[.$L374]&lt;=[.$U$1]);AND([.$M374]&lt;&gt;&quot;&quot;;[.Q374]&lt;100;[.$M374]&lt;=[.$U$1]));&quot;遅延&quot;;&quot;&quot;)">
            <text:p/>
          </table:table-cell>
          <table:table-cell table:style-name="ce66"/>
          <table:table-cell table:style-name="ce66" table:formula="of:=SUM([.$V374:.$FM37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5]&lt;&gt;&quot;&quot;;[.$F375]=&quot;&quot;);&quot;E&quot;&amp;ROW();[.$B298])" office:value-type="string" office:string-value="E125" calcext:value-type="string">
            <text:p>E125</text:p>
          </table:table-cell>
          <table:table-cell table:style-name="ce13" table:formula="of:=IF(AND([.$D375]&lt;&gt;&quot;&quot;;[.$D375]&lt;&gt;&quot;○&quot;);MAX([.$C$3:.$C374])+1;[.$C374])" office:value-type="float" office:value="15" calcext:value-type="float">
            <text:p>15</text:p>
          </table:table-cell>
          <table:table-cell table:style-name="ce19"/>
          <table:table-cell table:style-name="ce27" table:formula="of:=IF(AND([.$F375]&lt;&gt;&quot;&quot;;[.$D374]&lt;&gt;&quot;&quot;);1;IF([.$F375]&lt;&gt;&quot;&quot;;MAX(INDIRECT([.$B375]):[.$E374])+1;&quot;&quot;))">
            <text:p/>
          </table:table-cell>
          <table:table-cell table:style-name="ce32"/>
          <table:table-cell table:style-name="ce32" table:formula="of:=IF([.$H375]=&quot;&quot;;&quot;&quot;;IF([.$G374]=&quot;&quot;;1;[.$G37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5]&lt;&gt;&quot;&quot;;NETWORKDAYS([.$L375];[.$M37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75]=&quot;&quot;;[.$L375]&lt;&gt;&quot;&quot;;[.$L375]&lt;=[.$U$1]);AND([.$M375]&lt;&gt;&quot;&quot;;[.Q375]&lt;100;[.$M375]&lt;=[.$U$1]));&quot;遅延&quot;;&quot;&quot;)">
            <text:p/>
          </table:table-cell>
          <table:table-cell table:style-name="ce66"/>
          <table:table-cell table:style-name="ce66" table:formula="of:=SUM([.$V375:.$FM37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6]&lt;&gt;&quot;&quot;;[.$F376]=&quot;&quot;);&quot;E&quot;&amp;ROW();[.$B299])" office:value-type="string" office:string-value="E125" calcext:value-type="string">
            <text:p>E125</text:p>
          </table:table-cell>
          <table:table-cell table:style-name="ce13" table:formula="of:=IF(AND([.$D376]&lt;&gt;&quot;&quot;;[.$D376]&lt;&gt;&quot;○&quot;);MAX([.$C$3:.$C375])+1;[.$C375])" office:value-type="float" office:value="15" calcext:value-type="float">
            <text:p>15</text:p>
          </table:table-cell>
          <table:table-cell table:style-name="ce19"/>
          <table:table-cell table:style-name="ce27" table:formula="of:=IF(AND([.$F376]&lt;&gt;&quot;&quot;;[.$D375]&lt;&gt;&quot;&quot;);1;IF([.$F376]&lt;&gt;&quot;&quot;;MAX(INDIRECT([.$B376]):[.$E375])+1;&quot;&quot;))">
            <text:p/>
          </table:table-cell>
          <table:table-cell table:style-name="ce32"/>
          <table:table-cell table:style-name="ce32" table:formula="of:=IF([.$H376]=&quot;&quot;;&quot;&quot;;IF([.$G375]=&quot;&quot;;1;[.$G37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6]&lt;&gt;&quot;&quot;;NETWORKDAYS([.$L376];[.$M37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76]=&quot;&quot;;[.$L376]&lt;&gt;&quot;&quot;;[.$L376]&lt;=[.$U$1]);AND([.$M376]&lt;&gt;&quot;&quot;;[.Q376]&lt;100;[.$M376]&lt;=[.$U$1]));&quot;遅延&quot;;&quot;&quot;)">
            <text:p/>
          </table:table-cell>
          <table:table-cell table:style-name="ce66"/>
          <table:table-cell table:style-name="ce66" table:formula="of:=SUM([.$V376:.$FM37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7]&lt;&gt;&quot;&quot;;[.$F377]=&quot;&quot;);&quot;E&quot;&amp;ROW();[.$B300])" office:value-type="string" office:string-value="E125" calcext:value-type="string">
            <text:p>E125</text:p>
          </table:table-cell>
          <table:table-cell table:style-name="ce13" table:formula="of:=IF(AND([.$D377]&lt;&gt;&quot;&quot;;[.$D377]&lt;&gt;&quot;○&quot;);MAX([.$C$3:.$C376])+1;[.$C376])" office:value-type="float" office:value="15" calcext:value-type="float">
            <text:p>15</text:p>
          </table:table-cell>
          <table:table-cell table:style-name="ce19"/>
          <table:table-cell table:style-name="ce27" table:formula="of:=IF(AND([.$F377]&lt;&gt;&quot;&quot;;[.$D376]&lt;&gt;&quot;&quot;);1;IF([.$F377]&lt;&gt;&quot;&quot;;MAX(INDIRECT([.$B377]):[.$E376])+1;&quot;&quot;))">
            <text:p/>
          </table:table-cell>
          <table:table-cell table:style-name="ce32"/>
          <table:table-cell table:style-name="ce32" table:formula="of:=IF([.$H377]=&quot;&quot;;&quot;&quot;;IF([.$G376]=&quot;&quot;;1;[.$G37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7]&lt;&gt;&quot;&quot;;NETWORKDAYS([.$L377];[.$M37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77]=&quot;&quot;;[.$L377]&lt;&gt;&quot;&quot;;[.$L377]&lt;=[.$U$1]);AND([.$M377]&lt;&gt;&quot;&quot;;[.Q377]&lt;100;[.$M377]&lt;=[.$U$1]));&quot;遅延&quot;;&quot;&quot;)">
            <text:p/>
          </table:table-cell>
          <table:table-cell table:style-name="ce66"/>
          <table:table-cell table:style-name="ce66" table:formula="of:=SUM([.$V377:.$FM37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8]&lt;&gt;&quot;&quot;;[.$F378]=&quot;&quot;);&quot;E&quot;&amp;ROW();[.$B301])" office:value-type="string" office:string-value="E125" calcext:value-type="string">
            <text:p>E125</text:p>
          </table:table-cell>
          <table:table-cell table:style-name="ce13" table:formula="of:=IF(AND([.$D378]&lt;&gt;&quot;&quot;;[.$D378]&lt;&gt;&quot;○&quot;);MAX([.$C$3:.$C377])+1;[.$C377])" office:value-type="float" office:value="15" calcext:value-type="float">
            <text:p>15</text:p>
          </table:table-cell>
          <table:table-cell table:style-name="ce19"/>
          <table:table-cell table:style-name="ce27" table:formula="of:=IF(AND([.$F378]&lt;&gt;&quot;&quot;;[.$D377]&lt;&gt;&quot;&quot;);1;IF([.$F378]&lt;&gt;&quot;&quot;;MAX(INDIRECT([.$B378]):[.$E377])+1;&quot;&quot;))">
            <text:p/>
          </table:table-cell>
          <table:table-cell table:style-name="ce32"/>
          <table:table-cell table:style-name="ce32" table:formula="of:=IF([.$H378]=&quot;&quot;;&quot;&quot;;IF([.$G377]=&quot;&quot;;1;[.$G37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8]&lt;&gt;&quot;&quot;;NETWORKDAYS([.$L378];[.$M37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78]=&quot;&quot;;[.$L378]&lt;&gt;&quot;&quot;;[.$L378]&lt;=[.$U$1]);AND([.$M378]&lt;&gt;&quot;&quot;;[.Q378]&lt;100;[.$M378]&lt;=[.$U$1]));&quot;遅延&quot;;&quot;&quot;)">
            <text:p/>
          </table:table-cell>
          <table:table-cell table:style-name="ce66"/>
          <table:table-cell table:style-name="ce66" table:formula="of:=SUM([.$V378:.$FM37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9]&lt;&gt;&quot;&quot;;[.$F379]=&quot;&quot;);&quot;E&quot;&amp;ROW();[.$B302])" office:value-type="string" office:string-value="E125" calcext:value-type="string">
            <text:p>E125</text:p>
          </table:table-cell>
          <table:table-cell table:style-name="ce13" table:formula="of:=IF(AND([.$D379]&lt;&gt;&quot;&quot;;[.$D379]&lt;&gt;&quot;○&quot;);MAX([.$C$3:.$C378])+1;[.$C378])" office:value-type="float" office:value="15" calcext:value-type="float">
            <text:p>15</text:p>
          </table:table-cell>
          <table:table-cell table:style-name="ce18"/>
          <table:table-cell table:style-name="ce30" table:formula="of:=IF(AND([.$F379]&lt;&gt;&quot;&quot;;[.$D378]&lt;&gt;&quot;&quot;);1;IF([.$F379]&lt;&gt;&quot;&quot;;MAX(INDIRECT([.$B379]):[.$E378])+1;&quot;&quot;))">
            <text:p/>
          </table:table-cell>
          <table:table-cell table:style-name="ce18"/>
          <table:table-cell table:style-name="ce30" table:formula="of:=IF([.$H379]=&quot;&quot;;&quot;&quot;;IF([.$G378]=&quot;&quot;;1;[.$G378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79]&lt;&gt;&quot;&quot;;NETWORKDAYS([.$L379];[.$M379];[$休日.$B$4:.$B$304]);&quot;&quot;)">
            <text:p/>
          </table:table-cell>
          <table:table-cell table:style-name="ce47"/>
          <table:table-cell table:style-name="ce18" table:formula="of:=IF(OR(AND([.$N379]=&quot;&quot;;[.$L379]&lt;&gt;&quot;&quot;;[.$L379]&lt;=[.$U$1]);AND([.$M379]&lt;&gt;&quot;&quot;;[.Q379]&lt;100;[.$M379]&lt;=[.$U$1]));&quot;遅延&quot;;&quot;&quot;)">
            <text:p/>
          </table:table-cell>
          <table:table-cell table:style-name="ce18"/>
          <table:table-cell table:style-name="ce18" table:formula="of:=SUM([.$V379:.$FM379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80]&lt;&gt;&quot;&quot;;[.$F380]=&quot;&quot;);&quot;E&quot;&amp;ROW();[.$B303])" office:value-type="string" office:string-value="E125" calcext:value-type="string">
            <text:p>E125</text:p>
          </table:table-cell>
          <table:table-cell table:style-name="ce13" table:formula="of:=IF(AND([.$D380]&lt;&gt;&quot;&quot;;[.$D380]&lt;&gt;&quot;○&quot;);MAX([.$C$3:.$C379])+1;[.$C379])" office:value-type="float" office:value="15" calcext:value-type="float">
            <text:p>15</text:p>
          </table:table-cell>
          <table:table-cell table:style-name="ce19"/>
          <table:table-cell table:style-name="ce27" table:formula="of:=IF(AND([.$F380]&lt;&gt;&quot;&quot;;[.$D379]&lt;&gt;&quot;&quot;);1;IF([.$F380]&lt;&gt;&quot;&quot;;MAX(INDIRECT([.$B380]):[.$E379])+1;&quot;&quot;))">
            <text:p/>
          </table:table-cell>
          <table:table-cell table:style-name="ce32"/>
          <table:table-cell table:style-name="ce32" table:formula="of:=IF([.$H380]=&quot;&quot;;&quot;&quot;;IF([.$G379]=&quot;&quot;;1;[.$G37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0]&lt;&gt;&quot;&quot;;NETWORKDAYS([.$L380];[.$M38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80]=&quot;&quot;;[.$L380]&lt;&gt;&quot;&quot;;[.$L380]&lt;=[.$U$1]);AND([.$M380]&lt;&gt;&quot;&quot;;[.Q380]&lt;100;[.$M380]&lt;=[.$U$1]));&quot;遅延&quot;;&quot;&quot;)">
            <text:p/>
          </table:table-cell>
          <table:table-cell table:style-name="ce66"/>
          <table:table-cell table:style-name="ce66" table:formula="of:=SUM([.$V380:.$FM38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81]&lt;&gt;&quot;&quot;;[.$F381]=&quot;&quot;);&quot;E&quot;&amp;ROW();[.$B304])" office:value-type="string" office:string-value="E125" calcext:value-type="string">
            <text:p>E125</text:p>
          </table:table-cell>
          <table:table-cell table:style-name="ce13" table:formula="of:=IF(AND([.$D381]&lt;&gt;&quot;&quot;;[.$D381]&lt;&gt;&quot;○&quot;);MAX([.$C$3:.$C380])+1;[.$C380])" office:value-type="float" office:value="15" calcext:value-type="float">
            <text:p>15</text:p>
          </table:table-cell>
          <table:table-cell table:style-name="ce19"/>
          <table:table-cell table:style-name="ce27" table:formula="of:=IF(AND([.$F381]&lt;&gt;&quot;&quot;;[.$D380]&lt;&gt;&quot;&quot;);1;IF([.$F381]&lt;&gt;&quot;&quot;;MAX(INDIRECT([.$B381]):[.$E380])+1;&quot;&quot;))">
            <text:p/>
          </table:table-cell>
          <table:table-cell table:style-name="ce32"/>
          <table:table-cell table:style-name="ce32" table:formula="of:=IF([.$H381]=&quot;&quot;;&quot;&quot;;IF([.$G380]=&quot;&quot;;1;[.$G38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1]&lt;&gt;&quot;&quot;;NETWORKDAYS([.$L381];[.$M38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81]=&quot;&quot;;[.$L381]&lt;&gt;&quot;&quot;;[.$L381]&lt;=[.$U$1]);AND([.$M381]&lt;&gt;&quot;&quot;;[.Q381]&lt;100;[.$M381]&lt;=[.$U$1]));&quot;遅延&quot;;&quot;&quot;)">
            <text:p/>
          </table:table-cell>
          <table:table-cell table:style-name="ce66"/>
          <table:table-cell table:style-name="ce66" table:formula="of:=SUM([.$V381:.$FM38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82]&lt;&gt;&quot;&quot;;[.$F382]=&quot;&quot;);&quot;E&quot;&amp;ROW();[.$B305])" office:value-type="string" office:string-value="E125" calcext:value-type="string">
            <text:p>E125</text:p>
          </table:table-cell>
          <table:table-cell table:style-name="ce13" table:formula="of:=IF(AND([.$D382]&lt;&gt;&quot;&quot;;[.$D382]&lt;&gt;&quot;○&quot;);MAX([.$C$3:.$C381])+1;[.$C381])" office:value-type="float" office:value="15" calcext:value-type="float">
            <text:p>15</text:p>
          </table:table-cell>
          <table:table-cell table:style-name="ce19"/>
          <table:table-cell table:style-name="ce27" table:formula="of:=IF(AND([.$F382]&lt;&gt;&quot;&quot;;[.$D381]&lt;&gt;&quot;&quot;);1;IF([.$F382]&lt;&gt;&quot;&quot;;MAX(INDIRECT([.$B382]):[.$E381])+1;&quot;&quot;))">
            <text:p/>
          </table:table-cell>
          <table:table-cell table:style-name="ce32"/>
          <table:table-cell table:style-name="ce32" table:formula="of:=IF([.$H382]=&quot;&quot;;&quot;&quot;;IF([.$G381]=&quot;&quot;;1;[.$G38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2]&lt;&gt;&quot;&quot;;NETWORKDAYS([.$L382];[.$M38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82]=&quot;&quot;;[.$L382]&lt;&gt;&quot;&quot;;[.$L382]&lt;=[.$U$1]);AND([.$M382]&lt;&gt;&quot;&quot;;[.Q382]&lt;100;[.$M382]&lt;=[.$U$1]));&quot;遅延&quot;;&quot;&quot;)">
            <text:p/>
          </table:table-cell>
          <table:table-cell table:style-name="ce66"/>
          <table:table-cell table:style-name="ce66" table:formula="of:=SUM([.$V382:.$FM38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83]&lt;&gt;&quot;&quot;;[.$F383]=&quot;&quot;);&quot;E&quot;&amp;ROW();[.$B306])" office:value-type="string" office:string-value="E125" calcext:value-type="string">
            <text:p>E125</text:p>
          </table:table-cell>
          <table:table-cell table:style-name="ce13" table:formula="of:=IF(AND([.$D383]&lt;&gt;&quot;&quot;;[.$D383]&lt;&gt;&quot;○&quot;);MAX([.$C$3:.$C382])+1;[.$C382])" office:value-type="float" office:value="15" calcext:value-type="float">
            <text:p>15</text:p>
          </table:table-cell>
          <table:table-cell table:style-name="ce19"/>
          <table:table-cell table:style-name="ce27" table:formula="of:=IF(AND([.$F383]&lt;&gt;&quot;&quot;;[.$D382]&lt;&gt;&quot;&quot;);1;IF([.$F383]&lt;&gt;&quot;&quot;;MAX(INDIRECT([.$B383]):[.$E382])+1;&quot;&quot;))">
            <text:p/>
          </table:table-cell>
          <table:table-cell table:style-name="ce32"/>
          <table:table-cell table:style-name="ce32" table:formula="of:=IF([.$H383]=&quot;&quot;;&quot;&quot;;IF([.$G382]=&quot;&quot;;1;[.$G38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3]&lt;&gt;&quot;&quot;;NETWORKDAYS([.$L383];[.$M38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83]=&quot;&quot;;[.$L383]&lt;&gt;&quot;&quot;;[.$L383]&lt;=[.$U$1]);AND([.$M383]&lt;&gt;&quot;&quot;;[.Q383]&lt;100;[.$M383]&lt;=[.$U$1]));&quot;遅延&quot;;&quot;&quot;)">
            <text:p/>
          </table:table-cell>
          <table:table-cell table:style-name="ce66"/>
          <table:table-cell table:style-name="ce66" table:formula="of:=SUM([.$V383:.$FM38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4]&lt;&gt;&quot;&quot;;[.$F384]=&quot;&quot;);&quot;E&quot;&amp;ROW();[.$B307])" office:value-type="string" office:string-value="E125" calcext:value-type="string">
            <text:p>E125</text:p>
          </table:table-cell>
          <table:table-cell table:style-name="ce13" table:formula="of:=IF(AND([.$D384]&lt;&gt;&quot;&quot;;[.$D384]&lt;&gt;&quot;○&quot;);MAX([.$C$3:.$C383])+1;[.$C383])" office:value-type="float" office:value="15" calcext:value-type="float">
            <text:p>15</text:p>
          </table:table-cell>
          <table:table-cell table:style-name="ce18"/>
          <table:table-cell table:style-name="ce30" table:formula="of:=IF(AND([.$F384]&lt;&gt;&quot;&quot;;[.$D383]&lt;&gt;&quot;&quot;);1;IF([.$F384]&lt;&gt;&quot;&quot;;MAX(INDIRECT([.$B384]):[.$E383])+1;&quot;&quot;))">
            <text:p/>
          </table:table-cell>
          <table:table-cell table:style-name="ce18"/>
          <table:table-cell table:style-name="ce30" table:formula="of:=IF([.$H384]=&quot;&quot;;&quot;&quot;;IF([.$G383]=&quot;&quot;;1;[.$G383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84]&lt;&gt;&quot;&quot;;NETWORKDAYS([.$L384];[.$M384];[$休日.$B$4:.$B$304]);&quot;&quot;)">
            <text:p/>
          </table:table-cell>
          <table:table-cell table:style-name="ce47"/>
          <table:table-cell table:style-name="ce18" table:formula="of:=IF(OR(AND([.$N384]=&quot;&quot;;[.$L384]&lt;&gt;&quot;&quot;;[.$L384]&lt;=[.$U$1]);AND([.$M384]&lt;&gt;&quot;&quot;;[.Q384]&lt;100;[.$M384]&lt;=[.$U$1]));&quot;遅延&quot;;&quot;&quot;)">
            <text:p/>
          </table:table-cell>
          <table:table-cell table:style-name="ce18"/>
          <table:table-cell table:style-name="ce18" table:formula="of:=SUM([.$V384:.$FM384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5]&lt;&gt;&quot;&quot;;[.$F385]=&quot;&quot;);&quot;E&quot;&amp;ROW();[.$B308])" office:value-type="string" office:string-value="E125" calcext:value-type="string">
            <text:p>E125</text:p>
          </table:table-cell>
          <table:table-cell table:style-name="ce13" table:formula="of:=IF(AND([.$D385]&lt;&gt;&quot;&quot;;[.$D385]&lt;&gt;&quot;○&quot;);MAX([.$C$3:.$C384])+1;[.$C384])" office:value-type="float" office:value="15" calcext:value-type="float">
            <text:p>15</text:p>
          </table:table-cell>
          <table:table-cell table:style-name="ce19"/>
          <table:table-cell table:style-name="ce27" table:formula="of:=IF(AND([.$F385]&lt;&gt;&quot;&quot;;[.$D384]&lt;&gt;&quot;&quot;);1;IF([.$F385]&lt;&gt;&quot;&quot;;MAX(INDIRECT([.$B385]):[.$E384])+1;&quot;&quot;))">
            <text:p/>
          </table:table-cell>
          <table:table-cell table:style-name="ce32"/>
          <table:table-cell table:style-name="ce32" table:formula="of:=IF([.$H385]=&quot;&quot;;&quot;&quot;;IF([.$G384]=&quot;&quot;;1;[.$G38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5]&lt;&gt;&quot;&quot;;NETWORKDAYS([.$L385];[.$M38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85]=&quot;&quot;;[.$L385]&lt;&gt;&quot;&quot;;[.$L385]&lt;=[.$U$1]);AND([.$M385]&lt;&gt;&quot;&quot;;[.Q385]&lt;100;[.$M385]&lt;=[.$U$1]));&quot;遅延&quot;;&quot;&quot;)">
            <text:p/>
          </table:table-cell>
          <table:table-cell table:style-name="ce66"/>
          <table:table-cell table:style-name="ce66" table:formula="of:=SUM([.$V385:.$FM38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6]&lt;&gt;&quot;&quot;;[.$F386]=&quot;&quot;);&quot;E&quot;&amp;ROW();[.$B309])" office:value-type="string" office:string-value="E125" calcext:value-type="string">
            <text:p>E125</text:p>
          </table:table-cell>
          <table:table-cell table:style-name="ce13" table:formula="of:=IF(AND([.$D386]&lt;&gt;&quot;&quot;;[.$D386]&lt;&gt;&quot;○&quot;);MAX([.$C$3:.$C385])+1;[.$C385])" office:value-type="float" office:value="15" calcext:value-type="float">
            <text:p>15</text:p>
          </table:table-cell>
          <table:table-cell table:style-name="ce19"/>
          <table:table-cell table:style-name="ce27" table:formula="of:=IF(AND([.$F386]&lt;&gt;&quot;&quot;;[.$D385]&lt;&gt;&quot;&quot;);1;IF([.$F386]&lt;&gt;&quot;&quot;;MAX(INDIRECT([.$B386]):[.$E385])+1;&quot;&quot;))">
            <text:p/>
          </table:table-cell>
          <table:table-cell table:style-name="ce32"/>
          <table:table-cell table:style-name="ce32" table:formula="of:=IF([.$H386]=&quot;&quot;;&quot;&quot;;IF([.$G385]=&quot;&quot;;1;[.$G38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6]&lt;&gt;&quot;&quot;;NETWORKDAYS([.$L386];[.$M38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86]=&quot;&quot;;[.$L386]&lt;&gt;&quot;&quot;;[.$L386]&lt;=[.$U$1]);AND([.$M386]&lt;&gt;&quot;&quot;;[.Q386]&lt;100;[.$M386]&lt;=[.$U$1]));&quot;遅延&quot;;&quot;&quot;)">
            <text:p/>
          </table:table-cell>
          <table:table-cell table:style-name="ce66"/>
          <table:table-cell table:style-name="ce66" table:formula="of:=SUM([.$V386:.$FM38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7]&lt;&gt;&quot;&quot;;[.$F387]=&quot;&quot;);&quot;E&quot;&amp;ROW();[.$B310])" office:value-type="string" office:string-value="E125" calcext:value-type="string">
            <text:p>E125</text:p>
          </table:table-cell>
          <table:table-cell table:style-name="ce13" table:formula="of:=IF(AND([.$D387]&lt;&gt;&quot;&quot;;[.$D387]&lt;&gt;&quot;○&quot;);MAX([.$C$3:.$C386])+1;[.$C386])" office:value-type="float" office:value="15" calcext:value-type="float">
            <text:p>15</text:p>
          </table:table-cell>
          <table:table-cell table:style-name="ce19"/>
          <table:table-cell table:style-name="ce27" table:formula="of:=IF(AND([.$F387]&lt;&gt;&quot;&quot;;[.$D386]&lt;&gt;&quot;&quot;);1;IF([.$F387]&lt;&gt;&quot;&quot;;MAX(INDIRECT([.$B387]):[.$E386])+1;&quot;&quot;))">
            <text:p/>
          </table:table-cell>
          <table:table-cell table:style-name="ce32"/>
          <table:table-cell table:style-name="ce32" table:formula="of:=IF([.$H387]=&quot;&quot;;&quot;&quot;;IF([.$G386]=&quot;&quot;;1;[.$G38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7]&lt;&gt;&quot;&quot;;NETWORKDAYS([.$L387];[.$M38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87]=&quot;&quot;;[.$L387]&lt;&gt;&quot;&quot;;[.$L387]&lt;=[.$U$1]);AND([.$M387]&lt;&gt;&quot;&quot;;[.Q387]&lt;100;[.$M387]&lt;=[.$U$1]));&quot;遅延&quot;;&quot;&quot;)">
            <text:p/>
          </table:table-cell>
          <table:table-cell table:style-name="ce66"/>
          <table:table-cell table:style-name="ce66" table:formula="of:=SUM([.$V387:.$FM38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8]&lt;&gt;&quot;&quot;;[.$F388]=&quot;&quot;);&quot;E&quot;&amp;ROW();[.$B311])" office:value-type="string" office:string-value="E125" calcext:value-type="string">
            <text:p>E125</text:p>
          </table:table-cell>
          <table:table-cell table:style-name="ce13" table:formula="of:=IF(AND([.$D388]&lt;&gt;&quot;&quot;;[.$D388]&lt;&gt;&quot;○&quot;);MAX([.$C$3:.$C387])+1;[.$C387])" office:value-type="float" office:value="15" calcext:value-type="float">
            <text:p>15</text:p>
          </table:table-cell>
          <table:table-cell table:style-name="ce18"/>
          <table:table-cell table:style-name="ce30" table:formula="of:=IF(AND([.$F388]&lt;&gt;&quot;&quot;;[.$D387]&lt;&gt;&quot;&quot;);1;IF([.$F388]&lt;&gt;&quot;&quot;;MAX(INDIRECT([.$B388]):[.$E387])+1;&quot;&quot;))">
            <text:p/>
          </table:table-cell>
          <table:table-cell table:style-name="ce18"/>
          <table:table-cell table:style-name="ce30" table:formula="of:=IF([.$H388]=&quot;&quot;;&quot;&quot;;IF([.$G387]=&quot;&quot;;1;[.$G387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88]&lt;&gt;&quot;&quot;;NETWORKDAYS([.$L388];[.$M388];[$休日.$B$4:.$B$304]);&quot;&quot;)">
            <text:p/>
          </table:table-cell>
          <table:table-cell table:style-name="ce47"/>
          <table:table-cell table:style-name="ce18" table:formula="of:=IF(OR(AND([.$N388]=&quot;&quot;;[.$L388]&lt;&gt;&quot;&quot;;[.$L388]&lt;=[.$U$1]);AND([.$M388]&lt;&gt;&quot;&quot;;[.Q388]&lt;100;[.$M388]&lt;=[.$U$1]));&quot;遅延&quot;;&quot;&quot;)">
            <text:p/>
          </table:table-cell>
          <table:table-cell table:style-name="ce18"/>
          <table:table-cell table:style-name="ce18" table:formula="of:=SUM([.$V388:.$FM388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9]&lt;&gt;&quot;&quot;;[.$F389]=&quot;&quot;);&quot;E&quot;&amp;ROW();[.$B312])" office:value-type="string" office:string-value="E125" calcext:value-type="string">
            <text:p>E125</text:p>
          </table:table-cell>
          <table:table-cell table:style-name="ce13" table:formula="of:=IF(AND([.$D389]&lt;&gt;&quot;&quot;;[.$D389]&lt;&gt;&quot;○&quot;);MAX([.$C$3:.$C388])+1;[.$C388])" office:value-type="float" office:value="15" calcext:value-type="float">
            <text:p>15</text:p>
          </table:table-cell>
          <table:table-cell table:style-name="ce19"/>
          <table:table-cell table:style-name="ce27" table:formula="of:=IF(AND([.$F389]&lt;&gt;&quot;&quot;;[.$D388]&lt;&gt;&quot;&quot;);1;IF([.$F389]&lt;&gt;&quot;&quot;;MAX(INDIRECT([.$B389]):[.$E388])+1;&quot;&quot;))">
            <text:p/>
          </table:table-cell>
          <table:table-cell table:style-name="ce32"/>
          <table:table-cell table:style-name="ce32" table:formula="of:=IF([.$H389]=&quot;&quot;;&quot;&quot;;IF([.$G388]=&quot;&quot;;1;[.$G38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9]&lt;&gt;&quot;&quot;;NETWORKDAYS([.$L389];[.$M38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89]=&quot;&quot;;[.$L389]&lt;&gt;&quot;&quot;;[.$L389]&lt;=[.$U$1]);AND([.$M389]&lt;&gt;&quot;&quot;;[.Q389]&lt;100;[.$M389]&lt;=[.$U$1]));&quot;遅延&quot;;&quot;&quot;)">
            <text:p/>
          </table:table-cell>
          <table:table-cell table:style-name="ce66"/>
          <table:table-cell table:style-name="ce66" table:formula="of:=SUM([.$V389:.$FM38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90]&lt;&gt;&quot;&quot;;[.$F390]=&quot;&quot;);&quot;E&quot;&amp;ROW();[.$B313])" office:value-type="string" office:string-value="E125" calcext:value-type="string">
            <text:p>E125</text:p>
          </table:table-cell>
          <table:table-cell table:style-name="ce13" table:formula="of:=IF(AND([.$D390]&lt;&gt;&quot;&quot;;[.$D390]&lt;&gt;&quot;○&quot;);MAX([.$C$3:.$C389])+1;[.$C389])" office:value-type="float" office:value="15" calcext:value-type="float">
            <text:p>15</text:p>
          </table:table-cell>
          <table:table-cell table:style-name="ce19"/>
          <table:table-cell table:style-name="ce27" table:formula="of:=IF(AND([.$F390]&lt;&gt;&quot;&quot;;[.$D389]&lt;&gt;&quot;&quot;);1;IF([.$F390]&lt;&gt;&quot;&quot;;MAX(INDIRECT([.$B390]):[.$E389])+1;&quot;&quot;))">
            <text:p/>
          </table:table-cell>
          <table:table-cell table:style-name="ce32"/>
          <table:table-cell table:style-name="ce32" table:formula="of:=IF([.$H390]=&quot;&quot;;&quot;&quot;;IF([.$G389]=&quot;&quot;;1;[.$G38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90]&lt;&gt;&quot;&quot;;NETWORKDAYS([.$L390];[.$M39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90]=&quot;&quot;;[.$L390]&lt;&gt;&quot;&quot;;[.$L390]&lt;=[.$U$1]);AND([.$M390]&lt;&gt;&quot;&quot;;[.Q390]&lt;100;[.$M390]&lt;=[.$U$1]));&quot;遅延&quot;;&quot;&quot;)">
            <text:p/>
          </table:table-cell>
          <table:table-cell table:style-name="ce66"/>
          <table:table-cell table:style-name="ce66" table:formula="of:=SUM([.$V390:.$FM39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91]&lt;&gt;&quot;&quot;;[.$F391]=&quot;&quot;);&quot;E&quot;&amp;ROW();[.$B314])" office:value-type="string" office:string-value="E125" calcext:value-type="string">
            <text:p>E125</text:p>
          </table:table-cell>
          <table:table-cell table:style-name="ce13" table:formula="of:=IF(AND([.$D391]&lt;&gt;&quot;&quot;;[.$D391]&lt;&gt;&quot;○&quot;);MAX([.$C$3:.$C390])+1;[.$C390])" office:value-type="float" office:value="15" calcext:value-type="float">
            <text:p>15</text:p>
          </table:table-cell>
          <table:table-cell table:style-name="ce19"/>
          <table:table-cell table:style-name="ce27" table:formula="of:=IF(AND([.$F391]&lt;&gt;&quot;&quot;;[.$D390]&lt;&gt;&quot;&quot;);1;IF([.$F391]&lt;&gt;&quot;&quot;;MAX(INDIRECT([.$B391]):[.$E390])+1;&quot;&quot;))">
            <text:p/>
          </table:table-cell>
          <table:table-cell table:style-name="ce32"/>
          <table:table-cell table:style-name="ce32" table:formula="of:=IF([.$H391]=&quot;&quot;;&quot;&quot;;IF([.$G390]=&quot;&quot;;1;[.$G39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91]&lt;&gt;&quot;&quot;;NETWORKDAYS([.$L391];[.$M39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91]=&quot;&quot;;[.$L391]&lt;&gt;&quot;&quot;;[.$L391]&lt;=[.$U$1]);AND([.$M391]&lt;&gt;&quot;&quot;;[.Q391]&lt;100;[.$M391]&lt;=[.$U$1]));&quot;遅延&quot;;&quot;&quot;)">
            <text:p/>
          </table:table-cell>
          <table:table-cell table:style-name="ce66"/>
          <table:table-cell table:style-name="ce66" table:formula="of:=SUM([.$V391:.$FM39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92]&lt;&gt;&quot;&quot;;[.$F392]=&quot;&quot;);&quot;E&quot;&amp;ROW();[.$B315])" office:value-type="string" office:string-value="E125" calcext:value-type="string">
            <text:p>E125</text:p>
          </table:table-cell>
          <table:table-cell table:style-name="ce13" table:formula="of:=IF(AND([.$D392]&lt;&gt;&quot;&quot;;[.$D392]&lt;&gt;&quot;○&quot;);MAX([.$C$3:.$C391])+1;[.$C391])" office:value-type="float" office:value="15" calcext:value-type="float">
            <text:p>15</text:p>
          </table:table-cell>
          <table:table-cell table:style-name="ce18"/>
          <table:table-cell table:style-name="ce30" table:formula="of:=IF(AND([.$F392]&lt;&gt;&quot;&quot;;[.$D391]&lt;&gt;&quot;&quot;);1;IF([.$F392]&lt;&gt;&quot;&quot;;MAX(INDIRECT([.$B392]):[.$E391])+1;&quot;&quot;))">
            <text:p/>
          </table:table-cell>
          <table:table-cell table:style-name="ce18"/>
          <table:table-cell table:style-name="ce30" table:formula="of:=IF([.$H392]=&quot;&quot;;&quot;&quot;;IF([.$G391]=&quot;&quot;;1;[.$G391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92]&lt;&gt;&quot;&quot;;NETWORKDAYS([.$L392];[.$M392];[$休日.$B$4:.$B$304]);&quot;&quot;)">
            <text:p/>
          </table:table-cell>
          <table:table-cell table:style-name="ce47"/>
          <table:table-cell table:style-name="ce18" table:formula="of:=IF(OR(AND([.$N392]=&quot;&quot;;[.$L392]&lt;&gt;&quot;&quot;;[.$L392]&lt;=[.$U$1]);AND([.$M392]&lt;&gt;&quot;&quot;;[.Q392]&lt;100;[.$M392]&lt;=[.$U$1]));&quot;遅延&quot;;&quot;&quot;)">
            <text:p/>
          </table:table-cell>
          <table:table-cell table:style-name="ce18"/>
          <table:table-cell table:style-name="ce18" table:formula="of:=SUM([.$V392:.$FM392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93]&lt;&gt;&quot;&quot;;[.$F393]=&quot;&quot;);&quot;E&quot;&amp;ROW();[.$B316])" office:value-type="string" office:string-value="" calcext:value-type="error">
            <text:p>#REF!</text:p>
          </table:table-cell>
          <table:table-cell table:style-name="ce13" table:formula="of:=IF(AND([.$D393]&lt;&gt;&quot;&quot;;[.$D393]&lt;&gt;&quot;○&quot;);MAX([.$C$3:.$C392])+1;[.$C392])" office:value-type="float" office:value="15" calcext:value-type="float">
            <text:p>15</text:p>
          </table:table-cell>
          <table:table-cell table:style-name="ce19"/>
          <table:table-cell table:style-name="ce27" table:formula="of:=IF(AND([.$F393]&lt;&gt;&quot;&quot;;[.$D392]&lt;&gt;&quot;&quot;);1;IF([.$F393]&lt;&gt;&quot;&quot;;MAX(INDIRECT([.$B393]):[.$E392])+1;&quot;&quot;))">
            <text:p/>
          </table:table-cell>
          <table:table-cell table:style-name="ce32"/>
          <table:table-cell table:style-name="ce32" table:formula="of:=IF([.$H393]=&quot;&quot;;&quot;&quot;;IF([.$G392]=&quot;&quot;;1;[.$G39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93]&lt;&gt;&quot;&quot;;NETWORKDAYS([.$L393];[.$M39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93]=&quot;&quot;;[.$L393]&lt;&gt;&quot;&quot;;[.$L393]&lt;=[.$U$1]);AND([.$M393]&lt;&gt;&quot;&quot;;[.Q393]&lt;100;[.$M393]&lt;=[.$U$1]));&quot;遅延&quot;;&quot;&quot;)">
            <text:p/>
          </table:table-cell>
          <table:table-cell table:style-name="ce66"/>
          <table:table-cell table:style-name="ce66" table:formula="of:=SUM([.$V393:.$FM39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94]&lt;&gt;&quot;&quot;;[.$F394]=&quot;&quot;);&quot;E&quot;&amp;ROW();[.$B317])" office:value-type="string" office:string-value="" calcext:value-type="error">
            <text:p>#REF!</text:p>
          </table:table-cell>
          <table:table-cell table:style-name="ce13" table:formula="of:=IF(AND([.$D394]&lt;&gt;&quot;&quot;;[.$D394]&lt;&gt;&quot;○&quot;);MAX([.$C$3:.$C393])+1;[.$C393])" office:value-type="float" office:value="15" calcext:value-type="float">
            <text:p>15</text:p>
          </table:table-cell>
          <table:table-cell table:style-name="ce19"/>
          <table:table-cell table:style-name="ce27" table:formula="of:=IF(AND([.$F394]&lt;&gt;&quot;&quot;;[.$D393]&lt;&gt;&quot;&quot;);1;IF([.$F394]&lt;&gt;&quot;&quot;;MAX(INDIRECT([.$B394]):[.$E393])+1;&quot;&quot;))">
            <text:p/>
          </table:table-cell>
          <table:table-cell table:style-name="ce32"/>
          <table:table-cell table:style-name="ce32" table:formula="of:=IF([.$H394]=&quot;&quot;;&quot;&quot;;IF([.$G393]=&quot;&quot;;1;[.$G39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94]&lt;&gt;&quot;&quot;;NETWORKDAYS([.$L394];[.$M39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94]=&quot;&quot;;[.$L394]&lt;&gt;&quot;&quot;;[.$L394]&lt;=[.$U$1]);AND([.$M394]&lt;&gt;&quot;&quot;;[.Q394]&lt;100;[.$M394]&lt;=[.$U$1]));&quot;遅延&quot;;&quot;&quot;)">
            <text:p/>
          </table:table-cell>
          <table:table-cell table:style-name="ce66"/>
          <table:table-cell table:style-name="ce66" table:formula="of:=SUM([.$V394:.$FM39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95]&lt;&gt;&quot;&quot;;[.$F395]=&quot;&quot;);&quot;E&quot;&amp;ROW();[.$B318])" office:value-type="string" office:string-value="" calcext:value-type="error">
            <text:p>#REF!</text:p>
          </table:table-cell>
          <table:table-cell table:style-name="ce13" table:formula="of:=IF(AND([.$D395]&lt;&gt;&quot;&quot;;[.$D395]&lt;&gt;&quot;○&quot;);MAX([.$C$3:.$C394])+1;[.$C394])" office:value-type="float" office:value="15" calcext:value-type="float">
            <text:p>15</text:p>
          </table:table-cell>
          <table:table-cell table:style-name="ce19"/>
          <table:table-cell table:style-name="ce27" table:formula="of:=IF(AND([.$F395]&lt;&gt;&quot;&quot;;[.$D394]&lt;&gt;&quot;&quot;);1;IF([.$F395]&lt;&gt;&quot;&quot;;MAX(INDIRECT([.$B395]):[.$E394])+1;&quot;&quot;))">
            <text:p/>
          </table:table-cell>
          <table:table-cell table:style-name="ce32"/>
          <table:table-cell table:style-name="ce32" table:formula="of:=IF([.$H395]=&quot;&quot;;&quot;&quot;;IF([.$G394]=&quot;&quot;;1;[.$G39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95]&lt;&gt;&quot;&quot;;NETWORKDAYS([.$L395];[.$M39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95]=&quot;&quot;;[.$L395]&lt;&gt;&quot;&quot;;[.$L395]&lt;=[.$U$1]);AND([.$M395]&lt;&gt;&quot;&quot;;[.Q395]&lt;100;[.$M395]&lt;=[.$U$1]));&quot;遅延&quot;;&quot;&quot;)">
            <text:p/>
          </table:table-cell>
          <table:table-cell table:style-name="ce66"/>
          <table:table-cell table:style-name="ce66" table:formula="of:=SUM([.$V395:.$FM39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96]&lt;&gt;&quot;&quot;;[.$F396]=&quot;&quot;);&quot;E&quot;&amp;ROW();[.$B319])" office:value-type="string" office:string-value="" calcext:value-type="error">
            <text:p>#REF!</text:p>
          </table:table-cell>
          <table:table-cell table:style-name="ce13" table:formula="of:=IF(AND([.$D396]&lt;&gt;&quot;&quot;;[.$D396]&lt;&gt;&quot;○&quot;);MAX([.$C$3:.$C395])+1;[.$C395])" office:value-type="float" office:value="15" calcext:value-type="float">
            <text:p>15</text:p>
          </table:table-cell>
          <table:table-cell table:style-name="ce19"/>
          <table:table-cell table:style-name="ce27" table:formula="of:=IF(AND([.$F396]&lt;&gt;&quot;&quot;;[.$D395]&lt;&gt;&quot;&quot;);1;IF([.$F396]&lt;&gt;&quot;&quot;;MAX(INDIRECT([.$B396]):[.$E395])+1;&quot;&quot;))">
            <text:p/>
          </table:table-cell>
          <table:table-cell table:style-name="ce32"/>
          <table:table-cell table:style-name="ce32" table:formula="of:=IF([.$H396]=&quot;&quot;;&quot;&quot;;IF([.$G395]=&quot;&quot;;1;[.$G39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96]&lt;&gt;&quot;&quot;;NETWORKDAYS([.$L396];[.$M39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96]=&quot;&quot;;[.$L396]&lt;&gt;&quot;&quot;;[.$L396]&lt;=[.$U$1]);AND([.$M396]&lt;&gt;&quot;&quot;;[.Q396]&lt;100;[.$M396]&lt;=[.$U$1]));&quot;遅延&quot;;&quot;&quot;)">
            <text:p/>
          </table:table-cell>
          <table:table-cell table:style-name="ce66"/>
          <table:table-cell table:style-name="ce66" table:formula="of:=SUM([.$V396:.$FM39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97]&lt;&gt;&quot;&quot;;[.$F397]=&quot;&quot;);&quot;E&quot;&amp;ROW();[.$B320])" office:value-type="string" office:string-value="" calcext:value-type="error">
            <text:p>#REF!</text:p>
          </table:table-cell>
          <table:table-cell table:style-name="ce13" table:formula="of:=IF(AND([.$D397]&lt;&gt;&quot;&quot;;[.$D397]&lt;&gt;&quot;○&quot;);MAX([.$C$3:.$C396])+1;[.$C396])" office:value-type="float" office:value="15" calcext:value-type="float">
            <text:p>15</text:p>
          </table:table-cell>
          <table:table-cell table:style-name="ce19"/>
          <table:table-cell table:style-name="ce27" table:formula="of:=IF(AND([.$F397]&lt;&gt;&quot;&quot;;[.$D396]&lt;&gt;&quot;&quot;);1;IF([.$F397]&lt;&gt;&quot;&quot;;MAX(INDIRECT([.$B397]):[.$E396])+1;&quot;&quot;))">
            <text:p/>
          </table:table-cell>
          <table:table-cell table:style-name="ce32"/>
          <table:table-cell table:style-name="ce32" table:formula="of:=IF([.$H397]=&quot;&quot;;&quot;&quot;;IF([.$G396]=&quot;&quot;;1;[.$G39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97]&lt;&gt;&quot;&quot;;NETWORKDAYS([.$L397];[.$M39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97]=&quot;&quot;;[.$L397]&lt;&gt;&quot;&quot;;[.$L397]&lt;=[.$U$1]);AND([.$M397]&lt;&gt;&quot;&quot;;[.Q397]&lt;100;[.$M397]&lt;=[.$U$1]));&quot;遅延&quot;;&quot;&quot;)">
            <text:p/>
          </table:table-cell>
          <table:table-cell table:style-name="ce66"/>
          <table:table-cell table:style-name="ce66" table:formula="of:=SUM([.$V397:.$FM39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98]&lt;&gt;&quot;&quot;;[.$F398]=&quot;&quot;);&quot;E&quot;&amp;ROW();[.$B321])" office:value-type="string" office:string-value="" calcext:value-type="error">
            <text:p>#REF!</text:p>
          </table:table-cell>
          <table:table-cell table:style-name="ce13" table:formula="of:=IF(AND([.$D398]&lt;&gt;&quot;&quot;;[.$D398]&lt;&gt;&quot;○&quot;);MAX([.$C$3:.$C397])+1;[.$C397])" office:value-type="float" office:value="15" calcext:value-type="float">
            <text:p>15</text:p>
          </table:table-cell>
          <table:table-cell table:style-name="ce19"/>
          <table:table-cell table:style-name="ce27" table:formula="of:=IF(AND([.$F398]&lt;&gt;&quot;&quot;;[.$D397]&lt;&gt;&quot;&quot;);1;IF([.$F398]&lt;&gt;&quot;&quot;;MAX(INDIRECT([.$B398]):[.$E397])+1;&quot;&quot;))">
            <text:p/>
          </table:table-cell>
          <table:table-cell table:style-name="ce32"/>
          <table:table-cell table:style-name="ce32" table:formula="of:=IF([.$H398]=&quot;&quot;;&quot;&quot;;IF([.$G397]=&quot;&quot;;1;[.$G39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98]&lt;&gt;&quot;&quot;;NETWORKDAYS([.$L398];[.$M39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98]=&quot;&quot;;[.$L398]&lt;&gt;&quot;&quot;;[.$L398]&lt;=[.$U$1]);AND([.$M398]&lt;&gt;&quot;&quot;;[.Q398]&lt;100;[.$M398]&lt;=[.$U$1]));&quot;遅延&quot;;&quot;&quot;)">
            <text:p/>
          </table:table-cell>
          <table:table-cell table:style-name="ce66"/>
          <table:table-cell table:style-name="ce66" table:formula="of:=SUM([.$V398:.$FM39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99]&lt;&gt;&quot;&quot;;[.$F399]=&quot;&quot;);&quot;E&quot;&amp;ROW();[.$B322])" office:value-type="string" office:string-value="" calcext:value-type="error">
            <text:p>#REF!</text:p>
          </table:table-cell>
          <table:table-cell table:style-name="ce13" table:formula="of:=IF(AND([.$D399]&lt;&gt;&quot;&quot;;[.$D399]&lt;&gt;&quot;○&quot;);MAX([.$C$3:.$C398])+1;[.$C398])" office:value-type="float" office:value="15" calcext:value-type="float">
            <text:p>15</text:p>
          </table:table-cell>
          <table:table-cell table:style-name="ce19"/>
          <table:table-cell table:style-name="ce27" table:formula="of:=IF(AND([.$F399]&lt;&gt;&quot;&quot;;[.$D398]&lt;&gt;&quot;&quot;);1;IF([.$F399]&lt;&gt;&quot;&quot;;MAX(INDIRECT([.$B399]):[.$E398])+1;&quot;&quot;))">
            <text:p/>
          </table:table-cell>
          <table:table-cell table:style-name="ce32"/>
          <table:table-cell table:style-name="ce32" table:formula="of:=IF([.$H399]=&quot;&quot;;&quot;&quot;;IF([.$G398]=&quot;&quot;;1;[.$G39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99]&lt;&gt;&quot;&quot;;NETWORKDAYS([.$L399];[.$M39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99]=&quot;&quot;;[.$L399]&lt;&gt;&quot;&quot;;[.$L399]&lt;=[.$U$1]);AND([.$M399]&lt;&gt;&quot;&quot;;[.Q399]&lt;100;[.$M399]&lt;=[.$U$1]));&quot;遅延&quot;;&quot;&quot;)">
            <text:p/>
          </table:table-cell>
          <table:table-cell table:style-name="ce66"/>
          <table:table-cell table:style-name="ce66" table:formula="of:=SUM([.$V399:.$FM39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00]&lt;&gt;&quot;&quot;;[.$F400]=&quot;&quot;);&quot;E&quot;&amp;ROW();[.$B323])" office:value-type="string" office:string-value="" calcext:value-type="error">
            <text:p>#REF!</text:p>
          </table:table-cell>
          <table:table-cell table:style-name="ce13" table:formula="of:=IF(AND([.$D400]&lt;&gt;&quot;&quot;;[.$D400]&lt;&gt;&quot;○&quot;);MAX([.$C$3:.$C399])+1;[.$C399])" office:value-type="float" office:value="15" calcext:value-type="float">
            <text:p>15</text:p>
          </table:table-cell>
          <table:table-cell table:style-name="ce19"/>
          <table:table-cell table:style-name="ce27" table:formula="of:=IF(AND([.$F400]&lt;&gt;&quot;&quot;;[.$D399]&lt;&gt;&quot;&quot;);1;IF([.$F400]&lt;&gt;&quot;&quot;;MAX(INDIRECT([.$B400]):[.$E399])+1;&quot;&quot;))">
            <text:p/>
          </table:table-cell>
          <table:table-cell table:style-name="ce32"/>
          <table:table-cell table:style-name="ce32" table:formula="of:=IF([.$H400]=&quot;&quot;;&quot;&quot;;IF([.$G399]=&quot;&quot;;1;[.$G39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400]&lt;&gt;&quot;&quot;;NETWORKDAYS([.$L400];[.$M40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400]=&quot;&quot;;[.$L400]&lt;&gt;&quot;&quot;;[.$L400]&lt;=[.$U$1]);AND([.$M400]&lt;&gt;&quot;&quot;;[.Q400]&lt;100;[.$M400]&lt;=[.$U$1]));&quot;遅延&quot;;&quot;&quot;)">
            <text:p/>
          </table:table-cell>
          <table:table-cell table:style-name="ce66"/>
          <table:table-cell table:style-name="ce66" table:formula="of:=SUM([.$V400:.$FM40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01]&lt;&gt;&quot;&quot;;[.$F401]=&quot;&quot;);&quot;E&quot;&amp;ROW();[.$B324])" office:value-type="string" office:string-value="" calcext:value-type="error">
            <text:p>#REF!</text:p>
          </table:table-cell>
          <table:table-cell table:style-name="ce13" table:formula="of:=IF(AND([.$D401]&lt;&gt;&quot;&quot;;[.$D401]&lt;&gt;&quot;○&quot;);MAX([.$C$3:.$C400])+1;[.$C400])" office:value-type="float" office:value="15" calcext:value-type="float">
            <text:p>15</text:p>
          </table:table-cell>
          <table:table-cell table:style-name="ce19"/>
          <table:table-cell table:style-name="ce27" table:formula="of:=IF(AND([.$F401]&lt;&gt;&quot;&quot;;[.$D400]&lt;&gt;&quot;&quot;);1;IF([.$F401]&lt;&gt;&quot;&quot;;MAX(INDIRECT([.$B401]):[.$E400])+1;&quot;&quot;))">
            <text:p/>
          </table:table-cell>
          <table:table-cell table:style-name="ce32"/>
          <table:table-cell table:style-name="ce32" table:formula="of:=IF([.$H401]=&quot;&quot;;&quot;&quot;;IF([.$G400]=&quot;&quot;;1;[.$G40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401]&lt;&gt;&quot;&quot;;NETWORKDAYS([.$L401];[.$M40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401]=&quot;&quot;;[.$L401]&lt;&gt;&quot;&quot;;[.$L401]&lt;=[.$U$1]);AND([.$M401]&lt;&gt;&quot;&quot;;[.Q401]&lt;100;[.$M401]&lt;=[.$U$1]));&quot;遅延&quot;;&quot;&quot;)">
            <text:p/>
          </table:table-cell>
          <table:table-cell table:style-name="ce66"/>
          <table:table-cell table:style-name="ce66" table:formula="of:=SUM([.$V401:.$FM40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02]&lt;&gt;&quot;&quot;;[.$F402]=&quot;&quot;);&quot;E&quot;&amp;ROW();[.$B325])" office:value-type="string" office:string-value="" calcext:value-type="error">
            <text:p>#REF!</text:p>
          </table:table-cell>
          <table:table-cell table:style-name="ce13" table:formula="of:=IF(AND([.$D402]&lt;&gt;&quot;&quot;;[.$D402]&lt;&gt;&quot;○&quot;);MAX([.$C$3:.$C401])+1;[.$C401])" office:value-type="float" office:value="15" calcext:value-type="float">
            <text:p>15</text:p>
          </table:table-cell>
          <table:table-cell table:style-name="ce19"/>
          <table:table-cell table:style-name="ce27" table:formula="of:=IF(AND([.$F402]&lt;&gt;&quot;&quot;;[.$D401]&lt;&gt;&quot;&quot;);1;IF([.$F402]&lt;&gt;&quot;&quot;;MAX(INDIRECT([.$B402]):[.$E401])+1;&quot;&quot;))">
            <text:p/>
          </table:table-cell>
          <table:table-cell table:style-name="ce32"/>
          <table:table-cell table:style-name="ce32" table:formula="of:=IF([.$H402]=&quot;&quot;;&quot;&quot;;IF([.$G401]=&quot;&quot;;1;[.$G40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402]&lt;&gt;&quot;&quot;;NETWORKDAYS([.$L402];[.$M40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402]=&quot;&quot;;[.$L402]&lt;&gt;&quot;&quot;;[.$L402]&lt;=[.$U$1]);AND([.$M402]&lt;&gt;&quot;&quot;;[.Q402]&lt;100;[.$M402]&lt;=[.$U$1]));&quot;遅延&quot;;&quot;&quot;)">
            <text:p/>
          </table:table-cell>
          <table:table-cell table:style-name="ce66"/>
          <table:table-cell table:style-name="ce66" table:formula="of:=SUM([.$V402:.$FM40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03]&lt;&gt;&quot;&quot;;[.$F403]=&quot;&quot;);&quot;E&quot;&amp;ROW();[.$B326])" office:value-type="string" office:string-value="" calcext:value-type="error">
            <text:p>#REF!</text:p>
          </table:table-cell>
          <table:table-cell table:style-name="ce13" table:formula="of:=IF(AND([.$D403]&lt;&gt;&quot;&quot;;[.$D403]&lt;&gt;&quot;○&quot;);MAX([.$C$3:.$C402])+1;[.$C402])" office:value-type="float" office:value="15" calcext:value-type="float">
            <text:p>15</text:p>
          </table:table-cell>
          <table:table-cell table:style-name="ce19"/>
          <table:table-cell table:style-name="ce27" table:formula="of:=IF(AND([.$F403]&lt;&gt;&quot;&quot;;[.$D402]&lt;&gt;&quot;&quot;);1;IF([.$F403]&lt;&gt;&quot;&quot;;MAX(INDIRECT([.$B403]):[.$E402])+1;&quot;&quot;))">
            <text:p/>
          </table:table-cell>
          <table:table-cell table:style-name="ce32"/>
          <table:table-cell table:style-name="ce32" table:formula="of:=IF([.$H403]=&quot;&quot;;&quot;&quot;;IF([.$G402]=&quot;&quot;;1;[.$G40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403]&lt;&gt;&quot;&quot;;NETWORKDAYS([.$L403];[.$M40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403]=&quot;&quot;;[.$L403]&lt;&gt;&quot;&quot;;[.$L403]&lt;=[.$U$1]);AND([.$M403]&lt;&gt;&quot;&quot;;[.Q403]&lt;100;[.$M403]&lt;=[.$U$1]));&quot;遅延&quot;;&quot;&quot;)">
            <text:p/>
          </table:table-cell>
          <table:table-cell table:style-name="ce66"/>
          <table:table-cell table:style-name="ce66" table:formula="of:=SUM([.$V403:.$FM40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04]&lt;&gt;&quot;&quot;;[.$F404]=&quot;&quot;);&quot;E&quot;&amp;ROW();[.$B327])" office:value-type="string" office:string-value="" calcext:value-type="error">
            <text:p>#REF!</text:p>
          </table:table-cell>
          <table:table-cell table:style-name="ce13" table:formula="of:=IF(AND([.$D404]&lt;&gt;&quot;&quot;;[.$D404]&lt;&gt;&quot;○&quot;);MAX([.$C$3:.$C403])+1;[.$C403])" office:value-type="float" office:value="15" calcext:value-type="float">
            <text:p>15</text:p>
          </table:table-cell>
          <table:table-cell table:style-name="ce19"/>
          <table:table-cell table:style-name="ce27" table:formula="of:=IF(AND([.$F404]&lt;&gt;&quot;&quot;;[.$D403]&lt;&gt;&quot;&quot;);1;IF([.$F404]&lt;&gt;&quot;&quot;;MAX(INDIRECT([.$B404]):[.$E403])+1;&quot;&quot;))">
            <text:p/>
          </table:table-cell>
          <table:table-cell table:style-name="ce32"/>
          <table:table-cell table:style-name="ce32" table:formula="of:=IF([.$H404]=&quot;&quot;;&quot;&quot;;IF([.$G403]=&quot;&quot;;1;[.$G40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404]&lt;&gt;&quot;&quot;;NETWORKDAYS([.$L404];[.$M40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404]=&quot;&quot;;[.$L404]&lt;&gt;&quot;&quot;;[.$L404]&lt;=[.$U$1]);AND([.$M404]&lt;&gt;&quot;&quot;;[.Q404]&lt;100;[.$M404]&lt;=[.$U$1]));&quot;遅延&quot;;&quot;&quot;)">
            <text:p/>
          </table:table-cell>
          <table:table-cell table:style-name="ce66"/>
          <table:table-cell table:style-name="ce66" table:formula="of:=SUM([.$V404:.$FM40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05]&lt;&gt;&quot;&quot;;[.$F405]=&quot;&quot;);&quot;E&quot;&amp;ROW();[.$B328])" office:value-type="string" office:string-value="" calcext:value-type="error">
            <text:p>#REF!</text:p>
          </table:table-cell>
          <table:table-cell table:style-name="ce13" table:formula="of:=IF(AND([.$D405]&lt;&gt;&quot;&quot;;[.$D405]&lt;&gt;&quot;○&quot;);MAX([.$C$3:.$C404])+1;[.$C404])" office:value-type="float" office:value="15" calcext:value-type="float">
            <text:p>15</text:p>
          </table:table-cell>
          <table:table-cell table:style-name="ce19"/>
          <table:table-cell table:style-name="ce27" table:formula="of:=IF(AND([.$F405]&lt;&gt;&quot;&quot;;[.$D404]&lt;&gt;&quot;&quot;);1;IF([.$F405]&lt;&gt;&quot;&quot;;MAX(INDIRECT([.$B405]):[.$E404])+1;&quot;&quot;))">
            <text:p/>
          </table:table-cell>
          <table:table-cell table:style-name="ce32"/>
          <table:table-cell table:style-name="ce32" table:formula="of:=IF([.$H405]=&quot;&quot;;&quot;&quot;;IF([.$G404]=&quot;&quot;;1;[.$G40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405]&lt;&gt;&quot;&quot;;NETWORKDAYS([.$L405];[.$M40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405]=&quot;&quot;;[.$L405]&lt;&gt;&quot;&quot;;[.$L405]&lt;=[.$U$1]);AND([.$M405]&lt;&gt;&quot;&quot;;[.Q405]&lt;100;[.$M405]&lt;=[.$U$1]));&quot;遅延&quot;;&quot;&quot;)">
            <text:p/>
          </table:table-cell>
          <table:table-cell table:style-name="ce66"/>
          <table:table-cell table:style-name="ce66" table:formula="of:=SUM([.$V405:.$FM40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06]&lt;&gt;&quot;&quot;;[.$F406]=&quot;&quot;);&quot;E&quot;&amp;ROW();[.$B329])" office:value-type="string" office:string-value="E229" calcext:value-type="string">
            <text:p>E229</text:p>
          </table:table-cell>
          <table:table-cell table:style-name="ce13" table:formula="of:=IF(AND([.$D406]&lt;&gt;&quot;&quot;;[.$D406]&lt;&gt;&quot;○&quot;);MAX([.$C$3:.$C405])+1;[.$C405])" office:value-type="float" office:value="15" calcext:value-type="float">
            <text:p>15</text:p>
          </table:table-cell>
          <table:table-cell table:style-name="ce19"/>
          <table:table-cell table:style-name="ce27" table:formula="of:=IF(AND([.$F406]&lt;&gt;&quot;&quot;;[.$D405]&lt;&gt;&quot;&quot;);1;IF([.$F406]&lt;&gt;&quot;&quot;;MAX(INDIRECT([.$B406]):[.$E405])+1;&quot;&quot;))">
            <text:p/>
          </table:table-cell>
          <table:table-cell table:style-name="ce32"/>
          <table:table-cell table:style-name="ce32" table:formula="of:=IF([.$H406]=&quot;&quot;;&quot;&quot;;IF([.$G405]=&quot;&quot;;1;[.$G40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406]&lt;&gt;&quot;&quot;;NETWORKDAYS([.$L406];[.$M40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406]=&quot;&quot;;[.$L406]&lt;&gt;&quot;&quot;;[.$L406]&lt;=[.$U$1]);AND([.$M406]&lt;&gt;&quot;&quot;;[.Q406]&lt;100;[.$M406]&lt;=[.$U$1]));&quot;遅延&quot;;&quot;&quot;)">
            <text:p/>
          </table:table-cell>
          <table:table-cell table:style-name="ce66"/>
          <table:table-cell table:style-name="ce66" table:formula="of:=SUM([.$V406:.$FM40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5"/>
          <table:table-cell table:style-name="ce23" office:value-type="string" calcext:value-type="string">
            <text:p>作業時間（h）</text:p>
          </table:table-cell>
          <table:table-cell table:style-name="ce31" table:number-columns-repeated="7"/>
          <table:table-cell table:style-name="ce42" table:number-columns-repeated="4"/>
          <table:table-cell table:style-name="ce31"/>
          <table:table-cell table:style-name="ce60"/>
          <table:table-cell table:style-name="ce31" table:formula="of:=IF(OR(AND([.$N407]=&quot;&quot;;[.$L407]&lt;&gt;&quot;&quot;;[.$L407]&lt;=[.$U$1]);AND([.$M407]&lt;&gt;&quot;&quot;;[.Q407]&lt;100;[.$M407]&lt;=[.$U$1]));&quot;遅延&quot;;&quot;&quot;)">
            <text:p/>
          </table:table-cell>
          <table:table-cell table:style-name="ce31" table:number-columns-repeated="2"/>
          <table:table-cell table:style-name="ce74"/>
          <table:table-cell table:style-name="ce89" table:number-columns-repeated="3"/>
          <table:table-cell table:style-name="ce113" table:number-columns-repeated="2"/>
          <table:table-cell table:style-name="ce89" table:number-columns-repeated="5"/>
          <table:table-cell table:style-name="ce113" table:number-columns-repeated="2"/>
          <table:table-cell table:style-name="ce89" table:number-columns-repeated="5"/>
          <table:table-cell table:style-name="ce113" table:number-columns-repeated="2"/>
          <table:table-cell table:style-name="ce89" table:number-columns-repeated="4"/>
          <table:table-cell table:style-name="ce142"/>
          <table:table-cell table:style-name="ce113" table:number-columns-repeated="2"/>
          <table:table-cell table:style-name="ce156"/>
          <table:table-cell table:style-name="ce89" table:number-columns-repeated="120"/>
          <table:table-cell table:style-name="ce167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4"/>
          <table:table-cell table:style-name="ce32" office:value-type="string" calcext:value-type="string">
            <text:p>森</text:p>
          </table:table-cell>
          <table:table-cell table:style-name="ce32"/>
          <table:table-cell table:style-name="ce38" table:number-columns-repeated="2"/>
          <table:table-cell table:style-name="ce43" table:number-columns-repeated="2"/>
          <table:table-cell table:style-name="ce32" table:formula="of:=IF([.$L408]&lt;&gt;&quot;&quot;;NETWORKDAYS([.$L408];[.$M408];[$休日.$B$4:.$B$304]);&quot;&quot;)">
            <text:p/>
          </table:table-cell>
          <table:table-cell table:style-name="ce61"/>
          <table:table-cell table:style-name="ce63" table:formula="of:=IF(OR(AND([.$N408]=&quot;&quot;;[.$L408]&lt;&gt;&quot;&quot;;[.$L408]&lt;=[.$U$1]);AND([.$M408]&lt;&gt;&quot;&quot;;[.Q408]&lt;100;[.$M408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5:.$J406];[.$J408];[.V$5:.V$406])" office:value-type="float" office:value="0" calcext:value-type="float">
            <text:p>0</text:p>
          </table:table-cell>
          <table:table-cell table:style-name="ce90" table:formula="of:=SUMIF([.$J5:.$J406];[.$J408];[.W$5:.W$406])" office:value-type="float" office:value="0" calcext:value-type="float">
            <text:p>0</text:p>
          </table:table-cell>
          <table:table-cell table:style-name="ce90" table:formula="of:=SUMIF([.$J5:.$J406];[.$J408];[.X$5:.X$406])" office:value-type="float" office:value="0" calcext:value-type="float">
            <text:p>0</text:p>
          </table:table-cell>
          <table:table-cell table:style-name="ce114" table:formula="of:=SUMIF([.$J5:.$J406];[.$J408];[.Y$5:.Y$406])" office:value-type="float" office:value="0" calcext:value-type="float">
            <text:p>0</text:p>
          </table:table-cell>
          <table:table-cell table:style-name="ce114" table:formula="of:=SUMIF([.$J5:.$J406];[.$J408];[.Z$5:.Z$406])" office:value-type="float" office:value="0" calcext:value-type="float">
            <text:p>0</text:p>
          </table:table-cell>
          <table:table-cell table:style-name="ce90" table:formula="of:=SUMIF([.$J5:.$J406];[.$J408];[.AA$5:.AA$406])" office:value-type="float" office:value="0" calcext:value-type="float">
            <text:p>0</text:p>
          </table:table-cell>
          <table:table-cell table:style-name="ce90" table:formula="of:=SUMIF([.$J5:.$J406];[.$J408];[.AB$5:.AB$406])" office:value-type="float" office:value="0" calcext:value-type="float">
            <text:p>0</text:p>
          </table:table-cell>
          <table:table-cell table:style-name="ce90" table:formula="of:=SUMIF([.$J5:.$J406];[.$J408];[.AC$5:.AC$406])" office:value-type="float" office:value="0" calcext:value-type="float">
            <text:p>0</text:p>
          </table:table-cell>
          <table:table-cell table:style-name="ce90" table:formula="of:=SUMIF([.$J5:.$J406];[.$J408];[.AD$5:.AD$406])" office:value-type="float" office:value="0" calcext:value-type="float">
            <text:p>0</text:p>
          </table:table-cell>
          <table:table-cell table:style-name="ce90" table:formula="of:=SUMIF([.$J5:.$J406];[.$J408];[.AE$5:.AE$406])" office:value-type="float" office:value="0" calcext:value-type="float">
            <text:p>0</text:p>
          </table:table-cell>
          <table:table-cell table:style-name="ce114" table:formula="of:=SUMIF([.$J5:.$J406];[.$J408];[.AF$5:.AF$406])" office:value-type="float" office:value="0" calcext:value-type="float">
            <text:p>0</text:p>
          </table:table-cell>
          <table:table-cell table:style-name="ce114" table:formula="of:=SUMIF([.$J5:.$J406];[.$J408];[.AG$5:.AG$406])" office:value-type="float" office:value="0" calcext:value-type="float">
            <text:p>0</text:p>
          </table:table-cell>
          <table:table-cell table:style-name="ce90" table:formula="of:=SUMIF([.$J5:.$J406];[.$J408];[.AH$5:.AH$406])" office:value-type="float" office:value="0" calcext:value-type="float">
            <text:p>0</text:p>
          </table:table-cell>
          <table:table-cell table:style-name="ce90" table:formula="of:=SUMIF([.$J5:.$J406];[.$J408];[.AI$5:.AI$406])" office:value-type="float" office:value="0" calcext:value-type="float">
            <text:p>0</text:p>
          </table:table-cell>
          <table:table-cell table:style-name="ce90" table:formula="of:=SUMIF([.$J5:.$J406];[.$J408];[.AJ$5:.AJ$406])" office:value-type="float" office:value="0" calcext:value-type="float">
            <text:p>0</text:p>
          </table:table-cell>
          <table:table-cell table:style-name="ce90" table:formula="of:=SUMIF([.$J5:.$J406];[.$J408];[.AK$5:.AK$406])" office:value-type="float" office:value="0" calcext:value-type="float">
            <text:p>0</text:p>
          </table:table-cell>
          <table:table-cell table:style-name="ce90" table:formula="of:=SUMIF([.$J5:.$J406];[.$J408];[.AL$5:.AL$406])" office:value-type="float" office:value="0" calcext:value-type="float">
            <text:p>0</text:p>
          </table:table-cell>
          <table:table-cell table:style-name="ce114" table:formula="of:=SUMIF([.$J5:.$J406];[.$J408];[.AM$5:.AM$406])" office:value-type="float" office:value="0" calcext:value-type="float">
            <text:p>0</text:p>
          </table:table-cell>
          <table:table-cell table:style-name="ce114" table:formula="of:=SUMIF([.$J5:.$J406];[.$J408];[.AN$5:.AN$406])" office:value-type="float" office:value="0" calcext:value-type="float">
            <text:p>0</text:p>
          </table:table-cell>
          <table:table-cell table:style-name="ce90" table:formula="of:=SUMIF([.$J5:.$J406];[.$J408];[.AO$5:.AO$406])" office:value-type="float" office:value="0" calcext:value-type="float">
            <text:p>0</text:p>
          </table:table-cell>
          <table:table-cell table:style-name="ce90" table:formula="of:=SUMIF([.$J5:.$J406];[.$J408];[.AP$5:.AP$406])" office:value-type="float" office:value="0" calcext:value-type="float">
            <text:p>0</text:p>
          </table:table-cell>
          <table:table-cell table:style-name="ce90" table:formula="of:=SUMIF([.$J5:.$J406];[.$J408];[.AQ$5:.AQ$406])" office:value-type="float" office:value="0" calcext:value-type="float">
            <text:p>0</text:p>
          </table:table-cell>
          <table:table-cell table:style-name="ce90" table:formula="of:=SUMIF([.$J5:.$J406];[.$J408];[.AR$5:.AR$406])" office:value-type="float" office:value="0" calcext:value-type="float">
            <text:p>0</text:p>
          </table:table-cell>
          <table:table-cell table:style-name="ce143" table:formula="of:=SUMIF([.$J5:.$J406];[.$J408];[.AS$5:.AS$406])" office:value-type="float" office:value="0" calcext:value-type="float">
            <text:p>0</text:p>
          </table:table-cell>
          <table:table-cell table:style-name="ce114" table:formula="of:=SUMIF([.$J5:.$J406];[.$J408];[.AT$5:.AT$406])" office:value-type="float" office:value="0" calcext:value-type="float">
            <text:p>0</text:p>
          </table:table-cell>
          <table:table-cell table:style-name="ce114" table:formula="of:=SUMIF([.$J5:.$J406];[.$J408];[.AU$5:.AU$406])" office:value-type="float" office:value="0" calcext:value-type="float">
            <text:p>0</text:p>
          </table:table-cell>
          <table:table-cell table:style-name="ce157" table:formula="of:=SUMIF([.$J5:.$J406];[.$J408];[.AV$5:.AV$406])" office:value-type="float" office:value="0" calcext:value-type="float">
            <text:p>0</text:p>
          </table:table-cell>
          <table:table-cell table:style-name="ce90" table:formula="of:=SUMIF([.$J5:.$J406];[.$J408];[.AW$5:.AW$406])" office:value-type="float" office:value="0" calcext:value-type="float">
            <text:p>0</text:p>
          </table:table-cell>
          <table:table-cell table:style-name="ce90" table:formula="of:=SUMIF([.$J5:.$J406];[.$J408];[.AX$5:.AX$406])" office:value-type="float" office:value="0" calcext:value-type="float">
            <text:p>0</text:p>
          </table:table-cell>
          <table:table-cell table:style-name="ce90" table:formula="of:=SUMIF([.$J5:.$J406];[.$J408];[.AY$5:.AY$406])" office:value-type="float" office:value="0" calcext:value-type="float">
            <text:p>0</text:p>
          </table:table-cell>
          <table:table-cell table:style-name="ce90" table:formula="of:=SUMIF([.$J5:.$J406];[.$J408];[.AZ$5:.AZ$406])" office:value-type="float" office:value="0" calcext:value-type="float">
            <text:p>0</text:p>
          </table:table-cell>
          <table:table-cell table:style-name="ce90" table:formula="of:=SUMIF([.$J5:.$J406];[.$J408];[.BA$5:.BA$406])" office:value-type="float" office:value="0" calcext:value-type="float">
            <text:p>0</text:p>
          </table:table-cell>
          <table:table-cell table:style-name="ce90" table:formula="of:=SUMIF([.$J5:.$J406];[.$J408];[.BB$5:.BB$406])" office:value-type="float" office:value="0" calcext:value-type="float">
            <text:p>0</text:p>
          </table:table-cell>
          <table:table-cell table:style-name="ce90" table:formula="of:=SUMIF([.$J5:.$J406];[.$J408];[.BC$5:.BC$406])" office:value-type="float" office:value="0" calcext:value-type="float">
            <text:p>0</text:p>
          </table:table-cell>
          <table:table-cell table:style-name="ce90" table:formula="of:=SUMIF([.$J5:.$J406];[.$J408];[.BD$5:.BD$406])" office:value-type="float" office:value="0" calcext:value-type="float">
            <text:p>0</text:p>
          </table:table-cell>
          <table:table-cell table:style-name="ce90" table:formula="of:=SUMIF([.$J5:.$J406];[.$J408];[.BE$5:.BE$406])" office:value-type="float" office:value="0" calcext:value-type="float">
            <text:p>0</text:p>
          </table:table-cell>
          <table:table-cell table:style-name="ce90" table:formula="of:=SUMIF([.$J5:.$J406];[.$J408];[.BF$5:.BF$406])" office:value-type="float" office:value="0" calcext:value-type="float">
            <text:p>0</text:p>
          </table:table-cell>
          <table:table-cell table:style-name="ce90" table:formula="of:=SUMIF([.$J5:.$J406];[.$J408];[.BG$5:.BG$406])" office:value-type="float" office:value="0" calcext:value-type="float">
            <text:p>0</text:p>
          </table:table-cell>
          <table:table-cell table:style-name="ce90" table:formula="of:=SUMIF([.$J5:.$J406];[.$J408];[.BH$5:.BH$406])" office:value-type="float" office:value="0" calcext:value-type="float">
            <text:p>0</text:p>
          </table:table-cell>
          <table:table-cell table:style-name="ce90" table:formula="of:=SUMIF([.$J5:.$J406];[.$J408];[.BI$5:.BI$406])" office:value-type="float" office:value="0" calcext:value-type="float">
            <text:p>0</text:p>
          </table:table-cell>
          <table:table-cell table:style-name="ce90" table:formula="of:=SUMIF([.$J5:.$J406];[.$J408];[.BJ$5:.BJ$406])" office:value-type="float" office:value="0" calcext:value-type="float">
            <text:p>0</text:p>
          </table:table-cell>
          <table:table-cell table:style-name="ce90" table:formula="of:=SUMIF([.$J5:.$J406];[.$J408];[.BK$5:.BK$406])" office:value-type="float" office:value="0" calcext:value-type="float">
            <text:p>0</text:p>
          </table:table-cell>
          <table:table-cell table:style-name="ce90" table:formula="of:=SUMIF([.$J5:.$J406];[.$J408];[.BL$5:.BL$406])" office:value-type="float" office:value="0" calcext:value-type="float">
            <text:p>0</text:p>
          </table:table-cell>
          <table:table-cell table:style-name="ce90" table:formula="of:=SUMIF([.$J5:.$J406];[.$J408];[.BM$5:.BM$406])" office:value-type="float" office:value="0" calcext:value-type="float">
            <text:p>0</text:p>
          </table:table-cell>
          <table:table-cell table:style-name="ce90" table:formula="of:=SUMIF([.$J5:.$J406];[.$J408];[.BN$5:.BN$406])" office:value-type="float" office:value="0" calcext:value-type="float">
            <text:p>0</text:p>
          </table:table-cell>
          <table:table-cell table:style-name="ce90" table:formula="of:=SUMIF([.$J5:.$J406];[.$J408];[.BO$5:.BO$406])" office:value-type="float" office:value="0" calcext:value-type="float">
            <text:p>0</text:p>
          </table:table-cell>
          <table:table-cell table:style-name="ce90" table:formula="of:=SUMIF([.$J5:.$J406];[.$J408];[.BP$5:.BP$406])" office:value-type="float" office:value="0" calcext:value-type="float">
            <text:p>0</text:p>
          </table:table-cell>
          <table:table-cell table:style-name="ce90" table:formula="of:=SUMIF([.$J5:.$J406];[.$J408];[.BQ$5:.BQ$406])" office:value-type="float" office:value="0" calcext:value-type="float">
            <text:p>0</text:p>
          </table:table-cell>
          <table:table-cell table:style-name="ce90" table:formula="of:=SUMIF([.$J5:.$J406];[.$J408];[.BR$5:.BR$406])" office:value-type="float" office:value="0" calcext:value-type="float">
            <text:p>0</text:p>
          </table:table-cell>
          <table:table-cell table:style-name="ce90" table:formula="of:=SUMIF([.$J5:.$J406];[.$J408];[.BS$5:.BS$406])" office:value-type="float" office:value="0" calcext:value-type="float">
            <text:p>0</text:p>
          </table:table-cell>
          <table:table-cell table:style-name="ce90" table:formula="of:=SUMIF([.$J5:.$J406];[.$J408];[.BT$5:.BT$406])" office:value-type="float" office:value="0" calcext:value-type="float">
            <text:p>0</text:p>
          </table:table-cell>
          <table:table-cell table:style-name="ce90" table:formula="of:=SUMIF([.$J5:.$J406];[.$J408];[.BU$5:.BU$406])" office:value-type="float" office:value="0" calcext:value-type="float">
            <text:p>0</text:p>
          </table:table-cell>
          <table:table-cell table:style-name="ce90" table:formula="of:=SUMIF([.$J5:.$J406];[.$J408];[.BV$5:.BV$406])" office:value-type="float" office:value="0" calcext:value-type="float">
            <text:p>0</text:p>
          </table:table-cell>
          <table:table-cell table:style-name="ce90" table:formula="of:=SUMIF([.$J5:.$J406];[.$J408];[.BW$5:.BW$406])" office:value-type="float" office:value="0" calcext:value-type="float">
            <text:p>0</text:p>
          </table:table-cell>
          <table:table-cell table:style-name="ce90" table:formula="of:=SUMIF([.$J5:.$J406];[.$J408];[.BX$5:.BX$406])" office:value-type="float" office:value="0" calcext:value-type="float">
            <text:p>0</text:p>
          </table:table-cell>
          <table:table-cell table:style-name="ce90" table:formula="of:=SUMIF([.$J5:.$J406];[.$J408];[.BY$5:.BY$406])" office:value-type="float" office:value="0" calcext:value-type="float">
            <text:p>0</text:p>
          </table:table-cell>
          <table:table-cell table:style-name="ce90" table:formula="of:=SUMIF([.$J5:.$J406];[.$J408];[.BZ$5:.BZ$406])" office:value-type="float" office:value="0" calcext:value-type="float">
            <text:p>0</text:p>
          </table:table-cell>
          <table:table-cell table:style-name="ce90" table:formula="of:=SUMIF([.$J5:.$J406];[.$J408];[.CA$5:.CA$406])" office:value-type="float" office:value="0" calcext:value-type="float">
            <text:p>0</text:p>
          </table:table-cell>
          <table:table-cell table:style-name="ce90" table:formula="of:=SUMIF([.$J5:.$J406];[.$J408];[.CB$5:.CB$406])" office:value-type="float" office:value="0" calcext:value-type="float">
            <text:p>0</text:p>
          </table:table-cell>
          <table:table-cell table:style-name="ce90" table:formula="of:=SUMIF([.$J5:.$J406];[.$J408];[.CC$5:.CC$406])" office:value-type="float" office:value="0" calcext:value-type="float">
            <text:p>0</text:p>
          </table:table-cell>
          <table:table-cell table:style-name="ce90" table:formula="of:=SUMIF([.$J5:.$J406];[.$J408];[.CD$5:.CD$406])" office:value-type="float" office:value="0" calcext:value-type="float">
            <text:p>0</text:p>
          </table:table-cell>
          <table:table-cell table:style-name="ce90" table:formula="of:=SUMIF([.$J5:.$J406];[.$J408];[.CE$5:.CE$406])" office:value-type="float" office:value="0" calcext:value-type="float">
            <text:p>0</text:p>
          </table:table-cell>
          <table:table-cell table:style-name="ce90" table:formula="of:=SUMIF([.$J5:.$J406];[.$J408];[.CF$5:.CF$406])" office:value-type="float" office:value="0" calcext:value-type="float">
            <text:p>0</text:p>
          </table:table-cell>
          <table:table-cell table:style-name="ce90" table:formula="of:=SUMIF([.$J5:.$J406];[.$J408];[.CG$5:.CG$406])" office:value-type="float" office:value="0" calcext:value-type="float">
            <text:p>0</text:p>
          </table:table-cell>
          <table:table-cell table:style-name="ce90" table:formula="of:=SUMIF([.$J5:.$J406];[.$J408];[.CH$5:.CH$406])" office:value-type="float" office:value="0" calcext:value-type="float">
            <text:p>0</text:p>
          </table:table-cell>
          <table:table-cell table:style-name="ce90" table:formula="of:=SUMIF([.$J5:.$J406];[.$J408];[.CI$5:.CI$406])" office:value-type="float" office:value="0" calcext:value-type="float">
            <text:p>0</text:p>
          </table:table-cell>
          <table:table-cell table:style-name="ce90" table:formula="of:=SUMIF([.$J5:.$J406];[.$J408];[.CJ$5:.CJ$406])" office:value-type="float" office:value="0" calcext:value-type="float">
            <text:p>0</text:p>
          </table:table-cell>
          <table:table-cell table:style-name="ce90" table:formula="of:=SUMIF([.$J5:.$J406];[.$J408];[.CK$5:.CK$406])" office:value-type="float" office:value="0" calcext:value-type="float">
            <text:p>0</text:p>
          </table:table-cell>
          <table:table-cell table:style-name="ce90" table:formula="of:=SUMIF([.$J5:.$J406];[.$J408];[.CL$5:.CL$406])" office:value-type="float" office:value="0" calcext:value-type="float">
            <text:p>0</text:p>
          </table:table-cell>
          <table:table-cell table:style-name="ce90" table:formula="of:=SUMIF([.$J5:.$J406];[.$J408];[.CM$5:.CM$406])" office:value-type="float" office:value="0" calcext:value-type="float">
            <text:p>0</text:p>
          </table:table-cell>
          <table:table-cell table:style-name="ce90" table:formula="of:=SUMIF([.$J5:.$J406];[.$J408];[.CN$5:.CN$406])" office:value-type="float" office:value="0" calcext:value-type="float">
            <text:p>0</text:p>
          </table:table-cell>
          <table:table-cell table:style-name="ce90" table:formula="of:=SUMIF([.$J5:.$J406];[.$J408];[.CO$5:.CO$406])" office:value-type="float" office:value="0" calcext:value-type="float">
            <text:p>0</text:p>
          </table:table-cell>
          <table:table-cell table:style-name="ce90" table:formula="of:=SUMIF([.$J5:.$J406];[.$J408];[.CP$5:.CP$406])" office:value-type="float" office:value="0" calcext:value-type="float">
            <text:p>0</text:p>
          </table:table-cell>
          <table:table-cell table:style-name="ce90" table:formula="of:=SUMIF([.$J5:.$J406];[.$J408];[.CQ$5:.CQ$406])" office:value-type="float" office:value="0" calcext:value-type="float">
            <text:p>0</text:p>
          </table:table-cell>
          <table:table-cell table:style-name="ce90" table:formula="of:=SUMIF([.$J5:.$J406];[.$J408];[.CR$5:.CR$406])" office:value-type="float" office:value="0" calcext:value-type="float">
            <text:p>0</text:p>
          </table:table-cell>
          <table:table-cell table:style-name="ce90" table:formula="of:=SUMIF([.$J5:.$J406];[.$J408];[.CS$5:.CS$406])" office:value-type="float" office:value="0" calcext:value-type="float">
            <text:p>0</text:p>
          </table:table-cell>
          <table:table-cell table:style-name="ce90" table:formula="of:=SUMIF([.$J5:.$J406];[.$J408];[.CT$5:.CT$406])" office:value-type="float" office:value="0" calcext:value-type="float">
            <text:p>0</text:p>
          </table:table-cell>
          <table:table-cell table:style-name="ce90" table:formula="of:=SUMIF([.$J5:.$J406];[.$J408];[.CU$5:.CU$406])" office:value-type="float" office:value="0" calcext:value-type="float">
            <text:p>0</text:p>
          </table:table-cell>
          <table:table-cell table:style-name="ce90" table:formula="of:=SUMIF([.$J5:.$J406];[.$J408];[.CV$5:.CV$406])" office:value-type="float" office:value="0" calcext:value-type="float">
            <text:p>0</text:p>
          </table:table-cell>
          <table:table-cell table:style-name="ce90" table:formula="of:=SUMIF([.$J5:.$J406];[.$J408];[.CW$5:.CW$406])" office:value-type="float" office:value="0" calcext:value-type="float">
            <text:p>0</text:p>
          </table:table-cell>
          <table:table-cell table:style-name="ce90" table:formula="of:=SUMIF([.$J5:.$J406];[.$J408];[.CX$5:.CX$406])" office:value-type="float" office:value="0" calcext:value-type="float">
            <text:p>0</text:p>
          </table:table-cell>
          <table:table-cell table:style-name="ce90" table:formula="of:=SUMIF([.$J5:.$J406];[.$J408];[.CY$5:.CY$406])" office:value-type="float" office:value="0" calcext:value-type="float">
            <text:p>0</text:p>
          </table:table-cell>
          <table:table-cell table:style-name="ce90" table:formula="of:=SUMIF([.$J5:.$J406];[.$J408];[.CZ$5:.CZ$406])" office:value-type="float" office:value="0" calcext:value-type="float">
            <text:p>0</text:p>
          </table:table-cell>
          <table:table-cell table:style-name="ce90" table:formula="of:=SUMIF([.$J5:.$J406];[.$J408];[.DA$5:.DA$406])" office:value-type="float" office:value="0" calcext:value-type="float">
            <text:p>0</text:p>
          </table:table-cell>
          <table:table-cell table:style-name="ce90" table:formula="of:=SUMIF([.$J5:.$J406];[.$J408];[.DB$5:.DB$406])" office:value-type="float" office:value="0" calcext:value-type="float">
            <text:p>0</text:p>
          </table:table-cell>
          <table:table-cell table:style-name="ce90" table:formula="of:=SUMIF([.$J5:.$J406];[.$J408];[.DC$5:.DC$406])" office:value-type="float" office:value="0" calcext:value-type="float">
            <text:p>0</text:p>
          </table:table-cell>
          <table:table-cell table:style-name="ce90" table:formula="of:=SUMIF([.$J5:.$J406];[.$J408];[.DD$5:.DD$406])" office:value-type="float" office:value="0" calcext:value-type="float">
            <text:p>0</text:p>
          </table:table-cell>
          <table:table-cell table:style-name="ce90" table:formula="of:=SUMIF([.$J5:.$J406];[.$J408];[.DE$5:.DE$406])" office:value-type="float" office:value="0" calcext:value-type="float">
            <text:p>0</text:p>
          </table:table-cell>
          <table:table-cell table:style-name="ce90" table:formula="of:=SUMIF([.$J5:.$J406];[.$J408];[.DF$5:.DF$406])" office:value-type="float" office:value="0" calcext:value-type="float">
            <text:p>0</text:p>
          </table:table-cell>
          <table:table-cell table:style-name="ce90" table:formula="of:=SUMIF([.$J5:.$J406];[.$J408];[.DG$5:.DG$406])" office:value-type="float" office:value="0" calcext:value-type="float">
            <text:p>0</text:p>
          </table:table-cell>
          <table:table-cell table:style-name="ce90" table:formula="of:=SUMIF([.$J5:.$J406];[.$J408];[.DH$5:.DH$406])" office:value-type="float" office:value="0" calcext:value-type="float">
            <text:p>0</text:p>
          </table:table-cell>
          <table:table-cell table:style-name="ce90" table:formula="of:=SUMIF([.$J5:.$J406];[.$J408];[.DI$5:.DI$406])" office:value-type="float" office:value="0" calcext:value-type="float">
            <text:p>0</text:p>
          </table:table-cell>
          <table:table-cell table:style-name="ce90" table:formula="of:=SUMIF([.$J5:.$J406];[.$J408];[.DJ$5:.DJ$406])" office:value-type="float" office:value="0" calcext:value-type="float">
            <text:p>0</text:p>
          </table:table-cell>
          <table:table-cell table:style-name="ce90" table:formula="of:=SUMIF([.$J5:.$J406];[.$J408];[.DK$5:.DK$406])" office:value-type="float" office:value="0" calcext:value-type="float">
            <text:p>0</text:p>
          </table:table-cell>
          <table:table-cell table:style-name="ce90" table:formula="of:=SUMIF([.$J5:.$J406];[.$J408];[.DL$5:.DL$406])" office:value-type="float" office:value="0" calcext:value-type="float">
            <text:p>0</text:p>
          </table:table-cell>
          <table:table-cell table:style-name="ce90" table:formula="of:=SUMIF([.$J5:.$J406];[.$J408];[.DM$5:.DM$406])" office:value-type="float" office:value="0" calcext:value-type="float">
            <text:p>0</text:p>
          </table:table-cell>
          <table:table-cell table:style-name="ce90" table:formula="of:=SUMIF([.$J5:.$J406];[.$J408];[.DN$5:.DN$406])" office:value-type="float" office:value="0" calcext:value-type="float">
            <text:p>0</text:p>
          </table:table-cell>
          <table:table-cell table:style-name="ce90" table:formula="of:=SUMIF([.$J5:.$J406];[.$J408];[.DO$5:.DO$406])" office:value-type="float" office:value="0" calcext:value-type="float">
            <text:p>0</text:p>
          </table:table-cell>
          <table:table-cell table:style-name="ce90" table:formula="of:=SUMIF([.$J5:.$J406];[.$J408];[.DP$5:.DP$406])" office:value-type="float" office:value="0" calcext:value-type="float">
            <text:p>0</text:p>
          </table:table-cell>
          <table:table-cell table:style-name="ce90" table:formula="of:=SUMIF([.$J5:.$J406];[.$J408];[.DQ$5:.DQ$406])" office:value-type="float" office:value="0" calcext:value-type="float">
            <text:p>0</text:p>
          </table:table-cell>
          <table:table-cell table:style-name="ce90" table:formula="of:=SUMIF([.$J5:.$J406];[.$J408];[.DR$5:.DR$406])" office:value-type="float" office:value="0" calcext:value-type="float">
            <text:p>0</text:p>
          </table:table-cell>
          <table:table-cell table:style-name="ce90" table:formula="of:=SUMIF([.$J5:.$J406];[.$J408];[.DS$5:.DS$406])" office:value-type="float" office:value="0" calcext:value-type="float">
            <text:p>0</text:p>
          </table:table-cell>
          <table:table-cell table:style-name="ce90" table:formula="of:=SUMIF([.$J5:.$J406];[.$J408];[.DT$5:.DT$406])" office:value-type="float" office:value="0" calcext:value-type="float">
            <text:p>0</text:p>
          </table:table-cell>
          <table:table-cell table:style-name="ce90" table:formula="of:=SUMIF([.$J5:.$J406];[.$J408];[.DU$5:.DU$406])" office:value-type="float" office:value="0" calcext:value-type="float">
            <text:p>0</text:p>
          </table:table-cell>
          <table:table-cell table:style-name="ce90" table:formula="of:=SUMIF([.$J5:.$J406];[.$J408];[.DV$5:.DV$406])" office:value-type="float" office:value="0" calcext:value-type="float">
            <text:p>0</text:p>
          </table:table-cell>
          <table:table-cell table:style-name="ce90" table:formula="of:=SUMIF([.$J5:.$J406];[.$J408];[.DW$5:.DW$406])" office:value-type="float" office:value="0" calcext:value-type="float">
            <text:p>0</text:p>
          </table:table-cell>
          <table:table-cell table:style-name="ce90" table:formula="of:=SUMIF([.$J5:.$J406];[.$J408];[.DX$5:.DX$406])" office:value-type="float" office:value="0" calcext:value-type="float">
            <text:p>0</text:p>
          </table:table-cell>
          <table:table-cell table:style-name="ce90" table:formula="of:=SUMIF([.$J5:.$J406];[.$J408];[.DY$5:.DY$406])" office:value-type="float" office:value="0" calcext:value-type="float">
            <text:p>0</text:p>
          </table:table-cell>
          <table:table-cell table:style-name="ce90" table:formula="of:=SUMIF([.$J5:.$J406];[.$J408];[.DZ$5:.DZ$406])" office:value-type="float" office:value="0" calcext:value-type="float">
            <text:p>0</text:p>
          </table:table-cell>
          <table:table-cell table:style-name="ce90" table:formula="of:=SUMIF([.$J5:.$J406];[.$J408];[.EA$5:.EA$406])" office:value-type="float" office:value="0" calcext:value-type="float">
            <text:p>0</text:p>
          </table:table-cell>
          <table:table-cell table:style-name="ce90" table:formula="of:=SUMIF([.$J5:.$J406];[.$J408];[.EB$5:.EB$406])" office:value-type="float" office:value="0" calcext:value-type="float">
            <text:p>0</text:p>
          </table:table-cell>
          <table:table-cell table:style-name="ce90" table:formula="of:=SUMIF([.$J5:.$J406];[.$J408];[.EC$5:.EC$406])" office:value-type="float" office:value="0" calcext:value-type="float">
            <text:p>0</text:p>
          </table:table-cell>
          <table:table-cell table:style-name="ce90" table:formula="of:=SUMIF([.$J5:.$J406];[.$J408];[.ED$5:.ED$406])" office:value-type="float" office:value="0" calcext:value-type="float">
            <text:p>0</text:p>
          </table:table-cell>
          <table:table-cell table:style-name="ce90" table:formula="of:=SUMIF([.$J5:.$J406];[.$J408];[.EE$5:.EE$406])" office:value-type="float" office:value="0" calcext:value-type="float">
            <text:p>0</text:p>
          </table:table-cell>
          <table:table-cell table:style-name="ce90" table:formula="of:=SUMIF([.$J5:.$J406];[.$J408];[.EF$5:.EF$406])" office:value-type="float" office:value="0" calcext:value-type="float">
            <text:p>0</text:p>
          </table:table-cell>
          <table:table-cell table:style-name="ce90" table:formula="of:=SUMIF([.$J5:.$J406];[.$J408];[.EG$5:.EG$406])" office:value-type="float" office:value="0" calcext:value-type="float">
            <text:p>0</text:p>
          </table:table-cell>
          <table:table-cell table:style-name="ce90" table:formula="of:=SUMIF([.$J5:.$J406];[.$J408];[.EH$5:.EH$406])" office:value-type="float" office:value="0" calcext:value-type="float">
            <text:p>0</text:p>
          </table:table-cell>
          <table:table-cell table:style-name="ce90" table:formula="of:=SUMIF([.$J5:.$J406];[.$J408];[.EI$5:.EI$406])" office:value-type="float" office:value="0" calcext:value-type="float">
            <text:p>0</text:p>
          </table:table-cell>
          <table:table-cell table:style-name="ce90" table:formula="of:=SUMIF([.$J5:.$J406];[.$J408];[.EJ$5:.EJ$406])" office:value-type="float" office:value="0" calcext:value-type="float">
            <text:p>0</text:p>
          </table:table-cell>
          <table:table-cell table:style-name="ce90" table:formula="of:=SUMIF([.$J5:.$J406];[.$J408];[.EK$5:.EK$406])" office:value-type="float" office:value="0" calcext:value-type="float">
            <text:p>0</text:p>
          </table:table-cell>
          <table:table-cell table:style-name="ce90" table:formula="of:=SUMIF([.$J5:.$J406];[.$J408];[.EL$5:.EL$406])" office:value-type="float" office:value="0" calcext:value-type="float">
            <text:p>0</text:p>
          </table:table-cell>
          <table:table-cell table:style-name="ce90" table:formula="of:=SUMIF([.$J5:.$J406];[.$J408];[.EM$5:.EM$406])" office:value-type="float" office:value="0" calcext:value-type="float">
            <text:p>0</text:p>
          </table:table-cell>
          <table:table-cell table:style-name="ce90" table:formula="of:=SUMIF([.$J5:.$J406];[.$J408];[.EN$5:.EN$406])" office:value-type="float" office:value="0" calcext:value-type="float">
            <text:p>0</text:p>
          </table:table-cell>
          <table:table-cell table:style-name="ce90" table:formula="of:=SUMIF([.$J5:.$J406];[.$J408];[.EO$5:.EO$406])" office:value-type="float" office:value="0" calcext:value-type="float">
            <text:p>0</text:p>
          </table:table-cell>
          <table:table-cell table:style-name="ce90" table:formula="of:=SUMIF([.$J5:.$J406];[.$J408];[.EP$5:.EP$406])" office:value-type="float" office:value="0" calcext:value-type="float">
            <text:p>0</text:p>
          </table:table-cell>
          <table:table-cell table:style-name="ce90" table:formula="of:=SUMIF([.$J5:.$J406];[.$J408];[.EQ$5:.EQ$406])" office:value-type="float" office:value="0" calcext:value-type="float">
            <text:p>0</text:p>
          </table:table-cell>
          <table:table-cell table:style-name="ce90" table:formula="of:=SUMIF([.$J5:.$J406];[.$J408];[.ER$5:.ER$406])" office:value-type="float" office:value="0" calcext:value-type="float">
            <text:p>0</text:p>
          </table:table-cell>
          <table:table-cell table:style-name="ce90" table:formula="of:=SUMIF([.$J5:.$J406];[.$J408];[.ES$5:.ES$406])" office:value-type="float" office:value="0" calcext:value-type="float">
            <text:p>0</text:p>
          </table:table-cell>
          <table:table-cell table:style-name="ce90" table:formula="of:=SUMIF([.$J5:.$J406];[.$J408];[.ET$5:.ET$406])" office:value-type="float" office:value="0" calcext:value-type="float">
            <text:p>0</text:p>
          </table:table-cell>
          <table:table-cell table:style-name="ce90" table:formula="of:=SUMIF([.$J5:.$J406];[.$J408];[.EU$5:.EU$406])" office:value-type="float" office:value="0" calcext:value-type="float">
            <text:p>0</text:p>
          </table:table-cell>
          <table:table-cell table:style-name="ce90" table:formula="of:=SUMIF([.$J5:.$J406];[.$J408];[.EV$5:.EV$406])" office:value-type="float" office:value="0" calcext:value-type="float">
            <text:p>0</text:p>
          </table:table-cell>
          <table:table-cell table:style-name="ce90" table:formula="of:=SUMIF([.$J5:.$J406];[.$J408];[.EW$5:.EW$406])" office:value-type="float" office:value="0" calcext:value-type="float">
            <text:p>0</text:p>
          </table:table-cell>
          <table:table-cell table:style-name="ce90" table:formula="of:=SUMIF([.$J5:.$J406];[.$J408];[.EX$5:.EX$406])" office:value-type="float" office:value="0" calcext:value-type="float">
            <text:p>0</text:p>
          </table:table-cell>
          <table:table-cell table:style-name="ce90" table:formula="of:=SUMIF([.$J5:.$J406];[.$J408];[.EY$5:.EY$406])" office:value-type="float" office:value="0" calcext:value-type="float">
            <text:p>0</text:p>
          </table:table-cell>
          <table:table-cell table:style-name="ce90" table:formula="of:=SUMIF([.$J5:.$J406];[.$J408];[.EZ$5:.EZ$406])" office:value-type="float" office:value="0" calcext:value-type="float">
            <text:p>0</text:p>
          </table:table-cell>
          <table:table-cell table:style-name="ce90" table:formula="of:=SUMIF([.$J5:.$J406];[.$J408];[.FA$5:.FA$406])" office:value-type="float" office:value="0" calcext:value-type="float">
            <text:p>0</text:p>
          </table:table-cell>
          <table:table-cell table:style-name="ce90" table:formula="of:=SUMIF([.$J5:.$J406];[.$J408];[.FB$5:.FB$406])" office:value-type="float" office:value="0" calcext:value-type="float">
            <text:p>0</text:p>
          </table:table-cell>
          <table:table-cell table:style-name="ce90" table:formula="of:=SUMIF([.$J5:.$J406];[.$J408];[.FC$5:.FC$406])" office:value-type="float" office:value="0" calcext:value-type="float">
            <text:p>0</text:p>
          </table:table-cell>
          <table:table-cell table:style-name="ce90" table:formula="of:=SUMIF([.$J5:.$J406];[.$J408];[.FD$5:.FD$406])" office:value-type="float" office:value="0" calcext:value-type="float">
            <text:p>0</text:p>
          </table:table-cell>
          <table:table-cell table:style-name="ce90" table:formula="of:=SUMIF([.$J5:.$J406];[.$J408];[.FE$5:.FE$406])" office:value-type="float" office:value="0" calcext:value-type="float">
            <text:p>0</text:p>
          </table:table-cell>
          <table:table-cell table:style-name="ce90" table:formula="of:=SUMIF([.$J5:.$J406];[.$J408];[.FF$5:.FF$406])" office:value-type="float" office:value="0" calcext:value-type="float">
            <text:p>0</text:p>
          </table:table-cell>
          <table:table-cell table:style-name="ce90" table:formula="of:=SUMIF([.$J5:.$J406];[.$J408];[.FG$5:.FG$406])" office:value-type="float" office:value="0" calcext:value-type="float">
            <text:p>0</text:p>
          </table:table-cell>
          <table:table-cell table:style-name="ce90" table:formula="of:=SUMIF([.$J5:.$J406];[.$J408];[.FH$5:.FH$406])" office:value-type="float" office:value="0" calcext:value-type="float">
            <text:p>0</text:p>
          </table:table-cell>
          <table:table-cell table:style-name="ce90" table:formula="of:=SUMIF([.$J5:.$J406];[.$J408];[.FI$5:.FI$406])" office:value-type="float" office:value="0" calcext:value-type="float">
            <text:p>0</text:p>
          </table:table-cell>
          <table:table-cell table:style-name="ce90" table:formula="of:=SUMIF([.$J5:.$J406];[.$J408];[.FJ$5:.FJ$406])" office:value-type="float" office:value="0" calcext:value-type="float">
            <text:p>0</text:p>
          </table:table-cell>
          <table:table-cell table:style-name="ce90" table:formula="of:=SUMIF([.$J5:.$J406];[.$J408];[.FK$5:.FK$406])" office:value-type="float" office:value="0" calcext:value-type="float">
            <text:p>0</text:p>
          </table:table-cell>
          <table:table-cell table:style-name="ce90" table:formula="of:=SUMIF([.$J5:.$J406];[.$J408];[.FL$5:.FL$406])" office:value-type="float" office:value="0" calcext:value-type="float">
            <text:p>0</text:p>
          </table:table-cell>
          <table:table-cell table:style-name="ce90" table:formula="of:=SUMIF([.$J5:.$J406];[.$J408];[.FM$5:.FM$406])" office:value-type="float" office:value="0" calcext:value-type="float">
            <text:p>0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4"/>
          <table:table-cell table:style-name="ce32" office:value-type="string" calcext:value-type="string">
            <text:p>芹沢</text:p>
          </table:table-cell>
          <table:table-cell table:style-name="ce32"/>
          <table:table-cell table:style-name="ce38" table:number-columns-repeated="2"/>
          <table:table-cell table:style-name="ce43" table:number-columns-repeated="2"/>
          <table:table-cell table:style-name="ce32" table:formula="of:=IF([.$L409]&lt;&gt;&quot;&quot;;NETWORKDAYS([.$L409];[.$M409];[$休日.$B$4:.$B$304]);&quot;&quot;)">
            <text:p/>
          </table:table-cell>
          <table:table-cell table:style-name="ce61"/>
          <table:table-cell table:style-name="ce63" table:formula="of:=IF(OR(AND([.$N409]=&quot;&quot;;[.$L409]&lt;&gt;&quot;&quot;;[.$L409]&lt;=[.$U$1]);AND([.$M409]&lt;&gt;&quot;&quot;;[.Q409]&lt;100;[.$M409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6:.$J407];[.$J409];[.V$5:.V$406])" office:value-type="float" office:value="0" calcext:value-type="float">
            <text:p>0</text:p>
          </table:table-cell>
          <table:table-cell table:style-name="ce90" table:formula="of:=SUMIF([.$J6:.$J407];[.$J409];[.W$5:.W$406])" office:value-type="float" office:value="0" calcext:value-type="float">
            <text:p>0</text:p>
          </table:table-cell>
          <table:table-cell table:style-name="ce90" table:formula="of:=SUMIF([.$J6:.$J407];[.$J409];[.X$5:.X$406])" office:value-type="float" office:value="0" calcext:value-type="float">
            <text:p>0</text:p>
          </table:table-cell>
          <table:table-cell table:style-name="ce114" table:formula="of:=SUMIF([.$J6:.$J407];[.$J409];[.Y$5:.Y$406])" office:value-type="float" office:value="0" calcext:value-type="float">
            <text:p>0</text:p>
          </table:table-cell>
          <table:table-cell table:style-name="ce114" table:formula="of:=SUMIF([.$J6:.$J407];[.$J409];[.Z$5:.Z$406])" office:value-type="float" office:value="0" calcext:value-type="float">
            <text:p>0</text:p>
          </table:table-cell>
          <table:table-cell table:style-name="ce90" table:formula="of:=SUMIF([.$J6:.$J407];[.$J409];[.AA$5:.AA$406])" office:value-type="float" office:value="0" calcext:value-type="float">
            <text:p>0</text:p>
          </table:table-cell>
          <table:table-cell table:style-name="ce90" table:formula="of:=SUMIF([.$J6:.$J407];[.$J409];[.AB$5:.AB$406])" office:value-type="float" office:value="0" calcext:value-type="float">
            <text:p>0</text:p>
          </table:table-cell>
          <table:table-cell table:style-name="ce90" table:formula="of:=SUMIF([.$J6:.$J407];[.$J409];[.AC$5:.AC$406])" office:value-type="float" office:value="0" calcext:value-type="float">
            <text:p>0</text:p>
          </table:table-cell>
          <table:table-cell table:style-name="ce90" table:formula="of:=SUMIF([.$J6:.$J407];[.$J409];[.AD$5:.AD$406])" office:value-type="float" office:value="0" calcext:value-type="float">
            <text:p>0</text:p>
          </table:table-cell>
          <table:table-cell table:style-name="ce90" table:formula="of:=SUMIF([.$J6:.$J407];[.$J409];[.AE$5:.AE$406])" office:value-type="float" office:value="0" calcext:value-type="float">
            <text:p>0</text:p>
          </table:table-cell>
          <table:table-cell table:style-name="ce114" table:formula="of:=SUMIF([.$J6:.$J407];[.$J409];[.AF$5:.AF$406])" office:value-type="float" office:value="0" calcext:value-type="float">
            <text:p>0</text:p>
          </table:table-cell>
          <table:table-cell table:style-name="ce114" table:formula="of:=SUMIF([.$J6:.$J407];[.$J409];[.AG$5:.AG$406])" office:value-type="float" office:value="0" calcext:value-type="float">
            <text:p>0</text:p>
          </table:table-cell>
          <table:table-cell table:style-name="ce90" table:formula="of:=SUMIF([.$J6:.$J407];[.$J409];[.AH$5:.AH$406])" office:value-type="float" office:value="0" calcext:value-type="float">
            <text:p>0</text:p>
          </table:table-cell>
          <table:table-cell table:style-name="ce90" table:formula="of:=SUMIF([.$J6:.$J407];[.$J409];[.AI$5:.AI$406])" office:value-type="float" office:value="0" calcext:value-type="float">
            <text:p>0</text:p>
          </table:table-cell>
          <table:table-cell table:style-name="ce90" table:formula="of:=SUMIF([.$J6:.$J407];[.$J409];[.AJ$5:.AJ$406])" office:value-type="float" office:value="0" calcext:value-type="float">
            <text:p>0</text:p>
          </table:table-cell>
          <table:table-cell table:style-name="ce90" table:formula="of:=SUMIF([.$J6:.$J407];[.$J409];[.AK$5:.AK$406])" office:value-type="float" office:value="0" calcext:value-type="float">
            <text:p>0</text:p>
          </table:table-cell>
          <table:table-cell table:style-name="ce90" table:formula="of:=SUMIF([.$J6:.$J407];[.$J409];[.AL$5:.AL$406])" office:value-type="float" office:value="0" calcext:value-type="float">
            <text:p>0</text:p>
          </table:table-cell>
          <table:table-cell table:style-name="ce114" table:formula="of:=SUMIF([.$J6:.$J407];[.$J409];[.AM$5:.AM$406])" office:value-type="float" office:value="0" calcext:value-type="float">
            <text:p>0</text:p>
          </table:table-cell>
          <table:table-cell table:style-name="ce114" table:formula="of:=SUMIF([.$J6:.$J407];[.$J409];[.AN$5:.AN$406])" office:value-type="float" office:value="0" calcext:value-type="float">
            <text:p>0</text:p>
          </table:table-cell>
          <table:table-cell table:style-name="ce90" table:formula="of:=SUMIF([.$J6:.$J407];[.$J409];[.AO$5:.AO$406])" office:value-type="float" office:value="0" calcext:value-type="float">
            <text:p>0</text:p>
          </table:table-cell>
          <table:table-cell table:style-name="ce90" table:formula="of:=SUMIF([.$J6:.$J407];[.$J409];[.AP$5:.AP$406])" office:value-type="float" office:value="0" calcext:value-type="float">
            <text:p>0</text:p>
          </table:table-cell>
          <table:table-cell table:style-name="ce90" table:formula="of:=SUMIF([.$J6:.$J407];[.$J409];[.AQ$5:.AQ$406])" office:value-type="float" office:value="0" calcext:value-type="float">
            <text:p>0</text:p>
          </table:table-cell>
          <table:table-cell table:style-name="ce90" table:formula="of:=SUMIF([.$J6:.$J407];[.$J409];[.AR$5:.AR$406])" office:value-type="float" office:value="0" calcext:value-type="float">
            <text:p>0</text:p>
          </table:table-cell>
          <table:table-cell table:style-name="ce143" table:formula="of:=SUMIF([.$J6:.$J407];[.$J409];[.AS$5:.AS$406])" office:value-type="float" office:value="0" calcext:value-type="float">
            <text:p>0</text:p>
          </table:table-cell>
          <table:table-cell table:style-name="ce114" table:formula="of:=SUMIF([.$J6:.$J407];[.$J409];[.AT$5:.AT$406])" office:value-type="float" office:value="0" calcext:value-type="float">
            <text:p>0</text:p>
          </table:table-cell>
          <table:table-cell table:style-name="ce114" table:formula="of:=SUMIF([.$J6:.$J407];[.$J409];[.AU$5:.AU$406])" office:value-type="float" office:value="0" calcext:value-type="float">
            <text:p>0</text:p>
          </table:table-cell>
          <table:table-cell table:style-name="ce157" table:formula="of:=SUMIF([.$J6:.$J407];[.$J409];[.AV$5:.AV$406])" office:value-type="float" office:value="0" calcext:value-type="float">
            <text:p>0</text:p>
          </table:table-cell>
          <table:table-cell table:style-name="ce90" table:formula="of:=SUMIF([.$J6:.$J407];[.$J409];[.AW$5:.AW$406])" office:value-type="float" office:value="0" calcext:value-type="float">
            <text:p>0</text:p>
          </table:table-cell>
          <table:table-cell table:style-name="ce90" table:formula="of:=SUMIF([.$J6:.$J407];[.$J409];[.AX$5:.AX$406])" office:value-type="float" office:value="0" calcext:value-type="float">
            <text:p>0</text:p>
          </table:table-cell>
          <table:table-cell table:style-name="ce90" table:formula="of:=SUMIF([.$J6:.$J407];[.$J409];[.AY$5:.AY$406])" office:value-type="float" office:value="0" calcext:value-type="float">
            <text:p>0</text:p>
          </table:table-cell>
          <table:table-cell table:style-name="ce90" table:formula="of:=SUMIF([.$J6:.$J407];[.$J409];[.AZ$5:.AZ$406])" office:value-type="float" office:value="0" calcext:value-type="float">
            <text:p>0</text:p>
          </table:table-cell>
          <table:table-cell table:style-name="ce90" table:formula="of:=SUMIF([.$J6:.$J407];[.$J409];[.BA$5:.BA$406])" office:value-type="float" office:value="0" calcext:value-type="float">
            <text:p>0</text:p>
          </table:table-cell>
          <table:table-cell table:style-name="ce90" table:formula="of:=SUMIF([.$J6:.$J407];[.$J409];[.BB$5:.BB$406])" office:value-type="float" office:value="0" calcext:value-type="float">
            <text:p>0</text:p>
          </table:table-cell>
          <table:table-cell table:style-name="ce90" table:formula="of:=SUMIF([.$J6:.$J407];[.$J409];[.BC$5:.BC$406])" office:value-type="float" office:value="0" calcext:value-type="float">
            <text:p>0</text:p>
          </table:table-cell>
          <table:table-cell table:style-name="ce90" table:formula="of:=SUMIF([.$J6:.$J407];[.$J409];[.BD$5:.BD$406])" office:value-type="float" office:value="0" calcext:value-type="float">
            <text:p>0</text:p>
          </table:table-cell>
          <table:table-cell table:style-name="ce90" table:formula="of:=SUMIF([.$J6:.$J407];[.$J409];[.BE$5:.BE$406])" office:value-type="float" office:value="0" calcext:value-type="float">
            <text:p>0</text:p>
          </table:table-cell>
          <table:table-cell table:style-name="ce90" table:formula="of:=SUMIF([.$J6:.$J407];[.$J409];[.BF$5:.BF$406])" office:value-type="float" office:value="0" calcext:value-type="float">
            <text:p>0</text:p>
          </table:table-cell>
          <table:table-cell table:style-name="ce90" table:formula="of:=SUMIF([.$J6:.$J407];[.$J409];[.BG$5:.BG$406])" office:value-type="float" office:value="0" calcext:value-type="float">
            <text:p>0</text:p>
          </table:table-cell>
          <table:table-cell table:style-name="ce90" table:formula="of:=SUMIF([.$J6:.$J407];[.$J409];[.BH$5:.BH$406])" office:value-type="float" office:value="0" calcext:value-type="float">
            <text:p>0</text:p>
          </table:table-cell>
          <table:table-cell table:style-name="ce90" table:formula="of:=SUMIF([.$J6:.$J407];[.$J409];[.BI$5:.BI$406])" office:value-type="float" office:value="0" calcext:value-type="float">
            <text:p>0</text:p>
          </table:table-cell>
          <table:table-cell table:style-name="ce90" table:formula="of:=SUMIF([.$J6:.$J407];[.$J409];[.BJ$5:.BJ$406])" office:value-type="float" office:value="0" calcext:value-type="float">
            <text:p>0</text:p>
          </table:table-cell>
          <table:table-cell table:style-name="ce90" table:formula="of:=SUMIF([.$J6:.$J407];[.$J409];[.BK$5:.BK$406])" office:value-type="float" office:value="0" calcext:value-type="float">
            <text:p>0</text:p>
          </table:table-cell>
          <table:table-cell table:style-name="ce90" table:formula="of:=SUMIF([.$J6:.$J407];[.$J409];[.BL$5:.BL$406])" office:value-type="float" office:value="0" calcext:value-type="float">
            <text:p>0</text:p>
          </table:table-cell>
          <table:table-cell table:style-name="ce90" table:formula="of:=SUMIF([.$J6:.$J407];[.$J409];[.BM$5:.BM$406])" office:value-type="float" office:value="0" calcext:value-type="float">
            <text:p>0</text:p>
          </table:table-cell>
          <table:table-cell table:style-name="ce90" table:formula="of:=SUMIF([.$J6:.$J407];[.$J409];[.BN$5:.BN$406])" office:value-type="float" office:value="0" calcext:value-type="float">
            <text:p>0</text:p>
          </table:table-cell>
          <table:table-cell table:style-name="ce90" table:formula="of:=SUMIF([.$J6:.$J407];[.$J409];[.BO$5:.BO$406])" office:value-type="float" office:value="0" calcext:value-type="float">
            <text:p>0</text:p>
          </table:table-cell>
          <table:table-cell table:style-name="ce90" table:formula="of:=SUMIF([.$J6:.$J407];[.$J409];[.BP$5:.BP$406])" office:value-type="float" office:value="0" calcext:value-type="float">
            <text:p>0</text:p>
          </table:table-cell>
          <table:table-cell table:style-name="ce90" table:formula="of:=SUMIF([.$J6:.$J407];[.$J409];[.BQ$5:.BQ$406])" office:value-type="float" office:value="0" calcext:value-type="float">
            <text:p>0</text:p>
          </table:table-cell>
          <table:table-cell table:style-name="ce90" table:formula="of:=SUMIF([.$J6:.$J407];[.$J409];[.BR$5:.BR$406])" office:value-type="float" office:value="0" calcext:value-type="float">
            <text:p>0</text:p>
          </table:table-cell>
          <table:table-cell table:style-name="ce90" table:formula="of:=SUMIF([.$J6:.$J407];[.$J409];[.BS$5:.BS$406])" office:value-type="float" office:value="0" calcext:value-type="float">
            <text:p>0</text:p>
          </table:table-cell>
          <table:table-cell table:style-name="ce90" table:formula="of:=SUMIF([.$J6:.$J407];[.$J409];[.BT$5:.BT$406])" office:value-type="float" office:value="0" calcext:value-type="float">
            <text:p>0</text:p>
          </table:table-cell>
          <table:table-cell table:style-name="ce90" table:formula="of:=SUMIF([.$J6:.$J407];[.$J409];[.BU$5:.BU$406])" office:value-type="float" office:value="0" calcext:value-type="float">
            <text:p>0</text:p>
          </table:table-cell>
          <table:table-cell table:style-name="ce90" table:formula="of:=SUMIF([.$J6:.$J407];[.$J409];[.BV$5:.BV$406])" office:value-type="float" office:value="0" calcext:value-type="float">
            <text:p>0</text:p>
          </table:table-cell>
          <table:table-cell table:style-name="ce90" table:formula="of:=SUMIF([.$J6:.$J407];[.$J409];[.BW$5:.BW$406])" office:value-type="float" office:value="0" calcext:value-type="float">
            <text:p>0</text:p>
          </table:table-cell>
          <table:table-cell table:style-name="ce90" table:formula="of:=SUMIF([.$J6:.$J407];[.$J409];[.BX$5:.BX$406])" office:value-type="float" office:value="0" calcext:value-type="float">
            <text:p>0</text:p>
          </table:table-cell>
          <table:table-cell table:style-name="ce90" table:formula="of:=SUMIF([.$J6:.$J407];[.$J409];[.BY$5:.BY$406])" office:value-type="float" office:value="0" calcext:value-type="float">
            <text:p>0</text:p>
          </table:table-cell>
          <table:table-cell table:style-name="ce90" table:formula="of:=SUMIF([.$J6:.$J407];[.$J409];[.BZ$5:.BZ$406])" office:value-type="float" office:value="0" calcext:value-type="float">
            <text:p>0</text:p>
          </table:table-cell>
          <table:table-cell table:style-name="ce90" table:formula="of:=SUMIF([.$J6:.$J407];[.$J409];[.CA$5:.CA$406])" office:value-type="float" office:value="0" calcext:value-type="float">
            <text:p>0</text:p>
          </table:table-cell>
          <table:table-cell table:style-name="ce90" table:formula="of:=SUMIF([.$J6:.$J407];[.$J409];[.CB$5:.CB$406])" office:value-type="float" office:value="0" calcext:value-type="float">
            <text:p>0</text:p>
          </table:table-cell>
          <table:table-cell table:style-name="ce90" table:formula="of:=SUMIF([.$J6:.$J407];[.$J409];[.CC$5:.CC$406])" office:value-type="float" office:value="0" calcext:value-type="float">
            <text:p>0</text:p>
          </table:table-cell>
          <table:table-cell table:style-name="ce90" table:formula="of:=SUMIF([.$J6:.$J407];[.$J409];[.CD$5:.CD$406])" office:value-type="float" office:value="0" calcext:value-type="float">
            <text:p>0</text:p>
          </table:table-cell>
          <table:table-cell table:style-name="ce90" table:formula="of:=SUMIF([.$J6:.$J407];[.$J409];[.CE$5:.CE$406])" office:value-type="float" office:value="0" calcext:value-type="float">
            <text:p>0</text:p>
          </table:table-cell>
          <table:table-cell table:style-name="ce90" table:formula="of:=SUMIF([.$J6:.$J407];[.$J409];[.CF$5:.CF$406])" office:value-type="float" office:value="0" calcext:value-type="float">
            <text:p>0</text:p>
          </table:table-cell>
          <table:table-cell table:style-name="ce90" table:formula="of:=SUMIF([.$J6:.$J407];[.$J409];[.CG$5:.CG$406])" office:value-type="float" office:value="0" calcext:value-type="float">
            <text:p>0</text:p>
          </table:table-cell>
          <table:table-cell table:style-name="ce90" table:formula="of:=SUMIF([.$J6:.$J407];[.$J409];[.CH$5:.CH$406])" office:value-type="float" office:value="0" calcext:value-type="float">
            <text:p>0</text:p>
          </table:table-cell>
          <table:table-cell table:style-name="ce90" table:formula="of:=SUMIF([.$J6:.$J407];[.$J409];[.CI$5:.CI$406])" office:value-type="float" office:value="0" calcext:value-type="float">
            <text:p>0</text:p>
          </table:table-cell>
          <table:table-cell table:style-name="ce90" table:formula="of:=SUMIF([.$J6:.$J407];[.$J409];[.CJ$5:.CJ$406])" office:value-type="float" office:value="0" calcext:value-type="float">
            <text:p>0</text:p>
          </table:table-cell>
          <table:table-cell table:style-name="ce90" table:formula="of:=SUMIF([.$J6:.$J407];[.$J409];[.CK$5:.CK$406])" office:value-type="float" office:value="0" calcext:value-type="float">
            <text:p>0</text:p>
          </table:table-cell>
          <table:table-cell table:style-name="ce90" table:formula="of:=SUMIF([.$J6:.$J407];[.$J409];[.CL$5:.CL$406])" office:value-type="float" office:value="0" calcext:value-type="float">
            <text:p>0</text:p>
          </table:table-cell>
          <table:table-cell table:style-name="ce90" table:formula="of:=SUMIF([.$J6:.$J407];[.$J409];[.CM$5:.CM$406])" office:value-type="float" office:value="0" calcext:value-type="float">
            <text:p>0</text:p>
          </table:table-cell>
          <table:table-cell table:style-name="ce90" table:formula="of:=SUMIF([.$J6:.$J407];[.$J409];[.CN$5:.CN$406])" office:value-type="float" office:value="0" calcext:value-type="float">
            <text:p>0</text:p>
          </table:table-cell>
          <table:table-cell table:style-name="ce90" table:formula="of:=SUMIF([.$J6:.$J407];[.$J409];[.CO$5:.CO$406])" office:value-type="float" office:value="0" calcext:value-type="float">
            <text:p>0</text:p>
          </table:table-cell>
          <table:table-cell table:style-name="ce90" table:formula="of:=SUMIF([.$J6:.$J407];[.$J409];[.CP$5:.CP$406])" office:value-type="float" office:value="0" calcext:value-type="float">
            <text:p>0</text:p>
          </table:table-cell>
          <table:table-cell table:style-name="ce90" table:formula="of:=SUMIF([.$J6:.$J407];[.$J409];[.CQ$5:.CQ$406])" office:value-type="float" office:value="0" calcext:value-type="float">
            <text:p>0</text:p>
          </table:table-cell>
          <table:table-cell table:style-name="ce90" table:formula="of:=SUMIF([.$J6:.$J407];[.$J409];[.CR$5:.CR$406])" office:value-type="float" office:value="0" calcext:value-type="float">
            <text:p>0</text:p>
          </table:table-cell>
          <table:table-cell table:style-name="ce90" table:formula="of:=SUMIF([.$J6:.$J407];[.$J409];[.CS$5:.CS$406])" office:value-type="float" office:value="0" calcext:value-type="float">
            <text:p>0</text:p>
          </table:table-cell>
          <table:table-cell table:style-name="ce90" table:formula="of:=SUMIF([.$J6:.$J407];[.$J409];[.CT$5:.CT$406])" office:value-type="float" office:value="0" calcext:value-type="float">
            <text:p>0</text:p>
          </table:table-cell>
          <table:table-cell table:style-name="ce90" table:formula="of:=SUMIF([.$J6:.$J407];[.$J409];[.CU$5:.CU$406])" office:value-type="float" office:value="0" calcext:value-type="float">
            <text:p>0</text:p>
          </table:table-cell>
          <table:table-cell table:style-name="ce90" table:formula="of:=SUMIF([.$J6:.$J407];[.$J409];[.CV$5:.CV$406])" office:value-type="float" office:value="0" calcext:value-type="float">
            <text:p>0</text:p>
          </table:table-cell>
          <table:table-cell table:style-name="ce90" table:formula="of:=SUMIF([.$J6:.$J407];[.$J409];[.CW$5:.CW$406])" office:value-type="float" office:value="0" calcext:value-type="float">
            <text:p>0</text:p>
          </table:table-cell>
          <table:table-cell table:style-name="ce90" table:formula="of:=SUMIF([.$J6:.$J407];[.$J409];[.CX$5:.CX$406])" office:value-type="float" office:value="0" calcext:value-type="float">
            <text:p>0</text:p>
          </table:table-cell>
          <table:table-cell table:style-name="ce90" table:formula="of:=SUMIF([.$J6:.$J407];[.$J409];[.CY$5:.CY$406])" office:value-type="float" office:value="0" calcext:value-type="float">
            <text:p>0</text:p>
          </table:table-cell>
          <table:table-cell table:style-name="ce90" table:formula="of:=SUMIF([.$J6:.$J407];[.$J409];[.CZ$5:.CZ$406])" office:value-type="float" office:value="0" calcext:value-type="float">
            <text:p>0</text:p>
          </table:table-cell>
          <table:table-cell table:style-name="ce90" table:formula="of:=SUMIF([.$J6:.$J407];[.$J409];[.DA$5:.DA$406])" office:value-type="float" office:value="0" calcext:value-type="float">
            <text:p>0</text:p>
          </table:table-cell>
          <table:table-cell table:style-name="ce90" table:formula="of:=SUMIF([.$J6:.$J407];[.$J409];[.DB$5:.DB$406])" office:value-type="float" office:value="0" calcext:value-type="float">
            <text:p>0</text:p>
          </table:table-cell>
          <table:table-cell table:style-name="ce90" table:formula="of:=SUMIF([.$J6:.$J407];[.$J409];[.DC$5:.DC$406])" office:value-type="float" office:value="0" calcext:value-type="float">
            <text:p>0</text:p>
          </table:table-cell>
          <table:table-cell table:style-name="ce90" table:formula="of:=SUMIF([.$J6:.$J407];[.$J409];[.DD$5:.DD$406])" office:value-type="float" office:value="0" calcext:value-type="float">
            <text:p>0</text:p>
          </table:table-cell>
          <table:table-cell table:style-name="ce90" table:formula="of:=SUMIF([.$J6:.$J407];[.$J409];[.DE$5:.DE$406])" office:value-type="float" office:value="0" calcext:value-type="float">
            <text:p>0</text:p>
          </table:table-cell>
          <table:table-cell table:style-name="ce90" table:formula="of:=SUMIF([.$J6:.$J407];[.$J409];[.DF$5:.DF$406])" office:value-type="float" office:value="0" calcext:value-type="float">
            <text:p>0</text:p>
          </table:table-cell>
          <table:table-cell table:style-name="ce90" table:formula="of:=SUMIF([.$J6:.$J407];[.$J409];[.DG$5:.DG$406])" office:value-type="float" office:value="0" calcext:value-type="float">
            <text:p>0</text:p>
          </table:table-cell>
          <table:table-cell table:style-name="ce90" table:formula="of:=SUMIF([.$J6:.$J407];[.$J409];[.DH$5:.DH$406])" office:value-type="float" office:value="0" calcext:value-type="float">
            <text:p>0</text:p>
          </table:table-cell>
          <table:table-cell table:style-name="ce90" table:formula="of:=SUMIF([.$J6:.$J407];[.$J409];[.DI$5:.DI$406])" office:value-type="float" office:value="0" calcext:value-type="float">
            <text:p>0</text:p>
          </table:table-cell>
          <table:table-cell table:style-name="ce90" table:formula="of:=SUMIF([.$J6:.$J407];[.$J409];[.DJ$5:.DJ$406])" office:value-type="float" office:value="0" calcext:value-type="float">
            <text:p>0</text:p>
          </table:table-cell>
          <table:table-cell table:style-name="ce90" table:formula="of:=SUMIF([.$J6:.$J407];[.$J409];[.DK$5:.DK$406])" office:value-type="float" office:value="0" calcext:value-type="float">
            <text:p>0</text:p>
          </table:table-cell>
          <table:table-cell table:style-name="ce90" table:formula="of:=SUMIF([.$J6:.$J407];[.$J409];[.DL$5:.DL$406])" office:value-type="float" office:value="0" calcext:value-type="float">
            <text:p>0</text:p>
          </table:table-cell>
          <table:table-cell table:style-name="ce90" table:formula="of:=SUMIF([.$J6:.$J407];[.$J409];[.DM$5:.DM$406])" office:value-type="float" office:value="0" calcext:value-type="float">
            <text:p>0</text:p>
          </table:table-cell>
          <table:table-cell table:style-name="ce90" table:formula="of:=SUMIF([.$J6:.$J407];[.$J409];[.DN$5:.DN$406])" office:value-type="float" office:value="0" calcext:value-type="float">
            <text:p>0</text:p>
          </table:table-cell>
          <table:table-cell table:style-name="ce90" table:formula="of:=SUMIF([.$J6:.$J407];[.$J409];[.DO$5:.DO$406])" office:value-type="float" office:value="0" calcext:value-type="float">
            <text:p>0</text:p>
          </table:table-cell>
          <table:table-cell table:style-name="ce90" table:formula="of:=SUMIF([.$J6:.$J407];[.$J409];[.DP$5:.DP$406])" office:value-type="float" office:value="0" calcext:value-type="float">
            <text:p>0</text:p>
          </table:table-cell>
          <table:table-cell table:style-name="ce90" table:formula="of:=SUMIF([.$J6:.$J407];[.$J409];[.DQ$5:.DQ$406])" office:value-type="float" office:value="0" calcext:value-type="float">
            <text:p>0</text:p>
          </table:table-cell>
          <table:table-cell table:style-name="ce90" table:formula="of:=SUMIF([.$J6:.$J407];[.$J409];[.DR$5:.DR$406])" office:value-type="float" office:value="0" calcext:value-type="float">
            <text:p>0</text:p>
          </table:table-cell>
          <table:table-cell table:style-name="ce90" table:formula="of:=SUMIF([.$J6:.$J407];[.$J409];[.DS$5:.DS$406])" office:value-type="float" office:value="0" calcext:value-type="float">
            <text:p>0</text:p>
          </table:table-cell>
          <table:table-cell table:style-name="ce90" table:formula="of:=SUMIF([.$J6:.$J407];[.$J409];[.DT$5:.DT$406])" office:value-type="float" office:value="0" calcext:value-type="float">
            <text:p>0</text:p>
          </table:table-cell>
          <table:table-cell table:style-name="ce90" table:formula="of:=SUMIF([.$J6:.$J407];[.$J409];[.DU$5:.DU$406])" office:value-type="float" office:value="0" calcext:value-type="float">
            <text:p>0</text:p>
          </table:table-cell>
          <table:table-cell table:style-name="ce90" table:formula="of:=SUMIF([.$J6:.$J407];[.$J409];[.DV$5:.DV$406])" office:value-type="float" office:value="0" calcext:value-type="float">
            <text:p>0</text:p>
          </table:table-cell>
          <table:table-cell table:style-name="ce90" table:formula="of:=SUMIF([.$J6:.$J407];[.$J409];[.DW$5:.DW$406])" office:value-type="float" office:value="0" calcext:value-type="float">
            <text:p>0</text:p>
          </table:table-cell>
          <table:table-cell table:style-name="ce90" table:formula="of:=SUMIF([.$J6:.$J407];[.$J409];[.DX$5:.DX$406])" office:value-type="float" office:value="0" calcext:value-type="float">
            <text:p>0</text:p>
          </table:table-cell>
          <table:table-cell table:style-name="ce90" table:formula="of:=SUMIF([.$J6:.$J407];[.$J409];[.DY$5:.DY$406])" office:value-type="float" office:value="0" calcext:value-type="float">
            <text:p>0</text:p>
          </table:table-cell>
          <table:table-cell table:style-name="ce90" table:formula="of:=SUMIF([.$J6:.$J407];[.$J409];[.DZ$5:.DZ$406])" office:value-type="float" office:value="0" calcext:value-type="float">
            <text:p>0</text:p>
          </table:table-cell>
          <table:table-cell table:style-name="ce90" table:formula="of:=SUMIF([.$J6:.$J407];[.$J409];[.EA$5:.EA$406])" office:value-type="float" office:value="0" calcext:value-type="float">
            <text:p>0</text:p>
          </table:table-cell>
          <table:table-cell table:style-name="ce90" table:formula="of:=SUMIF([.$J6:.$J407];[.$J409];[.EB$5:.EB$406])" office:value-type="float" office:value="0" calcext:value-type="float">
            <text:p>0</text:p>
          </table:table-cell>
          <table:table-cell table:style-name="ce90" table:formula="of:=SUMIF([.$J6:.$J407];[.$J409];[.EC$5:.EC$406])" office:value-type="float" office:value="0" calcext:value-type="float">
            <text:p>0</text:p>
          </table:table-cell>
          <table:table-cell table:style-name="ce90" table:formula="of:=SUMIF([.$J6:.$J407];[.$J409];[.ED$5:.ED$406])" office:value-type="float" office:value="0" calcext:value-type="float">
            <text:p>0</text:p>
          </table:table-cell>
          <table:table-cell table:style-name="ce90" table:formula="of:=SUMIF([.$J6:.$J407];[.$J409];[.EE$5:.EE$406])" office:value-type="float" office:value="0" calcext:value-type="float">
            <text:p>0</text:p>
          </table:table-cell>
          <table:table-cell table:style-name="ce90" table:formula="of:=SUMIF([.$J6:.$J407];[.$J409];[.EF$5:.EF$406])" office:value-type="float" office:value="0" calcext:value-type="float">
            <text:p>0</text:p>
          </table:table-cell>
          <table:table-cell table:style-name="ce90" table:formula="of:=SUMIF([.$J6:.$J407];[.$J409];[.EG$5:.EG$406])" office:value-type="float" office:value="0" calcext:value-type="float">
            <text:p>0</text:p>
          </table:table-cell>
          <table:table-cell table:style-name="ce90" table:formula="of:=SUMIF([.$J6:.$J407];[.$J409];[.EH$5:.EH$406])" office:value-type="float" office:value="0" calcext:value-type="float">
            <text:p>0</text:p>
          </table:table-cell>
          <table:table-cell table:style-name="ce90" table:formula="of:=SUMIF([.$J6:.$J407];[.$J409];[.EI$5:.EI$406])" office:value-type="float" office:value="0" calcext:value-type="float">
            <text:p>0</text:p>
          </table:table-cell>
          <table:table-cell table:style-name="ce90" table:formula="of:=SUMIF([.$J6:.$J407];[.$J409];[.EJ$5:.EJ$406])" office:value-type="float" office:value="0" calcext:value-type="float">
            <text:p>0</text:p>
          </table:table-cell>
          <table:table-cell table:style-name="ce90" table:formula="of:=SUMIF([.$J6:.$J407];[.$J409];[.EK$5:.EK$406])" office:value-type="float" office:value="0" calcext:value-type="float">
            <text:p>0</text:p>
          </table:table-cell>
          <table:table-cell table:style-name="ce90" table:formula="of:=SUMIF([.$J6:.$J407];[.$J409];[.EL$5:.EL$406])" office:value-type="float" office:value="0" calcext:value-type="float">
            <text:p>0</text:p>
          </table:table-cell>
          <table:table-cell table:style-name="ce90" table:formula="of:=SUMIF([.$J6:.$J407];[.$J409];[.EM$5:.EM$406])" office:value-type="float" office:value="0" calcext:value-type="float">
            <text:p>0</text:p>
          </table:table-cell>
          <table:table-cell table:style-name="ce90" table:formula="of:=SUMIF([.$J6:.$J407];[.$J409];[.EN$5:.EN$406])" office:value-type="float" office:value="0" calcext:value-type="float">
            <text:p>0</text:p>
          </table:table-cell>
          <table:table-cell table:style-name="ce90" table:formula="of:=SUMIF([.$J6:.$J407];[.$J409];[.EO$5:.EO$406])" office:value-type="float" office:value="0" calcext:value-type="float">
            <text:p>0</text:p>
          </table:table-cell>
          <table:table-cell table:style-name="ce90" table:formula="of:=SUMIF([.$J6:.$J407];[.$J409];[.EP$5:.EP$406])" office:value-type="float" office:value="0" calcext:value-type="float">
            <text:p>0</text:p>
          </table:table-cell>
          <table:table-cell table:style-name="ce90" table:formula="of:=SUMIF([.$J6:.$J407];[.$J409];[.EQ$5:.EQ$406])" office:value-type="float" office:value="0" calcext:value-type="float">
            <text:p>0</text:p>
          </table:table-cell>
          <table:table-cell table:style-name="ce90" table:formula="of:=SUMIF([.$J6:.$J407];[.$J409];[.ER$5:.ER$406])" office:value-type="float" office:value="0" calcext:value-type="float">
            <text:p>0</text:p>
          </table:table-cell>
          <table:table-cell table:style-name="ce90" table:formula="of:=SUMIF([.$J6:.$J407];[.$J409];[.ES$5:.ES$406])" office:value-type="float" office:value="0" calcext:value-type="float">
            <text:p>0</text:p>
          </table:table-cell>
          <table:table-cell table:style-name="ce90" table:formula="of:=SUMIF([.$J6:.$J407];[.$J409];[.ET$5:.ET$406])" office:value-type="float" office:value="0" calcext:value-type="float">
            <text:p>0</text:p>
          </table:table-cell>
          <table:table-cell table:style-name="ce90" table:formula="of:=SUMIF([.$J6:.$J407];[.$J409];[.EU$5:.EU$406])" office:value-type="float" office:value="0" calcext:value-type="float">
            <text:p>0</text:p>
          </table:table-cell>
          <table:table-cell table:style-name="ce90" table:formula="of:=SUMIF([.$J6:.$J407];[.$J409];[.EV$5:.EV$406])" office:value-type="float" office:value="0" calcext:value-type="float">
            <text:p>0</text:p>
          </table:table-cell>
          <table:table-cell table:style-name="ce90" table:formula="of:=SUMIF([.$J6:.$J407];[.$J409];[.EW$5:.EW$406])" office:value-type="float" office:value="0" calcext:value-type="float">
            <text:p>0</text:p>
          </table:table-cell>
          <table:table-cell table:style-name="ce90" table:formula="of:=SUMIF([.$J6:.$J407];[.$J409];[.EX$5:.EX$406])" office:value-type="float" office:value="0" calcext:value-type="float">
            <text:p>0</text:p>
          </table:table-cell>
          <table:table-cell table:style-name="ce90" table:formula="of:=SUMIF([.$J6:.$J407];[.$J409];[.EY$5:.EY$406])" office:value-type="float" office:value="0" calcext:value-type="float">
            <text:p>0</text:p>
          </table:table-cell>
          <table:table-cell table:style-name="ce90" table:formula="of:=SUMIF([.$J6:.$J407];[.$J409];[.EZ$5:.EZ$406])" office:value-type="float" office:value="0" calcext:value-type="float">
            <text:p>0</text:p>
          </table:table-cell>
          <table:table-cell table:style-name="ce90" table:formula="of:=SUMIF([.$J6:.$J407];[.$J409];[.FA$5:.FA$406])" office:value-type="float" office:value="0" calcext:value-type="float">
            <text:p>0</text:p>
          </table:table-cell>
          <table:table-cell table:style-name="ce90" table:formula="of:=SUMIF([.$J6:.$J407];[.$J409];[.FB$5:.FB$406])" office:value-type="float" office:value="0" calcext:value-type="float">
            <text:p>0</text:p>
          </table:table-cell>
          <table:table-cell table:style-name="ce90" table:formula="of:=SUMIF([.$J6:.$J407];[.$J409];[.FC$5:.FC$406])" office:value-type="float" office:value="0" calcext:value-type="float">
            <text:p>0</text:p>
          </table:table-cell>
          <table:table-cell table:style-name="ce90" table:formula="of:=SUMIF([.$J6:.$J407];[.$J409];[.FD$5:.FD$406])" office:value-type="float" office:value="0" calcext:value-type="float">
            <text:p>0</text:p>
          </table:table-cell>
          <table:table-cell table:style-name="ce90" table:formula="of:=SUMIF([.$J6:.$J407];[.$J409];[.FE$5:.FE$406])" office:value-type="float" office:value="0" calcext:value-type="float">
            <text:p>0</text:p>
          </table:table-cell>
          <table:table-cell table:style-name="ce90" table:formula="of:=SUMIF([.$J6:.$J407];[.$J409];[.FF$5:.FF$406])" office:value-type="float" office:value="0" calcext:value-type="float">
            <text:p>0</text:p>
          </table:table-cell>
          <table:table-cell table:style-name="ce90" table:formula="of:=SUMIF([.$J6:.$J407];[.$J409];[.FG$5:.FG$406])" office:value-type="float" office:value="0" calcext:value-type="float">
            <text:p>0</text:p>
          </table:table-cell>
          <table:table-cell table:style-name="ce90" table:formula="of:=SUMIF([.$J6:.$J407];[.$J409];[.FH$5:.FH$406])" office:value-type="float" office:value="0" calcext:value-type="float">
            <text:p>0</text:p>
          </table:table-cell>
          <table:table-cell table:style-name="ce90" table:formula="of:=SUMIF([.$J6:.$J407];[.$J409];[.FI$5:.FI$406])" office:value-type="float" office:value="0" calcext:value-type="float">
            <text:p>0</text:p>
          </table:table-cell>
          <table:table-cell table:style-name="ce90" table:formula="of:=SUMIF([.$J6:.$J407];[.$J409];[.FJ$5:.FJ$406])" office:value-type="float" office:value="0" calcext:value-type="float">
            <text:p>0</text:p>
          </table:table-cell>
          <table:table-cell table:style-name="ce90" table:formula="of:=SUMIF([.$J6:.$J407];[.$J409];[.FK$5:.FK$406])" office:value-type="float" office:value="0" calcext:value-type="float">
            <text:p>0</text:p>
          </table:table-cell>
          <table:table-cell table:style-name="ce90" table:formula="of:=SUMIF([.$J6:.$J407];[.$J409];[.FL$5:.FL$406])" office:value-type="float" office:value="0" calcext:value-type="float">
            <text:p>0</text:p>
          </table:table-cell>
          <table:table-cell table:style-name="ce90" table:formula="of:=SUMIF([.$J6:.$J407];[.$J409];[.FM$5:.FM$406])" office:value-type="float" office:value="0" calcext:value-type="float">
            <text:p>0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6"/>
          <table:table-cell table:style-name="ce38" table:number-columns-repeated="2"/>
          <table:table-cell table:style-name="ce43" table:number-columns-repeated="2"/>
          <table:table-cell table:style-name="ce32" table:formula="of:=IF([.$L410]&lt;&gt;&quot;&quot;;NETWORKDAYS([.$L410];[.$M410];[$休日.$B$4:.$B$304]);&quot;&quot;)">
            <text:p/>
          </table:table-cell>
          <table:table-cell table:style-name="ce61"/>
          <table:table-cell table:style-name="ce63" table:formula="of:=IF(OR(AND([.$N410]=&quot;&quot;;[.$L410]&lt;&gt;&quot;&quot;;[.$L410]&lt;=[.$U$1]);AND([.$M410]&lt;&gt;&quot;&quot;;[.Q410]&lt;100;[.$M410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7:.$J408];[.$J410];[.V$5:.V$406])" office:value-type="float" office:value="0" calcext:value-type="float">
            <text:p>0</text:p>
          </table:table-cell>
          <table:table-cell table:style-name="ce90" table:formula="of:=SUMIF([.$J7:.$J408];[.$J410];[.W$5:.W$406])" office:value-type="float" office:value="0" calcext:value-type="float">
            <text:p>0</text:p>
          </table:table-cell>
          <table:table-cell table:style-name="ce90" table:formula="of:=SUMIF([.$J7:.$J408];[.$J410];[.X$5:.X$406])" office:value-type="float" office:value="0" calcext:value-type="float">
            <text:p>0</text:p>
          </table:table-cell>
          <table:table-cell table:style-name="ce114" table:formula="of:=SUMIF([.$J7:.$J408];[.$J410];[.Y$5:.Y$406])" office:value-type="float" office:value="0" calcext:value-type="float">
            <text:p>0</text:p>
          </table:table-cell>
          <table:table-cell table:style-name="ce114" table:formula="of:=SUMIF([.$J7:.$J408];[.$J410];[.Z$5:.Z$406])" office:value-type="float" office:value="0" calcext:value-type="float">
            <text:p>0</text:p>
          </table:table-cell>
          <table:table-cell table:style-name="ce90" table:formula="of:=SUMIF([.$J7:.$J408];[.$J410];[.AA$5:.AA$406])" office:value-type="float" office:value="0" calcext:value-type="float">
            <text:p>0</text:p>
          </table:table-cell>
          <table:table-cell table:style-name="ce90" table:formula="of:=SUMIF([.$J7:.$J408];[.$J410];[.AB$5:.AB$406])" office:value-type="float" office:value="0" calcext:value-type="float">
            <text:p>0</text:p>
          </table:table-cell>
          <table:table-cell table:style-name="ce90" table:formula="of:=SUMIF([.$J7:.$J408];[.$J410];[.AC$5:.AC$406])" office:value-type="float" office:value="0" calcext:value-type="float">
            <text:p>0</text:p>
          </table:table-cell>
          <table:table-cell table:style-name="ce90" table:formula="of:=SUMIF([.$J7:.$J408];[.$J410];[.AD$5:.AD$406])" office:value-type="float" office:value="0" calcext:value-type="float">
            <text:p>0</text:p>
          </table:table-cell>
          <table:table-cell table:style-name="ce90" table:formula="of:=SUMIF([.$J7:.$J408];[.$J410];[.AE$5:.AE$406])" office:value-type="float" office:value="0" calcext:value-type="float">
            <text:p>0</text:p>
          </table:table-cell>
          <table:table-cell table:style-name="ce114" table:formula="of:=SUMIF([.$J7:.$J408];[.$J410];[.AF$5:.AF$406])" office:value-type="float" office:value="0" calcext:value-type="float">
            <text:p>0</text:p>
          </table:table-cell>
          <table:table-cell table:style-name="ce114" table:formula="of:=SUMIF([.$J7:.$J408];[.$J410];[.AG$5:.AG$406])" office:value-type="float" office:value="0" calcext:value-type="float">
            <text:p>0</text:p>
          </table:table-cell>
          <table:table-cell table:style-name="ce90" table:formula="of:=SUMIF([.$J7:.$J408];[.$J410];[.AH$5:.AH$406])" office:value-type="float" office:value="0" calcext:value-type="float">
            <text:p>0</text:p>
          </table:table-cell>
          <table:table-cell table:style-name="ce90" table:formula="of:=SUMIF([.$J7:.$J408];[.$J410];[.AI$5:.AI$406])" office:value-type="float" office:value="0" calcext:value-type="float">
            <text:p>0</text:p>
          </table:table-cell>
          <table:table-cell table:style-name="ce90" table:formula="of:=SUMIF([.$J7:.$J408];[.$J410];[.AJ$5:.AJ$406])" office:value-type="float" office:value="0" calcext:value-type="float">
            <text:p>0</text:p>
          </table:table-cell>
          <table:table-cell table:style-name="ce90" table:formula="of:=SUMIF([.$J7:.$J408];[.$J410];[.AK$5:.AK$406])" office:value-type="float" office:value="0" calcext:value-type="float">
            <text:p>0</text:p>
          </table:table-cell>
          <table:table-cell table:style-name="ce90" table:formula="of:=SUMIF([.$J7:.$J408];[.$J410];[.AL$5:.AL$406])" office:value-type="float" office:value="0" calcext:value-type="float">
            <text:p>0</text:p>
          </table:table-cell>
          <table:table-cell table:style-name="ce114" table:formula="of:=SUMIF([.$J7:.$J408];[.$J410];[.AM$5:.AM$406])" office:value-type="float" office:value="0" calcext:value-type="float">
            <text:p>0</text:p>
          </table:table-cell>
          <table:table-cell table:style-name="ce114" table:formula="of:=SUMIF([.$J7:.$J408];[.$J410];[.AN$5:.AN$406])" office:value-type="float" office:value="0" calcext:value-type="float">
            <text:p>0</text:p>
          </table:table-cell>
          <table:table-cell table:style-name="ce90" table:formula="of:=SUMIF([.$J7:.$J408];[.$J410];[.AO$5:.AO$406])" office:value-type="float" office:value="0" calcext:value-type="float">
            <text:p>0</text:p>
          </table:table-cell>
          <table:table-cell table:style-name="ce90" table:formula="of:=SUMIF([.$J7:.$J408];[.$J410];[.AP$5:.AP$406])" office:value-type="float" office:value="0" calcext:value-type="float">
            <text:p>0</text:p>
          </table:table-cell>
          <table:table-cell table:style-name="ce90" table:formula="of:=SUMIF([.$J7:.$J408];[.$J410];[.AQ$5:.AQ$406])" office:value-type="float" office:value="0" calcext:value-type="float">
            <text:p>0</text:p>
          </table:table-cell>
          <table:table-cell table:style-name="ce90" table:formula="of:=SUMIF([.$J7:.$J408];[.$J410];[.AR$5:.AR$406])" office:value-type="float" office:value="0" calcext:value-type="float">
            <text:p>0</text:p>
          </table:table-cell>
          <table:table-cell table:style-name="ce143" table:formula="of:=SUMIF([.$J7:.$J408];[.$J410];[.AS$5:.AS$406])" office:value-type="float" office:value="0" calcext:value-type="float">
            <text:p>0</text:p>
          </table:table-cell>
          <table:table-cell table:style-name="ce114" table:formula="of:=SUMIF([.$J7:.$J408];[.$J410];[.AT$5:.AT$406])" office:value-type="float" office:value="0" calcext:value-type="float">
            <text:p>0</text:p>
          </table:table-cell>
          <table:table-cell table:style-name="ce114" table:formula="of:=SUMIF([.$J7:.$J408];[.$J410];[.AU$5:.AU$406])" office:value-type="float" office:value="0" calcext:value-type="float">
            <text:p>0</text:p>
          </table:table-cell>
          <table:table-cell table:style-name="ce157" table:formula="of:=SUMIF([.$J7:.$J408];[.$J410];[.AV$5:.AV$406])" office:value-type="float" office:value="0" calcext:value-type="float">
            <text:p>0</text:p>
          </table:table-cell>
          <table:table-cell table:style-name="ce90" table:formula="of:=SUMIF([.$J7:.$J408];[.$J410];[.AW$5:.AW$406])" office:value-type="float" office:value="0" calcext:value-type="float">
            <text:p>0</text:p>
          </table:table-cell>
          <table:table-cell table:style-name="ce90" table:formula="of:=SUMIF([.$J7:.$J408];[.$J410];[.AX$5:.AX$406])" office:value-type="float" office:value="0" calcext:value-type="float">
            <text:p>0</text:p>
          </table:table-cell>
          <table:table-cell table:style-name="ce90" table:formula="of:=SUMIF([.$J7:.$J408];[.$J410];[.AY$5:.AY$406])" office:value-type="float" office:value="0" calcext:value-type="float">
            <text:p>0</text:p>
          </table:table-cell>
          <table:table-cell table:style-name="ce90" table:formula="of:=SUMIF([.$J7:.$J408];[.$J410];[.AZ$5:.AZ$406])" office:value-type="float" office:value="0" calcext:value-type="float">
            <text:p>0</text:p>
          </table:table-cell>
          <table:table-cell table:style-name="ce90" table:formula="of:=SUMIF([.$J7:.$J408];[.$J410];[.BA$5:.BA$406])" office:value-type="float" office:value="0" calcext:value-type="float">
            <text:p>0</text:p>
          </table:table-cell>
          <table:table-cell table:style-name="ce90" table:formula="of:=SUMIF([.$J7:.$J408];[.$J410];[.BB$5:.BB$406])" office:value-type="float" office:value="0" calcext:value-type="float">
            <text:p>0</text:p>
          </table:table-cell>
          <table:table-cell table:style-name="ce90" table:formula="of:=SUMIF([.$J7:.$J408];[.$J410];[.BC$5:.BC$406])" office:value-type="float" office:value="0" calcext:value-type="float">
            <text:p>0</text:p>
          </table:table-cell>
          <table:table-cell table:style-name="ce90" table:formula="of:=SUMIF([.$J7:.$J408];[.$J410];[.BD$5:.BD$406])" office:value-type="float" office:value="0" calcext:value-type="float">
            <text:p>0</text:p>
          </table:table-cell>
          <table:table-cell table:style-name="ce90" table:formula="of:=SUMIF([.$J7:.$J408];[.$J410];[.BE$5:.BE$406])" office:value-type="float" office:value="0" calcext:value-type="float">
            <text:p>0</text:p>
          </table:table-cell>
          <table:table-cell table:style-name="ce90" table:formula="of:=SUMIF([.$J7:.$J408];[.$J410];[.BF$5:.BF$406])" office:value-type="float" office:value="0" calcext:value-type="float">
            <text:p>0</text:p>
          </table:table-cell>
          <table:table-cell table:style-name="ce90" table:formula="of:=SUMIF([.$J7:.$J408];[.$J410];[.BG$5:.BG$406])" office:value-type="float" office:value="0" calcext:value-type="float">
            <text:p>0</text:p>
          </table:table-cell>
          <table:table-cell table:style-name="ce90" table:formula="of:=SUMIF([.$J7:.$J408];[.$J410];[.BH$5:.BH$406])" office:value-type="float" office:value="0" calcext:value-type="float">
            <text:p>0</text:p>
          </table:table-cell>
          <table:table-cell table:style-name="ce90" table:formula="of:=SUMIF([.$J7:.$J408];[.$J410];[.BI$5:.BI$406])" office:value-type="float" office:value="0" calcext:value-type="float">
            <text:p>0</text:p>
          </table:table-cell>
          <table:table-cell table:style-name="ce90" table:formula="of:=SUMIF([.$J7:.$J408];[.$J410];[.BJ$5:.BJ$406])" office:value-type="float" office:value="0" calcext:value-type="float">
            <text:p>0</text:p>
          </table:table-cell>
          <table:table-cell table:style-name="ce90" table:formula="of:=SUMIF([.$J7:.$J408];[.$J410];[.BK$5:.BK$406])" office:value-type="float" office:value="0" calcext:value-type="float">
            <text:p>0</text:p>
          </table:table-cell>
          <table:table-cell table:style-name="ce90" table:formula="of:=SUMIF([.$J7:.$J408];[.$J410];[.BL$5:.BL$406])" office:value-type="float" office:value="0" calcext:value-type="float">
            <text:p>0</text:p>
          </table:table-cell>
          <table:table-cell table:style-name="ce90" table:formula="of:=SUMIF([.$J7:.$J408];[.$J410];[.BM$5:.BM$406])" office:value-type="float" office:value="0" calcext:value-type="float">
            <text:p>0</text:p>
          </table:table-cell>
          <table:table-cell table:style-name="ce90" table:formula="of:=SUMIF([.$J7:.$J408];[.$J410];[.BN$5:.BN$406])" office:value-type="float" office:value="0" calcext:value-type="float">
            <text:p>0</text:p>
          </table:table-cell>
          <table:table-cell table:style-name="ce90" table:formula="of:=SUMIF([.$J7:.$J408];[.$J410];[.BO$5:.BO$406])" office:value-type="float" office:value="0" calcext:value-type="float">
            <text:p>0</text:p>
          </table:table-cell>
          <table:table-cell table:style-name="ce90" table:formula="of:=SUMIF([.$J7:.$J408];[.$J410];[.BP$5:.BP$406])" office:value-type="float" office:value="0" calcext:value-type="float">
            <text:p>0</text:p>
          </table:table-cell>
          <table:table-cell table:style-name="ce90" table:formula="of:=SUMIF([.$J7:.$J408];[.$J410];[.BQ$5:.BQ$406])" office:value-type="float" office:value="0" calcext:value-type="float">
            <text:p>0</text:p>
          </table:table-cell>
          <table:table-cell table:style-name="ce90" table:formula="of:=SUMIF([.$J7:.$J408];[.$J410];[.BR$5:.BR$406])" office:value-type="float" office:value="0" calcext:value-type="float">
            <text:p>0</text:p>
          </table:table-cell>
          <table:table-cell table:style-name="ce90" table:formula="of:=SUMIF([.$J7:.$J408];[.$J410];[.BS$5:.BS$406])" office:value-type="float" office:value="0" calcext:value-type="float">
            <text:p>0</text:p>
          </table:table-cell>
          <table:table-cell table:style-name="ce90" table:formula="of:=SUMIF([.$J7:.$J408];[.$J410];[.BT$5:.BT$406])" office:value-type="float" office:value="0" calcext:value-type="float">
            <text:p>0</text:p>
          </table:table-cell>
          <table:table-cell table:style-name="ce90" table:formula="of:=SUMIF([.$J7:.$J408];[.$J410];[.BU$5:.BU$406])" office:value-type="float" office:value="0" calcext:value-type="float">
            <text:p>0</text:p>
          </table:table-cell>
          <table:table-cell table:style-name="ce90" table:formula="of:=SUMIF([.$J7:.$J408];[.$J410];[.BV$5:.BV$406])" office:value-type="float" office:value="0" calcext:value-type="float">
            <text:p>0</text:p>
          </table:table-cell>
          <table:table-cell table:style-name="ce90" table:formula="of:=SUMIF([.$J7:.$J408];[.$J410];[.BW$5:.BW$406])" office:value-type="float" office:value="0" calcext:value-type="float">
            <text:p>0</text:p>
          </table:table-cell>
          <table:table-cell table:style-name="ce90" table:formula="of:=SUMIF([.$J7:.$J408];[.$J410];[.BX$5:.BX$406])" office:value-type="float" office:value="0" calcext:value-type="float">
            <text:p>0</text:p>
          </table:table-cell>
          <table:table-cell table:style-name="ce90" table:formula="of:=SUMIF([.$J7:.$J408];[.$J410];[.BY$5:.BY$406])" office:value-type="float" office:value="0" calcext:value-type="float">
            <text:p>0</text:p>
          </table:table-cell>
          <table:table-cell table:style-name="ce90" table:formula="of:=SUMIF([.$J7:.$J408];[.$J410];[.BZ$5:.BZ$406])" office:value-type="float" office:value="0" calcext:value-type="float">
            <text:p>0</text:p>
          </table:table-cell>
          <table:table-cell table:style-name="ce90" table:formula="of:=SUMIF([.$J7:.$J408];[.$J410];[.CA$5:.CA$406])" office:value-type="float" office:value="0" calcext:value-type="float">
            <text:p>0</text:p>
          </table:table-cell>
          <table:table-cell table:style-name="ce90" table:formula="of:=SUMIF([.$J7:.$J408];[.$J410];[.CB$5:.CB$406])" office:value-type="float" office:value="0" calcext:value-type="float">
            <text:p>0</text:p>
          </table:table-cell>
          <table:table-cell table:style-name="ce90" table:formula="of:=SUMIF([.$J7:.$J408];[.$J410];[.CC$5:.CC$406])" office:value-type="float" office:value="0" calcext:value-type="float">
            <text:p>0</text:p>
          </table:table-cell>
          <table:table-cell table:style-name="ce90" table:formula="of:=SUMIF([.$J7:.$J408];[.$J410];[.CD$5:.CD$406])" office:value-type="float" office:value="0" calcext:value-type="float">
            <text:p>0</text:p>
          </table:table-cell>
          <table:table-cell table:style-name="ce90" table:formula="of:=SUMIF([.$J7:.$J408];[.$J410];[.CE$5:.CE$406])" office:value-type="float" office:value="0" calcext:value-type="float">
            <text:p>0</text:p>
          </table:table-cell>
          <table:table-cell table:style-name="ce90" table:formula="of:=SUMIF([.$J7:.$J408];[.$J410];[.CF$5:.CF$406])" office:value-type="float" office:value="0" calcext:value-type="float">
            <text:p>0</text:p>
          </table:table-cell>
          <table:table-cell table:style-name="ce90" table:formula="of:=SUMIF([.$J7:.$J408];[.$J410];[.CG$5:.CG$406])" office:value-type="float" office:value="0" calcext:value-type="float">
            <text:p>0</text:p>
          </table:table-cell>
          <table:table-cell table:style-name="ce90" table:formula="of:=SUMIF([.$J7:.$J408];[.$J410];[.CH$5:.CH$406])" office:value-type="float" office:value="0" calcext:value-type="float">
            <text:p>0</text:p>
          </table:table-cell>
          <table:table-cell table:style-name="ce90" table:formula="of:=SUMIF([.$J7:.$J408];[.$J410];[.CI$5:.CI$406])" office:value-type="float" office:value="0" calcext:value-type="float">
            <text:p>0</text:p>
          </table:table-cell>
          <table:table-cell table:style-name="ce90" table:formula="of:=SUMIF([.$J7:.$J408];[.$J410];[.CJ$5:.CJ$406])" office:value-type="float" office:value="0" calcext:value-type="float">
            <text:p>0</text:p>
          </table:table-cell>
          <table:table-cell table:style-name="ce90" table:formula="of:=SUMIF([.$J7:.$J408];[.$J410];[.CK$5:.CK$406])" office:value-type="float" office:value="0" calcext:value-type="float">
            <text:p>0</text:p>
          </table:table-cell>
          <table:table-cell table:style-name="ce90" table:formula="of:=SUMIF([.$J7:.$J408];[.$J410];[.CL$5:.CL$406])" office:value-type="float" office:value="0" calcext:value-type="float">
            <text:p>0</text:p>
          </table:table-cell>
          <table:table-cell table:style-name="ce90" table:formula="of:=SUMIF([.$J7:.$J408];[.$J410];[.CM$5:.CM$406])" office:value-type="float" office:value="0" calcext:value-type="float">
            <text:p>0</text:p>
          </table:table-cell>
          <table:table-cell table:style-name="ce90" table:formula="of:=SUMIF([.$J7:.$J408];[.$J410];[.CN$5:.CN$406])" office:value-type="float" office:value="0" calcext:value-type="float">
            <text:p>0</text:p>
          </table:table-cell>
          <table:table-cell table:style-name="ce90" table:formula="of:=SUMIF([.$J7:.$J408];[.$J410];[.CO$5:.CO$406])" office:value-type="float" office:value="0" calcext:value-type="float">
            <text:p>0</text:p>
          </table:table-cell>
          <table:table-cell table:style-name="ce90" table:formula="of:=SUMIF([.$J7:.$J408];[.$J410];[.CP$5:.CP$406])" office:value-type="float" office:value="0" calcext:value-type="float">
            <text:p>0</text:p>
          </table:table-cell>
          <table:table-cell table:style-name="ce90" table:formula="of:=SUMIF([.$J7:.$J408];[.$J410];[.CQ$5:.CQ$406])" office:value-type="float" office:value="0" calcext:value-type="float">
            <text:p>0</text:p>
          </table:table-cell>
          <table:table-cell table:style-name="ce90" table:formula="of:=SUMIF([.$J7:.$J408];[.$J410];[.CR$5:.CR$406])" office:value-type="float" office:value="0" calcext:value-type="float">
            <text:p>0</text:p>
          </table:table-cell>
          <table:table-cell table:style-name="ce90" table:formula="of:=SUMIF([.$J7:.$J408];[.$J410];[.CS$5:.CS$406])" office:value-type="float" office:value="0" calcext:value-type="float">
            <text:p>0</text:p>
          </table:table-cell>
          <table:table-cell table:style-name="ce90" table:formula="of:=SUMIF([.$J7:.$J408];[.$J410];[.CT$5:.CT$406])" office:value-type="float" office:value="0" calcext:value-type="float">
            <text:p>0</text:p>
          </table:table-cell>
          <table:table-cell table:style-name="ce90" table:formula="of:=SUMIF([.$J7:.$J408];[.$J410];[.CU$5:.CU$406])" office:value-type="float" office:value="0" calcext:value-type="float">
            <text:p>0</text:p>
          </table:table-cell>
          <table:table-cell table:style-name="ce90" table:formula="of:=SUMIF([.$J7:.$J408];[.$J410];[.CV$5:.CV$406])" office:value-type="float" office:value="0" calcext:value-type="float">
            <text:p>0</text:p>
          </table:table-cell>
          <table:table-cell table:style-name="ce90" table:formula="of:=SUMIF([.$J7:.$J408];[.$J410];[.CW$5:.CW$406])" office:value-type="float" office:value="0" calcext:value-type="float">
            <text:p>0</text:p>
          </table:table-cell>
          <table:table-cell table:style-name="ce90" table:formula="of:=SUMIF([.$J7:.$J408];[.$J410];[.CX$5:.CX$406])" office:value-type="float" office:value="0" calcext:value-type="float">
            <text:p>0</text:p>
          </table:table-cell>
          <table:table-cell table:style-name="ce90" table:formula="of:=SUMIF([.$J7:.$J408];[.$J410];[.CY$5:.CY$406])" office:value-type="float" office:value="0" calcext:value-type="float">
            <text:p>0</text:p>
          </table:table-cell>
          <table:table-cell table:style-name="ce90" table:formula="of:=SUMIF([.$J7:.$J408];[.$J410];[.CZ$5:.CZ$406])" office:value-type="float" office:value="0" calcext:value-type="float">
            <text:p>0</text:p>
          </table:table-cell>
          <table:table-cell table:style-name="ce90" table:formula="of:=SUMIF([.$J7:.$J408];[.$J410];[.DA$5:.DA$406])" office:value-type="float" office:value="0" calcext:value-type="float">
            <text:p>0</text:p>
          </table:table-cell>
          <table:table-cell table:style-name="ce90" table:formula="of:=SUMIF([.$J7:.$J408];[.$J410];[.DB$5:.DB$406])" office:value-type="float" office:value="0" calcext:value-type="float">
            <text:p>0</text:p>
          </table:table-cell>
          <table:table-cell table:style-name="ce90" table:formula="of:=SUMIF([.$J7:.$J408];[.$J410];[.DC$5:.DC$406])" office:value-type="float" office:value="0" calcext:value-type="float">
            <text:p>0</text:p>
          </table:table-cell>
          <table:table-cell table:style-name="ce90" table:formula="of:=SUMIF([.$J7:.$J408];[.$J410];[.DD$5:.DD$406])" office:value-type="float" office:value="0" calcext:value-type="float">
            <text:p>0</text:p>
          </table:table-cell>
          <table:table-cell table:style-name="ce90" table:formula="of:=SUMIF([.$J7:.$J408];[.$J410];[.DE$5:.DE$406])" office:value-type="float" office:value="0" calcext:value-type="float">
            <text:p>0</text:p>
          </table:table-cell>
          <table:table-cell table:style-name="ce90" table:formula="of:=SUMIF([.$J7:.$J408];[.$J410];[.DF$5:.DF$406])" office:value-type="float" office:value="0" calcext:value-type="float">
            <text:p>0</text:p>
          </table:table-cell>
          <table:table-cell table:style-name="ce90" table:formula="of:=SUMIF([.$J7:.$J408];[.$J410];[.DG$5:.DG$406])" office:value-type="float" office:value="0" calcext:value-type="float">
            <text:p>0</text:p>
          </table:table-cell>
          <table:table-cell table:style-name="ce90" table:formula="of:=SUMIF([.$J7:.$J408];[.$J410];[.DH$5:.DH$406])" office:value-type="float" office:value="0" calcext:value-type="float">
            <text:p>0</text:p>
          </table:table-cell>
          <table:table-cell table:style-name="ce90" table:formula="of:=SUMIF([.$J7:.$J408];[.$J410];[.DI$5:.DI$406])" office:value-type="float" office:value="0" calcext:value-type="float">
            <text:p>0</text:p>
          </table:table-cell>
          <table:table-cell table:style-name="ce90" table:formula="of:=SUMIF([.$J7:.$J408];[.$J410];[.DJ$5:.DJ$406])" office:value-type="float" office:value="0" calcext:value-type="float">
            <text:p>0</text:p>
          </table:table-cell>
          <table:table-cell table:style-name="ce90" table:formula="of:=SUMIF([.$J7:.$J408];[.$J410];[.DK$5:.DK$406])" office:value-type="float" office:value="0" calcext:value-type="float">
            <text:p>0</text:p>
          </table:table-cell>
          <table:table-cell table:style-name="ce90" table:formula="of:=SUMIF([.$J7:.$J408];[.$J410];[.DL$5:.DL$406])" office:value-type="float" office:value="0" calcext:value-type="float">
            <text:p>0</text:p>
          </table:table-cell>
          <table:table-cell table:style-name="ce90" table:formula="of:=SUMIF([.$J7:.$J408];[.$J410];[.DM$5:.DM$406])" office:value-type="float" office:value="0" calcext:value-type="float">
            <text:p>0</text:p>
          </table:table-cell>
          <table:table-cell table:style-name="ce90" table:formula="of:=SUMIF([.$J7:.$J408];[.$J410];[.DN$5:.DN$406])" office:value-type="float" office:value="0" calcext:value-type="float">
            <text:p>0</text:p>
          </table:table-cell>
          <table:table-cell table:style-name="ce90" table:formula="of:=SUMIF([.$J7:.$J408];[.$J410];[.DO$5:.DO$406])" office:value-type="float" office:value="0" calcext:value-type="float">
            <text:p>0</text:p>
          </table:table-cell>
          <table:table-cell table:style-name="ce90" table:formula="of:=SUMIF([.$J7:.$J408];[.$J410];[.DP$5:.DP$406])" office:value-type="float" office:value="0" calcext:value-type="float">
            <text:p>0</text:p>
          </table:table-cell>
          <table:table-cell table:style-name="ce90" table:formula="of:=SUMIF([.$J7:.$J408];[.$J410];[.DQ$5:.DQ$406])" office:value-type="float" office:value="0" calcext:value-type="float">
            <text:p>0</text:p>
          </table:table-cell>
          <table:table-cell table:style-name="ce90" table:formula="of:=SUMIF([.$J7:.$J408];[.$J410];[.DR$5:.DR$406])" office:value-type="float" office:value="0" calcext:value-type="float">
            <text:p>0</text:p>
          </table:table-cell>
          <table:table-cell table:style-name="ce90" table:formula="of:=SUMIF([.$J7:.$J408];[.$J410];[.DS$5:.DS$406])" office:value-type="float" office:value="0" calcext:value-type="float">
            <text:p>0</text:p>
          </table:table-cell>
          <table:table-cell table:style-name="ce90" table:formula="of:=SUMIF([.$J7:.$J408];[.$J410];[.DT$5:.DT$406])" office:value-type="float" office:value="0" calcext:value-type="float">
            <text:p>0</text:p>
          </table:table-cell>
          <table:table-cell table:style-name="ce90" table:formula="of:=SUMIF([.$J7:.$J408];[.$J410];[.DU$5:.DU$406])" office:value-type="float" office:value="0" calcext:value-type="float">
            <text:p>0</text:p>
          </table:table-cell>
          <table:table-cell table:style-name="ce90" table:formula="of:=SUMIF([.$J7:.$J408];[.$J410];[.DV$5:.DV$406])" office:value-type="float" office:value="0" calcext:value-type="float">
            <text:p>0</text:p>
          </table:table-cell>
          <table:table-cell table:style-name="ce90" table:formula="of:=SUMIF([.$J7:.$J408];[.$J410];[.DW$5:.DW$406])" office:value-type="float" office:value="0" calcext:value-type="float">
            <text:p>0</text:p>
          </table:table-cell>
          <table:table-cell table:style-name="ce90" table:formula="of:=SUMIF([.$J7:.$J408];[.$J410];[.DX$5:.DX$406])" office:value-type="float" office:value="0" calcext:value-type="float">
            <text:p>0</text:p>
          </table:table-cell>
          <table:table-cell table:style-name="ce90" table:formula="of:=SUMIF([.$J7:.$J408];[.$J410];[.DY$5:.DY$406])" office:value-type="float" office:value="0" calcext:value-type="float">
            <text:p>0</text:p>
          </table:table-cell>
          <table:table-cell table:style-name="ce90" table:formula="of:=SUMIF([.$J7:.$J408];[.$J410];[.DZ$5:.DZ$406])" office:value-type="float" office:value="0" calcext:value-type="float">
            <text:p>0</text:p>
          </table:table-cell>
          <table:table-cell table:style-name="ce90" table:formula="of:=SUMIF([.$J7:.$J408];[.$J410];[.EA$5:.EA$406])" office:value-type="float" office:value="0" calcext:value-type="float">
            <text:p>0</text:p>
          </table:table-cell>
          <table:table-cell table:style-name="ce90" table:formula="of:=SUMIF([.$J7:.$J408];[.$J410];[.EB$5:.EB$406])" office:value-type="float" office:value="0" calcext:value-type="float">
            <text:p>0</text:p>
          </table:table-cell>
          <table:table-cell table:style-name="ce90" table:formula="of:=SUMIF([.$J7:.$J408];[.$J410];[.EC$5:.EC$406])" office:value-type="float" office:value="0" calcext:value-type="float">
            <text:p>0</text:p>
          </table:table-cell>
          <table:table-cell table:style-name="ce90" table:formula="of:=SUMIF([.$J7:.$J408];[.$J410];[.ED$5:.ED$406])" office:value-type="float" office:value="0" calcext:value-type="float">
            <text:p>0</text:p>
          </table:table-cell>
          <table:table-cell table:style-name="ce90" table:formula="of:=SUMIF([.$J7:.$J408];[.$J410];[.EE$5:.EE$406])" office:value-type="float" office:value="0" calcext:value-type="float">
            <text:p>0</text:p>
          </table:table-cell>
          <table:table-cell table:style-name="ce90" table:formula="of:=SUMIF([.$J7:.$J408];[.$J410];[.EF$5:.EF$406])" office:value-type="float" office:value="0" calcext:value-type="float">
            <text:p>0</text:p>
          </table:table-cell>
          <table:table-cell table:style-name="ce90" table:formula="of:=SUMIF([.$J7:.$J408];[.$J410];[.EG$5:.EG$406])" office:value-type="float" office:value="0" calcext:value-type="float">
            <text:p>0</text:p>
          </table:table-cell>
          <table:table-cell table:style-name="ce90" table:formula="of:=SUMIF([.$J7:.$J408];[.$J410];[.EH$5:.EH$406])" office:value-type="float" office:value="0" calcext:value-type="float">
            <text:p>0</text:p>
          </table:table-cell>
          <table:table-cell table:style-name="ce90" table:formula="of:=SUMIF([.$J7:.$J408];[.$J410];[.EI$5:.EI$406])" office:value-type="float" office:value="0" calcext:value-type="float">
            <text:p>0</text:p>
          </table:table-cell>
          <table:table-cell table:style-name="ce90" table:formula="of:=SUMIF([.$J7:.$J408];[.$J410];[.EJ$5:.EJ$406])" office:value-type="float" office:value="0" calcext:value-type="float">
            <text:p>0</text:p>
          </table:table-cell>
          <table:table-cell table:style-name="ce90" table:formula="of:=SUMIF([.$J7:.$J408];[.$J410];[.EK$5:.EK$406])" office:value-type="float" office:value="0" calcext:value-type="float">
            <text:p>0</text:p>
          </table:table-cell>
          <table:table-cell table:style-name="ce90" table:formula="of:=SUMIF([.$J7:.$J408];[.$J410];[.EL$5:.EL$406])" office:value-type="float" office:value="0" calcext:value-type="float">
            <text:p>0</text:p>
          </table:table-cell>
          <table:table-cell table:style-name="ce90" table:formula="of:=SUMIF([.$J7:.$J408];[.$J410];[.EM$5:.EM$406])" office:value-type="float" office:value="0" calcext:value-type="float">
            <text:p>0</text:p>
          </table:table-cell>
          <table:table-cell table:style-name="ce90" table:formula="of:=SUMIF([.$J7:.$J408];[.$J410];[.EN$5:.EN$406])" office:value-type="float" office:value="0" calcext:value-type="float">
            <text:p>0</text:p>
          </table:table-cell>
          <table:table-cell table:style-name="ce90" table:formula="of:=SUMIF([.$J7:.$J408];[.$J410];[.EO$5:.EO$406])" office:value-type="float" office:value="0" calcext:value-type="float">
            <text:p>0</text:p>
          </table:table-cell>
          <table:table-cell table:style-name="ce90" table:formula="of:=SUMIF([.$J7:.$J408];[.$J410];[.EP$5:.EP$406])" office:value-type="float" office:value="0" calcext:value-type="float">
            <text:p>0</text:p>
          </table:table-cell>
          <table:table-cell table:style-name="ce90" table:formula="of:=SUMIF([.$J7:.$J408];[.$J410];[.EQ$5:.EQ$406])" office:value-type="float" office:value="0" calcext:value-type="float">
            <text:p>0</text:p>
          </table:table-cell>
          <table:table-cell table:style-name="ce90" table:formula="of:=SUMIF([.$J7:.$J408];[.$J410];[.ER$5:.ER$406])" office:value-type="float" office:value="0" calcext:value-type="float">
            <text:p>0</text:p>
          </table:table-cell>
          <table:table-cell table:style-name="ce90" table:formula="of:=SUMIF([.$J7:.$J408];[.$J410];[.ES$5:.ES$406])" office:value-type="float" office:value="0" calcext:value-type="float">
            <text:p>0</text:p>
          </table:table-cell>
          <table:table-cell table:style-name="ce90" table:formula="of:=SUMIF([.$J7:.$J408];[.$J410];[.ET$5:.ET$406])" office:value-type="float" office:value="0" calcext:value-type="float">
            <text:p>0</text:p>
          </table:table-cell>
          <table:table-cell table:style-name="ce90" table:formula="of:=SUMIF([.$J7:.$J408];[.$J410];[.EU$5:.EU$406])" office:value-type="float" office:value="0" calcext:value-type="float">
            <text:p>0</text:p>
          </table:table-cell>
          <table:table-cell table:style-name="ce90" table:formula="of:=SUMIF([.$J7:.$J408];[.$J410];[.EV$5:.EV$406])" office:value-type="float" office:value="0" calcext:value-type="float">
            <text:p>0</text:p>
          </table:table-cell>
          <table:table-cell table:style-name="ce90" table:formula="of:=SUMIF([.$J7:.$J408];[.$J410];[.EW$5:.EW$406])" office:value-type="float" office:value="0" calcext:value-type="float">
            <text:p>0</text:p>
          </table:table-cell>
          <table:table-cell table:style-name="ce90" table:formula="of:=SUMIF([.$J7:.$J408];[.$J410];[.EX$5:.EX$406])" office:value-type="float" office:value="0" calcext:value-type="float">
            <text:p>0</text:p>
          </table:table-cell>
          <table:table-cell table:style-name="ce90" table:formula="of:=SUMIF([.$J7:.$J408];[.$J410];[.EY$5:.EY$406])" office:value-type="float" office:value="0" calcext:value-type="float">
            <text:p>0</text:p>
          </table:table-cell>
          <table:table-cell table:style-name="ce90" table:formula="of:=SUMIF([.$J7:.$J408];[.$J410];[.EZ$5:.EZ$406])" office:value-type="float" office:value="0" calcext:value-type="float">
            <text:p>0</text:p>
          </table:table-cell>
          <table:table-cell table:style-name="ce90" table:formula="of:=SUMIF([.$J7:.$J408];[.$J410];[.FA$5:.FA$406])" office:value-type="float" office:value="0" calcext:value-type="float">
            <text:p>0</text:p>
          </table:table-cell>
          <table:table-cell table:style-name="ce90" table:formula="of:=SUMIF([.$J7:.$J408];[.$J410];[.FB$5:.FB$406])" office:value-type="float" office:value="0" calcext:value-type="float">
            <text:p>0</text:p>
          </table:table-cell>
          <table:table-cell table:style-name="ce90" table:formula="of:=SUMIF([.$J7:.$J408];[.$J410];[.FC$5:.FC$406])" office:value-type="float" office:value="0" calcext:value-type="float">
            <text:p>0</text:p>
          </table:table-cell>
          <table:table-cell table:style-name="ce90" table:formula="of:=SUMIF([.$J7:.$J408];[.$J410];[.FD$5:.FD$406])" office:value-type="float" office:value="0" calcext:value-type="float">
            <text:p>0</text:p>
          </table:table-cell>
          <table:table-cell table:style-name="ce90" table:formula="of:=SUMIF([.$J7:.$J408];[.$J410];[.FE$5:.FE$406])" office:value-type="float" office:value="0" calcext:value-type="float">
            <text:p>0</text:p>
          </table:table-cell>
          <table:table-cell table:style-name="ce90" table:formula="of:=SUMIF([.$J7:.$J408];[.$J410];[.FF$5:.FF$406])" office:value-type="float" office:value="0" calcext:value-type="float">
            <text:p>0</text:p>
          </table:table-cell>
          <table:table-cell table:style-name="ce90" table:formula="of:=SUMIF([.$J7:.$J408];[.$J410];[.FG$5:.FG$406])" office:value-type="float" office:value="0" calcext:value-type="float">
            <text:p>0</text:p>
          </table:table-cell>
          <table:table-cell table:style-name="ce90" table:formula="of:=SUMIF([.$J7:.$J408];[.$J410];[.FH$5:.FH$406])" office:value-type="float" office:value="0" calcext:value-type="float">
            <text:p>0</text:p>
          </table:table-cell>
          <table:table-cell table:style-name="ce90" table:formula="of:=SUMIF([.$J7:.$J408];[.$J410];[.FI$5:.FI$406])" office:value-type="float" office:value="0" calcext:value-type="float">
            <text:p>0</text:p>
          </table:table-cell>
          <table:table-cell table:style-name="ce90" table:formula="of:=SUMIF([.$J7:.$J408];[.$J410];[.FJ$5:.FJ$406])" office:value-type="float" office:value="0" calcext:value-type="float">
            <text:p>0</text:p>
          </table:table-cell>
          <table:table-cell table:style-name="ce90" table:formula="of:=SUMIF([.$J7:.$J408];[.$J410];[.FK$5:.FK$406])" office:value-type="float" office:value="0" calcext:value-type="float">
            <text:p>0</text:p>
          </table:table-cell>
          <table:table-cell table:style-name="ce90" table:formula="of:=SUMIF([.$J7:.$J408];[.$J410];[.FL$5:.FL$406])" office:value-type="float" office:value="0" calcext:value-type="float">
            <text:p>0</text:p>
          </table:table-cell>
          <table:table-cell table:style-name="ce90" table:formula="of:=SUMIF([.$J7:.$J408];[.$J410];[.FM$5:.FM$406])" office:value-type="float" office:value="0" calcext:value-type="float">
            <text:p>0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6"/>
          <table:table-cell table:style-name="ce38" table:number-columns-repeated="2"/>
          <table:table-cell table:style-name="ce43" table:number-columns-repeated="2"/>
          <table:table-cell table:style-name="ce32" table:formula="of:=IF([.$L411]&lt;&gt;&quot;&quot;;NETWORKDAYS([.$L411];[.$M411];[$休日.$B$4:.$B$304]);&quot;&quot;)">
            <text:p/>
          </table:table-cell>
          <table:table-cell table:style-name="ce61"/>
          <table:table-cell table:style-name="ce63" table:formula="of:=IF(OR(AND([.$N411]=&quot;&quot;;[.$L411]&lt;&gt;&quot;&quot;;[.$L411]&lt;=[.$U$1]);AND([.$M411]&lt;&gt;&quot;&quot;;[.Q411]&lt;100;[.$M411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8:.$J409];[.$J411];[.V$5:.V$406])" office:value-type="float" office:value="0" calcext:value-type="float">
            <text:p>0</text:p>
          </table:table-cell>
          <table:table-cell table:style-name="ce90" table:formula="of:=SUMIF([.$J8:.$J409];[.$J411];[.W$5:.W$406])" office:value-type="float" office:value="0" calcext:value-type="float">
            <text:p>0</text:p>
          </table:table-cell>
          <table:table-cell table:style-name="ce90" table:formula="of:=SUMIF([.$J8:.$J409];[.$J411];[.X$5:.X$406])" office:value-type="float" office:value="0" calcext:value-type="float">
            <text:p>0</text:p>
          </table:table-cell>
          <table:table-cell table:style-name="ce114" table:formula="of:=SUMIF([.$J8:.$J409];[.$J411];[.Y$5:.Y$406])" office:value-type="float" office:value="0" calcext:value-type="float">
            <text:p>0</text:p>
          </table:table-cell>
          <table:table-cell table:style-name="ce114" table:formula="of:=SUMIF([.$J8:.$J409];[.$J411];[.Z$5:.Z$406])" office:value-type="float" office:value="0" calcext:value-type="float">
            <text:p>0</text:p>
          </table:table-cell>
          <table:table-cell table:style-name="ce90" table:formula="of:=SUMIF([.$J8:.$J409];[.$J411];[.AA$5:.AA$406])" office:value-type="float" office:value="0" calcext:value-type="float">
            <text:p>0</text:p>
          </table:table-cell>
          <table:table-cell table:style-name="ce90" table:formula="of:=SUMIF([.$J8:.$J409];[.$J411];[.AB$5:.AB$406])" office:value-type="float" office:value="0" calcext:value-type="float">
            <text:p>0</text:p>
          </table:table-cell>
          <table:table-cell table:style-name="ce90" table:formula="of:=SUMIF([.$J8:.$J409];[.$J411];[.AC$5:.AC$406])" office:value-type="float" office:value="0" calcext:value-type="float">
            <text:p>0</text:p>
          </table:table-cell>
          <table:table-cell table:style-name="ce90" table:formula="of:=SUMIF([.$J8:.$J409];[.$J411];[.AD$5:.AD$406])" office:value-type="float" office:value="0" calcext:value-type="float">
            <text:p>0</text:p>
          </table:table-cell>
          <table:table-cell table:style-name="ce90" table:formula="of:=SUMIF([.$J8:.$J409];[.$J411];[.AE$5:.AE$406])" office:value-type="float" office:value="0" calcext:value-type="float">
            <text:p>0</text:p>
          </table:table-cell>
          <table:table-cell table:style-name="ce114" table:formula="of:=SUMIF([.$J8:.$J409];[.$J411];[.AF$5:.AF$406])" office:value-type="float" office:value="0" calcext:value-type="float">
            <text:p>0</text:p>
          </table:table-cell>
          <table:table-cell table:style-name="ce114" table:formula="of:=SUMIF([.$J8:.$J409];[.$J411];[.AG$5:.AG$406])" office:value-type="float" office:value="0" calcext:value-type="float">
            <text:p>0</text:p>
          </table:table-cell>
          <table:table-cell table:style-name="ce90" table:formula="of:=SUMIF([.$J8:.$J409];[.$J411];[.AH$5:.AH$406])" office:value-type="float" office:value="0" calcext:value-type="float">
            <text:p>0</text:p>
          </table:table-cell>
          <table:table-cell table:style-name="ce90" table:formula="of:=SUMIF([.$J8:.$J409];[.$J411];[.AI$5:.AI$406])" office:value-type="float" office:value="0" calcext:value-type="float">
            <text:p>0</text:p>
          </table:table-cell>
          <table:table-cell table:style-name="ce90" table:formula="of:=SUMIF([.$J8:.$J409];[.$J411];[.AJ$5:.AJ$406])" office:value-type="float" office:value="0" calcext:value-type="float">
            <text:p>0</text:p>
          </table:table-cell>
          <table:table-cell table:style-name="ce90" table:formula="of:=SUMIF([.$J8:.$J409];[.$J411];[.AK$5:.AK$406])" office:value-type="float" office:value="0" calcext:value-type="float">
            <text:p>0</text:p>
          </table:table-cell>
          <table:table-cell table:style-name="ce90" table:formula="of:=SUMIF([.$J8:.$J409];[.$J411];[.AL$5:.AL$406])" office:value-type="float" office:value="0" calcext:value-type="float">
            <text:p>0</text:p>
          </table:table-cell>
          <table:table-cell table:style-name="ce114" table:formula="of:=SUMIF([.$J8:.$J409];[.$J411];[.AM$5:.AM$406])" office:value-type="float" office:value="0" calcext:value-type="float">
            <text:p>0</text:p>
          </table:table-cell>
          <table:table-cell table:style-name="ce114" table:formula="of:=SUMIF([.$J8:.$J409];[.$J411];[.AN$5:.AN$406])" office:value-type="float" office:value="0" calcext:value-type="float">
            <text:p>0</text:p>
          </table:table-cell>
          <table:table-cell table:style-name="ce90" table:formula="of:=SUMIF([.$J8:.$J409];[.$J411];[.AO$5:.AO$406])" office:value-type="float" office:value="0" calcext:value-type="float">
            <text:p>0</text:p>
          </table:table-cell>
          <table:table-cell table:style-name="ce90" table:formula="of:=SUMIF([.$J8:.$J409];[.$J411];[.AP$5:.AP$406])" office:value-type="float" office:value="0" calcext:value-type="float">
            <text:p>0</text:p>
          </table:table-cell>
          <table:table-cell table:style-name="ce90" table:formula="of:=SUMIF([.$J8:.$J409];[.$J411];[.AQ$5:.AQ$406])" office:value-type="float" office:value="0" calcext:value-type="float">
            <text:p>0</text:p>
          </table:table-cell>
          <table:table-cell table:style-name="ce90" table:formula="of:=SUMIF([.$J8:.$J409];[.$J411];[.AR$5:.AR$406])" office:value-type="float" office:value="0" calcext:value-type="float">
            <text:p>0</text:p>
          </table:table-cell>
          <table:table-cell table:style-name="ce143" table:formula="of:=SUMIF([.$J8:.$J409];[.$J411];[.AS$5:.AS$406])" office:value-type="float" office:value="0" calcext:value-type="float">
            <text:p>0</text:p>
          </table:table-cell>
          <table:table-cell table:style-name="ce114" table:formula="of:=SUMIF([.$J8:.$J409];[.$J411];[.AT$5:.AT$406])" office:value-type="float" office:value="0" calcext:value-type="float">
            <text:p>0</text:p>
          </table:table-cell>
          <table:table-cell table:style-name="ce114" table:formula="of:=SUMIF([.$J8:.$J409];[.$J411];[.AU$5:.AU$406])" office:value-type="float" office:value="0" calcext:value-type="float">
            <text:p>0</text:p>
          </table:table-cell>
          <table:table-cell table:style-name="ce157" table:formula="of:=SUMIF([.$J8:.$J409];[.$J411];[.AV$5:.AV$406])" office:value-type="float" office:value="0" calcext:value-type="float">
            <text:p>0</text:p>
          </table:table-cell>
          <table:table-cell table:style-name="ce90" table:formula="of:=SUMIF([.$J8:.$J409];[.$J411];[.AW$5:.AW$406])" office:value-type="float" office:value="0" calcext:value-type="float">
            <text:p>0</text:p>
          </table:table-cell>
          <table:table-cell table:style-name="ce90" table:formula="of:=SUMIF([.$J8:.$J409];[.$J411];[.AX$5:.AX$406])" office:value-type="float" office:value="0" calcext:value-type="float">
            <text:p>0</text:p>
          </table:table-cell>
          <table:table-cell table:style-name="ce90" table:formula="of:=SUMIF([.$J8:.$J409];[.$J411];[.AY$5:.AY$406])" office:value-type="float" office:value="0" calcext:value-type="float">
            <text:p>0</text:p>
          </table:table-cell>
          <table:table-cell table:style-name="ce90" table:formula="of:=SUMIF([.$J8:.$J409];[.$J411];[.AZ$5:.AZ$406])" office:value-type="float" office:value="0" calcext:value-type="float">
            <text:p>0</text:p>
          </table:table-cell>
          <table:table-cell table:style-name="ce90" table:formula="of:=SUMIF([.$J8:.$J409];[.$J411];[.BA$5:.BA$406])" office:value-type="float" office:value="0" calcext:value-type="float">
            <text:p>0</text:p>
          </table:table-cell>
          <table:table-cell table:style-name="ce90" table:formula="of:=SUMIF([.$J8:.$J409];[.$J411];[.BB$5:.BB$406])" office:value-type="float" office:value="0" calcext:value-type="float">
            <text:p>0</text:p>
          </table:table-cell>
          <table:table-cell table:style-name="ce90" table:formula="of:=SUMIF([.$J8:.$J409];[.$J411];[.BC$5:.BC$406])" office:value-type="float" office:value="0" calcext:value-type="float">
            <text:p>0</text:p>
          </table:table-cell>
          <table:table-cell table:style-name="ce90" table:formula="of:=SUMIF([.$J8:.$J409];[.$J411];[.BD$5:.BD$406])" office:value-type="float" office:value="0" calcext:value-type="float">
            <text:p>0</text:p>
          </table:table-cell>
          <table:table-cell table:style-name="ce90" table:formula="of:=SUMIF([.$J8:.$J409];[.$J411];[.BE$5:.BE$406])" office:value-type="float" office:value="0" calcext:value-type="float">
            <text:p>0</text:p>
          </table:table-cell>
          <table:table-cell table:style-name="ce90" table:formula="of:=SUMIF([.$J8:.$J409];[.$J411];[.BF$5:.BF$406])" office:value-type="float" office:value="0" calcext:value-type="float">
            <text:p>0</text:p>
          </table:table-cell>
          <table:table-cell table:style-name="ce90" table:formula="of:=SUMIF([.$J8:.$J409];[.$J411];[.BG$5:.BG$406])" office:value-type="float" office:value="0" calcext:value-type="float">
            <text:p>0</text:p>
          </table:table-cell>
          <table:table-cell table:style-name="ce90" table:formula="of:=SUMIF([.$J8:.$J409];[.$J411];[.BH$5:.BH$406])" office:value-type="float" office:value="0" calcext:value-type="float">
            <text:p>0</text:p>
          </table:table-cell>
          <table:table-cell table:style-name="ce90" table:formula="of:=SUMIF([.$J8:.$J409];[.$J411];[.BI$5:.BI$406])" office:value-type="float" office:value="0" calcext:value-type="float">
            <text:p>0</text:p>
          </table:table-cell>
          <table:table-cell table:style-name="ce90" table:formula="of:=SUMIF([.$J8:.$J409];[.$J411];[.BJ$5:.BJ$406])" office:value-type="float" office:value="0" calcext:value-type="float">
            <text:p>0</text:p>
          </table:table-cell>
          <table:table-cell table:style-name="ce90" table:formula="of:=SUMIF([.$J8:.$J409];[.$J411];[.BK$5:.BK$406])" office:value-type="float" office:value="0" calcext:value-type="float">
            <text:p>0</text:p>
          </table:table-cell>
          <table:table-cell table:style-name="ce90" table:formula="of:=SUMIF([.$J8:.$J409];[.$J411];[.BL$5:.BL$406])" office:value-type="float" office:value="0" calcext:value-type="float">
            <text:p>0</text:p>
          </table:table-cell>
          <table:table-cell table:style-name="ce90" table:formula="of:=SUMIF([.$J8:.$J409];[.$J411];[.BM$5:.BM$406])" office:value-type="float" office:value="0" calcext:value-type="float">
            <text:p>0</text:p>
          </table:table-cell>
          <table:table-cell table:style-name="ce90" table:formula="of:=SUMIF([.$J8:.$J409];[.$J411];[.BN$5:.BN$406])" office:value-type="float" office:value="0" calcext:value-type="float">
            <text:p>0</text:p>
          </table:table-cell>
          <table:table-cell table:style-name="ce90" table:formula="of:=SUMIF([.$J8:.$J409];[.$J411];[.BO$5:.BO$406])" office:value-type="float" office:value="0" calcext:value-type="float">
            <text:p>0</text:p>
          </table:table-cell>
          <table:table-cell table:style-name="ce90" table:formula="of:=SUMIF([.$J8:.$J409];[.$J411];[.BP$5:.BP$406])" office:value-type="float" office:value="0" calcext:value-type="float">
            <text:p>0</text:p>
          </table:table-cell>
          <table:table-cell table:style-name="ce90" table:formula="of:=SUMIF([.$J8:.$J409];[.$J411];[.BQ$5:.BQ$406])" office:value-type="float" office:value="0" calcext:value-type="float">
            <text:p>0</text:p>
          </table:table-cell>
          <table:table-cell table:style-name="ce90" table:formula="of:=SUMIF([.$J8:.$J409];[.$J411];[.BR$5:.BR$406])" office:value-type="float" office:value="0" calcext:value-type="float">
            <text:p>0</text:p>
          </table:table-cell>
          <table:table-cell table:style-name="ce90" table:formula="of:=SUMIF([.$J8:.$J409];[.$J411];[.BS$5:.BS$406])" office:value-type="float" office:value="0" calcext:value-type="float">
            <text:p>0</text:p>
          </table:table-cell>
          <table:table-cell table:style-name="ce90" table:formula="of:=SUMIF([.$J8:.$J409];[.$J411];[.BT$5:.BT$406])" office:value-type="float" office:value="0" calcext:value-type="float">
            <text:p>0</text:p>
          </table:table-cell>
          <table:table-cell table:style-name="ce90" table:formula="of:=SUMIF([.$J8:.$J409];[.$J411];[.BU$5:.BU$406])" office:value-type="float" office:value="0" calcext:value-type="float">
            <text:p>0</text:p>
          </table:table-cell>
          <table:table-cell table:style-name="ce90" table:formula="of:=SUMIF([.$J8:.$J409];[.$J411];[.BV$5:.BV$406])" office:value-type="float" office:value="0" calcext:value-type="float">
            <text:p>0</text:p>
          </table:table-cell>
          <table:table-cell table:style-name="ce90" table:formula="of:=SUMIF([.$J8:.$J409];[.$J411];[.BW$5:.BW$406])" office:value-type="float" office:value="0" calcext:value-type="float">
            <text:p>0</text:p>
          </table:table-cell>
          <table:table-cell table:style-name="ce90" table:formula="of:=SUMIF([.$J8:.$J409];[.$J411];[.BX$5:.BX$406])" office:value-type="float" office:value="0" calcext:value-type="float">
            <text:p>0</text:p>
          </table:table-cell>
          <table:table-cell table:style-name="ce90" table:formula="of:=SUMIF([.$J8:.$J409];[.$J411];[.BY$5:.BY$406])" office:value-type="float" office:value="0" calcext:value-type="float">
            <text:p>0</text:p>
          </table:table-cell>
          <table:table-cell table:style-name="ce90" table:formula="of:=SUMIF([.$J8:.$J409];[.$J411];[.BZ$5:.BZ$406])" office:value-type="float" office:value="0" calcext:value-type="float">
            <text:p>0</text:p>
          </table:table-cell>
          <table:table-cell table:style-name="ce90" table:formula="of:=SUMIF([.$J8:.$J409];[.$J411];[.CA$5:.CA$406])" office:value-type="float" office:value="0" calcext:value-type="float">
            <text:p>0</text:p>
          </table:table-cell>
          <table:table-cell table:style-name="ce90" table:formula="of:=SUMIF([.$J8:.$J409];[.$J411];[.CB$5:.CB$406])" office:value-type="float" office:value="0" calcext:value-type="float">
            <text:p>0</text:p>
          </table:table-cell>
          <table:table-cell table:style-name="ce90" table:formula="of:=SUMIF([.$J8:.$J409];[.$J411];[.CC$5:.CC$406])" office:value-type="float" office:value="0" calcext:value-type="float">
            <text:p>0</text:p>
          </table:table-cell>
          <table:table-cell table:style-name="ce90" table:formula="of:=SUMIF([.$J8:.$J409];[.$J411];[.CD$5:.CD$406])" office:value-type="float" office:value="0" calcext:value-type="float">
            <text:p>0</text:p>
          </table:table-cell>
          <table:table-cell table:style-name="ce90" table:formula="of:=SUMIF([.$J8:.$J409];[.$J411];[.CE$5:.CE$406])" office:value-type="float" office:value="0" calcext:value-type="float">
            <text:p>0</text:p>
          </table:table-cell>
          <table:table-cell table:style-name="ce90" table:formula="of:=SUMIF([.$J8:.$J409];[.$J411];[.CF$5:.CF$406])" office:value-type="float" office:value="0" calcext:value-type="float">
            <text:p>0</text:p>
          </table:table-cell>
          <table:table-cell table:style-name="ce90" table:formula="of:=SUMIF([.$J8:.$J409];[.$J411];[.CG$5:.CG$406])" office:value-type="float" office:value="0" calcext:value-type="float">
            <text:p>0</text:p>
          </table:table-cell>
          <table:table-cell table:style-name="ce90" table:formula="of:=SUMIF([.$J8:.$J409];[.$J411];[.CH$5:.CH$406])" office:value-type="float" office:value="0" calcext:value-type="float">
            <text:p>0</text:p>
          </table:table-cell>
          <table:table-cell table:style-name="ce90" table:formula="of:=SUMIF([.$J8:.$J409];[.$J411];[.CI$5:.CI$406])" office:value-type="float" office:value="0" calcext:value-type="float">
            <text:p>0</text:p>
          </table:table-cell>
          <table:table-cell table:style-name="ce90" table:formula="of:=SUMIF([.$J8:.$J409];[.$J411];[.CJ$5:.CJ$406])" office:value-type="float" office:value="0" calcext:value-type="float">
            <text:p>0</text:p>
          </table:table-cell>
          <table:table-cell table:style-name="ce90" table:formula="of:=SUMIF([.$J8:.$J409];[.$J411];[.CK$5:.CK$406])" office:value-type="float" office:value="0" calcext:value-type="float">
            <text:p>0</text:p>
          </table:table-cell>
          <table:table-cell table:style-name="ce90" table:formula="of:=SUMIF([.$J8:.$J409];[.$J411];[.CL$5:.CL$406])" office:value-type="float" office:value="0" calcext:value-type="float">
            <text:p>0</text:p>
          </table:table-cell>
          <table:table-cell table:style-name="ce90" table:formula="of:=SUMIF([.$J8:.$J409];[.$J411];[.CM$5:.CM$406])" office:value-type="float" office:value="0" calcext:value-type="float">
            <text:p>0</text:p>
          </table:table-cell>
          <table:table-cell table:style-name="ce90" table:formula="of:=SUMIF([.$J8:.$J409];[.$J411];[.CN$5:.CN$406])" office:value-type="float" office:value="0" calcext:value-type="float">
            <text:p>0</text:p>
          </table:table-cell>
          <table:table-cell table:style-name="ce90" table:formula="of:=SUMIF([.$J8:.$J409];[.$J411];[.CO$5:.CO$406])" office:value-type="float" office:value="0" calcext:value-type="float">
            <text:p>0</text:p>
          </table:table-cell>
          <table:table-cell table:style-name="ce90" table:formula="of:=SUMIF([.$J8:.$J409];[.$J411];[.CP$5:.CP$406])" office:value-type="float" office:value="0" calcext:value-type="float">
            <text:p>0</text:p>
          </table:table-cell>
          <table:table-cell table:style-name="ce90" table:formula="of:=SUMIF([.$J8:.$J409];[.$J411];[.CQ$5:.CQ$406])" office:value-type="float" office:value="0" calcext:value-type="float">
            <text:p>0</text:p>
          </table:table-cell>
          <table:table-cell table:style-name="ce90" table:formula="of:=SUMIF([.$J8:.$J409];[.$J411];[.CR$5:.CR$406])" office:value-type="float" office:value="0" calcext:value-type="float">
            <text:p>0</text:p>
          </table:table-cell>
          <table:table-cell table:style-name="ce90" table:formula="of:=SUMIF([.$J8:.$J409];[.$J411];[.CS$5:.CS$406])" office:value-type="float" office:value="0" calcext:value-type="float">
            <text:p>0</text:p>
          </table:table-cell>
          <table:table-cell table:style-name="ce90" table:formula="of:=SUMIF([.$J8:.$J409];[.$J411];[.CT$5:.CT$406])" office:value-type="float" office:value="0" calcext:value-type="float">
            <text:p>0</text:p>
          </table:table-cell>
          <table:table-cell table:style-name="ce90" table:formula="of:=SUMIF([.$J8:.$J409];[.$J411];[.CU$5:.CU$406])" office:value-type="float" office:value="0" calcext:value-type="float">
            <text:p>0</text:p>
          </table:table-cell>
          <table:table-cell table:style-name="ce90" table:formula="of:=SUMIF([.$J8:.$J409];[.$J411];[.CV$5:.CV$406])" office:value-type="float" office:value="0" calcext:value-type="float">
            <text:p>0</text:p>
          </table:table-cell>
          <table:table-cell table:style-name="ce90" table:formula="of:=SUMIF([.$J8:.$J409];[.$J411];[.CW$5:.CW$406])" office:value-type="float" office:value="0" calcext:value-type="float">
            <text:p>0</text:p>
          </table:table-cell>
          <table:table-cell table:style-name="ce90" table:formula="of:=SUMIF([.$J8:.$J409];[.$J411];[.CX$5:.CX$406])" office:value-type="float" office:value="0" calcext:value-type="float">
            <text:p>0</text:p>
          </table:table-cell>
          <table:table-cell table:style-name="ce90" table:formula="of:=SUMIF([.$J8:.$J409];[.$J411];[.CY$5:.CY$406])" office:value-type="float" office:value="0" calcext:value-type="float">
            <text:p>0</text:p>
          </table:table-cell>
          <table:table-cell table:style-name="ce90" table:formula="of:=SUMIF([.$J8:.$J409];[.$J411];[.CZ$5:.CZ$406])" office:value-type="float" office:value="0" calcext:value-type="float">
            <text:p>0</text:p>
          </table:table-cell>
          <table:table-cell table:style-name="ce90" table:formula="of:=SUMIF([.$J8:.$J409];[.$J411];[.DA$5:.DA$406])" office:value-type="float" office:value="0" calcext:value-type="float">
            <text:p>0</text:p>
          </table:table-cell>
          <table:table-cell table:style-name="ce90" table:formula="of:=SUMIF([.$J8:.$J409];[.$J411];[.DB$5:.DB$406])" office:value-type="float" office:value="0" calcext:value-type="float">
            <text:p>0</text:p>
          </table:table-cell>
          <table:table-cell table:style-name="ce90" table:formula="of:=SUMIF([.$J8:.$J409];[.$J411];[.DC$5:.DC$406])" office:value-type="float" office:value="0" calcext:value-type="float">
            <text:p>0</text:p>
          </table:table-cell>
          <table:table-cell table:style-name="ce90" table:formula="of:=SUMIF([.$J8:.$J409];[.$J411];[.DD$5:.DD$406])" office:value-type="float" office:value="0" calcext:value-type="float">
            <text:p>0</text:p>
          </table:table-cell>
          <table:table-cell table:style-name="ce90" table:formula="of:=SUMIF([.$J8:.$J409];[.$J411];[.DE$5:.DE$406])" office:value-type="float" office:value="0" calcext:value-type="float">
            <text:p>0</text:p>
          </table:table-cell>
          <table:table-cell table:style-name="ce90" table:formula="of:=SUMIF([.$J8:.$J409];[.$J411];[.DF$5:.DF$406])" office:value-type="float" office:value="0" calcext:value-type="float">
            <text:p>0</text:p>
          </table:table-cell>
          <table:table-cell table:style-name="ce90" table:formula="of:=SUMIF([.$J8:.$J409];[.$J411];[.DG$5:.DG$406])" office:value-type="float" office:value="0" calcext:value-type="float">
            <text:p>0</text:p>
          </table:table-cell>
          <table:table-cell table:style-name="ce90" table:formula="of:=SUMIF([.$J8:.$J409];[.$J411];[.DH$5:.DH$406])" office:value-type="float" office:value="0" calcext:value-type="float">
            <text:p>0</text:p>
          </table:table-cell>
          <table:table-cell table:style-name="ce90" table:formula="of:=SUMIF([.$J8:.$J409];[.$J411];[.DI$5:.DI$406])" office:value-type="float" office:value="0" calcext:value-type="float">
            <text:p>0</text:p>
          </table:table-cell>
          <table:table-cell table:style-name="ce90" table:formula="of:=SUMIF([.$J8:.$J409];[.$J411];[.DJ$5:.DJ$406])" office:value-type="float" office:value="0" calcext:value-type="float">
            <text:p>0</text:p>
          </table:table-cell>
          <table:table-cell table:style-name="ce90" table:formula="of:=SUMIF([.$J8:.$J409];[.$J411];[.DK$5:.DK$406])" office:value-type="float" office:value="0" calcext:value-type="float">
            <text:p>0</text:p>
          </table:table-cell>
          <table:table-cell table:style-name="ce90" table:formula="of:=SUMIF([.$J8:.$J409];[.$J411];[.DL$5:.DL$406])" office:value-type="float" office:value="0" calcext:value-type="float">
            <text:p>0</text:p>
          </table:table-cell>
          <table:table-cell table:style-name="ce90" table:formula="of:=SUMIF([.$J8:.$J409];[.$J411];[.DM$5:.DM$406])" office:value-type="float" office:value="0" calcext:value-type="float">
            <text:p>0</text:p>
          </table:table-cell>
          <table:table-cell table:style-name="ce90" table:formula="of:=SUMIF([.$J8:.$J409];[.$J411];[.DN$5:.DN$406])" office:value-type="float" office:value="0" calcext:value-type="float">
            <text:p>0</text:p>
          </table:table-cell>
          <table:table-cell table:style-name="ce90" table:formula="of:=SUMIF([.$J8:.$J409];[.$J411];[.DO$5:.DO$406])" office:value-type="float" office:value="0" calcext:value-type="float">
            <text:p>0</text:p>
          </table:table-cell>
          <table:table-cell table:style-name="ce90" table:formula="of:=SUMIF([.$J8:.$J409];[.$J411];[.DP$5:.DP$406])" office:value-type="float" office:value="0" calcext:value-type="float">
            <text:p>0</text:p>
          </table:table-cell>
          <table:table-cell table:style-name="ce90" table:formula="of:=SUMIF([.$J8:.$J409];[.$J411];[.DQ$5:.DQ$406])" office:value-type="float" office:value="0" calcext:value-type="float">
            <text:p>0</text:p>
          </table:table-cell>
          <table:table-cell table:style-name="ce90" table:formula="of:=SUMIF([.$J8:.$J409];[.$J411];[.DR$5:.DR$406])" office:value-type="float" office:value="0" calcext:value-type="float">
            <text:p>0</text:p>
          </table:table-cell>
          <table:table-cell table:style-name="ce90" table:formula="of:=SUMIF([.$J8:.$J409];[.$J411];[.DS$5:.DS$406])" office:value-type="float" office:value="0" calcext:value-type="float">
            <text:p>0</text:p>
          </table:table-cell>
          <table:table-cell table:style-name="ce90" table:formula="of:=SUMIF([.$J8:.$J409];[.$J411];[.DT$5:.DT$406])" office:value-type="float" office:value="0" calcext:value-type="float">
            <text:p>0</text:p>
          </table:table-cell>
          <table:table-cell table:style-name="ce90" table:formula="of:=SUMIF([.$J8:.$J409];[.$J411];[.DU$5:.DU$406])" office:value-type="float" office:value="0" calcext:value-type="float">
            <text:p>0</text:p>
          </table:table-cell>
          <table:table-cell table:style-name="ce90" table:formula="of:=SUMIF([.$J8:.$J409];[.$J411];[.DV$5:.DV$406])" office:value-type="float" office:value="0" calcext:value-type="float">
            <text:p>0</text:p>
          </table:table-cell>
          <table:table-cell table:style-name="ce90" table:formula="of:=SUMIF([.$J8:.$J409];[.$J411];[.DW$5:.DW$406])" office:value-type="float" office:value="0" calcext:value-type="float">
            <text:p>0</text:p>
          </table:table-cell>
          <table:table-cell table:style-name="ce90" table:formula="of:=SUMIF([.$J8:.$J409];[.$J411];[.DX$5:.DX$406])" office:value-type="float" office:value="0" calcext:value-type="float">
            <text:p>0</text:p>
          </table:table-cell>
          <table:table-cell table:style-name="ce90" table:formula="of:=SUMIF([.$J8:.$J409];[.$J411];[.DY$5:.DY$406])" office:value-type="float" office:value="0" calcext:value-type="float">
            <text:p>0</text:p>
          </table:table-cell>
          <table:table-cell table:style-name="ce90" table:formula="of:=SUMIF([.$J8:.$J409];[.$J411];[.DZ$5:.DZ$406])" office:value-type="float" office:value="0" calcext:value-type="float">
            <text:p>0</text:p>
          </table:table-cell>
          <table:table-cell table:style-name="ce90" table:formula="of:=SUMIF([.$J8:.$J409];[.$J411];[.EA$5:.EA$406])" office:value-type="float" office:value="0" calcext:value-type="float">
            <text:p>0</text:p>
          </table:table-cell>
          <table:table-cell table:style-name="ce90" table:formula="of:=SUMIF([.$J8:.$J409];[.$J411];[.EB$5:.EB$406])" office:value-type="float" office:value="0" calcext:value-type="float">
            <text:p>0</text:p>
          </table:table-cell>
          <table:table-cell table:style-name="ce90" table:formula="of:=SUMIF([.$J8:.$J409];[.$J411];[.EC$5:.EC$406])" office:value-type="float" office:value="0" calcext:value-type="float">
            <text:p>0</text:p>
          </table:table-cell>
          <table:table-cell table:style-name="ce90" table:formula="of:=SUMIF([.$J8:.$J409];[.$J411];[.ED$5:.ED$406])" office:value-type="float" office:value="0" calcext:value-type="float">
            <text:p>0</text:p>
          </table:table-cell>
          <table:table-cell table:style-name="ce90" table:formula="of:=SUMIF([.$J8:.$J409];[.$J411];[.EE$5:.EE$406])" office:value-type="float" office:value="0" calcext:value-type="float">
            <text:p>0</text:p>
          </table:table-cell>
          <table:table-cell table:style-name="ce90" table:formula="of:=SUMIF([.$J8:.$J409];[.$J411];[.EF$5:.EF$406])" office:value-type="float" office:value="0" calcext:value-type="float">
            <text:p>0</text:p>
          </table:table-cell>
          <table:table-cell table:style-name="ce90" table:formula="of:=SUMIF([.$J8:.$J409];[.$J411];[.EG$5:.EG$406])" office:value-type="float" office:value="0" calcext:value-type="float">
            <text:p>0</text:p>
          </table:table-cell>
          <table:table-cell table:style-name="ce90" table:formula="of:=SUMIF([.$J8:.$J409];[.$J411];[.EH$5:.EH$406])" office:value-type="float" office:value="0" calcext:value-type="float">
            <text:p>0</text:p>
          </table:table-cell>
          <table:table-cell table:style-name="ce90" table:formula="of:=SUMIF([.$J8:.$J409];[.$J411];[.EI$5:.EI$406])" office:value-type="float" office:value="0" calcext:value-type="float">
            <text:p>0</text:p>
          </table:table-cell>
          <table:table-cell table:style-name="ce90" table:formula="of:=SUMIF([.$J8:.$J409];[.$J411];[.EJ$5:.EJ$406])" office:value-type="float" office:value="0" calcext:value-type="float">
            <text:p>0</text:p>
          </table:table-cell>
          <table:table-cell table:style-name="ce90" table:formula="of:=SUMIF([.$J8:.$J409];[.$J411];[.EK$5:.EK$406])" office:value-type="float" office:value="0" calcext:value-type="float">
            <text:p>0</text:p>
          </table:table-cell>
          <table:table-cell table:style-name="ce90" table:formula="of:=SUMIF([.$J8:.$J409];[.$J411];[.EL$5:.EL$406])" office:value-type="float" office:value="0" calcext:value-type="float">
            <text:p>0</text:p>
          </table:table-cell>
          <table:table-cell table:style-name="ce90" table:formula="of:=SUMIF([.$J8:.$J409];[.$J411];[.EM$5:.EM$406])" office:value-type="float" office:value="0" calcext:value-type="float">
            <text:p>0</text:p>
          </table:table-cell>
          <table:table-cell table:style-name="ce90" table:formula="of:=SUMIF([.$J8:.$J409];[.$J411];[.EN$5:.EN$406])" office:value-type="float" office:value="0" calcext:value-type="float">
            <text:p>0</text:p>
          </table:table-cell>
          <table:table-cell table:style-name="ce90" table:formula="of:=SUMIF([.$J8:.$J409];[.$J411];[.EO$5:.EO$406])" office:value-type="float" office:value="0" calcext:value-type="float">
            <text:p>0</text:p>
          </table:table-cell>
          <table:table-cell table:style-name="ce90" table:formula="of:=SUMIF([.$J8:.$J409];[.$J411];[.EP$5:.EP$406])" office:value-type="float" office:value="0" calcext:value-type="float">
            <text:p>0</text:p>
          </table:table-cell>
          <table:table-cell table:style-name="ce90" table:formula="of:=SUMIF([.$J8:.$J409];[.$J411];[.EQ$5:.EQ$406])" office:value-type="float" office:value="0" calcext:value-type="float">
            <text:p>0</text:p>
          </table:table-cell>
          <table:table-cell table:style-name="ce90" table:formula="of:=SUMIF([.$J8:.$J409];[.$J411];[.ER$5:.ER$406])" office:value-type="float" office:value="0" calcext:value-type="float">
            <text:p>0</text:p>
          </table:table-cell>
          <table:table-cell table:style-name="ce90" table:formula="of:=SUMIF([.$J8:.$J409];[.$J411];[.ES$5:.ES$406])" office:value-type="float" office:value="0" calcext:value-type="float">
            <text:p>0</text:p>
          </table:table-cell>
          <table:table-cell table:style-name="ce90" table:formula="of:=SUMIF([.$J8:.$J409];[.$J411];[.ET$5:.ET$406])" office:value-type="float" office:value="0" calcext:value-type="float">
            <text:p>0</text:p>
          </table:table-cell>
          <table:table-cell table:style-name="ce90" table:formula="of:=SUMIF([.$J8:.$J409];[.$J411];[.EU$5:.EU$406])" office:value-type="float" office:value="0" calcext:value-type="float">
            <text:p>0</text:p>
          </table:table-cell>
          <table:table-cell table:style-name="ce90" table:formula="of:=SUMIF([.$J8:.$J409];[.$J411];[.EV$5:.EV$406])" office:value-type="float" office:value="0" calcext:value-type="float">
            <text:p>0</text:p>
          </table:table-cell>
          <table:table-cell table:style-name="ce90" table:formula="of:=SUMIF([.$J8:.$J409];[.$J411];[.EW$5:.EW$406])" office:value-type="float" office:value="0" calcext:value-type="float">
            <text:p>0</text:p>
          </table:table-cell>
          <table:table-cell table:style-name="ce90" table:formula="of:=SUMIF([.$J8:.$J409];[.$J411];[.EX$5:.EX$406])" office:value-type="float" office:value="0" calcext:value-type="float">
            <text:p>0</text:p>
          </table:table-cell>
          <table:table-cell table:style-name="ce90" table:formula="of:=SUMIF([.$J8:.$J409];[.$J411];[.EY$5:.EY$406])" office:value-type="float" office:value="0" calcext:value-type="float">
            <text:p>0</text:p>
          </table:table-cell>
          <table:table-cell table:style-name="ce90" table:formula="of:=SUMIF([.$J8:.$J409];[.$J411];[.EZ$5:.EZ$406])" office:value-type="float" office:value="0" calcext:value-type="float">
            <text:p>0</text:p>
          </table:table-cell>
          <table:table-cell table:style-name="ce90" table:formula="of:=SUMIF([.$J8:.$J409];[.$J411];[.FA$5:.FA$406])" office:value-type="float" office:value="0" calcext:value-type="float">
            <text:p>0</text:p>
          </table:table-cell>
          <table:table-cell table:style-name="ce90" table:formula="of:=SUMIF([.$J8:.$J409];[.$J411];[.FB$5:.FB$406])" office:value-type="float" office:value="0" calcext:value-type="float">
            <text:p>0</text:p>
          </table:table-cell>
          <table:table-cell table:style-name="ce90" table:formula="of:=SUMIF([.$J8:.$J409];[.$J411];[.FC$5:.FC$406])" office:value-type="float" office:value="0" calcext:value-type="float">
            <text:p>0</text:p>
          </table:table-cell>
          <table:table-cell table:style-name="ce90" table:formula="of:=SUMIF([.$J8:.$J409];[.$J411];[.FD$5:.FD$406])" office:value-type="float" office:value="0" calcext:value-type="float">
            <text:p>0</text:p>
          </table:table-cell>
          <table:table-cell table:style-name="ce90" table:formula="of:=SUMIF([.$J8:.$J409];[.$J411];[.FE$5:.FE$406])" office:value-type="float" office:value="0" calcext:value-type="float">
            <text:p>0</text:p>
          </table:table-cell>
          <table:table-cell table:style-name="ce90" table:formula="of:=SUMIF([.$J8:.$J409];[.$J411];[.FF$5:.FF$406])" office:value-type="float" office:value="0" calcext:value-type="float">
            <text:p>0</text:p>
          </table:table-cell>
          <table:table-cell table:style-name="ce90" table:formula="of:=SUMIF([.$J8:.$J409];[.$J411];[.FG$5:.FG$406])" office:value-type="float" office:value="0" calcext:value-type="float">
            <text:p>0</text:p>
          </table:table-cell>
          <table:table-cell table:style-name="ce90" table:formula="of:=SUMIF([.$J8:.$J409];[.$J411];[.FH$5:.FH$406])" office:value-type="float" office:value="0" calcext:value-type="float">
            <text:p>0</text:p>
          </table:table-cell>
          <table:table-cell table:style-name="ce90" table:formula="of:=SUMIF([.$J8:.$J409];[.$J411];[.FI$5:.FI$406])" office:value-type="float" office:value="0" calcext:value-type="float">
            <text:p>0</text:p>
          </table:table-cell>
          <table:table-cell table:style-name="ce90" table:formula="of:=SUMIF([.$J8:.$J409];[.$J411];[.FJ$5:.FJ$406])" office:value-type="float" office:value="0" calcext:value-type="float">
            <text:p>0</text:p>
          </table:table-cell>
          <table:table-cell table:style-name="ce90" table:formula="of:=SUMIF([.$J8:.$J409];[.$J411];[.FK$5:.FK$406])" office:value-type="float" office:value="0" calcext:value-type="float">
            <text:p>0</text:p>
          </table:table-cell>
          <table:table-cell table:style-name="ce90" table:formula="of:=SUMIF([.$J8:.$J409];[.$J411];[.FL$5:.FL$406])" office:value-type="float" office:value="0" calcext:value-type="float">
            <text:p>0</text:p>
          </table:table-cell>
          <table:table-cell table:style-name="ce90" table:formula="of:=SUMIF([.$J8:.$J409];[.$J411];[.FM$5:.FM$406])" office:value-type="float" office:value="0" calcext:value-type="float">
            <text:p>0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6"/>
          <table:table-cell table:style-name="ce38" table:number-columns-repeated="2"/>
          <table:table-cell table:style-name="ce43" table:number-columns-repeated="2"/>
          <table:table-cell table:style-name="ce32" table:formula="of:=IF([.$L412]&lt;&gt;&quot;&quot;;NETWORKDAYS([.$L412];[.$M412];[$休日.$B$4:.$B$304]);&quot;&quot;)">
            <text:p/>
          </table:table-cell>
          <table:table-cell table:style-name="ce61"/>
          <table:table-cell table:style-name="ce63" table:formula="of:=IF(OR(AND([.$N412]=&quot;&quot;;[.$L412]&lt;&gt;&quot;&quot;;[.$L412]&lt;=[.$U$1]);AND([.$M412]&lt;&gt;&quot;&quot;;[.Q412]&lt;100;[.$M412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10:.$J410];[.$J412];[.V$5:.V$406])" office:value-type="float" office:value="0" calcext:value-type="float">
            <text:p>0</text:p>
          </table:table-cell>
          <table:table-cell table:style-name="ce90" table:formula="of:=SUMIF([.$J10:.$J410];[.$J412];[.W$5:.W$406])" office:value-type="float" office:value="0" calcext:value-type="float">
            <text:p>0</text:p>
          </table:table-cell>
          <table:table-cell table:style-name="ce90" table:formula="of:=SUMIF([.$J10:.$J410];[.$J412];[.X$5:.X$406])" office:value-type="float" office:value="0" calcext:value-type="float">
            <text:p>0</text:p>
          </table:table-cell>
          <table:table-cell table:style-name="ce114" table:formula="of:=SUMIF([.$J10:.$J410];[.$J412];[.Y$5:.Y$406])" office:value-type="float" office:value="0" calcext:value-type="float">
            <text:p>0</text:p>
          </table:table-cell>
          <table:table-cell table:style-name="ce114" table:formula="of:=SUMIF([.$J10:.$J410];[.$J412];[.Z$5:.Z$406])" office:value-type="float" office:value="0" calcext:value-type="float">
            <text:p>0</text:p>
          </table:table-cell>
          <table:table-cell table:style-name="ce90" table:formula="of:=SUMIF([.$J10:.$J410];[.$J412];[.AA$5:.AA$406])" office:value-type="float" office:value="0" calcext:value-type="float">
            <text:p>0</text:p>
          </table:table-cell>
          <table:table-cell table:style-name="ce90" table:formula="of:=SUMIF([.$J10:.$J410];[.$J412];[.AB$5:.AB$406])" office:value-type="float" office:value="0" calcext:value-type="float">
            <text:p>0</text:p>
          </table:table-cell>
          <table:table-cell table:style-name="ce90" table:formula="of:=SUMIF([.$J10:.$J410];[.$J412];[.AC$5:.AC$406])" office:value-type="float" office:value="0" calcext:value-type="float">
            <text:p>0</text:p>
          </table:table-cell>
          <table:table-cell table:style-name="ce90" table:formula="of:=SUMIF([.$J10:.$J410];[.$J412];[.AD$5:.AD$406])" office:value-type="float" office:value="0" calcext:value-type="float">
            <text:p>0</text:p>
          </table:table-cell>
          <table:table-cell table:style-name="ce90" table:formula="of:=SUMIF([.$J10:.$J410];[.$J412];[.AE$5:.AE$406])" office:value-type="float" office:value="0" calcext:value-type="float">
            <text:p>0</text:p>
          </table:table-cell>
          <table:table-cell table:style-name="ce114" table:formula="of:=SUMIF([.$J10:.$J410];[.$J412];[.AF$5:.AF$406])" office:value-type="float" office:value="0" calcext:value-type="float">
            <text:p>0</text:p>
          </table:table-cell>
          <table:table-cell table:style-name="ce114" table:formula="of:=SUMIF([.$J10:.$J410];[.$J412];[.AG$5:.AG$406])" office:value-type="float" office:value="0" calcext:value-type="float">
            <text:p>0</text:p>
          </table:table-cell>
          <table:table-cell table:style-name="ce90" table:formula="of:=SUMIF([.$J10:.$J410];[.$J412];[.AH$5:.AH$406])" office:value-type="float" office:value="0" calcext:value-type="float">
            <text:p>0</text:p>
          </table:table-cell>
          <table:table-cell table:style-name="ce90" table:formula="of:=SUMIF([.$J10:.$J410];[.$J412];[.AI$5:.AI$406])" office:value-type="float" office:value="0" calcext:value-type="float">
            <text:p>0</text:p>
          </table:table-cell>
          <table:table-cell table:style-name="ce90" table:formula="of:=SUMIF([.$J10:.$J410];[.$J412];[.AJ$5:.AJ$406])" office:value-type="float" office:value="0" calcext:value-type="float">
            <text:p>0</text:p>
          </table:table-cell>
          <table:table-cell table:style-name="ce90" table:formula="of:=SUMIF([.$J10:.$J410];[.$J412];[.AK$5:.AK$406])" office:value-type="float" office:value="0" calcext:value-type="float">
            <text:p>0</text:p>
          </table:table-cell>
          <table:table-cell table:style-name="ce90" table:formula="of:=SUMIF([.$J10:.$J410];[.$J412];[.AL$5:.AL$406])" office:value-type="float" office:value="0" calcext:value-type="float">
            <text:p>0</text:p>
          </table:table-cell>
          <table:table-cell table:style-name="ce114" table:formula="of:=SUMIF([.$J10:.$J410];[.$J412];[.AM$5:.AM$406])" office:value-type="float" office:value="0" calcext:value-type="float">
            <text:p>0</text:p>
          </table:table-cell>
          <table:table-cell table:style-name="ce114" table:formula="of:=SUMIF([.$J10:.$J410];[.$J412];[.AN$5:.AN$406])" office:value-type="float" office:value="0" calcext:value-type="float">
            <text:p>0</text:p>
          </table:table-cell>
          <table:table-cell table:style-name="ce90" table:formula="of:=SUMIF([.$J10:.$J410];[.$J412];[.AO$5:.AO$406])" office:value-type="float" office:value="0" calcext:value-type="float">
            <text:p>0</text:p>
          </table:table-cell>
          <table:table-cell table:style-name="ce90" table:formula="of:=SUMIF([.$J10:.$J410];[.$J412];[.AP$5:.AP$406])" office:value-type="float" office:value="0" calcext:value-type="float">
            <text:p>0</text:p>
          </table:table-cell>
          <table:table-cell table:style-name="ce90" table:formula="of:=SUMIF([.$J10:.$J410];[.$J412];[.AQ$5:.AQ$406])" office:value-type="float" office:value="0" calcext:value-type="float">
            <text:p>0</text:p>
          </table:table-cell>
          <table:table-cell table:style-name="ce90" table:formula="of:=SUMIF([.$J10:.$J410];[.$J412];[.AR$5:.AR$406])" office:value-type="float" office:value="0" calcext:value-type="float">
            <text:p>0</text:p>
          </table:table-cell>
          <table:table-cell table:style-name="ce143" table:formula="of:=SUMIF([.$J10:.$J410];[.$J412];[.AS$5:.AS$406])" office:value-type="float" office:value="0" calcext:value-type="float">
            <text:p>0</text:p>
          </table:table-cell>
          <table:table-cell table:style-name="ce114" table:formula="of:=SUMIF([.$J10:.$J410];[.$J412];[.AT$5:.AT$406])" office:value-type="float" office:value="0" calcext:value-type="float">
            <text:p>0</text:p>
          </table:table-cell>
          <table:table-cell table:style-name="ce114" table:formula="of:=SUMIF([.$J10:.$J410];[.$J412];[.AU$5:.AU$406])" office:value-type="float" office:value="0" calcext:value-type="float">
            <text:p>0</text:p>
          </table:table-cell>
          <table:table-cell table:style-name="ce157" table:formula="of:=SUMIF([.$J10:.$J410];[.$J412];[.AV$5:.AV$406])" office:value-type="float" office:value="0" calcext:value-type="float">
            <text:p>0</text:p>
          </table:table-cell>
          <table:table-cell table:style-name="ce90" table:formula="of:=SUMIF([.$J10:.$J410];[.$J412];[.AW$5:.AW$406])" office:value-type="float" office:value="0" calcext:value-type="float">
            <text:p>0</text:p>
          </table:table-cell>
          <table:table-cell table:style-name="ce90" table:formula="of:=SUMIF([.$J10:.$J410];[.$J412];[.AX$5:.AX$406])" office:value-type="float" office:value="0" calcext:value-type="float">
            <text:p>0</text:p>
          </table:table-cell>
          <table:table-cell table:style-name="ce90" table:formula="of:=SUMIF([.$J10:.$J410];[.$J412];[.AY$5:.AY$406])" office:value-type="float" office:value="0" calcext:value-type="float">
            <text:p>0</text:p>
          </table:table-cell>
          <table:table-cell table:style-name="ce90" table:formula="of:=SUMIF([.$J10:.$J410];[.$J412];[.AZ$5:.AZ$406])" office:value-type="float" office:value="0" calcext:value-type="float">
            <text:p>0</text:p>
          </table:table-cell>
          <table:table-cell table:style-name="ce90" table:formula="of:=SUMIF([.$J10:.$J410];[.$J412];[.BA$5:.BA$406])" office:value-type="float" office:value="0" calcext:value-type="float">
            <text:p>0</text:p>
          </table:table-cell>
          <table:table-cell table:style-name="ce90" table:formula="of:=SUMIF([.$J10:.$J410];[.$J412];[.BB$5:.BB$406])" office:value-type="float" office:value="0" calcext:value-type="float">
            <text:p>0</text:p>
          </table:table-cell>
          <table:table-cell table:style-name="ce90" table:formula="of:=SUMIF([.$J10:.$J410];[.$J412];[.BC$5:.BC$406])" office:value-type="float" office:value="0" calcext:value-type="float">
            <text:p>0</text:p>
          </table:table-cell>
          <table:table-cell table:style-name="ce90" table:formula="of:=SUMIF([.$J10:.$J410];[.$J412];[.BD$5:.BD$406])" office:value-type="float" office:value="0" calcext:value-type="float">
            <text:p>0</text:p>
          </table:table-cell>
          <table:table-cell table:style-name="ce90" table:formula="of:=SUMIF([.$J10:.$J410];[.$J412];[.BE$5:.BE$406])" office:value-type="float" office:value="0" calcext:value-type="float">
            <text:p>0</text:p>
          </table:table-cell>
          <table:table-cell table:style-name="ce90" table:formula="of:=SUMIF([.$J10:.$J410];[.$J412];[.BF$5:.BF$406])" office:value-type="float" office:value="0" calcext:value-type="float">
            <text:p>0</text:p>
          </table:table-cell>
          <table:table-cell table:style-name="ce90" table:formula="of:=SUMIF([.$J10:.$J410];[.$J412];[.BG$5:.BG$406])" office:value-type="float" office:value="0" calcext:value-type="float">
            <text:p>0</text:p>
          </table:table-cell>
          <table:table-cell table:style-name="ce90" table:formula="of:=SUMIF([.$J10:.$J410];[.$J412];[.BH$5:.BH$406])" office:value-type="float" office:value="0" calcext:value-type="float">
            <text:p>0</text:p>
          </table:table-cell>
          <table:table-cell table:style-name="ce90" table:formula="of:=SUMIF([.$J10:.$J410];[.$J412];[.BI$5:.BI$406])" office:value-type="float" office:value="0" calcext:value-type="float">
            <text:p>0</text:p>
          </table:table-cell>
          <table:table-cell table:style-name="ce90" table:formula="of:=SUMIF([.$J10:.$J410];[.$J412];[.BJ$5:.BJ$406])" office:value-type="float" office:value="0" calcext:value-type="float">
            <text:p>0</text:p>
          </table:table-cell>
          <table:table-cell table:style-name="ce90" table:formula="of:=SUMIF([.$J10:.$J410];[.$J412];[.BK$5:.BK$406])" office:value-type="float" office:value="0" calcext:value-type="float">
            <text:p>0</text:p>
          </table:table-cell>
          <table:table-cell table:style-name="ce90" table:formula="of:=SUMIF([.$J10:.$J410];[.$J412];[.BL$5:.BL$406])" office:value-type="float" office:value="0" calcext:value-type="float">
            <text:p>0</text:p>
          </table:table-cell>
          <table:table-cell table:style-name="ce90" table:formula="of:=SUMIF([.$J10:.$J410];[.$J412];[.BM$5:.BM$406])" office:value-type="float" office:value="0" calcext:value-type="float">
            <text:p>0</text:p>
          </table:table-cell>
          <table:table-cell table:style-name="ce90" table:formula="of:=SUMIF([.$J10:.$J410];[.$J412];[.BN$5:.BN$406])" office:value-type="float" office:value="0" calcext:value-type="float">
            <text:p>0</text:p>
          </table:table-cell>
          <table:table-cell table:style-name="ce90" table:formula="of:=SUMIF([.$J10:.$J410];[.$J412];[.BO$5:.BO$406])" office:value-type="float" office:value="0" calcext:value-type="float">
            <text:p>0</text:p>
          </table:table-cell>
          <table:table-cell table:style-name="ce90" table:formula="of:=SUMIF([.$J10:.$J410];[.$J412];[.BP$5:.BP$406])" office:value-type="float" office:value="0" calcext:value-type="float">
            <text:p>0</text:p>
          </table:table-cell>
          <table:table-cell table:style-name="ce90" table:formula="of:=SUMIF([.$J10:.$J410];[.$J412];[.BQ$5:.BQ$406])" office:value-type="float" office:value="0" calcext:value-type="float">
            <text:p>0</text:p>
          </table:table-cell>
          <table:table-cell table:style-name="ce90" table:formula="of:=SUMIF([.$J10:.$J410];[.$J412];[.BR$5:.BR$406])" office:value-type="float" office:value="0" calcext:value-type="float">
            <text:p>0</text:p>
          </table:table-cell>
          <table:table-cell table:style-name="ce90" table:formula="of:=SUMIF([.$J10:.$J410];[.$J412];[.BS$5:.BS$406])" office:value-type="float" office:value="0" calcext:value-type="float">
            <text:p>0</text:p>
          </table:table-cell>
          <table:table-cell table:style-name="ce90" table:formula="of:=SUMIF([.$J10:.$J410];[.$J412];[.BT$5:.BT$406])" office:value-type="float" office:value="0" calcext:value-type="float">
            <text:p>0</text:p>
          </table:table-cell>
          <table:table-cell table:style-name="ce90" table:formula="of:=SUMIF([.$J10:.$J410];[.$J412];[.BU$5:.BU$406])" office:value-type="float" office:value="0" calcext:value-type="float">
            <text:p>0</text:p>
          </table:table-cell>
          <table:table-cell table:style-name="ce90" table:formula="of:=SUMIF([.$J10:.$J410];[.$J412];[.BV$5:.BV$406])" office:value-type="float" office:value="0" calcext:value-type="float">
            <text:p>0</text:p>
          </table:table-cell>
          <table:table-cell table:style-name="ce90" table:formula="of:=SUMIF([.$J10:.$J410];[.$J412];[.BW$5:.BW$406])" office:value-type="float" office:value="0" calcext:value-type="float">
            <text:p>0</text:p>
          </table:table-cell>
          <table:table-cell table:style-name="ce90" table:formula="of:=SUMIF([.$J10:.$J410];[.$J412];[.BX$5:.BX$406])" office:value-type="float" office:value="0" calcext:value-type="float">
            <text:p>0</text:p>
          </table:table-cell>
          <table:table-cell table:style-name="ce90" table:formula="of:=SUMIF([.$J10:.$J410];[.$J412];[.BY$5:.BY$406])" office:value-type="float" office:value="0" calcext:value-type="float">
            <text:p>0</text:p>
          </table:table-cell>
          <table:table-cell table:style-name="ce90" table:formula="of:=SUMIF([.$J10:.$J410];[.$J412];[.BZ$5:.BZ$406])" office:value-type="float" office:value="0" calcext:value-type="float">
            <text:p>0</text:p>
          </table:table-cell>
          <table:table-cell table:style-name="ce90" table:formula="of:=SUMIF([.$J10:.$J410];[.$J412];[.CA$5:.CA$406])" office:value-type="float" office:value="0" calcext:value-type="float">
            <text:p>0</text:p>
          </table:table-cell>
          <table:table-cell table:style-name="ce90" table:formula="of:=SUMIF([.$J10:.$J410];[.$J412];[.CB$5:.CB$406])" office:value-type="float" office:value="0" calcext:value-type="float">
            <text:p>0</text:p>
          </table:table-cell>
          <table:table-cell table:style-name="ce90" table:formula="of:=SUMIF([.$J10:.$J410];[.$J412];[.CC$5:.CC$406])" office:value-type="float" office:value="0" calcext:value-type="float">
            <text:p>0</text:p>
          </table:table-cell>
          <table:table-cell table:style-name="ce90" table:formula="of:=SUMIF([.$J10:.$J410];[.$J412];[.CD$5:.CD$406])" office:value-type="float" office:value="0" calcext:value-type="float">
            <text:p>0</text:p>
          </table:table-cell>
          <table:table-cell table:style-name="ce90" table:formula="of:=SUMIF([.$J10:.$J410];[.$J412];[.CE$5:.CE$406])" office:value-type="float" office:value="0" calcext:value-type="float">
            <text:p>0</text:p>
          </table:table-cell>
          <table:table-cell table:style-name="ce90" table:formula="of:=SUMIF([.$J10:.$J410];[.$J412];[.CF$5:.CF$406])" office:value-type="float" office:value="0" calcext:value-type="float">
            <text:p>0</text:p>
          </table:table-cell>
          <table:table-cell table:style-name="ce90" table:formula="of:=SUMIF([.$J10:.$J410];[.$J412];[.CG$5:.CG$406])" office:value-type="float" office:value="0" calcext:value-type="float">
            <text:p>0</text:p>
          </table:table-cell>
          <table:table-cell table:style-name="ce90" table:formula="of:=SUMIF([.$J10:.$J410];[.$J412];[.CH$5:.CH$406])" office:value-type="float" office:value="0" calcext:value-type="float">
            <text:p>0</text:p>
          </table:table-cell>
          <table:table-cell table:style-name="ce90" table:formula="of:=SUMIF([.$J10:.$J410];[.$J412];[.CI$5:.CI$406])" office:value-type="float" office:value="0" calcext:value-type="float">
            <text:p>0</text:p>
          </table:table-cell>
          <table:table-cell table:style-name="ce90" table:formula="of:=SUMIF([.$J10:.$J410];[.$J412];[.CJ$5:.CJ$406])" office:value-type="float" office:value="0" calcext:value-type="float">
            <text:p>0</text:p>
          </table:table-cell>
          <table:table-cell table:style-name="ce90" table:formula="of:=SUMIF([.$J10:.$J410];[.$J412];[.CK$5:.CK$406])" office:value-type="float" office:value="0" calcext:value-type="float">
            <text:p>0</text:p>
          </table:table-cell>
          <table:table-cell table:style-name="ce90" table:formula="of:=SUMIF([.$J10:.$J410];[.$J412];[.CL$5:.CL$406])" office:value-type="float" office:value="0" calcext:value-type="float">
            <text:p>0</text:p>
          </table:table-cell>
          <table:table-cell table:style-name="ce90" table:formula="of:=SUMIF([.$J10:.$J410];[.$J412];[.CM$5:.CM$406])" office:value-type="float" office:value="0" calcext:value-type="float">
            <text:p>0</text:p>
          </table:table-cell>
          <table:table-cell table:style-name="ce90" table:formula="of:=SUMIF([.$J10:.$J410];[.$J412];[.CN$5:.CN$406])" office:value-type="float" office:value="0" calcext:value-type="float">
            <text:p>0</text:p>
          </table:table-cell>
          <table:table-cell table:style-name="ce90" table:formula="of:=SUMIF([.$J10:.$J410];[.$J412];[.CO$5:.CO$406])" office:value-type="float" office:value="0" calcext:value-type="float">
            <text:p>0</text:p>
          </table:table-cell>
          <table:table-cell table:style-name="ce90" table:formula="of:=SUMIF([.$J10:.$J410];[.$J412];[.CP$5:.CP$406])" office:value-type="float" office:value="0" calcext:value-type="float">
            <text:p>0</text:p>
          </table:table-cell>
          <table:table-cell table:style-name="ce90" table:formula="of:=SUMIF([.$J10:.$J410];[.$J412];[.CQ$5:.CQ$406])" office:value-type="float" office:value="0" calcext:value-type="float">
            <text:p>0</text:p>
          </table:table-cell>
          <table:table-cell table:style-name="ce90" table:formula="of:=SUMIF([.$J10:.$J410];[.$J412];[.CR$5:.CR$406])" office:value-type="float" office:value="0" calcext:value-type="float">
            <text:p>0</text:p>
          </table:table-cell>
          <table:table-cell table:style-name="ce90" table:formula="of:=SUMIF([.$J10:.$J410];[.$J412];[.CS$5:.CS$406])" office:value-type="float" office:value="0" calcext:value-type="float">
            <text:p>0</text:p>
          </table:table-cell>
          <table:table-cell table:style-name="ce90" table:formula="of:=SUMIF([.$J10:.$J410];[.$J412];[.CT$5:.CT$406])" office:value-type="float" office:value="0" calcext:value-type="float">
            <text:p>0</text:p>
          </table:table-cell>
          <table:table-cell table:style-name="ce90" table:formula="of:=SUMIF([.$J10:.$J410];[.$J412];[.CU$5:.CU$406])" office:value-type="float" office:value="0" calcext:value-type="float">
            <text:p>0</text:p>
          </table:table-cell>
          <table:table-cell table:style-name="ce90" table:formula="of:=SUMIF([.$J10:.$J410];[.$J412];[.CV$5:.CV$406])" office:value-type="float" office:value="0" calcext:value-type="float">
            <text:p>0</text:p>
          </table:table-cell>
          <table:table-cell table:style-name="ce90" table:formula="of:=SUMIF([.$J10:.$J410];[.$J412];[.CW$5:.CW$406])" office:value-type="float" office:value="0" calcext:value-type="float">
            <text:p>0</text:p>
          </table:table-cell>
          <table:table-cell table:style-name="ce90" table:formula="of:=SUMIF([.$J10:.$J410];[.$J412];[.CX$5:.CX$406])" office:value-type="float" office:value="0" calcext:value-type="float">
            <text:p>0</text:p>
          </table:table-cell>
          <table:table-cell table:style-name="ce90" table:formula="of:=SUMIF([.$J10:.$J410];[.$J412];[.CY$5:.CY$406])" office:value-type="float" office:value="0" calcext:value-type="float">
            <text:p>0</text:p>
          </table:table-cell>
          <table:table-cell table:style-name="ce90" table:formula="of:=SUMIF([.$J10:.$J410];[.$J412];[.CZ$5:.CZ$406])" office:value-type="float" office:value="0" calcext:value-type="float">
            <text:p>0</text:p>
          </table:table-cell>
          <table:table-cell table:style-name="ce90" table:formula="of:=SUMIF([.$J10:.$J410];[.$J412];[.DA$5:.DA$406])" office:value-type="float" office:value="0" calcext:value-type="float">
            <text:p>0</text:p>
          </table:table-cell>
          <table:table-cell table:style-name="ce90" table:formula="of:=SUMIF([.$J10:.$J410];[.$J412];[.DB$5:.DB$406])" office:value-type="float" office:value="0" calcext:value-type="float">
            <text:p>0</text:p>
          </table:table-cell>
          <table:table-cell table:style-name="ce90" table:formula="of:=SUMIF([.$J10:.$J410];[.$J412];[.DC$5:.DC$406])" office:value-type="float" office:value="0" calcext:value-type="float">
            <text:p>0</text:p>
          </table:table-cell>
          <table:table-cell table:style-name="ce90" table:formula="of:=SUMIF([.$J10:.$J410];[.$J412];[.DD$5:.DD$406])" office:value-type="float" office:value="0" calcext:value-type="float">
            <text:p>0</text:p>
          </table:table-cell>
          <table:table-cell table:style-name="ce90" table:formula="of:=SUMIF([.$J10:.$J410];[.$J412];[.DE$5:.DE$406])" office:value-type="float" office:value="0" calcext:value-type="float">
            <text:p>0</text:p>
          </table:table-cell>
          <table:table-cell table:style-name="ce90" table:formula="of:=SUMIF([.$J10:.$J410];[.$J412];[.DF$5:.DF$406])" office:value-type="float" office:value="0" calcext:value-type="float">
            <text:p>0</text:p>
          </table:table-cell>
          <table:table-cell table:style-name="ce90" table:formula="of:=SUMIF([.$J10:.$J410];[.$J412];[.DG$5:.DG$406])" office:value-type="float" office:value="0" calcext:value-type="float">
            <text:p>0</text:p>
          </table:table-cell>
          <table:table-cell table:style-name="ce90" table:formula="of:=SUMIF([.$J10:.$J410];[.$J412];[.DH$5:.DH$406])" office:value-type="float" office:value="0" calcext:value-type="float">
            <text:p>0</text:p>
          </table:table-cell>
          <table:table-cell table:style-name="ce90" table:formula="of:=SUMIF([.$J10:.$J410];[.$J412];[.DI$5:.DI$406])" office:value-type="float" office:value="0" calcext:value-type="float">
            <text:p>0</text:p>
          </table:table-cell>
          <table:table-cell table:style-name="ce90" table:formula="of:=SUMIF([.$J10:.$J410];[.$J412];[.DJ$5:.DJ$406])" office:value-type="float" office:value="0" calcext:value-type="float">
            <text:p>0</text:p>
          </table:table-cell>
          <table:table-cell table:style-name="ce90" table:formula="of:=SUMIF([.$J10:.$J410];[.$J412];[.DK$5:.DK$406])" office:value-type="float" office:value="0" calcext:value-type="float">
            <text:p>0</text:p>
          </table:table-cell>
          <table:table-cell table:style-name="ce90" table:formula="of:=SUMIF([.$J10:.$J410];[.$J412];[.DL$5:.DL$406])" office:value-type="float" office:value="0" calcext:value-type="float">
            <text:p>0</text:p>
          </table:table-cell>
          <table:table-cell table:style-name="ce90" table:formula="of:=SUMIF([.$J10:.$J410];[.$J412];[.DM$5:.DM$406])" office:value-type="float" office:value="0" calcext:value-type="float">
            <text:p>0</text:p>
          </table:table-cell>
          <table:table-cell table:style-name="ce90" table:formula="of:=SUMIF([.$J10:.$J410];[.$J412];[.DN$5:.DN$406])" office:value-type="float" office:value="0" calcext:value-type="float">
            <text:p>0</text:p>
          </table:table-cell>
          <table:table-cell table:style-name="ce90" table:formula="of:=SUMIF([.$J10:.$J410];[.$J412];[.DO$5:.DO$406])" office:value-type="float" office:value="0" calcext:value-type="float">
            <text:p>0</text:p>
          </table:table-cell>
          <table:table-cell table:style-name="ce90" table:formula="of:=SUMIF([.$J10:.$J410];[.$J412];[.DP$5:.DP$406])" office:value-type="float" office:value="0" calcext:value-type="float">
            <text:p>0</text:p>
          </table:table-cell>
          <table:table-cell table:style-name="ce90" table:formula="of:=SUMIF([.$J10:.$J410];[.$J412];[.DQ$5:.DQ$406])" office:value-type="float" office:value="0" calcext:value-type="float">
            <text:p>0</text:p>
          </table:table-cell>
          <table:table-cell table:style-name="ce90" table:formula="of:=SUMIF([.$J10:.$J410];[.$J412];[.DR$5:.DR$406])" office:value-type="float" office:value="0" calcext:value-type="float">
            <text:p>0</text:p>
          </table:table-cell>
          <table:table-cell table:style-name="ce90" table:formula="of:=SUMIF([.$J10:.$J410];[.$J412];[.DS$5:.DS$406])" office:value-type="float" office:value="0" calcext:value-type="float">
            <text:p>0</text:p>
          </table:table-cell>
          <table:table-cell table:style-name="ce90" table:formula="of:=SUMIF([.$J10:.$J410];[.$J412];[.DT$5:.DT$406])" office:value-type="float" office:value="0" calcext:value-type="float">
            <text:p>0</text:p>
          </table:table-cell>
          <table:table-cell table:style-name="ce90" table:formula="of:=SUMIF([.$J10:.$J410];[.$J412];[.DU$5:.DU$406])" office:value-type="float" office:value="0" calcext:value-type="float">
            <text:p>0</text:p>
          </table:table-cell>
          <table:table-cell table:style-name="ce90" table:formula="of:=SUMIF([.$J10:.$J410];[.$J412];[.DV$5:.DV$406])" office:value-type="float" office:value="0" calcext:value-type="float">
            <text:p>0</text:p>
          </table:table-cell>
          <table:table-cell table:style-name="ce90" table:formula="of:=SUMIF([.$J10:.$J410];[.$J412];[.DW$5:.DW$406])" office:value-type="float" office:value="0" calcext:value-type="float">
            <text:p>0</text:p>
          </table:table-cell>
          <table:table-cell table:style-name="ce90" table:formula="of:=SUMIF([.$J10:.$J410];[.$J412];[.DX$5:.DX$406])" office:value-type="float" office:value="0" calcext:value-type="float">
            <text:p>0</text:p>
          </table:table-cell>
          <table:table-cell table:style-name="ce90" table:formula="of:=SUMIF([.$J10:.$J410];[.$J412];[.DY$5:.DY$406])" office:value-type="float" office:value="0" calcext:value-type="float">
            <text:p>0</text:p>
          </table:table-cell>
          <table:table-cell table:style-name="ce90" table:formula="of:=SUMIF([.$J10:.$J410];[.$J412];[.DZ$5:.DZ$406])" office:value-type="float" office:value="0" calcext:value-type="float">
            <text:p>0</text:p>
          </table:table-cell>
          <table:table-cell table:style-name="ce90" table:formula="of:=SUMIF([.$J10:.$J410];[.$J412];[.EA$5:.EA$406])" office:value-type="float" office:value="0" calcext:value-type="float">
            <text:p>0</text:p>
          </table:table-cell>
          <table:table-cell table:style-name="ce90" table:formula="of:=SUMIF([.$J10:.$J410];[.$J412];[.EB$5:.EB$406])" office:value-type="float" office:value="0" calcext:value-type="float">
            <text:p>0</text:p>
          </table:table-cell>
          <table:table-cell table:style-name="ce90" table:formula="of:=SUMIF([.$J10:.$J410];[.$J412];[.EC$5:.EC$406])" office:value-type="float" office:value="0" calcext:value-type="float">
            <text:p>0</text:p>
          </table:table-cell>
          <table:table-cell table:style-name="ce90" table:formula="of:=SUMIF([.$J10:.$J410];[.$J412];[.ED$5:.ED$406])" office:value-type="float" office:value="0" calcext:value-type="float">
            <text:p>0</text:p>
          </table:table-cell>
          <table:table-cell table:style-name="ce90" table:formula="of:=SUMIF([.$J10:.$J410];[.$J412];[.EE$5:.EE$406])" office:value-type="float" office:value="0" calcext:value-type="float">
            <text:p>0</text:p>
          </table:table-cell>
          <table:table-cell table:style-name="ce90" table:formula="of:=SUMIF([.$J10:.$J410];[.$J412];[.EF$5:.EF$406])" office:value-type="float" office:value="0" calcext:value-type="float">
            <text:p>0</text:p>
          </table:table-cell>
          <table:table-cell table:style-name="ce90" table:formula="of:=SUMIF([.$J10:.$J410];[.$J412];[.EG$5:.EG$406])" office:value-type="float" office:value="0" calcext:value-type="float">
            <text:p>0</text:p>
          </table:table-cell>
          <table:table-cell table:style-name="ce90" table:formula="of:=SUMIF([.$J10:.$J410];[.$J412];[.EH$5:.EH$406])" office:value-type="float" office:value="0" calcext:value-type="float">
            <text:p>0</text:p>
          </table:table-cell>
          <table:table-cell table:style-name="ce90" table:formula="of:=SUMIF([.$J10:.$J410];[.$J412];[.EI$5:.EI$406])" office:value-type="float" office:value="0" calcext:value-type="float">
            <text:p>0</text:p>
          </table:table-cell>
          <table:table-cell table:style-name="ce90" table:formula="of:=SUMIF([.$J10:.$J410];[.$J412];[.EJ$5:.EJ$406])" office:value-type="float" office:value="0" calcext:value-type="float">
            <text:p>0</text:p>
          </table:table-cell>
          <table:table-cell table:style-name="ce90" table:formula="of:=SUMIF([.$J10:.$J410];[.$J412];[.EK$5:.EK$406])" office:value-type="float" office:value="0" calcext:value-type="float">
            <text:p>0</text:p>
          </table:table-cell>
          <table:table-cell table:style-name="ce90" table:formula="of:=SUMIF([.$J10:.$J410];[.$J412];[.EL$5:.EL$406])" office:value-type="float" office:value="0" calcext:value-type="float">
            <text:p>0</text:p>
          </table:table-cell>
          <table:table-cell table:style-name="ce90" table:formula="of:=SUMIF([.$J10:.$J410];[.$J412];[.EM$5:.EM$406])" office:value-type="float" office:value="0" calcext:value-type="float">
            <text:p>0</text:p>
          </table:table-cell>
          <table:table-cell table:style-name="ce90" table:formula="of:=SUMIF([.$J10:.$J410];[.$J412];[.EN$5:.EN$406])" office:value-type="float" office:value="0" calcext:value-type="float">
            <text:p>0</text:p>
          </table:table-cell>
          <table:table-cell table:style-name="ce90" table:formula="of:=SUMIF([.$J10:.$J410];[.$J412];[.EO$5:.EO$406])" office:value-type="float" office:value="0" calcext:value-type="float">
            <text:p>0</text:p>
          </table:table-cell>
          <table:table-cell table:style-name="ce90" table:formula="of:=SUMIF([.$J10:.$J410];[.$J412];[.EP$5:.EP$406])" office:value-type="float" office:value="0" calcext:value-type="float">
            <text:p>0</text:p>
          </table:table-cell>
          <table:table-cell table:style-name="ce90" table:formula="of:=SUMIF([.$J10:.$J410];[.$J412];[.EQ$5:.EQ$406])" office:value-type="float" office:value="0" calcext:value-type="float">
            <text:p>0</text:p>
          </table:table-cell>
          <table:table-cell table:style-name="ce90" table:formula="of:=SUMIF([.$J10:.$J410];[.$J412];[.ER$5:.ER$406])" office:value-type="float" office:value="0" calcext:value-type="float">
            <text:p>0</text:p>
          </table:table-cell>
          <table:table-cell table:style-name="ce90" table:formula="of:=SUMIF([.$J10:.$J410];[.$J412];[.ES$5:.ES$406])" office:value-type="float" office:value="0" calcext:value-type="float">
            <text:p>0</text:p>
          </table:table-cell>
          <table:table-cell table:style-name="ce90" table:formula="of:=SUMIF([.$J10:.$J410];[.$J412];[.ET$5:.ET$406])" office:value-type="float" office:value="0" calcext:value-type="float">
            <text:p>0</text:p>
          </table:table-cell>
          <table:table-cell table:style-name="ce90" table:formula="of:=SUMIF([.$J10:.$J410];[.$J412];[.EU$5:.EU$406])" office:value-type="float" office:value="0" calcext:value-type="float">
            <text:p>0</text:p>
          </table:table-cell>
          <table:table-cell table:style-name="ce90" table:formula="of:=SUMIF([.$J10:.$J410];[.$J412];[.EV$5:.EV$406])" office:value-type="float" office:value="0" calcext:value-type="float">
            <text:p>0</text:p>
          </table:table-cell>
          <table:table-cell table:style-name="ce90" table:formula="of:=SUMIF([.$J10:.$J410];[.$J412];[.EW$5:.EW$406])" office:value-type="float" office:value="0" calcext:value-type="float">
            <text:p>0</text:p>
          </table:table-cell>
          <table:table-cell table:style-name="ce90" table:formula="of:=SUMIF([.$J10:.$J410];[.$J412];[.EX$5:.EX$406])" office:value-type="float" office:value="0" calcext:value-type="float">
            <text:p>0</text:p>
          </table:table-cell>
          <table:table-cell table:style-name="ce90" table:formula="of:=SUMIF([.$J10:.$J410];[.$J412];[.EY$5:.EY$406])" office:value-type="float" office:value="0" calcext:value-type="float">
            <text:p>0</text:p>
          </table:table-cell>
          <table:table-cell table:style-name="ce90" table:formula="of:=SUMIF([.$J10:.$J410];[.$J412];[.EZ$5:.EZ$406])" office:value-type="float" office:value="0" calcext:value-type="float">
            <text:p>0</text:p>
          </table:table-cell>
          <table:table-cell table:style-name="ce90" table:formula="of:=SUMIF([.$J10:.$J410];[.$J412];[.FA$5:.FA$406])" office:value-type="float" office:value="0" calcext:value-type="float">
            <text:p>0</text:p>
          </table:table-cell>
          <table:table-cell table:style-name="ce90" table:formula="of:=SUMIF([.$J10:.$J410];[.$J412];[.FB$5:.FB$406])" office:value-type="float" office:value="0" calcext:value-type="float">
            <text:p>0</text:p>
          </table:table-cell>
          <table:table-cell table:style-name="ce90" table:formula="of:=SUMIF([.$J10:.$J410];[.$J412];[.FC$5:.FC$406])" office:value-type="float" office:value="0" calcext:value-type="float">
            <text:p>0</text:p>
          </table:table-cell>
          <table:table-cell table:style-name="ce90" table:formula="of:=SUMIF([.$J10:.$J410];[.$J412];[.FD$5:.FD$406])" office:value-type="float" office:value="0" calcext:value-type="float">
            <text:p>0</text:p>
          </table:table-cell>
          <table:table-cell table:style-name="ce90" table:formula="of:=SUMIF([.$J10:.$J410];[.$J412];[.FE$5:.FE$406])" office:value-type="float" office:value="0" calcext:value-type="float">
            <text:p>0</text:p>
          </table:table-cell>
          <table:table-cell table:style-name="ce90" table:formula="of:=SUMIF([.$J10:.$J410];[.$J412];[.FF$5:.FF$406])" office:value-type="float" office:value="0" calcext:value-type="float">
            <text:p>0</text:p>
          </table:table-cell>
          <table:table-cell table:style-name="ce90" table:formula="of:=SUMIF([.$J10:.$J410];[.$J412];[.FG$5:.FG$406])" office:value-type="float" office:value="0" calcext:value-type="float">
            <text:p>0</text:p>
          </table:table-cell>
          <table:table-cell table:style-name="ce90" table:formula="of:=SUMIF([.$J10:.$J410];[.$J412];[.FH$5:.FH$406])" office:value-type="float" office:value="0" calcext:value-type="float">
            <text:p>0</text:p>
          </table:table-cell>
          <table:table-cell table:style-name="ce90" table:formula="of:=SUMIF([.$J10:.$J410];[.$J412];[.FI$5:.FI$406])" office:value-type="float" office:value="0" calcext:value-type="float">
            <text:p>0</text:p>
          </table:table-cell>
          <table:table-cell table:style-name="ce90" table:formula="of:=SUMIF([.$J10:.$J410];[.$J412];[.FJ$5:.FJ$406])" office:value-type="float" office:value="0" calcext:value-type="float">
            <text:p>0</text:p>
          </table:table-cell>
          <table:table-cell table:style-name="ce90" table:formula="of:=SUMIF([.$J10:.$J410];[.$J412];[.FK$5:.FK$406])" office:value-type="float" office:value="0" calcext:value-type="float">
            <text:p>0</text:p>
          </table:table-cell>
          <table:table-cell table:style-name="ce90" table:formula="of:=SUMIF([.$J10:.$J410];[.$J412];[.FL$5:.FL$406])" office:value-type="float" office:value="0" calcext:value-type="float">
            <text:p>0</text:p>
          </table:table-cell>
          <table:table-cell table:style-name="ce90" table:formula="of:=SUMIF([.$J10:.$J410];[.$J412];[.FM$5:.FM$406])" office:value-type="float" office:value="0" calcext:value-type="float">
            <text:p>0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6"/>
          <table:table-cell table:style-name="ce38" table:number-columns-repeated="2"/>
          <table:table-cell table:style-name="ce43" table:number-columns-repeated="2"/>
          <table:table-cell table:style-name="ce32" table:formula="of:=IF([.$L413]&lt;&gt;&quot;&quot;;NETWORKDAYS([.$L413];[.$M413];[$休日.$B$4:.$B$304]);&quot;&quot;)">
            <text:p/>
          </table:table-cell>
          <table:table-cell table:style-name="ce61"/>
          <table:table-cell table:style-name="ce63" table:formula="of:=IF(OR(AND([.$N413]=&quot;&quot;;[.$L413]&lt;&gt;&quot;&quot;;[.$L413]&lt;=[.$U$1]);AND([.$M413]&lt;&gt;&quot;&quot;;[.Q413]&lt;100;[.$M413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11:.$J411];[.$J413];[.V$5:.V$406])" office:value-type="float" office:value="0" calcext:value-type="float">
            <text:p>0</text:p>
          </table:table-cell>
          <table:table-cell table:style-name="ce90" table:formula="of:=SUMIF([.$J11:.$J411];[.$J413];[.W$5:.W$406])" office:value-type="float" office:value="0" calcext:value-type="float">
            <text:p>0</text:p>
          </table:table-cell>
          <table:table-cell table:style-name="ce90" table:formula="of:=SUMIF([.$J11:.$J411];[.$J413];[.X$5:.X$406])" office:value-type="float" office:value="0" calcext:value-type="float">
            <text:p>0</text:p>
          </table:table-cell>
          <table:table-cell table:style-name="ce114" table:formula="of:=SUMIF([.$J11:.$J411];[.$J413];[.Y$5:.Y$406])" office:value-type="float" office:value="0" calcext:value-type="float">
            <text:p>0</text:p>
          </table:table-cell>
          <table:table-cell table:style-name="ce114" table:formula="of:=SUMIF([.$J11:.$J411];[.$J413];[.Z$5:.Z$406])" office:value-type="float" office:value="0" calcext:value-type="float">
            <text:p>0</text:p>
          </table:table-cell>
          <table:table-cell table:style-name="ce90" table:formula="of:=SUMIF([.$J11:.$J411];[.$J413];[.AA$5:.AA$406])" office:value-type="float" office:value="0" calcext:value-type="float">
            <text:p>0</text:p>
          </table:table-cell>
          <table:table-cell table:style-name="ce90" table:formula="of:=SUMIF([.$J11:.$J411];[.$J413];[.AB$5:.AB$406])" office:value-type="float" office:value="0" calcext:value-type="float">
            <text:p>0</text:p>
          </table:table-cell>
          <table:table-cell table:style-name="ce90" table:formula="of:=SUMIF([.$J11:.$J411];[.$J413];[.AC$5:.AC$406])" office:value-type="float" office:value="0" calcext:value-type="float">
            <text:p>0</text:p>
          </table:table-cell>
          <table:table-cell table:style-name="ce90" table:formula="of:=SUMIF([.$J11:.$J411];[.$J413];[.AD$5:.AD$406])" office:value-type="float" office:value="0" calcext:value-type="float">
            <text:p>0</text:p>
          </table:table-cell>
          <table:table-cell table:style-name="ce90" table:formula="of:=SUMIF([.$J11:.$J411];[.$J413];[.AE$5:.AE$406])" office:value-type="float" office:value="0" calcext:value-type="float">
            <text:p>0</text:p>
          </table:table-cell>
          <table:table-cell table:style-name="ce114" table:formula="of:=SUMIF([.$J11:.$J411];[.$J413];[.AF$5:.AF$406])" office:value-type="float" office:value="0" calcext:value-type="float">
            <text:p>0</text:p>
          </table:table-cell>
          <table:table-cell table:style-name="ce114" table:formula="of:=SUMIF([.$J11:.$J411];[.$J413];[.AG$5:.AG$406])" office:value-type="float" office:value="0" calcext:value-type="float">
            <text:p>0</text:p>
          </table:table-cell>
          <table:table-cell table:style-name="ce90" table:formula="of:=SUMIF([.$J11:.$J411];[.$J413];[.AH$5:.AH$406])" office:value-type="float" office:value="0" calcext:value-type="float">
            <text:p>0</text:p>
          </table:table-cell>
          <table:table-cell table:style-name="ce90" table:formula="of:=SUMIF([.$J11:.$J411];[.$J413];[.AI$5:.AI$406])" office:value-type="float" office:value="0" calcext:value-type="float">
            <text:p>0</text:p>
          </table:table-cell>
          <table:table-cell table:style-name="ce90" table:formula="of:=SUMIF([.$J11:.$J411];[.$J413];[.AJ$5:.AJ$406])" office:value-type="float" office:value="0" calcext:value-type="float">
            <text:p>0</text:p>
          </table:table-cell>
          <table:table-cell table:style-name="ce90" table:formula="of:=SUMIF([.$J11:.$J411];[.$J413];[.AK$5:.AK$406])" office:value-type="float" office:value="0" calcext:value-type="float">
            <text:p>0</text:p>
          </table:table-cell>
          <table:table-cell table:style-name="ce90" table:formula="of:=SUMIF([.$J11:.$J411];[.$J413];[.AL$5:.AL$406])" office:value-type="float" office:value="0" calcext:value-type="float">
            <text:p>0</text:p>
          </table:table-cell>
          <table:table-cell table:style-name="ce114" table:formula="of:=SUMIF([.$J11:.$J411];[.$J413];[.AM$5:.AM$406])" office:value-type="float" office:value="0" calcext:value-type="float">
            <text:p>0</text:p>
          </table:table-cell>
          <table:table-cell table:style-name="ce114" table:formula="of:=SUMIF([.$J11:.$J411];[.$J413];[.AN$5:.AN$406])" office:value-type="float" office:value="0" calcext:value-type="float">
            <text:p>0</text:p>
          </table:table-cell>
          <table:table-cell table:style-name="ce90" table:formula="of:=SUMIF([.$J11:.$J411];[.$J413];[.AO$5:.AO$406])" office:value-type="float" office:value="0" calcext:value-type="float">
            <text:p>0</text:p>
          </table:table-cell>
          <table:table-cell table:style-name="ce90" table:formula="of:=SUMIF([.$J11:.$J411];[.$J413];[.AP$5:.AP$406])" office:value-type="float" office:value="0" calcext:value-type="float">
            <text:p>0</text:p>
          </table:table-cell>
          <table:table-cell table:style-name="ce90" table:formula="of:=SUMIF([.$J11:.$J411];[.$J413];[.AQ$5:.AQ$406])" office:value-type="float" office:value="0" calcext:value-type="float">
            <text:p>0</text:p>
          </table:table-cell>
          <table:table-cell table:style-name="ce90" table:formula="of:=SUMIF([.$J11:.$J411];[.$J413];[.AR$5:.AR$406])" office:value-type="float" office:value="0" calcext:value-type="float">
            <text:p>0</text:p>
          </table:table-cell>
          <table:table-cell table:style-name="ce143" table:formula="of:=SUMIF([.$J11:.$J411];[.$J413];[.AS$5:.AS$406])" office:value-type="float" office:value="0" calcext:value-type="float">
            <text:p>0</text:p>
          </table:table-cell>
          <table:table-cell table:style-name="ce114" table:formula="of:=SUMIF([.$J11:.$J411];[.$J413];[.AT$5:.AT$406])" office:value-type="float" office:value="0" calcext:value-type="float">
            <text:p>0</text:p>
          </table:table-cell>
          <table:table-cell table:style-name="ce114" table:formula="of:=SUMIF([.$J11:.$J411];[.$J413];[.AU$5:.AU$406])" office:value-type="float" office:value="0" calcext:value-type="float">
            <text:p>0</text:p>
          </table:table-cell>
          <table:table-cell table:style-name="ce157" table:formula="of:=SUMIF([.$J11:.$J411];[.$J413];[.AV$5:.AV$406])" office:value-type="float" office:value="0" calcext:value-type="float">
            <text:p>0</text:p>
          </table:table-cell>
          <table:table-cell table:style-name="ce90" table:formula="of:=SUMIF([.$J11:.$J411];[.$J413];[.AW$5:.AW$406])" office:value-type="float" office:value="0" calcext:value-type="float">
            <text:p>0</text:p>
          </table:table-cell>
          <table:table-cell table:style-name="ce90" table:formula="of:=SUMIF([.$J11:.$J411];[.$J413];[.AX$5:.AX$406])" office:value-type="float" office:value="0" calcext:value-type="float">
            <text:p>0</text:p>
          </table:table-cell>
          <table:table-cell table:style-name="ce90" table:formula="of:=SUMIF([.$J11:.$J411];[.$J413];[.AY$5:.AY$406])" office:value-type="float" office:value="0" calcext:value-type="float">
            <text:p>0</text:p>
          </table:table-cell>
          <table:table-cell table:style-name="ce90" table:formula="of:=SUMIF([.$J11:.$J411];[.$J413];[.AZ$5:.AZ$406])" office:value-type="float" office:value="0" calcext:value-type="float">
            <text:p>0</text:p>
          </table:table-cell>
          <table:table-cell table:style-name="ce90" table:formula="of:=SUMIF([.$J11:.$J411];[.$J413];[.BA$5:.BA$406])" office:value-type="float" office:value="0" calcext:value-type="float">
            <text:p>0</text:p>
          </table:table-cell>
          <table:table-cell table:style-name="ce90" table:formula="of:=SUMIF([.$J11:.$J411];[.$J413];[.BB$5:.BB$406])" office:value-type="float" office:value="0" calcext:value-type="float">
            <text:p>0</text:p>
          </table:table-cell>
          <table:table-cell table:style-name="ce90" table:formula="of:=SUMIF([.$J11:.$J411];[.$J413];[.BC$5:.BC$406])" office:value-type="float" office:value="0" calcext:value-type="float">
            <text:p>0</text:p>
          </table:table-cell>
          <table:table-cell table:style-name="ce90" table:formula="of:=SUMIF([.$J11:.$J411];[.$J413];[.BD$5:.BD$406])" office:value-type="float" office:value="0" calcext:value-type="float">
            <text:p>0</text:p>
          </table:table-cell>
          <table:table-cell table:style-name="ce90" table:formula="of:=SUMIF([.$J11:.$J411];[.$J413];[.BE$5:.BE$406])" office:value-type="float" office:value="0" calcext:value-type="float">
            <text:p>0</text:p>
          </table:table-cell>
          <table:table-cell table:style-name="ce90" table:formula="of:=SUMIF([.$J11:.$J411];[.$J413];[.BF$5:.BF$406])" office:value-type="float" office:value="0" calcext:value-type="float">
            <text:p>0</text:p>
          </table:table-cell>
          <table:table-cell table:style-name="ce90" table:formula="of:=SUMIF([.$J11:.$J411];[.$J413];[.BG$5:.BG$406])" office:value-type="float" office:value="0" calcext:value-type="float">
            <text:p>0</text:p>
          </table:table-cell>
          <table:table-cell table:style-name="ce90" table:formula="of:=SUMIF([.$J11:.$J411];[.$J413];[.BH$5:.BH$406])" office:value-type="float" office:value="0" calcext:value-type="float">
            <text:p>0</text:p>
          </table:table-cell>
          <table:table-cell table:style-name="ce90" table:formula="of:=SUMIF([.$J11:.$J411];[.$J413];[.BI$5:.BI$406])" office:value-type="float" office:value="0" calcext:value-type="float">
            <text:p>0</text:p>
          </table:table-cell>
          <table:table-cell table:style-name="ce90" table:formula="of:=SUMIF([.$J11:.$J411];[.$J413];[.BJ$5:.BJ$406])" office:value-type="float" office:value="0" calcext:value-type="float">
            <text:p>0</text:p>
          </table:table-cell>
          <table:table-cell table:style-name="ce90" table:formula="of:=SUMIF([.$J11:.$J411];[.$J413];[.BK$5:.BK$406])" office:value-type="float" office:value="0" calcext:value-type="float">
            <text:p>0</text:p>
          </table:table-cell>
          <table:table-cell table:style-name="ce90" table:formula="of:=SUMIF([.$J11:.$J411];[.$J413];[.BL$5:.BL$406])" office:value-type="float" office:value="0" calcext:value-type="float">
            <text:p>0</text:p>
          </table:table-cell>
          <table:table-cell table:style-name="ce90" table:formula="of:=SUMIF([.$J11:.$J411];[.$J413];[.BM$5:.BM$406])" office:value-type="float" office:value="0" calcext:value-type="float">
            <text:p>0</text:p>
          </table:table-cell>
          <table:table-cell table:style-name="ce90" table:formula="of:=SUMIF([.$J11:.$J411];[.$J413];[.BN$5:.BN$406])" office:value-type="float" office:value="0" calcext:value-type="float">
            <text:p>0</text:p>
          </table:table-cell>
          <table:table-cell table:style-name="ce90" table:formula="of:=SUMIF([.$J11:.$J411];[.$J413];[.BO$5:.BO$406])" office:value-type="float" office:value="0" calcext:value-type="float">
            <text:p>0</text:p>
          </table:table-cell>
          <table:table-cell table:style-name="ce90" table:formula="of:=SUMIF([.$J11:.$J411];[.$J413];[.BP$5:.BP$406])" office:value-type="float" office:value="0" calcext:value-type="float">
            <text:p>0</text:p>
          </table:table-cell>
          <table:table-cell table:style-name="ce90" table:formula="of:=SUMIF([.$J11:.$J411];[.$J413];[.BQ$5:.BQ$406])" office:value-type="float" office:value="0" calcext:value-type="float">
            <text:p>0</text:p>
          </table:table-cell>
          <table:table-cell table:style-name="ce90" table:formula="of:=SUMIF([.$J11:.$J411];[.$J413];[.BR$5:.BR$406])" office:value-type="float" office:value="0" calcext:value-type="float">
            <text:p>0</text:p>
          </table:table-cell>
          <table:table-cell table:style-name="ce90" table:formula="of:=SUMIF([.$J11:.$J411];[.$J413];[.BS$5:.BS$406])" office:value-type="float" office:value="0" calcext:value-type="float">
            <text:p>0</text:p>
          </table:table-cell>
          <table:table-cell table:style-name="ce90" table:formula="of:=SUMIF([.$J11:.$J411];[.$J413];[.BT$5:.BT$406])" office:value-type="float" office:value="0" calcext:value-type="float">
            <text:p>0</text:p>
          </table:table-cell>
          <table:table-cell table:style-name="ce90" table:formula="of:=SUMIF([.$J11:.$J411];[.$J413];[.BU$5:.BU$406])" office:value-type="float" office:value="0" calcext:value-type="float">
            <text:p>0</text:p>
          </table:table-cell>
          <table:table-cell table:style-name="ce90" table:formula="of:=SUMIF([.$J11:.$J411];[.$J413];[.BV$5:.BV$406])" office:value-type="float" office:value="0" calcext:value-type="float">
            <text:p>0</text:p>
          </table:table-cell>
          <table:table-cell table:style-name="ce90" table:formula="of:=SUMIF([.$J11:.$J411];[.$J413];[.BW$5:.BW$406])" office:value-type="float" office:value="0" calcext:value-type="float">
            <text:p>0</text:p>
          </table:table-cell>
          <table:table-cell table:style-name="ce90" table:formula="of:=SUMIF([.$J11:.$J411];[.$J413];[.BX$5:.BX$406])" office:value-type="float" office:value="0" calcext:value-type="float">
            <text:p>0</text:p>
          </table:table-cell>
          <table:table-cell table:style-name="ce90" table:formula="of:=SUMIF([.$J11:.$J411];[.$J413];[.BY$5:.BY$406])" office:value-type="float" office:value="0" calcext:value-type="float">
            <text:p>0</text:p>
          </table:table-cell>
          <table:table-cell table:style-name="ce90" table:formula="of:=SUMIF([.$J11:.$J411];[.$J413];[.BZ$5:.BZ$406])" office:value-type="float" office:value="0" calcext:value-type="float">
            <text:p>0</text:p>
          </table:table-cell>
          <table:table-cell table:style-name="ce90" table:formula="of:=SUMIF([.$J11:.$J411];[.$J413];[.CA$5:.CA$406])" office:value-type="float" office:value="0" calcext:value-type="float">
            <text:p>0</text:p>
          </table:table-cell>
          <table:table-cell table:style-name="ce90" table:formula="of:=SUMIF([.$J11:.$J411];[.$J413];[.CB$5:.CB$406])" office:value-type="float" office:value="0" calcext:value-type="float">
            <text:p>0</text:p>
          </table:table-cell>
          <table:table-cell table:style-name="ce90" table:formula="of:=SUMIF([.$J11:.$J411];[.$J413];[.CC$5:.CC$406])" office:value-type="float" office:value="0" calcext:value-type="float">
            <text:p>0</text:p>
          </table:table-cell>
          <table:table-cell table:style-name="ce90" table:formula="of:=SUMIF([.$J11:.$J411];[.$J413];[.CD$5:.CD$406])" office:value-type="float" office:value="0" calcext:value-type="float">
            <text:p>0</text:p>
          </table:table-cell>
          <table:table-cell table:style-name="ce90" table:formula="of:=SUMIF([.$J11:.$J411];[.$J413];[.CE$5:.CE$406])" office:value-type="float" office:value="0" calcext:value-type="float">
            <text:p>0</text:p>
          </table:table-cell>
          <table:table-cell table:style-name="ce90" table:formula="of:=SUMIF([.$J11:.$J411];[.$J413];[.CF$5:.CF$406])" office:value-type="float" office:value="0" calcext:value-type="float">
            <text:p>0</text:p>
          </table:table-cell>
          <table:table-cell table:style-name="ce90" table:formula="of:=SUMIF([.$J11:.$J411];[.$J413];[.CG$5:.CG$406])" office:value-type="float" office:value="0" calcext:value-type="float">
            <text:p>0</text:p>
          </table:table-cell>
          <table:table-cell table:style-name="ce90" table:formula="of:=SUMIF([.$J11:.$J411];[.$J413];[.CH$5:.CH$406])" office:value-type="float" office:value="0" calcext:value-type="float">
            <text:p>0</text:p>
          </table:table-cell>
          <table:table-cell table:style-name="ce90" table:formula="of:=SUMIF([.$J11:.$J411];[.$J413];[.CI$5:.CI$406])" office:value-type="float" office:value="0" calcext:value-type="float">
            <text:p>0</text:p>
          </table:table-cell>
          <table:table-cell table:style-name="ce90" table:formula="of:=SUMIF([.$J11:.$J411];[.$J413];[.CJ$5:.CJ$406])" office:value-type="float" office:value="0" calcext:value-type="float">
            <text:p>0</text:p>
          </table:table-cell>
          <table:table-cell table:style-name="ce90" table:formula="of:=SUMIF([.$J11:.$J411];[.$J413];[.CK$5:.CK$406])" office:value-type="float" office:value="0" calcext:value-type="float">
            <text:p>0</text:p>
          </table:table-cell>
          <table:table-cell table:style-name="ce90" table:formula="of:=SUMIF([.$J11:.$J411];[.$J413];[.CL$5:.CL$406])" office:value-type="float" office:value="0" calcext:value-type="float">
            <text:p>0</text:p>
          </table:table-cell>
          <table:table-cell table:style-name="ce90" table:formula="of:=SUMIF([.$J11:.$J411];[.$J413];[.CM$5:.CM$406])" office:value-type="float" office:value="0" calcext:value-type="float">
            <text:p>0</text:p>
          </table:table-cell>
          <table:table-cell table:style-name="ce90" table:formula="of:=SUMIF([.$J11:.$J411];[.$J413];[.CN$5:.CN$406])" office:value-type="float" office:value="0" calcext:value-type="float">
            <text:p>0</text:p>
          </table:table-cell>
          <table:table-cell table:style-name="ce90" table:formula="of:=SUMIF([.$J11:.$J411];[.$J413];[.CO$5:.CO$406])" office:value-type="float" office:value="0" calcext:value-type="float">
            <text:p>0</text:p>
          </table:table-cell>
          <table:table-cell table:style-name="ce90" table:formula="of:=SUMIF([.$J11:.$J411];[.$J413];[.CP$5:.CP$406])" office:value-type="float" office:value="0" calcext:value-type="float">
            <text:p>0</text:p>
          </table:table-cell>
          <table:table-cell table:style-name="ce90" table:formula="of:=SUMIF([.$J11:.$J411];[.$J413];[.CQ$5:.CQ$406])" office:value-type="float" office:value="0" calcext:value-type="float">
            <text:p>0</text:p>
          </table:table-cell>
          <table:table-cell table:style-name="ce90" table:formula="of:=SUMIF([.$J11:.$J411];[.$J413];[.CR$5:.CR$406])" office:value-type="float" office:value="0" calcext:value-type="float">
            <text:p>0</text:p>
          </table:table-cell>
          <table:table-cell table:style-name="ce90" table:formula="of:=SUMIF([.$J11:.$J411];[.$J413];[.CS$5:.CS$406])" office:value-type="float" office:value="0" calcext:value-type="float">
            <text:p>0</text:p>
          </table:table-cell>
          <table:table-cell table:style-name="ce90" table:formula="of:=SUMIF([.$J11:.$J411];[.$J413];[.CT$5:.CT$406])" office:value-type="float" office:value="0" calcext:value-type="float">
            <text:p>0</text:p>
          </table:table-cell>
          <table:table-cell table:style-name="ce90" table:formula="of:=SUMIF([.$J11:.$J411];[.$J413];[.CU$5:.CU$406])" office:value-type="float" office:value="0" calcext:value-type="float">
            <text:p>0</text:p>
          </table:table-cell>
          <table:table-cell table:style-name="ce90" table:formula="of:=SUMIF([.$J11:.$J411];[.$J413];[.CV$5:.CV$406])" office:value-type="float" office:value="0" calcext:value-type="float">
            <text:p>0</text:p>
          </table:table-cell>
          <table:table-cell table:style-name="ce90" table:formula="of:=SUMIF([.$J11:.$J411];[.$J413];[.CW$5:.CW$406])" office:value-type="float" office:value="0" calcext:value-type="float">
            <text:p>0</text:p>
          </table:table-cell>
          <table:table-cell table:style-name="ce90" table:formula="of:=SUMIF([.$J11:.$J411];[.$J413];[.CX$5:.CX$406])" office:value-type="float" office:value="0" calcext:value-type="float">
            <text:p>0</text:p>
          </table:table-cell>
          <table:table-cell table:style-name="ce90" table:formula="of:=SUMIF([.$J11:.$J411];[.$J413];[.CY$5:.CY$406])" office:value-type="float" office:value="0" calcext:value-type="float">
            <text:p>0</text:p>
          </table:table-cell>
          <table:table-cell table:style-name="ce90" table:formula="of:=SUMIF([.$J11:.$J411];[.$J413];[.CZ$5:.CZ$406])" office:value-type="float" office:value="0" calcext:value-type="float">
            <text:p>0</text:p>
          </table:table-cell>
          <table:table-cell table:style-name="ce90" table:formula="of:=SUMIF([.$J11:.$J411];[.$J413];[.DA$5:.DA$406])" office:value-type="float" office:value="0" calcext:value-type="float">
            <text:p>0</text:p>
          </table:table-cell>
          <table:table-cell table:style-name="ce90" table:formula="of:=SUMIF([.$J11:.$J411];[.$J413];[.DB$5:.DB$406])" office:value-type="float" office:value="0" calcext:value-type="float">
            <text:p>0</text:p>
          </table:table-cell>
          <table:table-cell table:style-name="ce90" table:formula="of:=SUMIF([.$J11:.$J411];[.$J413];[.DC$5:.DC$406])" office:value-type="float" office:value="0" calcext:value-type="float">
            <text:p>0</text:p>
          </table:table-cell>
          <table:table-cell table:style-name="ce90" table:formula="of:=SUMIF([.$J11:.$J411];[.$J413];[.DD$5:.DD$406])" office:value-type="float" office:value="0" calcext:value-type="float">
            <text:p>0</text:p>
          </table:table-cell>
          <table:table-cell table:style-name="ce90" table:formula="of:=SUMIF([.$J11:.$J411];[.$J413];[.DE$5:.DE$406])" office:value-type="float" office:value="0" calcext:value-type="float">
            <text:p>0</text:p>
          </table:table-cell>
          <table:table-cell table:style-name="ce90" table:formula="of:=SUMIF([.$J11:.$J411];[.$J413];[.DF$5:.DF$406])" office:value-type="float" office:value="0" calcext:value-type="float">
            <text:p>0</text:p>
          </table:table-cell>
          <table:table-cell table:style-name="ce90" table:formula="of:=SUMIF([.$J11:.$J411];[.$J413];[.DG$5:.DG$406])" office:value-type="float" office:value="0" calcext:value-type="float">
            <text:p>0</text:p>
          </table:table-cell>
          <table:table-cell table:style-name="ce90" table:formula="of:=SUMIF([.$J11:.$J411];[.$J413];[.DH$5:.DH$406])" office:value-type="float" office:value="0" calcext:value-type="float">
            <text:p>0</text:p>
          </table:table-cell>
          <table:table-cell table:style-name="ce90" table:formula="of:=SUMIF([.$J11:.$J411];[.$J413];[.DI$5:.DI$406])" office:value-type="float" office:value="0" calcext:value-type="float">
            <text:p>0</text:p>
          </table:table-cell>
          <table:table-cell table:style-name="ce90" table:formula="of:=SUMIF([.$J11:.$J411];[.$J413];[.DJ$5:.DJ$406])" office:value-type="float" office:value="0" calcext:value-type="float">
            <text:p>0</text:p>
          </table:table-cell>
          <table:table-cell table:style-name="ce90" table:formula="of:=SUMIF([.$J11:.$J411];[.$J413];[.DK$5:.DK$406])" office:value-type="float" office:value="0" calcext:value-type="float">
            <text:p>0</text:p>
          </table:table-cell>
          <table:table-cell table:style-name="ce90" table:formula="of:=SUMIF([.$J11:.$J411];[.$J413];[.DL$5:.DL$406])" office:value-type="float" office:value="0" calcext:value-type="float">
            <text:p>0</text:p>
          </table:table-cell>
          <table:table-cell table:style-name="ce90" table:formula="of:=SUMIF([.$J11:.$J411];[.$J413];[.DM$5:.DM$406])" office:value-type="float" office:value="0" calcext:value-type="float">
            <text:p>0</text:p>
          </table:table-cell>
          <table:table-cell table:style-name="ce90" table:formula="of:=SUMIF([.$J11:.$J411];[.$J413];[.DN$5:.DN$406])" office:value-type="float" office:value="0" calcext:value-type="float">
            <text:p>0</text:p>
          </table:table-cell>
          <table:table-cell table:style-name="ce90" table:formula="of:=SUMIF([.$J11:.$J411];[.$J413];[.DO$5:.DO$406])" office:value-type="float" office:value="0" calcext:value-type="float">
            <text:p>0</text:p>
          </table:table-cell>
          <table:table-cell table:style-name="ce90" table:formula="of:=SUMIF([.$J11:.$J411];[.$J413];[.DP$5:.DP$406])" office:value-type="float" office:value="0" calcext:value-type="float">
            <text:p>0</text:p>
          </table:table-cell>
          <table:table-cell table:style-name="ce90" table:formula="of:=SUMIF([.$J11:.$J411];[.$J413];[.DQ$5:.DQ$406])" office:value-type="float" office:value="0" calcext:value-type="float">
            <text:p>0</text:p>
          </table:table-cell>
          <table:table-cell table:style-name="ce90" table:formula="of:=SUMIF([.$J11:.$J411];[.$J413];[.DR$5:.DR$406])" office:value-type="float" office:value="0" calcext:value-type="float">
            <text:p>0</text:p>
          </table:table-cell>
          <table:table-cell table:style-name="ce90" table:formula="of:=SUMIF([.$J11:.$J411];[.$J413];[.DS$5:.DS$406])" office:value-type="float" office:value="0" calcext:value-type="float">
            <text:p>0</text:p>
          </table:table-cell>
          <table:table-cell table:style-name="ce90" table:formula="of:=SUMIF([.$J11:.$J411];[.$J413];[.DT$5:.DT$406])" office:value-type="float" office:value="0" calcext:value-type="float">
            <text:p>0</text:p>
          </table:table-cell>
          <table:table-cell table:style-name="ce90" table:formula="of:=SUMIF([.$J11:.$J411];[.$J413];[.DU$5:.DU$406])" office:value-type="float" office:value="0" calcext:value-type="float">
            <text:p>0</text:p>
          </table:table-cell>
          <table:table-cell table:style-name="ce90" table:formula="of:=SUMIF([.$J11:.$J411];[.$J413];[.DV$5:.DV$406])" office:value-type="float" office:value="0" calcext:value-type="float">
            <text:p>0</text:p>
          </table:table-cell>
          <table:table-cell table:style-name="ce90" table:formula="of:=SUMIF([.$J11:.$J411];[.$J413];[.DW$5:.DW$406])" office:value-type="float" office:value="0" calcext:value-type="float">
            <text:p>0</text:p>
          </table:table-cell>
          <table:table-cell table:style-name="ce90" table:formula="of:=SUMIF([.$J11:.$J411];[.$J413];[.DX$5:.DX$406])" office:value-type="float" office:value="0" calcext:value-type="float">
            <text:p>0</text:p>
          </table:table-cell>
          <table:table-cell table:style-name="ce90" table:formula="of:=SUMIF([.$J11:.$J411];[.$J413];[.DY$5:.DY$406])" office:value-type="float" office:value="0" calcext:value-type="float">
            <text:p>0</text:p>
          </table:table-cell>
          <table:table-cell table:style-name="ce90" table:formula="of:=SUMIF([.$J11:.$J411];[.$J413];[.DZ$5:.DZ$406])" office:value-type="float" office:value="0" calcext:value-type="float">
            <text:p>0</text:p>
          </table:table-cell>
          <table:table-cell table:style-name="ce90" table:formula="of:=SUMIF([.$J11:.$J411];[.$J413];[.EA$5:.EA$406])" office:value-type="float" office:value="0" calcext:value-type="float">
            <text:p>0</text:p>
          </table:table-cell>
          <table:table-cell table:style-name="ce90" table:formula="of:=SUMIF([.$J11:.$J411];[.$J413];[.EB$5:.EB$406])" office:value-type="float" office:value="0" calcext:value-type="float">
            <text:p>0</text:p>
          </table:table-cell>
          <table:table-cell table:style-name="ce90" table:formula="of:=SUMIF([.$J11:.$J411];[.$J413];[.EC$5:.EC$406])" office:value-type="float" office:value="0" calcext:value-type="float">
            <text:p>0</text:p>
          </table:table-cell>
          <table:table-cell table:style-name="ce90" table:formula="of:=SUMIF([.$J11:.$J411];[.$J413];[.ED$5:.ED$406])" office:value-type="float" office:value="0" calcext:value-type="float">
            <text:p>0</text:p>
          </table:table-cell>
          <table:table-cell table:style-name="ce90" table:formula="of:=SUMIF([.$J11:.$J411];[.$J413];[.EE$5:.EE$406])" office:value-type="float" office:value="0" calcext:value-type="float">
            <text:p>0</text:p>
          </table:table-cell>
          <table:table-cell table:style-name="ce90" table:formula="of:=SUMIF([.$J11:.$J411];[.$J413];[.EF$5:.EF$406])" office:value-type="float" office:value="0" calcext:value-type="float">
            <text:p>0</text:p>
          </table:table-cell>
          <table:table-cell table:style-name="ce90" table:formula="of:=SUMIF([.$J11:.$J411];[.$J413];[.EG$5:.EG$406])" office:value-type="float" office:value="0" calcext:value-type="float">
            <text:p>0</text:p>
          </table:table-cell>
          <table:table-cell table:style-name="ce90" table:formula="of:=SUMIF([.$J11:.$J411];[.$J413];[.EH$5:.EH$406])" office:value-type="float" office:value="0" calcext:value-type="float">
            <text:p>0</text:p>
          </table:table-cell>
          <table:table-cell table:style-name="ce90" table:formula="of:=SUMIF([.$J11:.$J411];[.$J413];[.EI$5:.EI$406])" office:value-type="float" office:value="0" calcext:value-type="float">
            <text:p>0</text:p>
          </table:table-cell>
          <table:table-cell table:style-name="ce90" table:formula="of:=SUMIF([.$J11:.$J411];[.$J413];[.EJ$5:.EJ$406])" office:value-type="float" office:value="0" calcext:value-type="float">
            <text:p>0</text:p>
          </table:table-cell>
          <table:table-cell table:style-name="ce90" table:formula="of:=SUMIF([.$J11:.$J411];[.$J413];[.EK$5:.EK$406])" office:value-type="float" office:value="0" calcext:value-type="float">
            <text:p>0</text:p>
          </table:table-cell>
          <table:table-cell table:style-name="ce90" table:formula="of:=SUMIF([.$J11:.$J411];[.$J413];[.EL$5:.EL$406])" office:value-type="float" office:value="0" calcext:value-type="float">
            <text:p>0</text:p>
          </table:table-cell>
          <table:table-cell table:style-name="ce90" table:formula="of:=SUMIF([.$J11:.$J411];[.$J413];[.EM$5:.EM$406])" office:value-type="float" office:value="0" calcext:value-type="float">
            <text:p>0</text:p>
          </table:table-cell>
          <table:table-cell table:style-name="ce90" table:formula="of:=SUMIF([.$J11:.$J411];[.$J413];[.EN$5:.EN$406])" office:value-type="float" office:value="0" calcext:value-type="float">
            <text:p>0</text:p>
          </table:table-cell>
          <table:table-cell table:style-name="ce90" table:formula="of:=SUMIF([.$J11:.$J411];[.$J413];[.EO$5:.EO$406])" office:value-type="float" office:value="0" calcext:value-type="float">
            <text:p>0</text:p>
          </table:table-cell>
          <table:table-cell table:style-name="ce90" table:formula="of:=SUMIF([.$J11:.$J411];[.$J413];[.EP$5:.EP$406])" office:value-type="float" office:value="0" calcext:value-type="float">
            <text:p>0</text:p>
          </table:table-cell>
          <table:table-cell table:style-name="ce90" table:formula="of:=SUMIF([.$J11:.$J411];[.$J413];[.EQ$5:.EQ$406])" office:value-type="float" office:value="0" calcext:value-type="float">
            <text:p>0</text:p>
          </table:table-cell>
          <table:table-cell table:style-name="ce90" table:formula="of:=SUMIF([.$J11:.$J411];[.$J413];[.ER$5:.ER$406])" office:value-type="float" office:value="0" calcext:value-type="float">
            <text:p>0</text:p>
          </table:table-cell>
          <table:table-cell table:style-name="ce90" table:formula="of:=SUMIF([.$J11:.$J411];[.$J413];[.ES$5:.ES$406])" office:value-type="float" office:value="0" calcext:value-type="float">
            <text:p>0</text:p>
          </table:table-cell>
          <table:table-cell table:style-name="ce90" table:formula="of:=SUMIF([.$J11:.$J411];[.$J413];[.ET$5:.ET$406])" office:value-type="float" office:value="0" calcext:value-type="float">
            <text:p>0</text:p>
          </table:table-cell>
          <table:table-cell table:style-name="ce90" table:formula="of:=SUMIF([.$J11:.$J411];[.$J413];[.EU$5:.EU$406])" office:value-type="float" office:value="0" calcext:value-type="float">
            <text:p>0</text:p>
          </table:table-cell>
          <table:table-cell table:style-name="ce90" table:formula="of:=SUMIF([.$J11:.$J411];[.$J413];[.EV$5:.EV$406])" office:value-type="float" office:value="0" calcext:value-type="float">
            <text:p>0</text:p>
          </table:table-cell>
          <table:table-cell table:style-name="ce90" table:formula="of:=SUMIF([.$J11:.$J411];[.$J413];[.EW$5:.EW$406])" office:value-type="float" office:value="0" calcext:value-type="float">
            <text:p>0</text:p>
          </table:table-cell>
          <table:table-cell table:style-name="ce90" table:formula="of:=SUMIF([.$J11:.$J411];[.$J413];[.EX$5:.EX$406])" office:value-type="float" office:value="0" calcext:value-type="float">
            <text:p>0</text:p>
          </table:table-cell>
          <table:table-cell table:style-name="ce90" table:formula="of:=SUMIF([.$J11:.$J411];[.$J413];[.EY$5:.EY$406])" office:value-type="float" office:value="0" calcext:value-type="float">
            <text:p>0</text:p>
          </table:table-cell>
          <table:table-cell table:style-name="ce90" table:formula="of:=SUMIF([.$J11:.$J411];[.$J413];[.EZ$5:.EZ$406])" office:value-type="float" office:value="0" calcext:value-type="float">
            <text:p>0</text:p>
          </table:table-cell>
          <table:table-cell table:style-name="ce90" table:formula="of:=SUMIF([.$J11:.$J411];[.$J413];[.FA$5:.FA$406])" office:value-type="float" office:value="0" calcext:value-type="float">
            <text:p>0</text:p>
          </table:table-cell>
          <table:table-cell table:style-name="ce90" table:formula="of:=SUMIF([.$J11:.$J411];[.$J413];[.FB$5:.FB$406])" office:value-type="float" office:value="0" calcext:value-type="float">
            <text:p>0</text:p>
          </table:table-cell>
          <table:table-cell table:style-name="ce90" table:formula="of:=SUMIF([.$J11:.$J411];[.$J413];[.FC$5:.FC$406])" office:value-type="float" office:value="0" calcext:value-type="float">
            <text:p>0</text:p>
          </table:table-cell>
          <table:table-cell table:style-name="ce90" table:formula="of:=SUMIF([.$J11:.$J411];[.$J413];[.FD$5:.FD$406])" office:value-type="float" office:value="0" calcext:value-type="float">
            <text:p>0</text:p>
          </table:table-cell>
          <table:table-cell table:style-name="ce90" table:formula="of:=SUMIF([.$J11:.$J411];[.$J413];[.FE$5:.FE$406])" office:value-type="float" office:value="0" calcext:value-type="float">
            <text:p>0</text:p>
          </table:table-cell>
          <table:table-cell table:style-name="ce90" table:formula="of:=SUMIF([.$J11:.$J411];[.$J413];[.FF$5:.FF$406])" office:value-type="float" office:value="0" calcext:value-type="float">
            <text:p>0</text:p>
          </table:table-cell>
          <table:table-cell table:style-name="ce90" table:formula="of:=SUMIF([.$J11:.$J411];[.$J413];[.FG$5:.FG$406])" office:value-type="float" office:value="0" calcext:value-type="float">
            <text:p>0</text:p>
          </table:table-cell>
          <table:table-cell table:style-name="ce90" table:formula="of:=SUMIF([.$J11:.$J411];[.$J413];[.FH$5:.FH$406])" office:value-type="float" office:value="0" calcext:value-type="float">
            <text:p>0</text:p>
          </table:table-cell>
          <table:table-cell table:style-name="ce90" table:formula="of:=SUMIF([.$J11:.$J411];[.$J413];[.FI$5:.FI$406])" office:value-type="float" office:value="0" calcext:value-type="float">
            <text:p>0</text:p>
          </table:table-cell>
          <table:table-cell table:style-name="ce90" table:formula="of:=SUMIF([.$J11:.$J411];[.$J413];[.FJ$5:.FJ$406])" office:value-type="float" office:value="0" calcext:value-type="float">
            <text:p>0</text:p>
          </table:table-cell>
          <table:table-cell table:style-name="ce90" table:formula="of:=SUMIF([.$J11:.$J411];[.$J413];[.FK$5:.FK$406])" office:value-type="float" office:value="0" calcext:value-type="float">
            <text:p>0</text:p>
          </table:table-cell>
          <table:table-cell table:style-name="ce90" table:formula="of:=SUMIF([.$J11:.$J411];[.$J413];[.FL$5:.FL$406])" office:value-type="float" office:value="0" calcext:value-type="float">
            <text:p>0</text:p>
          </table:table-cell>
          <table:table-cell table:style-name="ce90" table:formula="of:=SUMIF([.$J11:.$J411];[.$J413];[.FM$5:.FM$406])" office:value-type="float" office:value="0" calcext:value-type="float">
            <text:p>0</text:p>
          </table:table-cell>
          <table:table-cell table:number-columns-repeated="855"/>
          <table:table-cell table:style-name="Default" table:number-columns-repeated="15360"/>
        </table:table-row>
        <table:table-row table:style-name="ro1" table:number-rows-repeated="893">
          <table:table-cell table:number-columns-repeated="2"/>
          <table:table-cell table:style-name="ce11"/>
          <table:table-cell table:number-columns-repeated="17"/>
          <table:table-cell table:style-name="ce76"/>
          <table:table-cell table:style-name="ce91" table:number-columns-repeated="3"/>
          <table:table-cell table:style-name="ce115" table:number-columns-repeated="2"/>
          <table:table-cell table:style-name="ce91" table:number-columns-repeated="5"/>
          <table:table-cell table:style-name="ce115" table:number-columns-repeated="2"/>
          <table:table-cell table:style-name="ce91" table:number-columns-repeated="5"/>
          <table:table-cell table:style-name="ce115" table:number-columns-repeated="2"/>
          <table:table-cell table:style-name="ce91" table:number-columns-repeated="4"/>
          <table:table-cell table:style-name="ce144"/>
          <table:table-cell table:style-name="ce115" table:number-columns-repeated="2"/>
          <table:table-cell table:style-name="ce158"/>
          <table:table-cell table:style-name="ce91" table:number-columns-repeated="121"/>
          <table:table-cell table:number-columns-repeated="855"/>
          <table:table-cell table:style-name="Default" table:number-columns-repeated="15360"/>
        </table:table-row>
        <table:table-row table:style-name="ro7" table:number-rows-repeated="1047269">
          <table:table-cell table:number-columns-repeated="1024"/>
          <table:table-cell table:style-name="Default" table:number-columns-repeated="15360"/>
        </table:table-row>
        <table:table-row table:style-name="ro7">
          <table:table-cell table:number-columns-repeated="1024"/>
          <table:table-cell table:style-name="Default" table:number-columns-repeated="15360"/>
        </table:table-row>
        <calcext:conditional-formats>
          <calcext:conditional-format calcext:target-range-address="WBS.W2:WBS.FM4">
            <calcext:condition calcext:apply-style-name="ConditionalStyle_1" calcext:value="formula-is(ROUNDDOWN([.$U$1];0)=[.W$1])" calcext:base-cell-address="WBS.W2"/>
          </calcext:conditional-format>
          <calcext:conditional-format calcext:target-range-address="WBS.V408:WBS.FM413">
            <calcext:condition calcext:apply-style-name="ConditionalStyle_3" calcext:value="&gt;8" calcext:base-cell-address="WBS.V408"/>
            <calcext:condition calcext:apply-style-name="ConditionalStyle_2" calcext:value="formula-is(AND([.V408]&lt;&gt;0;[.V408]&lt;8))" calcext:base-cell-address="WBS.V408"/>
          </calcext:conditional-format>
          <calcext:conditional-format calcext:target-range-address="WBS.V5:WBS.W27 WBS.X5:WBS.FM92 WBS.V30:WBS.W92 WBS.V94:WBS.FM116 WBS.V125:WBS.FM406 WBS.V120:WBS.FM123">
            <calcext:condition calcext:apply-style-name="ConditionalStyle_6" calcext:value="formula-is(AND([.$D5]=&quot;○&quot;;[.$L5]&lt;=[.V$1];[.V$1]&lt;=[.$M5]))" calcext:base-cell-address="WBS.V5"/>
            <calcext:condition calcext:apply-style-name="ConditionalStyle_5" calcext:value="formula-is(AND([.$D5]&lt;&gt;&quot;○&quot;;[.$L5]&lt;=[.V$1];[.V$1]&lt;=[.$M5]))" calcext:base-cell-address="WBS.V5"/>
          </calcext:conditional-format>
          <calcext:conditional-format calcext:target-range-address="WBS.Q20:WBS.Q21 WBS.Q5:WBS.Q10 WBS.Q263:WBS.Q413 WBS.Q13:WBS.Q14 WBS.Q25:WBS.Q26 WBS.Q90:WBS.Q90 WBS.Q43:WBS.Q44 WBS.Q73:WBS.Q74 WBS.Q113:WBS.Q114 WBS.Q116:WBS.Q122 WBS.Q180:WBS.Q181 WBS.Q84:WBS.Q84 WBS.Q155:WBS.Q155 WBS.Q140:WBS.Q141 WBS.Q144:WBS.Q144 WBS.Q102:WBS.Q107 WBS.Q158:WBS.Q159 WBS.Q162:WBS.Q162 WBS.Q148:WBS.Q153 WBS.Q167:WBS.Q168 WBS.Q62:WBS.Q68 WBS.Q60:WBS.Q60 WBS.Q50:WBS.Q54 WBS.Q40:WBS.Q41 WBS.Q175:WBS.Q175 WBS.Q178:WBS.Q178 WBS.Q92:WBS.Q95 WBS.Q97:WBS.Q97 WBS.Q100:WBS.Q100 WBS.Q137:WBS.Q138 WBS.Q128:WBS.Q134 WBS.Q228:WBS.Q228 WBS.Q216:WBS.Q216 WBS.Q184:WBS.Q196 WBS.Q198:WBS.Q214 WBS.Q221:WBS.Q223 WBS.Q234:WBS.Q234 WBS.Q246:WBS.Q24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1:WBS.Q1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2:WBS.Q31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V28:WBS.W29">
            <calcext:condition calcext:apply-style-name="ConditionalStyle_6" calcext:value="formula-is(AND([.$D28]=&quot;○&quot;;[.$L28]&lt;=[.V$1];[.V$1]&lt;=[.$M28]))" calcext:base-cell-address="WBS.V28"/>
            <calcext:condition calcext:apply-style-name="ConditionalStyle_5" calcext:value="formula-is(AND([.$D28]&lt;&gt;&quot;○&quot;;[.$L28]&lt;=[.V$1];[.V$1]&lt;=[.$M28]))" calcext:base-cell-address="WBS.V28"/>
          </calcext:conditional-format>
          <calcext:conditional-format calcext:target-range-address="WBS.V93:WBS.FM93">
            <calcext:condition calcext:apply-style-name="ConditionalStyle_6" calcext:value="formula-is(AND([.$D93]=&quot;○&quot;;[.$L93]&lt;=[.V$1];[.V$1]&lt;=[.$M93]))" calcext:base-cell-address="WBS.V93"/>
            <calcext:condition calcext:apply-style-name="ConditionalStyle_5" calcext:value="formula-is(AND([.$D93]&lt;&gt;&quot;○&quot;;[.$L93]&lt;=[.V$1];[.V$1]&lt;=[.$M93]))" calcext:base-cell-address="WBS.V93"/>
          </calcext:conditional-format>
          <calcext:conditional-format calcext:target-range-address="WBS.Q37:WBS.Q37 WBS.Q28:WBS.Q32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83:WBS.Q83 WBS.Q76:WBS.Q7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V118:WBS.FM118">
            <calcext:condition calcext:apply-style-name="ConditionalStyle_6" calcext:value="formula-is(AND([.$D118]=&quot;○&quot;;[.$L118]&lt;=[.V$1];[.V$1]&lt;=[.$M118]))" calcext:base-cell-address="WBS.V118"/>
            <calcext:condition calcext:apply-style-name="ConditionalStyle_5" calcext:value="formula-is(AND([.$D118]&lt;&gt;&quot;○&quot;;[.$L118]&lt;=[.V$1];[.V$1]&lt;=[.$M118]))" calcext:base-cell-address="WBS.V118"/>
          </calcext:conditional-format>
          <calcext:conditional-format calcext:target-range-address="WBS.V117:WBS.FM117">
            <calcext:condition calcext:apply-style-name="ConditionalStyle_6" calcext:value="formula-is(AND([.$D117]=&quot;○&quot;;[.$L117]&lt;=[.V$1];[.V$1]&lt;=[.$M117]))" calcext:base-cell-address="WBS.V117"/>
            <calcext:condition calcext:apply-style-name="ConditionalStyle_5" calcext:value="formula-is(AND([.$D117]&lt;&gt;&quot;○&quot;;[.$L117]&lt;=[.V$1];[.V$1]&lt;=[.$M117]))" calcext:base-cell-address="WBS.V117"/>
          </calcext:conditional-format>
          <calcext:conditional-format calcext:target-range-address="WBS.V119:WBS.FM119">
            <calcext:condition calcext:apply-style-name="ConditionalStyle_6" calcext:value="formula-is(AND([.$D119]=&quot;○&quot;;[.$L119]&lt;=[.V$1];[.V$1]&lt;=[.$M119]))" calcext:base-cell-address="WBS.V119"/>
            <calcext:condition calcext:apply-style-name="ConditionalStyle_5" calcext:value="formula-is(AND([.$D119]&lt;&gt;&quot;○&quot;;[.$L119]&lt;=[.V$1];[.V$1]&lt;=[.$M119]))" calcext:base-cell-address="WBS.V119"/>
          </calcext:conditional-format>
          <calcext:conditional-format calcext:target-range-address="WBS.V124:WBS.FM124">
            <calcext:condition calcext:apply-style-name="ConditionalStyle_6" calcext:value="formula-is(AND([.$D124]=&quot;○&quot;;[.$L124]&lt;=[.V$1];[.V$1]&lt;=[.$M124]))" calcext:base-cell-address="WBS.V124"/>
            <calcext:condition calcext:apply-style-name="ConditionalStyle_5" calcext:value="formula-is(AND([.$D124]&lt;&gt;&quot;○&quot;;[.$L124]&lt;=[.V$1];[.V$1]&lt;=[.$M124]))" calcext:base-cell-address="WBS.V124"/>
          </calcext:conditional-format>
          <calcext:conditional-format calcext:target-range-address="WBS.Q123:WBS.Q127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63:WBS.Q166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08:WBS.Q112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29:WBS.Q234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97:WBS.Q197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17:WBS.Q21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20:WBS.Q220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26:WBS.Q227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39:WBS.Q13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42:WBS.Q143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45:WBS.Q147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82:WBS.Q183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79:WBS.Q17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76:WBS.Q177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69:WBS.Q174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60:WBS.Q161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56:WBS.Q157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54:WBS.Q154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35:WBS.Q136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15:WBS.Q115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01:WBS.Q101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98:WBS.Q9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96:WBS.Q96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91:WBS.Q91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85:WBS.Q8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80:WBS.Q82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75:WBS.Q75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69:WBS.Q72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61:WBS.Q61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55:WBS.Q5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45:WBS.Q4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42:WBS.Q42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38:WBS.Q3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33:WBS.Q36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24:WBS.Q225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44:WBS.Q244 WBS.Q235:WBS.Q236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35:WBS.Q235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58:WBS.Q262 WBS.Q251:WBS.Q256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57:WBS.Q257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50:WBS.Q250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15:WBS.Q215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37:WBS.Q243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45:WBS.Q245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</calcext:conditional-formats>
      </table:table>
      <table:table table:name="休日" table:style-name="ta2"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7" table:default-cell-style-name="ce423"/>
        <table:table-column table:style-name="co16" table:number-columns-repeated="21"/>
        <table:table-column table:style-name="co15" table:number-columns-repeated="16358"/>
        <table:table-row table:style-name="ro1">
          <table:table-cell table:style-name="ce419" office:value-type="string" calcext:value-type="string">
            <text:p><text:span text:style-name="T29">2020/7/7</text:span><text:span text:style-name="T30">現在</text:span>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/>
          <table:table-cell table:style-name="ce420" office:value-type="string" calcext:value-type="string">
            <text:p>祝日一覧</text:p>
          </table:table-cell>
          <table:table-cell table:number-columns-repeated="3"/>
          <table:table-cell table:style-name="Default" table:number-columns-repeated="16379"/>
        </table:table-row>
        <table:table-row table:style-name="ro1">
          <table:table-cell/>
          <table:table-cell table:style-name="ce420" office:value-type="string" calcext:value-type="string">
            <text:p>日付</text:p>
          </table:table-cell>
          <table:table-cell table:style-name="ce420" office:value-type="string" calcext:value-type="string">
            <text:p>曜日</text:p>
          </table:table-cell>
          <table:table-cell table:style-name="ce420" office:value-type="string" calcext:value-type="string">
            <text:p>名前</text:p>
          </table:table-cell>
          <table:table-cell table:style-name="ce424" office:value-type="string" calcext:value-type="string">
            <text:p>DATEVALUE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3-01-01" calcext:value-type="date">
            <text:p>2023/01/01</text:p>
          </table:table-cell>
          <table:table-cell table:style-name="ce422" table:formula="of:=WEEKDAY([.B4])" office:value-type="date" office:date-value="1899-12-31" calcext:value-type="date">
            <text:p>日</text:p>
          </table:table-cell>
          <table:table-cell table:style-name="ce420" office:value-type="string" calcext:value-type="string">
            <text:p>元日</text:p>
          </table:table-cell>
          <table:table-cell office:value-type="float" office:value="43831" calcext:value-type="float">
            <text:p>438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3-01-07" calcext:value-type="date">
            <text:p>2023/01/07</text:p>
          </table:table-cell>
          <table:table-cell table:style-name="ce422" table:formula="of:=WEEKDAY([.B5])" office:value-type="date" office:date-value="1900-01-06" calcext:value-type="date">
            <text:p>土</text:p>
          </table:table-cell>
          <table:table-cell table:style-name="ce420" office:value-type="string" calcext:value-type="string">
            <text:p>成人の日</text:p>
          </table:table-cell>
          <table:table-cell office:value-type="float" office:value="43843" calcext:value-type="float">
            <text:p>438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3-02-11" calcext:value-type="date">
            <text:p>2023/02/11</text:p>
          </table:table-cell>
          <table:table-cell table:style-name="ce422" table:formula="of:=WEEKDAY([.B6])" office:value-type="date" office:date-value="1900-01-06" calcext:value-type="date">
            <text:p>土</text:p>
          </table:table-cell>
          <table:table-cell table:style-name="ce420" office:value-type="string" calcext:value-type="string">
            <text:p>建国記念の日</text:p>
          </table:table-cell>
          <table:table-cell office:value-type="float" office:value="43872" calcext:value-type="float">
            <text:p>438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3-02-23" calcext:value-type="date">
            <text:p>2023/02/23</text:p>
          </table:table-cell>
          <table:table-cell table:style-name="ce422" table:formula="of:=WEEKDAY([.B7])" office:value-type="date" office:date-value="1900-01-04" calcext:value-type="date">
            <text:p>木</text:p>
          </table:table-cell>
          <table:table-cell table:style-name="ce420" office:value-type="string" calcext:value-type="string">
            <text:p>天皇誕生日</text:p>
          </table:table-cell>
          <table:table-cell office:value-type="float" office:value="43884" calcext:value-type="float">
            <text:p>438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3-03-21" calcext:value-type="date">
            <text:p>2023/03/21</text:p>
          </table:table-cell>
          <table:table-cell table:style-name="ce422" table:formula="of:=WEEKDAY([.B8])" office:value-type="date" office:date-value="1900-01-02" calcext:value-type="date">
            <text:p>火</text:p>
          </table:table-cell>
          <table:table-cell table:style-name="ce420" office:value-type="string" calcext:value-type="string">
            <text:p>春分の日</text:p>
          </table:table-cell>
          <table:table-cell office:value-type="float" office:value="43910" calcext:value-type="float">
            <text:p>439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3-04-29" calcext:value-type="date">
            <text:p>2023/04/29</text:p>
          </table:table-cell>
          <table:table-cell table:style-name="ce422" table:formula="of:=WEEKDAY([.B9])" office:value-type="date" office:date-value="1900-01-06" calcext:value-type="date">
            <text:p>土</text:p>
          </table:table-cell>
          <table:table-cell table:style-name="ce420" office:value-type="string" calcext:value-type="string">
            <text:p>昭和の日</text:p>
          </table:table-cell>
          <table:table-cell office:value-type="float" office:value="43950" calcext:value-type="float">
            <text:p>439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3-05-03" calcext:value-type="date">
            <text:p>2023/05/03</text:p>
          </table:table-cell>
          <table:table-cell table:style-name="ce422" table:formula="of:=WEEKDAY([.B10])" office:value-type="date" office:date-value="1900-01-03" calcext:value-type="date">
            <text:p>水</text:p>
          </table:table-cell>
          <table:table-cell table:style-name="ce420" office:value-type="string" calcext:value-type="string">
            <text:p>憲法記念日</text:p>
          </table:table-cell>
          <table:table-cell office:value-type="float" office:value="43954" calcext:value-type="float">
            <text:p>439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3-05-04" calcext:value-type="date">
            <text:p>2023/05/04</text:p>
          </table:table-cell>
          <table:table-cell table:style-name="ce422" table:formula="of:=WEEKDAY([.B11])" office:value-type="date" office:date-value="1900-01-04" calcext:value-type="date">
            <text:p>木</text:p>
          </table:table-cell>
          <table:table-cell table:style-name="ce420" office:value-type="string" calcext:value-type="string">
            <text:p>みどりの日</text:p>
          </table:table-cell>
          <table:table-cell office:value-type="float" office:value="43955" calcext:value-type="float">
            <text:p>439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3-05-05" calcext:value-type="date">
            <text:p>2023/05/05</text:p>
          </table:table-cell>
          <table:table-cell table:style-name="ce422" table:formula="of:=WEEKDAY([.B12])" office:value-type="date" office:date-value="1900-01-05" calcext:value-type="date">
            <text:p>金</text:p>
          </table:table-cell>
          <table:table-cell table:style-name="ce420" office:value-type="string" calcext:value-type="string">
            <text:p>こどもの日</text:p>
          </table:table-cell>
          <table:table-cell office:value-type="float" office:value="43956" calcext:value-type="float">
            <text:p>439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3-07-17" calcext:value-type="date">
            <text:p>2023/07/17</text:p>
          </table:table-cell>
          <table:table-cell table:style-name="ce422" table:formula="of:=WEEKDAY([.B13])" office:value-type="date" office:date-value="1900-01-01" calcext:value-type="date">
            <text:p>月</text:p>
          </table:table-cell>
          <table:table-cell table:style-name="ce420" office:value-type="string" calcext:value-type="string">
            <text:p>海の日</text:p>
          </table:table-cell>
          <table:table-cell office:value-type="float" office:value="44035" calcext:value-type="float">
            <text:p>440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3-08-11" calcext:value-type="date">
            <text:p>2023/08/11</text:p>
          </table:table-cell>
          <table:table-cell table:style-name="ce422" table:formula="of:=WEEKDAY([.B14])" office:value-type="date" office:date-value="1900-01-05" calcext:value-type="date">
            <text:p>金</text:p>
          </table:table-cell>
          <table:table-cell table:style-name="ce420" office:value-type="string" calcext:value-type="string">
            <text:p>山の日</text:p>
          </table:table-cell>
          <table:table-cell office:value-type="float" office:value="44053" calcext:value-type="float">
            <text:p>440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3-09-18" calcext:value-type="date">
            <text:p>2023/09/18</text:p>
          </table:table-cell>
          <table:table-cell table:style-name="ce422" table:formula="of:=WEEKDAY([.B15])" office:value-type="date" office:date-value="1900-01-01" calcext:value-type="date">
            <text:p>月</text:p>
          </table:table-cell>
          <table:table-cell table:style-name="ce420" office:value-type="string" calcext:value-type="string">
            <text:p>敬老の日</text:p>
          </table:table-cell>
          <table:table-cell office:value-type="float" office:value="44095" calcext:value-type="float">
            <text:p>440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3-09-23" calcext:value-type="date">
            <text:p>2023/09/23</text:p>
          </table:table-cell>
          <table:table-cell table:style-name="ce422" table:formula="of:=WEEKDAY([.B16])" office:value-type="date" office:date-value="1900-01-06" calcext:value-type="date">
            <text:p>土</text:p>
          </table:table-cell>
          <table:table-cell table:style-name="ce420" office:value-type="string" calcext:value-type="string">
            <text:p>秋分の日</text:p>
          </table:table-cell>
          <table:table-cell office:value-type="float" office:value="44096" calcext:value-type="float">
            <text:p>440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3-09-23" calcext:value-type="date">
            <text:p>2023/09/23</text:p>
          </table:table-cell>
          <table:table-cell table:style-name="ce422" table:formula="of:=WEEKDAY([.B17])" office:value-type="date" office:date-value="1900-01-06" calcext:value-type="date">
            <text:p>土</text:p>
          </table:table-cell>
          <table:table-cell table:style-name="ce420" office:value-type="string" calcext:value-type="string">
            <text:p>秋分の日</text:p>
          </table:table-cell>
          <table:table-cell office:value-type="float" office:value="44096" calcext:value-type="float">
            <text:p>440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0-11-03" calcext:value-type="date">
            <text:p>2020/11/03</text:p>
          </table:table-cell>
          <table:table-cell table:style-name="ce422" table:formula="of:=WEEKDAY([.B18])" office:value-type="date" office:date-value="1900-01-02" calcext:value-type="date">
            <text:p>火</text:p>
          </table:table-cell>
          <table:table-cell table:style-name="ce420" office:value-type="string" calcext:value-type="string">
            <text:p>文化の日</text:p>
          </table:table-cell>
          <table:table-cell office:value-type="float" office:value="44138" calcext:value-type="float">
            <text:p>441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0-11-23" calcext:value-type="date">
            <text:p>2020/11/23</text:p>
          </table:table-cell>
          <table:table-cell table:style-name="ce422" table:formula="of:=WEEKDAY([.B19])" office:value-type="date" office:date-value="1900-01-01" calcext:value-type="date">
            <text:p>月</text:p>
          </table:table-cell>
          <table:table-cell table:style-name="ce420" office:value-type="string" calcext:value-type="string">
            <text:p>勤労感謝の日</text:p>
          </table:table-cell>
          <table:table-cell office:value-type="float" office:value="44158" calcext:value-type="float">
            <text:p>441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1-01-01" calcext:value-type="date">
            <text:p>2021/01/01</text:p>
          </table:table-cell>
          <table:table-cell table:style-name="ce422" table:formula="of:=WEEKDAY([.B20])" office:value-type="date" office:date-value="1900-01-05" calcext:value-type="date">
            <text:p>金</text:p>
          </table:table-cell>
          <table:table-cell table:style-name="ce420" office:value-type="string" calcext:value-type="string">
            <text:p>元日</text:p>
          </table:table-cell>
          <table:table-cell office:value-type="float" office:value="44197" calcext:value-type="float">
            <text:p>441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1-01-11" calcext:value-type="date">
            <text:p>2021/01/11</text:p>
          </table:table-cell>
          <table:table-cell table:style-name="ce422" table:formula="of:=WEEKDAY([.B21])" office:value-type="date" office:date-value="1900-01-01" calcext:value-type="date">
            <text:p>月</text:p>
          </table:table-cell>
          <table:table-cell table:style-name="ce420" office:value-type="string" calcext:value-type="string">
            <text:p>成人の日</text:p>
          </table:table-cell>
          <table:table-cell office:value-type="float" office:value="44207" calcext:value-type="float">
            <text:p>442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1-02-11" calcext:value-type="date">
            <text:p>2021/02/11</text:p>
          </table:table-cell>
          <table:table-cell table:style-name="ce422" table:formula="of:=WEEKDAY([.B22])" office:value-type="date" office:date-value="1900-01-04" calcext:value-type="date">
            <text:p>木</text:p>
          </table:table-cell>
          <table:table-cell table:style-name="ce420" office:value-type="string" calcext:value-type="string">
            <text:p>建国記念の日</text:p>
          </table:table-cell>
          <table:table-cell office:value-type="float" office:value="44238" calcext:value-type="float">
            <text:p>442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1-02-23" calcext:value-type="date">
            <text:p>2021/02/23</text:p>
          </table:table-cell>
          <table:table-cell table:style-name="ce422" table:formula="of:=WEEKDAY([.B23])" office:value-type="date" office:date-value="1900-01-02" calcext:value-type="date">
            <text:p>火</text:p>
          </table:table-cell>
          <table:table-cell table:style-name="ce420" office:value-type="string" calcext:value-type="string">
            <text:p>天皇誕生日</text:p>
          </table:table-cell>
          <table:table-cell office:value-type="float" office:value="44250" calcext:value-type="float">
            <text:p>442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1-03-20" calcext:value-type="date">
            <text:p>2021/03/20</text:p>
          </table:table-cell>
          <table:table-cell table:style-name="ce422" table:formula="of:=WEEKDAY([.B24])" office:value-type="date" office:date-value="1900-01-06" calcext:value-type="date">
            <text:p>土</text:p>
          </table:table-cell>
          <table:table-cell table:style-name="ce420" office:value-type="string" calcext:value-type="string">
            <text:p>春分の日</text:p>
          </table:table-cell>
          <table:table-cell office:value-type="float" office:value="44275" calcext:value-type="float">
            <text:p>442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1-04-29" calcext:value-type="date">
            <text:p>2021/04/29</text:p>
          </table:table-cell>
          <table:table-cell table:style-name="ce422" table:formula="of:=WEEKDAY([.B25])" office:value-type="date" office:date-value="1900-01-04" calcext:value-type="date">
            <text:p>木</text:p>
          </table:table-cell>
          <table:table-cell table:style-name="ce420" office:value-type="string" calcext:value-type="string">
            <text:p>昭和の日</text:p>
          </table:table-cell>
          <table:table-cell office:value-type="float" office:value="44315" calcext:value-type="float">
            <text:p>443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1-05-03" calcext:value-type="date">
            <text:p>2021/05/03</text:p>
          </table:table-cell>
          <table:table-cell table:style-name="ce422" table:formula="of:=WEEKDAY([.B26])" office:value-type="date" office:date-value="1900-01-01" calcext:value-type="date">
            <text:p>月</text:p>
          </table:table-cell>
          <table:table-cell table:style-name="ce420" office:value-type="string" calcext:value-type="string">
            <text:p>憲法記念日</text:p>
          </table:table-cell>
          <table:table-cell office:value-type="float" office:value="44319" calcext:value-type="float">
            <text:p>443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1-05-04" calcext:value-type="date">
            <text:p>2021/05/04</text:p>
          </table:table-cell>
          <table:table-cell table:style-name="ce422" table:formula="of:=WEEKDAY([.B27])" office:value-type="date" office:date-value="1900-01-02" calcext:value-type="date">
            <text:p>火</text:p>
          </table:table-cell>
          <table:table-cell table:style-name="ce420" office:value-type="string" calcext:value-type="string">
            <text:p>みどりの日</text:p>
          </table:table-cell>
          <table:table-cell office:value-type="float" office:value="44320" calcext:value-type="float">
            <text:p>443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1-05-05" calcext:value-type="date">
            <text:p>2021/05/05</text:p>
          </table:table-cell>
          <table:table-cell table:style-name="ce422" table:formula="of:=WEEKDAY([.B28])" office:value-type="date" office:date-value="1900-01-03" calcext:value-type="date">
            <text:p>水</text:p>
          </table:table-cell>
          <table:table-cell table:style-name="ce420" office:value-type="string" calcext:value-type="string">
            <text:p>こどもの日</text:p>
          </table:table-cell>
          <table:table-cell office:value-type="float" office:value="44321" calcext:value-type="float">
            <text:p>443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1-07-19" calcext:value-type="date">
            <text:p>2021/07/19</text:p>
          </table:table-cell>
          <table:table-cell table:style-name="ce422" table:formula="of:=WEEKDAY([.B29])" office:value-type="date" office:date-value="1900-01-01" calcext:value-type="date">
            <text:p>月</text:p>
          </table:table-cell>
          <table:table-cell table:style-name="ce420" office:value-type="string" calcext:value-type="string">
            <text:p>海の日</text:p>
          </table:table-cell>
          <table:table-cell office:value-type="float" office:value="44396" calcext:value-type="float">
            <text:p>443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1-08-11" calcext:value-type="date">
            <text:p>2021/08/11</text:p>
          </table:table-cell>
          <table:table-cell table:style-name="ce422" table:formula="of:=WEEKDAY([.B30])" office:value-type="date" office:date-value="1900-01-03" calcext:value-type="date">
            <text:p>水</text:p>
          </table:table-cell>
          <table:table-cell table:style-name="ce420" office:value-type="string" calcext:value-type="string">
            <text:p>山の日</text:p>
          </table:table-cell>
          <table:table-cell office:value-type="float" office:value="44419" calcext:value-type="float">
            <text:p>444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1-09-20" calcext:value-type="date">
            <text:p>2021/09/20</text:p>
          </table:table-cell>
          <table:table-cell table:style-name="ce422" table:formula="of:=WEEKDAY([.B31])" office:value-type="date" office:date-value="1900-01-01" calcext:value-type="date">
            <text:p>月</text:p>
          </table:table-cell>
          <table:table-cell table:style-name="ce420" office:value-type="string" calcext:value-type="string">
            <text:p>敬老の日</text:p>
          </table:table-cell>
          <table:table-cell office:value-type="float" office:value="44459" calcext:value-type="float">
            <text:p>444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1-09-23" calcext:value-type="date">
            <text:p>2021/09/23</text:p>
          </table:table-cell>
          <table:table-cell table:style-name="ce422" table:formula="of:=WEEKDAY([.B32])" office:value-type="date" office:date-value="1900-01-04" calcext:value-type="date">
            <text:p>木</text:p>
          </table:table-cell>
          <table:table-cell table:style-name="ce420" office:value-type="string" calcext:value-type="string">
            <text:p>秋分の日</text:p>
          </table:table-cell>
          <table:table-cell office:value-type="float" office:value="44462" calcext:value-type="float">
            <text:p>444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1-10-11" calcext:value-type="date">
            <text:p>2021/10/11</text:p>
          </table:table-cell>
          <table:table-cell table:style-name="ce422" table:formula="of:=WEEKDAY([.B33])" office:value-type="date" office:date-value="1900-01-01" calcext:value-type="date">
            <text:p>月</text:p>
          </table:table-cell>
          <table:table-cell table:style-name="ce420" office:value-type="string" calcext:value-type="string">
            <text:p>スポーツの日</text:p>
          </table:table-cell>
          <table:table-cell office:value-type="float" office:value="44480" calcext:value-type="float">
            <text:p>444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1-11-03" calcext:value-type="date">
            <text:p>2021/11/03</text:p>
          </table:table-cell>
          <table:table-cell table:style-name="ce422" table:formula="of:=WEEKDAY([.B34])" office:value-type="date" office:date-value="1900-01-03" calcext:value-type="date">
            <text:p>水</text:p>
          </table:table-cell>
          <table:table-cell table:style-name="ce420" office:value-type="string" calcext:value-type="string">
            <text:p>文化の日</text:p>
          </table:table-cell>
          <table:table-cell office:value-type="float" office:value="44503" calcext:value-type="float">
            <text:p>445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1-11-23" calcext:value-type="date">
            <text:p>2021/11/23</text:p>
          </table:table-cell>
          <table:table-cell table:style-name="ce422" table:formula="of:=WEEKDAY([.B35])" office:value-type="date" office:date-value="1900-01-02" calcext:value-type="date">
            <text:p>火</text:p>
          </table:table-cell>
          <table:table-cell table:style-name="ce420" office:value-type="string" calcext:value-type="string">
            <text:p>勤労感謝の日</text:p>
          </table:table-cell>
          <table:table-cell office:value-type="float" office:value="44523" calcext:value-type="float">
            <text:p>445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2-01-01" calcext:value-type="date">
            <text:p>2022/01/01</text:p>
          </table:table-cell>
          <table:table-cell table:style-name="ce422" table:formula="of:=WEEKDAY([.B36])" office:value-type="date" office:date-value="1900-01-06" calcext:value-type="date">
            <text:p>土</text:p>
          </table:table-cell>
          <table:table-cell table:style-name="ce420" office:value-type="string" calcext:value-type="string">
            <text:p>元日</text:p>
          </table:table-cell>
          <table:table-cell office:value-type="float" office:value="44562" calcext:value-type="float">
            <text:p>445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2-01-10" calcext:value-type="date">
            <text:p>2022/01/10</text:p>
          </table:table-cell>
          <table:table-cell table:style-name="ce422" table:formula="of:=WEEKDAY([.B37])" office:value-type="date" office:date-value="1900-01-01" calcext:value-type="date">
            <text:p>月</text:p>
          </table:table-cell>
          <table:table-cell table:style-name="ce420" office:value-type="string" calcext:value-type="string">
            <text:p>成人の日</text:p>
          </table:table-cell>
          <table:table-cell office:value-type="float" office:value="44571" calcext:value-type="float">
            <text:p>445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2-02-11" calcext:value-type="date">
            <text:p>2022/02/11</text:p>
          </table:table-cell>
          <table:table-cell table:style-name="ce422" table:formula="of:=WEEKDAY([.B38])" office:value-type="date" office:date-value="1900-01-05" calcext:value-type="date">
            <text:p>金</text:p>
          </table:table-cell>
          <table:table-cell table:style-name="ce420" office:value-type="string" calcext:value-type="string">
            <text:p>建国記念の日</text:p>
          </table:table-cell>
          <table:table-cell office:value-type="float" office:value="44603" calcext:value-type="float">
            <text:p>446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2-02-23" calcext:value-type="date">
            <text:p>2022/02/23</text:p>
          </table:table-cell>
          <table:table-cell table:style-name="ce422" table:formula="of:=WEEKDAY([.B39])" office:value-type="date" office:date-value="1900-01-03" calcext:value-type="date">
            <text:p>水</text:p>
          </table:table-cell>
          <table:table-cell table:style-name="ce420" office:value-type="string" calcext:value-type="string">
            <text:p>天皇誕生日</text:p>
          </table:table-cell>
          <table:table-cell office:value-type="float" office:value="44615" calcext:value-type="float">
            <text:p>446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2-03-21" calcext:value-type="date">
            <text:p>2022/03/21</text:p>
          </table:table-cell>
          <table:table-cell table:style-name="ce422" table:formula="of:=WEEKDAY([.B40])" office:value-type="date" office:date-value="1900-01-01" calcext:value-type="date">
            <text:p>月</text:p>
          </table:table-cell>
          <table:table-cell table:style-name="ce420" office:value-type="string" calcext:value-type="string">
            <text:p>春分の日</text:p>
          </table:table-cell>
          <table:table-cell office:value-type="float" office:value="44641" calcext:value-type="float">
            <text:p>446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2-04-29" calcext:value-type="date">
            <text:p>2022/04/29</text:p>
          </table:table-cell>
          <table:table-cell table:style-name="ce422" table:formula="of:=WEEKDAY([.B41])" office:value-type="date" office:date-value="1900-01-05" calcext:value-type="date">
            <text:p>金</text:p>
          </table:table-cell>
          <table:table-cell table:style-name="ce420" office:value-type="string" calcext:value-type="string">
            <text:p>昭和の日</text:p>
          </table:table-cell>
          <table:table-cell office:value-type="float" office:value="44680" calcext:value-type="float">
            <text:p>446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2-05-03" calcext:value-type="date">
            <text:p>2022/05/03</text:p>
          </table:table-cell>
          <table:table-cell table:style-name="ce422" table:formula="of:=WEEKDAY([.B42])" office:value-type="date" office:date-value="1900-01-02" calcext:value-type="date">
            <text:p>火</text:p>
          </table:table-cell>
          <table:table-cell table:style-name="ce420" office:value-type="string" calcext:value-type="string">
            <text:p>憲法記念日</text:p>
          </table:table-cell>
          <table:table-cell office:value-type="float" office:value="44684" calcext:value-type="float">
            <text:p>446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2-05-04" calcext:value-type="date">
            <text:p>2022/05/04</text:p>
          </table:table-cell>
          <table:table-cell table:style-name="ce422" table:formula="of:=WEEKDAY([.B43])" office:value-type="date" office:date-value="1900-01-03" calcext:value-type="date">
            <text:p>水</text:p>
          </table:table-cell>
          <table:table-cell table:style-name="ce420" office:value-type="string" calcext:value-type="string">
            <text:p>みどりの日</text:p>
          </table:table-cell>
          <table:table-cell office:value-type="float" office:value="44685" calcext:value-type="float">
            <text:p>446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2-05-05" calcext:value-type="date">
            <text:p>2022/05/05</text:p>
          </table:table-cell>
          <table:table-cell table:style-name="ce422" table:formula="of:=WEEKDAY([.B44])" office:value-type="date" office:date-value="1900-01-04" calcext:value-type="date">
            <text:p>木</text:p>
          </table:table-cell>
          <table:table-cell table:style-name="ce420" office:value-type="string" calcext:value-type="string">
            <text:p>こどもの日</text:p>
          </table:table-cell>
          <table:table-cell office:value-type="float" office:value="44686" calcext:value-type="float">
            <text:p>446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2-07-18" calcext:value-type="date">
            <text:p>2022/07/18</text:p>
          </table:table-cell>
          <table:table-cell table:style-name="ce422" table:formula="of:=WEEKDAY([.B45])" office:value-type="date" office:date-value="1900-01-01" calcext:value-type="date">
            <text:p>月</text:p>
          </table:table-cell>
          <table:table-cell table:style-name="ce420" office:value-type="string" calcext:value-type="string">
            <text:p>海の日</text:p>
          </table:table-cell>
          <table:table-cell office:value-type="float" office:value="44760" calcext:value-type="float">
            <text:p>447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2-08-11" calcext:value-type="date">
            <text:p>2022/08/11</text:p>
          </table:table-cell>
          <table:table-cell table:style-name="ce422" table:formula="of:=WEEKDAY([.B46])" office:value-type="date" office:date-value="1900-01-04" calcext:value-type="date">
            <text:p>木</text:p>
          </table:table-cell>
          <table:table-cell table:style-name="ce420" office:value-type="string" calcext:value-type="string">
            <text:p>山の日</text:p>
          </table:table-cell>
          <table:table-cell office:value-type="float" office:value="44784" calcext:value-type="float">
            <text:p>447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2-09-19" calcext:value-type="date">
            <text:p>2022/09/19</text:p>
          </table:table-cell>
          <table:table-cell table:style-name="ce422" table:formula="of:=WEEKDAY([.B47])" office:value-type="date" office:date-value="1900-01-01" calcext:value-type="date">
            <text:p>月</text:p>
          </table:table-cell>
          <table:table-cell table:style-name="ce420" office:value-type="string" calcext:value-type="string">
            <text:p>敬老の日</text:p>
          </table:table-cell>
          <table:table-cell office:value-type="float" office:value="44823" calcext:value-type="float">
            <text:p>448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2-09-23" calcext:value-type="date">
            <text:p>2022/09/23</text:p>
          </table:table-cell>
          <table:table-cell table:style-name="ce422" table:formula="of:=WEEKDAY([.B48])" office:value-type="date" office:date-value="1900-01-05" calcext:value-type="date">
            <text:p>金</text:p>
          </table:table-cell>
          <table:table-cell table:style-name="ce420" office:value-type="string" calcext:value-type="string">
            <text:p>秋分の日</text:p>
          </table:table-cell>
          <table:table-cell office:value-type="float" office:value="44827" calcext:value-type="float">
            <text:p>448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2-10-10" calcext:value-type="date">
            <text:p>2022/10/10</text:p>
          </table:table-cell>
          <table:table-cell table:style-name="ce422" table:formula="of:=WEEKDAY([.B49])" office:value-type="date" office:date-value="1900-01-01" calcext:value-type="date">
            <text:p>月</text:p>
          </table:table-cell>
          <table:table-cell table:style-name="ce420" office:value-type="string" calcext:value-type="string">
            <text:p>スポーツの日</text:p>
          </table:table-cell>
          <table:table-cell office:value-type="float" office:value="44844" calcext:value-type="float">
            <text:p>448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2-11-03" calcext:value-type="date">
            <text:p>2022/11/03</text:p>
          </table:table-cell>
          <table:table-cell table:style-name="ce422" table:formula="of:=WEEKDAY([.B50])" office:value-type="date" office:date-value="1900-01-04" calcext:value-type="date">
            <text:p>木</text:p>
          </table:table-cell>
          <table:table-cell table:style-name="ce420" office:value-type="string" calcext:value-type="string">
            <text:p>文化の日</text:p>
          </table:table-cell>
          <table:table-cell office:value-type="float" office:value="44868" calcext:value-type="float">
            <text:p>448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2-11-23" calcext:value-type="date">
            <text:p>2022/11/23</text:p>
          </table:table-cell>
          <table:table-cell table:style-name="ce422" table:formula="of:=WEEKDAY([.B51])" office:value-type="date" office:date-value="1900-01-03" calcext:value-type="date">
            <text:p>水</text:p>
          </table:table-cell>
          <table:table-cell table:style-name="ce420" office:value-type="string" calcext:value-type="string">
            <text:p>勤労感謝の日</text:p>
          </table:table-cell>
          <table:table-cell office:value-type="float" office:value="44888" calcext:value-type="float">
            <text:p>448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3-01-01" calcext:value-type="date">
            <text:p>2023/01/01</text:p>
          </table:table-cell>
          <table:table-cell table:style-name="ce422" table:formula="of:=WEEKDAY([.B52])" office:value-type="date" office:date-value="1899-12-31" calcext:value-type="date">
            <text:p>日</text:p>
          </table:table-cell>
          <table:table-cell table:style-name="ce420" office:value-type="string" calcext:value-type="string">
            <text:p>元日</text:p>
          </table:table-cell>
          <table:table-cell office:value-type="float" office:value="44927" calcext:value-type="float">
            <text:p>449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3-01-02" calcext:value-type="date">
            <text:p>2023/01/02</text:p>
          </table:table-cell>
          <table:table-cell table:style-name="ce422" table:formula="of:=WEEKDAY([.B53])" office:value-type="date" office:date-value="1900-01-01" calcext:value-type="date">
            <text:p>月</text:p>
          </table:table-cell>
          <table:table-cell table:style-name="ce420" office:value-type="string" calcext:value-type="string">
            <text:p>振替休日</text:p>
          </table:table-cell>
          <table:table-cell office:value-type="float" office:value="44928" calcext:value-type="float">
            <text:p>449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3-01-09" calcext:value-type="date">
            <text:p>2023/01/09</text:p>
          </table:table-cell>
          <table:table-cell table:style-name="ce422" table:formula="of:=WEEKDAY([.B54])" office:value-type="date" office:date-value="1900-01-01" calcext:value-type="date">
            <text:p>月</text:p>
          </table:table-cell>
          <table:table-cell table:style-name="ce420" office:value-type="string" calcext:value-type="string">
            <text:p>成人の日</text:p>
          </table:table-cell>
          <table:table-cell office:value-type="float" office:value="44935" calcext:value-type="float">
            <text:p>449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3-02-11" calcext:value-type="date">
            <text:p>2023/02/11</text:p>
          </table:table-cell>
          <table:table-cell table:style-name="ce422" table:formula="of:=WEEKDAY([.B55])" office:value-type="date" office:date-value="1900-01-06" calcext:value-type="date">
            <text:p>土</text:p>
          </table:table-cell>
          <table:table-cell table:style-name="ce420" office:value-type="string" calcext:value-type="string">
            <text:p>建国記念の日</text:p>
          </table:table-cell>
          <table:table-cell office:value-type="float" office:value="44968" calcext:value-type="float">
            <text:p>449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3-02-23" calcext:value-type="date">
            <text:p>2023/02/23</text:p>
          </table:table-cell>
          <table:table-cell table:style-name="ce422" table:formula="of:=WEEKDAY([.B56])" office:value-type="date" office:date-value="1900-01-04" calcext:value-type="date">
            <text:p>木</text:p>
          </table:table-cell>
          <table:table-cell table:style-name="ce420" office:value-type="string" calcext:value-type="string">
            <text:p>天皇誕生日</text:p>
          </table:table-cell>
          <table:table-cell office:value-type="float" office:value="44980" calcext:value-type="float">
            <text:p>449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3-03-21" calcext:value-type="date">
            <text:p>2023/03/21</text:p>
          </table:table-cell>
          <table:table-cell table:style-name="ce422" table:formula="of:=WEEKDAY([.B57])" office:value-type="date" office:date-value="1900-01-02" calcext:value-type="date">
            <text:p>火</text:p>
          </table:table-cell>
          <table:table-cell table:style-name="ce420" office:value-type="string" calcext:value-type="string">
            <text:p>春分の日</text:p>
          </table:table-cell>
          <table:table-cell office:value-type="float" office:value="45006" calcext:value-type="float">
            <text:p>450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3-04-29" calcext:value-type="date">
            <text:p>2023/04/29</text:p>
          </table:table-cell>
          <table:table-cell table:style-name="ce422" table:formula="of:=WEEKDAY([.B58])" office:value-type="date" office:date-value="1900-01-06" calcext:value-type="date">
            <text:p>土</text:p>
          </table:table-cell>
          <table:table-cell table:style-name="ce420" office:value-type="string" calcext:value-type="string">
            <text:p>昭和の日</text:p>
          </table:table-cell>
          <table:table-cell office:value-type="float" office:value="45045" calcext:value-type="float">
            <text:p>450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3-05-03" calcext:value-type="date">
            <text:p>2023/05/03</text:p>
          </table:table-cell>
          <table:table-cell table:style-name="ce422" table:formula="of:=WEEKDAY([.B59])" office:value-type="date" office:date-value="1900-01-03" calcext:value-type="date">
            <text:p>水</text:p>
          </table:table-cell>
          <table:table-cell table:style-name="ce420" office:value-type="string" calcext:value-type="string">
            <text:p>憲法記念日</text:p>
          </table:table-cell>
          <table:table-cell office:value-type="float" office:value="45049" calcext:value-type="float">
            <text:p>450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3-05-04" calcext:value-type="date">
            <text:p>2023/05/04</text:p>
          </table:table-cell>
          <table:table-cell table:style-name="ce422" table:formula="of:=WEEKDAY([.B60])" office:value-type="date" office:date-value="1900-01-04" calcext:value-type="date">
            <text:p>木</text:p>
          </table:table-cell>
          <table:table-cell table:style-name="ce420" office:value-type="string" calcext:value-type="string">
            <text:p>みどりの日</text:p>
          </table:table-cell>
          <table:table-cell office:value-type="float" office:value="45050" calcext:value-type="float">
            <text:p>450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3-05-05" calcext:value-type="date">
            <text:p>2023/05/05</text:p>
          </table:table-cell>
          <table:table-cell table:style-name="ce422" table:formula="of:=WEEKDAY([.B61])" office:value-type="date" office:date-value="1900-01-05" calcext:value-type="date">
            <text:p>金</text:p>
          </table:table-cell>
          <table:table-cell table:style-name="ce420" office:value-type="string" calcext:value-type="string">
            <text:p>こどもの日</text:p>
          </table:table-cell>
          <table:table-cell office:value-type="float" office:value="45051" calcext:value-type="float">
            <text:p>450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3-07-17" calcext:value-type="date">
            <text:p>2023/07/17</text:p>
          </table:table-cell>
          <table:table-cell table:style-name="ce422" table:formula="of:=WEEKDAY([.B62])" office:value-type="date" office:date-value="1900-01-01" calcext:value-type="date">
            <text:p>月</text:p>
          </table:table-cell>
          <table:table-cell table:style-name="ce420" office:value-type="string" calcext:value-type="string">
            <text:p>海の日</text:p>
          </table:table-cell>
          <table:table-cell office:value-type="float" office:value="45124" calcext:value-type="float">
            <text:p>451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3-08-11" calcext:value-type="date">
            <text:p>2023/08/11</text:p>
          </table:table-cell>
          <table:table-cell table:style-name="ce422" table:formula="of:=WEEKDAY([.B63])" office:value-type="date" office:date-value="1900-01-05" calcext:value-type="date">
            <text:p>金</text:p>
          </table:table-cell>
          <table:table-cell table:style-name="ce420" office:value-type="string" calcext:value-type="string">
            <text:p>山の日</text:p>
          </table:table-cell>
          <table:table-cell office:value-type="float" office:value="45149" calcext:value-type="float">
            <text:p>451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3-09-18" calcext:value-type="date">
            <text:p>2023/09/18</text:p>
          </table:table-cell>
          <table:table-cell table:style-name="ce422" table:formula="of:=WEEKDAY([.B64])" office:value-type="date" office:date-value="1900-01-01" calcext:value-type="date">
            <text:p>月</text:p>
          </table:table-cell>
          <table:table-cell table:style-name="ce420" office:value-type="string" calcext:value-type="string">
            <text:p>敬老の日</text:p>
          </table:table-cell>
          <table:table-cell office:value-type="float" office:value="45187" calcext:value-type="float">
            <text:p>451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3-09-23" calcext:value-type="date">
            <text:p>2023/09/23</text:p>
          </table:table-cell>
          <table:table-cell table:style-name="ce422" table:formula="of:=WEEKDAY([.B65])" office:value-type="date" office:date-value="1900-01-06" calcext:value-type="date">
            <text:p>土</text:p>
          </table:table-cell>
          <table:table-cell table:style-name="ce420" office:value-type="string" calcext:value-type="string">
            <text:p>秋分の日</text:p>
          </table:table-cell>
          <table:table-cell office:value-type="float" office:value="45192" calcext:value-type="float">
            <text:p>451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3-10-09" calcext:value-type="date">
            <text:p>2023/10/09</text:p>
          </table:table-cell>
          <table:table-cell table:style-name="ce422" table:formula="of:=WEEKDAY([.B66])" office:value-type="date" office:date-value="1900-01-01" calcext:value-type="date">
            <text:p>月</text:p>
          </table:table-cell>
          <table:table-cell table:style-name="ce420" office:value-type="string" calcext:value-type="string">
            <text:p>スポーツの日</text:p>
          </table:table-cell>
          <table:table-cell office:value-type="float" office:value="45208" calcext:value-type="float">
            <text:p>452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3-11-03" calcext:value-type="date">
            <text:p>2023/11/03</text:p>
          </table:table-cell>
          <table:table-cell table:style-name="ce422" table:formula="of:=WEEKDAY([.B67])" office:value-type="date" office:date-value="1900-01-05" calcext:value-type="date">
            <text:p>金</text:p>
          </table:table-cell>
          <table:table-cell table:style-name="ce420" office:value-type="string" calcext:value-type="string">
            <text:p>文化の日</text:p>
          </table:table-cell>
          <table:table-cell office:value-type="float" office:value="45233" calcext:value-type="float">
            <text:p>452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3-11-23" calcext:value-type="date">
            <text:p>2023/11/23</text:p>
          </table:table-cell>
          <table:table-cell table:style-name="ce422" table:formula="of:=WEEKDAY([.B68])" office:value-type="date" office:date-value="1900-01-04" calcext:value-type="date">
            <text:p>木</text:p>
          </table:table-cell>
          <table:table-cell table:style-name="ce420" office:value-type="string" calcext:value-type="string">
            <text:p>勤労感謝の日</text:p>
          </table:table-cell>
          <table:table-cell office:value-type="float" office:value="45253" calcext:value-type="float">
            <text:p>452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4-01-01" calcext:value-type="date">
            <text:p>2024/01/01</text:p>
          </table:table-cell>
          <table:table-cell table:style-name="ce422" table:formula="of:=WEEKDAY([.B69])" office:value-type="date" office:date-value="1900-01-01" calcext:value-type="date">
            <text:p>月</text:p>
          </table:table-cell>
          <table:table-cell table:style-name="ce420" office:value-type="string" calcext:value-type="string">
            <text:p>元日</text:p>
          </table:table-cell>
          <table:table-cell office:value-type="float" office:value="45292" calcext:value-type="float">
            <text:p>452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4-01-08" calcext:value-type="date">
            <text:p>2024/01/08</text:p>
          </table:table-cell>
          <table:table-cell table:style-name="ce422" table:formula="of:=WEEKDAY([.B70])" office:value-type="date" office:date-value="1900-01-01" calcext:value-type="date">
            <text:p>月</text:p>
          </table:table-cell>
          <table:table-cell table:style-name="ce420" office:value-type="string" calcext:value-type="string">
            <text:p>成人の日</text:p>
          </table:table-cell>
          <table:table-cell office:value-type="float" office:value="45299" calcext:value-type="float">
            <text:p>452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4-02-11" calcext:value-type="date">
            <text:p>2024/02/11</text:p>
          </table:table-cell>
          <table:table-cell table:style-name="ce422" table:formula="of:=WEEKDAY([.B71])" office:value-type="date" office:date-value="1899-12-31" calcext:value-type="date">
            <text:p>日</text:p>
          </table:table-cell>
          <table:table-cell table:style-name="ce420" office:value-type="string" calcext:value-type="string">
            <text:p>建国記念の日</text:p>
          </table:table-cell>
          <table:table-cell office:value-type="float" office:value="45333" calcext:value-type="float">
            <text:p>453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4-02-12" calcext:value-type="date">
            <text:p>2024/02/12</text:p>
          </table:table-cell>
          <table:table-cell table:style-name="ce422" table:formula="of:=WEEKDAY([.B72])" office:value-type="date" office:date-value="1900-01-01" calcext:value-type="date">
            <text:p>月</text:p>
          </table:table-cell>
          <table:table-cell table:style-name="ce420" office:value-type="string" calcext:value-type="string">
            <text:p>振替休日</text:p>
          </table:table-cell>
          <table:table-cell office:value-type="float" office:value="45334" calcext:value-type="float">
            <text:p>453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4-02-23" calcext:value-type="date">
            <text:p>2024/02/23</text:p>
          </table:table-cell>
          <table:table-cell table:style-name="ce422" table:formula="of:=WEEKDAY([.B73])" office:value-type="date" office:date-value="1900-01-05" calcext:value-type="date">
            <text:p>金</text:p>
          </table:table-cell>
          <table:table-cell table:style-name="ce420" office:value-type="string" calcext:value-type="string">
            <text:p>天皇誕生日</text:p>
          </table:table-cell>
          <table:table-cell office:value-type="float" office:value="45345" calcext:value-type="float">
            <text:p>453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4-03-20" calcext:value-type="date">
            <text:p>2024/03/20</text:p>
          </table:table-cell>
          <table:table-cell table:style-name="ce422" table:formula="of:=WEEKDAY([.B74])" office:value-type="date" office:date-value="1900-01-03" calcext:value-type="date">
            <text:p>水</text:p>
          </table:table-cell>
          <table:table-cell table:style-name="ce420" office:value-type="string" calcext:value-type="string">
            <text:p>春分の日</text:p>
          </table:table-cell>
          <table:table-cell office:value-type="float" office:value="45371" calcext:value-type="float">
            <text:p>453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4-04-29" calcext:value-type="date">
            <text:p>2024/04/29</text:p>
          </table:table-cell>
          <table:table-cell table:style-name="ce422" table:formula="of:=WEEKDAY([.B75])" office:value-type="date" office:date-value="1900-01-01" calcext:value-type="date">
            <text:p>月</text:p>
          </table:table-cell>
          <table:table-cell table:style-name="ce420" office:value-type="string" calcext:value-type="string">
            <text:p>昭和の日</text:p>
          </table:table-cell>
          <table:table-cell office:value-type="float" office:value="45411" calcext:value-type="float">
            <text:p>454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4-05-03" calcext:value-type="date">
            <text:p>2024/05/03</text:p>
          </table:table-cell>
          <table:table-cell table:style-name="ce422" table:formula="of:=WEEKDAY([.B76])" office:value-type="date" office:date-value="1900-01-05" calcext:value-type="date">
            <text:p>金</text:p>
          </table:table-cell>
          <table:table-cell table:style-name="ce420" office:value-type="string" calcext:value-type="string">
            <text:p>憲法記念日</text:p>
          </table:table-cell>
          <table:table-cell office:value-type="float" office:value="45415" calcext:value-type="float">
            <text:p>454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4-05-04" calcext:value-type="date">
            <text:p>2024/05/04</text:p>
          </table:table-cell>
          <table:table-cell table:style-name="ce422" table:formula="of:=WEEKDAY([.B77])" office:value-type="date" office:date-value="1900-01-06" calcext:value-type="date">
            <text:p>土</text:p>
          </table:table-cell>
          <table:table-cell table:style-name="ce420" office:value-type="string" calcext:value-type="string">
            <text:p>みどりの日</text:p>
          </table:table-cell>
          <table:table-cell office:value-type="float" office:value="45416" calcext:value-type="float">
            <text:p>454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4-05-05" calcext:value-type="date">
            <text:p>2024/05/05</text:p>
          </table:table-cell>
          <table:table-cell table:style-name="ce422" table:formula="of:=WEEKDAY([.B78])" office:value-type="date" office:date-value="1899-12-31" calcext:value-type="date">
            <text:p>日</text:p>
          </table:table-cell>
          <table:table-cell table:style-name="ce420" office:value-type="string" calcext:value-type="string">
            <text:p>こどもの日</text:p>
          </table:table-cell>
          <table:table-cell office:value-type="float" office:value="45417" calcext:value-type="float">
            <text:p>454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4-05-06" calcext:value-type="date">
            <text:p>2024/05/06</text:p>
          </table:table-cell>
          <table:table-cell table:style-name="ce422" table:formula="of:=WEEKDAY([.B79])" office:value-type="date" office:date-value="1900-01-01" calcext:value-type="date">
            <text:p>月</text:p>
          </table:table-cell>
          <table:table-cell table:style-name="ce420" office:value-type="string" calcext:value-type="string">
            <text:p>振替休日</text:p>
          </table:table-cell>
          <table:table-cell office:value-type="float" office:value="45418" calcext:value-type="float">
            <text:p>454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4-07-15" calcext:value-type="date">
            <text:p>2024/07/15</text:p>
          </table:table-cell>
          <table:table-cell table:style-name="ce422" table:formula="of:=WEEKDAY([.B80])" office:value-type="date" office:date-value="1900-01-01" calcext:value-type="date">
            <text:p>月</text:p>
          </table:table-cell>
          <table:table-cell table:style-name="ce420" office:value-type="string" calcext:value-type="string">
            <text:p>海の日</text:p>
          </table:table-cell>
          <table:table-cell office:value-type="float" office:value="45488" calcext:value-type="float">
            <text:p>454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4-08-11" calcext:value-type="date">
            <text:p>2024/08/11</text:p>
          </table:table-cell>
          <table:table-cell table:style-name="ce422" table:formula="of:=WEEKDAY([.B81])" office:value-type="date" office:date-value="1899-12-31" calcext:value-type="date">
            <text:p>日</text:p>
          </table:table-cell>
          <table:table-cell table:style-name="ce420" office:value-type="string" calcext:value-type="string">
            <text:p>山の日</text:p>
          </table:table-cell>
          <table:table-cell office:value-type="float" office:value="45515" calcext:value-type="float">
            <text:p>455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4-08-12" calcext:value-type="date">
            <text:p>2024/08/12</text:p>
          </table:table-cell>
          <table:table-cell table:style-name="ce422" table:formula="of:=WEEKDAY([.B82])" office:value-type="date" office:date-value="1900-01-01" calcext:value-type="date">
            <text:p>月</text:p>
          </table:table-cell>
          <table:table-cell table:style-name="ce420" office:value-type="string" calcext:value-type="string">
            <text:p>振替休日</text:p>
          </table:table-cell>
          <table:table-cell office:value-type="float" office:value="45516" calcext:value-type="float">
            <text:p>455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4-09-16" calcext:value-type="date">
            <text:p>2024/09/16</text:p>
          </table:table-cell>
          <table:table-cell table:style-name="ce422" table:formula="of:=WEEKDAY([.B83])" office:value-type="date" office:date-value="1900-01-01" calcext:value-type="date">
            <text:p>月</text:p>
          </table:table-cell>
          <table:table-cell table:style-name="ce420" office:value-type="string" calcext:value-type="string">
            <text:p>敬老の日</text:p>
          </table:table-cell>
          <table:table-cell office:value-type="float" office:value="45551" calcext:value-type="float">
            <text:p>455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4-09-22" calcext:value-type="date">
            <text:p>2024/09/22</text:p>
          </table:table-cell>
          <table:table-cell table:style-name="ce422" table:formula="of:=WEEKDAY([.B84])" office:value-type="date" office:date-value="1899-12-31" calcext:value-type="date">
            <text:p>日</text:p>
          </table:table-cell>
          <table:table-cell table:style-name="ce420" office:value-type="string" calcext:value-type="string">
            <text:p>秋分の日</text:p>
          </table:table-cell>
          <table:table-cell office:value-type="float" office:value="45557" calcext:value-type="float">
            <text:p>455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4-09-23" calcext:value-type="date">
            <text:p>2024/09/23</text:p>
          </table:table-cell>
          <table:table-cell table:style-name="ce422" table:formula="of:=WEEKDAY([.B85])" office:value-type="date" office:date-value="1900-01-01" calcext:value-type="date">
            <text:p>月</text:p>
          </table:table-cell>
          <table:table-cell table:style-name="ce420" office:value-type="string" calcext:value-type="string">
            <text:p>振替休日</text:p>
          </table:table-cell>
          <table:table-cell office:value-type="float" office:value="45558" calcext:value-type="float">
            <text:p>455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4-10-14" calcext:value-type="date">
            <text:p>2024/10/14</text:p>
          </table:table-cell>
          <table:table-cell table:style-name="ce422" table:formula="of:=WEEKDAY([.B86])" office:value-type="date" office:date-value="1900-01-01" calcext:value-type="date">
            <text:p>月</text:p>
          </table:table-cell>
          <table:table-cell table:style-name="ce420" office:value-type="string" calcext:value-type="string">
            <text:p>スポーツの日</text:p>
          </table:table-cell>
          <table:table-cell office:value-type="float" office:value="45579" calcext:value-type="float">
            <text:p>455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4-11-03" calcext:value-type="date">
            <text:p>2024/11/03</text:p>
          </table:table-cell>
          <table:table-cell table:style-name="ce422" table:formula="of:=WEEKDAY([.B87])" office:value-type="date" office:date-value="1899-12-31" calcext:value-type="date">
            <text:p>日</text:p>
          </table:table-cell>
          <table:table-cell table:style-name="ce420" office:value-type="string" calcext:value-type="string">
            <text:p>文化の日</text:p>
          </table:table-cell>
          <table:table-cell office:value-type="float" office:value="45599" calcext:value-type="float">
            <text:p>455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4-11-04" calcext:value-type="date">
            <text:p>2024/11/04</text:p>
          </table:table-cell>
          <table:table-cell table:style-name="ce422" table:formula="of:=WEEKDAY([.B88])" office:value-type="date" office:date-value="1900-01-01" calcext:value-type="date">
            <text:p>月</text:p>
          </table:table-cell>
          <table:table-cell table:style-name="ce420" office:value-type="string" calcext:value-type="string">
            <text:p>振替休日</text:p>
          </table:table-cell>
          <table:table-cell office:value-type="float" office:value="45600" calcext:value-type="float">
            <text:p>456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4-11-23" calcext:value-type="date">
            <text:p>2024/11/23</text:p>
          </table:table-cell>
          <table:table-cell table:style-name="ce422" table:formula="of:=WEEKDAY([.B89])" office:value-type="date" office:date-value="1900-01-06" calcext:value-type="date">
            <text:p>土</text:p>
          </table:table-cell>
          <table:table-cell table:style-name="ce420" office:value-type="string" calcext:value-type="string">
            <text:p>勤労感謝の日</text:p>
          </table:table-cell>
          <table:table-cell office:value-type="float" office:value="45619" calcext:value-type="float">
            <text:p>456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5-01-01" calcext:value-type="date">
            <text:p>2025/01/01</text:p>
          </table:table-cell>
          <table:table-cell table:style-name="ce422" table:formula="of:=WEEKDAY([.B90])" office:value-type="date" office:date-value="1900-01-03" calcext:value-type="date">
            <text:p>水</text:p>
          </table:table-cell>
          <table:table-cell table:style-name="ce420" office:value-type="string" calcext:value-type="string">
            <text:p>元日</text:p>
          </table:table-cell>
          <table:table-cell office:value-type="float" office:value="45658" calcext:value-type="float">
            <text:p>456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5-01-13" calcext:value-type="date">
            <text:p>2025/01/13</text:p>
          </table:table-cell>
          <table:table-cell table:style-name="ce422" table:formula="of:=WEEKDAY([.B91])" office:value-type="date" office:date-value="1900-01-01" calcext:value-type="date">
            <text:p>月</text:p>
          </table:table-cell>
          <table:table-cell table:style-name="ce420" office:value-type="string" calcext:value-type="string">
            <text:p>成人の日</text:p>
          </table:table-cell>
          <table:table-cell office:value-type="float" office:value="45670" calcext:value-type="float">
            <text:p>456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5-02-11" calcext:value-type="date">
            <text:p>2025/02/11</text:p>
          </table:table-cell>
          <table:table-cell table:style-name="ce422" table:formula="of:=WEEKDAY([.B92])" office:value-type="date" office:date-value="1900-01-02" calcext:value-type="date">
            <text:p>火</text:p>
          </table:table-cell>
          <table:table-cell table:style-name="ce420" office:value-type="string" calcext:value-type="string">
            <text:p>建国記念の日</text:p>
          </table:table-cell>
          <table:table-cell office:value-type="float" office:value="45699" calcext:value-type="float">
            <text:p>456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5-02-23" calcext:value-type="date">
            <text:p>2025/02/23</text:p>
          </table:table-cell>
          <table:table-cell table:style-name="ce422" table:formula="of:=WEEKDAY([.B93])" office:value-type="date" office:date-value="1899-12-31" calcext:value-type="date">
            <text:p>日</text:p>
          </table:table-cell>
          <table:table-cell table:style-name="ce420" office:value-type="string" calcext:value-type="string">
            <text:p>天皇誕生日</text:p>
          </table:table-cell>
          <table:table-cell office:value-type="float" office:value="45711" calcext:value-type="float">
            <text:p>457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5-02-24" calcext:value-type="date">
            <text:p>2025/02/24</text:p>
          </table:table-cell>
          <table:table-cell table:style-name="ce422" table:formula="of:=WEEKDAY([.B94])" office:value-type="date" office:date-value="1900-01-01" calcext:value-type="date">
            <text:p>月</text:p>
          </table:table-cell>
          <table:table-cell table:style-name="ce420" office:value-type="string" calcext:value-type="string">
            <text:p>振替休日</text:p>
          </table:table-cell>
          <table:table-cell office:value-type="float" office:value="45712" calcext:value-type="float">
            <text:p>457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5-03-20" calcext:value-type="date">
            <text:p>2025/03/20</text:p>
          </table:table-cell>
          <table:table-cell table:style-name="ce422" table:formula="of:=WEEKDAY([.B95])" office:value-type="date" office:date-value="1900-01-04" calcext:value-type="date">
            <text:p>木</text:p>
          </table:table-cell>
          <table:table-cell table:style-name="ce420" office:value-type="string" calcext:value-type="string">
            <text:p>春分の日</text:p>
          </table:table-cell>
          <table:table-cell office:value-type="float" office:value="45736" calcext:value-type="float">
            <text:p>457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5-04-29" calcext:value-type="date">
            <text:p>2025/04/29</text:p>
          </table:table-cell>
          <table:table-cell table:style-name="ce422" table:formula="of:=WEEKDAY([.B96])" office:value-type="date" office:date-value="1900-01-02" calcext:value-type="date">
            <text:p>火</text:p>
          </table:table-cell>
          <table:table-cell table:style-name="ce420" office:value-type="string" calcext:value-type="string">
            <text:p>昭和の日</text:p>
          </table:table-cell>
          <table:table-cell office:value-type="float" office:value="45776" calcext:value-type="float">
            <text:p>457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5-05-03" calcext:value-type="date">
            <text:p>2025/05/03</text:p>
          </table:table-cell>
          <table:table-cell table:style-name="ce422" table:formula="of:=WEEKDAY([.B97])" office:value-type="date" office:date-value="1900-01-06" calcext:value-type="date">
            <text:p>土</text:p>
          </table:table-cell>
          <table:table-cell table:style-name="ce420" office:value-type="string" calcext:value-type="string">
            <text:p>憲法記念日</text:p>
          </table:table-cell>
          <table:table-cell office:value-type="float" office:value="45780" calcext:value-type="float">
            <text:p>457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5-05-04" calcext:value-type="date">
            <text:p>2025/05/04</text:p>
          </table:table-cell>
          <table:table-cell table:style-name="ce422" table:formula="of:=WEEKDAY([.B98])" office:value-type="date" office:date-value="1899-12-31" calcext:value-type="date">
            <text:p>日</text:p>
          </table:table-cell>
          <table:table-cell table:style-name="ce420" office:value-type="string" calcext:value-type="string">
            <text:p>みどりの日</text:p>
          </table:table-cell>
          <table:table-cell office:value-type="float" office:value="45781" calcext:value-type="float">
            <text:p>457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5-05-05" calcext:value-type="date">
            <text:p>2025/05/05</text:p>
          </table:table-cell>
          <table:table-cell table:style-name="ce422" table:formula="of:=WEEKDAY([.B99])" office:value-type="date" office:date-value="1900-01-01" calcext:value-type="date">
            <text:p>月</text:p>
          </table:table-cell>
          <table:table-cell table:style-name="ce420" office:value-type="string" calcext:value-type="string">
            <text:p>こどもの日</text:p>
          </table:table-cell>
          <table:table-cell office:value-type="float" office:value="45782" calcext:value-type="float">
            <text:p>457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5-05-06" calcext:value-type="date">
            <text:p>2025/05/06</text:p>
          </table:table-cell>
          <table:table-cell table:style-name="ce422" table:formula="of:=WEEKDAY([.B100])" office:value-type="date" office:date-value="1900-01-02" calcext:value-type="date">
            <text:p>火</text:p>
          </table:table-cell>
          <table:table-cell table:style-name="ce420" office:value-type="string" calcext:value-type="string">
            <text:p>振替休日</text:p>
          </table:table-cell>
          <table:table-cell office:value-type="float" office:value="45783" calcext:value-type="float">
            <text:p>457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5-07-21" calcext:value-type="date">
            <text:p>2025/07/21</text:p>
          </table:table-cell>
          <table:table-cell table:style-name="ce422" table:formula="of:=WEEKDAY([.B101])" office:value-type="date" office:date-value="1900-01-01" calcext:value-type="date">
            <text:p>月</text:p>
          </table:table-cell>
          <table:table-cell table:style-name="ce420" office:value-type="string" calcext:value-type="string">
            <text:p>海の日</text:p>
          </table:table-cell>
          <table:table-cell office:value-type="float" office:value="45859" calcext:value-type="float">
            <text:p>458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5-08-11" calcext:value-type="date">
            <text:p>2025/08/11</text:p>
          </table:table-cell>
          <table:table-cell table:style-name="ce422" table:formula="of:=WEEKDAY([.B102])" office:value-type="date" office:date-value="1900-01-01" calcext:value-type="date">
            <text:p>月</text:p>
          </table:table-cell>
          <table:table-cell table:style-name="ce420" office:value-type="string" calcext:value-type="string">
            <text:p>山の日</text:p>
          </table:table-cell>
          <table:table-cell office:value-type="float" office:value="45880" calcext:value-type="float">
            <text:p>458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5-09-15" calcext:value-type="date">
            <text:p>2025/09/15</text:p>
          </table:table-cell>
          <table:table-cell table:style-name="ce422" table:formula="of:=WEEKDAY([.B103])" office:value-type="date" office:date-value="1900-01-01" calcext:value-type="date">
            <text:p>月</text:p>
          </table:table-cell>
          <table:table-cell table:style-name="ce420" office:value-type="string" calcext:value-type="string">
            <text:p>敬老の日</text:p>
          </table:table-cell>
          <table:table-cell office:value-type="float" office:value="45915" calcext:value-type="float">
            <text:p>459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5-09-23" calcext:value-type="date">
            <text:p>2025/09/23</text:p>
          </table:table-cell>
          <table:table-cell table:style-name="ce422" table:formula="of:=WEEKDAY([.B104])" office:value-type="date" office:date-value="1900-01-02" calcext:value-type="date">
            <text:p>火</text:p>
          </table:table-cell>
          <table:table-cell table:style-name="ce420" office:value-type="string" calcext:value-type="string">
            <text:p>秋分の日</text:p>
          </table:table-cell>
          <table:table-cell office:value-type="float" office:value="45923" calcext:value-type="float">
            <text:p>459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5-10-13" calcext:value-type="date">
            <text:p>2025/10/13</text:p>
          </table:table-cell>
          <table:table-cell table:style-name="ce422" table:formula="of:=WEEKDAY([.B105])" office:value-type="date" office:date-value="1900-01-01" calcext:value-type="date">
            <text:p>月</text:p>
          </table:table-cell>
          <table:table-cell table:style-name="ce420" office:value-type="string" calcext:value-type="string">
            <text:p>スポーツの日</text:p>
          </table:table-cell>
          <table:table-cell office:value-type="float" office:value="45943" calcext:value-type="float">
            <text:p>459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5-11-03" calcext:value-type="date">
            <text:p>2025/11/03</text:p>
          </table:table-cell>
          <table:table-cell table:style-name="ce422" table:formula="of:=WEEKDAY([.B106])" office:value-type="date" office:date-value="1900-01-01" calcext:value-type="date">
            <text:p>月</text:p>
          </table:table-cell>
          <table:table-cell table:style-name="ce420" office:value-type="string" calcext:value-type="string">
            <text:p>文化の日</text:p>
          </table:table-cell>
          <table:table-cell office:value-type="float" office:value="45964" calcext:value-type="float">
            <text:p>459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5-11-23" calcext:value-type="date">
            <text:p>2025/11/23</text:p>
          </table:table-cell>
          <table:table-cell table:style-name="ce422" table:formula="of:=WEEKDAY([.B107])" office:value-type="date" office:date-value="1899-12-31" calcext:value-type="date">
            <text:p>日</text:p>
          </table:table-cell>
          <table:table-cell table:style-name="ce420" office:value-type="string" calcext:value-type="string">
            <text:p>勤労感謝の日</text:p>
          </table:table-cell>
          <table:table-cell office:value-type="float" office:value="45984" calcext:value-type="float">
            <text:p>459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5-11-24" calcext:value-type="date">
            <text:p>2025/11/24</text:p>
          </table:table-cell>
          <table:table-cell table:style-name="ce422" table:formula="of:=WEEKDAY([.B108])" office:value-type="date" office:date-value="1900-01-01" calcext:value-type="date">
            <text:p>月</text:p>
          </table:table-cell>
          <table:table-cell table:style-name="ce420" office:value-type="string" calcext:value-type="string">
            <text:p>振替休日</text:p>
          </table:table-cell>
          <table:table-cell office:value-type="float" office:value="45985" calcext:value-type="float">
            <text:p>459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6-01-01" calcext:value-type="date">
            <text:p>2026/01/01</text:p>
          </table:table-cell>
          <table:table-cell table:style-name="ce422" table:formula="of:=WEEKDAY([.B109])" office:value-type="date" office:date-value="1900-01-04" calcext:value-type="date">
            <text:p>木</text:p>
          </table:table-cell>
          <table:table-cell table:style-name="ce420" office:value-type="string" calcext:value-type="string">
            <text:p>元日</text:p>
          </table:table-cell>
          <table:table-cell office:value-type="float" office:value="46023" calcext:value-type="float">
            <text:p>460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6-01-12" calcext:value-type="date">
            <text:p>2026/01/12</text:p>
          </table:table-cell>
          <table:table-cell table:style-name="ce422" table:formula="of:=WEEKDAY([.B110])" office:value-type="date" office:date-value="1900-01-01" calcext:value-type="date">
            <text:p>月</text:p>
          </table:table-cell>
          <table:table-cell table:style-name="ce420" office:value-type="string" calcext:value-type="string">
            <text:p>成人の日</text:p>
          </table:table-cell>
          <table:table-cell office:value-type="float" office:value="46034" calcext:value-type="float">
            <text:p>460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6-02-11" calcext:value-type="date">
            <text:p>2026/02/11</text:p>
          </table:table-cell>
          <table:table-cell table:style-name="ce422" table:formula="of:=WEEKDAY([.B111])" office:value-type="date" office:date-value="1900-01-03" calcext:value-type="date">
            <text:p>水</text:p>
          </table:table-cell>
          <table:table-cell table:style-name="ce420" office:value-type="string" calcext:value-type="string">
            <text:p>建国記念の日</text:p>
          </table:table-cell>
          <table:table-cell office:value-type="float" office:value="46064" calcext:value-type="float">
            <text:p>460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6-02-23" calcext:value-type="date">
            <text:p>2026/02/23</text:p>
          </table:table-cell>
          <table:table-cell table:style-name="ce422" table:formula="of:=WEEKDAY([.B112])" office:value-type="date" office:date-value="1900-01-01" calcext:value-type="date">
            <text:p>月</text:p>
          </table:table-cell>
          <table:table-cell table:style-name="ce420" office:value-type="string" calcext:value-type="string">
            <text:p>天皇誕生日</text:p>
          </table:table-cell>
          <table:table-cell office:value-type="float" office:value="46076" calcext:value-type="float">
            <text:p>460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6-03-20" calcext:value-type="date">
            <text:p>2026/03/20</text:p>
          </table:table-cell>
          <table:table-cell table:style-name="ce422" table:formula="of:=WEEKDAY([.B113])" office:value-type="date" office:date-value="1900-01-05" calcext:value-type="date">
            <text:p>金</text:p>
          </table:table-cell>
          <table:table-cell table:style-name="ce420" office:value-type="string" calcext:value-type="string">
            <text:p>春分の日</text:p>
          </table:table-cell>
          <table:table-cell office:value-type="float" office:value="46101" calcext:value-type="float">
            <text:p>461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6-04-29" calcext:value-type="date">
            <text:p>2026/04/29</text:p>
          </table:table-cell>
          <table:table-cell table:style-name="ce422" table:formula="of:=WEEKDAY([.B114])" office:value-type="date" office:date-value="1900-01-03" calcext:value-type="date">
            <text:p>水</text:p>
          </table:table-cell>
          <table:table-cell table:style-name="ce420" office:value-type="string" calcext:value-type="string">
            <text:p>昭和の日</text:p>
          </table:table-cell>
          <table:table-cell office:value-type="float" office:value="46141" calcext:value-type="float">
            <text:p>461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6-05-03" calcext:value-type="date">
            <text:p>2026/05/03</text:p>
          </table:table-cell>
          <table:table-cell table:style-name="ce422" table:formula="of:=WEEKDAY([.B115])" office:value-type="date" office:date-value="1899-12-31" calcext:value-type="date">
            <text:p>日</text:p>
          </table:table-cell>
          <table:table-cell table:style-name="ce420" office:value-type="string" calcext:value-type="string">
            <text:p>憲法記念日</text:p>
          </table:table-cell>
          <table:table-cell office:value-type="float" office:value="46145" calcext:value-type="float">
            <text:p>461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6-05-04" calcext:value-type="date">
            <text:p>2026/05/04</text:p>
          </table:table-cell>
          <table:table-cell table:style-name="ce422" table:formula="of:=WEEKDAY([.B116])" office:value-type="date" office:date-value="1900-01-01" calcext:value-type="date">
            <text:p>月</text:p>
          </table:table-cell>
          <table:table-cell table:style-name="ce420" office:value-type="string" calcext:value-type="string">
            <text:p>みどりの日</text:p>
          </table:table-cell>
          <table:table-cell office:value-type="float" office:value="46146" calcext:value-type="float">
            <text:p>461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6-05-05" calcext:value-type="date">
            <text:p>2026/05/05</text:p>
          </table:table-cell>
          <table:table-cell table:style-name="ce422" table:formula="of:=WEEKDAY([.B117])" office:value-type="date" office:date-value="1900-01-02" calcext:value-type="date">
            <text:p>火</text:p>
          </table:table-cell>
          <table:table-cell table:style-name="ce420" office:value-type="string" calcext:value-type="string">
            <text:p>こどもの日</text:p>
          </table:table-cell>
          <table:table-cell office:value-type="float" office:value="46147" calcext:value-type="float">
            <text:p>461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6-05-06" calcext:value-type="date">
            <text:p>2026/05/06</text:p>
          </table:table-cell>
          <table:table-cell table:style-name="ce422" table:formula="of:=WEEKDAY([.B118])" office:value-type="date" office:date-value="1900-01-03" calcext:value-type="date">
            <text:p>水</text:p>
          </table:table-cell>
          <table:table-cell table:style-name="ce420" office:value-type="string" calcext:value-type="string">
            <text:p>振替休日</text:p>
          </table:table-cell>
          <table:table-cell office:value-type="float" office:value="46148" calcext:value-type="float">
            <text:p>461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6-07-20" calcext:value-type="date">
            <text:p>2026/07/20</text:p>
          </table:table-cell>
          <table:table-cell table:style-name="ce422" table:formula="of:=WEEKDAY([.B119])" office:value-type="date" office:date-value="1900-01-01" calcext:value-type="date">
            <text:p>月</text:p>
          </table:table-cell>
          <table:table-cell table:style-name="ce420" office:value-type="string" calcext:value-type="string">
            <text:p>海の日</text:p>
          </table:table-cell>
          <table:table-cell office:value-type="float" office:value="46223" calcext:value-type="float">
            <text:p>462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6-08-11" calcext:value-type="date">
            <text:p>2026/08/11</text:p>
          </table:table-cell>
          <table:table-cell table:style-name="ce422" table:formula="of:=WEEKDAY([.B120])" office:value-type="date" office:date-value="1900-01-02" calcext:value-type="date">
            <text:p>火</text:p>
          </table:table-cell>
          <table:table-cell table:style-name="ce420" office:value-type="string" calcext:value-type="string">
            <text:p>山の日</text:p>
          </table:table-cell>
          <table:table-cell office:value-type="float" office:value="46245" calcext:value-type="float">
            <text:p>462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6-09-21" calcext:value-type="date">
            <text:p>2026/09/21</text:p>
          </table:table-cell>
          <table:table-cell table:style-name="ce422" table:formula="of:=WEEKDAY([.B121])" office:value-type="date" office:date-value="1900-01-01" calcext:value-type="date">
            <text:p>月</text:p>
          </table:table-cell>
          <table:table-cell table:style-name="ce420" office:value-type="string" calcext:value-type="string">
            <text:p>敬老の日</text:p>
          </table:table-cell>
          <table:table-cell office:value-type="float" office:value="46286" calcext:value-type="float">
            <text:p>462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6-09-22" calcext:value-type="date">
            <text:p>2026/09/22</text:p>
          </table:table-cell>
          <table:table-cell table:style-name="ce422" table:formula="of:=WEEKDAY([.B122])" office:value-type="date" office:date-value="1900-01-02" calcext:value-type="date">
            <text:p>火</text:p>
          </table:table-cell>
          <table:table-cell table:style-name="ce420" office:value-type="string" calcext:value-type="string">
            <text:p>国民の休日</text:p>
          </table:table-cell>
          <table:table-cell office:value-type="float" office:value="46287" calcext:value-type="float">
            <text:p>462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6-09-23" calcext:value-type="date">
            <text:p>2026/09/23</text:p>
          </table:table-cell>
          <table:table-cell table:style-name="ce422" table:formula="of:=WEEKDAY([.B123])" office:value-type="date" office:date-value="1900-01-03" calcext:value-type="date">
            <text:p>水</text:p>
          </table:table-cell>
          <table:table-cell table:style-name="ce420" office:value-type="string" calcext:value-type="string">
            <text:p>秋分の日</text:p>
          </table:table-cell>
          <table:table-cell office:value-type="float" office:value="46288" calcext:value-type="float">
            <text:p>462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6-10-12" calcext:value-type="date">
            <text:p>2026/10/12</text:p>
          </table:table-cell>
          <table:table-cell table:style-name="ce422" table:formula="of:=WEEKDAY([.B124])" office:value-type="date" office:date-value="1900-01-01" calcext:value-type="date">
            <text:p>月</text:p>
          </table:table-cell>
          <table:table-cell table:style-name="ce420" office:value-type="string" calcext:value-type="string">
            <text:p>スポーツの日</text:p>
          </table:table-cell>
          <table:table-cell office:value-type="float" office:value="46307" calcext:value-type="float">
            <text:p>463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6-11-03" calcext:value-type="date">
            <text:p>2026/11/03</text:p>
          </table:table-cell>
          <table:table-cell table:style-name="ce422" table:formula="of:=WEEKDAY([.B125])" office:value-type="date" office:date-value="1900-01-02" calcext:value-type="date">
            <text:p>火</text:p>
          </table:table-cell>
          <table:table-cell table:style-name="ce420" office:value-type="string" calcext:value-type="string">
            <text:p>文化の日</text:p>
          </table:table-cell>
          <table:table-cell office:value-type="float" office:value="46329" calcext:value-type="float">
            <text:p>463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6-11-23" calcext:value-type="date">
            <text:p>2026/11/23</text:p>
          </table:table-cell>
          <table:table-cell table:style-name="ce422" table:formula="of:=WEEKDAY([.B126])" office:value-type="date" office:date-value="1900-01-01" calcext:value-type="date">
            <text:p>月</text:p>
          </table:table-cell>
          <table:table-cell table:style-name="ce420" office:value-type="string" calcext:value-type="string">
            <text:p>勤労感謝の日</text:p>
          </table:table-cell>
          <table:table-cell office:value-type="float" office:value="46349" calcext:value-type="float">
            <text:p>463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7-01-01" calcext:value-type="date">
            <text:p>2027/01/01</text:p>
          </table:table-cell>
          <table:table-cell table:style-name="ce422" table:formula="of:=WEEKDAY([.B127])" office:value-type="date" office:date-value="1900-01-05" calcext:value-type="date">
            <text:p>金</text:p>
          </table:table-cell>
          <table:table-cell table:style-name="ce420" office:value-type="string" calcext:value-type="string">
            <text:p>元日</text:p>
          </table:table-cell>
          <table:table-cell office:value-type="float" office:value="46388" calcext:value-type="float">
            <text:p>463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7-01-11" calcext:value-type="date">
            <text:p>2027/01/11</text:p>
          </table:table-cell>
          <table:table-cell table:style-name="ce422" table:formula="of:=WEEKDAY([.B128])" office:value-type="date" office:date-value="1900-01-01" calcext:value-type="date">
            <text:p>月</text:p>
          </table:table-cell>
          <table:table-cell table:style-name="ce420" office:value-type="string" calcext:value-type="string">
            <text:p>成人の日</text:p>
          </table:table-cell>
          <table:table-cell office:value-type="float" office:value="46398" calcext:value-type="float">
            <text:p>463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7-02-11" calcext:value-type="date">
            <text:p>2027/02/11</text:p>
          </table:table-cell>
          <table:table-cell table:style-name="ce422" table:formula="of:=WEEKDAY([.B129])" office:value-type="date" office:date-value="1900-01-04" calcext:value-type="date">
            <text:p>木</text:p>
          </table:table-cell>
          <table:table-cell table:style-name="ce420" office:value-type="string" calcext:value-type="string">
            <text:p>建国記念の日</text:p>
          </table:table-cell>
          <table:table-cell office:value-type="float" office:value="46429" calcext:value-type="float">
            <text:p>464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7-02-23" calcext:value-type="date">
            <text:p>2027/02/23</text:p>
          </table:table-cell>
          <table:table-cell table:style-name="ce422" table:formula="of:=WEEKDAY([.B130])" office:value-type="date" office:date-value="1900-01-02" calcext:value-type="date">
            <text:p>火</text:p>
          </table:table-cell>
          <table:table-cell table:style-name="ce420" office:value-type="string" calcext:value-type="string">
            <text:p>天皇誕生日</text:p>
          </table:table-cell>
          <table:table-cell office:value-type="float" office:value="46441" calcext:value-type="float">
            <text:p>464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7-03-21" calcext:value-type="date">
            <text:p>2027/03/21</text:p>
          </table:table-cell>
          <table:table-cell table:style-name="ce422" table:formula="of:=WEEKDAY([.B131])" office:value-type="date" office:date-value="1899-12-31" calcext:value-type="date">
            <text:p>日</text:p>
          </table:table-cell>
          <table:table-cell table:style-name="ce420" office:value-type="string" calcext:value-type="string">
            <text:p>春分の日</text:p>
          </table:table-cell>
          <table:table-cell office:value-type="float" office:value="46467" calcext:value-type="float">
            <text:p>464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7-03-22" calcext:value-type="date">
            <text:p>2027/03/22</text:p>
          </table:table-cell>
          <table:table-cell table:style-name="ce422" table:formula="of:=WEEKDAY([.B132])" office:value-type="date" office:date-value="1900-01-01" calcext:value-type="date">
            <text:p>月</text:p>
          </table:table-cell>
          <table:table-cell table:style-name="ce420" office:value-type="string" calcext:value-type="string">
            <text:p>振替休日</text:p>
          </table:table-cell>
          <table:table-cell office:value-type="float" office:value="46468" calcext:value-type="float">
            <text:p>464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7-04-29" calcext:value-type="date">
            <text:p>2027/04/29</text:p>
          </table:table-cell>
          <table:table-cell table:style-name="ce422" table:formula="of:=WEEKDAY([.B133])" office:value-type="date" office:date-value="1900-01-04" calcext:value-type="date">
            <text:p>木</text:p>
          </table:table-cell>
          <table:table-cell table:style-name="ce420" office:value-type="string" calcext:value-type="string">
            <text:p>昭和の日</text:p>
          </table:table-cell>
          <table:table-cell office:value-type="float" office:value="46506" calcext:value-type="float">
            <text:p>465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7-05-03" calcext:value-type="date">
            <text:p>2027/05/03</text:p>
          </table:table-cell>
          <table:table-cell table:style-name="ce422" table:formula="of:=WEEKDAY([.B134])" office:value-type="date" office:date-value="1900-01-01" calcext:value-type="date">
            <text:p>月</text:p>
          </table:table-cell>
          <table:table-cell table:style-name="ce420" office:value-type="string" calcext:value-type="string">
            <text:p>憲法記念日</text:p>
          </table:table-cell>
          <table:table-cell office:value-type="float" office:value="46510" calcext:value-type="float">
            <text:p>465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7-05-04" calcext:value-type="date">
            <text:p>2027/05/04</text:p>
          </table:table-cell>
          <table:table-cell table:style-name="ce422" table:formula="of:=WEEKDAY([.B135])" office:value-type="date" office:date-value="1900-01-02" calcext:value-type="date">
            <text:p>火</text:p>
          </table:table-cell>
          <table:table-cell table:style-name="ce420" office:value-type="string" calcext:value-type="string">
            <text:p>みどりの日</text:p>
          </table:table-cell>
          <table:table-cell office:value-type="float" office:value="46511" calcext:value-type="float">
            <text:p>465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7-05-05" calcext:value-type="date">
            <text:p>2027/05/05</text:p>
          </table:table-cell>
          <table:table-cell table:style-name="ce422" table:formula="of:=WEEKDAY([.B136])" office:value-type="date" office:date-value="1900-01-03" calcext:value-type="date">
            <text:p>水</text:p>
          </table:table-cell>
          <table:table-cell table:style-name="ce420" office:value-type="string" calcext:value-type="string">
            <text:p>こどもの日</text:p>
          </table:table-cell>
          <table:table-cell office:value-type="float" office:value="46512" calcext:value-type="float">
            <text:p>465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7-07-19" calcext:value-type="date">
            <text:p>2027/07/19</text:p>
          </table:table-cell>
          <table:table-cell table:style-name="ce422" table:formula="of:=WEEKDAY([.B137])" office:value-type="date" office:date-value="1900-01-01" calcext:value-type="date">
            <text:p>月</text:p>
          </table:table-cell>
          <table:table-cell table:style-name="ce420" office:value-type="string" calcext:value-type="string">
            <text:p>海の日</text:p>
          </table:table-cell>
          <table:table-cell office:value-type="float" office:value="46587" calcext:value-type="float">
            <text:p>465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7-08-11" calcext:value-type="date">
            <text:p>2027/08/11</text:p>
          </table:table-cell>
          <table:table-cell table:style-name="ce422" table:formula="of:=WEEKDAY([.B138])" office:value-type="date" office:date-value="1900-01-03" calcext:value-type="date">
            <text:p>水</text:p>
          </table:table-cell>
          <table:table-cell table:style-name="ce420" office:value-type="string" calcext:value-type="string">
            <text:p>山の日</text:p>
          </table:table-cell>
          <table:table-cell office:value-type="float" office:value="46610" calcext:value-type="float">
            <text:p>466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7-09-20" calcext:value-type="date">
            <text:p>2027/09/20</text:p>
          </table:table-cell>
          <table:table-cell table:style-name="ce422" table:formula="of:=WEEKDAY([.B139])" office:value-type="date" office:date-value="1900-01-01" calcext:value-type="date">
            <text:p>月</text:p>
          </table:table-cell>
          <table:table-cell table:style-name="ce420" office:value-type="string" calcext:value-type="string">
            <text:p>敬老の日</text:p>
          </table:table-cell>
          <table:table-cell office:value-type="float" office:value="46650" calcext:value-type="float">
            <text:p>466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7-09-23" calcext:value-type="date">
            <text:p>2027/09/23</text:p>
          </table:table-cell>
          <table:table-cell table:style-name="ce422" table:formula="of:=WEEKDAY([.B140])" office:value-type="date" office:date-value="1900-01-04" calcext:value-type="date">
            <text:p>木</text:p>
          </table:table-cell>
          <table:table-cell table:style-name="ce420" office:value-type="string" calcext:value-type="string">
            <text:p>秋分の日</text:p>
          </table:table-cell>
          <table:table-cell office:value-type="float" office:value="46653" calcext:value-type="float">
            <text:p>466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7-10-11" calcext:value-type="date">
            <text:p>2027/10/11</text:p>
          </table:table-cell>
          <table:table-cell table:style-name="ce422" table:formula="of:=WEEKDAY([.B141])" office:value-type="date" office:date-value="1900-01-01" calcext:value-type="date">
            <text:p>月</text:p>
          </table:table-cell>
          <table:table-cell table:style-name="ce420" office:value-type="string" calcext:value-type="string">
            <text:p>スポーツの日</text:p>
          </table:table-cell>
          <table:table-cell office:value-type="float" office:value="46671" calcext:value-type="float">
            <text:p>466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7-11-03" calcext:value-type="date">
            <text:p>2027/11/03</text:p>
          </table:table-cell>
          <table:table-cell table:style-name="ce422" table:formula="of:=WEEKDAY([.B142])" office:value-type="date" office:date-value="1900-01-03" calcext:value-type="date">
            <text:p>水</text:p>
          </table:table-cell>
          <table:table-cell table:style-name="ce420" office:value-type="string" calcext:value-type="string">
            <text:p>文化の日</text:p>
          </table:table-cell>
          <table:table-cell office:value-type="float" office:value="46694" calcext:value-type="float">
            <text:p>466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7-11-23" calcext:value-type="date">
            <text:p>2027/11/23</text:p>
          </table:table-cell>
          <table:table-cell table:style-name="ce422" table:formula="of:=WEEKDAY([.B143])" office:value-type="date" office:date-value="1900-01-02" calcext:value-type="date">
            <text:p>火</text:p>
          </table:table-cell>
          <table:table-cell table:style-name="ce420" office:value-type="string" calcext:value-type="string">
            <text:p>勤労感謝の日</text:p>
          </table:table-cell>
          <table:table-cell office:value-type="float" office:value="46714" calcext:value-type="float">
            <text:p>467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8-01-01" calcext:value-type="date">
            <text:p>2028/01/01</text:p>
          </table:table-cell>
          <table:table-cell table:style-name="ce422" table:formula="of:=WEEKDAY([.B144])" office:value-type="date" office:date-value="1900-01-06" calcext:value-type="date">
            <text:p>土</text:p>
          </table:table-cell>
          <table:table-cell table:style-name="ce420" office:value-type="string" calcext:value-type="string">
            <text:p>元日</text:p>
          </table:table-cell>
          <table:table-cell office:value-type="float" office:value="46753" calcext:value-type="float">
            <text:p>467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8-01-10" calcext:value-type="date">
            <text:p>2028/01/10</text:p>
          </table:table-cell>
          <table:table-cell table:style-name="ce422" table:formula="of:=WEEKDAY([.B145])" office:value-type="date" office:date-value="1900-01-01" calcext:value-type="date">
            <text:p>月</text:p>
          </table:table-cell>
          <table:table-cell table:style-name="ce420" office:value-type="string" calcext:value-type="string">
            <text:p>成人の日</text:p>
          </table:table-cell>
          <table:table-cell office:value-type="float" office:value="46762" calcext:value-type="float">
            <text:p>467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8-02-11" calcext:value-type="date">
            <text:p>2028/02/11</text:p>
          </table:table-cell>
          <table:table-cell table:style-name="ce422" table:formula="of:=WEEKDAY([.B146])" office:value-type="date" office:date-value="1900-01-05" calcext:value-type="date">
            <text:p>金</text:p>
          </table:table-cell>
          <table:table-cell table:style-name="ce420" office:value-type="string" calcext:value-type="string">
            <text:p>建国記念の日</text:p>
          </table:table-cell>
          <table:table-cell office:value-type="float" office:value="46794" calcext:value-type="float">
            <text:p>467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8-02-23" calcext:value-type="date">
            <text:p>2028/02/23</text:p>
          </table:table-cell>
          <table:table-cell table:style-name="ce422" table:formula="of:=WEEKDAY([.B147])" office:value-type="date" office:date-value="1900-01-03" calcext:value-type="date">
            <text:p>水</text:p>
          </table:table-cell>
          <table:table-cell table:style-name="ce420" office:value-type="string" calcext:value-type="string">
            <text:p>天皇誕生日</text:p>
          </table:table-cell>
          <table:table-cell office:value-type="float" office:value="46806" calcext:value-type="float">
            <text:p>468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8-03-20" calcext:value-type="date">
            <text:p>2028/03/20</text:p>
          </table:table-cell>
          <table:table-cell table:style-name="ce422" table:formula="of:=WEEKDAY([.B148])" office:value-type="date" office:date-value="1900-01-01" calcext:value-type="date">
            <text:p>月</text:p>
          </table:table-cell>
          <table:table-cell table:style-name="ce420" office:value-type="string" calcext:value-type="string">
            <text:p>春分の日</text:p>
          </table:table-cell>
          <table:table-cell office:value-type="float" office:value="46832" calcext:value-type="float">
            <text:p>468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8-04-29" calcext:value-type="date">
            <text:p>2028/04/29</text:p>
          </table:table-cell>
          <table:table-cell table:style-name="ce422" table:formula="of:=WEEKDAY([.B149])" office:value-type="date" office:date-value="1900-01-06" calcext:value-type="date">
            <text:p>土</text:p>
          </table:table-cell>
          <table:table-cell table:style-name="ce420" office:value-type="string" calcext:value-type="string">
            <text:p>昭和の日</text:p>
          </table:table-cell>
          <table:table-cell office:value-type="float" office:value="46872" calcext:value-type="float">
            <text:p>468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8-05-03" calcext:value-type="date">
            <text:p>2028/05/03</text:p>
          </table:table-cell>
          <table:table-cell table:style-name="ce422" table:formula="of:=WEEKDAY([.B150])" office:value-type="date" office:date-value="1900-01-03" calcext:value-type="date">
            <text:p>水</text:p>
          </table:table-cell>
          <table:table-cell table:style-name="ce420" office:value-type="string" calcext:value-type="string">
            <text:p>憲法記念日</text:p>
          </table:table-cell>
          <table:table-cell office:value-type="float" office:value="46876" calcext:value-type="float">
            <text:p>468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8-05-04" calcext:value-type="date">
            <text:p>2028/05/04</text:p>
          </table:table-cell>
          <table:table-cell table:style-name="ce422" table:formula="of:=WEEKDAY([.B151])" office:value-type="date" office:date-value="1900-01-04" calcext:value-type="date">
            <text:p>木</text:p>
          </table:table-cell>
          <table:table-cell table:style-name="ce420" office:value-type="string" calcext:value-type="string">
            <text:p>みどりの日</text:p>
          </table:table-cell>
          <table:table-cell office:value-type="float" office:value="46877" calcext:value-type="float">
            <text:p>468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8-05-05" calcext:value-type="date">
            <text:p>2028/05/05</text:p>
          </table:table-cell>
          <table:table-cell table:style-name="ce422" table:formula="of:=WEEKDAY([.B152])" office:value-type="date" office:date-value="1900-01-05" calcext:value-type="date">
            <text:p>金</text:p>
          </table:table-cell>
          <table:table-cell table:style-name="ce420" office:value-type="string" calcext:value-type="string">
            <text:p>こどもの日</text:p>
          </table:table-cell>
          <table:table-cell office:value-type="float" office:value="46878" calcext:value-type="float">
            <text:p>468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8-07-17" calcext:value-type="date">
            <text:p>2028/07/17</text:p>
          </table:table-cell>
          <table:table-cell table:style-name="ce422" table:formula="of:=WEEKDAY([.B153])" office:value-type="date" office:date-value="1900-01-01" calcext:value-type="date">
            <text:p>月</text:p>
          </table:table-cell>
          <table:table-cell table:style-name="ce420" office:value-type="string" calcext:value-type="string">
            <text:p>海の日</text:p>
          </table:table-cell>
          <table:table-cell office:value-type="float" office:value="46951" calcext:value-type="float">
            <text:p>469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8-08-11" calcext:value-type="date">
            <text:p>2028/08/11</text:p>
          </table:table-cell>
          <table:table-cell table:style-name="ce422" table:formula="of:=WEEKDAY([.B154])" office:value-type="date" office:date-value="1900-01-05" calcext:value-type="date">
            <text:p>金</text:p>
          </table:table-cell>
          <table:table-cell table:style-name="ce420" office:value-type="string" calcext:value-type="string">
            <text:p>山の日</text:p>
          </table:table-cell>
          <table:table-cell office:value-type="float" office:value="46976" calcext:value-type="float">
            <text:p>469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8-09-18" calcext:value-type="date">
            <text:p>2028/09/18</text:p>
          </table:table-cell>
          <table:table-cell table:style-name="ce422" table:formula="of:=WEEKDAY([.B155])" office:value-type="date" office:date-value="1900-01-01" calcext:value-type="date">
            <text:p>月</text:p>
          </table:table-cell>
          <table:table-cell table:style-name="ce420" office:value-type="string" calcext:value-type="string">
            <text:p>敬老の日</text:p>
          </table:table-cell>
          <table:table-cell office:value-type="float" office:value="47014" calcext:value-type="float">
            <text:p>470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8-09-22" calcext:value-type="date">
            <text:p>2028/09/22</text:p>
          </table:table-cell>
          <table:table-cell table:style-name="ce422" table:formula="of:=WEEKDAY([.B156])" office:value-type="date" office:date-value="1900-01-05" calcext:value-type="date">
            <text:p>金</text:p>
          </table:table-cell>
          <table:table-cell table:style-name="ce420" office:value-type="string" calcext:value-type="string">
            <text:p>秋分の日</text:p>
          </table:table-cell>
          <table:table-cell office:value-type="float" office:value="47018" calcext:value-type="float">
            <text:p>470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8-10-09" calcext:value-type="date">
            <text:p>2028/10/09</text:p>
          </table:table-cell>
          <table:table-cell table:style-name="ce422" table:formula="of:=WEEKDAY([.B157])" office:value-type="date" office:date-value="1900-01-01" calcext:value-type="date">
            <text:p>月</text:p>
          </table:table-cell>
          <table:table-cell table:style-name="ce420" office:value-type="string" calcext:value-type="string">
            <text:p>スポーツの日</text:p>
          </table:table-cell>
          <table:table-cell office:value-type="float" office:value="47035" calcext:value-type="float">
            <text:p>470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8-11-03" calcext:value-type="date">
            <text:p>2028/11/03</text:p>
          </table:table-cell>
          <table:table-cell table:style-name="ce422" table:formula="of:=WEEKDAY([.B158])" office:value-type="date" office:date-value="1900-01-05" calcext:value-type="date">
            <text:p>金</text:p>
          </table:table-cell>
          <table:table-cell table:style-name="ce420" office:value-type="string" calcext:value-type="string">
            <text:p>文化の日</text:p>
          </table:table-cell>
          <table:table-cell office:value-type="float" office:value="47060" calcext:value-type="float">
            <text:p>470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8-11-23" calcext:value-type="date">
            <text:p>2028/11/23</text:p>
          </table:table-cell>
          <table:table-cell table:style-name="ce422" table:formula="of:=WEEKDAY([.B159])" office:value-type="date" office:date-value="1900-01-04" calcext:value-type="date">
            <text:p>木</text:p>
          </table:table-cell>
          <table:table-cell table:style-name="ce420" office:value-type="string" calcext:value-type="string">
            <text:p>勤労感謝の日</text:p>
          </table:table-cell>
          <table:table-cell office:value-type="float" office:value="47080" calcext:value-type="float">
            <text:p>470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9-01-01" calcext:value-type="date">
            <text:p>2029/01/01</text:p>
          </table:table-cell>
          <table:table-cell table:style-name="ce422" table:formula="of:=WEEKDAY([.B160])" office:value-type="date" office:date-value="1900-01-01" calcext:value-type="date">
            <text:p>月</text:p>
          </table:table-cell>
          <table:table-cell table:style-name="ce420" office:value-type="string" calcext:value-type="string">
            <text:p>元日</text:p>
          </table:table-cell>
          <table:table-cell office:value-type="float" office:value="47119" calcext:value-type="float">
            <text:p>471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9-01-08" calcext:value-type="date">
            <text:p>2029/01/08</text:p>
          </table:table-cell>
          <table:table-cell table:style-name="ce422" table:formula="of:=WEEKDAY([.B161])" office:value-type="date" office:date-value="1900-01-01" calcext:value-type="date">
            <text:p>月</text:p>
          </table:table-cell>
          <table:table-cell table:style-name="ce420" office:value-type="string" calcext:value-type="string">
            <text:p>成人の日</text:p>
          </table:table-cell>
          <table:table-cell office:value-type="float" office:value="47126" calcext:value-type="float">
            <text:p>471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9-02-11" calcext:value-type="date">
            <text:p>2029/02/11</text:p>
          </table:table-cell>
          <table:table-cell table:style-name="ce422" table:formula="of:=WEEKDAY([.B162])" office:value-type="date" office:date-value="1899-12-31" calcext:value-type="date">
            <text:p>日</text:p>
          </table:table-cell>
          <table:table-cell table:style-name="ce420" office:value-type="string" calcext:value-type="string">
            <text:p>建国記念の日</text:p>
          </table:table-cell>
          <table:table-cell office:value-type="float" office:value="47160" calcext:value-type="float">
            <text:p>471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9-02-12" calcext:value-type="date">
            <text:p>2029/02/12</text:p>
          </table:table-cell>
          <table:table-cell table:style-name="ce422" table:formula="of:=WEEKDAY([.B163])" office:value-type="date" office:date-value="1900-01-01" calcext:value-type="date">
            <text:p>月</text:p>
          </table:table-cell>
          <table:table-cell table:style-name="ce420" office:value-type="string" calcext:value-type="string">
            <text:p>振替休日</text:p>
          </table:table-cell>
          <table:table-cell office:value-type="float" office:value="47161" calcext:value-type="float">
            <text:p>471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9-02-23" calcext:value-type="date">
            <text:p>2029/02/23</text:p>
          </table:table-cell>
          <table:table-cell table:style-name="ce422" table:formula="of:=WEEKDAY([.B164])" office:value-type="date" office:date-value="1900-01-05" calcext:value-type="date">
            <text:p>金</text:p>
          </table:table-cell>
          <table:table-cell table:style-name="ce420" office:value-type="string" calcext:value-type="string">
            <text:p>天皇誕生日</text:p>
          </table:table-cell>
          <table:table-cell office:value-type="float" office:value="47172" calcext:value-type="float">
            <text:p>471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9-03-20" calcext:value-type="date">
            <text:p>2029/03/20</text:p>
          </table:table-cell>
          <table:table-cell table:style-name="ce422" table:formula="of:=WEEKDAY([.B165])" office:value-type="date" office:date-value="1900-01-02" calcext:value-type="date">
            <text:p>火</text:p>
          </table:table-cell>
          <table:table-cell table:style-name="ce420" office:value-type="string" calcext:value-type="string">
            <text:p>春分の日</text:p>
          </table:table-cell>
          <table:table-cell office:value-type="float" office:value="47197" calcext:value-type="float">
            <text:p>471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9-04-29" calcext:value-type="date">
            <text:p>2029/04/29</text:p>
          </table:table-cell>
          <table:table-cell table:style-name="ce422" table:formula="of:=WEEKDAY([.B166])" office:value-type="date" office:date-value="1899-12-31" calcext:value-type="date">
            <text:p>日</text:p>
          </table:table-cell>
          <table:table-cell table:style-name="ce420" office:value-type="string" calcext:value-type="string">
            <text:p>昭和の日</text:p>
          </table:table-cell>
          <table:table-cell office:value-type="float" office:value="47237" calcext:value-type="float">
            <text:p>472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9-04-30" calcext:value-type="date">
            <text:p>2029/04/30</text:p>
          </table:table-cell>
          <table:table-cell table:style-name="ce422" table:formula="of:=WEEKDAY([.B167])" office:value-type="date" office:date-value="1900-01-01" calcext:value-type="date">
            <text:p>月</text:p>
          </table:table-cell>
          <table:table-cell table:style-name="ce420" office:value-type="string" calcext:value-type="string">
            <text:p>振替休日</text:p>
          </table:table-cell>
          <table:table-cell office:value-type="float" office:value="47238" calcext:value-type="float">
            <text:p>472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9-05-03" calcext:value-type="date">
            <text:p>2029/05/03</text:p>
          </table:table-cell>
          <table:table-cell table:style-name="ce422" table:formula="of:=WEEKDAY([.B168])" office:value-type="date" office:date-value="1900-01-04" calcext:value-type="date">
            <text:p>木</text:p>
          </table:table-cell>
          <table:table-cell table:style-name="ce420" office:value-type="string" calcext:value-type="string">
            <text:p>憲法記念日</text:p>
          </table:table-cell>
          <table:table-cell office:value-type="float" office:value="47241" calcext:value-type="float">
            <text:p>472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9-05-04" calcext:value-type="date">
            <text:p>2029/05/04</text:p>
          </table:table-cell>
          <table:table-cell table:style-name="ce422" table:formula="of:=WEEKDAY([.B169])" office:value-type="date" office:date-value="1900-01-05" calcext:value-type="date">
            <text:p>金</text:p>
          </table:table-cell>
          <table:table-cell table:style-name="ce420" office:value-type="string" calcext:value-type="string">
            <text:p>みどりの日</text:p>
          </table:table-cell>
          <table:table-cell office:value-type="float" office:value="47242" calcext:value-type="float">
            <text:p>472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9-05-05" calcext:value-type="date">
            <text:p>2029/05/05</text:p>
          </table:table-cell>
          <table:table-cell table:style-name="ce422" table:formula="of:=WEEKDAY([.B170])" office:value-type="date" office:date-value="1900-01-06" calcext:value-type="date">
            <text:p>土</text:p>
          </table:table-cell>
          <table:table-cell table:style-name="ce420" office:value-type="string" calcext:value-type="string">
            <text:p>こどもの日</text:p>
          </table:table-cell>
          <table:table-cell office:value-type="float" office:value="47243" calcext:value-type="float">
            <text:p>472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9-07-16" calcext:value-type="date">
            <text:p>2029/07/16</text:p>
          </table:table-cell>
          <table:table-cell table:style-name="ce422" table:formula="of:=WEEKDAY([.B171])" office:value-type="date" office:date-value="1900-01-01" calcext:value-type="date">
            <text:p>月</text:p>
          </table:table-cell>
          <table:table-cell table:style-name="ce420" office:value-type="string" calcext:value-type="string">
            <text:p>海の日</text:p>
          </table:table-cell>
          <table:table-cell office:value-type="float" office:value="47315" calcext:value-type="float">
            <text:p>473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9-08-11" calcext:value-type="date">
            <text:p>2029/08/11</text:p>
          </table:table-cell>
          <table:table-cell table:style-name="ce422" table:formula="of:=WEEKDAY([.B172])" office:value-type="date" office:date-value="1900-01-06" calcext:value-type="date">
            <text:p>土</text:p>
          </table:table-cell>
          <table:table-cell table:style-name="ce420" office:value-type="string" calcext:value-type="string">
            <text:p>山の日</text:p>
          </table:table-cell>
          <table:table-cell office:value-type="float" office:value="47341" calcext:value-type="float">
            <text:p>473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9-09-17" calcext:value-type="date">
            <text:p>2029/09/17</text:p>
          </table:table-cell>
          <table:table-cell table:style-name="ce422" table:formula="of:=WEEKDAY([.B173])" office:value-type="date" office:date-value="1900-01-01" calcext:value-type="date">
            <text:p>月</text:p>
          </table:table-cell>
          <table:table-cell table:style-name="ce420" office:value-type="string" calcext:value-type="string">
            <text:p>敬老の日</text:p>
          </table:table-cell>
          <table:table-cell office:value-type="float" office:value="47378" calcext:value-type="float">
            <text:p>473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9-09-23" calcext:value-type="date">
            <text:p>2029/09/23</text:p>
          </table:table-cell>
          <table:table-cell table:style-name="ce422" table:formula="of:=WEEKDAY([.B174])" office:value-type="date" office:date-value="1899-12-31" calcext:value-type="date">
            <text:p>日</text:p>
          </table:table-cell>
          <table:table-cell table:style-name="ce420" office:value-type="string" calcext:value-type="string">
            <text:p>秋分の日</text:p>
          </table:table-cell>
          <table:table-cell office:value-type="float" office:value="47384" calcext:value-type="float">
            <text:p>473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9-09-24" calcext:value-type="date">
            <text:p>2029/09/24</text:p>
          </table:table-cell>
          <table:table-cell table:style-name="ce422" table:formula="of:=WEEKDAY([.B175])" office:value-type="date" office:date-value="1900-01-01" calcext:value-type="date">
            <text:p>月</text:p>
          </table:table-cell>
          <table:table-cell table:style-name="ce420" office:value-type="string" calcext:value-type="string">
            <text:p>振替休日</text:p>
          </table:table-cell>
          <table:table-cell office:value-type="float" office:value="47385" calcext:value-type="float">
            <text:p>473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9-10-08" calcext:value-type="date">
            <text:p>2029/10/08</text:p>
          </table:table-cell>
          <table:table-cell table:style-name="ce422" table:formula="of:=WEEKDAY([.B176])" office:value-type="date" office:date-value="1900-01-01" calcext:value-type="date">
            <text:p>月</text:p>
          </table:table-cell>
          <table:table-cell table:style-name="ce420" office:value-type="string" calcext:value-type="string">
            <text:p>スポーツの日</text:p>
          </table:table-cell>
          <table:table-cell office:value-type="float" office:value="47399" calcext:value-type="float">
            <text:p>473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9-11-03" calcext:value-type="date">
            <text:p>2029/11/03</text:p>
          </table:table-cell>
          <table:table-cell table:style-name="ce422" table:formula="of:=WEEKDAY([.B177])" office:value-type="date" office:date-value="1900-01-06" calcext:value-type="date">
            <text:p>土</text:p>
          </table:table-cell>
          <table:table-cell table:style-name="ce420" office:value-type="string" calcext:value-type="string">
            <text:p>文化の日</text:p>
          </table:table-cell>
          <table:table-cell office:value-type="float" office:value="47425" calcext:value-type="float">
            <text:p>474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9-11-23" calcext:value-type="date">
            <text:p>2029/11/23</text:p>
          </table:table-cell>
          <table:table-cell table:style-name="ce422" table:formula="of:=WEEKDAY([.B178])" office:value-type="date" office:date-value="1900-01-05" calcext:value-type="date">
            <text:p>金</text:p>
          </table:table-cell>
          <table:table-cell table:style-name="ce420" office:value-type="string" calcext:value-type="string">
            <text:p>勤労感謝の日</text:p>
          </table:table-cell>
          <table:table-cell office:value-type="float" office:value="47445" calcext:value-type="float">
            <text:p>474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0-01-01" calcext:value-type="date">
            <text:p>2030/01/01</text:p>
          </table:table-cell>
          <table:table-cell table:style-name="ce422" table:formula="of:=WEEKDAY([.B179])" office:value-type="date" office:date-value="1900-01-02" calcext:value-type="date">
            <text:p>火</text:p>
          </table:table-cell>
          <table:table-cell table:style-name="ce420" office:value-type="string" calcext:value-type="string">
            <text:p>元日</text:p>
          </table:table-cell>
          <table:table-cell office:value-type="float" office:value="47484" calcext:value-type="float">
            <text:p>474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0-01-14" calcext:value-type="date">
            <text:p>2030/01/14</text:p>
          </table:table-cell>
          <table:table-cell table:style-name="ce422" table:formula="of:=WEEKDAY([.B180])" office:value-type="date" office:date-value="1900-01-01" calcext:value-type="date">
            <text:p>月</text:p>
          </table:table-cell>
          <table:table-cell table:style-name="ce420" office:value-type="string" calcext:value-type="string">
            <text:p>成人の日</text:p>
          </table:table-cell>
          <table:table-cell office:value-type="float" office:value="47497" calcext:value-type="float">
            <text:p>474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0-02-11" calcext:value-type="date">
            <text:p>2030/02/11</text:p>
          </table:table-cell>
          <table:table-cell table:style-name="ce422" table:formula="of:=WEEKDAY([.B181])" office:value-type="date" office:date-value="1900-01-01" calcext:value-type="date">
            <text:p>月</text:p>
          </table:table-cell>
          <table:table-cell table:style-name="ce420" office:value-type="string" calcext:value-type="string">
            <text:p>建国記念の日</text:p>
          </table:table-cell>
          <table:table-cell office:value-type="float" office:value="47525" calcext:value-type="float">
            <text:p>475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0-02-23" calcext:value-type="date">
            <text:p>2030/02/23</text:p>
          </table:table-cell>
          <table:table-cell table:style-name="ce422" table:formula="of:=WEEKDAY([.B182])" office:value-type="date" office:date-value="1900-01-06" calcext:value-type="date">
            <text:p>土</text:p>
          </table:table-cell>
          <table:table-cell table:style-name="ce420" office:value-type="string" calcext:value-type="string">
            <text:p>天皇誕生日</text:p>
          </table:table-cell>
          <table:table-cell office:value-type="float" office:value="47537" calcext:value-type="float">
            <text:p>475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0-03-20" calcext:value-type="date">
            <text:p>2030/03/20</text:p>
          </table:table-cell>
          <table:table-cell table:style-name="ce422" table:formula="of:=WEEKDAY([.B183])" office:value-type="date" office:date-value="1900-01-03" calcext:value-type="date">
            <text:p>水</text:p>
          </table:table-cell>
          <table:table-cell table:style-name="ce420" office:value-type="string" calcext:value-type="string">
            <text:p>春分の日</text:p>
          </table:table-cell>
          <table:table-cell office:value-type="float" office:value="47562" calcext:value-type="float">
            <text:p>475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0-04-29" calcext:value-type="date">
            <text:p>2030/04/29</text:p>
          </table:table-cell>
          <table:table-cell table:style-name="ce422" table:formula="of:=WEEKDAY([.B184])" office:value-type="date" office:date-value="1900-01-01" calcext:value-type="date">
            <text:p>月</text:p>
          </table:table-cell>
          <table:table-cell table:style-name="ce420" office:value-type="string" calcext:value-type="string">
            <text:p>昭和の日</text:p>
          </table:table-cell>
          <table:table-cell office:value-type="float" office:value="47602" calcext:value-type="float">
            <text:p>476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0-05-03" calcext:value-type="date">
            <text:p>2030/05/03</text:p>
          </table:table-cell>
          <table:table-cell table:style-name="ce422" table:formula="of:=WEEKDAY([.B185])" office:value-type="date" office:date-value="1900-01-05" calcext:value-type="date">
            <text:p>金</text:p>
          </table:table-cell>
          <table:table-cell table:style-name="ce420" office:value-type="string" calcext:value-type="string">
            <text:p>憲法記念日</text:p>
          </table:table-cell>
          <table:table-cell office:value-type="float" office:value="47606" calcext:value-type="float">
            <text:p>476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0-05-04" calcext:value-type="date">
            <text:p>2030/05/04</text:p>
          </table:table-cell>
          <table:table-cell table:style-name="ce422" table:formula="of:=WEEKDAY([.B186])" office:value-type="date" office:date-value="1900-01-06" calcext:value-type="date">
            <text:p>土</text:p>
          </table:table-cell>
          <table:table-cell table:style-name="ce420" office:value-type="string" calcext:value-type="string">
            <text:p>みどりの日</text:p>
          </table:table-cell>
          <table:table-cell office:value-type="float" office:value="47607" calcext:value-type="float">
            <text:p>476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0-05-05" calcext:value-type="date">
            <text:p>2030/05/05</text:p>
          </table:table-cell>
          <table:table-cell table:style-name="ce422" table:formula="of:=WEEKDAY([.B187])" office:value-type="date" office:date-value="1899-12-31" calcext:value-type="date">
            <text:p>日</text:p>
          </table:table-cell>
          <table:table-cell table:style-name="ce420" office:value-type="string" calcext:value-type="string">
            <text:p>こどもの日</text:p>
          </table:table-cell>
          <table:table-cell office:value-type="float" office:value="47608" calcext:value-type="float">
            <text:p>476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0-05-06" calcext:value-type="date">
            <text:p>2030/05/06</text:p>
          </table:table-cell>
          <table:table-cell table:style-name="ce422" table:formula="of:=WEEKDAY([.B188])" office:value-type="date" office:date-value="1900-01-01" calcext:value-type="date">
            <text:p>月</text:p>
          </table:table-cell>
          <table:table-cell table:style-name="ce420" office:value-type="string" calcext:value-type="string">
            <text:p>振替休日</text:p>
          </table:table-cell>
          <table:table-cell office:value-type="float" office:value="47609" calcext:value-type="float">
            <text:p>476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0-07-15" calcext:value-type="date">
            <text:p>2030/07/15</text:p>
          </table:table-cell>
          <table:table-cell table:style-name="ce422" table:formula="of:=WEEKDAY([.B189])" office:value-type="date" office:date-value="1900-01-01" calcext:value-type="date">
            <text:p>月</text:p>
          </table:table-cell>
          <table:table-cell table:style-name="ce420" office:value-type="string" calcext:value-type="string">
            <text:p>海の日</text:p>
          </table:table-cell>
          <table:table-cell office:value-type="float" office:value="47679" calcext:value-type="float">
            <text:p>476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0-08-11" calcext:value-type="date">
            <text:p>2030/08/11</text:p>
          </table:table-cell>
          <table:table-cell table:style-name="ce422" table:formula="of:=WEEKDAY([.B190])" office:value-type="date" office:date-value="1899-12-31" calcext:value-type="date">
            <text:p>日</text:p>
          </table:table-cell>
          <table:table-cell table:style-name="ce420" office:value-type="string" calcext:value-type="string">
            <text:p>山の日</text:p>
          </table:table-cell>
          <table:table-cell office:value-type="float" office:value="47706" calcext:value-type="float">
            <text:p>477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0-08-12" calcext:value-type="date">
            <text:p>2030/08/12</text:p>
          </table:table-cell>
          <table:table-cell table:style-name="ce422" table:formula="of:=WEEKDAY([.B191])" office:value-type="date" office:date-value="1900-01-01" calcext:value-type="date">
            <text:p>月</text:p>
          </table:table-cell>
          <table:table-cell table:style-name="ce420" office:value-type="string" calcext:value-type="string">
            <text:p>振替休日</text:p>
          </table:table-cell>
          <table:table-cell office:value-type="float" office:value="47707" calcext:value-type="float">
            <text:p>477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0-09-16" calcext:value-type="date">
            <text:p>2030/09/16</text:p>
          </table:table-cell>
          <table:table-cell table:style-name="ce422" table:formula="of:=WEEKDAY([.B192])" office:value-type="date" office:date-value="1900-01-01" calcext:value-type="date">
            <text:p>月</text:p>
          </table:table-cell>
          <table:table-cell table:style-name="ce420" office:value-type="string" calcext:value-type="string">
            <text:p>敬老の日</text:p>
          </table:table-cell>
          <table:table-cell office:value-type="float" office:value="47742" calcext:value-type="float">
            <text:p>477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0-09-23" calcext:value-type="date">
            <text:p>2030/09/23</text:p>
          </table:table-cell>
          <table:table-cell table:style-name="ce422" table:formula="of:=WEEKDAY([.B193])" office:value-type="date" office:date-value="1900-01-01" calcext:value-type="date">
            <text:p>月</text:p>
          </table:table-cell>
          <table:table-cell table:style-name="ce420" office:value-type="string" calcext:value-type="string">
            <text:p>秋分の日</text:p>
          </table:table-cell>
          <table:table-cell office:value-type="float" office:value="47749" calcext:value-type="float">
            <text:p>477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0-10-14" calcext:value-type="date">
            <text:p>2030/10/14</text:p>
          </table:table-cell>
          <table:table-cell table:style-name="ce422" table:formula="of:=WEEKDAY([.B194])" office:value-type="date" office:date-value="1900-01-01" calcext:value-type="date">
            <text:p>月</text:p>
          </table:table-cell>
          <table:table-cell table:style-name="ce420" office:value-type="string" calcext:value-type="string">
            <text:p>スポーツの日</text:p>
          </table:table-cell>
          <table:table-cell office:value-type="float" office:value="47770" calcext:value-type="float">
            <text:p>477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0-11-03" calcext:value-type="date">
            <text:p>2030/11/03</text:p>
          </table:table-cell>
          <table:table-cell table:style-name="ce422" table:formula="of:=WEEKDAY([.B195])" office:value-type="date" office:date-value="1899-12-31" calcext:value-type="date">
            <text:p>日</text:p>
          </table:table-cell>
          <table:table-cell table:style-name="ce420" office:value-type="string" calcext:value-type="string">
            <text:p>文化の日</text:p>
          </table:table-cell>
          <table:table-cell office:value-type="float" office:value="47790" calcext:value-type="float">
            <text:p>477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0-11-04" calcext:value-type="date">
            <text:p>2030/11/04</text:p>
          </table:table-cell>
          <table:table-cell table:style-name="ce422" table:formula="of:=WEEKDAY([.B196])" office:value-type="date" office:date-value="1900-01-01" calcext:value-type="date">
            <text:p>月</text:p>
          </table:table-cell>
          <table:table-cell table:style-name="ce420" office:value-type="string" calcext:value-type="string">
            <text:p>振替休日</text:p>
          </table:table-cell>
          <table:table-cell office:value-type="float" office:value="47791" calcext:value-type="float">
            <text:p>477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0-11-23" calcext:value-type="date">
            <text:p>2030/11/23</text:p>
          </table:table-cell>
          <table:table-cell table:style-name="ce422" table:formula="of:=WEEKDAY([.B197])" office:value-type="date" office:date-value="1900-01-06" calcext:value-type="date">
            <text:p>土</text:p>
          </table:table-cell>
          <table:table-cell table:style-name="ce420" office:value-type="string" calcext:value-type="string">
            <text:p>勤労感謝の日</text:p>
          </table:table-cell>
          <table:table-cell office:value-type="float" office:value="47810" calcext:value-type="float">
            <text:p>478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1-01-01" calcext:value-type="date">
            <text:p>2031/01/01</text:p>
          </table:table-cell>
          <table:table-cell table:style-name="ce422" table:formula="of:=WEEKDAY([.B198])" office:value-type="date" office:date-value="1900-01-03" calcext:value-type="date">
            <text:p>水</text:p>
          </table:table-cell>
          <table:table-cell table:style-name="ce420" office:value-type="string" calcext:value-type="string">
            <text:p>元日</text:p>
          </table:table-cell>
          <table:table-cell office:value-type="float" office:value="47849" calcext:value-type="float">
            <text:p>478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1-01-13" calcext:value-type="date">
            <text:p>2031/01/13</text:p>
          </table:table-cell>
          <table:table-cell table:style-name="ce422" table:formula="of:=WEEKDAY([.B199])" office:value-type="date" office:date-value="1900-01-01" calcext:value-type="date">
            <text:p>月</text:p>
          </table:table-cell>
          <table:table-cell table:style-name="ce420" office:value-type="string" calcext:value-type="string">
            <text:p>成人の日</text:p>
          </table:table-cell>
          <table:table-cell office:value-type="float" office:value="47861" calcext:value-type="float">
            <text:p>478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1-02-11" calcext:value-type="date">
            <text:p>2031/02/11</text:p>
          </table:table-cell>
          <table:table-cell table:style-name="ce422" table:formula="of:=WEEKDAY([.B200])" office:value-type="date" office:date-value="1900-01-02" calcext:value-type="date">
            <text:p>火</text:p>
          </table:table-cell>
          <table:table-cell table:style-name="ce420" office:value-type="string" calcext:value-type="string">
            <text:p>建国記念の日</text:p>
          </table:table-cell>
          <table:table-cell office:value-type="float" office:value="47890" calcext:value-type="float">
            <text:p>478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1-02-23" calcext:value-type="date">
            <text:p>2031/02/23</text:p>
          </table:table-cell>
          <table:table-cell table:style-name="ce422" table:formula="of:=WEEKDAY([.B201])" office:value-type="date" office:date-value="1899-12-31" calcext:value-type="date">
            <text:p>日</text:p>
          </table:table-cell>
          <table:table-cell table:style-name="ce420" office:value-type="string" calcext:value-type="string">
            <text:p>天皇誕生日</text:p>
          </table:table-cell>
          <table:table-cell office:value-type="float" office:value="47902" calcext:value-type="float">
            <text:p>479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1-02-24" calcext:value-type="date">
            <text:p>2031/02/24</text:p>
          </table:table-cell>
          <table:table-cell table:style-name="ce422" table:formula="of:=WEEKDAY([.B202])" office:value-type="date" office:date-value="1900-01-01" calcext:value-type="date">
            <text:p>月</text:p>
          </table:table-cell>
          <table:table-cell table:style-name="ce420" office:value-type="string" calcext:value-type="string">
            <text:p>振替休日</text:p>
          </table:table-cell>
          <table:table-cell office:value-type="float" office:value="47903" calcext:value-type="float">
            <text:p>479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1-03-21" calcext:value-type="date">
            <text:p>2031/03/21</text:p>
          </table:table-cell>
          <table:table-cell table:style-name="ce422" table:formula="of:=WEEKDAY([.B203])" office:value-type="date" office:date-value="1900-01-05" calcext:value-type="date">
            <text:p>金</text:p>
          </table:table-cell>
          <table:table-cell table:style-name="ce420" office:value-type="string" calcext:value-type="string">
            <text:p>春分の日</text:p>
          </table:table-cell>
          <table:table-cell office:value-type="float" office:value="47928" calcext:value-type="float">
            <text:p>479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1-04-29" calcext:value-type="date">
            <text:p>2031/04/29</text:p>
          </table:table-cell>
          <table:table-cell table:style-name="ce422" table:formula="of:=WEEKDAY([.B204])" office:value-type="date" office:date-value="1900-01-02" calcext:value-type="date">
            <text:p>火</text:p>
          </table:table-cell>
          <table:table-cell table:style-name="ce420" office:value-type="string" calcext:value-type="string">
            <text:p>昭和の日</text:p>
          </table:table-cell>
          <table:table-cell office:value-type="float" office:value="47967" calcext:value-type="float">
            <text:p>479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1-05-03" calcext:value-type="date">
            <text:p>2031/05/03</text:p>
          </table:table-cell>
          <table:table-cell table:style-name="ce422" table:formula="of:=WEEKDAY([.B205])" office:value-type="date" office:date-value="1900-01-06" calcext:value-type="date">
            <text:p>土</text:p>
          </table:table-cell>
          <table:table-cell table:style-name="ce420" office:value-type="string" calcext:value-type="string">
            <text:p>憲法記念日</text:p>
          </table:table-cell>
          <table:table-cell office:value-type="float" office:value="47971" calcext:value-type="float">
            <text:p>479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1-05-04" calcext:value-type="date">
            <text:p>2031/05/04</text:p>
          </table:table-cell>
          <table:table-cell table:style-name="ce422" table:formula="of:=WEEKDAY([.B206])" office:value-type="date" office:date-value="1899-12-31" calcext:value-type="date">
            <text:p>日</text:p>
          </table:table-cell>
          <table:table-cell table:style-name="ce420" office:value-type="string" calcext:value-type="string">
            <text:p>みどりの日</text:p>
          </table:table-cell>
          <table:table-cell office:value-type="float" office:value="47972" calcext:value-type="float">
            <text:p>479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1-05-05" calcext:value-type="date">
            <text:p>2031/05/05</text:p>
          </table:table-cell>
          <table:table-cell table:style-name="ce422" table:formula="of:=WEEKDAY([.B207])" office:value-type="date" office:date-value="1900-01-01" calcext:value-type="date">
            <text:p>月</text:p>
          </table:table-cell>
          <table:table-cell table:style-name="ce420" office:value-type="string" calcext:value-type="string">
            <text:p>こどもの日</text:p>
          </table:table-cell>
          <table:table-cell office:value-type="float" office:value="47973" calcext:value-type="float">
            <text:p>479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1-05-06" calcext:value-type="date">
            <text:p>2031/05/06</text:p>
          </table:table-cell>
          <table:table-cell table:style-name="ce422" table:formula="of:=WEEKDAY([.B208])" office:value-type="date" office:date-value="1900-01-02" calcext:value-type="date">
            <text:p>火</text:p>
          </table:table-cell>
          <table:table-cell table:style-name="ce420" office:value-type="string" calcext:value-type="string">
            <text:p>振替休日</text:p>
          </table:table-cell>
          <table:table-cell office:value-type="float" office:value="47974" calcext:value-type="float">
            <text:p>479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1-07-21" calcext:value-type="date">
            <text:p>2031/07/21</text:p>
          </table:table-cell>
          <table:table-cell table:style-name="ce422" table:formula="of:=WEEKDAY([.B209])" office:value-type="date" office:date-value="1900-01-01" calcext:value-type="date">
            <text:p>月</text:p>
          </table:table-cell>
          <table:table-cell table:style-name="ce420" office:value-type="string" calcext:value-type="string">
            <text:p>海の日</text:p>
          </table:table-cell>
          <table:table-cell office:value-type="float" office:value="48050" calcext:value-type="float">
            <text:p>480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1-08-11" calcext:value-type="date">
            <text:p>2031/08/11</text:p>
          </table:table-cell>
          <table:table-cell table:style-name="ce422" table:formula="of:=WEEKDAY([.B210])" office:value-type="date" office:date-value="1900-01-01" calcext:value-type="date">
            <text:p>月</text:p>
          </table:table-cell>
          <table:table-cell table:style-name="ce420" office:value-type="string" calcext:value-type="string">
            <text:p>山の日</text:p>
          </table:table-cell>
          <table:table-cell office:value-type="float" office:value="48071" calcext:value-type="float">
            <text:p>480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1-09-15" calcext:value-type="date">
            <text:p>2031/09/15</text:p>
          </table:table-cell>
          <table:table-cell table:style-name="ce422" table:formula="of:=WEEKDAY([.B211])" office:value-type="date" office:date-value="1900-01-01" calcext:value-type="date">
            <text:p>月</text:p>
          </table:table-cell>
          <table:table-cell table:style-name="ce420" office:value-type="string" calcext:value-type="string">
            <text:p>敬老の日</text:p>
          </table:table-cell>
          <table:table-cell office:value-type="float" office:value="48106" calcext:value-type="float">
            <text:p>481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1-09-23" calcext:value-type="date">
            <text:p>2031/09/23</text:p>
          </table:table-cell>
          <table:table-cell table:style-name="ce422" table:formula="of:=WEEKDAY([.B212])" office:value-type="date" office:date-value="1900-01-02" calcext:value-type="date">
            <text:p>火</text:p>
          </table:table-cell>
          <table:table-cell table:style-name="ce420" office:value-type="string" calcext:value-type="string">
            <text:p>秋分の日</text:p>
          </table:table-cell>
          <table:table-cell office:value-type="float" office:value="48114" calcext:value-type="float">
            <text:p>481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1-10-13" calcext:value-type="date">
            <text:p>2031/10/13</text:p>
          </table:table-cell>
          <table:table-cell table:style-name="ce422" table:formula="of:=WEEKDAY([.B213])" office:value-type="date" office:date-value="1900-01-01" calcext:value-type="date">
            <text:p>月</text:p>
          </table:table-cell>
          <table:table-cell table:style-name="ce420" office:value-type="string" calcext:value-type="string">
            <text:p>スポーツの日</text:p>
          </table:table-cell>
          <table:table-cell office:value-type="float" office:value="48134" calcext:value-type="float">
            <text:p>481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1-11-03" calcext:value-type="date">
            <text:p>2031/11/03</text:p>
          </table:table-cell>
          <table:table-cell table:style-name="ce422" table:formula="of:=WEEKDAY([.B214])" office:value-type="date" office:date-value="1900-01-01" calcext:value-type="date">
            <text:p>月</text:p>
          </table:table-cell>
          <table:table-cell table:style-name="ce420" office:value-type="string" calcext:value-type="string">
            <text:p>文化の日</text:p>
          </table:table-cell>
          <table:table-cell office:value-type="float" office:value="48155" calcext:value-type="float">
            <text:p>481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1-11-23" calcext:value-type="date">
            <text:p>2031/11/23</text:p>
          </table:table-cell>
          <table:table-cell table:style-name="ce422" table:formula="of:=WEEKDAY([.B215])" office:value-type="date" office:date-value="1899-12-31" calcext:value-type="date">
            <text:p>日</text:p>
          </table:table-cell>
          <table:table-cell table:style-name="ce420" office:value-type="string" calcext:value-type="string">
            <text:p>勤労感謝の日</text:p>
          </table:table-cell>
          <table:table-cell office:value-type="float" office:value="48175" calcext:value-type="float">
            <text:p>481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1-11-24" calcext:value-type="date">
            <text:p>2031/11/24</text:p>
          </table:table-cell>
          <table:table-cell table:style-name="ce422" table:formula="of:=WEEKDAY([.B216])" office:value-type="date" office:date-value="1900-01-01" calcext:value-type="date">
            <text:p>月</text:p>
          </table:table-cell>
          <table:table-cell table:style-name="ce420" office:value-type="string" calcext:value-type="string">
            <text:p>振替休日</text:p>
          </table:table-cell>
          <table:table-cell office:value-type="float" office:value="48176" calcext:value-type="float">
            <text:p>481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2-01-01" calcext:value-type="date">
            <text:p>2032/01/01</text:p>
          </table:table-cell>
          <table:table-cell table:style-name="ce422" table:formula="of:=WEEKDAY([.B217])" office:value-type="date" office:date-value="1900-01-04" calcext:value-type="date">
            <text:p>木</text:p>
          </table:table-cell>
          <table:table-cell table:style-name="ce420" office:value-type="string" calcext:value-type="string">
            <text:p>元日</text:p>
          </table:table-cell>
          <table:table-cell office:value-type="float" office:value="48214" calcext:value-type="float">
            <text:p>482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2-01-12" calcext:value-type="date">
            <text:p>2032/01/12</text:p>
          </table:table-cell>
          <table:table-cell table:style-name="ce422" table:formula="of:=WEEKDAY([.B218])" office:value-type="date" office:date-value="1900-01-01" calcext:value-type="date">
            <text:p>月</text:p>
          </table:table-cell>
          <table:table-cell table:style-name="ce420" office:value-type="string" calcext:value-type="string">
            <text:p>成人の日</text:p>
          </table:table-cell>
          <table:table-cell office:value-type="float" office:value="48225" calcext:value-type="float">
            <text:p>482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2-02-11" calcext:value-type="date">
            <text:p>2032/02/11</text:p>
          </table:table-cell>
          <table:table-cell table:style-name="ce422" table:formula="of:=WEEKDAY([.B219])" office:value-type="date" office:date-value="1900-01-03" calcext:value-type="date">
            <text:p>水</text:p>
          </table:table-cell>
          <table:table-cell table:style-name="ce420" office:value-type="string" calcext:value-type="string">
            <text:p>建国記念の日</text:p>
          </table:table-cell>
          <table:table-cell office:value-type="float" office:value="48255" calcext:value-type="float">
            <text:p>482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2-02-23" calcext:value-type="date">
            <text:p>2032/02/23</text:p>
          </table:table-cell>
          <table:table-cell table:style-name="ce422" table:formula="of:=WEEKDAY([.B220])" office:value-type="date" office:date-value="1900-01-01" calcext:value-type="date">
            <text:p>月</text:p>
          </table:table-cell>
          <table:table-cell table:style-name="ce420" office:value-type="string" calcext:value-type="string">
            <text:p>天皇誕生日</text:p>
          </table:table-cell>
          <table:table-cell office:value-type="float" office:value="48267" calcext:value-type="float">
            <text:p>482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2-03-20" calcext:value-type="date">
            <text:p>2032/03/20</text:p>
          </table:table-cell>
          <table:table-cell table:style-name="ce422" table:formula="of:=WEEKDAY([.B221])" office:value-type="date" office:date-value="1900-01-06" calcext:value-type="date">
            <text:p>土</text:p>
          </table:table-cell>
          <table:table-cell table:style-name="ce420" office:value-type="string" calcext:value-type="string">
            <text:p>春分の日</text:p>
          </table:table-cell>
          <table:table-cell office:value-type="float" office:value="48293" calcext:value-type="float">
            <text:p>482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2-04-29" calcext:value-type="date">
            <text:p>2032/04/29</text:p>
          </table:table-cell>
          <table:table-cell table:style-name="ce422" table:formula="of:=WEEKDAY([.B222])" office:value-type="date" office:date-value="1900-01-04" calcext:value-type="date">
            <text:p>木</text:p>
          </table:table-cell>
          <table:table-cell table:style-name="ce420" office:value-type="string" calcext:value-type="string">
            <text:p>昭和の日</text:p>
          </table:table-cell>
          <table:table-cell office:value-type="float" office:value="48333" calcext:value-type="float">
            <text:p>483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2-05-03" calcext:value-type="date">
            <text:p>2032/05/03</text:p>
          </table:table-cell>
          <table:table-cell table:style-name="ce422" table:formula="of:=WEEKDAY([.B223])" office:value-type="date" office:date-value="1900-01-01" calcext:value-type="date">
            <text:p>月</text:p>
          </table:table-cell>
          <table:table-cell table:style-name="ce420" office:value-type="string" calcext:value-type="string">
            <text:p>憲法記念日</text:p>
          </table:table-cell>
          <table:table-cell office:value-type="float" office:value="48337" calcext:value-type="float">
            <text:p>483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2-05-04" calcext:value-type="date">
            <text:p>2032/05/04</text:p>
          </table:table-cell>
          <table:table-cell table:style-name="ce422" table:formula="of:=WEEKDAY([.B224])" office:value-type="date" office:date-value="1900-01-02" calcext:value-type="date">
            <text:p>火</text:p>
          </table:table-cell>
          <table:table-cell table:style-name="ce420" office:value-type="string" calcext:value-type="string">
            <text:p>みどりの日</text:p>
          </table:table-cell>
          <table:table-cell office:value-type="float" office:value="48338" calcext:value-type="float">
            <text:p>483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2-05-05" calcext:value-type="date">
            <text:p>2032/05/05</text:p>
          </table:table-cell>
          <table:table-cell table:style-name="ce422" table:formula="of:=WEEKDAY([.B225])" office:value-type="date" office:date-value="1900-01-03" calcext:value-type="date">
            <text:p>水</text:p>
          </table:table-cell>
          <table:table-cell table:style-name="ce420" office:value-type="string" calcext:value-type="string">
            <text:p>こどもの日</text:p>
          </table:table-cell>
          <table:table-cell office:value-type="float" office:value="48339" calcext:value-type="float">
            <text:p>483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2-07-19" calcext:value-type="date">
            <text:p>2032/07/19</text:p>
          </table:table-cell>
          <table:table-cell table:style-name="ce422" table:formula="of:=WEEKDAY([.B226])" office:value-type="date" office:date-value="1900-01-01" calcext:value-type="date">
            <text:p>月</text:p>
          </table:table-cell>
          <table:table-cell table:style-name="ce420" office:value-type="string" calcext:value-type="string">
            <text:p>海の日</text:p>
          </table:table-cell>
          <table:table-cell office:value-type="float" office:value="48414" calcext:value-type="float">
            <text:p>484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2-08-11" calcext:value-type="date">
            <text:p>2032/08/11</text:p>
          </table:table-cell>
          <table:table-cell table:style-name="ce422" table:formula="of:=WEEKDAY([.B227])" office:value-type="date" office:date-value="1900-01-03" calcext:value-type="date">
            <text:p>水</text:p>
          </table:table-cell>
          <table:table-cell table:style-name="ce420" office:value-type="string" calcext:value-type="string">
            <text:p>山の日</text:p>
          </table:table-cell>
          <table:table-cell office:value-type="float" office:value="48437" calcext:value-type="float">
            <text:p>484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2-09-20" calcext:value-type="date">
            <text:p>2032/09/20</text:p>
          </table:table-cell>
          <table:table-cell table:style-name="ce422" table:formula="of:=WEEKDAY([.B228])" office:value-type="date" office:date-value="1900-01-01" calcext:value-type="date">
            <text:p>月</text:p>
          </table:table-cell>
          <table:table-cell table:style-name="ce420" office:value-type="string" calcext:value-type="string">
            <text:p>敬老の日</text:p>
          </table:table-cell>
          <table:table-cell office:value-type="float" office:value="48477" calcext:value-type="float">
            <text:p>484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2-09-21" calcext:value-type="date">
            <text:p>2032/09/21</text:p>
          </table:table-cell>
          <table:table-cell table:style-name="ce422" table:formula="of:=WEEKDAY([.B229])" office:value-type="date" office:date-value="1900-01-02" calcext:value-type="date">
            <text:p>火</text:p>
          </table:table-cell>
          <table:table-cell table:style-name="ce420" office:value-type="string" calcext:value-type="string">
            <text:p>国民の休日</text:p>
          </table:table-cell>
          <table:table-cell office:value-type="float" office:value="48478" calcext:value-type="float">
            <text:p>484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2-09-22" calcext:value-type="date">
            <text:p>2032/09/22</text:p>
          </table:table-cell>
          <table:table-cell table:style-name="ce422" table:formula="of:=WEEKDAY([.B230])" office:value-type="date" office:date-value="1900-01-03" calcext:value-type="date">
            <text:p>水</text:p>
          </table:table-cell>
          <table:table-cell table:style-name="ce420" office:value-type="string" calcext:value-type="string">
            <text:p>秋分の日</text:p>
          </table:table-cell>
          <table:table-cell office:value-type="float" office:value="48479" calcext:value-type="float">
            <text:p>484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2-10-11" calcext:value-type="date">
            <text:p>2032/10/11</text:p>
          </table:table-cell>
          <table:table-cell table:style-name="ce422" table:formula="of:=WEEKDAY([.B231])" office:value-type="date" office:date-value="1900-01-01" calcext:value-type="date">
            <text:p>月</text:p>
          </table:table-cell>
          <table:table-cell table:style-name="ce420" office:value-type="string" calcext:value-type="string">
            <text:p>スポーツの日</text:p>
          </table:table-cell>
          <table:table-cell office:value-type="float" office:value="48498" calcext:value-type="float">
            <text:p>484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2-11-03" calcext:value-type="date">
            <text:p>2032/11/03</text:p>
          </table:table-cell>
          <table:table-cell table:style-name="ce422" table:formula="of:=WEEKDAY([.B232])" office:value-type="date" office:date-value="1900-01-03" calcext:value-type="date">
            <text:p>水</text:p>
          </table:table-cell>
          <table:table-cell table:style-name="ce420" office:value-type="string" calcext:value-type="string">
            <text:p>文化の日</text:p>
          </table:table-cell>
          <table:table-cell office:value-type="float" office:value="48521" calcext:value-type="float">
            <text:p>485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2-11-23" calcext:value-type="date">
            <text:p>2032/11/23</text:p>
          </table:table-cell>
          <table:table-cell table:style-name="ce422" table:formula="of:=WEEKDAY([.B233])" office:value-type="date" office:date-value="1900-01-02" calcext:value-type="date">
            <text:p>火</text:p>
          </table:table-cell>
          <table:table-cell table:style-name="ce420" office:value-type="string" calcext:value-type="string">
            <text:p>勤労感謝の日</text:p>
          </table:table-cell>
          <table:table-cell office:value-type="float" office:value="48541" calcext:value-type="float">
            <text:p>485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3-01-01" calcext:value-type="date">
            <text:p>2033/01/01</text:p>
          </table:table-cell>
          <table:table-cell table:style-name="ce422" table:formula="of:=WEEKDAY([.B234])" office:value-type="date" office:date-value="1900-01-06" calcext:value-type="date">
            <text:p>土</text:p>
          </table:table-cell>
          <table:table-cell table:style-name="ce420" office:value-type="string" calcext:value-type="string">
            <text:p>元日</text:p>
          </table:table-cell>
          <table:table-cell office:value-type="float" office:value="48580" calcext:value-type="float">
            <text:p>485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3-01-10" calcext:value-type="date">
            <text:p>2033/01/10</text:p>
          </table:table-cell>
          <table:table-cell table:style-name="ce422" table:formula="of:=WEEKDAY([.B235])" office:value-type="date" office:date-value="1900-01-01" calcext:value-type="date">
            <text:p>月</text:p>
          </table:table-cell>
          <table:table-cell table:style-name="ce420" office:value-type="string" calcext:value-type="string">
            <text:p>成人の日</text:p>
          </table:table-cell>
          <table:table-cell office:value-type="float" office:value="48589" calcext:value-type="float">
            <text:p>485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3-02-11" calcext:value-type="date">
            <text:p>2033/02/11</text:p>
          </table:table-cell>
          <table:table-cell table:style-name="ce422" table:formula="of:=WEEKDAY([.B236])" office:value-type="date" office:date-value="1900-01-05" calcext:value-type="date">
            <text:p>金</text:p>
          </table:table-cell>
          <table:table-cell table:style-name="ce420" office:value-type="string" calcext:value-type="string">
            <text:p>建国記念の日</text:p>
          </table:table-cell>
          <table:table-cell office:value-type="float" office:value="48621" calcext:value-type="float">
            <text:p>486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3-02-23" calcext:value-type="date">
            <text:p>2033/02/23</text:p>
          </table:table-cell>
          <table:table-cell table:style-name="ce422" table:formula="of:=WEEKDAY([.B237])" office:value-type="date" office:date-value="1900-01-03" calcext:value-type="date">
            <text:p>水</text:p>
          </table:table-cell>
          <table:table-cell table:style-name="ce420" office:value-type="string" calcext:value-type="string">
            <text:p>天皇誕生日</text:p>
          </table:table-cell>
          <table:table-cell office:value-type="float" office:value="48633" calcext:value-type="float">
            <text:p>486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3-03-20" calcext:value-type="date">
            <text:p>2033/03/20</text:p>
          </table:table-cell>
          <table:table-cell table:style-name="ce422" table:formula="of:=WEEKDAY([.B238])" office:value-type="date" office:date-value="1899-12-31" calcext:value-type="date">
            <text:p>日</text:p>
          </table:table-cell>
          <table:table-cell table:style-name="ce420" office:value-type="string" calcext:value-type="string">
            <text:p>春分の日</text:p>
          </table:table-cell>
          <table:table-cell office:value-type="float" office:value="48658" calcext:value-type="float">
            <text:p>486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3-03-21" calcext:value-type="date">
            <text:p>2033/03/21</text:p>
          </table:table-cell>
          <table:table-cell table:style-name="ce422" table:formula="of:=WEEKDAY([.B239])" office:value-type="date" office:date-value="1900-01-01" calcext:value-type="date">
            <text:p>月</text:p>
          </table:table-cell>
          <table:table-cell table:style-name="ce420" office:value-type="string" calcext:value-type="string">
            <text:p>振替休日</text:p>
          </table:table-cell>
          <table:table-cell office:value-type="float" office:value="48659" calcext:value-type="float">
            <text:p>486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3-04-29" calcext:value-type="date">
            <text:p>2033/04/29</text:p>
          </table:table-cell>
          <table:table-cell table:style-name="ce422" table:formula="of:=WEEKDAY([.B240])" office:value-type="date" office:date-value="1900-01-05" calcext:value-type="date">
            <text:p>金</text:p>
          </table:table-cell>
          <table:table-cell table:style-name="ce420" office:value-type="string" calcext:value-type="string">
            <text:p>昭和の日</text:p>
          </table:table-cell>
          <table:table-cell office:value-type="float" office:value="48698" calcext:value-type="float">
            <text:p>486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3-05-03" calcext:value-type="date">
            <text:p>2033/05/03</text:p>
          </table:table-cell>
          <table:table-cell table:style-name="ce422" table:formula="of:=WEEKDAY([.B241])" office:value-type="date" office:date-value="1900-01-02" calcext:value-type="date">
            <text:p>火</text:p>
          </table:table-cell>
          <table:table-cell table:style-name="ce420" office:value-type="string" calcext:value-type="string">
            <text:p>憲法記念日</text:p>
          </table:table-cell>
          <table:table-cell office:value-type="float" office:value="48702" calcext:value-type="float">
            <text:p>487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3-05-04" calcext:value-type="date">
            <text:p>2033/05/04</text:p>
          </table:table-cell>
          <table:table-cell table:style-name="ce422" table:formula="of:=WEEKDAY([.B242])" office:value-type="date" office:date-value="1900-01-03" calcext:value-type="date">
            <text:p>水</text:p>
          </table:table-cell>
          <table:table-cell table:style-name="ce420" office:value-type="string" calcext:value-type="string">
            <text:p>みどりの日</text:p>
          </table:table-cell>
          <table:table-cell office:value-type="float" office:value="48703" calcext:value-type="float">
            <text:p>487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3-05-05" calcext:value-type="date">
            <text:p>2033/05/05</text:p>
          </table:table-cell>
          <table:table-cell table:style-name="ce422" table:formula="of:=WEEKDAY([.B243])" office:value-type="date" office:date-value="1900-01-04" calcext:value-type="date">
            <text:p>木</text:p>
          </table:table-cell>
          <table:table-cell table:style-name="ce420" office:value-type="string" calcext:value-type="string">
            <text:p>こどもの日</text:p>
          </table:table-cell>
          <table:table-cell office:value-type="float" office:value="48704" calcext:value-type="float">
            <text:p>487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3-07-18" calcext:value-type="date">
            <text:p>2033/07/18</text:p>
          </table:table-cell>
          <table:table-cell table:style-name="ce422" table:formula="of:=WEEKDAY([.B244])" office:value-type="date" office:date-value="1900-01-01" calcext:value-type="date">
            <text:p>月</text:p>
          </table:table-cell>
          <table:table-cell table:style-name="ce420" office:value-type="string" calcext:value-type="string">
            <text:p>海の日</text:p>
          </table:table-cell>
          <table:table-cell office:value-type="float" office:value="48778" calcext:value-type="float">
            <text:p>487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3-08-11" calcext:value-type="date">
            <text:p>2033/08/11</text:p>
          </table:table-cell>
          <table:table-cell table:style-name="ce422" table:formula="of:=WEEKDAY([.B245])" office:value-type="date" office:date-value="1900-01-04" calcext:value-type="date">
            <text:p>木</text:p>
          </table:table-cell>
          <table:table-cell table:style-name="ce420" office:value-type="string" calcext:value-type="string">
            <text:p>山の日</text:p>
          </table:table-cell>
          <table:table-cell office:value-type="float" office:value="48802" calcext:value-type="float">
            <text:p>488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3-09-19" calcext:value-type="date">
            <text:p>2033/09/19</text:p>
          </table:table-cell>
          <table:table-cell table:style-name="ce422" table:formula="of:=WEEKDAY([.B246])" office:value-type="date" office:date-value="1900-01-01" calcext:value-type="date">
            <text:p>月</text:p>
          </table:table-cell>
          <table:table-cell table:style-name="ce420" office:value-type="string" calcext:value-type="string">
            <text:p>敬老の日</text:p>
          </table:table-cell>
          <table:table-cell office:value-type="float" office:value="48841" calcext:value-type="float">
            <text:p>488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3-09-23" calcext:value-type="date">
            <text:p>2033/09/23</text:p>
          </table:table-cell>
          <table:table-cell table:style-name="ce422" table:formula="of:=WEEKDAY([.B247])" office:value-type="date" office:date-value="1900-01-05" calcext:value-type="date">
            <text:p>金</text:p>
          </table:table-cell>
          <table:table-cell table:style-name="ce420" office:value-type="string" calcext:value-type="string">
            <text:p>秋分の日</text:p>
          </table:table-cell>
          <table:table-cell office:value-type="float" office:value="48845" calcext:value-type="float">
            <text:p>488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3-10-10" calcext:value-type="date">
            <text:p>2033/10/10</text:p>
          </table:table-cell>
          <table:table-cell table:style-name="ce422" table:formula="of:=WEEKDAY([.B248])" office:value-type="date" office:date-value="1900-01-01" calcext:value-type="date">
            <text:p>月</text:p>
          </table:table-cell>
          <table:table-cell table:style-name="ce420" office:value-type="string" calcext:value-type="string">
            <text:p>スポーツの日</text:p>
          </table:table-cell>
          <table:table-cell office:value-type="float" office:value="48862" calcext:value-type="float">
            <text:p>488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3-11-03" calcext:value-type="date">
            <text:p>2033/11/03</text:p>
          </table:table-cell>
          <table:table-cell table:style-name="ce422" table:formula="of:=WEEKDAY([.B249])" office:value-type="date" office:date-value="1900-01-04" calcext:value-type="date">
            <text:p>木</text:p>
          </table:table-cell>
          <table:table-cell table:style-name="ce420" office:value-type="string" calcext:value-type="string">
            <text:p>文化の日</text:p>
          </table:table-cell>
          <table:table-cell office:value-type="float" office:value="48886" calcext:value-type="float">
            <text:p>488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3-11-23" calcext:value-type="date">
            <text:p>2033/11/23</text:p>
          </table:table-cell>
          <table:table-cell table:style-name="ce422" table:formula="of:=WEEKDAY([.B250])" office:value-type="date" office:date-value="1900-01-03" calcext:value-type="date">
            <text:p>水</text:p>
          </table:table-cell>
          <table:table-cell table:style-name="ce420" office:value-type="string" calcext:value-type="string">
            <text:p>勤労感謝の日</text:p>
          </table:table-cell>
          <table:table-cell office:value-type="float" office:value="48906" calcext:value-type="float">
            <text:p>489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4-01-01" calcext:value-type="date">
            <text:p>2034/01/01</text:p>
          </table:table-cell>
          <table:table-cell table:style-name="ce422" table:formula="of:=WEEKDAY([.B251])" office:value-type="date" office:date-value="1899-12-31" calcext:value-type="date">
            <text:p>日</text:p>
          </table:table-cell>
          <table:table-cell table:style-name="ce420" office:value-type="string" calcext:value-type="string">
            <text:p>元日</text:p>
          </table:table-cell>
          <table:table-cell office:value-type="float" office:value="48945" calcext:value-type="float">
            <text:p>489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4-01-02" calcext:value-type="date">
            <text:p>2034/01/02</text:p>
          </table:table-cell>
          <table:table-cell table:style-name="ce422" table:formula="of:=WEEKDAY([.B252])" office:value-type="date" office:date-value="1900-01-01" calcext:value-type="date">
            <text:p>月</text:p>
          </table:table-cell>
          <table:table-cell table:style-name="ce420" office:value-type="string" calcext:value-type="string">
            <text:p>振替休日</text:p>
          </table:table-cell>
          <table:table-cell office:value-type="float" office:value="48946" calcext:value-type="float">
            <text:p>489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4-01-09" calcext:value-type="date">
            <text:p>2034/01/09</text:p>
          </table:table-cell>
          <table:table-cell table:style-name="ce422" table:formula="of:=WEEKDAY([.B253])" office:value-type="date" office:date-value="1900-01-01" calcext:value-type="date">
            <text:p>月</text:p>
          </table:table-cell>
          <table:table-cell table:style-name="ce420" office:value-type="string" calcext:value-type="string">
            <text:p>成人の日</text:p>
          </table:table-cell>
          <table:table-cell office:value-type="float" office:value="48953" calcext:value-type="float">
            <text:p>489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4-02-11" calcext:value-type="date">
            <text:p>2034/02/11</text:p>
          </table:table-cell>
          <table:table-cell table:style-name="ce422" table:formula="of:=WEEKDAY([.B254])" office:value-type="date" office:date-value="1900-01-06" calcext:value-type="date">
            <text:p>土</text:p>
          </table:table-cell>
          <table:table-cell table:style-name="ce420" office:value-type="string" calcext:value-type="string">
            <text:p>建国記念の日</text:p>
          </table:table-cell>
          <table:table-cell office:value-type="float" office:value="48986" calcext:value-type="float">
            <text:p>489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4-02-23" calcext:value-type="date">
            <text:p>2034/02/23</text:p>
          </table:table-cell>
          <table:table-cell table:style-name="ce422" table:formula="of:=WEEKDAY([.B255])" office:value-type="date" office:date-value="1900-01-04" calcext:value-type="date">
            <text:p>木</text:p>
          </table:table-cell>
          <table:table-cell table:style-name="ce420" office:value-type="string" calcext:value-type="string">
            <text:p>天皇誕生日</text:p>
          </table:table-cell>
          <table:table-cell office:value-type="float" office:value="48998" calcext:value-type="float">
            <text:p>489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4-03-20" calcext:value-type="date">
            <text:p>2034/03/20</text:p>
          </table:table-cell>
          <table:table-cell table:style-name="ce422" table:formula="of:=WEEKDAY([.B256])" office:value-type="date" office:date-value="1900-01-01" calcext:value-type="date">
            <text:p>月</text:p>
          </table:table-cell>
          <table:table-cell table:style-name="ce420" office:value-type="string" calcext:value-type="string">
            <text:p>春分の日</text:p>
          </table:table-cell>
          <table:table-cell office:value-type="float" office:value="49023" calcext:value-type="float">
            <text:p>490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4-04-29" calcext:value-type="date">
            <text:p>2034/04/29</text:p>
          </table:table-cell>
          <table:table-cell table:style-name="ce422" table:formula="of:=WEEKDAY([.B257])" office:value-type="date" office:date-value="1900-01-06" calcext:value-type="date">
            <text:p>土</text:p>
          </table:table-cell>
          <table:table-cell table:style-name="ce420" office:value-type="string" calcext:value-type="string">
            <text:p>昭和の日</text:p>
          </table:table-cell>
          <table:table-cell office:value-type="float" office:value="49063" calcext:value-type="float">
            <text:p>490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4-05-03" calcext:value-type="date">
            <text:p>2034/05/03</text:p>
          </table:table-cell>
          <table:table-cell table:style-name="ce422" table:formula="of:=WEEKDAY([.B258])" office:value-type="date" office:date-value="1900-01-03" calcext:value-type="date">
            <text:p>水</text:p>
          </table:table-cell>
          <table:table-cell table:style-name="ce420" office:value-type="string" calcext:value-type="string">
            <text:p>憲法記念日</text:p>
          </table:table-cell>
          <table:table-cell office:value-type="float" office:value="49067" calcext:value-type="float">
            <text:p>490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4-05-04" calcext:value-type="date">
            <text:p>2034/05/04</text:p>
          </table:table-cell>
          <table:table-cell table:style-name="ce422" table:formula="of:=WEEKDAY([.B259])" office:value-type="date" office:date-value="1900-01-04" calcext:value-type="date">
            <text:p>木</text:p>
          </table:table-cell>
          <table:table-cell table:style-name="ce420" office:value-type="string" calcext:value-type="string">
            <text:p>みどりの日</text:p>
          </table:table-cell>
          <table:table-cell office:value-type="float" office:value="49068" calcext:value-type="float">
            <text:p>490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4-05-05" calcext:value-type="date">
            <text:p>2034/05/05</text:p>
          </table:table-cell>
          <table:table-cell table:style-name="ce422" table:formula="of:=WEEKDAY([.B260])" office:value-type="date" office:date-value="1900-01-05" calcext:value-type="date">
            <text:p>金</text:p>
          </table:table-cell>
          <table:table-cell table:style-name="ce420" office:value-type="string" calcext:value-type="string">
            <text:p>こどもの日</text:p>
          </table:table-cell>
          <table:table-cell office:value-type="float" office:value="49069" calcext:value-type="float">
            <text:p>490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4-07-17" calcext:value-type="date">
            <text:p>2034/07/17</text:p>
          </table:table-cell>
          <table:table-cell table:style-name="ce422" table:formula="of:=WEEKDAY([.B261])" office:value-type="date" office:date-value="1900-01-01" calcext:value-type="date">
            <text:p>月</text:p>
          </table:table-cell>
          <table:table-cell table:style-name="ce420" office:value-type="string" calcext:value-type="string">
            <text:p>海の日</text:p>
          </table:table-cell>
          <table:table-cell office:value-type="float" office:value="49142" calcext:value-type="float">
            <text:p>491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4-08-11" calcext:value-type="date">
            <text:p>2034/08/11</text:p>
          </table:table-cell>
          <table:table-cell table:style-name="ce422" table:formula="of:=WEEKDAY([.B262])" office:value-type="date" office:date-value="1900-01-05" calcext:value-type="date">
            <text:p>金</text:p>
          </table:table-cell>
          <table:table-cell table:style-name="ce420" office:value-type="string" calcext:value-type="string">
            <text:p>山の日</text:p>
          </table:table-cell>
          <table:table-cell office:value-type="float" office:value="49167" calcext:value-type="float">
            <text:p>491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4-09-18" calcext:value-type="date">
            <text:p>2034/09/18</text:p>
          </table:table-cell>
          <table:table-cell table:style-name="ce422" table:formula="of:=WEEKDAY([.B263])" office:value-type="date" office:date-value="1900-01-01" calcext:value-type="date">
            <text:p>月</text:p>
          </table:table-cell>
          <table:table-cell table:style-name="ce420" office:value-type="string" calcext:value-type="string">
            <text:p>敬老の日</text:p>
          </table:table-cell>
          <table:table-cell office:value-type="float" office:value="49205" calcext:value-type="float">
            <text:p>492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4-09-23" calcext:value-type="date">
            <text:p>2034/09/23</text:p>
          </table:table-cell>
          <table:table-cell table:style-name="ce422" table:formula="of:=WEEKDAY([.B264])" office:value-type="date" office:date-value="1900-01-06" calcext:value-type="date">
            <text:p>土</text:p>
          </table:table-cell>
          <table:table-cell table:style-name="ce420" office:value-type="string" calcext:value-type="string">
            <text:p>秋分の日</text:p>
          </table:table-cell>
          <table:table-cell office:value-type="float" office:value="49210" calcext:value-type="float">
            <text:p>492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4-10-09" calcext:value-type="date">
            <text:p>2034/10/09</text:p>
          </table:table-cell>
          <table:table-cell table:style-name="ce422" table:formula="of:=WEEKDAY([.B265])" office:value-type="date" office:date-value="1900-01-01" calcext:value-type="date">
            <text:p>月</text:p>
          </table:table-cell>
          <table:table-cell table:style-name="ce420" office:value-type="string" calcext:value-type="string">
            <text:p>スポーツの日</text:p>
          </table:table-cell>
          <table:table-cell office:value-type="float" office:value="49226" calcext:value-type="float">
            <text:p>492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4-11-03" calcext:value-type="date">
            <text:p>2034/11/03</text:p>
          </table:table-cell>
          <table:table-cell table:style-name="ce422" table:formula="of:=WEEKDAY([.B266])" office:value-type="date" office:date-value="1900-01-05" calcext:value-type="date">
            <text:p>金</text:p>
          </table:table-cell>
          <table:table-cell table:style-name="ce420" office:value-type="string" calcext:value-type="string">
            <text:p>文化の日</text:p>
          </table:table-cell>
          <table:table-cell office:value-type="float" office:value="49251" calcext:value-type="float">
            <text:p>492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4-11-23" calcext:value-type="date">
            <text:p>2034/11/23</text:p>
          </table:table-cell>
          <table:table-cell table:style-name="ce422" table:formula="of:=WEEKDAY([.B267])" office:value-type="date" office:date-value="1900-01-04" calcext:value-type="date">
            <text:p>木</text:p>
          </table:table-cell>
          <table:table-cell table:style-name="ce420" office:value-type="string" calcext:value-type="string">
            <text:p>勤労感謝の日</text:p>
          </table:table-cell>
          <table:table-cell office:value-type="float" office:value="49271" calcext:value-type="float">
            <text:p>492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5-01-01" calcext:value-type="date">
            <text:p>2035/01/01</text:p>
          </table:table-cell>
          <table:table-cell table:style-name="ce422" table:formula="of:=WEEKDAY([.B268])" office:value-type="date" office:date-value="1900-01-01" calcext:value-type="date">
            <text:p>月</text:p>
          </table:table-cell>
          <table:table-cell table:style-name="ce420" office:value-type="string" calcext:value-type="string">
            <text:p>元日</text:p>
          </table:table-cell>
          <table:table-cell office:value-type="float" office:value="49310" calcext:value-type="float">
            <text:p>493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5-01-08" calcext:value-type="date">
            <text:p>2035/01/08</text:p>
          </table:table-cell>
          <table:table-cell table:style-name="ce422" table:formula="of:=WEEKDAY([.B269])" office:value-type="date" office:date-value="1900-01-01" calcext:value-type="date">
            <text:p>月</text:p>
          </table:table-cell>
          <table:table-cell table:style-name="ce420" office:value-type="string" calcext:value-type="string">
            <text:p>成人の日</text:p>
          </table:table-cell>
          <table:table-cell office:value-type="float" office:value="49317" calcext:value-type="float">
            <text:p>493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5-02-11" calcext:value-type="date">
            <text:p>2035/02/11</text:p>
          </table:table-cell>
          <table:table-cell table:style-name="ce422" table:formula="of:=WEEKDAY([.B270])" office:value-type="date" office:date-value="1899-12-31" calcext:value-type="date">
            <text:p>日</text:p>
          </table:table-cell>
          <table:table-cell table:style-name="ce420" office:value-type="string" calcext:value-type="string">
            <text:p>建国記念の日</text:p>
          </table:table-cell>
          <table:table-cell office:value-type="float" office:value="49351" calcext:value-type="float">
            <text:p>493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5-02-12" calcext:value-type="date">
            <text:p>2035/02/12</text:p>
          </table:table-cell>
          <table:table-cell table:style-name="ce422" table:formula="of:=WEEKDAY([.B271])" office:value-type="date" office:date-value="1900-01-01" calcext:value-type="date">
            <text:p>月</text:p>
          </table:table-cell>
          <table:table-cell table:style-name="ce420" office:value-type="string" calcext:value-type="string">
            <text:p>振替休日</text:p>
          </table:table-cell>
          <table:table-cell office:value-type="float" office:value="49352" calcext:value-type="float">
            <text:p>493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5-02-23" calcext:value-type="date">
            <text:p>2035/02/23</text:p>
          </table:table-cell>
          <table:table-cell table:style-name="ce422" table:formula="of:=WEEKDAY([.B272])" office:value-type="date" office:date-value="1900-01-05" calcext:value-type="date">
            <text:p>金</text:p>
          </table:table-cell>
          <table:table-cell table:style-name="ce420" office:value-type="string" calcext:value-type="string">
            <text:p>天皇誕生日</text:p>
          </table:table-cell>
          <table:table-cell office:value-type="float" office:value="49363" calcext:value-type="float">
            <text:p>493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5-03-21" calcext:value-type="date">
            <text:p>2035/03/21</text:p>
          </table:table-cell>
          <table:table-cell table:style-name="ce422" table:formula="of:=WEEKDAY([.B273])" office:value-type="date" office:date-value="1900-01-03" calcext:value-type="date">
            <text:p>水</text:p>
          </table:table-cell>
          <table:table-cell table:style-name="ce420" office:value-type="string" calcext:value-type="string">
            <text:p>春分の日</text:p>
          </table:table-cell>
          <table:table-cell office:value-type="float" office:value="49389" calcext:value-type="float">
            <text:p>493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5-04-29" calcext:value-type="date">
            <text:p>2035/04/29</text:p>
          </table:table-cell>
          <table:table-cell table:style-name="ce422" table:formula="of:=WEEKDAY([.B274])" office:value-type="date" office:date-value="1899-12-31" calcext:value-type="date">
            <text:p>日</text:p>
          </table:table-cell>
          <table:table-cell table:style-name="ce420" office:value-type="string" calcext:value-type="string">
            <text:p>昭和の日</text:p>
          </table:table-cell>
          <table:table-cell office:value-type="float" office:value="49428" calcext:value-type="float">
            <text:p>494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5-04-30" calcext:value-type="date">
            <text:p>2035/04/30</text:p>
          </table:table-cell>
          <table:table-cell table:style-name="ce422" table:formula="of:=WEEKDAY([.B275])" office:value-type="date" office:date-value="1900-01-01" calcext:value-type="date">
            <text:p>月</text:p>
          </table:table-cell>
          <table:table-cell table:style-name="ce420" office:value-type="string" calcext:value-type="string">
            <text:p>振替休日</text:p>
          </table:table-cell>
          <table:table-cell office:value-type="float" office:value="49429" calcext:value-type="float">
            <text:p>494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5-05-03" calcext:value-type="date">
            <text:p>2035/05/03</text:p>
          </table:table-cell>
          <table:table-cell table:style-name="ce422" table:formula="of:=WEEKDAY([.B276])" office:value-type="date" office:date-value="1900-01-04" calcext:value-type="date">
            <text:p>木</text:p>
          </table:table-cell>
          <table:table-cell table:style-name="ce420" office:value-type="string" calcext:value-type="string">
            <text:p>憲法記念日</text:p>
          </table:table-cell>
          <table:table-cell office:value-type="float" office:value="49432" calcext:value-type="float">
            <text:p>494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5-05-04" calcext:value-type="date">
            <text:p>2035/05/04</text:p>
          </table:table-cell>
          <table:table-cell table:style-name="ce422" table:formula="of:=WEEKDAY([.B277])" office:value-type="date" office:date-value="1900-01-05" calcext:value-type="date">
            <text:p>金</text:p>
          </table:table-cell>
          <table:table-cell table:style-name="ce420" office:value-type="string" calcext:value-type="string">
            <text:p>みどりの日</text:p>
          </table:table-cell>
          <table:table-cell office:value-type="float" office:value="49433" calcext:value-type="float">
            <text:p>494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5-05-05" calcext:value-type="date">
            <text:p>2035/05/05</text:p>
          </table:table-cell>
          <table:table-cell table:style-name="ce422" table:formula="of:=WEEKDAY([.B278])" office:value-type="date" office:date-value="1900-01-06" calcext:value-type="date">
            <text:p>土</text:p>
          </table:table-cell>
          <table:table-cell table:style-name="ce420" office:value-type="string" calcext:value-type="string">
            <text:p>こどもの日</text:p>
          </table:table-cell>
          <table:table-cell office:value-type="float" office:value="49434" calcext:value-type="float">
            <text:p>494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5-07-16" calcext:value-type="date">
            <text:p>2035/07/16</text:p>
          </table:table-cell>
          <table:table-cell table:style-name="ce422" table:formula="of:=WEEKDAY([.B279])" office:value-type="date" office:date-value="1900-01-01" calcext:value-type="date">
            <text:p>月</text:p>
          </table:table-cell>
          <table:table-cell table:style-name="ce420" office:value-type="string" calcext:value-type="string">
            <text:p>海の日</text:p>
          </table:table-cell>
          <table:table-cell office:value-type="float" office:value="49506" calcext:value-type="float">
            <text:p>495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5-08-11" calcext:value-type="date">
            <text:p>2035/08/11</text:p>
          </table:table-cell>
          <table:table-cell table:style-name="ce422" table:formula="of:=WEEKDAY([.B280])" office:value-type="date" office:date-value="1900-01-06" calcext:value-type="date">
            <text:p>土</text:p>
          </table:table-cell>
          <table:table-cell table:style-name="ce420" office:value-type="string" calcext:value-type="string">
            <text:p>山の日</text:p>
          </table:table-cell>
          <table:table-cell office:value-type="float" office:value="49532" calcext:value-type="float">
            <text:p>495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5-09-17" calcext:value-type="date">
            <text:p>2035/09/17</text:p>
          </table:table-cell>
          <table:table-cell table:style-name="ce422" table:formula="of:=WEEKDAY([.B281])" office:value-type="date" office:date-value="1900-01-01" calcext:value-type="date">
            <text:p>月</text:p>
          </table:table-cell>
          <table:table-cell table:style-name="ce420" office:value-type="string" calcext:value-type="string">
            <text:p>敬老の日</text:p>
          </table:table-cell>
          <table:table-cell office:value-type="float" office:value="49569" calcext:value-type="float">
            <text:p>495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5-09-23" calcext:value-type="date">
            <text:p>2035/09/23</text:p>
          </table:table-cell>
          <table:table-cell table:style-name="ce422" table:formula="of:=WEEKDAY([.B282])" office:value-type="date" office:date-value="1899-12-31" calcext:value-type="date">
            <text:p>日</text:p>
          </table:table-cell>
          <table:table-cell table:style-name="ce420" office:value-type="string" calcext:value-type="string">
            <text:p>秋分の日</text:p>
          </table:table-cell>
          <table:table-cell office:value-type="float" office:value="49575" calcext:value-type="float">
            <text:p>495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5-09-24" calcext:value-type="date">
            <text:p>2035/09/24</text:p>
          </table:table-cell>
          <table:table-cell table:style-name="ce422" table:formula="of:=WEEKDAY([.B283])" office:value-type="date" office:date-value="1900-01-01" calcext:value-type="date">
            <text:p>月</text:p>
          </table:table-cell>
          <table:table-cell table:style-name="ce420" office:value-type="string" calcext:value-type="string">
            <text:p>振替休日</text:p>
          </table:table-cell>
          <table:table-cell office:value-type="float" office:value="49576" calcext:value-type="float">
            <text:p>495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5-10-08" calcext:value-type="date">
            <text:p>2035/10/08</text:p>
          </table:table-cell>
          <table:table-cell table:style-name="ce422" table:formula="of:=WEEKDAY([.B284])" office:value-type="date" office:date-value="1900-01-01" calcext:value-type="date">
            <text:p>月</text:p>
          </table:table-cell>
          <table:table-cell table:style-name="ce420" office:value-type="string" calcext:value-type="string">
            <text:p>スポーツの日</text:p>
          </table:table-cell>
          <table:table-cell office:value-type="float" office:value="49590" calcext:value-type="float">
            <text:p>495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5-11-03" calcext:value-type="date">
            <text:p>2035/11/03</text:p>
          </table:table-cell>
          <table:table-cell table:style-name="ce422" table:formula="of:=WEEKDAY([.B285])" office:value-type="date" office:date-value="1900-01-06" calcext:value-type="date">
            <text:p>土</text:p>
          </table:table-cell>
          <table:table-cell table:style-name="ce420" office:value-type="string" calcext:value-type="string">
            <text:p>文化の日</text:p>
          </table:table-cell>
          <table:table-cell office:value-type="float" office:value="49616" calcext:value-type="float">
            <text:p>496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5-11-23" calcext:value-type="date">
            <text:p>2035/11/23</text:p>
          </table:table-cell>
          <table:table-cell table:style-name="ce422" table:formula="of:=WEEKDAY([.B286])" office:value-type="date" office:date-value="1900-01-05" calcext:value-type="date">
            <text:p>金</text:p>
          </table:table-cell>
          <table:table-cell table:style-name="ce420" office:value-type="string" calcext:value-type="string">
            <text:p>勤労感謝の日</text:p>
          </table:table-cell>
          <table:table-cell office:value-type="float" office:value="49636" calcext:value-type="float">
            <text:p>496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6-01-01" calcext:value-type="date">
            <text:p>2036/01/01</text:p>
          </table:table-cell>
          <table:table-cell table:style-name="ce422" table:formula="of:=WEEKDAY([.B287])" office:value-type="date" office:date-value="1900-01-02" calcext:value-type="date">
            <text:p>火</text:p>
          </table:table-cell>
          <table:table-cell table:style-name="ce420" office:value-type="string" calcext:value-type="string">
            <text:p>元日</text:p>
          </table:table-cell>
          <table:table-cell office:value-type="float" office:value="49675" calcext:value-type="float">
            <text:p>496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6-01-14" calcext:value-type="date">
            <text:p>2036/01/14</text:p>
          </table:table-cell>
          <table:table-cell table:style-name="ce422" table:formula="of:=WEEKDAY([.B288])" office:value-type="date" office:date-value="1900-01-01" calcext:value-type="date">
            <text:p>月</text:p>
          </table:table-cell>
          <table:table-cell table:style-name="ce420" office:value-type="string" calcext:value-type="string">
            <text:p>成人の日</text:p>
          </table:table-cell>
          <table:table-cell office:value-type="float" office:value="49688" calcext:value-type="float">
            <text:p>496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6-02-11" calcext:value-type="date">
            <text:p>2036/02/11</text:p>
          </table:table-cell>
          <table:table-cell table:style-name="ce422" table:formula="of:=WEEKDAY([.B289])" office:value-type="date" office:date-value="1900-01-01" calcext:value-type="date">
            <text:p>月</text:p>
          </table:table-cell>
          <table:table-cell table:style-name="ce420" office:value-type="string" calcext:value-type="string">
            <text:p>建国記念の日</text:p>
          </table:table-cell>
          <table:table-cell office:value-type="float" office:value="49716" calcext:value-type="float">
            <text:p>497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6-02-23" calcext:value-type="date">
            <text:p>2036/02/23</text:p>
          </table:table-cell>
          <table:table-cell table:style-name="ce422" table:formula="of:=WEEKDAY([.B290])" office:value-type="date" office:date-value="1900-01-06" calcext:value-type="date">
            <text:p>土</text:p>
          </table:table-cell>
          <table:table-cell table:style-name="ce420" office:value-type="string" calcext:value-type="string">
            <text:p>天皇誕生日</text:p>
          </table:table-cell>
          <table:table-cell office:value-type="float" office:value="49728" calcext:value-type="float">
            <text:p>497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6-03-20" calcext:value-type="date">
            <text:p>2036/03/20</text:p>
          </table:table-cell>
          <table:table-cell table:style-name="ce422" table:formula="of:=WEEKDAY([.B291])" office:value-type="date" office:date-value="1900-01-04" calcext:value-type="date">
            <text:p>木</text:p>
          </table:table-cell>
          <table:table-cell table:style-name="ce420" office:value-type="string" calcext:value-type="string">
            <text:p>春分の日</text:p>
          </table:table-cell>
          <table:table-cell office:value-type="float" office:value="49754" calcext:value-type="float">
            <text:p>497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6-04-29" calcext:value-type="date">
            <text:p>2036/04/29</text:p>
          </table:table-cell>
          <table:table-cell table:style-name="ce422" table:formula="of:=WEEKDAY([.B292])" office:value-type="date" office:date-value="1900-01-02" calcext:value-type="date">
            <text:p>火</text:p>
          </table:table-cell>
          <table:table-cell table:style-name="ce420" office:value-type="string" calcext:value-type="string">
            <text:p>昭和の日</text:p>
          </table:table-cell>
          <table:table-cell office:value-type="float" office:value="49794" calcext:value-type="float">
            <text:p>497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6-05-03" calcext:value-type="date">
            <text:p>2036/05/03</text:p>
          </table:table-cell>
          <table:table-cell table:style-name="ce422" table:formula="of:=WEEKDAY([.B293])" office:value-type="date" office:date-value="1900-01-06" calcext:value-type="date">
            <text:p>土</text:p>
          </table:table-cell>
          <table:table-cell table:style-name="ce420" office:value-type="string" calcext:value-type="string">
            <text:p>憲法記念日</text:p>
          </table:table-cell>
          <table:table-cell office:value-type="float" office:value="49798" calcext:value-type="float">
            <text:p>497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6-05-04" calcext:value-type="date">
            <text:p>2036/05/04</text:p>
          </table:table-cell>
          <table:table-cell table:style-name="ce422" table:formula="of:=WEEKDAY([.B294])" office:value-type="date" office:date-value="1899-12-31" calcext:value-type="date">
            <text:p>日</text:p>
          </table:table-cell>
          <table:table-cell table:style-name="ce420" office:value-type="string" calcext:value-type="string">
            <text:p>みどりの日</text:p>
          </table:table-cell>
          <table:table-cell office:value-type="float" office:value="49799" calcext:value-type="float">
            <text:p>497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6-05-05" calcext:value-type="date">
            <text:p>2036/05/05</text:p>
          </table:table-cell>
          <table:table-cell table:style-name="ce422" table:formula="of:=WEEKDAY([.B295])" office:value-type="date" office:date-value="1900-01-01" calcext:value-type="date">
            <text:p>月</text:p>
          </table:table-cell>
          <table:table-cell table:style-name="ce420" office:value-type="string" calcext:value-type="string">
            <text:p>こどもの日</text:p>
          </table:table-cell>
          <table:table-cell office:value-type="float" office:value="49800" calcext:value-type="float">
            <text:p>498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6-05-06" calcext:value-type="date">
            <text:p>2036/05/06</text:p>
          </table:table-cell>
          <table:table-cell table:style-name="ce422" table:formula="of:=WEEKDAY([.B296])" office:value-type="date" office:date-value="1900-01-02" calcext:value-type="date">
            <text:p>火</text:p>
          </table:table-cell>
          <table:table-cell table:style-name="ce420" office:value-type="string" calcext:value-type="string">
            <text:p>振替休日</text:p>
          </table:table-cell>
          <table:table-cell office:value-type="float" office:value="49801" calcext:value-type="float">
            <text:p>498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6-07-21" calcext:value-type="date">
            <text:p>2036/07/21</text:p>
          </table:table-cell>
          <table:table-cell table:style-name="ce422" table:formula="of:=WEEKDAY([.B297])" office:value-type="date" office:date-value="1900-01-01" calcext:value-type="date">
            <text:p>月</text:p>
          </table:table-cell>
          <table:table-cell table:style-name="ce420" office:value-type="string" calcext:value-type="string">
            <text:p>海の日</text:p>
          </table:table-cell>
          <table:table-cell office:value-type="float" office:value="49877" calcext:value-type="float">
            <text:p>498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6-08-11" calcext:value-type="date">
            <text:p>2036/08/11</text:p>
          </table:table-cell>
          <table:table-cell table:style-name="ce422" table:formula="of:=WEEKDAY([.B298])" office:value-type="date" office:date-value="1900-01-01" calcext:value-type="date">
            <text:p>月</text:p>
          </table:table-cell>
          <table:table-cell table:style-name="ce420" office:value-type="string" calcext:value-type="string">
            <text:p>山の日</text:p>
          </table:table-cell>
          <table:table-cell office:value-type="float" office:value="49898" calcext:value-type="float">
            <text:p>498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6-09-15" calcext:value-type="date">
            <text:p>2036/09/15</text:p>
          </table:table-cell>
          <table:table-cell table:style-name="ce422" table:formula="of:=WEEKDAY([.B299])" office:value-type="date" office:date-value="1900-01-01" calcext:value-type="date">
            <text:p>月</text:p>
          </table:table-cell>
          <table:table-cell table:style-name="ce420" office:value-type="string" calcext:value-type="string">
            <text:p>敬老の日</text:p>
          </table:table-cell>
          <table:table-cell office:value-type="float" office:value="49933" calcext:value-type="float">
            <text:p>499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6-09-22" calcext:value-type="date">
            <text:p>2036/09/22</text:p>
          </table:table-cell>
          <table:table-cell table:style-name="ce422" table:formula="of:=WEEKDAY([.B300])" office:value-type="date" office:date-value="1900-01-01" calcext:value-type="date">
            <text:p>月</text:p>
          </table:table-cell>
          <table:table-cell table:style-name="ce420" office:value-type="string" calcext:value-type="string">
            <text:p>秋分の日</text:p>
          </table:table-cell>
          <table:table-cell office:value-type="float" office:value="49940" calcext:value-type="float">
            <text:p>499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6-10-13" calcext:value-type="date">
            <text:p>2036/10/13</text:p>
          </table:table-cell>
          <table:table-cell table:style-name="ce422" table:formula="of:=WEEKDAY([.B301])" office:value-type="date" office:date-value="1900-01-01" calcext:value-type="date">
            <text:p>月</text:p>
          </table:table-cell>
          <table:table-cell table:style-name="ce420" office:value-type="string" calcext:value-type="string">
            <text:p>スポーツの日</text:p>
          </table:table-cell>
          <table:table-cell office:value-type="float" office:value="49961" calcext:value-type="float">
            <text:p>499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6-11-03" calcext:value-type="date">
            <text:p>2036/11/03</text:p>
          </table:table-cell>
          <table:table-cell table:style-name="ce422" table:formula="of:=WEEKDAY([.B302])" office:value-type="date" office:date-value="1900-01-01" calcext:value-type="date">
            <text:p>月</text:p>
          </table:table-cell>
          <table:table-cell table:style-name="ce420" office:value-type="string" calcext:value-type="string">
            <text:p>文化の日</text:p>
          </table:table-cell>
          <table:table-cell office:value-type="float" office:value="49982" calcext:value-type="float">
            <text:p>499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6-11-23" calcext:value-type="date">
            <text:p>2036/11/23</text:p>
          </table:table-cell>
          <table:table-cell table:style-name="ce422" table:formula="of:=WEEKDAY([.B303])" office:value-type="date" office:date-value="1899-12-31" calcext:value-type="date">
            <text:p>日</text:p>
          </table:table-cell>
          <table:table-cell table:style-name="ce420" office:value-type="string" calcext:value-type="string">
            <text:p>勤労感謝の日</text:p>
          </table:table-cell>
          <table:table-cell office:value-type="float" office:value="50002" calcext:value-type="float">
            <text:p>500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36-11-24" calcext:value-type="date">
            <text:p>2036/11/24</text:p>
          </table:table-cell>
          <table:table-cell table:style-name="ce422" table:formula="of:=WEEKDAY([.B304])" office:value-type="date" office:date-value="1900-01-01" calcext:value-type="date">
            <text:p>月</text:p>
          </table:table-cell>
          <table:table-cell table:style-name="ce420" office:value-type="string" calcext:value-type="string">
            <text:p>振替休日</text:p>
          </table:table-cell>
          <table:table-cell office:value-type="float" office:value="50003" calcext:value-type="float">
            <text:p>50003</text:p>
          </table:table-cell>
          <table:table-cell table:style-name="Default" table:number-columns-repeated="16379"/>
        </table:table-row>
        <table:table-row table:style-name="ro1">
          <table:table-cell table:number-columns-repeated="2"/>
          <table:table-cell table:style-name="ce422" table:formula="of:=WEEKDAY([.B305])" office:value-type="date" office:date-value="1900-01-06" calcext:value-type="date">
            <text:p>土</text:p>
          </table:table-cell>
          <table:table-cell table:number-columns-repeated="2"/>
          <table:table-cell table:style-name="Default" table:number-columns-repeated="16379"/>
        </table:table-row>
        <table:table-row table:style-name="ro1">
          <table:table-cell/>
          <table:table-cell table:style-name="ce420" office:value-type="string" calcext:value-type="string">
            <text:p>土日一覧</text:p>
          </table:table-cell>
          <table:table-cell table:style-name="ce422" table:formula="of:=WEEKDAY([.B306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土日一覧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office:value-type="date" office:date-value="2020-01-04" calcext:value-type="date">
            <text:p>2020/01/04</text:p>
          </table:table-cell>
          <table:table-cell table:style-name="ce422" table:formula="of:=WEEKDAY([.B307])" office:value-type="date" office:date-value="1900-01-06" calcext:value-type="date">
            <text:p>土</text:p>
          </table:table-cell>
          <table:table-cell/>
          <table:table-cell office:value-type="float" office:value="43834" calcext:value-type="float">
            <text:p>438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307]+1" office:value-type="date" office:date-value="2020-01-05" calcext:value-type="date">
            <text:p>2020/01/05</text:p>
          </table:table-cell>
          <table:table-cell table:style-name="ce422" table:formula="of:=WEEKDAY([.B308])" office:value-type="date" office:date-value="1899-12-31" calcext:value-type="date">
            <text:p>日</text:p>
          </table:table-cell>
          <table:table-cell/>
          <table:table-cell table:formula="of:=[.E307]+1" office:value-type="float" office:value="43835" calcext:value-type="float">
            <text:p>438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308]+6" office:value-type="date" office:date-value="2020-01-11" calcext:value-type="date">
            <text:p>2020/01/11</text:p>
          </table:table-cell>
          <table:table-cell table:style-name="ce422" table:formula="of:=WEEKDAY([.B309])" office:value-type="date" office:date-value="1900-01-06" calcext:value-type="date">
            <text:p>土</text:p>
          </table:table-cell>
          <table:table-cell/>
          <table:table-cell table:formula="of:=[.E308]+6" office:value-type="float" office:value="43841" calcext:value-type="float">
            <text:p>438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309]+1" office:value-type="date" office:date-value="2020-01-12" calcext:value-type="date">
            <text:p>2020/01/12</text:p>
          </table:table-cell>
          <table:table-cell table:style-name="ce422" table:formula="of:=WEEKDAY([.B310])" office:value-type="date" office:date-value="1899-12-31" calcext:value-type="date">
            <text:p>日</text:p>
          </table:table-cell>
          <table:table-cell/>
          <table:table-cell table:formula="of:=[.E309]+1" office:value-type="float" office:value="43842" calcext:value-type="float">
            <text:p>438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310]+6" office:value-type="date" office:date-value="2020-01-18" calcext:value-type="date">
            <text:p>2020/01/18</text:p>
          </table:table-cell>
          <table:table-cell table:style-name="ce422" table:formula="of:=WEEKDAY([.B311])" office:value-type="date" office:date-value="1900-01-06" calcext:value-type="date">
            <text:p>土</text:p>
          </table:table-cell>
          <table:table-cell/>
          <table:table-cell table:formula="of:=[.E310]+6" office:value-type="float" office:value="43848" calcext:value-type="float">
            <text:p>438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311]+1" office:value-type="date" office:date-value="2020-01-19" calcext:value-type="date">
            <text:p>2020/01/19</text:p>
          </table:table-cell>
          <table:table-cell table:style-name="ce422" table:formula="of:=WEEKDAY([.B312])" office:value-type="date" office:date-value="1899-12-31" calcext:value-type="date">
            <text:p>日</text:p>
          </table:table-cell>
          <table:table-cell/>
          <table:table-cell table:formula="of:=[.E311]+1" office:value-type="float" office:value="43849" calcext:value-type="float">
            <text:p>438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312]+6" office:value-type="date" office:date-value="2020-01-25" calcext:value-type="date">
            <text:p>2020/01/25</text:p>
          </table:table-cell>
          <table:table-cell table:style-name="ce422" table:formula="of:=WEEKDAY([.B313])" office:value-type="date" office:date-value="1900-01-06" calcext:value-type="date">
            <text:p>土</text:p>
          </table:table-cell>
          <table:table-cell/>
          <table:table-cell table:formula="of:=[.E312]+6" office:value-type="float" office:value="43855" calcext:value-type="float">
            <text:p>438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313]+1" office:value-type="date" office:date-value="2020-01-26" calcext:value-type="date">
            <text:p>2020/01/26</text:p>
          </table:table-cell>
          <table:table-cell table:style-name="ce422" table:formula="of:=WEEKDAY([.B314])" office:value-type="date" office:date-value="1899-12-31" calcext:value-type="date">
            <text:p>日</text:p>
          </table:table-cell>
          <table:table-cell/>
          <table:table-cell table:formula="of:=[.E313]+1" office:value-type="float" office:value="43856" calcext:value-type="float">
            <text:p>438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314]+6" office:value-type="date" office:date-value="2020-02-01" calcext:value-type="date">
            <text:p>2020/02/01</text:p>
          </table:table-cell>
          <table:table-cell table:style-name="ce422" table:formula="of:=WEEKDAY([.B315])" office:value-type="date" office:date-value="1900-01-06" calcext:value-type="date">
            <text:p>土</text:p>
          </table:table-cell>
          <table:table-cell/>
          <table:table-cell table:formula="of:=[.E314]+6" office:value-type="float" office:value="43862" calcext:value-type="float">
            <text:p>438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315]+1" office:value-type="date" office:date-value="2020-02-02" calcext:value-type="date">
            <text:p>2020/02/02</text:p>
          </table:table-cell>
          <table:table-cell table:style-name="ce422" table:formula="of:=WEEKDAY([.B316])" office:value-type="date" office:date-value="1899-12-31" calcext:value-type="date">
            <text:p>日</text:p>
          </table:table-cell>
          <table:table-cell/>
          <table:table-cell table:formula="of:=[.E315]+1" office:value-type="float" office:value="43863" calcext:value-type="float">
            <text:p>438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316]+6" office:value-type="date" office:date-value="2020-02-08" calcext:value-type="date">
            <text:p>2020/02/08</text:p>
          </table:table-cell>
          <table:table-cell table:style-name="ce422" table:formula="of:=WEEKDAY([.B317])" office:value-type="date" office:date-value="1900-01-06" calcext:value-type="date">
            <text:p>土</text:p>
          </table:table-cell>
          <table:table-cell/>
          <table:table-cell table:formula="of:=[.E316]+6" office:value-type="float" office:value="43869" calcext:value-type="float">
            <text:p>438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317]+1" office:value-type="date" office:date-value="2020-02-09" calcext:value-type="date">
            <text:p>2020/02/09</text:p>
          </table:table-cell>
          <table:table-cell table:style-name="ce422" table:formula="of:=WEEKDAY([.B318])" office:value-type="date" office:date-value="1899-12-31" calcext:value-type="date">
            <text:p>日</text:p>
          </table:table-cell>
          <table:table-cell/>
          <table:table-cell table:formula="of:=[.E317]+1" office:value-type="float" office:value="43870" calcext:value-type="float">
            <text:p>438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318]+6" office:value-type="date" office:date-value="2020-02-15" calcext:value-type="date">
            <text:p>2020/02/15</text:p>
          </table:table-cell>
          <table:table-cell table:style-name="ce422" table:formula="of:=WEEKDAY([.B319])" office:value-type="date" office:date-value="1900-01-06" calcext:value-type="date">
            <text:p>土</text:p>
          </table:table-cell>
          <table:table-cell/>
          <table:table-cell table:formula="of:=[.E318]+6" office:value-type="float" office:value="43876" calcext:value-type="float">
            <text:p>438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319]+1" office:value-type="date" office:date-value="2020-02-16" calcext:value-type="date">
            <text:p>2020/02/16</text:p>
          </table:table-cell>
          <table:table-cell table:style-name="ce422" table:formula="of:=WEEKDAY([.B320])" office:value-type="date" office:date-value="1899-12-31" calcext:value-type="date">
            <text:p>日</text:p>
          </table:table-cell>
          <table:table-cell/>
          <table:table-cell table:formula="of:=[.E319]+1" office:value-type="float" office:value="43877" calcext:value-type="float">
            <text:p>438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320]+6" office:value-type="date" office:date-value="2020-02-22" calcext:value-type="date">
            <text:p>2020/02/22</text:p>
          </table:table-cell>
          <table:table-cell table:style-name="ce422" table:formula="of:=WEEKDAY([.B321])" office:value-type="date" office:date-value="1900-01-06" calcext:value-type="date">
            <text:p>土</text:p>
          </table:table-cell>
          <table:table-cell/>
          <table:table-cell table:formula="of:=[.E320]+6" office:value-type="float" office:value="43883" calcext:value-type="float">
            <text:p>438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321]+1" office:value-type="date" office:date-value="2020-02-23" calcext:value-type="date">
            <text:p>2020/02/23</text:p>
          </table:table-cell>
          <table:table-cell table:style-name="ce422" table:formula="of:=WEEKDAY([.B322])" office:value-type="date" office:date-value="1899-12-31" calcext:value-type="date">
            <text:p>日</text:p>
          </table:table-cell>
          <table:table-cell/>
          <table:table-cell table:formula="of:=[.E321]+1" office:value-type="float" office:value="43884" calcext:value-type="float">
            <text:p>438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322]+6" office:value-type="date" office:date-value="2020-02-29" calcext:value-type="date">
            <text:p>2020/02/29</text:p>
          </table:table-cell>
          <table:table-cell table:style-name="ce422" table:formula="of:=WEEKDAY([.B323])" office:value-type="date" office:date-value="1900-01-06" calcext:value-type="date">
            <text:p>土</text:p>
          </table:table-cell>
          <table:table-cell/>
          <table:table-cell table:formula="of:=[.E322]+6" office:value-type="float" office:value="43890" calcext:value-type="float">
            <text:p>438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323]+1" office:value-type="date" office:date-value="2020-03-01" calcext:value-type="date">
            <text:p>2020/03/01</text:p>
          </table:table-cell>
          <table:table-cell table:style-name="ce422" table:formula="of:=WEEKDAY([.B324])" office:value-type="date" office:date-value="1899-12-31" calcext:value-type="date">
            <text:p>日</text:p>
          </table:table-cell>
          <table:table-cell/>
          <table:table-cell table:formula="of:=[.E323]+1" office:value-type="float" office:value="43891" calcext:value-type="float">
            <text:p>438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324]+6" office:value-type="date" office:date-value="2020-03-07" calcext:value-type="date">
            <text:p>2020/03/07</text:p>
          </table:table-cell>
          <table:table-cell table:style-name="ce422" table:formula="of:=WEEKDAY([.B325])" office:value-type="date" office:date-value="1900-01-06" calcext:value-type="date">
            <text:p>土</text:p>
          </table:table-cell>
          <table:table-cell/>
          <table:table-cell table:formula="of:=[.E324]+6" office:value-type="float" office:value="43897" calcext:value-type="float">
            <text:p>438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325]+1" office:value-type="date" office:date-value="2020-03-08" calcext:value-type="date">
            <text:p>2020/03/08</text:p>
          </table:table-cell>
          <table:table-cell table:style-name="ce422" table:formula="of:=WEEKDAY([.B326])" office:value-type="date" office:date-value="1899-12-31" calcext:value-type="date">
            <text:p>日</text:p>
          </table:table-cell>
          <table:table-cell/>
          <table:table-cell table:formula="of:=[.E325]+1" office:value-type="float" office:value="43898" calcext:value-type="float">
            <text:p>438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326]+6" office:value-type="date" office:date-value="2020-03-14" calcext:value-type="date">
            <text:p>2020/03/14</text:p>
          </table:table-cell>
          <table:table-cell table:style-name="ce422" table:formula="of:=WEEKDAY([.B327])" office:value-type="date" office:date-value="1900-01-06" calcext:value-type="date">
            <text:p>土</text:p>
          </table:table-cell>
          <table:table-cell/>
          <table:table-cell table:formula="of:=[.E326]+6" office:value-type="float" office:value="43904" calcext:value-type="float">
            <text:p>439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327]+1" office:value-type="date" office:date-value="2020-03-15" calcext:value-type="date">
            <text:p>2020/03/15</text:p>
          </table:table-cell>
          <table:table-cell table:style-name="ce422" table:formula="of:=WEEKDAY([.B328])" office:value-type="date" office:date-value="1899-12-31" calcext:value-type="date">
            <text:p>日</text:p>
          </table:table-cell>
          <table:table-cell/>
          <table:table-cell table:formula="of:=[.E327]+1" office:value-type="float" office:value="43905" calcext:value-type="float">
            <text:p>439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328]+6" office:value-type="date" office:date-value="2020-03-21" calcext:value-type="date">
            <text:p>2020/03/21</text:p>
          </table:table-cell>
          <table:table-cell table:style-name="ce422" table:formula="of:=WEEKDAY([.B329])" office:value-type="date" office:date-value="1900-01-06" calcext:value-type="date">
            <text:p>土</text:p>
          </table:table-cell>
          <table:table-cell/>
          <table:table-cell table:formula="of:=[.E328]+6" office:value-type="float" office:value="43911" calcext:value-type="float">
            <text:p>439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329]+1" office:value-type="date" office:date-value="2020-03-22" calcext:value-type="date">
            <text:p>2020/03/22</text:p>
          </table:table-cell>
          <table:table-cell table:style-name="ce422" table:formula="of:=WEEKDAY([.B330])" office:value-type="date" office:date-value="1899-12-31" calcext:value-type="date">
            <text:p>日</text:p>
          </table:table-cell>
          <table:table-cell/>
          <table:table-cell table:formula="of:=[.E329]+1" office:value-type="float" office:value="43912" calcext:value-type="float">
            <text:p>439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330]+6" office:value-type="date" office:date-value="2020-03-28" calcext:value-type="date">
            <text:p>2020/03/28</text:p>
          </table:table-cell>
          <table:table-cell table:style-name="ce422" table:formula="of:=WEEKDAY([.B331])" office:value-type="date" office:date-value="1900-01-06" calcext:value-type="date">
            <text:p>土</text:p>
          </table:table-cell>
          <table:table-cell/>
          <table:table-cell table:formula="of:=[.E330]+6" office:value-type="float" office:value="43918" calcext:value-type="float">
            <text:p>439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331]+1" office:value-type="date" office:date-value="2020-03-29" calcext:value-type="date">
            <text:p>2020/03/29</text:p>
          </table:table-cell>
          <table:table-cell table:style-name="ce422" table:formula="of:=WEEKDAY([.B332])" office:value-type="date" office:date-value="1899-12-31" calcext:value-type="date">
            <text:p>日</text:p>
          </table:table-cell>
          <table:table-cell/>
          <table:table-cell table:formula="of:=[.E331]+1" office:value-type="float" office:value="43919" calcext:value-type="float">
            <text:p>439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332]+6" office:value-type="date" office:date-value="2020-04-04" calcext:value-type="date">
            <text:p>2020/04/04</text:p>
          </table:table-cell>
          <table:table-cell table:style-name="ce422" table:formula="of:=WEEKDAY([.B333])" office:value-type="date" office:date-value="1900-01-06" calcext:value-type="date">
            <text:p>土</text:p>
          </table:table-cell>
          <table:table-cell/>
          <table:table-cell table:formula="of:=[.E332]+6" office:value-type="float" office:value="43925" calcext:value-type="float">
            <text:p>439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333]+1" office:value-type="date" office:date-value="2020-04-05" calcext:value-type="date">
            <text:p>2020/04/05</text:p>
          </table:table-cell>
          <table:table-cell table:style-name="ce422" table:formula="of:=WEEKDAY([.B334])" office:value-type="date" office:date-value="1899-12-31" calcext:value-type="date">
            <text:p>日</text:p>
          </table:table-cell>
          <table:table-cell/>
          <table:table-cell table:formula="of:=[.E333]+1" office:value-type="float" office:value="43926" calcext:value-type="float">
            <text:p>439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334]+6" office:value-type="date" office:date-value="2020-04-11" calcext:value-type="date">
            <text:p>2020/04/11</text:p>
          </table:table-cell>
          <table:table-cell table:style-name="ce422" table:formula="of:=WEEKDAY([.B335])" office:value-type="date" office:date-value="1900-01-06" calcext:value-type="date">
            <text:p>土</text:p>
          </table:table-cell>
          <table:table-cell/>
          <table:table-cell table:formula="of:=[.E334]+6" office:value-type="float" office:value="43932" calcext:value-type="float">
            <text:p>439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335]+1" office:value-type="date" office:date-value="2020-04-12" calcext:value-type="date">
            <text:p>2020/04/12</text:p>
          </table:table-cell>
          <table:table-cell table:style-name="ce422" table:formula="of:=WEEKDAY([.B336])" office:value-type="date" office:date-value="1899-12-31" calcext:value-type="date">
            <text:p>日</text:p>
          </table:table-cell>
          <table:table-cell/>
          <table:table-cell table:formula="of:=[.E335]+1" office:value-type="float" office:value="43933" calcext:value-type="float">
            <text:p>439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336]+6" office:value-type="date" office:date-value="2020-04-18" calcext:value-type="date">
            <text:p>2020/04/18</text:p>
          </table:table-cell>
          <table:table-cell table:style-name="ce422" table:formula="of:=WEEKDAY([.B337])" office:value-type="date" office:date-value="1900-01-06" calcext:value-type="date">
            <text:p>土</text:p>
          </table:table-cell>
          <table:table-cell/>
          <table:table-cell table:formula="of:=[.E336]+6" office:value-type="float" office:value="43939" calcext:value-type="float">
            <text:p>439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337]+1" office:value-type="date" office:date-value="2020-04-19" calcext:value-type="date">
            <text:p>2020/04/19</text:p>
          </table:table-cell>
          <table:table-cell table:style-name="ce422" table:formula="of:=WEEKDAY([.B338])" office:value-type="date" office:date-value="1899-12-31" calcext:value-type="date">
            <text:p>日</text:p>
          </table:table-cell>
          <table:table-cell/>
          <table:table-cell table:formula="of:=[.E337]+1" office:value-type="float" office:value="43940" calcext:value-type="float">
            <text:p>439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338]+6" office:value-type="date" office:date-value="2020-04-25" calcext:value-type="date">
            <text:p>2020/04/25</text:p>
          </table:table-cell>
          <table:table-cell table:style-name="ce422" table:formula="of:=WEEKDAY([.B339])" office:value-type="date" office:date-value="1900-01-06" calcext:value-type="date">
            <text:p>土</text:p>
          </table:table-cell>
          <table:table-cell/>
          <table:table-cell table:formula="of:=[.E338]+6" office:value-type="float" office:value="43946" calcext:value-type="float">
            <text:p>439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339]+1" office:value-type="date" office:date-value="2020-04-26" calcext:value-type="date">
            <text:p>2020/04/26</text:p>
          </table:table-cell>
          <table:table-cell table:style-name="ce422" table:formula="of:=WEEKDAY([.B340])" office:value-type="date" office:date-value="1899-12-31" calcext:value-type="date">
            <text:p>日</text:p>
          </table:table-cell>
          <table:table-cell/>
          <table:table-cell table:formula="of:=[.E339]+1" office:value-type="float" office:value="43947" calcext:value-type="float">
            <text:p>439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340]+6" office:value-type="date" office:date-value="2020-05-02" calcext:value-type="date">
            <text:p>2020/05/02</text:p>
          </table:table-cell>
          <table:table-cell table:style-name="ce422" table:formula="of:=WEEKDAY([.B341])" office:value-type="date" office:date-value="1900-01-06" calcext:value-type="date">
            <text:p>土</text:p>
          </table:table-cell>
          <table:table-cell/>
          <table:table-cell table:formula="of:=[.E340]+6" office:value-type="float" office:value="43953" calcext:value-type="float">
            <text:p>439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341]+1" office:value-type="date" office:date-value="2020-05-03" calcext:value-type="date">
            <text:p>2020/05/03</text:p>
          </table:table-cell>
          <table:table-cell table:style-name="ce422" table:formula="of:=WEEKDAY([.B342])" office:value-type="date" office:date-value="1899-12-31" calcext:value-type="date">
            <text:p>日</text:p>
          </table:table-cell>
          <table:table-cell/>
          <table:table-cell table:formula="of:=[.E341]+1" office:value-type="float" office:value="43954" calcext:value-type="float">
            <text:p>439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342]+6" office:value-type="date" office:date-value="2020-05-09" calcext:value-type="date">
            <text:p>2020/05/09</text:p>
          </table:table-cell>
          <table:table-cell table:style-name="ce422" table:formula="of:=WEEKDAY([.B343])" office:value-type="date" office:date-value="1900-01-06" calcext:value-type="date">
            <text:p>土</text:p>
          </table:table-cell>
          <table:table-cell/>
          <table:table-cell table:formula="of:=[.E342]+6" office:value-type="float" office:value="43960" calcext:value-type="float">
            <text:p>439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343]+1" office:value-type="date" office:date-value="2020-05-10" calcext:value-type="date">
            <text:p>2020/05/10</text:p>
          </table:table-cell>
          <table:table-cell table:style-name="ce422" table:formula="of:=WEEKDAY([.B344])" office:value-type="date" office:date-value="1899-12-31" calcext:value-type="date">
            <text:p>日</text:p>
          </table:table-cell>
          <table:table-cell/>
          <table:table-cell table:formula="of:=[.E343]+1" office:value-type="float" office:value="43961" calcext:value-type="float">
            <text:p>439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344]+6" office:value-type="date" office:date-value="2020-05-16" calcext:value-type="date">
            <text:p>2020/05/16</text:p>
          </table:table-cell>
          <table:table-cell table:style-name="ce422" table:formula="of:=WEEKDAY([.B345])" office:value-type="date" office:date-value="1900-01-06" calcext:value-type="date">
            <text:p>土</text:p>
          </table:table-cell>
          <table:table-cell/>
          <table:table-cell table:formula="of:=[.E344]+6" office:value-type="float" office:value="43967" calcext:value-type="float">
            <text:p>439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345]+1" office:value-type="date" office:date-value="2020-05-17" calcext:value-type="date">
            <text:p>2020/05/17</text:p>
          </table:table-cell>
          <table:table-cell table:style-name="ce422" table:formula="of:=WEEKDAY([.B346])" office:value-type="date" office:date-value="1899-12-31" calcext:value-type="date">
            <text:p>日</text:p>
          </table:table-cell>
          <table:table-cell/>
          <table:table-cell table:formula="of:=[.E345]+1" office:value-type="float" office:value="43968" calcext:value-type="float">
            <text:p>439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346]+6" office:value-type="date" office:date-value="2020-05-23" calcext:value-type="date">
            <text:p>2020/05/23</text:p>
          </table:table-cell>
          <table:table-cell table:style-name="ce422" table:formula="of:=WEEKDAY([.B347])" office:value-type="date" office:date-value="1900-01-06" calcext:value-type="date">
            <text:p>土</text:p>
          </table:table-cell>
          <table:table-cell/>
          <table:table-cell table:formula="of:=[.E346]+6" office:value-type="float" office:value="43974" calcext:value-type="float">
            <text:p>439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347]+1" office:value-type="date" office:date-value="2020-05-24" calcext:value-type="date">
            <text:p>2020/05/24</text:p>
          </table:table-cell>
          <table:table-cell table:style-name="ce422" table:formula="of:=WEEKDAY([.B348])" office:value-type="date" office:date-value="1899-12-31" calcext:value-type="date">
            <text:p>日</text:p>
          </table:table-cell>
          <table:table-cell/>
          <table:table-cell table:formula="of:=[.E347]+1" office:value-type="float" office:value="43975" calcext:value-type="float">
            <text:p>439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348]+6" office:value-type="date" office:date-value="2020-05-30" calcext:value-type="date">
            <text:p>2020/05/30</text:p>
          </table:table-cell>
          <table:table-cell table:style-name="ce422" table:formula="of:=WEEKDAY([.B349])" office:value-type="date" office:date-value="1900-01-06" calcext:value-type="date">
            <text:p>土</text:p>
          </table:table-cell>
          <table:table-cell/>
          <table:table-cell table:formula="of:=[.E348]+6" office:value-type="float" office:value="43981" calcext:value-type="float">
            <text:p>439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349]+1" office:value-type="date" office:date-value="2020-05-31" calcext:value-type="date">
            <text:p>2020/05/31</text:p>
          </table:table-cell>
          <table:table-cell table:style-name="ce422" table:formula="of:=WEEKDAY([.B350])" office:value-type="date" office:date-value="1899-12-31" calcext:value-type="date">
            <text:p>日</text:p>
          </table:table-cell>
          <table:table-cell/>
          <table:table-cell table:formula="of:=[.E349]+1" office:value-type="float" office:value="43982" calcext:value-type="float">
            <text:p>439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350]+6" office:value-type="date" office:date-value="2020-06-06" calcext:value-type="date">
            <text:p>2020/06/06</text:p>
          </table:table-cell>
          <table:table-cell table:style-name="ce422" table:formula="of:=WEEKDAY([.B351])" office:value-type="date" office:date-value="1900-01-06" calcext:value-type="date">
            <text:p>土</text:p>
          </table:table-cell>
          <table:table-cell/>
          <table:table-cell table:formula="of:=[.E350]+6" office:value-type="float" office:value="43988" calcext:value-type="float">
            <text:p>439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351]+1" office:value-type="date" office:date-value="2020-06-07" calcext:value-type="date">
            <text:p>2020/06/07</text:p>
          </table:table-cell>
          <table:table-cell table:style-name="ce422" table:formula="of:=WEEKDAY([.B352])" office:value-type="date" office:date-value="1899-12-31" calcext:value-type="date">
            <text:p>日</text:p>
          </table:table-cell>
          <table:table-cell/>
          <table:table-cell table:formula="of:=[.E351]+1" office:value-type="float" office:value="43989" calcext:value-type="float">
            <text:p>439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352]+6" office:value-type="date" office:date-value="2020-06-13" calcext:value-type="date">
            <text:p>2020/06/13</text:p>
          </table:table-cell>
          <table:table-cell table:style-name="ce422" table:formula="of:=WEEKDAY([.B353])" office:value-type="date" office:date-value="1900-01-06" calcext:value-type="date">
            <text:p>土</text:p>
          </table:table-cell>
          <table:table-cell/>
          <table:table-cell table:formula="of:=[.E352]+6" office:value-type="float" office:value="43995" calcext:value-type="float">
            <text:p>439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353]+1" office:value-type="date" office:date-value="2020-06-14" calcext:value-type="date">
            <text:p>2020/06/14</text:p>
          </table:table-cell>
          <table:table-cell table:style-name="ce422" table:formula="of:=WEEKDAY([.B354])" office:value-type="date" office:date-value="1899-12-31" calcext:value-type="date">
            <text:p>日</text:p>
          </table:table-cell>
          <table:table-cell/>
          <table:table-cell table:formula="of:=[.E353]+1" office:value-type="float" office:value="43996" calcext:value-type="float">
            <text:p>439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354]+6" office:value-type="date" office:date-value="2020-06-20" calcext:value-type="date">
            <text:p>2020/06/20</text:p>
          </table:table-cell>
          <table:table-cell table:style-name="ce422" table:formula="of:=WEEKDAY([.B355])" office:value-type="date" office:date-value="1900-01-06" calcext:value-type="date">
            <text:p>土</text:p>
          </table:table-cell>
          <table:table-cell/>
          <table:table-cell table:formula="of:=[.E354]+6" office:value-type="float" office:value="44002" calcext:value-type="float">
            <text:p>440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355]+1" office:value-type="date" office:date-value="2020-06-21" calcext:value-type="date">
            <text:p>2020/06/21</text:p>
          </table:table-cell>
          <table:table-cell table:style-name="ce422" table:formula="of:=WEEKDAY([.B356])" office:value-type="date" office:date-value="1899-12-31" calcext:value-type="date">
            <text:p>日</text:p>
          </table:table-cell>
          <table:table-cell/>
          <table:table-cell table:formula="of:=[.E355]+1" office:value-type="float" office:value="44003" calcext:value-type="float">
            <text:p>440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356]+6" office:value-type="date" office:date-value="2020-06-27" calcext:value-type="date">
            <text:p>2020/06/27</text:p>
          </table:table-cell>
          <table:table-cell table:style-name="ce422" table:formula="of:=WEEKDAY([.B357])" office:value-type="date" office:date-value="1900-01-06" calcext:value-type="date">
            <text:p>土</text:p>
          </table:table-cell>
          <table:table-cell/>
          <table:table-cell table:formula="of:=[.E356]+6" office:value-type="float" office:value="44009" calcext:value-type="float">
            <text:p>440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357]+1" office:value-type="date" office:date-value="2020-06-28" calcext:value-type="date">
            <text:p>2020/06/28</text:p>
          </table:table-cell>
          <table:table-cell table:style-name="ce422" table:formula="of:=WEEKDAY([.B358])" office:value-type="date" office:date-value="1899-12-31" calcext:value-type="date">
            <text:p>日</text:p>
          </table:table-cell>
          <table:table-cell/>
          <table:table-cell table:formula="of:=[.E357]+1" office:value-type="float" office:value="44010" calcext:value-type="float">
            <text:p>440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358]+6" office:value-type="date" office:date-value="2020-07-04" calcext:value-type="date">
            <text:p>2020/07/04</text:p>
          </table:table-cell>
          <table:table-cell table:style-name="ce422" table:formula="of:=WEEKDAY([.B359])" office:value-type="date" office:date-value="1900-01-06" calcext:value-type="date">
            <text:p>土</text:p>
          </table:table-cell>
          <table:table-cell/>
          <table:table-cell table:formula="of:=[.E358]+6" office:value-type="float" office:value="44016" calcext:value-type="float">
            <text:p>440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359]+1" office:value-type="date" office:date-value="2020-07-05" calcext:value-type="date">
            <text:p>2020/07/05</text:p>
          </table:table-cell>
          <table:table-cell table:style-name="ce422" table:formula="of:=WEEKDAY([.B360])" office:value-type="date" office:date-value="1899-12-31" calcext:value-type="date">
            <text:p>日</text:p>
          </table:table-cell>
          <table:table-cell/>
          <table:table-cell table:formula="of:=[.E359]+1" office:value-type="float" office:value="44017" calcext:value-type="float">
            <text:p>440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360]+6" office:value-type="date" office:date-value="2020-07-11" calcext:value-type="date">
            <text:p>2020/07/11</text:p>
          </table:table-cell>
          <table:table-cell table:style-name="ce422" table:formula="of:=WEEKDAY([.B361])" office:value-type="date" office:date-value="1900-01-06" calcext:value-type="date">
            <text:p>土</text:p>
          </table:table-cell>
          <table:table-cell/>
          <table:table-cell table:formula="of:=[.E360]+6" office:value-type="float" office:value="44023" calcext:value-type="float">
            <text:p>440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361]+1" office:value-type="date" office:date-value="2020-07-12" calcext:value-type="date">
            <text:p>2020/07/12</text:p>
          </table:table-cell>
          <table:table-cell table:style-name="ce422" table:formula="of:=WEEKDAY([.B362])" office:value-type="date" office:date-value="1899-12-31" calcext:value-type="date">
            <text:p>日</text:p>
          </table:table-cell>
          <table:table-cell/>
          <table:table-cell table:formula="of:=[.E361]+1" office:value-type="float" office:value="44024" calcext:value-type="float">
            <text:p>440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362]+6" office:value-type="date" office:date-value="2020-07-18" calcext:value-type="date">
            <text:p>2020/07/18</text:p>
          </table:table-cell>
          <table:table-cell table:style-name="ce422" table:formula="of:=WEEKDAY([.B363])" office:value-type="date" office:date-value="1900-01-06" calcext:value-type="date">
            <text:p>土</text:p>
          </table:table-cell>
          <table:table-cell/>
          <table:table-cell table:formula="of:=[.E362]+6" office:value-type="float" office:value="44030" calcext:value-type="float">
            <text:p>4403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363]+1" office:value-type="date" office:date-value="2020-07-19" calcext:value-type="date">
            <text:p>2020/07/19</text:p>
          </table:table-cell>
          <table:table-cell table:style-name="ce422" table:formula="of:=WEEKDAY([.B364])" office:value-type="date" office:date-value="1899-12-31" calcext:value-type="date">
            <text:p>日</text:p>
          </table:table-cell>
          <table:table-cell/>
          <table:table-cell table:formula="of:=[.E363]+1" office:value-type="float" office:value="44031" calcext:value-type="float">
            <text:p>440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364]+6" office:value-type="date" office:date-value="2020-07-25" calcext:value-type="date">
            <text:p>2020/07/25</text:p>
          </table:table-cell>
          <table:table-cell table:style-name="ce422" table:formula="of:=WEEKDAY([.B365])" office:value-type="date" office:date-value="1900-01-06" calcext:value-type="date">
            <text:p>土</text:p>
          </table:table-cell>
          <table:table-cell/>
          <table:table-cell table:formula="of:=[.E364]+6" office:value-type="float" office:value="44037" calcext:value-type="float">
            <text:p>440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365]+1" office:value-type="date" office:date-value="2020-07-26" calcext:value-type="date">
            <text:p>2020/07/26</text:p>
          </table:table-cell>
          <table:table-cell table:style-name="ce422" table:formula="of:=WEEKDAY([.B366])" office:value-type="date" office:date-value="1899-12-31" calcext:value-type="date">
            <text:p>日</text:p>
          </table:table-cell>
          <table:table-cell/>
          <table:table-cell table:formula="of:=[.E365]+1" office:value-type="float" office:value="44038" calcext:value-type="float">
            <text:p>440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366]+6" office:value-type="date" office:date-value="2020-08-01" calcext:value-type="date">
            <text:p>2020/08/01</text:p>
          </table:table-cell>
          <table:table-cell table:style-name="ce422" table:formula="of:=WEEKDAY([.B367])" office:value-type="date" office:date-value="1900-01-06" calcext:value-type="date">
            <text:p>土</text:p>
          </table:table-cell>
          <table:table-cell/>
          <table:table-cell table:formula="of:=[.E366]+6" office:value-type="float" office:value="44044" calcext:value-type="float">
            <text:p>440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367]+1" office:value-type="date" office:date-value="2020-08-02" calcext:value-type="date">
            <text:p>2020/08/02</text:p>
          </table:table-cell>
          <table:table-cell table:style-name="ce422" table:formula="of:=WEEKDAY([.B368])" office:value-type="date" office:date-value="1899-12-31" calcext:value-type="date">
            <text:p>日</text:p>
          </table:table-cell>
          <table:table-cell/>
          <table:table-cell table:formula="of:=[.E367]+1" office:value-type="float" office:value="44045" calcext:value-type="float">
            <text:p>440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368]+6" office:value-type="date" office:date-value="2020-08-08" calcext:value-type="date">
            <text:p>2020/08/08</text:p>
          </table:table-cell>
          <table:table-cell table:style-name="ce422" table:formula="of:=WEEKDAY([.B369])" office:value-type="date" office:date-value="1900-01-06" calcext:value-type="date">
            <text:p>土</text:p>
          </table:table-cell>
          <table:table-cell/>
          <table:table-cell table:formula="of:=[.E368]+6" office:value-type="float" office:value="44051" calcext:value-type="float">
            <text:p>440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369]+1" office:value-type="date" office:date-value="2020-08-09" calcext:value-type="date">
            <text:p>2020/08/09</text:p>
          </table:table-cell>
          <table:table-cell table:style-name="ce422" table:formula="of:=WEEKDAY([.B370])" office:value-type="date" office:date-value="1899-12-31" calcext:value-type="date">
            <text:p>日</text:p>
          </table:table-cell>
          <table:table-cell/>
          <table:table-cell table:formula="of:=[.E369]+1" office:value-type="float" office:value="44052" calcext:value-type="float">
            <text:p>440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370]+6" office:value-type="date" office:date-value="2020-08-15" calcext:value-type="date">
            <text:p>2020/08/15</text:p>
          </table:table-cell>
          <table:table-cell table:style-name="ce422" table:formula="of:=WEEKDAY([.B371])" office:value-type="date" office:date-value="1900-01-06" calcext:value-type="date">
            <text:p>土</text:p>
          </table:table-cell>
          <table:table-cell/>
          <table:table-cell table:formula="of:=[.E370]+6" office:value-type="float" office:value="44058" calcext:value-type="float">
            <text:p>440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371]+1" office:value-type="date" office:date-value="2020-08-16" calcext:value-type="date">
            <text:p>2020/08/16</text:p>
          </table:table-cell>
          <table:table-cell table:style-name="ce422" table:formula="of:=WEEKDAY([.B372])" office:value-type="date" office:date-value="1899-12-31" calcext:value-type="date">
            <text:p>日</text:p>
          </table:table-cell>
          <table:table-cell/>
          <table:table-cell table:formula="of:=[.E371]+1" office:value-type="float" office:value="44059" calcext:value-type="float">
            <text:p>440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372]+6" office:value-type="date" office:date-value="2020-08-22" calcext:value-type="date">
            <text:p>2020/08/22</text:p>
          </table:table-cell>
          <table:table-cell table:style-name="ce422" table:formula="of:=WEEKDAY([.B373])" office:value-type="date" office:date-value="1900-01-06" calcext:value-type="date">
            <text:p>土</text:p>
          </table:table-cell>
          <table:table-cell/>
          <table:table-cell table:formula="of:=[.E372]+6" office:value-type="float" office:value="44065" calcext:value-type="float">
            <text:p>4406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373]+1" office:value-type="date" office:date-value="2020-08-23" calcext:value-type="date">
            <text:p>2020/08/23</text:p>
          </table:table-cell>
          <table:table-cell table:style-name="ce422" table:formula="of:=WEEKDAY([.B374])" office:value-type="date" office:date-value="1899-12-31" calcext:value-type="date">
            <text:p>日</text:p>
          </table:table-cell>
          <table:table-cell/>
          <table:table-cell table:formula="of:=[.E373]+1" office:value-type="float" office:value="44066" calcext:value-type="float">
            <text:p>4406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374]+6" office:value-type="date" office:date-value="2020-08-29" calcext:value-type="date">
            <text:p>2020/08/29</text:p>
          </table:table-cell>
          <table:table-cell table:style-name="ce422" table:formula="of:=WEEKDAY([.B375])" office:value-type="date" office:date-value="1900-01-06" calcext:value-type="date">
            <text:p>土</text:p>
          </table:table-cell>
          <table:table-cell/>
          <table:table-cell table:formula="of:=[.E374]+6" office:value-type="float" office:value="44072" calcext:value-type="float">
            <text:p>440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375]+1" office:value-type="date" office:date-value="2020-08-30" calcext:value-type="date">
            <text:p>2020/08/30</text:p>
          </table:table-cell>
          <table:table-cell table:style-name="ce422" table:formula="of:=WEEKDAY([.B376])" office:value-type="date" office:date-value="1899-12-31" calcext:value-type="date">
            <text:p>日</text:p>
          </table:table-cell>
          <table:table-cell/>
          <table:table-cell table:formula="of:=[.E375]+1" office:value-type="float" office:value="44073" calcext:value-type="float">
            <text:p>440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376]+6" office:value-type="date" office:date-value="2020-09-05" calcext:value-type="date">
            <text:p>2020/09/05</text:p>
          </table:table-cell>
          <table:table-cell table:style-name="ce422" table:formula="of:=WEEKDAY([.B377])" office:value-type="date" office:date-value="1900-01-06" calcext:value-type="date">
            <text:p>土</text:p>
          </table:table-cell>
          <table:table-cell/>
          <table:table-cell table:formula="of:=[.E376]+6" office:value-type="float" office:value="44079" calcext:value-type="float">
            <text:p>440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377]+1" office:value-type="date" office:date-value="2020-09-06" calcext:value-type="date">
            <text:p>2020/09/06</text:p>
          </table:table-cell>
          <table:table-cell table:style-name="ce422" table:formula="of:=WEEKDAY([.B378])" office:value-type="date" office:date-value="1899-12-31" calcext:value-type="date">
            <text:p>日</text:p>
          </table:table-cell>
          <table:table-cell/>
          <table:table-cell table:formula="of:=[.E377]+1" office:value-type="float" office:value="44080" calcext:value-type="float">
            <text:p>440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378]+6" office:value-type="date" office:date-value="2020-09-12" calcext:value-type="date">
            <text:p>2020/09/12</text:p>
          </table:table-cell>
          <table:table-cell table:style-name="ce422" table:formula="of:=WEEKDAY([.B379])" office:value-type="date" office:date-value="1900-01-06" calcext:value-type="date">
            <text:p>土</text:p>
          </table:table-cell>
          <table:table-cell/>
          <table:table-cell table:formula="of:=[.E378]+6" office:value-type="float" office:value="44086" calcext:value-type="float">
            <text:p>440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379]+1" office:value-type="date" office:date-value="2020-09-13" calcext:value-type="date">
            <text:p>2020/09/13</text:p>
          </table:table-cell>
          <table:table-cell table:style-name="ce422" table:formula="of:=WEEKDAY([.B380])" office:value-type="date" office:date-value="1899-12-31" calcext:value-type="date">
            <text:p>日</text:p>
          </table:table-cell>
          <table:table-cell/>
          <table:table-cell table:formula="of:=[.E379]+1" office:value-type="float" office:value="44087" calcext:value-type="float">
            <text:p>440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380]+6" office:value-type="date" office:date-value="2020-09-19" calcext:value-type="date">
            <text:p>2020/09/19</text:p>
          </table:table-cell>
          <table:table-cell table:style-name="ce422" table:formula="of:=WEEKDAY([.B381])" office:value-type="date" office:date-value="1900-01-06" calcext:value-type="date">
            <text:p>土</text:p>
          </table:table-cell>
          <table:table-cell/>
          <table:table-cell table:formula="of:=[.E380]+6" office:value-type="float" office:value="44093" calcext:value-type="float">
            <text:p>440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381]+1" office:value-type="date" office:date-value="2020-09-20" calcext:value-type="date">
            <text:p>2020/09/20</text:p>
          </table:table-cell>
          <table:table-cell table:style-name="ce422" table:formula="of:=WEEKDAY([.B382])" office:value-type="date" office:date-value="1899-12-31" calcext:value-type="date">
            <text:p>日</text:p>
          </table:table-cell>
          <table:table-cell/>
          <table:table-cell table:formula="of:=[.E381]+1" office:value-type="float" office:value="44094" calcext:value-type="float">
            <text:p>440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382]+6" office:value-type="date" office:date-value="2020-09-26" calcext:value-type="date">
            <text:p>2020/09/26</text:p>
          </table:table-cell>
          <table:table-cell table:style-name="ce422" table:formula="of:=WEEKDAY([.B383])" office:value-type="date" office:date-value="1900-01-06" calcext:value-type="date">
            <text:p>土</text:p>
          </table:table-cell>
          <table:table-cell/>
          <table:table-cell table:formula="of:=[.E382]+6" office:value-type="float" office:value="44100" calcext:value-type="float">
            <text:p>441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383]+1" office:value-type="date" office:date-value="2020-09-27" calcext:value-type="date">
            <text:p>2020/09/27</text:p>
          </table:table-cell>
          <table:table-cell table:style-name="ce422" table:formula="of:=WEEKDAY([.B384])" office:value-type="date" office:date-value="1899-12-31" calcext:value-type="date">
            <text:p>日</text:p>
          </table:table-cell>
          <table:table-cell/>
          <table:table-cell table:formula="of:=[.E383]+1" office:value-type="float" office:value="44101" calcext:value-type="float">
            <text:p>441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384]+6" office:value-type="date" office:date-value="2020-10-03" calcext:value-type="date">
            <text:p>2020/10/03</text:p>
          </table:table-cell>
          <table:table-cell table:style-name="ce422" table:formula="of:=WEEKDAY([.B385])" office:value-type="date" office:date-value="1900-01-06" calcext:value-type="date">
            <text:p>土</text:p>
          </table:table-cell>
          <table:table-cell/>
          <table:table-cell table:formula="of:=[.E384]+6" office:value-type="float" office:value="44107" calcext:value-type="float">
            <text:p>441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385]+1" office:value-type="date" office:date-value="2020-10-04" calcext:value-type="date">
            <text:p>2020/10/04</text:p>
          </table:table-cell>
          <table:table-cell table:style-name="ce422" table:formula="of:=WEEKDAY([.B386])" office:value-type="date" office:date-value="1899-12-31" calcext:value-type="date">
            <text:p>日</text:p>
          </table:table-cell>
          <table:table-cell/>
          <table:table-cell table:formula="of:=[.E385]+1" office:value-type="float" office:value="44108" calcext:value-type="float">
            <text:p>441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386]+6" office:value-type="date" office:date-value="2020-10-10" calcext:value-type="date">
            <text:p>2020/10/10</text:p>
          </table:table-cell>
          <table:table-cell table:style-name="ce422" table:formula="of:=WEEKDAY([.B387])" office:value-type="date" office:date-value="1900-01-06" calcext:value-type="date">
            <text:p>土</text:p>
          </table:table-cell>
          <table:table-cell/>
          <table:table-cell table:formula="of:=[.E386]+6" office:value-type="float" office:value="44114" calcext:value-type="float">
            <text:p>441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387]+1" office:value-type="date" office:date-value="2020-10-11" calcext:value-type="date">
            <text:p>2020/10/11</text:p>
          </table:table-cell>
          <table:table-cell table:style-name="ce422" table:formula="of:=WEEKDAY([.B388])" office:value-type="date" office:date-value="1899-12-31" calcext:value-type="date">
            <text:p>日</text:p>
          </table:table-cell>
          <table:table-cell/>
          <table:table-cell table:formula="of:=[.E387]+1" office:value-type="float" office:value="44115" calcext:value-type="float">
            <text:p>441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388]+6" office:value-type="date" office:date-value="2020-10-17" calcext:value-type="date">
            <text:p>2020/10/17</text:p>
          </table:table-cell>
          <table:table-cell table:style-name="ce422" table:formula="of:=WEEKDAY([.B389])" office:value-type="date" office:date-value="1900-01-06" calcext:value-type="date">
            <text:p>土</text:p>
          </table:table-cell>
          <table:table-cell/>
          <table:table-cell table:formula="of:=[.E388]+6" office:value-type="float" office:value="44121" calcext:value-type="float">
            <text:p>441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389]+1" office:value-type="date" office:date-value="2020-10-18" calcext:value-type="date">
            <text:p>2020/10/18</text:p>
          </table:table-cell>
          <table:table-cell table:style-name="ce422" table:formula="of:=WEEKDAY([.B390])" office:value-type="date" office:date-value="1899-12-31" calcext:value-type="date">
            <text:p>日</text:p>
          </table:table-cell>
          <table:table-cell/>
          <table:table-cell table:formula="of:=[.E389]+1" office:value-type="float" office:value="44122" calcext:value-type="float">
            <text:p>4412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390]+6" office:value-type="date" office:date-value="2020-10-24" calcext:value-type="date">
            <text:p>2020/10/24</text:p>
          </table:table-cell>
          <table:table-cell table:style-name="ce422" table:formula="of:=WEEKDAY([.B391])" office:value-type="date" office:date-value="1900-01-06" calcext:value-type="date">
            <text:p>土</text:p>
          </table:table-cell>
          <table:table-cell/>
          <table:table-cell table:formula="of:=[.E390]+6" office:value-type="float" office:value="44128" calcext:value-type="float">
            <text:p>441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391]+1" office:value-type="date" office:date-value="2020-10-25" calcext:value-type="date">
            <text:p>2020/10/25</text:p>
          </table:table-cell>
          <table:table-cell table:style-name="ce422" table:formula="of:=WEEKDAY([.B392])" office:value-type="date" office:date-value="1899-12-31" calcext:value-type="date">
            <text:p>日</text:p>
          </table:table-cell>
          <table:table-cell/>
          <table:table-cell table:formula="of:=[.E391]+1" office:value-type="float" office:value="44129" calcext:value-type="float">
            <text:p>441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392]+6" office:value-type="date" office:date-value="2020-10-31" calcext:value-type="date">
            <text:p>2020/10/31</text:p>
          </table:table-cell>
          <table:table-cell table:style-name="ce422" table:formula="of:=WEEKDAY([.B393])" office:value-type="date" office:date-value="1900-01-06" calcext:value-type="date">
            <text:p>土</text:p>
          </table:table-cell>
          <table:table-cell/>
          <table:table-cell table:formula="of:=[.E392]+6" office:value-type="float" office:value="44135" calcext:value-type="float">
            <text:p>441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393]+1" office:value-type="date" office:date-value="2020-11-01" calcext:value-type="date">
            <text:p>2020/11/01</text:p>
          </table:table-cell>
          <table:table-cell table:style-name="ce422" table:formula="of:=WEEKDAY([.B394])" office:value-type="date" office:date-value="1899-12-31" calcext:value-type="date">
            <text:p>日</text:p>
          </table:table-cell>
          <table:table-cell/>
          <table:table-cell table:formula="of:=[.E393]+1" office:value-type="float" office:value="44136" calcext:value-type="float">
            <text:p>441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394]+6" office:value-type="date" office:date-value="2020-11-07" calcext:value-type="date">
            <text:p>2020/11/07</text:p>
          </table:table-cell>
          <table:table-cell table:style-name="ce422" table:formula="of:=WEEKDAY([.B395])" office:value-type="date" office:date-value="1900-01-06" calcext:value-type="date">
            <text:p>土</text:p>
          </table:table-cell>
          <table:table-cell/>
          <table:table-cell table:formula="of:=[.E394]+6" office:value-type="float" office:value="44142" calcext:value-type="float">
            <text:p>441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395]+1" office:value-type="date" office:date-value="2020-11-08" calcext:value-type="date">
            <text:p>2020/11/08</text:p>
          </table:table-cell>
          <table:table-cell table:style-name="ce422" table:formula="of:=WEEKDAY([.B396])" office:value-type="date" office:date-value="1899-12-31" calcext:value-type="date">
            <text:p>日</text:p>
          </table:table-cell>
          <table:table-cell/>
          <table:table-cell table:formula="of:=[.E395]+1" office:value-type="float" office:value="44143" calcext:value-type="float">
            <text:p>441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396]+6" office:value-type="date" office:date-value="2020-11-14" calcext:value-type="date">
            <text:p>2020/11/14</text:p>
          </table:table-cell>
          <table:table-cell table:style-name="ce422" table:formula="of:=WEEKDAY([.B397])" office:value-type="date" office:date-value="1900-01-06" calcext:value-type="date">
            <text:p>土</text:p>
          </table:table-cell>
          <table:table-cell/>
          <table:table-cell table:formula="of:=[.E396]+6" office:value-type="float" office:value="44149" calcext:value-type="float">
            <text:p>441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397]+1" office:value-type="date" office:date-value="2020-11-15" calcext:value-type="date">
            <text:p>2020/11/15</text:p>
          </table:table-cell>
          <table:table-cell table:style-name="ce422" table:formula="of:=WEEKDAY([.B398])" office:value-type="date" office:date-value="1899-12-31" calcext:value-type="date">
            <text:p>日</text:p>
          </table:table-cell>
          <table:table-cell/>
          <table:table-cell table:formula="of:=[.E397]+1" office:value-type="float" office:value="44150" calcext:value-type="float">
            <text:p>441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398]+6" office:value-type="date" office:date-value="2020-11-21" calcext:value-type="date">
            <text:p>2020/11/21</text:p>
          </table:table-cell>
          <table:table-cell table:style-name="ce422" table:formula="of:=WEEKDAY([.B399])" office:value-type="date" office:date-value="1900-01-06" calcext:value-type="date">
            <text:p>土</text:p>
          </table:table-cell>
          <table:table-cell/>
          <table:table-cell table:formula="of:=[.E398]+6" office:value-type="float" office:value="44156" calcext:value-type="float">
            <text:p>441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399]+1" office:value-type="date" office:date-value="2020-11-22" calcext:value-type="date">
            <text:p>2020/11/22</text:p>
          </table:table-cell>
          <table:table-cell table:style-name="ce422" table:formula="of:=WEEKDAY([.B400])" office:value-type="date" office:date-value="1899-12-31" calcext:value-type="date">
            <text:p>日</text:p>
          </table:table-cell>
          <table:table-cell/>
          <table:table-cell table:formula="of:=[.E399]+1" office:value-type="float" office:value="44157" calcext:value-type="float">
            <text:p>441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400]+6" office:value-type="date" office:date-value="2020-11-28" calcext:value-type="date">
            <text:p>2020/11/28</text:p>
          </table:table-cell>
          <table:table-cell table:style-name="ce422" table:formula="of:=WEEKDAY([.B401])" office:value-type="date" office:date-value="1900-01-06" calcext:value-type="date">
            <text:p>土</text:p>
          </table:table-cell>
          <table:table-cell/>
          <table:table-cell table:formula="of:=[.E400]+6" office:value-type="float" office:value="44163" calcext:value-type="float">
            <text:p>441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401]+1" office:value-type="date" office:date-value="2020-11-29" calcext:value-type="date">
            <text:p>2020/11/29</text:p>
          </table:table-cell>
          <table:table-cell table:style-name="ce422" table:formula="of:=WEEKDAY([.B402])" office:value-type="date" office:date-value="1899-12-31" calcext:value-type="date">
            <text:p>日</text:p>
          </table:table-cell>
          <table:table-cell/>
          <table:table-cell table:formula="of:=[.E401]+1" office:value-type="float" office:value="44164" calcext:value-type="float">
            <text:p>441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402]+6" office:value-type="date" office:date-value="2020-12-05" calcext:value-type="date">
            <text:p>2020/12/05</text:p>
          </table:table-cell>
          <table:table-cell table:style-name="ce422" table:formula="of:=WEEKDAY([.B403])" office:value-type="date" office:date-value="1900-01-06" calcext:value-type="date">
            <text:p>土</text:p>
          </table:table-cell>
          <table:table-cell/>
          <table:table-cell table:formula="of:=[.E402]+6" office:value-type="float" office:value="44170" calcext:value-type="float">
            <text:p>441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403]+1" office:value-type="date" office:date-value="2020-12-06" calcext:value-type="date">
            <text:p>2020/12/06</text:p>
          </table:table-cell>
          <table:table-cell table:style-name="ce422" table:formula="of:=WEEKDAY([.B404])" office:value-type="date" office:date-value="1899-12-31" calcext:value-type="date">
            <text:p>日</text:p>
          </table:table-cell>
          <table:table-cell/>
          <table:table-cell table:formula="of:=[.E403]+1" office:value-type="float" office:value="44171" calcext:value-type="float">
            <text:p>441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404]+6" office:value-type="date" office:date-value="2020-12-12" calcext:value-type="date">
            <text:p>2020/12/12</text:p>
          </table:table-cell>
          <table:table-cell table:style-name="ce422" table:formula="of:=WEEKDAY([.B405])" office:value-type="date" office:date-value="1900-01-06" calcext:value-type="date">
            <text:p>土</text:p>
          </table:table-cell>
          <table:table-cell/>
          <table:table-cell table:formula="of:=[.E404]+6" office:value-type="float" office:value="44177" calcext:value-type="float">
            <text:p>441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405]+1" office:value-type="date" office:date-value="2020-12-13" calcext:value-type="date">
            <text:p>2020/12/13</text:p>
          </table:table-cell>
          <table:table-cell table:style-name="ce422" table:formula="of:=WEEKDAY([.B406])" office:value-type="date" office:date-value="1899-12-31" calcext:value-type="date">
            <text:p>日</text:p>
          </table:table-cell>
          <table:table-cell/>
          <table:table-cell table:formula="of:=[.E405]+1" office:value-type="float" office:value="44178" calcext:value-type="float">
            <text:p>441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406]+6" office:value-type="date" office:date-value="2020-12-19" calcext:value-type="date">
            <text:p>2020/12/19</text:p>
          </table:table-cell>
          <table:table-cell table:style-name="ce422" table:formula="of:=WEEKDAY([.B407])" office:value-type="date" office:date-value="1900-01-06" calcext:value-type="date">
            <text:p>土</text:p>
          </table:table-cell>
          <table:table-cell/>
          <table:table-cell table:formula="of:=[.E406]+6" office:value-type="float" office:value="44184" calcext:value-type="float">
            <text:p>441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407]+1" office:value-type="date" office:date-value="2020-12-20" calcext:value-type="date">
            <text:p>2020/12/20</text:p>
          </table:table-cell>
          <table:table-cell table:style-name="ce422" table:formula="of:=WEEKDAY([.B408])" office:value-type="date" office:date-value="1899-12-31" calcext:value-type="date">
            <text:p>日</text:p>
          </table:table-cell>
          <table:table-cell/>
          <table:table-cell table:formula="of:=[.E407]+1" office:value-type="float" office:value="44185" calcext:value-type="float">
            <text:p>441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408]+6" office:value-type="date" office:date-value="2020-12-26" calcext:value-type="date">
            <text:p>2020/12/26</text:p>
          </table:table-cell>
          <table:table-cell table:style-name="ce422" table:formula="of:=WEEKDAY([.B409])" office:value-type="date" office:date-value="1900-01-06" calcext:value-type="date">
            <text:p>土</text:p>
          </table:table-cell>
          <table:table-cell/>
          <table:table-cell table:formula="of:=[.E408]+6" office:value-type="float" office:value="44191" calcext:value-type="float">
            <text:p>441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409]+1" office:value-type="date" office:date-value="2020-12-27" calcext:value-type="date">
            <text:p>2020/12/27</text:p>
          </table:table-cell>
          <table:table-cell table:style-name="ce422" table:formula="of:=WEEKDAY([.B410])" office:value-type="date" office:date-value="1899-12-31" calcext:value-type="date">
            <text:p>日</text:p>
          </table:table-cell>
          <table:table-cell/>
          <table:table-cell table:formula="of:=[.E409]+1" office:value-type="float" office:value="44192" calcext:value-type="float">
            <text:p>441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410]+6" office:value-type="date" office:date-value="2021-01-02" calcext:value-type="date">
            <text:p>2021/01/02</text:p>
          </table:table-cell>
          <table:table-cell table:style-name="ce422" table:formula="of:=WEEKDAY([.B411])" office:value-type="date" office:date-value="1900-01-06" calcext:value-type="date">
            <text:p>土</text:p>
          </table:table-cell>
          <table:table-cell/>
          <table:table-cell table:formula="of:=[.E410]+6" office:value-type="float" office:value="44198" calcext:value-type="float">
            <text:p>441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411]+1" office:value-type="date" office:date-value="2021-01-03" calcext:value-type="date">
            <text:p>2021/01/03</text:p>
          </table:table-cell>
          <table:table-cell table:style-name="ce422" table:formula="of:=WEEKDAY([.B412])" office:value-type="date" office:date-value="1899-12-31" calcext:value-type="date">
            <text:p>日</text:p>
          </table:table-cell>
          <table:table-cell/>
          <table:table-cell table:formula="of:=[.E411]+1" office:value-type="float" office:value="44199" calcext:value-type="float">
            <text:p>441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412]+6" office:value-type="date" office:date-value="2021-01-09" calcext:value-type="date">
            <text:p>2021/01/09</text:p>
          </table:table-cell>
          <table:table-cell table:style-name="ce422" table:formula="of:=WEEKDAY([.B413])" office:value-type="date" office:date-value="1900-01-06" calcext:value-type="date">
            <text:p>土</text:p>
          </table:table-cell>
          <table:table-cell/>
          <table:table-cell table:formula="of:=[.E412]+6" office:value-type="float" office:value="44205" calcext:value-type="float">
            <text:p>442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413]+1" office:value-type="date" office:date-value="2021-01-10" calcext:value-type="date">
            <text:p>2021/01/10</text:p>
          </table:table-cell>
          <table:table-cell table:style-name="ce422" table:formula="of:=WEEKDAY([.B414])" office:value-type="date" office:date-value="1899-12-31" calcext:value-type="date">
            <text:p>日</text:p>
          </table:table-cell>
          <table:table-cell/>
          <table:table-cell table:formula="of:=[.E413]+1" office:value-type="float" office:value="44206" calcext:value-type="float">
            <text:p>442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414]+6" office:value-type="date" office:date-value="2021-01-16" calcext:value-type="date">
            <text:p>2021/01/16</text:p>
          </table:table-cell>
          <table:table-cell table:style-name="ce422" table:formula="of:=WEEKDAY([.B415])" office:value-type="date" office:date-value="1900-01-06" calcext:value-type="date">
            <text:p>土</text:p>
          </table:table-cell>
          <table:table-cell/>
          <table:table-cell table:formula="of:=[.E414]+6" office:value-type="float" office:value="44212" calcext:value-type="float">
            <text:p>442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415]+1" office:value-type="date" office:date-value="2021-01-17" calcext:value-type="date">
            <text:p>2021/01/17</text:p>
          </table:table-cell>
          <table:table-cell table:style-name="ce422" table:formula="of:=WEEKDAY([.B416])" office:value-type="date" office:date-value="1899-12-31" calcext:value-type="date">
            <text:p>日</text:p>
          </table:table-cell>
          <table:table-cell/>
          <table:table-cell table:formula="of:=[.E415]+1" office:value-type="float" office:value="44213" calcext:value-type="float">
            <text:p>4421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416]+6" office:value-type="date" office:date-value="2021-01-23" calcext:value-type="date">
            <text:p>2021/01/23</text:p>
          </table:table-cell>
          <table:table-cell table:style-name="ce422" table:formula="of:=WEEKDAY([.B417])" office:value-type="date" office:date-value="1900-01-06" calcext:value-type="date">
            <text:p>土</text:p>
          </table:table-cell>
          <table:table-cell/>
          <table:table-cell table:formula="of:=[.E416]+6" office:value-type="float" office:value="44219" calcext:value-type="float">
            <text:p>442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417]+1" office:value-type="date" office:date-value="2021-01-24" calcext:value-type="date">
            <text:p>2021/01/24</text:p>
          </table:table-cell>
          <table:table-cell table:style-name="ce422" table:formula="of:=WEEKDAY([.B418])" office:value-type="date" office:date-value="1899-12-31" calcext:value-type="date">
            <text:p>日</text:p>
          </table:table-cell>
          <table:table-cell/>
          <table:table-cell table:formula="of:=[.E417]+1" office:value-type="float" office:value="44220" calcext:value-type="float">
            <text:p>442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418]+6" office:value-type="date" office:date-value="2021-01-30" calcext:value-type="date">
            <text:p>2021/01/30</text:p>
          </table:table-cell>
          <table:table-cell table:style-name="ce422" table:formula="of:=WEEKDAY([.B419])" office:value-type="date" office:date-value="1900-01-06" calcext:value-type="date">
            <text:p>土</text:p>
          </table:table-cell>
          <table:table-cell/>
          <table:table-cell table:formula="of:=[.E418]+6" office:value-type="float" office:value="44226" calcext:value-type="float">
            <text:p>442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419]+1" office:value-type="date" office:date-value="2021-01-31" calcext:value-type="date">
            <text:p>2021/01/31</text:p>
          </table:table-cell>
          <table:table-cell table:style-name="ce422" table:formula="of:=WEEKDAY([.B420])" office:value-type="date" office:date-value="1899-12-31" calcext:value-type="date">
            <text:p>日</text:p>
          </table:table-cell>
          <table:table-cell/>
          <table:table-cell table:formula="of:=[.E419]+1" office:value-type="float" office:value="44227" calcext:value-type="float">
            <text:p>442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420]+6" office:value-type="date" office:date-value="2021-02-06" calcext:value-type="date">
            <text:p>2021/02/06</text:p>
          </table:table-cell>
          <table:table-cell table:style-name="ce422" table:formula="of:=WEEKDAY([.B421])" office:value-type="date" office:date-value="1900-01-06" calcext:value-type="date">
            <text:p>土</text:p>
          </table:table-cell>
          <table:table-cell/>
          <table:table-cell table:formula="of:=[.E420]+6" office:value-type="float" office:value="44233" calcext:value-type="float">
            <text:p>442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421]+1" office:value-type="date" office:date-value="2021-02-07" calcext:value-type="date">
            <text:p>2021/02/07</text:p>
          </table:table-cell>
          <table:table-cell table:style-name="ce422" table:formula="of:=WEEKDAY([.B422])" office:value-type="date" office:date-value="1899-12-31" calcext:value-type="date">
            <text:p>日</text:p>
          </table:table-cell>
          <table:table-cell/>
          <table:table-cell table:formula="of:=[.E421]+1" office:value-type="float" office:value="44234" calcext:value-type="float">
            <text:p>442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422]+6" office:value-type="date" office:date-value="2021-02-13" calcext:value-type="date">
            <text:p>2021/02/13</text:p>
          </table:table-cell>
          <table:table-cell table:style-name="ce422" table:formula="of:=WEEKDAY([.B423])" office:value-type="date" office:date-value="1900-01-06" calcext:value-type="date">
            <text:p>土</text:p>
          </table:table-cell>
          <table:table-cell/>
          <table:table-cell table:formula="of:=[.E422]+6" office:value-type="float" office:value="44240" calcext:value-type="float">
            <text:p>442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423]+1" office:value-type="date" office:date-value="2021-02-14" calcext:value-type="date">
            <text:p>2021/02/14</text:p>
          </table:table-cell>
          <table:table-cell table:style-name="ce422" table:formula="of:=WEEKDAY([.B424])" office:value-type="date" office:date-value="1899-12-31" calcext:value-type="date">
            <text:p>日</text:p>
          </table:table-cell>
          <table:table-cell/>
          <table:table-cell table:formula="of:=[.E423]+1" office:value-type="float" office:value="44241" calcext:value-type="float">
            <text:p>442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424]+6" office:value-type="date" office:date-value="2021-02-20" calcext:value-type="date">
            <text:p>2021/02/20</text:p>
          </table:table-cell>
          <table:table-cell table:style-name="ce422" table:formula="of:=WEEKDAY([.B425])" office:value-type="date" office:date-value="1900-01-06" calcext:value-type="date">
            <text:p>土</text:p>
          </table:table-cell>
          <table:table-cell/>
          <table:table-cell table:formula="of:=[.E424]+6" office:value-type="float" office:value="44247" calcext:value-type="float">
            <text:p>442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425]+1" office:value-type="date" office:date-value="2021-02-21" calcext:value-type="date">
            <text:p>2021/02/21</text:p>
          </table:table-cell>
          <table:table-cell table:style-name="ce422" table:formula="of:=WEEKDAY([.B426])" office:value-type="date" office:date-value="1899-12-31" calcext:value-type="date">
            <text:p>日</text:p>
          </table:table-cell>
          <table:table-cell/>
          <table:table-cell table:formula="of:=[.E425]+1" office:value-type="float" office:value="44248" calcext:value-type="float">
            <text:p>442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426]+6" office:value-type="date" office:date-value="2021-02-27" calcext:value-type="date">
            <text:p>2021/02/27</text:p>
          </table:table-cell>
          <table:table-cell table:style-name="ce422" table:formula="of:=WEEKDAY([.B427])" office:value-type="date" office:date-value="1900-01-06" calcext:value-type="date">
            <text:p>土</text:p>
          </table:table-cell>
          <table:table-cell/>
          <table:table-cell table:formula="of:=[.E426]+6" office:value-type="float" office:value="44254" calcext:value-type="float">
            <text:p>442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427]+1" office:value-type="date" office:date-value="2021-02-28" calcext:value-type="date">
            <text:p>2021/02/28</text:p>
          </table:table-cell>
          <table:table-cell table:style-name="ce422" table:formula="of:=WEEKDAY([.B428])" office:value-type="date" office:date-value="1899-12-31" calcext:value-type="date">
            <text:p>日</text:p>
          </table:table-cell>
          <table:table-cell/>
          <table:table-cell table:formula="of:=[.E427]+1" office:value-type="float" office:value="44255" calcext:value-type="float">
            <text:p>442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428]+6" office:value-type="date" office:date-value="2021-03-06" calcext:value-type="date">
            <text:p>2021/03/06</text:p>
          </table:table-cell>
          <table:table-cell table:style-name="ce422" table:formula="of:=WEEKDAY([.B429])" office:value-type="date" office:date-value="1900-01-06" calcext:value-type="date">
            <text:p>土</text:p>
          </table:table-cell>
          <table:table-cell/>
          <table:table-cell table:formula="of:=[.E428]+6" office:value-type="float" office:value="44261" calcext:value-type="float">
            <text:p>442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429]+1" office:value-type="date" office:date-value="2021-03-07" calcext:value-type="date">
            <text:p>2021/03/07</text:p>
          </table:table-cell>
          <table:table-cell table:style-name="ce422" table:formula="of:=WEEKDAY([.B430])" office:value-type="date" office:date-value="1899-12-31" calcext:value-type="date">
            <text:p>日</text:p>
          </table:table-cell>
          <table:table-cell/>
          <table:table-cell table:formula="of:=[.E429]+1" office:value-type="float" office:value="44262" calcext:value-type="float">
            <text:p>442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430]+6" office:value-type="date" office:date-value="2021-03-13" calcext:value-type="date">
            <text:p>2021/03/13</text:p>
          </table:table-cell>
          <table:table-cell table:style-name="ce422" table:formula="of:=WEEKDAY([.B431])" office:value-type="date" office:date-value="1900-01-06" calcext:value-type="date">
            <text:p>土</text:p>
          </table:table-cell>
          <table:table-cell/>
          <table:table-cell table:formula="of:=[.E430]+6" office:value-type="float" office:value="44268" calcext:value-type="float">
            <text:p>442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431]+1" office:value-type="date" office:date-value="2021-03-14" calcext:value-type="date">
            <text:p>2021/03/14</text:p>
          </table:table-cell>
          <table:table-cell table:style-name="ce422" table:formula="of:=WEEKDAY([.B432])" office:value-type="date" office:date-value="1899-12-31" calcext:value-type="date">
            <text:p>日</text:p>
          </table:table-cell>
          <table:table-cell/>
          <table:table-cell table:formula="of:=[.E431]+1" office:value-type="float" office:value="44269" calcext:value-type="float">
            <text:p>442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432]+6" office:value-type="date" office:date-value="2021-03-20" calcext:value-type="date">
            <text:p>2021/03/20</text:p>
          </table:table-cell>
          <table:table-cell table:style-name="ce422" table:formula="of:=WEEKDAY([.B433])" office:value-type="date" office:date-value="1900-01-06" calcext:value-type="date">
            <text:p>土</text:p>
          </table:table-cell>
          <table:table-cell/>
          <table:table-cell table:formula="of:=[.E432]+6" office:value-type="float" office:value="44275" calcext:value-type="float">
            <text:p>442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433]+1" office:value-type="date" office:date-value="2021-03-21" calcext:value-type="date">
            <text:p>2021/03/21</text:p>
          </table:table-cell>
          <table:table-cell table:style-name="ce422" table:formula="of:=WEEKDAY([.B434])" office:value-type="date" office:date-value="1899-12-31" calcext:value-type="date">
            <text:p>日</text:p>
          </table:table-cell>
          <table:table-cell/>
          <table:table-cell table:formula="of:=[.E433]+1" office:value-type="float" office:value="44276" calcext:value-type="float">
            <text:p>442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434]+6" office:value-type="date" office:date-value="2021-03-27" calcext:value-type="date">
            <text:p>2021/03/27</text:p>
          </table:table-cell>
          <table:table-cell table:style-name="ce422" table:formula="of:=WEEKDAY([.B435])" office:value-type="date" office:date-value="1900-01-06" calcext:value-type="date">
            <text:p>土</text:p>
          </table:table-cell>
          <table:table-cell/>
          <table:table-cell table:formula="of:=[.E434]+6" office:value-type="float" office:value="44282" calcext:value-type="float">
            <text:p>442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435]+1" office:value-type="date" office:date-value="2021-03-28" calcext:value-type="date">
            <text:p>2021/03/28</text:p>
          </table:table-cell>
          <table:table-cell table:style-name="ce422" table:formula="of:=WEEKDAY([.B436])" office:value-type="date" office:date-value="1899-12-31" calcext:value-type="date">
            <text:p>日</text:p>
          </table:table-cell>
          <table:table-cell/>
          <table:table-cell table:formula="of:=[.E435]+1" office:value-type="float" office:value="44283" calcext:value-type="float">
            <text:p>442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436]+6" office:value-type="date" office:date-value="2021-04-03" calcext:value-type="date">
            <text:p>2021/04/03</text:p>
          </table:table-cell>
          <table:table-cell table:style-name="ce422" table:formula="of:=WEEKDAY([.B437])" office:value-type="date" office:date-value="1900-01-06" calcext:value-type="date">
            <text:p>土</text:p>
          </table:table-cell>
          <table:table-cell/>
          <table:table-cell table:formula="of:=[.E436]+6" office:value-type="float" office:value="44289" calcext:value-type="float">
            <text:p>442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437]+1" office:value-type="date" office:date-value="2021-04-04" calcext:value-type="date">
            <text:p>2021/04/04</text:p>
          </table:table-cell>
          <table:table-cell table:style-name="ce422" table:formula="of:=WEEKDAY([.B438])" office:value-type="date" office:date-value="1899-12-31" calcext:value-type="date">
            <text:p>日</text:p>
          </table:table-cell>
          <table:table-cell/>
          <table:table-cell table:formula="of:=[.E437]+1" office:value-type="float" office:value="44290" calcext:value-type="float">
            <text:p>442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438]+6" office:value-type="date" office:date-value="2021-04-10" calcext:value-type="date">
            <text:p>2021/04/10</text:p>
          </table:table-cell>
          <table:table-cell table:style-name="ce422" table:formula="of:=WEEKDAY([.B439])" office:value-type="date" office:date-value="1900-01-06" calcext:value-type="date">
            <text:p>土</text:p>
          </table:table-cell>
          <table:table-cell/>
          <table:table-cell table:formula="of:=[.E438]+6" office:value-type="float" office:value="44296" calcext:value-type="float">
            <text:p>442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439]+1" office:value-type="date" office:date-value="2021-04-11" calcext:value-type="date">
            <text:p>2021/04/11</text:p>
          </table:table-cell>
          <table:table-cell table:style-name="ce422" table:formula="of:=WEEKDAY([.B440])" office:value-type="date" office:date-value="1899-12-31" calcext:value-type="date">
            <text:p>日</text:p>
          </table:table-cell>
          <table:table-cell/>
          <table:table-cell table:formula="of:=[.E439]+1" office:value-type="float" office:value="44297" calcext:value-type="float">
            <text:p>442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440]+6" office:value-type="date" office:date-value="2021-04-17" calcext:value-type="date">
            <text:p>2021/04/17</text:p>
          </table:table-cell>
          <table:table-cell table:style-name="ce422" table:formula="of:=WEEKDAY([.B441])" office:value-type="date" office:date-value="1900-01-06" calcext:value-type="date">
            <text:p>土</text:p>
          </table:table-cell>
          <table:table-cell/>
          <table:table-cell table:formula="of:=[.E440]+6" office:value-type="float" office:value="44303" calcext:value-type="float">
            <text:p>443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441]+1" office:value-type="date" office:date-value="2021-04-18" calcext:value-type="date">
            <text:p>2021/04/18</text:p>
          </table:table-cell>
          <table:table-cell table:style-name="ce422" table:formula="of:=WEEKDAY([.B442])" office:value-type="date" office:date-value="1899-12-31" calcext:value-type="date">
            <text:p>日</text:p>
          </table:table-cell>
          <table:table-cell/>
          <table:table-cell table:formula="of:=[.E441]+1" office:value-type="float" office:value="44304" calcext:value-type="float">
            <text:p>443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442]+6" office:value-type="date" office:date-value="2021-04-24" calcext:value-type="date">
            <text:p>2021/04/24</text:p>
          </table:table-cell>
          <table:table-cell table:style-name="ce422" table:formula="of:=WEEKDAY([.B443])" office:value-type="date" office:date-value="1900-01-06" calcext:value-type="date">
            <text:p>土</text:p>
          </table:table-cell>
          <table:table-cell/>
          <table:table-cell table:formula="of:=[.E442]+6" office:value-type="float" office:value="44310" calcext:value-type="float">
            <text:p>443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443]+1" office:value-type="date" office:date-value="2021-04-25" calcext:value-type="date">
            <text:p>2021/04/25</text:p>
          </table:table-cell>
          <table:table-cell table:style-name="ce422" table:formula="of:=WEEKDAY([.B444])" office:value-type="date" office:date-value="1899-12-31" calcext:value-type="date">
            <text:p>日</text:p>
          </table:table-cell>
          <table:table-cell/>
          <table:table-cell table:formula="of:=[.E443]+1" office:value-type="float" office:value="44311" calcext:value-type="float">
            <text:p>443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444]+6" office:value-type="date" office:date-value="2021-05-01" calcext:value-type="date">
            <text:p>2021/05/01</text:p>
          </table:table-cell>
          <table:table-cell table:style-name="ce422" table:formula="of:=WEEKDAY([.B445])" office:value-type="date" office:date-value="1900-01-06" calcext:value-type="date">
            <text:p>土</text:p>
          </table:table-cell>
          <table:table-cell/>
          <table:table-cell table:formula="of:=[.E444]+6" office:value-type="float" office:value="44317" calcext:value-type="float">
            <text:p>443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445]+1" office:value-type="date" office:date-value="2021-05-02" calcext:value-type="date">
            <text:p>2021/05/02</text:p>
          </table:table-cell>
          <table:table-cell table:style-name="ce422" table:formula="of:=WEEKDAY([.B446])" office:value-type="date" office:date-value="1899-12-31" calcext:value-type="date">
            <text:p>日</text:p>
          </table:table-cell>
          <table:table-cell/>
          <table:table-cell table:formula="of:=[.E445]+1" office:value-type="float" office:value="44318" calcext:value-type="float">
            <text:p>443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446]+6" office:value-type="date" office:date-value="2021-05-08" calcext:value-type="date">
            <text:p>2021/05/08</text:p>
          </table:table-cell>
          <table:table-cell table:style-name="ce422" table:formula="of:=WEEKDAY([.B447])" office:value-type="date" office:date-value="1900-01-06" calcext:value-type="date">
            <text:p>土</text:p>
          </table:table-cell>
          <table:table-cell/>
          <table:table-cell table:formula="of:=[.E446]+6" office:value-type="float" office:value="44324" calcext:value-type="float">
            <text:p>443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447]+1" office:value-type="date" office:date-value="2021-05-09" calcext:value-type="date">
            <text:p>2021/05/09</text:p>
          </table:table-cell>
          <table:table-cell table:style-name="ce422" table:formula="of:=WEEKDAY([.B448])" office:value-type="date" office:date-value="1899-12-31" calcext:value-type="date">
            <text:p>日</text:p>
          </table:table-cell>
          <table:table-cell/>
          <table:table-cell table:formula="of:=[.E447]+1" office:value-type="float" office:value="44325" calcext:value-type="float">
            <text:p>443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448]+6" office:value-type="date" office:date-value="2021-05-15" calcext:value-type="date">
            <text:p>2021/05/15</text:p>
          </table:table-cell>
          <table:table-cell table:style-name="ce422" table:formula="of:=WEEKDAY([.B449])" office:value-type="date" office:date-value="1900-01-06" calcext:value-type="date">
            <text:p>土</text:p>
          </table:table-cell>
          <table:table-cell/>
          <table:table-cell table:formula="of:=[.E448]+6" office:value-type="float" office:value="44331" calcext:value-type="float">
            <text:p>443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449]+1" office:value-type="date" office:date-value="2021-05-16" calcext:value-type="date">
            <text:p>2021/05/16</text:p>
          </table:table-cell>
          <table:table-cell table:style-name="ce422" table:formula="of:=WEEKDAY([.B450])" office:value-type="date" office:date-value="1899-12-31" calcext:value-type="date">
            <text:p>日</text:p>
          </table:table-cell>
          <table:table-cell/>
          <table:table-cell table:formula="of:=[.E449]+1" office:value-type="float" office:value="44332" calcext:value-type="float">
            <text:p>443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450]+6" office:value-type="date" office:date-value="2021-05-22" calcext:value-type="date">
            <text:p>2021/05/22</text:p>
          </table:table-cell>
          <table:table-cell table:style-name="ce422" table:formula="of:=WEEKDAY([.B451])" office:value-type="date" office:date-value="1900-01-06" calcext:value-type="date">
            <text:p>土</text:p>
          </table:table-cell>
          <table:table-cell/>
          <table:table-cell table:formula="of:=[.E450]+6" office:value-type="float" office:value="44338" calcext:value-type="float">
            <text:p>443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451]+1" office:value-type="date" office:date-value="2021-05-23" calcext:value-type="date">
            <text:p>2021/05/23</text:p>
          </table:table-cell>
          <table:table-cell table:style-name="ce422" table:formula="of:=WEEKDAY([.B452])" office:value-type="date" office:date-value="1899-12-31" calcext:value-type="date">
            <text:p>日</text:p>
          </table:table-cell>
          <table:table-cell/>
          <table:table-cell table:formula="of:=[.E451]+1" office:value-type="float" office:value="44339" calcext:value-type="float">
            <text:p>443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452]+6" office:value-type="date" office:date-value="2021-05-29" calcext:value-type="date">
            <text:p>2021/05/29</text:p>
          </table:table-cell>
          <table:table-cell table:style-name="ce422" table:formula="of:=WEEKDAY([.B453])" office:value-type="date" office:date-value="1900-01-06" calcext:value-type="date">
            <text:p>土</text:p>
          </table:table-cell>
          <table:table-cell/>
          <table:table-cell table:formula="of:=[.E452]+6" office:value-type="float" office:value="44345" calcext:value-type="float">
            <text:p>443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453]+1" office:value-type="date" office:date-value="2021-05-30" calcext:value-type="date">
            <text:p>2021/05/30</text:p>
          </table:table-cell>
          <table:table-cell table:style-name="ce422" table:formula="of:=WEEKDAY([.B454])" office:value-type="date" office:date-value="1899-12-31" calcext:value-type="date">
            <text:p>日</text:p>
          </table:table-cell>
          <table:table-cell/>
          <table:table-cell table:formula="of:=[.E453]+1" office:value-type="float" office:value="44346" calcext:value-type="float">
            <text:p>443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454]+6" office:value-type="date" office:date-value="2021-06-05" calcext:value-type="date">
            <text:p>2021/06/05</text:p>
          </table:table-cell>
          <table:table-cell table:style-name="ce422" table:formula="of:=WEEKDAY([.B455])" office:value-type="date" office:date-value="1900-01-06" calcext:value-type="date">
            <text:p>土</text:p>
          </table:table-cell>
          <table:table-cell/>
          <table:table-cell table:formula="of:=[.E454]+6" office:value-type="float" office:value="44352" calcext:value-type="float">
            <text:p>443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455]+1" office:value-type="date" office:date-value="2021-06-06" calcext:value-type="date">
            <text:p>2021/06/06</text:p>
          </table:table-cell>
          <table:table-cell table:style-name="ce422" table:formula="of:=WEEKDAY([.B456])" office:value-type="date" office:date-value="1899-12-31" calcext:value-type="date">
            <text:p>日</text:p>
          </table:table-cell>
          <table:table-cell/>
          <table:table-cell table:formula="of:=[.E455]+1" office:value-type="float" office:value="44353" calcext:value-type="float">
            <text:p>443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456]+6" office:value-type="date" office:date-value="2021-06-12" calcext:value-type="date">
            <text:p>2021/06/12</text:p>
          </table:table-cell>
          <table:table-cell table:style-name="ce422" table:formula="of:=WEEKDAY([.B457])" office:value-type="date" office:date-value="1900-01-06" calcext:value-type="date">
            <text:p>土</text:p>
          </table:table-cell>
          <table:table-cell/>
          <table:table-cell table:formula="of:=[.E456]+6" office:value-type="float" office:value="44359" calcext:value-type="float">
            <text:p>443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457]+1" office:value-type="date" office:date-value="2021-06-13" calcext:value-type="date">
            <text:p>2021/06/13</text:p>
          </table:table-cell>
          <table:table-cell table:style-name="ce422" table:formula="of:=WEEKDAY([.B458])" office:value-type="date" office:date-value="1899-12-31" calcext:value-type="date">
            <text:p>日</text:p>
          </table:table-cell>
          <table:table-cell/>
          <table:table-cell table:formula="of:=[.E457]+1" office:value-type="float" office:value="44360" calcext:value-type="float">
            <text:p>443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458]+6" office:value-type="date" office:date-value="2021-06-19" calcext:value-type="date">
            <text:p>2021/06/19</text:p>
          </table:table-cell>
          <table:table-cell table:style-name="ce422" table:formula="of:=WEEKDAY([.B459])" office:value-type="date" office:date-value="1900-01-06" calcext:value-type="date">
            <text:p>土</text:p>
          </table:table-cell>
          <table:table-cell/>
          <table:table-cell table:formula="of:=[.E458]+6" office:value-type="float" office:value="44366" calcext:value-type="float">
            <text:p>4436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459]+1" office:value-type="date" office:date-value="2021-06-20" calcext:value-type="date">
            <text:p>2021/06/20</text:p>
          </table:table-cell>
          <table:table-cell table:style-name="ce422" table:formula="of:=WEEKDAY([.B460])" office:value-type="date" office:date-value="1899-12-31" calcext:value-type="date">
            <text:p>日</text:p>
          </table:table-cell>
          <table:table-cell/>
          <table:table-cell table:formula="of:=[.E459]+1" office:value-type="float" office:value="44367" calcext:value-type="float">
            <text:p>443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460]+6" office:value-type="date" office:date-value="2021-06-26" calcext:value-type="date">
            <text:p>2021/06/26</text:p>
          </table:table-cell>
          <table:table-cell table:style-name="ce422" table:formula="of:=WEEKDAY([.B461])" office:value-type="date" office:date-value="1900-01-06" calcext:value-type="date">
            <text:p>土</text:p>
          </table:table-cell>
          <table:table-cell/>
          <table:table-cell table:formula="of:=[.E460]+6" office:value-type="float" office:value="44373" calcext:value-type="float">
            <text:p>443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461]+1" office:value-type="date" office:date-value="2021-06-27" calcext:value-type="date">
            <text:p>2021/06/27</text:p>
          </table:table-cell>
          <table:table-cell table:style-name="ce422" table:formula="of:=WEEKDAY([.B462])" office:value-type="date" office:date-value="1899-12-31" calcext:value-type="date">
            <text:p>日</text:p>
          </table:table-cell>
          <table:table-cell/>
          <table:table-cell table:formula="of:=[.E461]+1" office:value-type="float" office:value="44374" calcext:value-type="float">
            <text:p>443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462]+6" office:value-type="date" office:date-value="2021-07-03" calcext:value-type="date">
            <text:p>2021/07/03</text:p>
          </table:table-cell>
          <table:table-cell table:style-name="ce422" table:formula="of:=WEEKDAY([.B463])" office:value-type="date" office:date-value="1900-01-06" calcext:value-type="date">
            <text:p>土</text:p>
          </table:table-cell>
          <table:table-cell/>
          <table:table-cell table:formula="of:=[.E462]+6" office:value-type="float" office:value="44380" calcext:value-type="float">
            <text:p>443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463]+1" office:value-type="date" office:date-value="2021-07-04" calcext:value-type="date">
            <text:p>2021/07/04</text:p>
          </table:table-cell>
          <table:table-cell table:style-name="ce422" table:formula="of:=WEEKDAY([.B464])" office:value-type="date" office:date-value="1899-12-31" calcext:value-type="date">
            <text:p>日</text:p>
          </table:table-cell>
          <table:table-cell/>
          <table:table-cell table:formula="of:=[.E463]+1" office:value-type="float" office:value="44381" calcext:value-type="float">
            <text:p>443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464]+6" office:value-type="date" office:date-value="2021-07-10" calcext:value-type="date">
            <text:p>2021/07/10</text:p>
          </table:table-cell>
          <table:table-cell table:style-name="ce422" table:formula="of:=WEEKDAY([.B465])" office:value-type="date" office:date-value="1900-01-06" calcext:value-type="date">
            <text:p>土</text:p>
          </table:table-cell>
          <table:table-cell/>
          <table:table-cell table:formula="of:=[.E464]+6" office:value-type="float" office:value="44387" calcext:value-type="float">
            <text:p>443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465]+1" office:value-type="date" office:date-value="2021-07-11" calcext:value-type="date">
            <text:p>2021/07/11</text:p>
          </table:table-cell>
          <table:table-cell table:style-name="ce422" table:formula="of:=WEEKDAY([.B466])" office:value-type="date" office:date-value="1899-12-31" calcext:value-type="date">
            <text:p>日</text:p>
          </table:table-cell>
          <table:table-cell/>
          <table:table-cell table:formula="of:=[.E465]+1" office:value-type="float" office:value="44388" calcext:value-type="float">
            <text:p>443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466]+6" office:value-type="date" office:date-value="2021-07-17" calcext:value-type="date">
            <text:p>2021/07/17</text:p>
          </table:table-cell>
          <table:table-cell table:style-name="ce422" table:formula="of:=WEEKDAY([.B467])" office:value-type="date" office:date-value="1900-01-06" calcext:value-type="date">
            <text:p>土</text:p>
          </table:table-cell>
          <table:table-cell/>
          <table:table-cell table:formula="of:=[.E466]+6" office:value-type="float" office:value="44394" calcext:value-type="float">
            <text:p>443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467]+1" office:value-type="date" office:date-value="2021-07-18" calcext:value-type="date">
            <text:p>2021/07/18</text:p>
          </table:table-cell>
          <table:table-cell table:style-name="ce422" table:formula="of:=WEEKDAY([.B468])" office:value-type="date" office:date-value="1899-12-31" calcext:value-type="date">
            <text:p>日</text:p>
          </table:table-cell>
          <table:table-cell/>
          <table:table-cell table:formula="of:=[.E467]+1" office:value-type="float" office:value="44395" calcext:value-type="float">
            <text:p>443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468]+6" office:value-type="date" office:date-value="2021-07-24" calcext:value-type="date">
            <text:p>2021/07/24</text:p>
          </table:table-cell>
          <table:table-cell table:style-name="ce422" table:formula="of:=WEEKDAY([.B469])" office:value-type="date" office:date-value="1900-01-06" calcext:value-type="date">
            <text:p>土</text:p>
          </table:table-cell>
          <table:table-cell/>
          <table:table-cell table:formula="of:=[.E468]+6" office:value-type="float" office:value="44401" calcext:value-type="float">
            <text:p>444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469]+1" office:value-type="date" office:date-value="2021-07-25" calcext:value-type="date">
            <text:p>2021/07/25</text:p>
          </table:table-cell>
          <table:table-cell table:style-name="ce422" table:formula="of:=WEEKDAY([.B470])" office:value-type="date" office:date-value="1899-12-31" calcext:value-type="date">
            <text:p>日</text:p>
          </table:table-cell>
          <table:table-cell/>
          <table:table-cell table:formula="of:=[.E469]+1" office:value-type="float" office:value="44402" calcext:value-type="float">
            <text:p>444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470]+6" office:value-type="date" office:date-value="2021-07-31" calcext:value-type="date">
            <text:p>2021/07/31</text:p>
          </table:table-cell>
          <table:table-cell table:style-name="ce422" table:formula="of:=WEEKDAY([.B471])" office:value-type="date" office:date-value="1900-01-06" calcext:value-type="date">
            <text:p>土</text:p>
          </table:table-cell>
          <table:table-cell/>
          <table:table-cell table:formula="of:=[.E470]+6" office:value-type="float" office:value="44408" calcext:value-type="float">
            <text:p>444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471]+1" office:value-type="date" office:date-value="2021-08-01" calcext:value-type="date">
            <text:p>2021/08/01</text:p>
          </table:table-cell>
          <table:table-cell table:style-name="ce422" table:formula="of:=WEEKDAY([.B472])" office:value-type="date" office:date-value="1899-12-31" calcext:value-type="date">
            <text:p>日</text:p>
          </table:table-cell>
          <table:table-cell/>
          <table:table-cell table:formula="of:=[.E471]+1" office:value-type="float" office:value="44409" calcext:value-type="float">
            <text:p>444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472]+6" office:value-type="date" office:date-value="2021-08-07" calcext:value-type="date">
            <text:p>2021/08/07</text:p>
          </table:table-cell>
          <table:table-cell table:style-name="ce422" table:formula="of:=WEEKDAY([.B473])" office:value-type="date" office:date-value="1900-01-06" calcext:value-type="date">
            <text:p>土</text:p>
          </table:table-cell>
          <table:table-cell/>
          <table:table-cell table:formula="of:=[.E472]+6" office:value-type="float" office:value="44415" calcext:value-type="float">
            <text:p>444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473]+1" office:value-type="date" office:date-value="2021-08-08" calcext:value-type="date">
            <text:p>2021/08/08</text:p>
          </table:table-cell>
          <table:table-cell table:style-name="ce422" table:formula="of:=WEEKDAY([.B474])" office:value-type="date" office:date-value="1899-12-31" calcext:value-type="date">
            <text:p>日</text:p>
          </table:table-cell>
          <table:table-cell/>
          <table:table-cell table:formula="of:=[.E473]+1" office:value-type="float" office:value="44416" calcext:value-type="float">
            <text:p>444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474]+6" office:value-type="date" office:date-value="2021-08-14" calcext:value-type="date">
            <text:p>2021/08/14</text:p>
          </table:table-cell>
          <table:table-cell table:style-name="ce422" table:formula="of:=WEEKDAY([.B475])" office:value-type="date" office:date-value="1900-01-06" calcext:value-type="date">
            <text:p>土</text:p>
          </table:table-cell>
          <table:table-cell/>
          <table:table-cell table:formula="of:=[.E474]+6" office:value-type="float" office:value="44422" calcext:value-type="float">
            <text:p>4442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475]+1" office:value-type="date" office:date-value="2021-08-15" calcext:value-type="date">
            <text:p>2021/08/15</text:p>
          </table:table-cell>
          <table:table-cell table:style-name="ce422" table:formula="of:=WEEKDAY([.B476])" office:value-type="date" office:date-value="1899-12-31" calcext:value-type="date">
            <text:p>日</text:p>
          </table:table-cell>
          <table:table-cell/>
          <table:table-cell table:formula="of:=[.E475]+1" office:value-type="float" office:value="44423" calcext:value-type="float">
            <text:p>444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476]+6" office:value-type="date" office:date-value="2021-08-21" calcext:value-type="date">
            <text:p>2021/08/21</text:p>
          </table:table-cell>
          <table:table-cell table:style-name="ce422" table:formula="of:=WEEKDAY([.B477])" office:value-type="date" office:date-value="1900-01-06" calcext:value-type="date">
            <text:p>土</text:p>
          </table:table-cell>
          <table:table-cell/>
          <table:table-cell table:formula="of:=[.E476]+6" office:value-type="float" office:value="44429" calcext:value-type="float">
            <text:p>444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477]+1" office:value-type="date" office:date-value="2021-08-22" calcext:value-type="date">
            <text:p>2021/08/22</text:p>
          </table:table-cell>
          <table:table-cell table:style-name="ce422" table:formula="of:=WEEKDAY([.B478])" office:value-type="date" office:date-value="1899-12-31" calcext:value-type="date">
            <text:p>日</text:p>
          </table:table-cell>
          <table:table-cell/>
          <table:table-cell table:formula="of:=[.E477]+1" office:value-type="float" office:value="44430" calcext:value-type="float">
            <text:p>4443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478]+6" office:value-type="date" office:date-value="2021-08-28" calcext:value-type="date">
            <text:p>2021/08/28</text:p>
          </table:table-cell>
          <table:table-cell table:style-name="ce422" table:formula="of:=WEEKDAY([.B479])" office:value-type="date" office:date-value="1900-01-06" calcext:value-type="date">
            <text:p>土</text:p>
          </table:table-cell>
          <table:table-cell/>
          <table:table-cell table:formula="of:=[.E478]+6" office:value-type="float" office:value="44436" calcext:value-type="float">
            <text:p>444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479]+1" office:value-type="date" office:date-value="2021-08-29" calcext:value-type="date">
            <text:p>2021/08/29</text:p>
          </table:table-cell>
          <table:table-cell table:style-name="ce422" table:formula="of:=WEEKDAY([.B480])" office:value-type="date" office:date-value="1899-12-31" calcext:value-type="date">
            <text:p>日</text:p>
          </table:table-cell>
          <table:table-cell/>
          <table:table-cell table:formula="of:=[.E479]+1" office:value-type="float" office:value="44437" calcext:value-type="float">
            <text:p>444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480]+6" office:value-type="date" office:date-value="2021-09-04" calcext:value-type="date">
            <text:p>2021/09/04</text:p>
          </table:table-cell>
          <table:table-cell table:style-name="ce422" table:formula="of:=WEEKDAY([.B481])" office:value-type="date" office:date-value="1900-01-06" calcext:value-type="date">
            <text:p>土</text:p>
          </table:table-cell>
          <table:table-cell/>
          <table:table-cell table:formula="of:=[.E480]+6" office:value-type="float" office:value="44443" calcext:value-type="float">
            <text:p>444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481]+1" office:value-type="date" office:date-value="2021-09-05" calcext:value-type="date">
            <text:p>2021/09/05</text:p>
          </table:table-cell>
          <table:table-cell table:style-name="ce422" table:formula="of:=WEEKDAY([.B482])" office:value-type="date" office:date-value="1899-12-31" calcext:value-type="date">
            <text:p>日</text:p>
          </table:table-cell>
          <table:table-cell/>
          <table:table-cell table:formula="of:=[.E481]+1" office:value-type="float" office:value="44444" calcext:value-type="float">
            <text:p>444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482]+6" office:value-type="date" office:date-value="2021-09-11" calcext:value-type="date">
            <text:p>2021/09/11</text:p>
          </table:table-cell>
          <table:table-cell table:style-name="ce422" table:formula="of:=WEEKDAY([.B483])" office:value-type="date" office:date-value="1900-01-06" calcext:value-type="date">
            <text:p>土</text:p>
          </table:table-cell>
          <table:table-cell/>
          <table:table-cell table:formula="of:=[.E482]+6" office:value-type="float" office:value="44450" calcext:value-type="float">
            <text:p>444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483]+1" office:value-type="date" office:date-value="2021-09-12" calcext:value-type="date">
            <text:p>2021/09/12</text:p>
          </table:table-cell>
          <table:table-cell table:style-name="ce422" table:formula="of:=WEEKDAY([.B484])" office:value-type="date" office:date-value="1899-12-31" calcext:value-type="date">
            <text:p>日</text:p>
          </table:table-cell>
          <table:table-cell/>
          <table:table-cell table:formula="of:=[.E483]+1" office:value-type="float" office:value="44451" calcext:value-type="float">
            <text:p>444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484]+6" office:value-type="date" office:date-value="2021-09-18" calcext:value-type="date">
            <text:p>2021/09/18</text:p>
          </table:table-cell>
          <table:table-cell table:style-name="ce422" table:formula="of:=WEEKDAY([.B485])" office:value-type="date" office:date-value="1900-01-06" calcext:value-type="date">
            <text:p>土</text:p>
          </table:table-cell>
          <table:table-cell/>
          <table:table-cell table:formula="of:=[.E484]+6" office:value-type="float" office:value="44457" calcext:value-type="float">
            <text:p>444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485]+1" office:value-type="date" office:date-value="2021-09-19" calcext:value-type="date">
            <text:p>2021/09/19</text:p>
          </table:table-cell>
          <table:table-cell table:style-name="ce422" table:formula="of:=WEEKDAY([.B486])" office:value-type="date" office:date-value="1899-12-31" calcext:value-type="date">
            <text:p>日</text:p>
          </table:table-cell>
          <table:table-cell/>
          <table:table-cell table:formula="of:=[.E485]+1" office:value-type="float" office:value="44458" calcext:value-type="float">
            <text:p>444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486]+6" office:value-type="date" office:date-value="2021-09-25" calcext:value-type="date">
            <text:p>2021/09/25</text:p>
          </table:table-cell>
          <table:table-cell table:style-name="ce422" table:formula="of:=WEEKDAY([.B487])" office:value-type="date" office:date-value="1900-01-06" calcext:value-type="date">
            <text:p>土</text:p>
          </table:table-cell>
          <table:table-cell/>
          <table:table-cell table:formula="of:=[.E486]+6" office:value-type="float" office:value="44464" calcext:value-type="float">
            <text:p>444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487]+1" office:value-type="date" office:date-value="2021-09-26" calcext:value-type="date">
            <text:p>2021/09/26</text:p>
          </table:table-cell>
          <table:table-cell table:style-name="ce422" table:formula="of:=WEEKDAY([.B488])" office:value-type="date" office:date-value="1899-12-31" calcext:value-type="date">
            <text:p>日</text:p>
          </table:table-cell>
          <table:table-cell/>
          <table:table-cell table:formula="of:=[.E487]+1" office:value-type="float" office:value="44465" calcext:value-type="float">
            <text:p>4446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488]+6" office:value-type="date" office:date-value="2021-10-02" calcext:value-type="date">
            <text:p>2021/10/02</text:p>
          </table:table-cell>
          <table:table-cell table:style-name="ce422" table:formula="of:=WEEKDAY([.B489])" office:value-type="date" office:date-value="1900-01-06" calcext:value-type="date">
            <text:p>土</text:p>
          </table:table-cell>
          <table:table-cell/>
          <table:table-cell table:formula="of:=[.E488]+6" office:value-type="float" office:value="44471" calcext:value-type="float">
            <text:p>444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489]+1" office:value-type="date" office:date-value="2021-10-03" calcext:value-type="date">
            <text:p>2021/10/03</text:p>
          </table:table-cell>
          <table:table-cell table:style-name="ce422" table:formula="of:=WEEKDAY([.B490])" office:value-type="date" office:date-value="1899-12-31" calcext:value-type="date">
            <text:p>日</text:p>
          </table:table-cell>
          <table:table-cell/>
          <table:table-cell table:formula="of:=[.E489]+1" office:value-type="float" office:value="44472" calcext:value-type="float">
            <text:p>444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490]+6" office:value-type="date" office:date-value="2021-10-09" calcext:value-type="date">
            <text:p>2021/10/09</text:p>
          </table:table-cell>
          <table:table-cell table:style-name="ce422" table:formula="of:=WEEKDAY([.B491])" office:value-type="date" office:date-value="1900-01-06" calcext:value-type="date">
            <text:p>土</text:p>
          </table:table-cell>
          <table:table-cell/>
          <table:table-cell table:formula="of:=[.E490]+6" office:value-type="float" office:value="44478" calcext:value-type="float">
            <text:p>444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491]+1" office:value-type="date" office:date-value="2021-10-10" calcext:value-type="date">
            <text:p>2021/10/10</text:p>
          </table:table-cell>
          <table:table-cell table:style-name="ce422" table:formula="of:=WEEKDAY([.B492])" office:value-type="date" office:date-value="1899-12-31" calcext:value-type="date">
            <text:p>日</text:p>
          </table:table-cell>
          <table:table-cell/>
          <table:table-cell table:formula="of:=[.E491]+1" office:value-type="float" office:value="44479" calcext:value-type="float">
            <text:p>444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492]+6" office:value-type="date" office:date-value="2021-10-16" calcext:value-type="date">
            <text:p>2021/10/16</text:p>
          </table:table-cell>
          <table:table-cell table:style-name="ce422" table:formula="of:=WEEKDAY([.B493])" office:value-type="date" office:date-value="1900-01-06" calcext:value-type="date">
            <text:p>土</text:p>
          </table:table-cell>
          <table:table-cell/>
          <table:table-cell table:formula="of:=[.E492]+6" office:value-type="float" office:value="44485" calcext:value-type="float">
            <text:p>444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493]+1" office:value-type="date" office:date-value="2021-10-17" calcext:value-type="date">
            <text:p>2021/10/17</text:p>
          </table:table-cell>
          <table:table-cell table:style-name="ce422" table:formula="of:=WEEKDAY([.B494])" office:value-type="date" office:date-value="1899-12-31" calcext:value-type="date">
            <text:p>日</text:p>
          </table:table-cell>
          <table:table-cell/>
          <table:table-cell table:formula="of:=[.E493]+1" office:value-type="float" office:value="44486" calcext:value-type="float">
            <text:p>444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494]+6" office:value-type="date" office:date-value="2021-10-23" calcext:value-type="date">
            <text:p>2021/10/23</text:p>
          </table:table-cell>
          <table:table-cell table:style-name="ce422" table:formula="of:=WEEKDAY([.B495])" office:value-type="date" office:date-value="1900-01-06" calcext:value-type="date">
            <text:p>土</text:p>
          </table:table-cell>
          <table:table-cell/>
          <table:table-cell table:formula="of:=[.E494]+6" office:value-type="float" office:value="44492" calcext:value-type="float">
            <text:p>444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495]+1" office:value-type="date" office:date-value="2021-10-24" calcext:value-type="date">
            <text:p>2021/10/24</text:p>
          </table:table-cell>
          <table:table-cell table:style-name="ce422" table:formula="of:=WEEKDAY([.B496])" office:value-type="date" office:date-value="1899-12-31" calcext:value-type="date">
            <text:p>日</text:p>
          </table:table-cell>
          <table:table-cell/>
          <table:table-cell table:formula="of:=[.E495]+1" office:value-type="float" office:value="44493" calcext:value-type="float">
            <text:p>444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496]+6" office:value-type="date" office:date-value="2021-10-30" calcext:value-type="date">
            <text:p>2021/10/30</text:p>
          </table:table-cell>
          <table:table-cell table:style-name="ce422" table:formula="of:=WEEKDAY([.B497])" office:value-type="date" office:date-value="1900-01-06" calcext:value-type="date">
            <text:p>土</text:p>
          </table:table-cell>
          <table:table-cell/>
          <table:table-cell table:formula="of:=[.E496]+6" office:value-type="float" office:value="44499" calcext:value-type="float">
            <text:p>444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497]+1" office:value-type="date" office:date-value="2021-10-31" calcext:value-type="date">
            <text:p>2021/10/31</text:p>
          </table:table-cell>
          <table:table-cell table:style-name="ce422" table:formula="of:=WEEKDAY([.B498])" office:value-type="date" office:date-value="1899-12-31" calcext:value-type="date">
            <text:p>日</text:p>
          </table:table-cell>
          <table:table-cell/>
          <table:table-cell table:formula="of:=[.E497]+1" office:value-type="float" office:value="44500" calcext:value-type="float">
            <text:p>445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498]+6" office:value-type="date" office:date-value="2021-11-06" calcext:value-type="date">
            <text:p>2021/11/06</text:p>
          </table:table-cell>
          <table:table-cell table:style-name="ce422" table:formula="of:=WEEKDAY([.B499])" office:value-type="date" office:date-value="1900-01-06" calcext:value-type="date">
            <text:p>土</text:p>
          </table:table-cell>
          <table:table-cell/>
          <table:table-cell table:formula="of:=[.E498]+6" office:value-type="float" office:value="44506" calcext:value-type="float">
            <text:p>445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499]+1" office:value-type="date" office:date-value="2021-11-07" calcext:value-type="date">
            <text:p>2021/11/07</text:p>
          </table:table-cell>
          <table:table-cell table:style-name="ce422" table:formula="of:=WEEKDAY([.B500])" office:value-type="date" office:date-value="1899-12-31" calcext:value-type="date">
            <text:p>日</text:p>
          </table:table-cell>
          <table:table-cell/>
          <table:table-cell table:formula="of:=[.E499]+1" office:value-type="float" office:value="44507" calcext:value-type="float">
            <text:p>445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500]+6" office:value-type="date" office:date-value="2021-11-13" calcext:value-type="date">
            <text:p>2021/11/13</text:p>
          </table:table-cell>
          <table:table-cell table:style-name="ce422" table:formula="of:=WEEKDAY([.B501])" office:value-type="date" office:date-value="1900-01-06" calcext:value-type="date">
            <text:p>土</text:p>
          </table:table-cell>
          <table:table-cell/>
          <table:table-cell table:formula="of:=[.E500]+6" office:value-type="float" office:value="44513" calcext:value-type="float">
            <text:p>4451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501]+1" office:value-type="date" office:date-value="2021-11-14" calcext:value-type="date">
            <text:p>2021/11/14</text:p>
          </table:table-cell>
          <table:table-cell table:style-name="ce422" table:formula="of:=WEEKDAY([.B502])" office:value-type="date" office:date-value="1899-12-31" calcext:value-type="date">
            <text:p>日</text:p>
          </table:table-cell>
          <table:table-cell/>
          <table:table-cell table:formula="of:=[.E501]+1" office:value-type="float" office:value="44514" calcext:value-type="float">
            <text:p>445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502]+6" office:value-type="date" office:date-value="2021-11-20" calcext:value-type="date">
            <text:p>2021/11/20</text:p>
          </table:table-cell>
          <table:table-cell table:style-name="ce422" table:formula="of:=WEEKDAY([.B503])" office:value-type="date" office:date-value="1900-01-06" calcext:value-type="date">
            <text:p>土</text:p>
          </table:table-cell>
          <table:table-cell/>
          <table:table-cell table:formula="of:=[.E502]+6" office:value-type="float" office:value="44520" calcext:value-type="float">
            <text:p>445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503]+1" office:value-type="date" office:date-value="2021-11-21" calcext:value-type="date">
            <text:p>2021/11/21</text:p>
          </table:table-cell>
          <table:table-cell table:style-name="ce422" table:formula="of:=WEEKDAY([.B504])" office:value-type="date" office:date-value="1899-12-31" calcext:value-type="date">
            <text:p>日</text:p>
          </table:table-cell>
          <table:table-cell/>
          <table:table-cell table:formula="of:=[.E503]+1" office:value-type="float" office:value="44521" calcext:value-type="float">
            <text:p>445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504]+6" office:value-type="date" office:date-value="2021-11-27" calcext:value-type="date">
            <text:p>2021/11/27</text:p>
          </table:table-cell>
          <table:table-cell table:style-name="ce422" table:formula="of:=WEEKDAY([.B505])" office:value-type="date" office:date-value="1900-01-06" calcext:value-type="date">
            <text:p>土</text:p>
          </table:table-cell>
          <table:table-cell/>
          <table:table-cell table:formula="of:=[.E504]+6" office:value-type="float" office:value="44527" calcext:value-type="float">
            <text:p>445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505]+1" office:value-type="date" office:date-value="2021-11-28" calcext:value-type="date">
            <text:p>2021/11/28</text:p>
          </table:table-cell>
          <table:table-cell table:style-name="ce422" table:formula="of:=WEEKDAY([.B506])" office:value-type="date" office:date-value="1899-12-31" calcext:value-type="date">
            <text:p>日</text:p>
          </table:table-cell>
          <table:table-cell/>
          <table:table-cell table:formula="of:=[.E505]+1" office:value-type="float" office:value="44528" calcext:value-type="float">
            <text:p>445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506]+6" office:value-type="date" office:date-value="2021-12-04" calcext:value-type="date">
            <text:p>2021/12/04</text:p>
          </table:table-cell>
          <table:table-cell table:style-name="ce422" table:formula="of:=WEEKDAY([.B507])" office:value-type="date" office:date-value="1900-01-06" calcext:value-type="date">
            <text:p>土</text:p>
          </table:table-cell>
          <table:table-cell/>
          <table:table-cell table:formula="of:=[.E506]+6" office:value-type="float" office:value="44534" calcext:value-type="float">
            <text:p>445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507]+1" office:value-type="date" office:date-value="2021-12-05" calcext:value-type="date">
            <text:p>2021/12/05</text:p>
          </table:table-cell>
          <table:table-cell table:style-name="ce422" table:formula="of:=WEEKDAY([.B508])" office:value-type="date" office:date-value="1899-12-31" calcext:value-type="date">
            <text:p>日</text:p>
          </table:table-cell>
          <table:table-cell/>
          <table:table-cell table:formula="of:=[.E507]+1" office:value-type="float" office:value="44535" calcext:value-type="float">
            <text:p>445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508]+6" office:value-type="date" office:date-value="2021-12-11" calcext:value-type="date">
            <text:p>2021/12/11</text:p>
          </table:table-cell>
          <table:table-cell table:style-name="ce422" table:formula="of:=WEEKDAY([.B509])" office:value-type="date" office:date-value="1900-01-06" calcext:value-type="date">
            <text:p>土</text:p>
          </table:table-cell>
          <table:table-cell/>
          <table:table-cell table:formula="of:=[.E508]+6" office:value-type="float" office:value="44541" calcext:value-type="float">
            <text:p>445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509]+1" office:value-type="date" office:date-value="2021-12-12" calcext:value-type="date">
            <text:p>2021/12/12</text:p>
          </table:table-cell>
          <table:table-cell table:style-name="ce422" table:formula="of:=WEEKDAY([.B510])" office:value-type="date" office:date-value="1899-12-31" calcext:value-type="date">
            <text:p>日</text:p>
          </table:table-cell>
          <table:table-cell/>
          <table:table-cell table:formula="of:=[.E509]+1" office:value-type="float" office:value="44542" calcext:value-type="float">
            <text:p>445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510]+6" office:value-type="date" office:date-value="2021-12-18" calcext:value-type="date">
            <text:p>2021/12/18</text:p>
          </table:table-cell>
          <table:table-cell table:style-name="ce422" table:formula="of:=WEEKDAY([.B511])" office:value-type="date" office:date-value="1900-01-06" calcext:value-type="date">
            <text:p>土</text:p>
          </table:table-cell>
          <table:table-cell/>
          <table:table-cell table:formula="of:=[.E510]+6" office:value-type="float" office:value="44548" calcext:value-type="float">
            <text:p>445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511]+1" office:value-type="date" office:date-value="2021-12-19" calcext:value-type="date">
            <text:p>2021/12/19</text:p>
          </table:table-cell>
          <table:table-cell table:style-name="ce422" table:formula="of:=WEEKDAY([.B512])" office:value-type="date" office:date-value="1899-12-31" calcext:value-type="date">
            <text:p>日</text:p>
          </table:table-cell>
          <table:table-cell/>
          <table:table-cell table:formula="of:=[.E511]+1" office:value-type="float" office:value="44549" calcext:value-type="float">
            <text:p>445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512]+6" office:value-type="date" office:date-value="2021-12-25" calcext:value-type="date">
            <text:p>2021/12/25</text:p>
          </table:table-cell>
          <table:table-cell table:style-name="ce422" table:formula="of:=WEEKDAY([.B513])" office:value-type="date" office:date-value="1900-01-06" calcext:value-type="date">
            <text:p>土</text:p>
          </table:table-cell>
          <table:table-cell/>
          <table:table-cell table:formula="of:=[.E512]+6" office:value-type="float" office:value="44555" calcext:value-type="float">
            <text:p>445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513]+1" office:value-type="date" office:date-value="2021-12-26" calcext:value-type="date">
            <text:p>2021/12/26</text:p>
          </table:table-cell>
          <table:table-cell table:style-name="ce422" table:formula="of:=WEEKDAY([.B514])" office:value-type="date" office:date-value="1899-12-31" calcext:value-type="date">
            <text:p>日</text:p>
          </table:table-cell>
          <table:table-cell/>
          <table:table-cell table:formula="of:=[.E513]+1" office:value-type="float" office:value="44556" calcext:value-type="float">
            <text:p>445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514]+6" office:value-type="date" office:date-value="2022-01-01" calcext:value-type="date">
            <text:p>2022/01/01</text:p>
          </table:table-cell>
          <table:table-cell table:style-name="ce422" table:formula="of:=WEEKDAY([.B515])" office:value-type="date" office:date-value="1900-01-06" calcext:value-type="date">
            <text:p>土</text:p>
          </table:table-cell>
          <table:table-cell/>
          <table:table-cell table:formula="of:=[.E514]+6" office:value-type="float" office:value="44562" calcext:value-type="float">
            <text:p>445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515]+1" office:value-type="date" office:date-value="2022-01-02" calcext:value-type="date">
            <text:p>2022/01/02</text:p>
          </table:table-cell>
          <table:table-cell table:style-name="ce422" table:formula="of:=WEEKDAY([.B516])" office:value-type="date" office:date-value="1899-12-31" calcext:value-type="date">
            <text:p>日</text:p>
          </table:table-cell>
          <table:table-cell/>
          <table:table-cell table:formula="of:=[.E515]+1" office:value-type="float" office:value="44563" calcext:value-type="float">
            <text:p>445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516]+6" office:value-type="date" office:date-value="2022-01-08" calcext:value-type="date">
            <text:p>2022/01/08</text:p>
          </table:table-cell>
          <table:table-cell table:style-name="ce422" table:formula="of:=WEEKDAY([.B517])" office:value-type="date" office:date-value="1900-01-06" calcext:value-type="date">
            <text:p>土</text:p>
          </table:table-cell>
          <table:table-cell/>
          <table:table-cell table:formula="of:=[.E516]+6" office:value-type="float" office:value="44569" calcext:value-type="float">
            <text:p>445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517]+1" office:value-type="date" office:date-value="2022-01-09" calcext:value-type="date">
            <text:p>2022/01/09</text:p>
          </table:table-cell>
          <table:table-cell table:style-name="ce422" table:formula="of:=WEEKDAY([.B518])" office:value-type="date" office:date-value="1899-12-31" calcext:value-type="date">
            <text:p>日</text:p>
          </table:table-cell>
          <table:table-cell/>
          <table:table-cell table:formula="of:=[.E517]+1" office:value-type="float" office:value="44570" calcext:value-type="float">
            <text:p>445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518]+6" office:value-type="date" office:date-value="2022-01-15" calcext:value-type="date">
            <text:p>2022/01/15</text:p>
          </table:table-cell>
          <table:table-cell table:style-name="ce422" table:formula="of:=WEEKDAY([.B519])" office:value-type="date" office:date-value="1900-01-06" calcext:value-type="date">
            <text:p>土</text:p>
          </table:table-cell>
          <table:table-cell/>
          <table:table-cell table:formula="of:=[.E518]+6" office:value-type="float" office:value="44576" calcext:value-type="float">
            <text:p>445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519]+1" office:value-type="date" office:date-value="2022-01-16" calcext:value-type="date">
            <text:p>2022/01/16</text:p>
          </table:table-cell>
          <table:table-cell table:style-name="ce422" table:formula="of:=WEEKDAY([.B520])" office:value-type="date" office:date-value="1899-12-31" calcext:value-type="date">
            <text:p>日</text:p>
          </table:table-cell>
          <table:table-cell/>
          <table:table-cell table:formula="of:=[.E519]+1" office:value-type="float" office:value="44577" calcext:value-type="float">
            <text:p>445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520]+6" office:value-type="date" office:date-value="2022-01-22" calcext:value-type="date">
            <text:p>2022/01/22</text:p>
          </table:table-cell>
          <table:table-cell table:style-name="ce422" table:formula="of:=WEEKDAY([.B521])" office:value-type="date" office:date-value="1900-01-06" calcext:value-type="date">
            <text:p>土</text:p>
          </table:table-cell>
          <table:table-cell/>
          <table:table-cell table:formula="of:=[.E520]+6" office:value-type="float" office:value="44583" calcext:value-type="float">
            <text:p>445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521]+1" office:value-type="date" office:date-value="2022-01-23" calcext:value-type="date">
            <text:p>2022/01/23</text:p>
          </table:table-cell>
          <table:table-cell table:style-name="ce422" table:formula="of:=WEEKDAY([.B522])" office:value-type="date" office:date-value="1899-12-31" calcext:value-type="date">
            <text:p>日</text:p>
          </table:table-cell>
          <table:table-cell/>
          <table:table-cell table:formula="of:=[.E521]+1" office:value-type="float" office:value="44584" calcext:value-type="float">
            <text:p>445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522]+6" office:value-type="date" office:date-value="2022-01-29" calcext:value-type="date">
            <text:p>2022/01/29</text:p>
          </table:table-cell>
          <table:table-cell table:style-name="ce422" table:formula="of:=WEEKDAY([.B523])" office:value-type="date" office:date-value="1900-01-06" calcext:value-type="date">
            <text:p>土</text:p>
          </table:table-cell>
          <table:table-cell/>
          <table:table-cell table:formula="of:=[.E522]+6" office:value-type="float" office:value="44590" calcext:value-type="float">
            <text:p>445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523]+1" office:value-type="date" office:date-value="2022-01-30" calcext:value-type="date">
            <text:p>2022/01/30</text:p>
          </table:table-cell>
          <table:table-cell table:style-name="ce422" table:formula="of:=WEEKDAY([.B524])" office:value-type="date" office:date-value="1899-12-31" calcext:value-type="date">
            <text:p>日</text:p>
          </table:table-cell>
          <table:table-cell/>
          <table:table-cell table:formula="of:=[.E523]+1" office:value-type="float" office:value="44591" calcext:value-type="float">
            <text:p>445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524]+6" office:value-type="date" office:date-value="2022-02-05" calcext:value-type="date">
            <text:p>2022/02/05</text:p>
          </table:table-cell>
          <table:table-cell table:style-name="ce422" table:formula="of:=WEEKDAY([.B525])" office:value-type="date" office:date-value="1900-01-06" calcext:value-type="date">
            <text:p>土</text:p>
          </table:table-cell>
          <table:table-cell/>
          <table:table-cell table:formula="of:=[.E524]+6" office:value-type="float" office:value="44597" calcext:value-type="float">
            <text:p>445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525]+1" office:value-type="date" office:date-value="2022-02-06" calcext:value-type="date">
            <text:p>2022/02/06</text:p>
          </table:table-cell>
          <table:table-cell table:style-name="ce422" table:formula="of:=WEEKDAY([.B526])" office:value-type="date" office:date-value="1899-12-31" calcext:value-type="date">
            <text:p>日</text:p>
          </table:table-cell>
          <table:table-cell/>
          <table:table-cell table:formula="of:=[.E525]+1" office:value-type="float" office:value="44598" calcext:value-type="float">
            <text:p>445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526]+6" office:value-type="date" office:date-value="2022-02-12" calcext:value-type="date">
            <text:p>2022/02/12</text:p>
          </table:table-cell>
          <table:table-cell table:style-name="ce422" table:formula="of:=WEEKDAY([.B527])" office:value-type="date" office:date-value="1900-01-06" calcext:value-type="date">
            <text:p>土</text:p>
          </table:table-cell>
          <table:table-cell/>
          <table:table-cell table:formula="of:=[.E526]+6" office:value-type="float" office:value="44604" calcext:value-type="float">
            <text:p>446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527]+1" office:value-type="date" office:date-value="2022-02-13" calcext:value-type="date">
            <text:p>2022/02/13</text:p>
          </table:table-cell>
          <table:table-cell table:style-name="ce422" table:formula="of:=WEEKDAY([.B528])" office:value-type="date" office:date-value="1899-12-31" calcext:value-type="date">
            <text:p>日</text:p>
          </table:table-cell>
          <table:table-cell/>
          <table:table-cell table:formula="of:=[.E527]+1" office:value-type="float" office:value="44605" calcext:value-type="float">
            <text:p>446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528]+6" office:value-type="date" office:date-value="2022-02-19" calcext:value-type="date">
            <text:p>2022/02/19</text:p>
          </table:table-cell>
          <table:table-cell table:style-name="ce422" table:formula="of:=WEEKDAY([.B529])" office:value-type="date" office:date-value="1900-01-06" calcext:value-type="date">
            <text:p>土</text:p>
          </table:table-cell>
          <table:table-cell/>
          <table:table-cell table:formula="of:=[.E528]+6" office:value-type="float" office:value="44611" calcext:value-type="float">
            <text:p>446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529]+1" office:value-type="date" office:date-value="2022-02-20" calcext:value-type="date">
            <text:p>2022/02/20</text:p>
          </table:table-cell>
          <table:table-cell table:style-name="ce422" table:formula="of:=WEEKDAY([.B530])" office:value-type="date" office:date-value="1899-12-31" calcext:value-type="date">
            <text:p>日</text:p>
          </table:table-cell>
          <table:table-cell/>
          <table:table-cell table:formula="of:=[.E529]+1" office:value-type="float" office:value="44612" calcext:value-type="float">
            <text:p>446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530]+6" office:value-type="date" office:date-value="2022-02-26" calcext:value-type="date">
            <text:p>2022/02/26</text:p>
          </table:table-cell>
          <table:table-cell table:style-name="ce422" table:formula="of:=WEEKDAY([.B531])" office:value-type="date" office:date-value="1900-01-06" calcext:value-type="date">
            <text:p>土</text:p>
          </table:table-cell>
          <table:table-cell/>
          <table:table-cell table:formula="of:=[.E530]+6" office:value-type="float" office:value="44618" calcext:value-type="float">
            <text:p>446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531]+1" office:value-type="date" office:date-value="2022-02-27" calcext:value-type="date">
            <text:p>2022/02/27</text:p>
          </table:table-cell>
          <table:table-cell table:style-name="ce422" table:formula="of:=WEEKDAY([.B532])" office:value-type="date" office:date-value="1899-12-31" calcext:value-type="date">
            <text:p>日</text:p>
          </table:table-cell>
          <table:table-cell/>
          <table:table-cell table:formula="of:=[.E531]+1" office:value-type="float" office:value="44619" calcext:value-type="float">
            <text:p>446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532]+6" office:value-type="date" office:date-value="2022-03-05" calcext:value-type="date">
            <text:p>2022/03/05</text:p>
          </table:table-cell>
          <table:table-cell table:style-name="ce422" table:formula="of:=WEEKDAY([.B533])" office:value-type="date" office:date-value="1900-01-06" calcext:value-type="date">
            <text:p>土</text:p>
          </table:table-cell>
          <table:table-cell/>
          <table:table-cell table:formula="of:=[.E532]+6" office:value-type="float" office:value="44625" calcext:value-type="float">
            <text:p>446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533]+1" office:value-type="date" office:date-value="2022-03-06" calcext:value-type="date">
            <text:p>2022/03/06</text:p>
          </table:table-cell>
          <table:table-cell table:style-name="ce422" table:formula="of:=WEEKDAY([.B534])" office:value-type="date" office:date-value="1899-12-31" calcext:value-type="date">
            <text:p>日</text:p>
          </table:table-cell>
          <table:table-cell/>
          <table:table-cell table:formula="of:=[.E533]+1" office:value-type="float" office:value="44626" calcext:value-type="float">
            <text:p>446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534]+6" office:value-type="date" office:date-value="2022-03-12" calcext:value-type="date">
            <text:p>2022/03/12</text:p>
          </table:table-cell>
          <table:table-cell table:style-name="ce422" table:formula="of:=WEEKDAY([.B535])" office:value-type="date" office:date-value="1900-01-06" calcext:value-type="date">
            <text:p>土</text:p>
          </table:table-cell>
          <table:table-cell/>
          <table:table-cell table:formula="of:=[.E534]+6" office:value-type="float" office:value="44632" calcext:value-type="float">
            <text:p>446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535]+1" office:value-type="date" office:date-value="2022-03-13" calcext:value-type="date">
            <text:p>2022/03/13</text:p>
          </table:table-cell>
          <table:table-cell table:style-name="ce422" table:formula="of:=WEEKDAY([.B536])" office:value-type="date" office:date-value="1899-12-31" calcext:value-type="date">
            <text:p>日</text:p>
          </table:table-cell>
          <table:table-cell/>
          <table:table-cell table:formula="of:=[.E535]+1" office:value-type="float" office:value="44633" calcext:value-type="float">
            <text:p>446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536]+6" office:value-type="date" office:date-value="2022-03-19" calcext:value-type="date">
            <text:p>2022/03/19</text:p>
          </table:table-cell>
          <table:table-cell table:style-name="ce422" table:formula="of:=WEEKDAY([.B537])" office:value-type="date" office:date-value="1900-01-06" calcext:value-type="date">
            <text:p>土</text:p>
          </table:table-cell>
          <table:table-cell/>
          <table:table-cell table:formula="of:=[.E536]+6" office:value-type="float" office:value="44639" calcext:value-type="float">
            <text:p>446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537]+1" office:value-type="date" office:date-value="2022-03-20" calcext:value-type="date">
            <text:p>2022/03/20</text:p>
          </table:table-cell>
          <table:table-cell table:style-name="ce422" table:formula="of:=WEEKDAY([.B538])" office:value-type="date" office:date-value="1899-12-31" calcext:value-type="date">
            <text:p>日</text:p>
          </table:table-cell>
          <table:table-cell/>
          <table:table-cell table:formula="of:=[.E537]+1" office:value-type="float" office:value="44640" calcext:value-type="float">
            <text:p>446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538]+6" office:value-type="date" office:date-value="2022-03-26" calcext:value-type="date">
            <text:p>2022/03/26</text:p>
          </table:table-cell>
          <table:table-cell table:style-name="ce422" table:formula="of:=WEEKDAY([.B539])" office:value-type="date" office:date-value="1900-01-06" calcext:value-type="date">
            <text:p>土</text:p>
          </table:table-cell>
          <table:table-cell/>
          <table:table-cell table:formula="of:=[.E538]+6" office:value-type="float" office:value="44646" calcext:value-type="float">
            <text:p>446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539]+1" office:value-type="date" office:date-value="2022-03-27" calcext:value-type="date">
            <text:p>2022/03/27</text:p>
          </table:table-cell>
          <table:table-cell table:style-name="ce422" table:formula="of:=WEEKDAY([.B540])" office:value-type="date" office:date-value="1899-12-31" calcext:value-type="date">
            <text:p>日</text:p>
          </table:table-cell>
          <table:table-cell/>
          <table:table-cell table:formula="of:=[.E539]+1" office:value-type="float" office:value="44647" calcext:value-type="float">
            <text:p>446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540]+6" office:value-type="date" office:date-value="2022-04-02" calcext:value-type="date">
            <text:p>2022/04/02</text:p>
          </table:table-cell>
          <table:table-cell table:style-name="ce422" table:formula="of:=WEEKDAY([.B541])" office:value-type="date" office:date-value="1900-01-06" calcext:value-type="date">
            <text:p>土</text:p>
          </table:table-cell>
          <table:table-cell/>
          <table:table-cell table:formula="of:=[.E540]+6" office:value-type="float" office:value="44653" calcext:value-type="float">
            <text:p>446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541]+1" office:value-type="date" office:date-value="2022-04-03" calcext:value-type="date">
            <text:p>2022/04/03</text:p>
          </table:table-cell>
          <table:table-cell table:style-name="ce422" table:formula="of:=WEEKDAY([.B542])" office:value-type="date" office:date-value="1899-12-31" calcext:value-type="date">
            <text:p>日</text:p>
          </table:table-cell>
          <table:table-cell/>
          <table:table-cell table:formula="of:=[.E541]+1" office:value-type="float" office:value="44654" calcext:value-type="float">
            <text:p>446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542]+6" office:value-type="date" office:date-value="2022-04-09" calcext:value-type="date">
            <text:p>2022/04/09</text:p>
          </table:table-cell>
          <table:table-cell table:style-name="ce422" table:formula="of:=WEEKDAY([.B543])" office:value-type="date" office:date-value="1900-01-06" calcext:value-type="date">
            <text:p>土</text:p>
          </table:table-cell>
          <table:table-cell/>
          <table:table-cell table:formula="of:=[.E542]+6" office:value-type="float" office:value="44660" calcext:value-type="float">
            <text:p>446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543]+1" office:value-type="date" office:date-value="2022-04-10" calcext:value-type="date">
            <text:p>2022/04/10</text:p>
          </table:table-cell>
          <table:table-cell table:style-name="ce422" table:formula="of:=WEEKDAY([.B544])" office:value-type="date" office:date-value="1899-12-31" calcext:value-type="date">
            <text:p>日</text:p>
          </table:table-cell>
          <table:table-cell/>
          <table:table-cell table:formula="of:=[.E543]+1" office:value-type="float" office:value="44661" calcext:value-type="float">
            <text:p>446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544]+6" office:value-type="date" office:date-value="2022-04-16" calcext:value-type="date">
            <text:p>2022/04/16</text:p>
          </table:table-cell>
          <table:table-cell table:style-name="ce422" table:formula="of:=WEEKDAY([.B545])" office:value-type="date" office:date-value="1900-01-06" calcext:value-type="date">
            <text:p>土</text:p>
          </table:table-cell>
          <table:table-cell/>
          <table:table-cell table:formula="of:=[.E544]+6" office:value-type="float" office:value="44667" calcext:value-type="float">
            <text:p>446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545]+1" office:value-type="date" office:date-value="2022-04-17" calcext:value-type="date">
            <text:p>2022/04/17</text:p>
          </table:table-cell>
          <table:table-cell table:style-name="ce422" table:formula="of:=WEEKDAY([.B546])" office:value-type="date" office:date-value="1899-12-31" calcext:value-type="date">
            <text:p>日</text:p>
          </table:table-cell>
          <table:table-cell/>
          <table:table-cell table:formula="of:=[.E545]+1" office:value-type="float" office:value="44668" calcext:value-type="float">
            <text:p>446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546]+6" office:value-type="date" office:date-value="2022-04-23" calcext:value-type="date">
            <text:p>2022/04/23</text:p>
          </table:table-cell>
          <table:table-cell table:style-name="ce422" table:formula="of:=WEEKDAY([.B547])" office:value-type="date" office:date-value="1900-01-06" calcext:value-type="date">
            <text:p>土</text:p>
          </table:table-cell>
          <table:table-cell/>
          <table:table-cell table:formula="of:=[.E546]+6" office:value-type="float" office:value="44674" calcext:value-type="float">
            <text:p>446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547]+1" office:value-type="date" office:date-value="2022-04-24" calcext:value-type="date">
            <text:p>2022/04/24</text:p>
          </table:table-cell>
          <table:table-cell table:style-name="ce422" table:formula="of:=WEEKDAY([.B548])" office:value-type="date" office:date-value="1899-12-31" calcext:value-type="date">
            <text:p>日</text:p>
          </table:table-cell>
          <table:table-cell/>
          <table:table-cell table:formula="of:=[.E547]+1" office:value-type="float" office:value="44675" calcext:value-type="float">
            <text:p>446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548]+6" office:value-type="date" office:date-value="2022-04-30" calcext:value-type="date">
            <text:p>2022/04/30</text:p>
          </table:table-cell>
          <table:table-cell table:style-name="ce422" table:formula="of:=WEEKDAY([.B549])" office:value-type="date" office:date-value="1900-01-06" calcext:value-type="date">
            <text:p>土</text:p>
          </table:table-cell>
          <table:table-cell/>
          <table:table-cell table:formula="of:=[.E548]+6" office:value-type="float" office:value="44681" calcext:value-type="float">
            <text:p>446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549]+1" office:value-type="date" office:date-value="2022-05-01" calcext:value-type="date">
            <text:p>2022/05/01</text:p>
          </table:table-cell>
          <table:table-cell table:style-name="ce422" table:formula="of:=WEEKDAY([.B550])" office:value-type="date" office:date-value="1899-12-31" calcext:value-type="date">
            <text:p>日</text:p>
          </table:table-cell>
          <table:table-cell/>
          <table:table-cell table:formula="of:=[.E549]+1" office:value-type="float" office:value="44682" calcext:value-type="float">
            <text:p>446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550]+6" office:value-type="date" office:date-value="2022-05-07" calcext:value-type="date">
            <text:p>2022/05/07</text:p>
          </table:table-cell>
          <table:table-cell table:style-name="ce422" table:formula="of:=WEEKDAY([.B551])" office:value-type="date" office:date-value="1900-01-06" calcext:value-type="date">
            <text:p>土</text:p>
          </table:table-cell>
          <table:table-cell/>
          <table:table-cell table:formula="of:=[.E550]+6" office:value-type="float" office:value="44688" calcext:value-type="float">
            <text:p>446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551]+1" office:value-type="date" office:date-value="2022-05-08" calcext:value-type="date">
            <text:p>2022/05/08</text:p>
          </table:table-cell>
          <table:table-cell table:style-name="ce422" table:formula="of:=WEEKDAY([.B552])" office:value-type="date" office:date-value="1899-12-31" calcext:value-type="date">
            <text:p>日</text:p>
          </table:table-cell>
          <table:table-cell/>
          <table:table-cell table:formula="of:=[.E551]+1" office:value-type="float" office:value="44689" calcext:value-type="float">
            <text:p>446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552]+6" office:value-type="date" office:date-value="2022-05-14" calcext:value-type="date">
            <text:p>2022/05/14</text:p>
          </table:table-cell>
          <table:table-cell table:style-name="ce422" table:formula="of:=WEEKDAY([.B553])" office:value-type="date" office:date-value="1900-01-06" calcext:value-type="date">
            <text:p>土</text:p>
          </table:table-cell>
          <table:table-cell/>
          <table:table-cell table:formula="of:=[.E552]+6" office:value-type="float" office:value="44695" calcext:value-type="float">
            <text:p>446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553]+1" office:value-type="date" office:date-value="2022-05-15" calcext:value-type="date">
            <text:p>2022/05/15</text:p>
          </table:table-cell>
          <table:table-cell table:style-name="ce422" table:formula="of:=WEEKDAY([.B554])" office:value-type="date" office:date-value="1899-12-31" calcext:value-type="date">
            <text:p>日</text:p>
          </table:table-cell>
          <table:table-cell/>
          <table:table-cell table:formula="of:=[.E553]+1" office:value-type="float" office:value="44696" calcext:value-type="float">
            <text:p>446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554]+6" office:value-type="date" office:date-value="2022-05-21" calcext:value-type="date">
            <text:p>2022/05/21</text:p>
          </table:table-cell>
          <table:table-cell table:style-name="ce422" table:formula="of:=WEEKDAY([.B555])" office:value-type="date" office:date-value="1900-01-06" calcext:value-type="date">
            <text:p>土</text:p>
          </table:table-cell>
          <table:table-cell/>
          <table:table-cell table:formula="of:=[.E554]+6" office:value-type="float" office:value="44702" calcext:value-type="float">
            <text:p>447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555]+1" office:value-type="date" office:date-value="2022-05-22" calcext:value-type="date">
            <text:p>2022/05/22</text:p>
          </table:table-cell>
          <table:table-cell table:style-name="ce422" table:formula="of:=WEEKDAY([.B556])" office:value-type="date" office:date-value="1899-12-31" calcext:value-type="date">
            <text:p>日</text:p>
          </table:table-cell>
          <table:table-cell/>
          <table:table-cell table:formula="of:=[.E555]+1" office:value-type="float" office:value="44703" calcext:value-type="float">
            <text:p>447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556]+6" office:value-type="date" office:date-value="2022-05-28" calcext:value-type="date">
            <text:p>2022/05/28</text:p>
          </table:table-cell>
          <table:table-cell table:style-name="ce422" table:formula="of:=WEEKDAY([.B557])" office:value-type="date" office:date-value="1900-01-06" calcext:value-type="date">
            <text:p>土</text:p>
          </table:table-cell>
          <table:table-cell/>
          <table:table-cell table:formula="of:=[.E556]+6" office:value-type="float" office:value="44709" calcext:value-type="float">
            <text:p>447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557]+1" office:value-type="date" office:date-value="2022-05-29" calcext:value-type="date">
            <text:p>2022/05/29</text:p>
          </table:table-cell>
          <table:table-cell table:style-name="ce422" table:formula="of:=WEEKDAY([.B558])" office:value-type="date" office:date-value="1899-12-31" calcext:value-type="date">
            <text:p>日</text:p>
          </table:table-cell>
          <table:table-cell/>
          <table:table-cell table:formula="of:=[.E557]+1" office:value-type="float" office:value="44710" calcext:value-type="float">
            <text:p>447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558]+6" office:value-type="date" office:date-value="2022-06-04" calcext:value-type="date">
            <text:p>2022/06/04</text:p>
          </table:table-cell>
          <table:table-cell table:style-name="ce422" table:formula="of:=WEEKDAY([.B559])" office:value-type="date" office:date-value="1900-01-06" calcext:value-type="date">
            <text:p>土</text:p>
          </table:table-cell>
          <table:table-cell/>
          <table:table-cell table:formula="of:=[.E558]+6" office:value-type="float" office:value="44716" calcext:value-type="float">
            <text:p>447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559]+1" office:value-type="date" office:date-value="2022-06-05" calcext:value-type="date">
            <text:p>2022/06/05</text:p>
          </table:table-cell>
          <table:table-cell table:style-name="ce422" table:formula="of:=WEEKDAY([.B560])" office:value-type="date" office:date-value="1899-12-31" calcext:value-type="date">
            <text:p>日</text:p>
          </table:table-cell>
          <table:table-cell/>
          <table:table-cell table:formula="of:=[.E559]+1" office:value-type="float" office:value="44717" calcext:value-type="float">
            <text:p>447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560]+6" office:value-type="date" office:date-value="2022-06-11" calcext:value-type="date">
            <text:p>2022/06/11</text:p>
          </table:table-cell>
          <table:table-cell table:style-name="ce422" table:formula="of:=WEEKDAY([.B561])" office:value-type="date" office:date-value="1900-01-06" calcext:value-type="date">
            <text:p>土</text:p>
          </table:table-cell>
          <table:table-cell/>
          <table:table-cell table:formula="of:=[.E560]+6" office:value-type="float" office:value="44723" calcext:value-type="float">
            <text:p>447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561]+1" office:value-type="date" office:date-value="2022-06-12" calcext:value-type="date">
            <text:p>2022/06/12</text:p>
          </table:table-cell>
          <table:table-cell table:style-name="ce422" table:formula="of:=WEEKDAY([.B562])" office:value-type="date" office:date-value="1899-12-31" calcext:value-type="date">
            <text:p>日</text:p>
          </table:table-cell>
          <table:table-cell/>
          <table:table-cell table:formula="of:=[.E561]+1" office:value-type="float" office:value="44724" calcext:value-type="float">
            <text:p>447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562]+6" office:value-type="date" office:date-value="2022-06-18" calcext:value-type="date">
            <text:p>2022/06/18</text:p>
          </table:table-cell>
          <table:table-cell table:style-name="ce422" table:formula="of:=WEEKDAY([.B563])" office:value-type="date" office:date-value="1900-01-06" calcext:value-type="date">
            <text:p>土</text:p>
          </table:table-cell>
          <table:table-cell/>
          <table:table-cell table:formula="of:=[.E562]+6" office:value-type="float" office:value="44730" calcext:value-type="float">
            <text:p>4473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563]+1" office:value-type="date" office:date-value="2022-06-19" calcext:value-type="date">
            <text:p>2022/06/19</text:p>
          </table:table-cell>
          <table:table-cell table:style-name="ce422" table:formula="of:=WEEKDAY([.B564])" office:value-type="date" office:date-value="1899-12-31" calcext:value-type="date">
            <text:p>日</text:p>
          </table:table-cell>
          <table:table-cell/>
          <table:table-cell table:formula="of:=[.E563]+1" office:value-type="float" office:value="44731" calcext:value-type="float">
            <text:p>447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564]+6" office:value-type="date" office:date-value="2022-06-25" calcext:value-type="date">
            <text:p>2022/06/25</text:p>
          </table:table-cell>
          <table:table-cell table:style-name="ce422" table:formula="of:=WEEKDAY([.B565])" office:value-type="date" office:date-value="1900-01-06" calcext:value-type="date">
            <text:p>土</text:p>
          </table:table-cell>
          <table:table-cell/>
          <table:table-cell table:formula="of:=[.E564]+6" office:value-type="float" office:value="44737" calcext:value-type="float">
            <text:p>447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565]+1" office:value-type="date" office:date-value="2022-06-26" calcext:value-type="date">
            <text:p>2022/06/26</text:p>
          </table:table-cell>
          <table:table-cell table:style-name="ce422" table:formula="of:=WEEKDAY([.B566])" office:value-type="date" office:date-value="1899-12-31" calcext:value-type="date">
            <text:p>日</text:p>
          </table:table-cell>
          <table:table-cell/>
          <table:table-cell table:formula="of:=[.E565]+1" office:value-type="float" office:value="44738" calcext:value-type="float">
            <text:p>447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566]+6" office:value-type="date" office:date-value="2022-07-02" calcext:value-type="date">
            <text:p>2022/07/02</text:p>
          </table:table-cell>
          <table:table-cell table:style-name="ce422" table:formula="of:=WEEKDAY([.B567])" office:value-type="date" office:date-value="1900-01-06" calcext:value-type="date">
            <text:p>土</text:p>
          </table:table-cell>
          <table:table-cell/>
          <table:table-cell table:formula="of:=[.E566]+6" office:value-type="float" office:value="44744" calcext:value-type="float">
            <text:p>447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567]+1" office:value-type="date" office:date-value="2022-07-03" calcext:value-type="date">
            <text:p>2022/07/03</text:p>
          </table:table-cell>
          <table:table-cell table:style-name="ce422" table:formula="of:=WEEKDAY([.B568])" office:value-type="date" office:date-value="1899-12-31" calcext:value-type="date">
            <text:p>日</text:p>
          </table:table-cell>
          <table:table-cell/>
          <table:table-cell table:formula="of:=[.E567]+1" office:value-type="float" office:value="44745" calcext:value-type="float">
            <text:p>447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568]+6" office:value-type="date" office:date-value="2022-07-09" calcext:value-type="date">
            <text:p>2022/07/09</text:p>
          </table:table-cell>
          <table:table-cell table:style-name="ce422" table:formula="of:=WEEKDAY([.B569])" office:value-type="date" office:date-value="1900-01-06" calcext:value-type="date">
            <text:p>土</text:p>
          </table:table-cell>
          <table:table-cell/>
          <table:table-cell table:formula="of:=[.E568]+6" office:value-type="float" office:value="44751" calcext:value-type="float">
            <text:p>447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569]+1" office:value-type="date" office:date-value="2022-07-10" calcext:value-type="date">
            <text:p>2022/07/10</text:p>
          </table:table-cell>
          <table:table-cell table:style-name="ce422" table:formula="of:=WEEKDAY([.B570])" office:value-type="date" office:date-value="1899-12-31" calcext:value-type="date">
            <text:p>日</text:p>
          </table:table-cell>
          <table:table-cell/>
          <table:table-cell table:formula="of:=[.E569]+1" office:value-type="float" office:value="44752" calcext:value-type="float">
            <text:p>447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570]+6" office:value-type="date" office:date-value="2022-07-16" calcext:value-type="date">
            <text:p>2022/07/16</text:p>
          </table:table-cell>
          <table:table-cell table:style-name="ce422" table:formula="of:=WEEKDAY([.B571])" office:value-type="date" office:date-value="1900-01-06" calcext:value-type="date">
            <text:p>土</text:p>
          </table:table-cell>
          <table:table-cell/>
          <table:table-cell table:formula="of:=[.E570]+6" office:value-type="float" office:value="44758" calcext:value-type="float">
            <text:p>447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571]+1" office:value-type="date" office:date-value="2022-07-17" calcext:value-type="date">
            <text:p>2022/07/17</text:p>
          </table:table-cell>
          <table:table-cell table:style-name="ce422" table:formula="of:=WEEKDAY([.B572])" office:value-type="date" office:date-value="1899-12-31" calcext:value-type="date">
            <text:p>日</text:p>
          </table:table-cell>
          <table:table-cell/>
          <table:table-cell table:formula="of:=[.E571]+1" office:value-type="float" office:value="44759" calcext:value-type="float">
            <text:p>447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572]+6" office:value-type="date" office:date-value="2022-07-23" calcext:value-type="date">
            <text:p>2022/07/23</text:p>
          </table:table-cell>
          <table:table-cell table:style-name="ce422" table:formula="of:=WEEKDAY([.B573])" office:value-type="date" office:date-value="1900-01-06" calcext:value-type="date">
            <text:p>土</text:p>
          </table:table-cell>
          <table:table-cell/>
          <table:table-cell table:formula="of:=[.E572]+6" office:value-type="float" office:value="44765" calcext:value-type="float">
            <text:p>4476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573]+1" office:value-type="date" office:date-value="2022-07-24" calcext:value-type="date">
            <text:p>2022/07/24</text:p>
          </table:table-cell>
          <table:table-cell table:style-name="ce422" table:formula="of:=WEEKDAY([.B574])" office:value-type="date" office:date-value="1899-12-31" calcext:value-type="date">
            <text:p>日</text:p>
          </table:table-cell>
          <table:table-cell/>
          <table:table-cell table:formula="of:=[.E573]+1" office:value-type="float" office:value="44766" calcext:value-type="float">
            <text:p>4476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574]+6" office:value-type="date" office:date-value="2022-07-30" calcext:value-type="date">
            <text:p>2022/07/30</text:p>
          </table:table-cell>
          <table:table-cell table:style-name="ce422" table:formula="of:=WEEKDAY([.B575])" office:value-type="date" office:date-value="1900-01-06" calcext:value-type="date">
            <text:p>土</text:p>
          </table:table-cell>
          <table:table-cell/>
          <table:table-cell table:formula="of:=[.E574]+6" office:value-type="float" office:value="44772" calcext:value-type="float">
            <text:p>447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575]+1" office:value-type="date" office:date-value="2022-07-31" calcext:value-type="date">
            <text:p>2022/07/31</text:p>
          </table:table-cell>
          <table:table-cell table:style-name="ce422" table:formula="of:=WEEKDAY([.B576])" office:value-type="date" office:date-value="1899-12-31" calcext:value-type="date">
            <text:p>日</text:p>
          </table:table-cell>
          <table:table-cell/>
          <table:table-cell table:formula="of:=[.E575]+1" office:value-type="float" office:value="44773" calcext:value-type="float">
            <text:p>447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576]+6" office:value-type="date" office:date-value="2022-08-06" calcext:value-type="date">
            <text:p>2022/08/06</text:p>
          </table:table-cell>
          <table:table-cell table:style-name="ce422" table:formula="of:=WEEKDAY([.B577])" office:value-type="date" office:date-value="1900-01-06" calcext:value-type="date">
            <text:p>土</text:p>
          </table:table-cell>
          <table:table-cell/>
          <table:table-cell table:formula="of:=[.E576]+6" office:value-type="float" office:value="44779" calcext:value-type="float">
            <text:p>447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577]+1" office:value-type="date" office:date-value="2022-08-07" calcext:value-type="date">
            <text:p>2022/08/07</text:p>
          </table:table-cell>
          <table:table-cell table:style-name="ce422" table:formula="of:=WEEKDAY([.B578])" office:value-type="date" office:date-value="1899-12-31" calcext:value-type="date">
            <text:p>日</text:p>
          </table:table-cell>
          <table:table-cell/>
          <table:table-cell table:formula="of:=[.E577]+1" office:value-type="float" office:value="44780" calcext:value-type="float">
            <text:p>447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578]+6" office:value-type="date" office:date-value="2022-08-13" calcext:value-type="date">
            <text:p>2022/08/13</text:p>
          </table:table-cell>
          <table:table-cell table:style-name="ce422" table:formula="of:=WEEKDAY([.B579])" office:value-type="date" office:date-value="1900-01-06" calcext:value-type="date">
            <text:p>土</text:p>
          </table:table-cell>
          <table:table-cell/>
          <table:table-cell table:formula="of:=[.E578]+6" office:value-type="float" office:value="44786" calcext:value-type="float">
            <text:p>447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579]+1" office:value-type="date" office:date-value="2022-08-14" calcext:value-type="date">
            <text:p>2022/08/14</text:p>
          </table:table-cell>
          <table:table-cell table:style-name="ce422" table:formula="of:=WEEKDAY([.B580])" office:value-type="date" office:date-value="1899-12-31" calcext:value-type="date">
            <text:p>日</text:p>
          </table:table-cell>
          <table:table-cell/>
          <table:table-cell table:formula="of:=[.E579]+1" office:value-type="float" office:value="44787" calcext:value-type="float">
            <text:p>447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580]+6" office:value-type="date" office:date-value="2022-08-20" calcext:value-type="date">
            <text:p>2022/08/20</text:p>
          </table:table-cell>
          <table:table-cell table:style-name="ce422" table:formula="of:=WEEKDAY([.B581])" office:value-type="date" office:date-value="1900-01-06" calcext:value-type="date">
            <text:p>土</text:p>
          </table:table-cell>
          <table:table-cell/>
          <table:table-cell table:formula="of:=[.E580]+6" office:value-type="float" office:value="44793" calcext:value-type="float">
            <text:p>447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581]+1" office:value-type="date" office:date-value="2022-08-21" calcext:value-type="date">
            <text:p>2022/08/21</text:p>
          </table:table-cell>
          <table:table-cell table:style-name="ce422" table:formula="of:=WEEKDAY([.B582])" office:value-type="date" office:date-value="1899-12-31" calcext:value-type="date">
            <text:p>日</text:p>
          </table:table-cell>
          <table:table-cell/>
          <table:table-cell table:formula="of:=[.E581]+1" office:value-type="float" office:value="44794" calcext:value-type="float">
            <text:p>447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582]+6" office:value-type="date" office:date-value="2022-08-27" calcext:value-type="date">
            <text:p>2022/08/27</text:p>
          </table:table-cell>
          <table:table-cell table:style-name="ce422" table:formula="of:=WEEKDAY([.B583])" office:value-type="date" office:date-value="1900-01-06" calcext:value-type="date">
            <text:p>土</text:p>
          </table:table-cell>
          <table:table-cell/>
          <table:table-cell table:formula="of:=[.E582]+6" office:value-type="float" office:value="44800" calcext:value-type="float">
            <text:p>448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583]+1" office:value-type="date" office:date-value="2022-08-28" calcext:value-type="date">
            <text:p>2022/08/28</text:p>
          </table:table-cell>
          <table:table-cell table:style-name="ce422" table:formula="of:=WEEKDAY([.B584])" office:value-type="date" office:date-value="1899-12-31" calcext:value-type="date">
            <text:p>日</text:p>
          </table:table-cell>
          <table:table-cell/>
          <table:table-cell table:formula="of:=[.E583]+1" office:value-type="float" office:value="44801" calcext:value-type="float">
            <text:p>448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584]+6" office:value-type="date" office:date-value="2022-09-03" calcext:value-type="date">
            <text:p>2022/09/03</text:p>
          </table:table-cell>
          <table:table-cell table:style-name="ce422" table:formula="of:=WEEKDAY([.B585])" office:value-type="date" office:date-value="1900-01-06" calcext:value-type="date">
            <text:p>土</text:p>
          </table:table-cell>
          <table:table-cell/>
          <table:table-cell table:formula="of:=[.E584]+6" office:value-type="float" office:value="44807" calcext:value-type="float">
            <text:p>448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585]+1" office:value-type="date" office:date-value="2022-09-04" calcext:value-type="date">
            <text:p>2022/09/04</text:p>
          </table:table-cell>
          <table:table-cell table:style-name="ce422" table:formula="of:=WEEKDAY([.B586])" office:value-type="date" office:date-value="1899-12-31" calcext:value-type="date">
            <text:p>日</text:p>
          </table:table-cell>
          <table:table-cell/>
          <table:table-cell table:formula="of:=[.E585]+1" office:value-type="float" office:value="44808" calcext:value-type="float">
            <text:p>448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586]+6" office:value-type="date" office:date-value="2022-09-10" calcext:value-type="date">
            <text:p>2022/09/10</text:p>
          </table:table-cell>
          <table:table-cell table:style-name="ce422" table:formula="of:=WEEKDAY([.B587])" office:value-type="date" office:date-value="1900-01-06" calcext:value-type="date">
            <text:p>土</text:p>
          </table:table-cell>
          <table:table-cell/>
          <table:table-cell table:formula="of:=[.E586]+6" office:value-type="float" office:value="44814" calcext:value-type="float">
            <text:p>448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587]+1" office:value-type="date" office:date-value="2022-09-11" calcext:value-type="date">
            <text:p>2022/09/11</text:p>
          </table:table-cell>
          <table:table-cell table:style-name="ce422" table:formula="of:=WEEKDAY([.B588])" office:value-type="date" office:date-value="1899-12-31" calcext:value-type="date">
            <text:p>日</text:p>
          </table:table-cell>
          <table:table-cell/>
          <table:table-cell table:formula="of:=[.E587]+1" office:value-type="float" office:value="44815" calcext:value-type="float">
            <text:p>448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588]+6" office:value-type="date" office:date-value="2022-09-17" calcext:value-type="date">
            <text:p>2022/09/17</text:p>
          </table:table-cell>
          <table:table-cell table:style-name="ce422" table:formula="of:=WEEKDAY([.B589])" office:value-type="date" office:date-value="1900-01-06" calcext:value-type="date">
            <text:p>土</text:p>
          </table:table-cell>
          <table:table-cell/>
          <table:table-cell table:formula="of:=[.E588]+6" office:value-type="float" office:value="44821" calcext:value-type="float">
            <text:p>448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589]+1" office:value-type="date" office:date-value="2022-09-18" calcext:value-type="date">
            <text:p>2022/09/18</text:p>
          </table:table-cell>
          <table:table-cell table:style-name="ce422" table:formula="of:=WEEKDAY([.B590])" office:value-type="date" office:date-value="1899-12-31" calcext:value-type="date">
            <text:p>日</text:p>
          </table:table-cell>
          <table:table-cell/>
          <table:table-cell table:formula="of:=[.E589]+1" office:value-type="float" office:value="44822" calcext:value-type="float">
            <text:p>4482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590]+6" office:value-type="date" office:date-value="2022-09-24" calcext:value-type="date">
            <text:p>2022/09/24</text:p>
          </table:table-cell>
          <table:table-cell table:style-name="ce422" table:formula="of:=WEEKDAY([.B591])" office:value-type="date" office:date-value="1900-01-06" calcext:value-type="date">
            <text:p>土</text:p>
          </table:table-cell>
          <table:table-cell/>
          <table:table-cell table:formula="of:=[.E590]+6" office:value-type="float" office:value="44828" calcext:value-type="float">
            <text:p>448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591]+1" office:value-type="date" office:date-value="2022-09-25" calcext:value-type="date">
            <text:p>2022/09/25</text:p>
          </table:table-cell>
          <table:table-cell table:style-name="ce422" table:formula="of:=WEEKDAY([.B592])" office:value-type="date" office:date-value="1899-12-31" calcext:value-type="date">
            <text:p>日</text:p>
          </table:table-cell>
          <table:table-cell/>
          <table:table-cell table:formula="of:=[.E591]+1" office:value-type="float" office:value="44829" calcext:value-type="float">
            <text:p>448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592]+6" office:value-type="date" office:date-value="2022-10-01" calcext:value-type="date">
            <text:p>2022/10/01</text:p>
          </table:table-cell>
          <table:table-cell table:style-name="ce422" table:formula="of:=WEEKDAY([.B593])" office:value-type="date" office:date-value="1900-01-06" calcext:value-type="date">
            <text:p>土</text:p>
          </table:table-cell>
          <table:table-cell/>
          <table:table-cell table:formula="of:=[.E592]+6" office:value-type="float" office:value="44835" calcext:value-type="float">
            <text:p>448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593]+1" office:value-type="date" office:date-value="2022-10-02" calcext:value-type="date">
            <text:p>2022/10/02</text:p>
          </table:table-cell>
          <table:table-cell table:style-name="ce422" table:formula="of:=WEEKDAY([.B594])" office:value-type="date" office:date-value="1899-12-31" calcext:value-type="date">
            <text:p>日</text:p>
          </table:table-cell>
          <table:table-cell/>
          <table:table-cell table:formula="of:=[.E593]+1" office:value-type="float" office:value="44836" calcext:value-type="float">
            <text:p>448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594]+6" office:value-type="date" office:date-value="2022-10-08" calcext:value-type="date">
            <text:p>2022/10/08</text:p>
          </table:table-cell>
          <table:table-cell table:style-name="ce422" table:formula="of:=WEEKDAY([.B595])" office:value-type="date" office:date-value="1900-01-06" calcext:value-type="date">
            <text:p>土</text:p>
          </table:table-cell>
          <table:table-cell/>
          <table:table-cell table:formula="of:=[.E594]+6" office:value-type="float" office:value="44842" calcext:value-type="float">
            <text:p>448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595]+1" office:value-type="date" office:date-value="2022-10-09" calcext:value-type="date">
            <text:p>2022/10/09</text:p>
          </table:table-cell>
          <table:table-cell table:style-name="ce422" table:formula="of:=WEEKDAY([.B596])" office:value-type="date" office:date-value="1899-12-31" calcext:value-type="date">
            <text:p>日</text:p>
          </table:table-cell>
          <table:table-cell/>
          <table:table-cell table:formula="of:=[.E595]+1" office:value-type="float" office:value="44843" calcext:value-type="float">
            <text:p>448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596]+6" office:value-type="date" office:date-value="2022-10-15" calcext:value-type="date">
            <text:p>2022/10/15</text:p>
          </table:table-cell>
          <table:table-cell table:style-name="ce422" table:formula="of:=WEEKDAY([.B597])" office:value-type="date" office:date-value="1900-01-06" calcext:value-type="date">
            <text:p>土</text:p>
          </table:table-cell>
          <table:table-cell/>
          <table:table-cell table:formula="of:=[.E596]+6" office:value-type="float" office:value="44849" calcext:value-type="float">
            <text:p>448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597]+1" office:value-type="date" office:date-value="2022-10-16" calcext:value-type="date">
            <text:p>2022/10/16</text:p>
          </table:table-cell>
          <table:table-cell table:style-name="ce422" table:formula="of:=WEEKDAY([.B598])" office:value-type="date" office:date-value="1899-12-31" calcext:value-type="date">
            <text:p>日</text:p>
          </table:table-cell>
          <table:table-cell/>
          <table:table-cell table:formula="of:=[.E597]+1" office:value-type="float" office:value="44850" calcext:value-type="float">
            <text:p>448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598]+6" office:value-type="date" office:date-value="2022-10-22" calcext:value-type="date">
            <text:p>2022/10/22</text:p>
          </table:table-cell>
          <table:table-cell table:style-name="ce422" table:formula="of:=WEEKDAY([.B599])" office:value-type="date" office:date-value="1900-01-06" calcext:value-type="date">
            <text:p>土</text:p>
          </table:table-cell>
          <table:table-cell/>
          <table:table-cell table:formula="of:=[.E598]+6" office:value-type="float" office:value="44856" calcext:value-type="float">
            <text:p>448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599]+1" office:value-type="date" office:date-value="2022-10-23" calcext:value-type="date">
            <text:p>2022/10/23</text:p>
          </table:table-cell>
          <table:table-cell table:style-name="ce422" table:formula="of:=WEEKDAY([.B600])" office:value-type="date" office:date-value="1899-12-31" calcext:value-type="date">
            <text:p>日</text:p>
          </table:table-cell>
          <table:table-cell/>
          <table:table-cell table:formula="of:=[.E599]+1" office:value-type="float" office:value="44857" calcext:value-type="float">
            <text:p>448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600]+6" office:value-type="date" office:date-value="2022-10-29" calcext:value-type="date">
            <text:p>2022/10/29</text:p>
          </table:table-cell>
          <table:table-cell table:style-name="ce422" table:formula="of:=WEEKDAY([.B601])" office:value-type="date" office:date-value="1900-01-06" calcext:value-type="date">
            <text:p>土</text:p>
          </table:table-cell>
          <table:table-cell/>
          <table:table-cell table:formula="of:=[.E600]+6" office:value-type="float" office:value="44863" calcext:value-type="float">
            <text:p>448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601]+1" office:value-type="date" office:date-value="2022-10-30" calcext:value-type="date">
            <text:p>2022/10/30</text:p>
          </table:table-cell>
          <table:table-cell table:style-name="ce422" table:formula="of:=WEEKDAY([.B602])" office:value-type="date" office:date-value="1899-12-31" calcext:value-type="date">
            <text:p>日</text:p>
          </table:table-cell>
          <table:table-cell/>
          <table:table-cell table:formula="of:=[.E601]+1" office:value-type="float" office:value="44864" calcext:value-type="float">
            <text:p>448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602]+6" office:value-type="date" office:date-value="2022-11-05" calcext:value-type="date">
            <text:p>2022/11/05</text:p>
          </table:table-cell>
          <table:table-cell table:style-name="ce422" table:formula="of:=WEEKDAY([.B603])" office:value-type="date" office:date-value="1900-01-06" calcext:value-type="date">
            <text:p>土</text:p>
          </table:table-cell>
          <table:table-cell/>
          <table:table-cell table:formula="of:=[.E602]+6" office:value-type="float" office:value="44870" calcext:value-type="float">
            <text:p>448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603]+1" office:value-type="date" office:date-value="2022-11-06" calcext:value-type="date">
            <text:p>2022/11/06</text:p>
          </table:table-cell>
          <table:table-cell table:style-name="ce422" table:formula="of:=WEEKDAY([.B604])" office:value-type="date" office:date-value="1899-12-31" calcext:value-type="date">
            <text:p>日</text:p>
          </table:table-cell>
          <table:table-cell/>
          <table:table-cell table:formula="of:=[.E603]+1" office:value-type="float" office:value="44871" calcext:value-type="float">
            <text:p>448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604]+6" office:value-type="date" office:date-value="2022-11-12" calcext:value-type="date">
            <text:p>2022/11/12</text:p>
          </table:table-cell>
          <table:table-cell table:style-name="ce422" table:formula="of:=WEEKDAY([.B605])" office:value-type="date" office:date-value="1900-01-06" calcext:value-type="date">
            <text:p>土</text:p>
          </table:table-cell>
          <table:table-cell/>
          <table:table-cell table:formula="of:=[.E604]+6" office:value-type="float" office:value="44877" calcext:value-type="float">
            <text:p>448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605]+1" office:value-type="date" office:date-value="2022-11-13" calcext:value-type="date">
            <text:p>2022/11/13</text:p>
          </table:table-cell>
          <table:table-cell table:style-name="ce422" table:formula="of:=WEEKDAY([.B606])" office:value-type="date" office:date-value="1899-12-31" calcext:value-type="date">
            <text:p>日</text:p>
          </table:table-cell>
          <table:table-cell/>
          <table:table-cell table:formula="of:=[.E605]+1" office:value-type="float" office:value="44878" calcext:value-type="float">
            <text:p>448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606]+6" office:value-type="date" office:date-value="2022-11-19" calcext:value-type="date">
            <text:p>2022/11/19</text:p>
          </table:table-cell>
          <table:table-cell table:style-name="ce422" table:formula="of:=WEEKDAY([.B607])" office:value-type="date" office:date-value="1900-01-06" calcext:value-type="date">
            <text:p>土</text:p>
          </table:table-cell>
          <table:table-cell/>
          <table:table-cell table:formula="of:=[.E606]+6" office:value-type="float" office:value="44884" calcext:value-type="float">
            <text:p>448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607]+1" office:value-type="date" office:date-value="2022-11-20" calcext:value-type="date">
            <text:p>2022/11/20</text:p>
          </table:table-cell>
          <table:table-cell table:style-name="ce422" table:formula="of:=WEEKDAY([.B608])" office:value-type="date" office:date-value="1899-12-31" calcext:value-type="date">
            <text:p>日</text:p>
          </table:table-cell>
          <table:table-cell/>
          <table:table-cell table:formula="of:=[.E607]+1" office:value-type="float" office:value="44885" calcext:value-type="float">
            <text:p>448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608]+6" office:value-type="date" office:date-value="2022-11-26" calcext:value-type="date">
            <text:p>2022/11/26</text:p>
          </table:table-cell>
          <table:table-cell table:style-name="ce422" table:formula="of:=WEEKDAY([.B609])" office:value-type="date" office:date-value="1900-01-06" calcext:value-type="date">
            <text:p>土</text:p>
          </table:table-cell>
          <table:table-cell/>
          <table:table-cell table:formula="of:=[.E608]+6" office:value-type="float" office:value="44891" calcext:value-type="float">
            <text:p>448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609]+1" office:value-type="date" office:date-value="2022-11-27" calcext:value-type="date">
            <text:p>2022/11/27</text:p>
          </table:table-cell>
          <table:table-cell table:style-name="ce422" table:formula="of:=WEEKDAY([.B610])" office:value-type="date" office:date-value="1899-12-31" calcext:value-type="date">
            <text:p>日</text:p>
          </table:table-cell>
          <table:table-cell/>
          <table:table-cell table:formula="of:=[.E609]+1" office:value-type="float" office:value="44892" calcext:value-type="float">
            <text:p>448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610]+6" office:value-type="date" office:date-value="2022-12-03" calcext:value-type="date">
            <text:p>2022/12/03</text:p>
          </table:table-cell>
          <table:table-cell table:style-name="ce422" table:formula="of:=WEEKDAY([.B611])" office:value-type="date" office:date-value="1900-01-06" calcext:value-type="date">
            <text:p>土</text:p>
          </table:table-cell>
          <table:table-cell/>
          <table:table-cell table:formula="of:=[.E610]+6" office:value-type="float" office:value="44898" calcext:value-type="float">
            <text:p>448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611]+1" office:value-type="date" office:date-value="2022-12-04" calcext:value-type="date">
            <text:p>2022/12/04</text:p>
          </table:table-cell>
          <table:table-cell table:style-name="ce422" table:formula="of:=WEEKDAY([.B612])" office:value-type="date" office:date-value="1899-12-31" calcext:value-type="date">
            <text:p>日</text:p>
          </table:table-cell>
          <table:table-cell/>
          <table:table-cell table:formula="of:=[.E611]+1" office:value-type="float" office:value="44899" calcext:value-type="float">
            <text:p>448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612]+6" office:value-type="date" office:date-value="2022-12-10" calcext:value-type="date">
            <text:p>2022/12/10</text:p>
          </table:table-cell>
          <table:table-cell table:style-name="ce422" table:formula="of:=WEEKDAY([.B613])" office:value-type="date" office:date-value="1900-01-06" calcext:value-type="date">
            <text:p>土</text:p>
          </table:table-cell>
          <table:table-cell/>
          <table:table-cell table:formula="of:=[.E612]+6" office:value-type="float" office:value="44905" calcext:value-type="float">
            <text:p>449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613]+1" office:value-type="date" office:date-value="2022-12-11" calcext:value-type="date">
            <text:p>2022/12/11</text:p>
          </table:table-cell>
          <table:table-cell table:style-name="ce422" table:formula="of:=WEEKDAY([.B614])" office:value-type="date" office:date-value="1899-12-31" calcext:value-type="date">
            <text:p>日</text:p>
          </table:table-cell>
          <table:table-cell/>
          <table:table-cell table:formula="of:=[.E613]+1" office:value-type="float" office:value="44906" calcext:value-type="float">
            <text:p>449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614]+6" office:value-type="date" office:date-value="2022-12-17" calcext:value-type="date">
            <text:p>2022/12/17</text:p>
          </table:table-cell>
          <table:table-cell table:style-name="ce422" table:formula="of:=WEEKDAY([.B615])" office:value-type="date" office:date-value="1900-01-06" calcext:value-type="date">
            <text:p>土</text:p>
          </table:table-cell>
          <table:table-cell/>
          <table:table-cell table:formula="of:=[.E614]+6" office:value-type="float" office:value="44912" calcext:value-type="float">
            <text:p>449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615]+1" office:value-type="date" office:date-value="2022-12-18" calcext:value-type="date">
            <text:p>2022/12/18</text:p>
          </table:table-cell>
          <table:table-cell table:style-name="ce422" table:formula="of:=WEEKDAY([.B616])" office:value-type="date" office:date-value="1899-12-31" calcext:value-type="date">
            <text:p>日</text:p>
          </table:table-cell>
          <table:table-cell/>
          <table:table-cell table:formula="of:=[.E615]+1" office:value-type="float" office:value="44913" calcext:value-type="float">
            <text:p>4491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616]+6" office:value-type="date" office:date-value="2022-12-24" calcext:value-type="date">
            <text:p>2022/12/24</text:p>
          </table:table-cell>
          <table:table-cell table:style-name="ce422" table:formula="of:=WEEKDAY([.B617])" office:value-type="date" office:date-value="1900-01-06" calcext:value-type="date">
            <text:p>土</text:p>
          </table:table-cell>
          <table:table-cell/>
          <table:table-cell table:formula="of:=[.E616]+6" office:value-type="float" office:value="44919" calcext:value-type="float">
            <text:p>449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617]+1" office:value-type="date" office:date-value="2022-12-25" calcext:value-type="date">
            <text:p>2022/12/25</text:p>
          </table:table-cell>
          <table:table-cell table:style-name="ce422" table:formula="of:=WEEKDAY([.B618])" office:value-type="date" office:date-value="1899-12-31" calcext:value-type="date">
            <text:p>日</text:p>
          </table:table-cell>
          <table:table-cell/>
          <table:table-cell table:formula="of:=[.E617]+1" office:value-type="float" office:value="44920" calcext:value-type="float">
            <text:p>449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618]+6" office:value-type="date" office:date-value="2022-12-31" calcext:value-type="date">
            <text:p>2022/12/31</text:p>
          </table:table-cell>
          <table:table-cell table:style-name="ce422" table:formula="of:=WEEKDAY([.B619])" office:value-type="date" office:date-value="1900-01-06" calcext:value-type="date">
            <text:p>土</text:p>
          </table:table-cell>
          <table:table-cell/>
          <table:table-cell table:formula="of:=[.E618]+6" office:value-type="float" office:value="44926" calcext:value-type="float">
            <text:p>449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619]+1" office:value-type="date" office:date-value="2023-01-01" calcext:value-type="date">
            <text:p>2023/01/01</text:p>
          </table:table-cell>
          <table:table-cell table:style-name="ce422" table:formula="of:=WEEKDAY([.B620])" office:value-type="date" office:date-value="1899-12-31" calcext:value-type="date">
            <text:p>日</text:p>
          </table:table-cell>
          <table:table-cell/>
          <table:table-cell table:formula="of:=[.E619]+1" office:value-type="float" office:value="44927" calcext:value-type="float">
            <text:p>449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620]+6" office:value-type="date" office:date-value="2023-01-07" calcext:value-type="date">
            <text:p>2023/01/07</text:p>
          </table:table-cell>
          <table:table-cell table:style-name="ce422" table:formula="of:=WEEKDAY([.B621])" office:value-type="date" office:date-value="1900-01-06" calcext:value-type="date">
            <text:p>土</text:p>
          </table:table-cell>
          <table:table-cell/>
          <table:table-cell table:formula="of:=[.E620]+6" office:value-type="float" office:value="44933" calcext:value-type="float">
            <text:p>449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621]+1" office:value-type="date" office:date-value="2023-01-08" calcext:value-type="date">
            <text:p>2023/01/08</text:p>
          </table:table-cell>
          <table:table-cell table:style-name="ce422" table:formula="of:=WEEKDAY([.B622])" office:value-type="date" office:date-value="1899-12-31" calcext:value-type="date">
            <text:p>日</text:p>
          </table:table-cell>
          <table:table-cell/>
          <table:table-cell table:formula="of:=[.E621]+1" office:value-type="float" office:value="44934" calcext:value-type="float">
            <text:p>449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622]+6" office:value-type="date" office:date-value="2023-01-14" calcext:value-type="date">
            <text:p>2023/01/14</text:p>
          </table:table-cell>
          <table:table-cell table:style-name="ce422" table:formula="of:=WEEKDAY([.B623])" office:value-type="date" office:date-value="1900-01-06" calcext:value-type="date">
            <text:p>土</text:p>
          </table:table-cell>
          <table:table-cell/>
          <table:table-cell table:formula="of:=[.E622]+6" office:value-type="float" office:value="44940" calcext:value-type="float">
            <text:p>449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623]+1" office:value-type="date" office:date-value="2023-01-15" calcext:value-type="date">
            <text:p>2023/01/15</text:p>
          </table:table-cell>
          <table:table-cell table:style-name="ce422" table:formula="of:=WEEKDAY([.B624])" office:value-type="date" office:date-value="1899-12-31" calcext:value-type="date">
            <text:p>日</text:p>
          </table:table-cell>
          <table:table-cell/>
          <table:table-cell table:formula="of:=[.E623]+1" office:value-type="float" office:value="44941" calcext:value-type="float">
            <text:p>449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624]+6" office:value-type="date" office:date-value="2023-01-21" calcext:value-type="date">
            <text:p>2023/01/21</text:p>
          </table:table-cell>
          <table:table-cell table:style-name="ce422" table:formula="of:=WEEKDAY([.B625])" office:value-type="date" office:date-value="1900-01-06" calcext:value-type="date">
            <text:p>土</text:p>
          </table:table-cell>
          <table:table-cell/>
          <table:table-cell table:formula="of:=[.E624]+6" office:value-type="float" office:value="44947" calcext:value-type="float">
            <text:p>449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625]+1" office:value-type="date" office:date-value="2023-01-22" calcext:value-type="date">
            <text:p>2023/01/22</text:p>
          </table:table-cell>
          <table:table-cell table:style-name="ce422" table:formula="of:=WEEKDAY([.B626])" office:value-type="date" office:date-value="1899-12-31" calcext:value-type="date">
            <text:p>日</text:p>
          </table:table-cell>
          <table:table-cell/>
          <table:table-cell table:formula="of:=[.E625]+1" office:value-type="float" office:value="44948" calcext:value-type="float">
            <text:p>449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626]+6" office:value-type="date" office:date-value="2023-01-28" calcext:value-type="date">
            <text:p>2023/01/28</text:p>
          </table:table-cell>
          <table:table-cell table:style-name="ce422" table:formula="of:=WEEKDAY([.B627])" office:value-type="date" office:date-value="1900-01-06" calcext:value-type="date">
            <text:p>土</text:p>
          </table:table-cell>
          <table:table-cell/>
          <table:table-cell table:formula="of:=[.E626]+6" office:value-type="float" office:value="44954" calcext:value-type="float">
            <text:p>449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627]+1" office:value-type="date" office:date-value="2023-01-29" calcext:value-type="date">
            <text:p>2023/01/29</text:p>
          </table:table-cell>
          <table:table-cell table:style-name="ce422" table:formula="of:=WEEKDAY([.B628])" office:value-type="date" office:date-value="1899-12-31" calcext:value-type="date">
            <text:p>日</text:p>
          </table:table-cell>
          <table:table-cell/>
          <table:table-cell table:formula="of:=[.E627]+1" office:value-type="float" office:value="44955" calcext:value-type="float">
            <text:p>449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628]+6" office:value-type="date" office:date-value="2023-02-04" calcext:value-type="date">
            <text:p>2023/02/04</text:p>
          </table:table-cell>
          <table:table-cell table:style-name="ce422" table:formula="of:=WEEKDAY([.B629])" office:value-type="date" office:date-value="1900-01-06" calcext:value-type="date">
            <text:p>土</text:p>
          </table:table-cell>
          <table:table-cell/>
          <table:table-cell table:formula="of:=[.E628]+6" office:value-type="float" office:value="44961" calcext:value-type="float">
            <text:p>449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629]+1" office:value-type="date" office:date-value="2023-02-05" calcext:value-type="date">
            <text:p>2023/02/05</text:p>
          </table:table-cell>
          <table:table-cell table:style-name="ce422" table:formula="of:=WEEKDAY([.B630])" office:value-type="date" office:date-value="1899-12-31" calcext:value-type="date">
            <text:p>日</text:p>
          </table:table-cell>
          <table:table-cell/>
          <table:table-cell table:formula="of:=[.E629]+1" office:value-type="float" office:value="44962" calcext:value-type="float">
            <text:p>449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630]+6" office:value-type="date" office:date-value="2023-02-11" calcext:value-type="date">
            <text:p>2023/02/11</text:p>
          </table:table-cell>
          <table:table-cell table:style-name="ce422" table:formula="of:=WEEKDAY([.B631])" office:value-type="date" office:date-value="1900-01-06" calcext:value-type="date">
            <text:p>土</text:p>
          </table:table-cell>
          <table:table-cell/>
          <table:table-cell table:formula="of:=[.E630]+6" office:value-type="float" office:value="44968" calcext:value-type="float">
            <text:p>449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631]+1" office:value-type="date" office:date-value="2023-02-12" calcext:value-type="date">
            <text:p>2023/02/12</text:p>
          </table:table-cell>
          <table:table-cell table:style-name="ce422" table:formula="of:=WEEKDAY([.B632])" office:value-type="date" office:date-value="1899-12-31" calcext:value-type="date">
            <text:p>日</text:p>
          </table:table-cell>
          <table:table-cell/>
          <table:table-cell table:formula="of:=[.E631]+1" office:value-type="float" office:value="44969" calcext:value-type="float">
            <text:p>449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632]+6" office:value-type="date" office:date-value="2023-02-18" calcext:value-type="date">
            <text:p>2023/02/18</text:p>
          </table:table-cell>
          <table:table-cell table:style-name="ce422" table:formula="of:=WEEKDAY([.B633])" office:value-type="date" office:date-value="1900-01-06" calcext:value-type="date">
            <text:p>土</text:p>
          </table:table-cell>
          <table:table-cell/>
          <table:table-cell table:formula="of:=[.E632]+6" office:value-type="float" office:value="44975" calcext:value-type="float">
            <text:p>449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633]+1" office:value-type="date" office:date-value="2023-02-19" calcext:value-type="date">
            <text:p>2023/02/19</text:p>
          </table:table-cell>
          <table:table-cell table:style-name="ce422" table:formula="of:=WEEKDAY([.B634])" office:value-type="date" office:date-value="1899-12-31" calcext:value-type="date">
            <text:p>日</text:p>
          </table:table-cell>
          <table:table-cell/>
          <table:table-cell table:formula="of:=[.E633]+1" office:value-type="float" office:value="44976" calcext:value-type="float">
            <text:p>449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634]+6" office:value-type="date" office:date-value="2023-02-25" calcext:value-type="date">
            <text:p>2023/02/25</text:p>
          </table:table-cell>
          <table:table-cell table:style-name="ce422" table:formula="of:=WEEKDAY([.B635])" office:value-type="date" office:date-value="1900-01-06" calcext:value-type="date">
            <text:p>土</text:p>
          </table:table-cell>
          <table:table-cell/>
          <table:table-cell table:formula="of:=[.E634]+6" office:value-type="float" office:value="44982" calcext:value-type="float">
            <text:p>449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635]+1" office:value-type="date" office:date-value="2023-02-26" calcext:value-type="date">
            <text:p>2023/02/26</text:p>
          </table:table-cell>
          <table:table-cell table:style-name="ce422" table:formula="of:=WEEKDAY([.B636])" office:value-type="date" office:date-value="1899-12-31" calcext:value-type="date">
            <text:p>日</text:p>
          </table:table-cell>
          <table:table-cell/>
          <table:table-cell table:formula="of:=[.E635]+1" office:value-type="float" office:value="44983" calcext:value-type="float">
            <text:p>449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636]+6" office:value-type="date" office:date-value="2023-03-04" calcext:value-type="date">
            <text:p>2023/03/04</text:p>
          </table:table-cell>
          <table:table-cell table:style-name="ce422" table:formula="of:=WEEKDAY([.B637])" office:value-type="date" office:date-value="1900-01-06" calcext:value-type="date">
            <text:p>土</text:p>
          </table:table-cell>
          <table:table-cell/>
          <table:table-cell table:formula="of:=[.E636]+6" office:value-type="float" office:value="44989" calcext:value-type="float">
            <text:p>449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637]+1" office:value-type="date" office:date-value="2023-03-05" calcext:value-type="date">
            <text:p>2023/03/05</text:p>
          </table:table-cell>
          <table:table-cell table:style-name="ce422" table:formula="of:=WEEKDAY([.B638])" office:value-type="date" office:date-value="1899-12-31" calcext:value-type="date">
            <text:p>日</text:p>
          </table:table-cell>
          <table:table-cell/>
          <table:table-cell table:formula="of:=[.E637]+1" office:value-type="float" office:value="44990" calcext:value-type="float">
            <text:p>449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638]+6" office:value-type="date" office:date-value="2023-03-11" calcext:value-type="date">
            <text:p>2023/03/11</text:p>
          </table:table-cell>
          <table:table-cell table:style-name="ce422" table:formula="of:=WEEKDAY([.B639])" office:value-type="date" office:date-value="1900-01-06" calcext:value-type="date">
            <text:p>土</text:p>
          </table:table-cell>
          <table:table-cell/>
          <table:table-cell table:formula="of:=[.E638]+6" office:value-type="float" office:value="44996" calcext:value-type="float">
            <text:p>449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639]+1" office:value-type="date" office:date-value="2023-03-12" calcext:value-type="date">
            <text:p>2023/03/12</text:p>
          </table:table-cell>
          <table:table-cell table:style-name="ce422" table:formula="of:=WEEKDAY([.B640])" office:value-type="date" office:date-value="1899-12-31" calcext:value-type="date">
            <text:p>日</text:p>
          </table:table-cell>
          <table:table-cell/>
          <table:table-cell table:formula="of:=[.E639]+1" office:value-type="float" office:value="44997" calcext:value-type="float">
            <text:p>449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640]+6" office:value-type="date" office:date-value="2023-03-18" calcext:value-type="date">
            <text:p>2023/03/18</text:p>
          </table:table-cell>
          <table:table-cell table:style-name="ce422" table:formula="of:=WEEKDAY([.B641])" office:value-type="date" office:date-value="1900-01-06" calcext:value-type="date">
            <text:p>土</text:p>
          </table:table-cell>
          <table:table-cell/>
          <table:table-cell table:formula="of:=[.E640]+6" office:value-type="float" office:value="45003" calcext:value-type="float">
            <text:p>450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641]+1" office:value-type="date" office:date-value="2023-03-19" calcext:value-type="date">
            <text:p>2023/03/19</text:p>
          </table:table-cell>
          <table:table-cell table:style-name="ce422" table:formula="of:=WEEKDAY([.B642])" office:value-type="date" office:date-value="1899-12-31" calcext:value-type="date">
            <text:p>日</text:p>
          </table:table-cell>
          <table:table-cell/>
          <table:table-cell table:formula="of:=[.E641]+1" office:value-type="float" office:value="45004" calcext:value-type="float">
            <text:p>450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642]+6" office:value-type="date" office:date-value="2023-03-25" calcext:value-type="date">
            <text:p>2023/03/25</text:p>
          </table:table-cell>
          <table:table-cell table:style-name="ce422" table:formula="of:=WEEKDAY([.B643])" office:value-type="date" office:date-value="1900-01-06" calcext:value-type="date">
            <text:p>土</text:p>
          </table:table-cell>
          <table:table-cell/>
          <table:table-cell table:formula="of:=[.E642]+6" office:value-type="float" office:value="45010" calcext:value-type="float">
            <text:p>450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643]+1" office:value-type="date" office:date-value="2023-03-26" calcext:value-type="date">
            <text:p>2023/03/26</text:p>
          </table:table-cell>
          <table:table-cell table:style-name="ce422" table:formula="of:=WEEKDAY([.B644])" office:value-type="date" office:date-value="1899-12-31" calcext:value-type="date">
            <text:p>日</text:p>
          </table:table-cell>
          <table:table-cell/>
          <table:table-cell table:formula="of:=[.E643]+1" office:value-type="float" office:value="45011" calcext:value-type="float">
            <text:p>450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644]+6" office:value-type="date" office:date-value="2023-04-01" calcext:value-type="date">
            <text:p>2023/04/01</text:p>
          </table:table-cell>
          <table:table-cell table:style-name="ce422" table:formula="of:=WEEKDAY([.B645])" office:value-type="date" office:date-value="1900-01-06" calcext:value-type="date">
            <text:p>土</text:p>
          </table:table-cell>
          <table:table-cell/>
          <table:table-cell table:formula="of:=[.E644]+6" office:value-type="float" office:value="45017" calcext:value-type="float">
            <text:p>450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645]+1" office:value-type="date" office:date-value="2023-04-02" calcext:value-type="date">
            <text:p>2023/04/02</text:p>
          </table:table-cell>
          <table:table-cell table:style-name="ce422" table:formula="of:=WEEKDAY([.B646])" office:value-type="date" office:date-value="1899-12-31" calcext:value-type="date">
            <text:p>日</text:p>
          </table:table-cell>
          <table:table-cell/>
          <table:table-cell table:formula="of:=[.E645]+1" office:value-type="float" office:value="45018" calcext:value-type="float">
            <text:p>450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646]+6" office:value-type="date" office:date-value="2023-04-08" calcext:value-type="date">
            <text:p>2023/04/08</text:p>
          </table:table-cell>
          <table:table-cell table:style-name="ce422" table:formula="of:=WEEKDAY([.B647])" office:value-type="date" office:date-value="1900-01-06" calcext:value-type="date">
            <text:p>土</text:p>
          </table:table-cell>
          <table:table-cell/>
          <table:table-cell table:formula="of:=[.E646]+6" office:value-type="float" office:value="45024" calcext:value-type="float">
            <text:p>450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647]+1" office:value-type="date" office:date-value="2023-04-09" calcext:value-type="date">
            <text:p>2023/04/09</text:p>
          </table:table-cell>
          <table:table-cell table:style-name="ce422" table:formula="of:=WEEKDAY([.B648])" office:value-type="date" office:date-value="1899-12-31" calcext:value-type="date">
            <text:p>日</text:p>
          </table:table-cell>
          <table:table-cell/>
          <table:table-cell table:formula="of:=[.E647]+1" office:value-type="float" office:value="45025" calcext:value-type="float">
            <text:p>450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648]+6" office:value-type="date" office:date-value="2023-04-15" calcext:value-type="date">
            <text:p>2023/04/15</text:p>
          </table:table-cell>
          <table:table-cell table:style-name="ce422" table:formula="of:=WEEKDAY([.B649])" office:value-type="date" office:date-value="1900-01-06" calcext:value-type="date">
            <text:p>土</text:p>
          </table:table-cell>
          <table:table-cell/>
          <table:table-cell table:formula="of:=[.E648]+6" office:value-type="float" office:value="45031" calcext:value-type="float">
            <text:p>450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649]+1" office:value-type="date" office:date-value="2023-04-16" calcext:value-type="date">
            <text:p>2023/04/16</text:p>
          </table:table-cell>
          <table:table-cell table:style-name="ce422" table:formula="of:=WEEKDAY([.B650])" office:value-type="date" office:date-value="1899-12-31" calcext:value-type="date">
            <text:p>日</text:p>
          </table:table-cell>
          <table:table-cell/>
          <table:table-cell table:formula="of:=[.E649]+1" office:value-type="float" office:value="45032" calcext:value-type="float">
            <text:p>450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650]+6" office:value-type="date" office:date-value="2023-04-22" calcext:value-type="date">
            <text:p>2023/04/22</text:p>
          </table:table-cell>
          <table:table-cell table:style-name="ce422" table:formula="of:=WEEKDAY([.B651])" office:value-type="date" office:date-value="1900-01-06" calcext:value-type="date">
            <text:p>土</text:p>
          </table:table-cell>
          <table:table-cell/>
          <table:table-cell table:formula="of:=[.E650]+6" office:value-type="float" office:value="45038" calcext:value-type="float">
            <text:p>450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651]+1" office:value-type="date" office:date-value="2023-04-23" calcext:value-type="date">
            <text:p>2023/04/23</text:p>
          </table:table-cell>
          <table:table-cell table:style-name="ce422" table:formula="of:=WEEKDAY([.B652])" office:value-type="date" office:date-value="1899-12-31" calcext:value-type="date">
            <text:p>日</text:p>
          </table:table-cell>
          <table:table-cell/>
          <table:table-cell table:formula="of:=[.E651]+1" office:value-type="float" office:value="45039" calcext:value-type="float">
            <text:p>450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652]+6" office:value-type="date" office:date-value="2023-04-29" calcext:value-type="date">
            <text:p>2023/04/29</text:p>
          </table:table-cell>
          <table:table-cell table:style-name="ce422" table:formula="of:=WEEKDAY([.B653])" office:value-type="date" office:date-value="1900-01-06" calcext:value-type="date">
            <text:p>土</text:p>
          </table:table-cell>
          <table:table-cell/>
          <table:table-cell table:formula="of:=[.E652]+6" office:value-type="float" office:value="45045" calcext:value-type="float">
            <text:p>450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653]+1" office:value-type="date" office:date-value="2023-04-30" calcext:value-type="date">
            <text:p>2023/04/30</text:p>
          </table:table-cell>
          <table:table-cell table:style-name="ce422" table:formula="of:=WEEKDAY([.B654])" office:value-type="date" office:date-value="1899-12-31" calcext:value-type="date">
            <text:p>日</text:p>
          </table:table-cell>
          <table:table-cell/>
          <table:table-cell table:formula="of:=[.E653]+1" office:value-type="float" office:value="45046" calcext:value-type="float">
            <text:p>450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654]+6" office:value-type="date" office:date-value="2023-05-06" calcext:value-type="date">
            <text:p>2023/05/06</text:p>
          </table:table-cell>
          <table:table-cell table:style-name="ce422" table:formula="of:=WEEKDAY([.B655])" office:value-type="date" office:date-value="1900-01-06" calcext:value-type="date">
            <text:p>土</text:p>
          </table:table-cell>
          <table:table-cell/>
          <table:table-cell table:formula="of:=[.E654]+6" office:value-type="float" office:value="45052" calcext:value-type="float">
            <text:p>450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655]+1" office:value-type="date" office:date-value="2023-05-07" calcext:value-type="date">
            <text:p>2023/05/07</text:p>
          </table:table-cell>
          <table:table-cell table:style-name="ce422" table:formula="of:=WEEKDAY([.B656])" office:value-type="date" office:date-value="1899-12-31" calcext:value-type="date">
            <text:p>日</text:p>
          </table:table-cell>
          <table:table-cell/>
          <table:table-cell table:formula="of:=[.E655]+1" office:value-type="float" office:value="45053" calcext:value-type="float">
            <text:p>450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656]+6" office:value-type="date" office:date-value="2023-05-13" calcext:value-type="date">
            <text:p>2023/05/13</text:p>
          </table:table-cell>
          <table:table-cell table:style-name="ce422" table:formula="of:=WEEKDAY([.B657])" office:value-type="date" office:date-value="1900-01-06" calcext:value-type="date">
            <text:p>土</text:p>
          </table:table-cell>
          <table:table-cell/>
          <table:table-cell table:formula="of:=[.E656]+6" office:value-type="float" office:value="45059" calcext:value-type="float">
            <text:p>450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657]+1" office:value-type="date" office:date-value="2023-05-14" calcext:value-type="date">
            <text:p>2023/05/14</text:p>
          </table:table-cell>
          <table:table-cell table:style-name="ce422" table:formula="of:=WEEKDAY([.B658])" office:value-type="date" office:date-value="1899-12-31" calcext:value-type="date">
            <text:p>日</text:p>
          </table:table-cell>
          <table:table-cell/>
          <table:table-cell table:formula="of:=[.E657]+1" office:value-type="float" office:value="45060" calcext:value-type="float">
            <text:p>450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658]+6" office:value-type="date" office:date-value="2023-05-20" calcext:value-type="date">
            <text:p>2023/05/20</text:p>
          </table:table-cell>
          <table:table-cell table:style-name="ce422" table:formula="of:=WEEKDAY([.B659])" office:value-type="date" office:date-value="1900-01-06" calcext:value-type="date">
            <text:p>土</text:p>
          </table:table-cell>
          <table:table-cell/>
          <table:table-cell table:formula="of:=[.E658]+6" office:value-type="float" office:value="45066" calcext:value-type="float">
            <text:p>4506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659]+1" office:value-type="date" office:date-value="2023-05-21" calcext:value-type="date">
            <text:p>2023/05/21</text:p>
          </table:table-cell>
          <table:table-cell table:style-name="ce422" table:formula="of:=WEEKDAY([.B660])" office:value-type="date" office:date-value="1899-12-31" calcext:value-type="date">
            <text:p>日</text:p>
          </table:table-cell>
          <table:table-cell/>
          <table:table-cell table:formula="of:=[.E659]+1" office:value-type="float" office:value="45067" calcext:value-type="float">
            <text:p>450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660]+6" office:value-type="date" office:date-value="2023-05-27" calcext:value-type="date">
            <text:p>2023/05/27</text:p>
          </table:table-cell>
          <table:table-cell table:style-name="ce422" table:formula="of:=WEEKDAY([.B661])" office:value-type="date" office:date-value="1900-01-06" calcext:value-type="date">
            <text:p>土</text:p>
          </table:table-cell>
          <table:table-cell/>
          <table:table-cell table:formula="of:=[.E660]+6" office:value-type="float" office:value="45073" calcext:value-type="float">
            <text:p>450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661]+1" office:value-type="date" office:date-value="2023-05-28" calcext:value-type="date">
            <text:p>2023/05/28</text:p>
          </table:table-cell>
          <table:table-cell table:style-name="ce422" table:formula="of:=WEEKDAY([.B662])" office:value-type="date" office:date-value="1899-12-31" calcext:value-type="date">
            <text:p>日</text:p>
          </table:table-cell>
          <table:table-cell/>
          <table:table-cell table:formula="of:=[.E661]+1" office:value-type="float" office:value="45074" calcext:value-type="float">
            <text:p>450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662]+6" office:value-type="date" office:date-value="2023-06-03" calcext:value-type="date">
            <text:p>2023/06/03</text:p>
          </table:table-cell>
          <table:table-cell table:style-name="ce422" table:formula="of:=WEEKDAY([.B663])" office:value-type="date" office:date-value="1900-01-06" calcext:value-type="date">
            <text:p>土</text:p>
          </table:table-cell>
          <table:table-cell/>
          <table:table-cell table:formula="of:=[.E662]+6" office:value-type="float" office:value="45080" calcext:value-type="float">
            <text:p>450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663]+1" office:value-type="date" office:date-value="2023-06-04" calcext:value-type="date">
            <text:p>2023/06/04</text:p>
          </table:table-cell>
          <table:table-cell table:style-name="ce422" table:formula="of:=WEEKDAY([.B664])" office:value-type="date" office:date-value="1899-12-31" calcext:value-type="date">
            <text:p>日</text:p>
          </table:table-cell>
          <table:table-cell/>
          <table:table-cell table:formula="of:=[.E663]+1" office:value-type="float" office:value="45081" calcext:value-type="float">
            <text:p>450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664]+6" office:value-type="date" office:date-value="2023-06-10" calcext:value-type="date">
            <text:p>2023/06/10</text:p>
          </table:table-cell>
          <table:table-cell table:style-name="ce422" table:formula="of:=WEEKDAY([.B665])" office:value-type="date" office:date-value="1900-01-06" calcext:value-type="date">
            <text:p>土</text:p>
          </table:table-cell>
          <table:table-cell/>
          <table:table-cell table:formula="of:=[.E664]+6" office:value-type="float" office:value="45087" calcext:value-type="float">
            <text:p>450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665]+1" office:value-type="date" office:date-value="2023-06-11" calcext:value-type="date">
            <text:p>2023/06/11</text:p>
          </table:table-cell>
          <table:table-cell table:style-name="ce422" table:formula="of:=WEEKDAY([.B666])" office:value-type="date" office:date-value="1899-12-31" calcext:value-type="date">
            <text:p>日</text:p>
          </table:table-cell>
          <table:table-cell/>
          <table:table-cell table:formula="of:=[.E665]+1" office:value-type="float" office:value="45088" calcext:value-type="float">
            <text:p>450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666]+6" office:value-type="date" office:date-value="2023-06-17" calcext:value-type="date">
            <text:p>2023/06/17</text:p>
          </table:table-cell>
          <table:table-cell table:style-name="ce422" table:formula="of:=WEEKDAY([.B667])" office:value-type="date" office:date-value="1900-01-06" calcext:value-type="date">
            <text:p>土</text:p>
          </table:table-cell>
          <table:table-cell/>
          <table:table-cell table:formula="of:=[.E666]+6" office:value-type="float" office:value="45094" calcext:value-type="float">
            <text:p>450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667]+1" office:value-type="date" office:date-value="2023-06-18" calcext:value-type="date">
            <text:p>2023/06/18</text:p>
          </table:table-cell>
          <table:table-cell table:style-name="ce422" table:formula="of:=WEEKDAY([.B668])" office:value-type="date" office:date-value="1899-12-31" calcext:value-type="date">
            <text:p>日</text:p>
          </table:table-cell>
          <table:table-cell/>
          <table:table-cell table:formula="of:=[.E667]+1" office:value-type="float" office:value="45095" calcext:value-type="float">
            <text:p>450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668]+6" office:value-type="date" office:date-value="2023-06-24" calcext:value-type="date">
            <text:p>2023/06/24</text:p>
          </table:table-cell>
          <table:table-cell table:style-name="ce422" table:formula="of:=WEEKDAY([.B669])" office:value-type="date" office:date-value="1900-01-06" calcext:value-type="date">
            <text:p>土</text:p>
          </table:table-cell>
          <table:table-cell/>
          <table:table-cell table:formula="of:=[.E668]+6" office:value-type="float" office:value="45101" calcext:value-type="float">
            <text:p>451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669]+1" office:value-type="date" office:date-value="2023-06-25" calcext:value-type="date">
            <text:p>2023/06/25</text:p>
          </table:table-cell>
          <table:table-cell table:style-name="ce422" table:formula="of:=WEEKDAY([.B670])" office:value-type="date" office:date-value="1899-12-31" calcext:value-type="date">
            <text:p>日</text:p>
          </table:table-cell>
          <table:table-cell/>
          <table:table-cell table:formula="of:=[.E669]+1" office:value-type="float" office:value="45102" calcext:value-type="float">
            <text:p>451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670]+6" office:value-type="date" office:date-value="2023-07-01" calcext:value-type="date">
            <text:p>2023/07/01</text:p>
          </table:table-cell>
          <table:table-cell table:style-name="ce422" table:formula="of:=WEEKDAY([.B671])" office:value-type="date" office:date-value="1900-01-06" calcext:value-type="date">
            <text:p>土</text:p>
          </table:table-cell>
          <table:table-cell/>
          <table:table-cell table:formula="of:=[.E670]+6" office:value-type="float" office:value="45108" calcext:value-type="float">
            <text:p>451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671]+1" office:value-type="date" office:date-value="2023-07-02" calcext:value-type="date">
            <text:p>2023/07/02</text:p>
          </table:table-cell>
          <table:table-cell table:style-name="ce422" table:formula="of:=WEEKDAY([.B672])" office:value-type="date" office:date-value="1899-12-31" calcext:value-type="date">
            <text:p>日</text:p>
          </table:table-cell>
          <table:table-cell/>
          <table:table-cell table:formula="of:=[.E671]+1" office:value-type="float" office:value="45109" calcext:value-type="float">
            <text:p>451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672]+6" office:value-type="date" office:date-value="2023-07-08" calcext:value-type="date">
            <text:p>2023/07/08</text:p>
          </table:table-cell>
          <table:table-cell table:style-name="ce422" table:formula="of:=WEEKDAY([.B673])" office:value-type="date" office:date-value="1900-01-06" calcext:value-type="date">
            <text:p>土</text:p>
          </table:table-cell>
          <table:table-cell/>
          <table:table-cell table:formula="of:=[.E672]+6" office:value-type="float" office:value="45115" calcext:value-type="float">
            <text:p>451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673]+1" office:value-type="date" office:date-value="2023-07-09" calcext:value-type="date">
            <text:p>2023/07/09</text:p>
          </table:table-cell>
          <table:table-cell table:style-name="ce422" table:formula="of:=WEEKDAY([.B674])" office:value-type="date" office:date-value="1899-12-31" calcext:value-type="date">
            <text:p>日</text:p>
          </table:table-cell>
          <table:table-cell/>
          <table:table-cell table:formula="of:=[.E673]+1" office:value-type="float" office:value="45116" calcext:value-type="float">
            <text:p>451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674]+6" office:value-type="date" office:date-value="2023-07-15" calcext:value-type="date">
            <text:p>2023/07/15</text:p>
          </table:table-cell>
          <table:table-cell table:style-name="ce422" table:formula="of:=WEEKDAY([.B675])" office:value-type="date" office:date-value="1900-01-06" calcext:value-type="date">
            <text:p>土</text:p>
          </table:table-cell>
          <table:table-cell/>
          <table:table-cell table:formula="of:=[.E674]+6" office:value-type="float" office:value="45122" calcext:value-type="float">
            <text:p>4512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675]+1" office:value-type="date" office:date-value="2023-07-16" calcext:value-type="date">
            <text:p>2023/07/16</text:p>
          </table:table-cell>
          <table:table-cell table:style-name="ce422" table:formula="of:=WEEKDAY([.B676])" office:value-type="date" office:date-value="1899-12-31" calcext:value-type="date">
            <text:p>日</text:p>
          </table:table-cell>
          <table:table-cell/>
          <table:table-cell table:formula="of:=[.E675]+1" office:value-type="float" office:value="45123" calcext:value-type="float">
            <text:p>451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676]+6" office:value-type="date" office:date-value="2023-07-22" calcext:value-type="date">
            <text:p>2023/07/22</text:p>
          </table:table-cell>
          <table:table-cell table:style-name="ce422" table:formula="of:=WEEKDAY([.B677])" office:value-type="date" office:date-value="1900-01-06" calcext:value-type="date">
            <text:p>土</text:p>
          </table:table-cell>
          <table:table-cell/>
          <table:table-cell table:formula="of:=[.E676]+6" office:value-type="float" office:value="45129" calcext:value-type="float">
            <text:p>451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677]+1" office:value-type="date" office:date-value="2023-07-23" calcext:value-type="date">
            <text:p>2023/07/23</text:p>
          </table:table-cell>
          <table:table-cell table:style-name="ce422" table:formula="of:=WEEKDAY([.B678])" office:value-type="date" office:date-value="1899-12-31" calcext:value-type="date">
            <text:p>日</text:p>
          </table:table-cell>
          <table:table-cell/>
          <table:table-cell table:formula="of:=[.E677]+1" office:value-type="float" office:value="45130" calcext:value-type="float">
            <text:p>4513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678]+6" office:value-type="date" office:date-value="2023-07-29" calcext:value-type="date">
            <text:p>2023/07/29</text:p>
          </table:table-cell>
          <table:table-cell table:style-name="ce422" table:formula="of:=WEEKDAY([.B679])" office:value-type="date" office:date-value="1900-01-06" calcext:value-type="date">
            <text:p>土</text:p>
          </table:table-cell>
          <table:table-cell/>
          <table:table-cell table:formula="of:=[.E678]+6" office:value-type="float" office:value="45136" calcext:value-type="float">
            <text:p>451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679]+1" office:value-type="date" office:date-value="2023-07-30" calcext:value-type="date">
            <text:p>2023/07/30</text:p>
          </table:table-cell>
          <table:table-cell table:style-name="ce422" table:formula="of:=WEEKDAY([.B680])" office:value-type="date" office:date-value="1899-12-31" calcext:value-type="date">
            <text:p>日</text:p>
          </table:table-cell>
          <table:table-cell/>
          <table:table-cell table:formula="of:=[.E679]+1" office:value-type="float" office:value="45137" calcext:value-type="float">
            <text:p>451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680]+6" office:value-type="date" office:date-value="2023-08-05" calcext:value-type="date">
            <text:p>2023/08/05</text:p>
          </table:table-cell>
          <table:table-cell table:style-name="ce422" table:formula="of:=WEEKDAY([.B681])" office:value-type="date" office:date-value="1900-01-06" calcext:value-type="date">
            <text:p>土</text:p>
          </table:table-cell>
          <table:table-cell/>
          <table:table-cell table:formula="of:=[.E680]+6" office:value-type="float" office:value="45143" calcext:value-type="float">
            <text:p>451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681]+1" office:value-type="date" office:date-value="2023-08-06" calcext:value-type="date">
            <text:p>2023/08/06</text:p>
          </table:table-cell>
          <table:table-cell table:style-name="ce422" table:formula="of:=WEEKDAY([.B682])" office:value-type="date" office:date-value="1899-12-31" calcext:value-type="date">
            <text:p>日</text:p>
          </table:table-cell>
          <table:table-cell/>
          <table:table-cell table:formula="of:=[.E681]+1" office:value-type="float" office:value="45144" calcext:value-type="float">
            <text:p>451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682]+6" office:value-type="date" office:date-value="2023-08-12" calcext:value-type="date">
            <text:p>2023/08/12</text:p>
          </table:table-cell>
          <table:table-cell table:style-name="ce422" table:formula="of:=WEEKDAY([.B683])" office:value-type="date" office:date-value="1900-01-06" calcext:value-type="date">
            <text:p>土</text:p>
          </table:table-cell>
          <table:table-cell/>
          <table:table-cell table:formula="of:=[.E682]+6" office:value-type="float" office:value="45150" calcext:value-type="float">
            <text:p>451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683]+1" office:value-type="date" office:date-value="2023-08-13" calcext:value-type="date">
            <text:p>2023/08/13</text:p>
          </table:table-cell>
          <table:table-cell table:style-name="ce422" table:formula="of:=WEEKDAY([.B684])" office:value-type="date" office:date-value="1899-12-31" calcext:value-type="date">
            <text:p>日</text:p>
          </table:table-cell>
          <table:table-cell/>
          <table:table-cell table:formula="of:=[.E683]+1" office:value-type="float" office:value="45151" calcext:value-type="float">
            <text:p>451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684]+6" office:value-type="date" office:date-value="2023-08-19" calcext:value-type="date">
            <text:p>2023/08/19</text:p>
          </table:table-cell>
          <table:table-cell table:style-name="ce422" table:formula="of:=WEEKDAY([.B685])" office:value-type="date" office:date-value="1900-01-06" calcext:value-type="date">
            <text:p>土</text:p>
          </table:table-cell>
          <table:table-cell/>
          <table:table-cell table:formula="of:=[.E684]+6" office:value-type="float" office:value="45157" calcext:value-type="float">
            <text:p>451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685]+1" office:value-type="date" office:date-value="2023-08-20" calcext:value-type="date">
            <text:p>2023/08/20</text:p>
          </table:table-cell>
          <table:table-cell table:style-name="ce422" table:formula="of:=WEEKDAY([.B686])" office:value-type="date" office:date-value="1899-12-31" calcext:value-type="date">
            <text:p>日</text:p>
          </table:table-cell>
          <table:table-cell/>
          <table:table-cell table:formula="of:=[.E685]+1" office:value-type="float" office:value="45158" calcext:value-type="float">
            <text:p>451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686]+6" office:value-type="date" office:date-value="2023-08-26" calcext:value-type="date">
            <text:p>2023/08/26</text:p>
          </table:table-cell>
          <table:table-cell table:style-name="ce422" table:formula="of:=WEEKDAY([.B687])" office:value-type="date" office:date-value="1900-01-06" calcext:value-type="date">
            <text:p>土</text:p>
          </table:table-cell>
          <table:table-cell/>
          <table:table-cell table:formula="of:=[.E686]+6" office:value-type="float" office:value="45164" calcext:value-type="float">
            <text:p>451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687]+1" office:value-type="date" office:date-value="2023-08-27" calcext:value-type="date">
            <text:p>2023/08/27</text:p>
          </table:table-cell>
          <table:table-cell table:style-name="ce422" table:formula="of:=WEEKDAY([.B688])" office:value-type="date" office:date-value="1899-12-31" calcext:value-type="date">
            <text:p>日</text:p>
          </table:table-cell>
          <table:table-cell/>
          <table:table-cell table:formula="of:=[.E687]+1" office:value-type="float" office:value="45165" calcext:value-type="float">
            <text:p>4516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688]+6" office:value-type="date" office:date-value="2023-09-02" calcext:value-type="date">
            <text:p>2023/09/02</text:p>
          </table:table-cell>
          <table:table-cell table:style-name="ce422" table:formula="of:=WEEKDAY([.B689])" office:value-type="date" office:date-value="1900-01-06" calcext:value-type="date">
            <text:p>土</text:p>
          </table:table-cell>
          <table:table-cell/>
          <table:table-cell table:formula="of:=[.E688]+6" office:value-type="float" office:value="45171" calcext:value-type="float">
            <text:p>451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689]+1" office:value-type="date" office:date-value="2023-09-03" calcext:value-type="date">
            <text:p>2023/09/03</text:p>
          </table:table-cell>
          <table:table-cell table:style-name="ce422" table:formula="of:=WEEKDAY([.B690])" office:value-type="date" office:date-value="1899-12-31" calcext:value-type="date">
            <text:p>日</text:p>
          </table:table-cell>
          <table:table-cell/>
          <table:table-cell table:formula="of:=[.E689]+1" office:value-type="float" office:value="45172" calcext:value-type="float">
            <text:p>451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690]+6" office:value-type="date" office:date-value="2023-09-09" calcext:value-type="date">
            <text:p>2023/09/09</text:p>
          </table:table-cell>
          <table:table-cell table:style-name="ce422" table:formula="of:=WEEKDAY([.B691])" office:value-type="date" office:date-value="1900-01-06" calcext:value-type="date">
            <text:p>土</text:p>
          </table:table-cell>
          <table:table-cell/>
          <table:table-cell table:formula="of:=[.E690]+6" office:value-type="float" office:value="45178" calcext:value-type="float">
            <text:p>451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691]+1" office:value-type="date" office:date-value="2023-09-10" calcext:value-type="date">
            <text:p>2023/09/10</text:p>
          </table:table-cell>
          <table:table-cell table:style-name="ce422" table:formula="of:=WEEKDAY([.B692])" office:value-type="date" office:date-value="1899-12-31" calcext:value-type="date">
            <text:p>日</text:p>
          </table:table-cell>
          <table:table-cell/>
          <table:table-cell table:formula="of:=[.E691]+1" office:value-type="float" office:value="45179" calcext:value-type="float">
            <text:p>451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692]+6" office:value-type="date" office:date-value="2023-09-16" calcext:value-type="date">
            <text:p>2023/09/16</text:p>
          </table:table-cell>
          <table:table-cell table:style-name="ce422" table:formula="of:=WEEKDAY([.B693])" office:value-type="date" office:date-value="1900-01-06" calcext:value-type="date">
            <text:p>土</text:p>
          </table:table-cell>
          <table:table-cell/>
          <table:table-cell table:formula="of:=[.E692]+6" office:value-type="float" office:value="45185" calcext:value-type="float">
            <text:p>451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693]+1" office:value-type="date" office:date-value="2023-09-17" calcext:value-type="date">
            <text:p>2023/09/17</text:p>
          </table:table-cell>
          <table:table-cell table:style-name="ce422" table:formula="of:=WEEKDAY([.B694])" office:value-type="date" office:date-value="1899-12-31" calcext:value-type="date">
            <text:p>日</text:p>
          </table:table-cell>
          <table:table-cell/>
          <table:table-cell table:formula="of:=[.E693]+1" office:value-type="float" office:value="45186" calcext:value-type="float">
            <text:p>451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694]+6" office:value-type="date" office:date-value="2023-09-23" calcext:value-type="date">
            <text:p>2023/09/23</text:p>
          </table:table-cell>
          <table:table-cell table:style-name="ce422" table:formula="of:=WEEKDAY([.B695])" office:value-type="date" office:date-value="1900-01-06" calcext:value-type="date">
            <text:p>土</text:p>
          </table:table-cell>
          <table:table-cell/>
          <table:table-cell table:formula="of:=[.E694]+6" office:value-type="float" office:value="45192" calcext:value-type="float">
            <text:p>451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695]+1" office:value-type="date" office:date-value="2023-09-24" calcext:value-type="date">
            <text:p>2023/09/24</text:p>
          </table:table-cell>
          <table:table-cell table:style-name="ce422" table:formula="of:=WEEKDAY([.B696])" office:value-type="date" office:date-value="1899-12-31" calcext:value-type="date">
            <text:p>日</text:p>
          </table:table-cell>
          <table:table-cell/>
          <table:table-cell table:formula="of:=[.E695]+1" office:value-type="float" office:value="45193" calcext:value-type="float">
            <text:p>451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696]+6" office:value-type="date" office:date-value="2023-09-30" calcext:value-type="date">
            <text:p>2023/09/30</text:p>
          </table:table-cell>
          <table:table-cell table:style-name="ce422" table:formula="of:=WEEKDAY([.B697])" office:value-type="date" office:date-value="1900-01-06" calcext:value-type="date">
            <text:p>土</text:p>
          </table:table-cell>
          <table:table-cell/>
          <table:table-cell table:formula="of:=[.E696]+6" office:value-type="float" office:value="45199" calcext:value-type="float">
            <text:p>451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697]+1" office:value-type="date" office:date-value="2023-10-01" calcext:value-type="date">
            <text:p>2023/10/01</text:p>
          </table:table-cell>
          <table:table-cell table:style-name="ce422" table:formula="of:=WEEKDAY([.B698])" office:value-type="date" office:date-value="1899-12-31" calcext:value-type="date">
            <text:p>日</text:p>
          </table:table-cell>
          <table:table-cell/>
          <table:table-cell table:formula="of:=[.E697]+1" office:value-type="float" office:value="45200" calcext:value-type="float">
            <text:p>452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698]+6" office:value-type="date" office:date-value="2023-10-07" calcext:value-type="date">
            <text:p>2023/10/07</text:p>
          </table:table-cell>
          <table:table-cell table:style-name="ce422" table:formula="of:=WEEKDAY([.B699])" office:value-type="date" office:date-value="1900-01-06" calcext:value-type="date">
            <text:p>土</text:p>
          </table:table-cell>
          <table:table-cell/>
          <table:table-cell table:formula="of:=[.E698]+6" office:value-type="float" office:value="45206" calcext:value-type="float">
            <text:p>452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699]+1" office:value-type="date" office:date-value="2023-10-08" calcext:value-type="date">
            <text:p>2023/10/08</text:p>
          </table:table-cell>
          <table:table-cell table:style-name="ce422" table:formula="of:=WEEKDAY([.B700])" office:value-type="date" office:date-value="1899-12-31" calcext:value-type="date">
            <text:p>日</text:p>
          </table:table-cell>
          <table:table-cell/>
          <table:table-cell table:formula="of:=[.E699]+1" office:value-type="float" office:value="45207" calcext:value-type="float">
            <text:p>452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700]+6" office:value-type="date" office:date-value="2023-10-14" calcext:value-type="date">
            <text:p>2023/10/14</text:p>
          </table:table-cell>
          <table:table-cell table:style-name="ce422" table:formula="of:=WEEKDAY([.B701])" office:value-type="date" office:date-value="1900-01-06" calcext:value-type="date">
            <text:p>土</text:p>
          </table:table-cell>
          <table:table-cell/>
          <table:table-cell table:formula="of:=[.E700]+6" office:value-type="float" office:value="45213" calcext:value-type="float">
            <text:p>4521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701]+1" office:value-type="date" office:date-value="2023-10-15" calcext:value-type="date">
            <text:p>2023/10/15</text:p>
          </table:table-cell>
          <table:table-cell table:style-name="ce422" table:formula="of:=WEEKDAY([.B702])" office:value-type="date" office:date-value="1899-12-31" calcext:value-type="date">
            <text:p>日</text:p>
          </table:table-cell>
          <table:table-cell/>
          <table:table-cell table:formula="of:=[.E701]+1" office:value-type="float" office:value="45214" calcext:value-type="float">
            <text:p>452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702]+6" office:value-type="date" office:date-value="2023-10-21" calcext:value-type="date">
            <text:p>2023/10/21</text:p>
          </table:table-cell>
          <table:table-cell table:style-name="ce422" table:formula="of:=WEEKDAY([.B703])" office:value-type="date" office:date-value="1900-01-06" calcext:value-type="date">
            <text:p>土</text:p>
          </table:table-cell>
          <table:table-cell/>
          <table:table-cell table:formula="of:=[.E702]+6" office:value-type="float" office:value="45220" calcext:value-type="float">
            <text:p>452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703]+1" office:value-type="date" office:date-value="2023-10-22" calcext:value-type="date">
            <text:p>2023/10/22</text:p>
          </table:table-cell>
          <table:table-cell table:style-name="ce422" table:formula="of:=WEEKDAY([.B704])" office:value-type="date" office:date-value="1899-12-31" calcext:value-type="date">
            <text:p>日</text:p>
          </table:table-cell>
          <table:table-cell/>
          <table:table-cell table:formula="of:=[.E703]+1" office:value-type="float" office:value="45221" calcext:value-type="float">
            <text:p>452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704]+6" office:value-type="date" office:date-value="2023-10-28" calcext:value-type="date">
            <text:p>2023/10/28</text:p>
          </table:table-cell>
          <table:table-cell table:style-name="ce422" table:formula="of:=WEEKDAY([.B705])" office:value-type="date" office:date-value="1900-01-06" calcext:value-type="date">
            <text:p>土</text:p>
          </table:table-cell>
          <table:table-cell/>
          <table:table-cell table:formula="of:=[.E704]+6" office:value-type="float" office:value="45227" calcext:value-type="float">
            <text:p>452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705]+1" office:value-type="date" office:date-value="2023-10-29" calcext:value-type="date">
            <text:p>2023/10/29</text:p>
          </table:table-cell>
          <table:table-cell table:style-name="ce422" table:formula="of:=WEEKDAY([.B706])" office:value-type="date" office:date-value="1899-12-31" calcext:value-type="date">
            <text:p>日</text:p>
          </table:table-cell>
          <table:table-cell/>
          <table:table-cell table:formula="of:=[.E705]+1" office:value-type="float" office:value="45228" calcext:value-type="float">
            <text:p>452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706]+6" office:value-type="date" office:date-value="2023-11-04" calcext:value-type="date">
            <text:p>2023/11/04</text:p>
          </table:table-cell>
          <table:table-cell table:style-name="ce422" table:formula="of:=WEEKDAY([.B707])" office:value-type="date" office:date-value="1900-01-06" calcext:value-type="date">
            <text:p>土</text:p>
          </table:table-cell>
          <table:table-cell/>
          <table:table-cell table:formula="of:=[.E706]+6" office:value-type="float" office:value="45234" calcext:value-type="float">
            <text:p>452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707]+1" office:value-type="date" office:date-value="2023-11-05" calcext:value-type="date">
            <text:p>2023/11/05</text:p>
          </table:table-cell>
          <table:table-cell table:style-name="ce422" table:formula="of:=WEEKDAY([.B708])" office:value-type="date" office:date-value="1899-12-31" calcext:value-type="date">
            <text:p>日</text:p>
          </table:table-cell>
          <table:table-cell/>
          <table:table-cell table:formula="of:=[.E707]+1" office:value-type="float" office:value="45235" calcext:value-type="float">
            <text:p>452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708]+6" office:value-type="date" office:date-value="2023-11-11" calcext:value-type="date">
            <text:p>2023/11/11</text:p>
          </table:table-cell>
          <table:table-cell table:style-name="ce422" table:formula="of:=WEEKDAY([.B709])" office:value-type="date" office:date-value="1900-01-06" calcext:value-type="date">
            <text:p>土</text:p>
          </table:table-cell>
          <table:table-cell/>
          <table:table-cell table:formula="of:=[.E708]+6" office:value-type="float" office:value="45241" calcext:value-type="float">
            <text:p>452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709]+1" office:value-type="date" office:date-value="2023-11-12" calcext:value-type="date">
            <text:p>2023/11/12</text:p>
          </table:table-cell>
          <table:table-cell table:style-name="ce422" table:formula="of:=WEEKDAY([.B710])" office:value-type="date" office:date-value="1899-12-31" calcext:value-type="date">
            <text:p>日</text:p>
          </table:table-cell>
          <table:table-cell/>
          <table:table-cell table:formula="of:=[.E709]+1" office:value-type="float" office:value="45242" calcext:value-type="float">
            <text:p>452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710]+6" office:value-type="date" office:date-value="2023-11-18" calcext:value-type="date">
            <text:p>2023/11/18</text:p>
          </table:table-cell>
          <table:table-cell table:style-name="ce422" table:formula="of:=WEEKDAY([.B711])" office:value-type="date" office:date-value="1900-01-06" calcext:value-type="date">
            <text:p>土</text:p>
          </table:table-cell>
          <table:table-cell/>
          <table:table-cell table:formula="of:=[.E710]+6" office:value-type="float" office:value="45248" calcext:value-type="float">
            <text:p>452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711]+1" office:value-type="date" office:date-value="2023-11-19" calcext:value-type="date">
            <text:p>2023/11/19</text:p>
          </table:table-cell>
          <table:table-cell table:style-name="ce422" table:formula="of:=WEEKDAY([.B712])" office:value-type="date" office:date-value="1899-12-31" calcext:value-type="date">
            <text:p>日</text:p>
          </table:table-cell>
          <table:table-cell/>
          <table:table-cell table:formula="of:=[.E711]+1" office:value-type="float" office:value="45249" calcext:value-type="float">
            <text:p>452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712]+6" office:value-type="date" office:date-value="2023-11-25" calcext:value-type="date">
            <text:p>2023/11/25</text:p>
          </table:table-cell>
          <table:table-cell table:style-name="ce422" table:formula="of:=WEEKDAY([.B713])" office:value-type="date" office:date-value="1900-01-06" calcext:value-type="date">
            <text:p>土</text:p>
          </table:table-cell>
          <table:table-cell/>
          <table:table-cell table:formula="of:=[.E712]+6" office:value-type="float" office:value="45255" calcext:value-type="float">
            <text:p>452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713]+1" office:value-type="date" office:date-value="2023-11-26" calcext:value-type="date">
            <text:p>2023/11/26</text:p>
          </table:table-cell>
          <table:table-cell table:style-name="ce422" table:formula="of:=WEEKDAY([.B714])" office:value-type="date" office:date-value="1899-12-31" calcext:value-type="date">
            <text:p>日</text:p>
          </table:table-cell>
          <table:table-cell/>
          <table:table-cell table:formula="of:=[.E713]+1" office:value-type="float" office:value="45256" calcext:value-type="float">
            <text:p>452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714]+6" office:value-type="date" office:date-value="2023-12-02" calcext:value-type="date">
            <text:p>2023/12/02</text:p>
          </table:table-cell>
          <table:table-cell table:style-name="ce422" table:formula="of:=WEEKDAY([.B715])" office:value-type="date" office:date-value="1900-01-06" calcext:value-type="date">
            <text:p>土</text:p>
          </table:table-cell>
          <table:table-cell/>
          <table:table-cell table:formula="of:=[.E714]+6" office:value-type="float" office:value="45262" calcext:value-type="float">
            <text:p>452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715]+1" office:value-type="date" office:date-value="2023-12-03" calcext:value-type="date">
            <text:p>2023/12/03</text:p>
          </table:table-cell>
          <table:table-cell table:style-name="ce422" table:formula="of:=WEEKDAY([.B716])" office:value-type="date" office:date-value="1899-12-31" calcext:value-type="date">
            <text:p>日</text:p>
          </table:table-cell>
          <table:table-cell/>
          <table:table-cell table:formula="of:=[.E715]+1" office:value-type="float" office:value="45263" calcext:value-type="float">
            <text:p>452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716]+6" office:value-type="date" office:date-value="2023-12-09" calcext:value-type="date">
            <text:p>2023/12/09</text:p>
          </table:table-cell>
          <table:table-cell table:style-name="ce422" table:formula="of:=WEEKDAY([.B717])" office:value-type="date" office:date-value="1900-01-06" calcext:value-type="date">
            <text:p>土</text:p>
          </table:table-cell>
          <table:table-cell/>
          <table:table-cell table:formula="of:=[.E716]+6" office:value-type="float" office:value="45269" calcext:value-type="float">
            <text:p>452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717]+1" office:value-type="date" office:date-value="2023-12-10" calcext:value-type="date">
            <text:p>2023/12/10</text:p>
          </table:table-cell>
          <table:table-cell table:style-name="ce422" table:formula="of:=WEEKDAY([.B718])" office:value-type="date" office:date-value="1899-12-31" calcext:value-type="date">
            <text:p>日</text:p>
          </table:table-cell>
          <table:table-cell/>
          <table:table-cell table:formula="of:=[.E717]+1" office:value-type="float" office:value="45270" calcext:value-type="float">
            <text:p>452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718]+6" office:value-type="date" office:date-value="2023-12-16" calcext:value-type="date">
            <text:p>2023/12/16</text:p>
          </table:table-cell>
          <table:table-cell table:style-name="ce422" table:formula="of:=WEEKDAY([.B719])" office:value-type="date" office:date-value="1900-01-06" calcext:value-type="date">
            <text:p>土</text:p>
          </table:table-cell>
          <table:table-cell/>
          <table:table-cell table:formula="of:=[.E718]+6" office:value-type="float" office:value="45276" calcext:value-type="float">
            <text:p>452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719]+1" office:value-type="date" office:date-value="2023-12-17" calcext:value-type="date">
            <text:p>2023/12/17</text:p>
          </table:table-cell>
          <table:table-cell table:style-name="ce422" table:formula="of:=WEEKDAY([.B720])" office:value-type="date" office:date-value="1899-12-31" calcext:value-type="date">
            <text:p>日</text:p>
          </table:table-cell>
          <table:table-cell/>
          <table:table-cell table:formula="of:=[.E719]+1" office:value-type="float" office:value="45277" calcext:value-type="float">
            <text:p>452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720]+6" office:value-type="date" office:date-value="2023-12-23" calcext:value-type="date">
            <text:p>2023/12/23</text:p>
          </table:table-cell>
          <table:table-cell table:style-name="ce422" table:formula="of:=WEEKDAY([.B721])" office:value-type="date" office:date-value="1900-01-06" calcext:value-type="date">
            <text:p>土</text:p>
          </table:table-cell>
          <table:table-cell/>
          <table:table-cell table:formula="of:=[.E720]+6" office:value-type="float" office:value="45283" calcext:value-type="float">
            <text:p>452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721]+1" office:value-type="date" office:date-value="2023-12-24" calcext:value-type="date">
            <text:p>2023/12/24</text:p>
          </table:table-cell>
          <table:table-cell table:style-name="ce422" table:formula="of:=WEEKDAY([.B722])" office:value-type="date" office:date-value="1899-12-31" calcext:value-type="date">
            <text:p>日</text:p>
          </table:table-cell>
          <table:table-cell/>
          <table:table-cell table:formula="of:=[.E721]+1" office:value-type="float" office:value="45284" calcext:value-type="float">
            <text:p>452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722]+6" office:value-type="date" office:date-value="2023-12-30" calcext:value-type="date">
            <text:p>2023/12/30</text:p>
          </table:table-cell>
          <table:table-cell table:style-name="ce422" table:formula="of:=WEEKDAY([.B723])" office:value-type="date" office:date-value="1900-01-06" calcext:value-type="date">
            <text:p>土</text:p>
          </table:table-cell>
          <table:table-cell/>
          <table:table-cell table:formula="of:=[.E722]+6" office:value-type="float" office:value="45290" calcext:value-type="float">
            <text:p>452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723]+1" office:value-type="date" office:date-value="2023-12-31" calcext:value-type="date">
            <text:p>2023/12/31</text:p>
          </table:table-cell>
          <table:table-cell table:style-name="ce422" table:formula="of:=WEEKDAY([.B724])" office:value-type="date" office:date-value="1899-12-31" calcext:value-type="date">
            <text:p>日</text:p>
          </table:table-cell>
          <table:table-cell/>
          <table:table-cell table:formula="of:=[.E723]+1" office:value-type="float" office:value="45291" calcext:value-type="float">
            <text:p>452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724]+6" office:value-type="date" office:date-value="2024-01-06" calcext:value-type="date">
            <text:p>2024/01/06</text:p>
          </table:table-cell>
          <table:table-cell table:style-name="ce422" table:formula="of:=WEEKDAY([.B725])" office:value-type="date" office:date-value="1900-01-06" calcext:value-type="date">
            <text:p>土</text:p>
          </table:table-cell>
          <table:table-cell/>
          <table:table-cell table:formula="of:=[.E724]+6" office:value-type="float" office:value="45297" calcext:value-type="float">
            <text:p>452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725]+1" office:value-type="date" office:date-value="2024-01-07" calcext:value-type="date">
            <text:p>2024/01/07</text:p>
          </table:table-cell>
          <table:table-cell table:style-name="ce422" table:formula="of:=WEEKDAY([.B726])" office:value-type="date" office:date-value="1899-12-31" calcext:value-type="date">
            <text:p>日</text:p>
          </table:table-cell>
          <table:table-cell/>
          <table:table-cell table:formula="of:=[.E725]+1" office:value-type="float" office:value="45298" calcext:value-type="float">
            <text:p>452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726]+6" office:value-type="date" office:date-value="2024-01-13" calcext:value-type="date">
            <text:p>2024/01/13</text:p>
          </table:table-cell>
          <table:table-cell table:style-name="ce422" table:formula="of:=WEEKDAY([.B727])" office:value-type="date" office:date-value="1900-01-06" calcext:value-type="date">
            <text:p>土</text:p>
          </table:table-cell>
          <table:table-cell/>
          <table:table-cell table:formula="of:=[.E726]+6" office:value-type="float" office:value="45304" calcext:value-type="float">
            <text:p>453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727]+1" office:value-type="date" office:date-value="2024-01-14" calcext:value-type="date">
            <text:p>2024/01/14</text:p>
          </table:table-cell>
          <table:table-cell table:style-name="ce422" table:formula="of:=WEEKDAY([.B728])" office:value-type="date" office:date-value="1899-12-31" calcext:value-type="date">
            <text:p>日</text:p>
          </table:table-cell>
          <table:table-cell/>
          <table:table-cell table:formula="of:=[.E727]+1" office:value-type="float" office:value="45305" calcext:value-type="float">
            <text:p>453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728]+6" office:value-type="date" office:date-value="2024-01-20" calcext:value-type="date">
            <text:p>2024/01/20</text:p>
          </table:table-cell>
          <table:table-cell table:style-name="ce422" table:formula="of:=WEEKDAY([.B729])" office:value-type="date" office:date-value="1900-01-06" calcext:value-type="date">
            <text:p>土</text:p>
          </table:table-cell>
          <table:table-cell/>
          <table:table-cell table:formula="of:=[.E728]+6" office:value-type="float" office:value="45311" calcext:value-type="float">
            <text:p>453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729]+1" office:value-type="date" office:date-value="2024-01-21" calcext:value-type="date">
            <text:p>2024/01/21</text:p>
          </table:table-cell>
          <table:table-cell table:style-name="ce422" table:formula="of:=WEEKDAY([.B730])" office:value-type="date" office:date-value="1899-12-31" calcext:value-type="date">
            <text:p>日</text:p>
          </table:table-cell>
          <table:table-cell/>
          <table:table-cell table:formula="of:=[.E729]+1" office:value-type="float" office:value="45312" calcext:value-type="float">
            <text:p>453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730]+6" office:value-type="date" office:date-value="2024-01-27" calcext:value-type="date">
            <text:p>2024/01/27</text:p>
          </table:table-cell>
          <table:table-cell table:style-name="ce422" table:formula="of:=WEEKDAY([.B731])" office:value-type="date" office:date-value="1900-01-06" calcext:value-type="date">
            <text:p>土</text:p>
          </table:table-cell>
          <table:table-cell/>
          <table:table-cell table:formula="of:=[.E730]+6" office:value-type="float" office:value="45318" calcext:value-type="float">
            <text:p>453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731]+1" office:value-type="date" office:date-value="2024-01-28" calcext:value-type="date">
            <text:p>2024/01/28</text:p>
          </table:table-cell>
          <table:table-cell table:style-name="ce422" table:formula="of:=WEEKDAY([.B732])" office:value-type="date" office:date-value="1899-12-31" calcext:value-type="date">
            <text:p>日</text:p>
          </table:table-cell>
          <table:table-cell/>
          <table:table-cell table:formula="of:=[.E731]+1" office:value-type="float" office:value="45319" calcext:value-type="float">
            <text:p>453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732]+6" office:value-type="date" office:date-value="2024-02-03" calcext:value-type="date">
            <text:p>2024/02/03</text:p>
          </table:table-cell>
          <table:table-cell table:style-name="ce422" table:formula="of:=WEEKDAY([.B733])" office:value-type="date" office:date-value="1900-01-06" calcext:value-type="date">
            <text:p>土</text:p>
          </table:table-cell>
          <table:table-cell/>
          <table:table-cell table:formula="of:=[.E732]+6" office:value-type="float" office:value="45325" calcext:value-type="float">
            <text:p>453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733]+1" office:value-type="date" office:date-value="2024-02-04" calcext:value-type="date">
            <text:p>2024/02/04</text:p>
          </table:table-cell>
          <table:table-cell table:style-name="ce422" table:formula="of:=WEEKDAY([.B734])" office:value-type="date" office:date-value="1899-12-31" calcext:value-type="date">
            <text:p>日</text:p>
          </table:table-cell>
          <table:table-cell/>
          <table:table-cell table:formula="of:=[.E733]+1" office:value-type="float" office:value="45326" calcext:value-type="float">
            <text:p>453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734]+6" office:value-type="date" office:date-value="2024-02-10" calcext:value-type="date">
            <text:p>2024/02/10</text:p>
          </table:table-cell>
          <table:table-cell table:style-name="ce422" table:formula="of:=WEEKDAY([.B735])" office:value-type="date" office:date-value="1900-01-06" calcext:value-type="date">
            <text:p>土</text:p>
          </table:table-cell>
          <table:table-cell/>
          <table:table-cell table:formula="of:=[.E734]+6" office:value-type="float" office:value="45332" calcext:value-type="float">
            <text:p>453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735]+1" office:value-type="date" office:date-value="2024-02-11" calcext:value-type="date">
            <text:p>2024/02/11</text:p>
          </table:table-cell>
          <table:table-cell table:style-name="ce422" table:formula="of:=WEEKDAY([.B736])" office:value-type="date" office:date-value="1899-12-31" calcext:value-type="date">
            <text:p>日</text:p>
          </table:table-cell>
          <table:table-cell/>
          <table:table-cell table:formula="of:=[.E735]+1" office:value-type="float" office:value="45333" calcext:value-type="float">
            <text:p>453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736]+6" office:value-type="date" office:date-value="2024-02-17" calcext:value-type="date">
            <text:p>2024/02/17</text:p>
          </table:table-cell>
          <table:table-cell table:style-name="ce422" table:formula="of:=WEEKDAY([.B737])" office:value-type="date" office:date-value="1900-01-06" calcext:value-type="date">
            <text:p>土</text:p>
          </table:table-cell>
          <table:table-cell/>
          <table:table-cell table:formula="of:=[.E736]+6" office:value-type="float" office:value="45339" calcext:value-type="float">
            <text:p>453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737]+1" office:value-type="date" office:date-value="2024-02-18" calcext:value-type="date">
            <text:p>2024/02/18</text:p>
          </table:table-cell>
          <table:table-cell table:style-name="ce422" table:formula="of:=WEEKDAY([.B738])" office:value-type="date" office:date-value="1899-12-31" calcext:value-type="date">
            <text:p>日</text:p>
          </table:table-cell>
          <table:table-cell/>
          <table:table-cell table:formula="of:=[.E737]+1" office:value-type="float" office:value="45340" calcext:value-type="float">
            <text:p>453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738]+6" office:value-type="date" office:date-value="2024-02-24" calcext:value-type="date">
            <text:p>2024/02/24</text:p>
          </table:table-cell>
          <table:table-cell table:style-name="ce422" table:formula="of:=WEEKDAY([.B739])" office:value-type="date" office:date-value="1900-01-06" calcext:value-type="date">
            <text:p>土</text:p>
          </table:table-cell>
          <table:table-cell/>
          <table:table-cell table:formula="of:=[.E738]+6" office:value-type="float" office:value="45346" calcext:value-type="float">
            <text:p>453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739]+1" office:value-type="date" office:date-value="2024-02-25" calcext:value-type="date">
            <text:p>2024/02/25</text:p>
          </table:table-cell>
          <table:table-cell table:style-name="ce422" table:formula="of:=WEEKDAY([.B740])" office:value-type="date" office:date-value="1899-12-31" calcext:value-type="date">
            <text:p>日</text:p>
          </table:table-cell>
          <table:table-cell/>
          <table:table-cell table:formula="of:=[.E739]+1" office:value-type="float" office:value="45347" calcext:value-type="float">
            <text:p>453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740]+6" office:value-type="date" office:date-value="2024-03-02" calcext:value-type="date">
            <text:p>2024/03/02</text:p>
          </table:table-cell>
          <table:table-cell table:style-name="ce422" table:formula="of:=WEEKDAY([.B741])" office:value-type="date" office:date-value="1900-01-06" calcext:value-type="date">
            <text:p>土</text:p>
          </table:table-cell>
          <table:table-cell/>
          <table:table-cell table:formula="of:=[.E740]+6" office:value-type="float" office:value="45353" calcext:value-type="float">
            <text:p>453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741]+1" office:value-type="date" office:date-value="2024-03-03" calcext:value-type="date">
            <text:p>2024/03/03</text:p>
          </table:table-cell>
          <table:table-cell table:style-name="ce422" table:formula="of:=WEEKDAY([.B742])" office:value-type="date" office:date-value="1899-12-31" calcext:value-type="date">
            <text:p>日</text:p>
          </table:table-cell>
          <table:table-cell/>
          <table:table-cell table:formula="of:=[.E741]+1" office:value-type="float" office:value="45354" calcext:value-type="float">
            <text:p>453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742]+6" office:value-type="date" office:date-value="2024-03-09" calcext:value-type="date">
            <text:p>2024/03/09</text:p>
          </table:table-cell>
          <table:table-cell table:style-name="ce422" table:formula="of:=WEEKDAY([.B743])" office:value-type="date" office:date-value="1900-01-06" calcext:value-type="date">
            <text:p>土</text:p>
          </table:table-cell>
          <table:table-cell/>
          <table:table-cell table:formula="of:=[.E742]+6" office:value-type="float" office:value="45360" calcext:value-type="float">
            <text:p>453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743]+1" office:value-type="date" office:date-value="2024-03-10" calcext:value-type="date">
            <text:p>2024/03/10</text:p>
          </table:table-cell>
          <table:table-cell table:style-name="ce422" table:formula="of:=WEEKDAY([.B744])" office:value-type="date" office:date-value="1899-12-31" calcext:value-type="date">
            <text:p>日</text:p>
          </table:table-cell>
          <table:table-cell/>
          <table:table-cell table:formula="of:=[.E743]+1" office:value-type="float" office:value="45361" calcext:value-type="float">
            <text:p>453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744]+6" office:value-type="date" office:date-value="2024-03-16" calcext:value-type="date">
            <text:p>2024/03/16</text:p>
          </table:table-cell>
          <table:table-cell table:style-name="ce422" table:formula="of:=WEEKDAY([.B745])" office:value-type="date" office:date-value="1900-01-06" calcext:value-type="date">
            <text:p>土</text:p>
          </table:table-cell>
          <table:table-cell/>
          <table:table-cell table:formula="of:=[.E744]+6" office:value-type="float" office:value="45367" calcext:value-type="float">
            <text:p>453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745]+1" office:value-type="date" office:date-value="2024-03-17" calcext:value-type="date">
            <text:p>2024/03/17</text:p>
          </table:table-cell>
          <table:table-cell table:style-name="ce422" table:formula="of:=WEEKDAY([.B746])" office:value-type="date" office:date-value="1899-12-31" calcext:value-type="date">
            <text:p>日</text:p>
          </table:table-cell>
          <table:table-cell/>
          <table:table-cell table:formula="of:=[.E745]+1" office:value-type="float" office:value="45368" calcext:value-type="float">
            <text:p>453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746]+6" office:value-type="date" office:date-value="2024-03-23" calcext:value-type="date">
            <text:p>2024/03/23</text:p>
          </table:table-cell>
          <table:table-cell table:style-name="ce422" table:formula="of:=WEEKDAY([.B747])" office:value-type="date" office:date-value="1900-01-06" calcext:value-type="date">
            <text:p>土</text:p>
          </table:table-cell>
          <table:table-cell/>
          <table:table-cell table:formula="of:=[.E746]+6" office:value-type="float" office:value="45374" calcext:value-type="float">
            <text:p>453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747]+1" office:value-type="date" office:date-value="2024-03-24" calcext:value-type="date">
            <text:p>2024/03/24</text:p>
          </table:table-cell>
          <table:table-cell table:style-name="ce422" table:formula="of:=WEEKDAY([.B748])" office:value-type="date" office:date-value="1899-12-31" calcext:value-type="date">
            <text:p>日</text:p>
          </table:table-cell>
          <table:table-cell/>
          <table:table-cell table:formula="of:=[.E747]+1" office:value-type="float" office:value="45375" calcext:value-type="float">
            <text:p>453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748]+6" office:value-type="date" office:date-value="2024-03-30" calcext:value-type="date">
            <text:p>2024/03/30</text:p>
          </table:table-cell>
          <table:table-cell table:style-name="ce422" table:formula="of:=WEEKDAY([.B749])" office:value-type="date" office:date-value="1900-01-06" calcext:value-type="date">
            <text:p>土</text:p>
          </table:table-cell>
          <table:table-cell/>
          <table:table-cell table:formula="of:=[.E748]+6" office:value-type="float" office:value="45381" calcext:value-type="float">
            <text:p>453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749]+1" office:value-type="date" office:date-value="2024-03-31" calcext:value-type="date">
            <text:p>2024/03/31</text:p>
          </table:table-cell>
          <table:table-cell table:style-name="ce422" table:formula="of:=WEEKDAY([.B750])" office:value-type="date" office:date-value="1899-12-31" calcext:value-type="date">
            <text:p>日</text:p>
          </table:table-cell>
          <table:table-cell/>
          <table:table-cell table:formula="of:=[.E749]+1" office:value-type="float" office:value="45382" calcext:value-type="float">
            <text:p>453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750]+6" office:value-type="date" office:date-value="2024-04-06" calcext:value-type="date">
            <text:p>2024/04/06</text:p>
          </table:table-cell>
          <table:table-cell table:style-name="ce422" table:formula="of:=WEEKDAY([.B751])" office:value-type="date" office:date-value="1900-01-06" calcext:value-type="date">
            <text:p>土</text:p>
          </table:table-cell>
          <table:table-cell/>
          <table:table-cell table:formula="of:=[.E750]+6" office:value-type="float" office:value="45388" calcext:value-type="float">
            <text:p>453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751]+1" office:value-type="date" office:date-value="2024-04-07" calcext:value-type="date">
            <text:p>2024/04/07</text:p>
          </table:table-cell>
          <table:table-cell table:style-name="ce422" table:formula="of:=WEEKDAY([.B752])" office:value-type="date" office:date-value="1899-12-31" calcext:value-type="date">
            <text:p>日</text:p>
          </table:table-cell>
          <table:table-cell/>
          <table:table-cell table:formula="of:=[.E751]+1" office:value-type="float" office:value="45389" calcext:value-type="float">
            <text:p>453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752]+6" office:value-type="date" office:date-value="2024-04-13" calcext:value-type="date">
            <text:p>2024/04/13</text:p>
          </table:table-cell>
          <table:table-cell table:style-name="ce422" table:formula="of:=WEEKDAY([.B753])" office:value-type="date" office:date-value="1900-01-06" calcext:value-type="date">
            <text:p>土</text:p>
          </table:table-cell>
          <table:table-cell/>
          <table:table-cell table:formula="of:=[.E752]+6" office:value-type="float" office:value="45395" calcext:value-type="float">
            <text:p>453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753]+1" office:value-type="date" office:date-value="2024-04-14" calcext:value-type="date">
            <text:p>2024/04/14</text:p>
          </table:table-cell>
          <table:table-cell table:style-name="ce422" table:formula="of:=WEEKDAY([.B754])" office:value-type="date" office:date-value="1899-12-31" calcext:value-type="date">
            <text:p>日</text:p>
          </table:table-cell>
          <table:table-cell/>
          <table:table-cell table:formula="of:=[.E753]+1" office:value-type="float" office:value="45396" calcext:value-type="float">
            <text:p>453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754]+6" office:value-type="date" office:date-value="2024-04-20" calcext:value-type="date">
            <text:p>2024/04/20</text:p>
          </table:table-cell>
          <table:table-cell table:style-name="ce422" table:formula="of:=WEEKDAY([.B755])" office:value-type="date" office:date-value="1900-01-06" calcext:value-type="date">
            <text:p>土</text:p>
          </table:table-cell>
          <table:table-cell/>
          <table:table-cell table:formula="of:=[.E754]+6" office:value-type="float" office:value="45402" calcext:value-type="float">
            <text:p>454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755]+1" office:value-type="date" office:date-value="2024-04-21" calcext:value-type="date">
            <text:p>2024/04/21</text:p>
          </table:table-cell>
          <table:table-cell table:style-name="ce422" table:formula="of:=WEEKDAY([.B756])" office:value-type="date" office:date-value="1899-12-31" calcext:value-type="date">
            <text:p>日</text:p>
          </table:table-cell>
          <table:table-cell/>
          <table:table-cell table:formula="of:=[.E755]+1" office:value-type="float" office:value="45403" calcext:value-type="float">
            <text:p>454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756]+6" office:value-type="date" office:date-value="2024-04-27" calcext:value-type="date">
            <text:p>2024/04/27</text:p>
          </table:table-cell>
          <table:table-cell table:style-name="ce422" table:formula="of:=WEEKDAY([.B757])" office:value-type="date" office:date-value="1900-01-06" calcext:value-type="date">
            <text:p>土</text:p>
          </table:table-cell>
          <table:table-cell/>
          <table:table-cell table:formula="of:=[.E756]+6" office:value-type="float" office:value="45409" calcext:value-type="float">
            <text:p>454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757]+1" office:value-type="date" office:date-value="2024-04-28" calcext:value-type="date">
            <text:p>2024/04/28</text:p>
          </table:table-cell>
          <table:table-cell table:style-name="ce422" table:formula="of:=WEEKDAY([.B758])" office:value-type="date" office:date-value="1899-12-31" calcext:value-type="date">
            <text:p>日</text:p>
          </table:table-cell>
          <table:table-cell/>
          <table:table-cell table:formula="of:=[.E757]+1" office:value-type="float" office:value="45410" calcext:value-type="float">
            <text:p>454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758]+6" office:value-type="date" office:date-value="2024-05-04" calcext:value-type="date">
            <text:p>2024/05/04</text:p>
          </table:table-cell>
          <table:table-cell table:style-name="ce422" table:formula="of:=WEEKDAY([.B759])" office:value-type="date" office:date-value="1900-01-06" calcext:value-type="date">
            <text:p>土</text:p>
          </table:table-cell>
          <table:table-cell/>
          <table:table-cell table:formula="of:=[.E758]+6" office:value-type="float" office:value="45416" calcext:value-type="float">
            <text:p>454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759]+1" office:value-type="date" office:date-value="2024-05-05" calcext:value-type="date">
            <text:p>2024/05/05</text:p>
          </table:table-cell>
          <table:table-cell table:style-name="ce422" table:formula="of:=WEEKDAY([.B760])" office:value-type="date" office:date-value="1899-12-31" calcext:value-type="date">
            <text:p>日</text:p>
          </table:table-cell>
          <table:table-cell/>
          <table:table-cell table:formula="of:=[.E759]+1" office:value-type="float" office:value="45417" calcext:value-type="float">
            <text:p>454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760]+6" office:value-type="date" office:date-value="2024-05-11" calcext:value-type="date">
            <text:p>2024/05/11</text:p>
          </table:table-cell>
          <table:table-cell table:style-name="ce422" table:formula="of:=WEEKDAY([.B761])" office:value-type="date" office:date-value="1900-01-06" calcext:value-type="date">
            <text:p>土</text:p>
          </table:table-cell>
          <table:table-cell/>
          <table:table-cell table:formula="of:=[.E760]+6" office:value-type="float" office:value="45423" calcext:value-type="float">
            <text:p>454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761]+1" office:value-type="date" office:date-value="2024-05-12" calcext:value-type="date">
            <text:p>2024/05/12</text:p>
          </table:table-cell>
          <table:table-cell table:style-name="ce422" table:formula="of:=WEEKDAY([.B762])" office:value-type="date" office:date-value="1899-12-31" calcext:value-type="date">
            <text:p>日</text:p>
          </table:table-cell>
          <table:table-cell/>
          <table:table-cell table:formula="of:=[.E761]+1" office:value-type="float" office:value="45424" calcext:value-type="float">
            <text:p>454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762]+6" office:value-type="date" office:date-value="2024-05-18" calcext:value-type="date">
            <text:p>2024/05/18</text:p>
          </table:table-cell>
          <table:table-cell table:style-name="ce422" table:formula="of:=WEEKDAY([.B763])" office:value-type="date" office:date-value="1900-01-06" calcext:value-type="date">
            <text:p>土</text:p>
          </table:table-cell>
          <table:table-cell/>
          <table:table-cell table:formula="of:=[.E762]+6" office:value-type="float" office:value="45430" calcext:value-type="float">
            <text:p>4543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763]+1" office:value-type="date" office:date-value="2024-05-19" calcext:value-type="date">
            <text:p>2024/05/19</text:p>
          </table:table-cell>
          <table:table-cell table:style-name="ce422" table:formula="of:=WEEKDAY([.B764])" office:value-type="date" office:date-value="1899-12-31" calcext:value-type="date">
            <text:p>日</text:p>
          </table:table-cell>
          <table:table-cell/>
          <table:table-cell table:formula="of:=[.E763]+1" office:value-type="float" office:value="45431" calcext:value-type="float">
            <text:p>454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764]+6" office:value-type="date" office:date-value="2024-05-25" calcext:value-type="date">
            <text:p>2024/05/25</text:p>
          </table:table-cell>
          <table:table-cell table:style-name="ce422" table:formula="of:=WEEKDAY([.B765])" office:value-type="date" office:date-value="1900-01-06" calcext:value-type="date">
            <text:p>土</text:p>
          </table:table-cell>
          <table:table-cell/>
          <table:table-cell table:formula="of:=[.E764]+6" office:value-type="float" office:value="45437" calcext:value-type="float">
            <text:p>454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765]+1" office:value-type="date" office:date-value="2024-05-26" calcext:value-type="date">
            <text:p>2024/05/26</text:p>
          </table:table-cell>
          <table:table-cell table:style-name="ce422" table:formula="of:=WEEKDAY([.B766])" office:value-type="date" office:date-value="1899-12-31" calcext:value-type="date">
            <text:p>日</text:p>
          </table:table-cell>
          <table:table-cell/>
          <table:table-cell table:formula="of:=[.E765]+1" office:value-type="float" office:value="45438" calcext:value-type="float">
            <text:p>454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766]+6" office:value-type="date" office:date-value="2024-06-01" calcext:value-type="date">
            <text:p>2024/06/01</text:p>
          </table:table-cell>
          <table:table-cell table:style-name="ce422" table:formula="of:=WEEKDAY([.B767])" office:value-type="date" office:date-value="1900-01-06" calcext:value-type="date">
            <text:p>土</text:p>
          </table:table-cell>
          <table:table-cell/>
          <table:table-cell table:formula="of:=[.E766]+6" office:value-type="float" office:value="45444" calcext:value-type="float">
            <text:p>454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767]+1" office:value-type="date" office:date-value="2024-06-02" calcext:value-type="date">
            <text:p>2024/06/02</text:p>
          </table:table-cell>
          <table:table-cell table:style-name="ce422" table:formula="of:=WEEKDAY([.B768])" office:value-type="date" office:date-value="1899-12-31" calcext:value-type="date">
            <text:p>日</text:p>
          </table:table-cell>
          <table:table-cell/>
          <table:table-cell table:formula="of:=[.E767]+1" office:value-type="float" office:value="45445" calcext:value-type="float">
            <text:p>454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768]+6" office:value-type="date" office:date-value="2024-06-08" calcext:value-type="date">
            <text:p>2024/06/08</text:p>
          </table:table-cell>
          <table:table-cell table:style-name="ce422" table:formula="of:=WEEKDAY([.B769])" office:value-type="date" office:date-value="1900-01-06" calcext:value-type="date">
            <text:p>土</text:p>
          </table:table-cell>
          <table:table-cell/>
          <table:table-cell table:formula="of:=[.E768]+6" office:value-type="float" office:value="45451" calcext:value-type="float">
            <text:p>454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769]+1" office:value-type="date" office:date-value="2024-06-09" calcext:value-type="date">
            <text:p>2024/06/09</text:p>
          </table:table-cell>
          <table:table-cell table:style-name="ce422" table:formula="of:=WEEKDAY([.B770])" office:value-type="date" office:date-value="1899-12-31" calcext:value-type="date">
            <text:p>日</text:p>
          </table:table-cell>
          <table:table-cell/>
          <table:table-cell table:formula="of:=[.E769]+1" office:value-type="float" office:value="45452" calcext:value-type="float">
            <text:p>454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770]+6" office:value-type="date" office:date-value="2024-06-15" calcext:value-type="date">
            <text:p>2024/06/15</text:p>
          </table:table-cell>
          <table:table-cell table:style-name="ce422" table:formula="of:=WEEKDAY([.B771])" office:value-type="date" office:date-value="1900-01-06" calcext:value-type="date">
            <text:p>土</text:p>
          </table:table-cell>
          <table:table-cell/>
          <table:table-cell table:formula="of:=[.E770]+6" office:value-type="float" office:value="45458" calcext:value-type="float">
            <text:p>454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771]+1" office:value-type="date" office:date-value="2024-06-16" calcext:value-type="date">
            <text:p>2024/06/16</text:p>
          </table:table-cell>
          <table:table-cell table:style-name="ce422" table:formula="of:=WEEKDAY([.B772])" office:value-type="date" office:date-value="1899-12-31" calcext:value-type="date">
            <text:p>日</text:p>
          </table:table-cell>
          <table:table-cell/>
          <table:table-cell table:formula="of:=[.E771]+1" office:value-type="float" office:value="45459" calcext:value-type="float">
            <text:p>454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772]+6" office:value-type="date" office:date-value="2024-06-22" calcext:value-type="date">
            <text:p>2024/06/22</text:p>
          </table:table-cell>
          <table:table-cell table:style-name="ce422" table:formula="of:=WEEKDAY([.B773])" office:value-type="date" office:date-value="1900-01-06" calcext:value-type="date">
            <text:p>土</text:p>
          </table:table-cell>
          <table:table-cell/>
          <table:table-cell table:formula="of:=[.E772]+6" office:value-type="float" office:value="45465" calcext:value-type="float">
            <text:p>4546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773]+1" office:value-type="date" office:date-value="2024-06-23" calcext:value-type="date">
            <text:p>2024/06/23</text:p>
          </table:table-cell>
          <table:table-cell table:style-name="ce422" table:formula="of:=WEEKDAY([.B774])" office:value-type="date" office:date-value="1899-12-31" calcext:value-type="date">
            <text:p>日</text:p>
          </table:table-cell>
          <table:table-cell/>
          <table:table-cell table:formula="of:=[.E773]+1" office:value-type="float" office:value="45466" calcext:value-type="float">
            <text:p>4546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774]+6" office:value-type="date" office:date-value="2024-06-29" calcext:value-type="date">
            <text:p>2024/06/29</text:p>
          </table:table-cell>
          <table:table-cell table:style-name="ce422" table:formula="of:=WEEKDAY([.B775])" office:value-type="date" office:date-value="1900-01-06" calcext:value-type="date">
            <text:p>土</text:p>
          </table:table-cell>
          <table:table-cell/>
          <table:table-cell table:formula="of:=[.E774]+6" office:value-type="float" office:value="45472" calcext:value-type="float">
            <text:p>454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775]+1" office:value-type="date" office:date-value="2024-06-30" calcext:value-type="date">
            <text:p>2024/06/30</text:p>
          </table:table-cell>
          <table:table-cell table:style-name="ce422" table:formula="of:=WEEKDAY([.B776])" office:value-type="date" office:date-value="1899-12-31" calcext:value-type="date">
            <text:p>日</text:p>
          </table:table-cell>
          <table:table-cell/>
          <table:table-cell table:formula="of:=[.E775]+1" office:value-type="float" office:value="45473" calcext:value-type="float">
            <text:p>454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776]+6" office:value-type="date" office:date-value="2024-07-06" calcext:value-type="date">
            <text:p>2024/07/06</text:p>
          </table:table-cell>
          <table:table-cell table:style-name="ce422" table:formula="of:=WEEKDAY([.B777])" office:value-type="date" office:date-value="1900-01-06" calcext:value-type="date">
            <text:p>土</text:p>
          </table:table-cell>
          <table:table-cell/>
          <table:table-cell table:formula="of:=[.E776]+6" office:value-type="float" office:value="45479" calcext:value-type="float">
            <text:p>454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777]+1" office:value-type="date" office:date-value="2024-07-07" calcext:value-type="date">
            <text:p>2024/07/07</text:p>
          </table:table-cell>
          <table:table-cell table:style-name="ce422" table:formula="of:=WEEKDAY([.B778])" office:value-type="date" office:date-value="1899-12-31" calcext:value-type="date">
            <text:p>日</text:p>
          </table:table-cell>
          <table:table-cell/>
          <table:table-cell table:formula="of:=[.E777]+1" office:value-type="float" office:value="45480" calcext:value-type="float">
            <text:p>454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778]+6" office:value-type="date" office:date-value="2024-07-13" calcext:value-type="date">
            <text:p>2024/07/13</text:p>
          </table:table-cell>
          <table:table-cell table:style-name="ce422" table:formula="of:=WEEKDAY([.B779])" office:value-type="date" office:date-value="1900-01-06" calcext:value-type="date">
            <text:p>土</text:p>
          </table:table-cell>
          <table:table-cell/>
          <table:table-cell table:formula="of:=[.E778]+6" office:value-type="float" office:value="45486" calcext:value-type="float">
            <text:p>454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779]+1" office:value-type="date" office:date-value="2024-07-14" calcext:value-type="date">
            <text:p>2024/07/14</text:p>
          </table:table-cell>
          <table:table-cell table:style-name="ce422" table:formula="of:=WEEKDAY([.B780])" office:value-type="date" office:date-value="1899-12-31" calcext:value-type="date">
            <text:p>日</text:p>
          </table:table-cell>
          <table:table-cell/>
          <table:table-cell table:formula="of:=[.E779]+1" office:value-type="float" office:value="45487" calcext:value-type="float">
            <text:p>454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780]+6" office:value-type="date" office:date-value="2024-07-20" calcext:value-type="date">
            <text:p>2024/07/20</text:p>
          </table:table-cell>
          <table:table-cell table:style-name="ce422" table:formula="of:=WEEKDAY([.B781])" office:value-type="date" office:date-value="1900-01-06" calcext:value-type="date">
            <text:p>土</text:p>
          </table:table-cell>
          <table:table-cell/>
          <table:table-cell table:formula="of:=[.E780]+6" office:value-type="float" office:value="45493" calcext:value-type="float">
            <text:p>454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781]+1" office:value-type="date" office:date-value="2024-07-21" calcext:value-type="date">
            <text:p>2024/07/21</text:p>
          </table:table-cell>
          <table:table-cell table:style-name="ce422" table:formula="of:=WEEKDAY([.B782])" office:value-type="date" office:date-value="1899-12-31" calcext:value-type="date">
            <text:p>日</text:p>
          </table:table-cell>
          <table:table-cell/>
          <table:table-cell table:formula="of:=[.E781]+1" office:value-type="float" office:value="45494" calcext:value-type="float">
            <text:p>454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782]+6" office:value-type="date" office:date-value="2024-07-27" calcext:value-type="date">
            <text:p>2024/07/27</text:p>
          </table:table-cell>
          <table:table-cell table:style-name="ce422" table:formula="of:=WEEKDAY([.B783])" office:value-type="date" office:date-value="1900-01-06" calcext:value-type="date">
            <text:p>土</text:p>
          </table:table-cell>
          <table:table-cell/>
          <table:table-cell table:formula="of:=[.E782]+6" office:value-type="float" office:value="45500" calcext:value-type="float">
            <text:p>455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783]+1" office:value-type="date" office:date-value="2024-07-28" calcext:value-type="date">
            <text:p>2024/07/28</text:p>
          </table:table-cell>
          <table:table-cell table:style-name="ce422" table:formula="of:=WEEKDAY([.B784])" office:value-type="date" office:date-value="1899-12-31" calcext:value-type="date">
            <text:p>日</text:p>
          </table:table-cell>
          <table:table-cell/>
          <table:table-cell table:formula="of:=[.E783]+1" office:value-type="float" office:value="45501" calcext:value-type="float">
            <text:p>455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784]+6" office:value-type="date" office:date-value="2024-08-03" calcext:value-type="date">
            <text:p>2024/08/03</text:p>
          </table:table-cell>
          <table:table-cell table:style-name="ce422" table:formula="of:=WEEKDAY([.B785])" office:value-type="date" office:date-value="1900-01-06" calcext:value-type="date">
            <text:p>土</text:p>
          </table:table-cell>
          <table:table-cell/>
          <table:table-cell table:formula="of:=[.E784]+6" office:value-type="float" office:value="45507" calcext:value-type="float">
            <text:p>455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785]+1" office:value-type="date" office:date-value="2024-08-04" calcext:value-type="date">
            <text:p>2024/08/04</text:p>
          </table:table-cell>
          <table:table-cell table:style-name="ce422" table:formula="of:=WEEKDAY([.B786])" office:value-type="date" office:date-value="1899-12-31" calcext:value-type="date">
            <text:p>日</text:p>
          </table:table-cell>
          <table:table-cell/>
          <table:table-cell table:formula="of:=[.E785]+1" office:value-type="float" office:value="45508" calcext:value-type="float">
            <text:p>455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786]+6" office:value-type="date" office:date-value="2024-08-10" calcext:value-type="date">
            <text:p>2024/08/10</text:p>
          </table:table-cell>
          <table:table-cell table:style-name="ce422" table:formula="of:=WEEKDAY([.B787])" office:value-type="date" office:date-value="1900-01-06" calcext:value-type="date">
            <text:p>土</text:p>
          </table:table-cell>
          <table:table-cell/>
          <table:table-cell table:formula="of:=[.E786]+6" office:value-type="float" office:value="45514" calcext:value-type="float">
            <text:p>455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787]+1" office:value-type="date" office:date-value="2024-08-11" calcext:value-type="date">
            <text:p>2024/08/11</text:p>
          </table:table-cell>
          <table:table-cell table:style-name="ce422" table:formula="of:=WEEKDAY([.B788])" office:value-type="date" office:date-value="1899-12-31" calcext:value-type="date">
            <text:p>日</text:p>
          </table:table-cell>
          <table:table-cell/>
          <table:table-cell table:formula="of:=[.E787]+1" office:value-type="float" office:value="45515" calcext:value-type="float">
            <text:p>455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788]+6" office:value-type="date" office:date-value="2024-08-17" calcext:value-type="date">
            <text:p>2024/08/17</text:p>
          </table:table-cell>
          <table:table-cell table:style-name="ce422" table:formula="of:=WEEKDAY([.B789])" office:value-type="date" office:date-value="1900-01-06" calcext:value-type="date">
            <text:p>土</text:p>
          </table:table-cell>
          <table:table-cell/>
          <table:table-cell table:formula="of:=[.E788]+6" office:value-type="float" office:value="45521" calcext:value-type="float">
            <text:p>455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789]+1" office:value-type="date" office:date-value="2024-08-18" calcext:value-type="date">
            <text:p>2024/08/18</text:p>
          </table:table-cell>
          <table:table-cell table:style-name="ce422" table:formula="of:=WEEKDAY([.B790])" office:value-type="date" office:date-value="1899-12-31" calcext:value-type="date">
            <text:p>日</text:p>
          </table:table-cell>
          <table:table-cell/>
          <table:table-cell table:formula="of:=[.E789]+1" office:value-type="float" office:value="45522" calcext:value-type="float">
            <text:p>4552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790]+6" office:value-type="date" office:date-value="2024-08-24" calcext:value-type="date">
            <text:p>2024/08/24</text:p>
          </table:table-cell>
          <table:table-cell table:style-name="ce422" table:formula="of:=WEEKDAY([.B791])" office:value-type="date" office:date-value="1900-01-06" calcext:value-type="date">
            <text:p>土</text:p>
          </table:table-cell>
          <table:table-cell/>
          <table:table-cell table:formula="of:=[.E790]+6" office:value-type="float" office:value="45528" calcext:value-type="float">
            <text:p>455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791]+1" office:value-type="date" office:date-value="2024-08-25" calcext:value-type="date">
            <text:p>2024/08/25</text:p>
          </table:table-cell>
          <table:table-cell table:style-name="ce422" table:formula="of:=WEEKDAY([.B792])" office:value-type="date" office:date-value="1899-12-31" calcext:value-type="date">
            <text:p>日</text:p>
          </table:table-cell>
          <table:table-cell/>
          <table:table-cell table:formula="of:=[.E791]+1" office:value-type="float" office:value="45529" calcext:value-type="float">
            <text:p>455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792]+6" office:value-type="date" office:date-value="2024-08-31" calcext:value-type="date">
            <text:p>2024/08/31</text:p>
          </table:table-cell>
          <table:table-cell table:style-name="ce422" table:formula="of:=WEEKDAY([.B793])" office:value-type="date" office:date-value="1900-01-06" calcext:value-type="date">
            <text:p>土</text:p>
          </table:table-cell>
          <table:table-cell/>
          <table:table-cell table:formula="of:=[.E792]+6" office:value-type="float" office:value="45535" calcext:value-type="float">
            <text:p>455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793]+1" office:value-type="date" office:date-value="2024-09-01" calcext:value-type="date">
            <text:p>2024/09/01</text:p>
          </table:table-cell>
          <table:table-cell table:style-name="ce422" table:formula="of:=WEEKDAY([.B794])" office:value-type="date" office:date-value="1899-12-31" calcext:value-type="date">
            <text:p>日</text:p>
          </table:table-cell>
          <table:table-cell/>
          <table:table-cell table:formula="of:=[.E793]+1" office:value-type="float" office:value="45536" calcext:value-type="float">
            <text:p>455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794]+6" office:value-type="date" office:date-value="2024-09-07" calcext:value-type="date">
            <text:p>2024/09/07</text:p>
          </table:table-cell>
          <table:table-cell table:style-name="ce422" table:formula="of:=WEEKDAY([.B795])" office:value-type="date" office:date-value="1900-01-06" calcext:value-type="date">
            <text:p>土</text:p>
          </table:table-cell>
          <table:table-cell/>
          <table:table-cell table:formula="of:=[.E794]+6" office:value-type="float" office:value="45542" calcext:value-type="float">
            <text:p>455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795]+1" office:value-type="date" office:date-value="2024-09-08" calcext:value-type="date">
            <text:p>2024/09/08</text:p>
          </table:table-cell>
          <table:table-cell table:style-name="ce422" table:formula="of:=WEEKDAY([.B796])" office:value-type="date" office:date-value="1899-12-31" calcext:value-type="date">
            <text:p>日</text:p>
          </table:table-cell>
          <table:table-cell/>
          <table:table-cell table:formula="of:=[.E795]+1" office:value-type="float" office:value="45543" calcext:value-type="float">
            <text:p>455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796]+6" office:value-type="date" office:date-value="2024-09-14" calcext:value-type="date">
            <text:p>2024/09/14</text:p>
          </table:table-cell>
          <table:table-cell table:style-name="ce422" table:formula="of:=WEEKDAY([.B797])" office:value-type="date" office:date-value="1900-01-06" calcext:value-type="date">
            <text:p>土</text:p>
          </table:table-cell>
          <table:table-cell/>
          <table:table-cell table:formula="of:=[.E796]+6" office:value-type="float" office:value="45549" calcext:value-type="float">
            <text:p>455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797]+1" office:value-type="date" office:date-value="2024-09-15" calcext:value-type="date">
            <text:p>2024/09/15</text:p>
          </table:table-cell>
          <table:table-cell table:style-name="ce422" table:formula="of:=WEEKDAY([.B798])" office:value-type="date" office:date-value="1899-12-31" calcext:value-type="date">
            <text:p>日</text:p>
          </table:table-cell>
          <table:table-cell/>
          <table:table-cell table:formula="of:=[.E797]+1" office:value-type="float" office:value="45550" calcext:value-type="float">
            <text:p>455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798]+6" office:value-type="date" office:date-value="2024-09-21" calcext:value-type="date">
            <text:p>2024/09/21</text:p>
          </table:table-cell>
          <table:table-cell table:style-name="ce422" table:formula="of:=WEEKDAY([.B799])" office:value-type="date" office:date-value="1900-01-06" calcext:value-type="date">
            <text:p>土</text:p>
          </table:table-cell>
          <table:table-cell/>
          <table:table-cell table:formula="of:=[.E798]+6" office:value-type="float" office:value="45556" calcext:value-type="float">
            <text:p>455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799]+1" office:value-type="date" office:date-value="2024-09-22" calcext:value-type="date">
            <text:p>2024/09/22</text:p>
          </table:table-cell>
          <table:table-cell table:style-name="ce422" table:formula="of:=WEEKDAY([.B800])" office:value-type="date" office:date-value="1899-12-31" calcext:value-type="date">
            <text:p>日</text:p>
          </table:table-cell>
          <table:table-cell/>
          <table:table-cell table:formula="of:=[.E799]+1" office:value-type="float" office:value="45557" calcext:value-type="float">
            <text:p>455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800]+6" office:value-type="date" office:date-value="2024-09-28" calcext:value-type="date">
            <text:p>2024/09/28</text:p>
          </table:table-cell>
          <table:table-cell table:style-name="ce422" table:formula="of:=WEEKDAY([.B801])" office:value-type="date" office:date-value="1900-01-06" calcext:value-type="date">
            <text:p>土</text:p>
          </table:table-cell>
          <table:table-cell/>
          <table:table-cell table:formula="of:=[.E800]+6" office:value-type="float" office:value="45563" calcext:value-type="float">
            <text:p>455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801]+1" office:value-type="date" office:date-value="2024-09-29" calcext:value-type="date">
            <text:p>2024/09/29</text:p>
          </table:table-cell>
          <table:table-cell table:style-name="ce422" table:formula="of:=WEEKDAY([.B802])" office:value-type="date" office:date-value="1899-12-31" calcext:value-type="date">
            <text:p>日</text:p>
          </table:table-cell>
          <table:table-cell/>
          <table:table-cell table:formula="of:=[.E801]+1" office:value-type="float" office:value="45564" calcext:value-type="float">
            <text:p>455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802]+6" office:value-type="date" office:date-value="2024-10-05" calcext:value-type="date">
            <text:p>2024/10/05</text:p>
          </table:table-cell>
          <table:table-cell table:style-name="ce422" table:formula="of:=WEEKDAY([.B803])" office:value-type="date" office:date-value="1900-01-06" calcext:value-type="date">
            <text:p>土</text:p>
          </table:table-cell>
          <table:table-cell/>
          <table:table-cell table:formula="of:=[.E802]+6" office:value-type="float" office:value="45570" calcext:value-type="float">
            <text:p>455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803]+1" office:value-type="date" office:date-value="2024-10-06" calcext:value-type="date">
            <text:p>2024/10/06</text:p>
          </table:table-cell>
          <table:table-cell table:style-name="ce422" table:formula="of:=WEEKDAY([.B804])" office:value-type="date" office:date-value="1899-12-31" calcext:value-type="date">
            <text:p>日</text:p>
          </table:table-cell>
          <table:table-cell/>
          <table:table-cell table:formula="of:=[.E803]+1" office:value-type="float" office:value="45571" calcext:value-type="float">
            <text:p>455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804]+6" office:value-type="date" office:date-value="2024-10-12" calcext:value-type="date">
            <text:p>2024/10/12</text:p>
          </table:table-cell>
          <table:table-cell table:style-name="ce422" table:formula="of:=WEEKDAY([.B805])" office:value-type="date" office:date-value="1900-01-06" calcext:value-type="date">
            <text:p>土</text:p>
          </table:table-cell>
          <table:table-cell/>
          <table:table-cell table:formula="of:=[.E804]+6" office:value-type="float" office:value="45577" calcext:value-type="float">
            <text:p>455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805]+1" office:value-type="date" office:date-value="2024-10-13" calcext:value-type="date">
            <text:p>2024/10/13</text:p>
          </table:table-cell>
          <table:table-cell table:style-name="ce422" table:formula="of:=WEEKDAY([.B806])" office:value-type="date" office:date-value="1899-12-31" calcext:value-type="date">
            <text:p>日</text:p>
          </table:table-cell>
          <table:table-cell/>
          <table:table-cell table:formula="of:=[.E805]+1" office:value-type="float" office:value="45578" calcext:value-type="float">
            <text:p>455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806]+6" office:value-type="date" office:date-value="2024-10-19" calcext:value-type="date">
            <text:p>2024/10/19</text:p>
          </table:table-cell>
          <table:table-cell table:style-name="ce422" table:formula="of:=WEEKDAY([.B807])" office:value-type="date" office:date-value="1900-01-06" calcext:value-type="date">
            <text:p>土</text:p>
          </table:table-cell>
          <table:table-cell/>
          <table:table-cell table:formula="of:=[.E806]+6" office:value-type="float" office:value="45584" calcext:value-type="float">
            <text:p>455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807]+1" office:value-type="date" office:date-value="2024-10-20" calcext:value-type="date">
            <text:p>2024/10/20</text:p>
          </table:table-cell>
          <table:table-cell table:style-name="ce422" table:formula="of:=WEEKDAY([.B808])" office:value-type="date" office:date-value="1899-12-31" calcext:value-type="date">
            <text:p>日</text:p>
          </table:table-cell>
          <table:table-cell/>
          <table:table-cell table:formula="of:=[.E807]+1" office:value-type="float" office:value="45585" calcext:value-type="float">
            <text:p>455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808]+6" office:value-type="date" office:date-value="2024-10-26" calcext:value-type="date">
            <text:p>2024/10/26</text:p>
          </table:table-cell>
          <table:table-cell table:style-name="ce422" table:formula="of:=WEEKDAY([.B809])" office:value-type="date" office:date-value="1900-01-06" calcext:value-type="date">
            <text:p>土</text:p>
          </table:table-cell>
          <table:table-cell/>
          <table:table-cell table:formula="of:=[.E808]+6" office:value-type="float" office:value="45591" calcext:value-type="float">
            <text:p>455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809]+1" office:value-type="date" office:date-value="2024-10-27" calcext:value-type="date">
            <text:p>2024/10/27</text:p>
          </table:table-cell>
          <table:table-cell table:style-name="ce422" table:formula="of:=WEEKDAY([.B810])" office:value-type="date" office:date-value="1899-12-31" calcext:value-type="date">
            <text:p>日</text:p>
          </table:table-cell>
          <table:table-cell/>
          <table:table-cell table:formula="of:=[.E809]+1" office:value-type="float" office:value="45592" calcext:value-type="float">
            <text:p>455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810]+6" office:value-type="date" office:date-value="2024-11-02" calcext:value-type="date">
            <text:p>2024/11/02</text:p>
          </table:table-cell>
          <table:table-cell table:style-name="ce422" table:formula="of:=WEEKDAY([.B811])" office:value-type="date" office:date-value="1900-01-06" calcext:value-type="date">
            <text:p>土</text:p>
          </table:table-cell>
          <table:table-cell/>
          <table:table-cell table:formula="of:=[.E810]+6" office:value-type="float" office:value="45598" calcext:value-type="float">
            <text:p>455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811]+1" office:value-type="date" office:date-value="2024-11-03" calcext:value-type="date">
            <text:p>2024/11/03</text:p>
          </table:table-cell>
          <table:table-cell table:style-name="ce422" table:formula="of:=WEEKDAY([.B812])" office:value-type="date" office:date-value="1899-12-31" calcext:value-type="date">
            <text:p>日</text:p>
          </table:table-cell>
          <table:table-cell/>
          <table:table-cell table:formula="of:=[.E811]+1" office:value-type="float" office:value="45599" calcext:value-type="float">
            <text:p>455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812]+6" office:value-type="date" office:date-value="2024-11-09" calcext:value-type="date">
            <text:p>2024/11/09</text:p>
          </table:table-cell>
          <table:table-cell table:style-name="ce422" table:formula="of:=WEEKDAY([.B813])" office:value-type="date" office:date-value="1900-01-06" calcext:value-type="date">
            <text:p>土</text:p>
          </table:table-cell>
          <table:table-cell/>
          <table:table-cell table:formula="of:=[.E812]+6" office:value-type="float" office:value="45605" calcext:value-type="float">
            <text:p>456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813]+1" office:value-type="date" office:date-value="2024-11-10" calcext:value-type="date">
            <text:p>2024/11/10</text:p>
          </table:table-cell>
          <table:table-cell table:style-name="ce422" table:formula="of:=WEEKDAY([.B814])" office:value-type="date" office:date-value="1899-12-31" calcext:value-type="date">
            <text:p>日</text:p>
          </table:table-cell>
          <table:table-cell/>
          <table:table-cell table:formula="of:=[.E813]+1" office:value-type="float" office:value="45606" calcext:value-type="float">
            <text:p>456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814]+6" office:value-type="date" office:date-value="2024-11-16" calcext:value-type="date">
            <text:p>2024/11/16</text:p>
          </table:table-cell>
          <table:table-cell table:style-name="ce422" table:formula="of:=WEEKDAY([.B815])" office:value-type="date" office:date-value="1900-01-06" calcext:value-type="date">
            <text:p>土</text:p>
          </table:table-cell>
          <table:table-cell/>
          <table:table-cell table:formula="of:=[.E814]+6" office:value-type="float" office:value="45612" calcext:value-type="float">
            <text:p>456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815]+1" office:value-type="date" office:date-value="2024-11-17" calcext:value-type="date">
            <text:p>2024/11/17</text:p>
          </table:table-cell>
          <table:table-cell table:style-name="ce422" table:formula="of:=WEEKDAY([.B816])" office:value-type="date" office:date-value="1899-12-31" calcext:value-type="date">
            <text:p>日</text:p>
          </table:table-cell>
          <table:table-cell/>
          <table:table-cell table:formula="of:=[.E815]+1" office:value-type="float" office:value="45613" calcext:value-type="float">
            <text:p>4561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816]+6" office:value-type="date" office:date-value="2024-11-23" calcext:value-type="date">
            <text:p>2024/11/23</text:p>
          </table:table-cell>
          <table:table-cell table:style-name="ce422" table:formula="of:=WEEKDAY([.B817])" office:value-type="date" office:date-value="1900-01-06" calcext:value-type="date">
            <text:p>土</text:p>
          </table:table-cell>
          <table:table-cell/>
          <table:table-cell table:formula="of:=[.E816]+6" office:value-type="float" office:value="45619" calcext:value-type="float">
            <text:p>456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817]+1" office:value-type="date" office:date-value="2024-11-24" calcext:value-type="date">
            <text:p>2024/11/24</text:p>
          </table:table-cell>
          <table:table-cell table:style-name="ce422" table:formula="of:=WEEKDAY([.B818])" office:value-type="date" office:date-value="1899-12-31" calcext:value-type="date">
            <text:p>日</text:p>
          </table:table-cell>
          <table:table-cell/>
          <table:table-cell table:formula="of:=[.E817]+1" office:value-type="float" office:value="45620" calcext:value-type="float">
            <text:p>456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818]+6" office:value-type="date" office:date-value="2024-11-30" calcext:value-type="date">
            <text:p>2024/11/30</text:p>
          </table:table-cell>
          <table:table-cell table:style-name="ce422" table:formula="of:=WEEKDAY([.B819])" office:value-type="date" office:date-value="1900-01-06" calcext:value-type="date">
            <text:p>土</text:p>
          </table:table-cell>
          <table:table-cell/>
          <table:table-cell table:formula="of:=[.E818]+6" office:value-type="float" office:value="45626" calcext:value-type="float">
            <text:p>456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819]+1" office:value-type="date" office:date-value="2024-12-01" calcext:value-type="date">
            <text:p>2024/12/01</text:p>
          </table:table-cell>
          <table:table-cell table:style-name="ce422" table:formula="of:=WEEKDAY([.B820])" office:value-type="date" office:date-value="1899-12-31" calcext:value-type="date">
            <text:p>日</text:p>
          </table:table-cell>
          <table:table-cell/>
          <table:table-cell table:formula="of:=[.E819]+1" office:value-type="float" office:value="45627" calcext:value-type="float">
            <text:p>456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820]+6" office:value-type="date" office:date-value="2024-12-07" calcext:value-type="date">
            <text:p>2024/12/07</text:p>
          </table:table-cell>
          <table:table-cell table:style-name="ce422" table:formula="of:=WEEKDAY([.B821])" office:value-type="date" office:date-value="1900-01-06" calcext:value-type="date">
            <text:p>土</text:p>
          </table:table-cell>
          <table:table-cell/>
          <table:table-cell table:formula="of:=[.E820]+6" office:value-type="float" office:value="45633" calcext:value-type="float">
            <text:p>456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821]+1" office:value-type="date" office:date-value="2024-12-08" calcext:value-type="date">
            <text:p>2024/12/08</text:p>
          </table:table-cell>
          <table:table-cell table:style-name="ce422" table:formula="of:=WEEKDAY([.B822])" office:value-type="date" office:date-value="1899-12-31" calcext:value-type="date">
            <text:p>日</text:p>
          </table:table-cell>
          <table:table-cell/>
          <table:table-cell table:formula="of:=[.E821]+1" office:value-type="float" office:value="45634" calcext:value-type="float">
            <text:p>456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822]+6" office:value-type="date" office:date-value="2024-12-14" calcext:value-type="date">
            <text:p>2024/12/14</text:p>
          </table:table-cell>
          <table:table-cell table:style-name="ce422" table:formula="of:=WEEKDAY([.B823])" office:value-type="date" office:date-value="1900-01-06" calcext:value-type="date">
            <text:p>土</text:p>
          </table:table-cell>
          <table:table-cell/>
          <table:table-cell table:formula="of:=[.E822]+6" office:value-type="float" office:value="45640" calcext:value-type="float">
            <text:p>456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823]+1" office:value-type="date" office:date-value="2024-12-15" calcext:value-type="date">
            <text:p>2024/12/15</text:p>
          </table:table-cell>
          <table:table-cell table:style-name="ce422" table:formula="of:=WEEKDAY([.B824])" office:value-type="date" office:date-value="1899-12-31" calcext:value-type="date">
            <text:p>日</text:p>
          </table:table-cell>
          <table:table-cell/>
          <table:table-cell table:formula="of:=[.E823]+1" office:value-type="float" office:value="45641" calcext:value-type="float">
            <text:p>456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824]+6" office:value-type="date" office:date-value="2024-12-21" calcext:value-type="date">
            <text:p>2024/12/21</text:p>
          </table:table-cell>
          <table:table-cell table:style-name="ce422" table:formula="of:=WEEKDAY([.B825])" office:value-type="date" office:date-value="1900-01-06" calcext:value-type="date">
            <text:p>土</text:p>
          </table:table-cell>
          <table:table-cell/>
          <table:table-cell table:formula="of:=[.E824]+6" office:value-type="float" office:value="45647" calcext:value-type="float">
            <text:p>456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825]+1" office:value-type="date" office:date-value="2024-12-22" calcext:value-type="date">
            <text:p>2024/12/22</text:p>
          </table:table-cell>
          <table:table-cell table:style-name="ce422" table:formula="of:=WEEKDAY([.B826])" office:value-type="date" office:date-value="1899-12-31" calcext:value-type="date">
            <text:p>日</text:p>
          </table:table-cell>
          <table:table-cell/>
          <table:table-cell table:formula="of:=[.E825]+1" office:value-type="float" office:value="45648" calcext:value-type="float">
            <text:p>456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826]+6" office:value-type="date" office:date-value="2024-12-28" calcext:value-type="date">
            <text:p>2024/12/28</text:p>
          </table:table-cell>
          <table:table-cell table:style-name="ce422" table:formula="of:=WEEKDAY([.B827])" office:value-type="date" office:date-value="1900-01-06" calcext:value-type="date">
            <text:p>土</text:p>
          </table:table-cell>
          <table:table-cell/>
          <table:table-cell table:formula="of:=[.E826]+6" office:value-type="float" office:value="45654" calcext:value-type="float">
            <text:p>456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827]+1" office:value-type="date" office:date-value="2024-12-29" calcext:value-type="date">
            <text:p>2024/12/29</text:p>
          </table:table-cell>
          <table:table-cell table:style-name="ce422" table:formula="of:=WEEKDAY([.B828])" office:value-type="date" office:date-value="1899-12-31" calcext:value-type="date">
            <text:p>日</text:p>
          </table:table-cell>
          <table:table-cell/>
          <table:table-cell table:formula="of:=[.E827]+1" office:value-type="float" office:value="45655" calcext:value-type="float">
            <text:p>456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828]+6" office:value-type="date" office:date-value="2025-01-04" calcext:value-type="date">
            <text:p>2025/01/04</text:p>
          </table:table-cell>
          <table:table-cell table:style-name="ce422" table:formula="of:=WEEKDAY([.B829])" office:value-type="date" office:date-value="1900-01-06" calcext:value-type="date">
            <text:p>土</text:p>
          </table:table-cell>
          <table:table-cell/>
          <table:table-cell table:formula="of:=[.E828]+6" office:value-type="float" office:value="45661" calcext:value-type="float">
            <text:p>456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829]+1" office:value-type="date" office:date-value="2025-01-05" calcext:value-type="date">
            <text:p>2025/01/05</text:p>
          </table:table-cell>
          <table:table-cell table:style-name="ce422" table:formula="of:=WEEKDAY([.B830])" office:value-type="date" office:date-value="1899-12-31" calcext:value-type="date">
            <text:p>日</text:p>
          </table:table-cell>
          <table:table-cell/>
          <table:table-cell table:formula="of:=[.E829]+1" office:value-type="float" office:value="45662" calcext:value-type="float">
            <text:p>456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830]+6" office:value-type="date" office:date-value="2025-01-11" calcext:value-type="date">
            <text:p>2025/01/11</text:p>
          </table:table-cell>
          <table:table-cell table:style-name="ce422" table:formula="of:=WEEKDAY([.B831])" office:value-type="date" office:date-value="1900-01-06" calcext:value-type="date">
            <text:p>土</text:p>
          </table:table-cell>
          <table:table-cell/>
          <table:table-cell table:formula="of:=[.E830]+6" office:value-type="float" office:value="45668" calcext:value-type="float">
            <text:p>456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831]+1" office:value-type="date" office:date-value="2025-01-12" calcext:value-type="date">
            <text:p>2025/01/12</text:p>
          </table:table-cell>
          <table:table-cell table:style-name="ce422" table:formula="of:=WEEKDAY([.B832])" office:value-type="date" office:date-value="1899-12-31" calcext:value-type="date">
            <text:p>日</text:p>
          </table:table-cell>
          <table:table-cell/>
          <table:table-cell table:formula="of:=[.E831]+1" office:value-type="float" office:value="45669" calcext:value-type="float">
            <text:p>456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832]+6" office:value-type="date" office:date-value="2025-01-18" calcext:value-type="date">
            <text:p>2025/01/18</text:p>
          </table:table-cell>
          <table:table-cell table:style-name="ce422" table:formula="of:=WEEKDAY([.B833])" office:value-type="date" office:date-value="1900-01-06" calcext:value-type="date">
            <text:p>土</text:p>
          </table:table-cell>
          <table:table-cell/>
          <table:table-cell table:formula="of:=[.E832]+6" office:value-type="float" office:value="45675" calcext:value-type="float">
            <text:p>456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833]+1" office:value-type="date" office:date-value="2025-01-19" calcext:value-type="date">
            <text:p>2025/01/19</text:p>
          </table:table-cell>
          <table:table-cell table:style-name="ce422" table:formula="of:=WEEKDAY([.B834])" office:value-type="date" office:date-value="1899-12-31" calcext:value-type="date">
            <text:p>日</text:p>
          </table:table-cell>
          <table:table-cell/>
          <table:table-cell table:formula="of:=[.E833]+1" office:value-type="float" office:value="45676" calcext:value-type="float">
            <text:p>456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1" table:formula="of:=[.B834]+6" office:value-type="date" office:date-value="2025-01-25" calcext:value-type="date">
            <text:p>2025/01/25</text:p>
          </table:table-cell>
          <table:table-cell table:style-name="ce422" table:formula="of:=WEEKDAY([.B835])" office:value-type="date" office:date-value="1900-01-06" calcext:value-type="date">
            <text:p>土</text:p>
          </table:table-cell>
          <table:table-cell/>
          <table:table-cell table:formula="of:=[.E834]+6" office:value-type="float" office:value="45682" calcext:value-type="float">
            <text:p>45682</text:p>
          </table:table-cell>
          <table:table-cell table:style-name="Default" table:number-columns-repeated="16379"/>
        </table:table-row>
        <table:table-row table:style-name="ro1" table:number-rows-repeated="163">
          <table:table-cell table:number-columns-repeated="5"/>
          <table:table-cell table:style-name="Default" table:number-columns-repeated="16379"/>
        </table:table-row>
        <table:table-row table:style-name="ro4" table:number-rows-repeated="1047576">
          <table:table-cell table:number-columns-repeated="5"/>
          <table:table-cell table:style-name="Default" table:number-columns-repeated="16379"/>
        </table:table-row>
        <table:table-row table:style-name="ro5">
          <table:table-cell table:number-columns-repeated="5"/>
          <table:table-cell table:style-name="Default" table:number-columns-repeated="16379"/>
        </table:table-row>
        <table:table-row table:style-name="ro5">
          <table:table-cell table:number-columns-repeated="5"/>
          <table:table-cell table:style-name="Default" table:number-columns-repeated="16379"/>
        </table:table-row>
      </table:table>
      <table:named-expressions/>
      <table:database-ranges>
        <table:database-range table:name="__Anonymous_Sheet_DB__0" table:target-range-address="WBS.C4:WBS.U41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wiss"/>
    <style:font-face style:name="游ゴシック Medium" svg:font-family="'游ゴシック Medium'" style:font-family-generic="modern"/>
    <style:font-face style:name="游ゴシック Medium1" svg:font-family="'游ゴシック Medium'" style:font-family-generic="modern" style:font-pitch="variable"/>
    <style:font-face style:name="ＭＳ ゴシック" svg:font-family="'ＭＳ ゴシック', 'Noto Sans JP', 游ゴシック, メイリオ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number:text>-¥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number:min-decimal-places="2" number:min-integer-digits="1" number:grouping="true"/>
    </number:number-style>
    <number:number-style style:name="N116">
      <number:text>-¥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6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date-style style:name="N131">
      <number:month number:style="long"/>
      <number:text>/</number:text>
      <number:day number:style="long"/>
      <number:text>/</number:text>
      <number:year/>
    </number:date-style>
    <number:date-style style:name="N132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33">
      <number:year number:style="long"/>
      <number:text>年</number:text>
      <number:month number:style="long"/>
      <number:text>月</number:text>
    </number:date-style>
    <number:date-style style:name="N134">
      <number:month number:style="long"/>
      <number:text>月</number:text>
      <number:day number:style="long"/>
      <number:text>日</number:text>
    </number:dat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2P2" style:volatile="true">
      <number:text loext:blank-width-char="-"> </number:text>
      <number:fill-character> </number:fill-character>
      <number:text loext:blank-width-char="-1">-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¥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6P1" style:volatile="true">
      <number:text>-¥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6P2" style:volatile="true">
      <number:text loext:blank-width-char="-"> ¥</number:text>
      <number:fill-character> </number:fill-character>
      <number:text loext:blank-width-char="-1">-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 loext:blank-width-char="-"> ¥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4P1" style:volatile="true">
      <number:text>-¥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4P2" style:volatile="true">
      <number:text loext:blank-width-char="-"> ¥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4">
      <number:text loext:blank-width-char="-"> </number:text>
      <number:text-content/>
      <number:text loext:blank-width-char="-"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9">
      <number:month/>
    </number:date-style>
    <number:date-style style:name="N160">
      <number:day/>
    </number:date-style>
    <number:date-style style:name="N161">
      <number:day/>
      <number:text>日</number:text>
    </number:date-style>
    <number:date-style style:name="N162">
      <number:day-of-week number:calendar="gengou"/>
    </number:date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>
      <style:table-cell-properties style:rotation-align="none" style:vertical-align="bottom"/>
      <style:text-properties fo:color="#000000" style:font-name="游ゴシック" fo:font-family="游ゴシック" style:font-family-generic="swiss" fo:font-size="11pt" style:font-name-asian="游ゴシック" style:font-family-asian="游ゴシック" style:font-family-generic-asian="swiss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tConditionalStyle_5f_1" style:display-name="ExtConditionalStyle_1" style:family="table-cell" style:parent-style-name="Default">
      <style:table-cell-properties fo:background-color="#999999"/>
      <style:text-properties fo:color="#ffffff"/>
    </style:style>
    <style:style style:name="ConditionalStyle_5f_1" style:display-name="ConditionalStyle_1" style:family="table-cell" style:parent-style-name="Default">
      <style:table-cell-properties fo:background-color="#ffff00"/>
    </style:style>
    <style:style style:name="ConditionalStyle_5f_3" style:display-name="ConditionalStyle_3" style:family="table-cell" style:parent-style-name="Default">
      <style:table-cell-properties fo:background-color="#fbe5d6"/>
    </style:style>
    <style:style style:name="ConditionalStyle_5f_2" style:display-name="ConditionalStyle_2" style:family="table-cell" style:parent-style-name="Default">
      <style:table-cell-properties fo:background-color="#ff0000"/>
      <style:text-properties fo:color="#ffff00"/>
    </style:style>
    <style:style style:name="ConditionalStyle_5f_6" style:display-name="ConditionalStyle_6" style:family="table-cell" style:parent-style-name="Default">
      <style:table-cell-properties fo:background-color="#f4c7c3"/>
    </style:style>
    <style:style style:name="ConditionalStyle_5f_5" style:display-name="ConditionalStyle_5" style:family="table-cell" style:parent-style-name="Default">
      <style:table-cell-properties fo:background-color="#b7e1cd"/>
    </style:style>
    <draw:marker draw:name="msArrowEnd_20_5" draw:display-name="msArrowEnd 5" svg:viewBox="0 0 300 300" svg:d="M150 0l150 300h-300z"/>
    <draw:marker draw:name="線の終点_20_1" draw:display-name="線の終点 1" svg:viewBox="0 0 20 30" svg:d="M10 0l-10 30h20z"/>
    <loext:theme loext:name="Office 2013 - 2022 テーマ">
      <loext:theme-colors loext:name="Office 2013 - 2022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2">0000/00/00</text:date>, <text:time style:data-style-name="N2" text:time-value="17:15:01.8760963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休日" style:display-name="PageStyle_休日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WBS" style:display-name="PageStyle_WB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Kensuke Mori</meta:initial-creator>
    <meta:editing-cycles>28</meta:editing-cycles>
    <meta:creation-date>2020-07-07T01:18:25</meta:creation-date>
    <dc:date>2026-06-22T17:13:55.956099100</dc:date>
    <dc:language>ja-JP</dc:language>
    <meta:editing-duration>PT3H23M33S</meta:editing-duration>
    <meta:generator>LibreOffice/25.8.6.2$Windows_X86_64 LibreOffice_project/b4b39682cd9868fa725bc664aff94278d315bd04</meta:generator>
    <meta:document-statistic meta:table-count="2" meta:cell-count="8756" meta:object-count="0"/>
    <meta:user-defined meta:name="AppVersion">16.0300</meta:user-defined>
    <meta:user-defined meta:name="ContentTypeId">0x010100B552E1E9D63E444D813A0265B822756D</meta:user-defined>
  </office:meta>
</office:document-meta>
</file>