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4.761cm"/>
    </style:style>
    <style:style style:name="co5" style:family="table-column">
      <style:table-column-properties fo:break-before="auto" style:column-width="6.581cm"/>
    </style:style>
    <style:style style:name="co6" style:family="table-column">
      <style:table-column-properties fo:break-before="auto" style:column-width="10.82cm"/>
    </style:style>
    <style:style style:name="co7" style:family="table-column">
      <style:table-column-properties fo:break-before="auto" style:column-width="1.722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2.044cm"/>
    </style:style>
    <style:style style:name="co11" style:family="table-column">
      <style:table-column-properties fo:break-before="auto" style:column-width="1.954cm"/>
    </style:style>
    <style:style style:name="co12" style:family="table-column">
      <style:table-column-properties fo:break-before="auto" style:column-width="0.826cm"/>
    </style:style>
    <style:style style:name="co13" style:family="table-column">
      <style:table-column-properties fo:break-before="auto" style:column-width="0.896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1.632cm"/>
    </style:style>
    <style:style style:name="co17" style:family="table-column">
      <style:table-column-properties fo:break-before="auto" style:column-width="2.152cm"/>
    </style:style>
    <style:style style:name="co18" style:family="table-column">
      <style:table-column-properties fo:break-before="auto" style:column-width="2.457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1.19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WBS">
      <style:table-properties table:display="true" style:writing-mode="lr-tb"/>
    </style:style>
    <style:style style:name="ta2" style:family="table" style:master-page-name="PageStyle_5f_休日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游ゴシック Medium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name-asian="游ゴシック Medium" style:font-size-asian="9pt" style:font-style-asian="normal" style:font-weight-asian="normal" style:font-size-complex="10.5pt" style:language-complex="en" style:country-complex="US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游ゴシック Medium1" fo:font-size="12pt" style:font-name-asian="游ゴシック Medium" style:font-size-asian="9pt" style:font-size-complex="10.5pt" style:language-complex="en" style:country-complex="US"/>
    </style:style>
    <style:style style:name="ce189" style:family="table-cell" style:parent-style-name="Default">
      <style:text-properties style:font-name="游ゴシック Medium" fo:font-size="9pt" style:font-name-asian="游ゴシック Medium" style:font-size-asian="9pt" style:font-size-complex="9pt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1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0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2]=&quot;○&quot;;[.$L92]&lt;=[.V$1];[.V$1]&lt;=[.$M92]))" style:apply-style-name="ConditionalStyle_5f_6" style:base-cell-address="WBS.V92"/>
      <style:map style:condition="is-true-formula(AND([.$D92]&lt;&gt;&quot;○&quot;;[.$L92]&lt;=[.V$1];[.V$1]&lt;=[.$M92]))" style:apply-style-name="ConditionalStyle_5f_5" style:base-cell-address="WBS.V92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6]=&quot;○&quot;;[.$L116]&lt;=[.V$1];[.V$1]&lt;=[.$M116]))" style:apply-style-name="ConditionalStyle_5f_6" style:base-cell-address="WBS.V116"/>
      <style:map style:condition="is-true-formula(AND([.$D116]&lt;&gt;&quot;○&quot;;[.$L116]&lt;=[.V$1];[.V$1]&lt;=[.$M116]))" style:apply-style-name="ConditionalStyle_5f_5" style:base-cell-address="WBS.V116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3]=&quot;○&quot;;[.$L123]&lt;=[.V$1];[.V$1]&lt;=[.$M123]))" style:apply-style-name="ConditionalStyle_5f_6" style:base-cell-address="WBS.V123"/>
      <style:map style:condition="is-true-formula(AND([.$D123]&lt;&gt;&quot;○&quot;;[.$L123]&lt;=[.V$1];[.V$1]&lt;=[.$M123]))" style:apply-style-name="ConditionalStyle_5f_5" style:base-cell-address="WBS.V123"/>
    </style:style>
    <style:style style:name="ce3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6"/>
      <style:map style:condition="is-true-formula(AND([.V406]&lt;&gt;0;[.V406]&lt;8))" style:apply-style-name="ConditionalStyle_5f_2" style:base-cell-address="WBS.V406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2]=&quot;○&quot;;[.$L92]&lt;=[.V$1];[.V$1]&lt;=[.$M92]))" style:apply-style-name="ConditionalStyle_5f_6" style:base-cell-address="WBS.V92"/>
      <style:map style:condition="is-true-formula(AND([.$D92]&lt;&gt;&quot;○&quot;;[.$L92]&lt;=[.V$1];[.V$1]&lt;=[.$M92]))" style:apply-style-name="ConditionalStyle_5f_5" style:base-cell-address="WBS.V92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6]=&quot;○&quot;;[.$L116]&lt;=[.V$1];[.V$1]&lt;=[.$M116]))" style:apply-style-name="ConditionalStyle_5f_6" style:base-cell-address="WBS.V116"/>
      <style:map style:condition="is-true-formula(AND([.$D116]&lt;&gt;&quot;○&quot;;[.$L116]&lt;=[.V$1];[.V$1]&lt;=[.$M116]))" style:apply-style-name="ConditionalStyle_5f_5" style:base-cell-address="WBS.V116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3]=&quot;○&quot;;[.$L123]&lt;=[.V$1];[.V$1]&lt;=[.$M123]))" style:apply-style-name="ConditionalStyle_5f_6" style:base-cell-address="WBS.V123"/>
      <style:map style:condition="is-true-formula(AND([.$D123]&lt;&gt;&quot;○&quot;;[.$L123]&lt;=[.V$1];[.V$1]&lt;=[.$M123]))" style:apply-style-name="ConditionalStyle_5f_5" style:base-cell-address="WBS.V123"/>
    </style:style>
    <style:style style:name="ce3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6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2]=&quot;○&quot;;[.$L92]&lt;=[.V$1];[.V$1]&lt;=[.$M92]))" style:apply-style-name="ConditionalStyle_5f_6" style:base-cell-address="WBS.V92"/>
      <style:map style:condition="is-true-formula(AND([.$D92]&lt;&gt;&quot;○&quot;;[.$L92]&lt;=[.V$1];[.V$1]&lt;=[.$M92]))" style:apply-style-name="ConditionalStyle_5f_5" style:base-cell-address="WBS.V92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6]=&quot;○&quot;;[.$L116]&lt;=[.V$1];[.V$1]&lt;=[.$M116]))" style:apply-style-name="ConditionalStyle_5f_6" style:base-cell-address="WBS.V116"/>
      <style:map style:condition="is-true-formula(AND([.$D116]&lt;&gt;&quot;○&quot;;[.$L116]&lt;=[.V$1];[.V$1]&lt;=[.$M116]))" style:apply-style-name="ConditionalStyle_5f_5" style:base-cell-address="WBS.V116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3]=&quot;○&quot;;[.$L123]&lt;=[.V$1];[.V$1]&lt;=[.$M123]))" style:apply-style-name="ConditionalStyle_5f_6" style:base-cell-address="WBS.V123"/>
      <style:map style:condition="is-true-formula(AND([.$D123]&lt;&gt;&quot;○&quot;;[.$L123]&lt;=[.V$1];[.V$1]&lt;=[.$M123]))" style:apply-style-name="ConditionalStyle_5f_5" style:base-cell-address="WBS.V123"/>
    </style:style>
    <style:style style:name="ce366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6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6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6"/>
      <style:map style:condition="is-true-formula(AND([.V406]&lt;&gt;0;[.V406]&lt;8))" style:apply-style-name="ConditionalStyle_5f_2" style:base-cell-address="WBS.V406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7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2]=&quot;○&quot;;[.$L92]&lt;=[.V$1];[.V$1]&lt;=[.$M92]))" style:apply-style-name="ConditionalStyle_5f_6" style:base-cell-address="WBS.V92"/>
      <style:map style:condition="is-true-formula(AND([.$D92]&lt;&gt;&quot;○&quot;;[.$L92]&lt;=[.V$1];[.V$1]&lt;=[.$M92]))" style:apply-style-name="ConditionalStyle_5f_5" style:base-cell-address="WBS.V92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6]=&quot;○&quot;;[.$L116]&lt;=[.V$1];[.V$1]&lt;=[.$M116]))" style:apply-style-name="ConditionalStyle_5f_6" style:base-cell-address="WBS.V116"/>
      <style:map style:condition="is-true-formula(AND([.$D116]&lt;&gt;&quot;○&quot;;[.$L116]&lt;=[.V$1];[.V$1]&lt;=[.$M116]))" style:apply-style-name="ConditionalStyle_5f_5" style:base-cell-address="WBS.V116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3]=&quot;○&quot;;[.$L123]&lt;=[.V$1];[.V$1]&lt;=[.$M123]))" style:apply-style-name="ConditionalStyle_5f_6" style:base-cell-address="WBS.V123"/>
      <style:map style:condition="is-true-formula(AND([.$D123]&lt;&gt;&quot;○&quot;;[.$L123]&lt;=[.V$1];[.V$1]&lt;=[.$M123]))" style:apply-style-name="ConditionalStyle_5f_5" style:base-cell-address="WBS.V123"/>
    </style:style>
    <style:style style:name="ce385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8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8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6"/>
      <style:map style:condition="is-true-formula(AND([.V406]&lt;&gt;0;[.V406]&lt;8))" style:apply-style-name="ConditionalStyle_5f_2" style:base-cell-address="WBS.V406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39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2]=&quot;○&quot;;[.$L92]&lt;=[.V$1];[.V$1]&lt;=[.$M92]))" style:apply-style-name="ConditionalStyle_5f_6" style:base-cell-address="WBS.V92"/>
      <style:map style:condition="is-true-formula(AND([.$D92]&lt;&gt;&quot;○&quot;;[.$L92]&lt;=[.V$1];[.V$1]&lt;=[.$M92]))" style:apply-style-name="ConditionalStyle_5f_5" style:base-cell-address="WBS.V92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6]=&quot;○&quot;;[.$L116]&lt;=[.V$1];[.V$1]&lt;=[.$M116]))" style:apply-style-name="ConditionalStyle_5f_6" style:base-cell-address="WBS.V116"/>
      <style:map style:condition="is-true-formula(AND([.$D116]&lt;&gt;&quot;○&quot;;[.$L116]&lt;=[.V$1];[.V$1]&lt;=[.$M116]))" style:apply-style-name="ConditionalStyle_5f_5" style:base-cell-address="WBS.V116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3]=&quot;○&quot;;[.$L123]&lt;=[.V$1];[.V$1]&lt;=[.$M123]))" style:apply-style-name="ConditionalStyle_5f_6" style:base-cell-address="WBS.V123"/>
      <style:map style:condition="is-true-formula(AND([.$D123]&lt;&gt;&quot;○&quot;;[.$L123]&lt;=[.V$1];[.V$1]&lt;=[.$M123]))" style:apply-style-name="ConditionalStyle_5f_5" style:base-cell-address="WBS.V123"/>
    </style:style>
    <style:style style:name="ce40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40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40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6"/>
      <style:map style:condition="is-true-formula(AND([.V406]&lt;&gt;0;[.V406]&lt;8))" style:apply-style-name="ConditionalStyle_5f_2" style:base-cell-address="WBS.V406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4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2]=&quot;○&quot;;[.$L92]&lt;=[.V$1];[.V$1]&lt;=[.$M92]))" style:apply-style-name="ConditionalStyle_5f_6" style:base-cell-address="WBS.V92"/>
      <style:map style:condition="is-true-formula(AND([.$D92]&lt;&gt;&quot;○&quot;;[.$L92]&lt;=[.V$1];[.V$1]&lt;=[.$M92]))" style:apply-style-name="ConditionalStyle_5f_5" style:base-cell-address="WBS.V92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6]=&quot;○&quot;;[.$L116]&lt;=[.V$1];[.V$1]&lt;=[.$M116]))" style:apply-style-name="ConditionalStyle_5f_6" style:base-cell-address="WBS.V116"/>
      <style:map style:condition="is-true-formula(AND([.$D116]&lt;&gt;&quot;○&quot;;[.$L116]&lt;=[.V$1];[.V$1]&lt;=[.$M116]))" style:apply-style-name="ConditionalStyle_5f_5" style:base-cell-address="WBS.V116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3]=&quot;○&quot;;[.$L123]&lt;=[.V$1];[.V$1]&lt;=[.$M123]))" style:apply-style-name="ConditionalStyle_5f_6" style:base-cell-address="WBS.V123"/>
      <style:map style:condition="is-true-formula(AND([.$D123]&lt;&gt;&quot;○&quot;;[.$L123]&lt;=[.V$1];[.V$1]&lt;=[.$M123]))" style:apply-style-name="ConditionalStyle_5f_5" style:base-cell-address="WBS.V123"/>
    </style:style>
    <style:style style:name="ce4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4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4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3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" style:font-size-asian="9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name-asian="游ゴシック Medium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letter-kerning="true" style:language-complex="en" style:country-complex="US" style:font-size-complex="10.5pt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style:language-complex="en" style:country-complex="US" fo:font-size="9pt" style:font-name-asian="游ゴシック Medium1" style:font-size-complex="9pt"/>
    </style:style>
    <style:style style:name="T14" style:family="text">
      <style:text-properties fo:font-weight="normal" style:letter-kerning="true" fo:language="en" fo:country="US" style:language-asian="ja" style:country-asian="JP" style:language-complex="en" style:country-complex="US" style:font-size-asian="9pt" style:font-weight-asian="normal" style:font-weight-complex="normal"/>
    </style:style>
    <style:style style:name="T15" style:family="text">
      <style:text-properties fo:font-weight="normal" style:font-size-asian="9pt" style:font-weight-asian="normal" style:font-weight-complex="normal"/>
    </style:style>
    <style:style style:name="T16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/>
    </style:style>
    <style:style style:name="T1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 style:font-name="游ゴシック Medium1" style:letter-kerning="true"/>
    </style:style>
    <style:style style:name="T1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fo:font-size="9pt" style:font-name-asian="游ゴシック Medium1" style:font-size-complex="9pt"/>
    </style:style>
    <style:style style:name="T20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9pt" fo:font-weight="normal" style:letter-kerning="true" fo:language="en" fo:country="US" style:language-asian="ja" style:country-asian="JP" style:language-complex="en" style:country-complex="US" style:font-size-asian="9pt" style:font-size-complex="9pt" style:font-weight-asian="normal" style:font-weight-complex="normal"/>
    </style:style>
    <style:style style:name="T22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font-name-asian="游ゴシック Medium" style:font-size-complex="10.5pt"/>
    </style:style>
    <style:style style:name="T2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9pt" style:font-name-asian="游ゴシック Medium1" style:font-size-complex="9pt"/>
    </style:style>
    <style:style style:name="T2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tracked-changes>
        <table:cell-content-change table:id="ct1" table:acceptance-state="accepted">
          <table:cell-address table:column="9" table:row="195" table:table="0"/>
          <office:change-info>
            <dc:creator>Unknown Author</dc:creator>
            <dc:date>2026-06-04T00:28:36.9842158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11" table:row="195" table:table="0"/>
          <office:change-info>
            <dc:creator>Unknown Author</dc:creator>
            <dc:date>2026-06-04T00:28:36.984235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12" table:row="195" table:table="0"/>
          <office:change-info>
            <dc:creator>Unknown Author</dc:creator>
            <dc:date>2026-06-04T00:28:36.9842644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12" table:row="53" table:table="0"/>
          <office:change-info>
            <dc:creator>Unknown Author</dc:creator>
            <dc:date>2026-06-04T08:14:46.983481200</dc:date>
          </office:change-info>
          <table:previous>
            <table:change-track-table-cell office:value-type="float" office:value="46177"/>
          </table:previous>
        </table:cell-content-change>
        <table:cell-content-change table:id="ct5" table:acceptance-state="accepted">
          <table:cell-address table:column="12" table:row="54" table:table="0"/>
          <office:change-info>
            <dc:creator>Unknown Author</dc:creator>
            <dc:date>2026-06-04T08:14:59.894492300</dc:date>
          </office:change-info>
          <table:previous>
            <table:change-track-table-cell office:value-type="float" office:value="46177"/>
          </table:previous>
        </table:cell-content-change>
        <table:cell-content-change table:id="ct6" table:acceptance-state="accepted">
          <table:cell-address table:column="12" table:row="55" table:table="0"/>
          <office:change-info>
            <dc:creator>Unknown Author</dc:creator>
            <dc:date>2026-06-04T08:14:59.894505200</dc:date>
          </office:change-info>
          <table:previous>
            <table:change-track-table-cell office:value-type="float" office:value="46177"/>
          </table:previous>
        </table:cell-content-change>
        <table:cell-content-change table:id="ct7" table:acceptance-state="accepted">
          <table:cell-address table:column="12" table:row="56" table:table="0"/>
          <office:change-info>
            <dc:creator>Unknown Author</dc:creator>
            <dc:date>2026-06-04T08:14:59.894514300</dc:date>
          </office:change-info>
          <table:previous>
            <table:change-track-table-cell office:value-type="float" office:value="46177"/>
          </table:previous>
        </table:cell-content-change>
        <table:cell-content-change table:id="ct8" table:acceptance-state="accepted">
          <table:cell-address table:column="12" table:row="57" table:table="0"/>
          <office:change-info>
            <dc:creator>Unknown Author</dc:creator>
            <dc:date>2026-06-04T08:14:59.894523400</dc:date>
          </office:change-info>
          <table:previous>
            <table:change-track-table-cell office:value-type="float" office:value="46177"/>
          </table:previous>
        </table:cell-content-change>
        <table:cell-content-change table:id="ct9" table:acceptance-state="accepted">
          <table:cell-address table:column="11" table:row="53" table:table="0"/>
          <office:change-info>
            <dc:creator>Unknown Author</dc:creator>
            <dc:date>2026-06-04T08:15:22.534986100</dc:date>
          </office:change-info>
          <table:previous>
            <table:change-track-table-cell office:value-type="float" office:value="46177"/>
          </table:previous>
        </table:cell-content-change>
        <table:cell-content-change table:id="ct10" table:acceptance-state="accepted">
          <table:cell-address table:column="11" table:row="54" table:table="0"/>
          <office:change-info>
            <dc:creator>Unknown Author</dc:creator>
            <dc:date>2026-06-04T08:15:22.534996300</dc:date>
          </office:change-info>
          <table:previous>
            <table:change-track-table-cell office:value-type="float" office:value="46177"/>
          </table:previous>
        </table:cell-content-change>
        <table:cell-content-change table:id="ct11" table:acceptance-state="accepted">
          <table:cell-address table:column="11" table:row="55" table:table="0"/>
          <office:change-info>
            <dc:creator>Unknown Author</dc:creator>
            <dc:date>2026-06-04T08:15:22.535004300</dc:date>
          </office:change-info>
          <table:previous>
            <table:change-track-table-cell office:value-type="float" office:value="46177"/>
          </table:previous>
        </table:cell-content-change>
        <table:cell-content-change table:id="ct12" table:acceptance-state="accepted">
          <table:cell-address table:column="11" table:row="56" table:table="0"/>
          <office:change-info>
            <dc:creator>Unknown Author</dc:creator>
            <dc:date>2026-06-04T08:15:22.535011700</dc:date>
          </office:change-info>
          <table:previous>
            <table:change-track-table-cell office:value-type="float" office:value="46177"/>
          </table:previous>
        </table:cell-content-change>
        <table:cell-content-change table:id="ct13" table:acceptance-state="accepted">
          <table:cell-address table:column="11" table:row="57" table:table="0"/>
          <office:change-info>
            <dc:creator>Unknown Author</dc:creator>
            <dc:date>2026-06-04T08:15:22.535019200</dc:date>
          </office:change-info>
          <table:previous>
            <table:change-track-table-cell office:value-type="float" office:value="46177"/>
          </table:previous>
        </table:cell-content-change>
        <table:cell-content-change table:id="ct14" table:acceptance-state="accepted">
          <table:cell-address table:column="12" table:row="54" table:table="0"/>
          <office:change-info>
            <dc:creator>Unknown Author</dc:creator>
            <dc:date>2026-06-04T08:15:27.974833900</dc:date>
          </office:change-info>
          <table:previous table:id="ct5">
            <table:change-track-table-cell office:value-type="float" office:value="46182"/>
          </table:previous>
        </table:cell-content-change>
        <table:cell-content-change table:id="ct15" table:acceptance-state="accepted">
          <table:cell-address table:column="12" table:row="55" table:table="0"/>
          <office:change-info>
            <dc:creator>Unknown Author</dc:creator>
            <dc:date>2026-06-04T08:15:27.974844900</dc:date>
          </office:change-info>
          <table:previous table:id="ct6">
            <table:change-track-table-cell office:value-type="float" office:value="46183"/>
          </table:previous>
        </table:cell-content-change>
        <table:cell-content-change table:id="ct16" table:acceptance-state="accepted">
          <table:cell-address table:column="12" table:row="56" table:table="0"/>
          <office:change-info>
            <dc:creator>Unknown Author</dc:creator>
            <dc:date>2026-06-04T08:15:27.974852300</dc:date>
          </office:change-info>
          <table:previous table:id="ct7">
            <table:change-track-table-cell office:value-type="float" office:value="46184"/>
          </table:previous>
        </table:cell-content-change>
        <table:cell-content-change table:id="ct17" table:acceptance-state="accepted">
          <table:cell-address table:column="12" table:row="57" table:table="0"/>
          <office:change-info>
            <dc:creator>Unknown Author</dc:creator>
            <dc:date>2026-06-04T08:15:27.974860000</dc:date>
          </office:change-info>
          <table:previous table:id="ct8">
            <table:change-track-table-cell office:value-type="float" office:value="46185"/>
          </table:previous>
        </table:cell-content-change>
        <table:cell-content-change table:id="ct18" table:acceptance-state="accepted">
          <table:cell-address table:column="16" table:row="49" table:table="0"/>
          <office:change-info>
            <dc:creator>Unknown Author</dc:creator>
            <dc:date>2026-06-04T08:17:42.460265800</dc:date>
          </office:change-info>
          <table:previous>
            <table:change-track-table-cell office:value-type="float" office:value="0"/>
          </table:previous>
        </table:cell-content-change>
        <table:cell-content-change table:id="ct19" table:acceptance-state="accepted">
          <table:cell-address table:column="16" table:row="50" table:table="0"/>
          <office:change-info>
            <dc:creator>Unknown Author</dc:creator>
            <dc:date>2026-06-04T08:17:44.133767500</dc:date>
          </office:change-info>
          <table:previous>
            <table:change-track-table-cell office:value-type="float" office:value="0"/>
          </table:previous>
        </table:cell-content-change>
        <table:cell-content-change table:id="ct20" table:acceptance-state="accepted">
          <table:cell-address table:column="16" table:row="51" table:table="0"/>
          <office:change-info>
            <dc:creator>Unknown Author</dc:creator>
            <dc:date>2026-06-04T08:17:46.000276700</dc:date>
          </office:change-info>
          <table:previous>
            <table:change-track-table-cell office:value-type="float" office:value="0"/>
          </table:previous>
        </table:cell-content-change>
        <table:cell-content-change table:id="ct21" table:acceptance-state="accepted">
          <table:cell-address table:column="16" table:row="60" table:table="0"/>
          <office:change-info>
            <dc:creator>Unknown Author</dc:creator>
            <dc:date>2026-06-04T08:17:51.090041000</dc:date>
          </office:change-info>
          <table:previous>
            <table:change-track-table-cell office:value-type="float" office:value="0"/>
          </table:previous>
        </table:cell-content-change>
        <table:cell-content-change table:id="ct22" table:acceptance-state="accepted">
          <table:cell-address table:column="16" table:row="61" table:table="0"/>
          <office:change-info>
            <dc:creator>Unknown Author</dc:creator>
            <dc:date>2026-06-04T08:17:53.544332700</dc:date>
          </office:change-info>
          <table:previous>
            <table:change-track-table-cell office:value-type="float" office:value="0"/>
          </table:previous>
        </table:cell-content-change>
        <table:cell-content-change table:id="ct23" table:acceptance-state="accepted">
          <table:cell-address table:column="16" table:row="64" table:table="0"/>
          <office:change-info>
            <dc:creator>Unknown Author</dc:creator>
            <dc:date>2026-06-04T08:17:56.592713900</dc:date>
          </office:change-info>
          <table:previous>
            <table:change-track-table-cell office:value-type="float" office:value="0"/>
          </table:previous>
        </table:cell-content-change>
        <table:cell-content-change table:id="ct24" table:acceptance-state="accepted">
          <table:cell-address table:column="13" table:row="65" table:table="0"/>
          <office:change-info>
            <dc:creator>Unknown Author</dc:creator>
            <dc:date>2026-06-05T08:10:53.363706500</dc:date>
          </office:change-info>
          <table:previous>
            <table:change-track-table-cell office:value-type="float" office:value="46178"/>
          </table:previous>
        </table:cell-content-change>
        <table:cell-content-change table:id="ct25" table:acceptance-state="accepted">
          <table:cell-address table:column="16" table:row="62" table:table="0"/>
          <office:change-info>
            <dc:creator>Unknown Author</dc:creator>
            <dc:date>2026-06-05T08:11:29.633305100</dc:date>
          </office:change-info>
          <table:previous>
            <table:change-track-table-cell office:value-type="float" office:value="0"/>
          </table:previous>
        </table:cell-content-change>
        <table:cell-content-change table:id="ct26" table:acceptance-state="accepted">
          <table:cell-address table:column="16" table:row="63" table:table="0"/>
          <office:change-info>
            <dc:creator>Unknown Author</dc:creator>
            <dc:date>2026-06-05T08:11:32.221041000</dc:date>
          </office:change-info>
          <table:previous>
            <table:change-track-table-cell office:value-type="float" office:value="0"/>
          </table:previous>
        </table:cell-content-change>
        <table:cell-content-change table:id="ct27" table:acceptance-state="accepted">
          <table:cell-address table:column="16" table:row="93" table:table="0"/>
          <office:change-info>
            <dc:creator>Unknown Author</dc:creator>
            <dc:date>2026-06-05T08:12:55.413465400</dc:date>
          </office:change-info>
          <table:previous>
            <table:change-track-table-cell office:value-type="float" office:value="0"/>
          </table:previous>
        </table:cell-content-change>
        <table:cell-content-change table:id="ct28" table:acceptance-state="accepted">
          <table:cell-address table:column="16" table:row="95" table:table="0"/>
          <office:change-info>
            <dc:creator>Unknown Author</dc:creator>
            <dc:date>2026-06-05T08:12:57.952377800</dc:date>
          </office:change-info>
          <table:previous>
            <table:change-track-table-cell office:value-type="float" office:value="1"/>
          </table:previous>
        </table:cell-content-change>
        <table:cell-content-change table:id="ct29" table:acceptance-state="accepted">
          <table:cell-address table:column="16" table:row="98" table:table="0"/>
          <office:change-info>
            <dc:creator>Unknown Author</dc:creator>
            <dc:date>2026-06-05T08:13:01.510714200</dc:date>
          </office:change-info>
          <table:previous>
            <table:change-track-table-cell office:value-type="float" office:value="0"/>
          </table:previous>
        </table:cell-content-change>
        <table:cell-content-change table:id="ct30" table:acceptance-state="accepted">
          <table:cell-address table:column="16" table:row="115" table:table="0"/>
          <office:change-info>
            <dc:creator>Unknown Author</dc:creator>
            <dc:date>2026-06-05T08:13:08.341994000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16" table:row="116" table:table="0"/>
          <office:change-info>
            <dc:creator>Unknown Author</dc:creator>
            <dc:date>2026-06-05T08:13:10.1513275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16" table:row="129" table:table="0"/>
          <office:change-info>
            <dc:creator>Unknown Author</dc:creator>
            <dc:date>2026-06-05T08:13:14.155945000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16" table:row="132" table:table="0"/>
          <office:change-info>
            <dc:creator>Unknown Author</dc:creator>
            <dc:date>2026-06-05T08:13:16.435804700</dc:date>
          </office:change-info>
          <table:previous>
            <table:change-track-table-cell/>
          </table:previous>
        </table:cell-content-change>
        <table:cell-content-change table:id="ct34" table:acceptance-state="accepted">
          <table:cell-address table:column="16" table:row="157" table:table="0"/>
          <office:change-info>
            <dc:creator>Unknown Author</dc:creator>
            <dc:date>2026-06-05T08:13:28.600716400</dc:date>
          </office:change-info>
          <table:previous>
            <table:change-track-table-cell/>
          </table:previous>
        </table:cell-content-change>
        <table:cell-content-change table:id="ct35" table:acceptance-state="accepted">
          <table:cell-address table:column="16" table:row="160" table:table="0"/>
          <office:change-info>
            <dc:creator>Unknown Author</dc:creator>
            <dc:date>2026-06-05T08:13:30.909509000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16" table:row="163" table:table="0"/>
          <office:change-info>
            <dc:creator>Unknown Author</dc:creator>
            <dc:date>2026-06-05T08:13:32.967501500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16" table:row="170" table:table="0"/>
          <office:change-info>
            <dc:creator>Unknown Author</dc:creator>
            <dc:date>2026-06-05T08:13:36.961272200</dc:date>
          </office:change-info>
          <table:previous>
            <table:change-track-table-cell/>
          </table:previous>
        </table:cell-content-change>
        <table:cell-content-change table:id="ct38" table:acceptance-state="accepted">
          <table:cell-address table:column="16" table:row="173" table:table="0"/>
          <office:change-info>
            <dc:creator>Unknown Author</dc:creator>
            <dc:date>2026-06-05T08:13:38.986000500</dc:date>
          </office:change-info>
          <table:previous>
            <table:change-track-table-cell/>
          </table:previous>
        </table:cell-content-change>
        <table:cell-content-change table:id="ct39" table:acceptance-state="accepted">
          <table:cell-address table:column="16" table:row="176" table:table="0"/>
          <office:change-info>
            <dc:creator>Unknown Author</dc:creator>
            <dc:date>2026-06-05T08:13:42.156046800</dc:date>
          </office:change-info>
          <table:previous>
            <table:change-track-table-cell/>
          </table:previous>
        </table:cell-content-change>
        <table:cell-content-change table:id="ct40" table:acceptance-state="accepted">
          <table:cell-address table:column="16" table:row="34" table:table="0"/>
          <office:change-info>
            <dc:creator>Unknown Author</dc:creator>
            <dc:date>2026-06-05T08:15:53.684223300</dc:date>
          </office:change-info>
          <table:previous>
            <table:change-track-table-cell office:value-type="float" office:value="0"/>
          </table:previous>
        </table:cell-content-change>
        <table:cell-content-change table:id="ct41" table:acceptance-state="accepted">
          <table:cell-address table:column="16" table:row="35" table:table="0"/>
          <office:change-info>
            <dc:creator>Unknown Author</dc:creator>
            <dc:date>2026-06-05T08:15:55.905811500</dc:date>
          </office:change-info>
          <table:previous>
            <table:change-track-table-cell office:value-type="float" office:value="0"/>
          </table:previous>
        </table:cell-content-change>
        <table:cell-content-change table:id="ct42" table:acceptance-state="accepted">
          <table:cell-address table:column="13" table:row="117" table:table="0"/>
          <office:change-info>
            <dc:creator>Unknown Author</dc:creator>
            <dc:date>2026-06-05T08:18:00.602803200</dc:date>
          </office:change-info>
          <table:previous>
            <table:change-track-table-cell office:value-type="float" office:value="46178"/>
          </table:previous>
        </table:cell-content-change>
        <table:cell-content-change table:id="ct43" table:acceptance-state="accepted">
          <table:cell-address table:column="16" table:row="138" table:table="0"/>
          <office:change-info>
            <dc:creator>Unknown Author</dc:creator>
            <dc:date>2026-06-05T08:19:26.5764782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16" table:row="2" table:table="0"/>
          <office:change-info>
            <dc:creator>Unknown Author</dc:creator>
            <dc:date>2026-06-05T08:25:46.307803700</dc:date>
          </office:change-info>
          <table:previous>
            <table:change-track-table-cell/>
          </table:previous>
        </table:cell-content-change>
        <table:cell-content-change table:id="ct45" table:acceptance-state="accepted">
          <table:cell-address table:column="16" table:row="125" table:table="0"/>
          <office:change-info>
            <dc:creator>Unknown Author</dc:creator>
            <dc:date>2026-06-08T23:54:53.472830500</dc:date>
          </office:change-info>
          <table:previous>
            <table:change-track-table-cell/>
          </table:previous>
        </table:cell-content-change>
        <table:cell-content-change table:id="ct46" table:acceptance-state="accepted">
          <table:cell-address table:column="16" table:row="181" table:table="0"/>
          <office:change-info>
            <dc:creator>Unknown Author</dc:creator>
            <dc:date>2026-06-08T23:55:26.695337300</dc:date>
          </office:change-info>
          <table:previous>
            <table:change-track-table-cell/>
          </table:previous>
        </table:cell-content-change>
        <table:cell-content-change table:id="ct47" table:acceptance-state="accepted">
          <table:cell-address table:column="16" table:row="184" table:table="0"/>
          <office:change-info>
            <dc:creator>Unknown Author</dc:creator>
            <dc:date>2026-06-08T23:55:52.019712400</dc:date>
          </office:change-info>
          <table:previous>
            <table:change-track-table-cell/>
          </table:previous>
        </table:cell-content-change>
        <table:cell-content-change table:id="ct48" table:acceptance-state="accepted">
          <table:cell-address table:column="13" table:row="180" table:table="0"/>
          <office:change-info>
            <dc:creator>Unknown Author</dc:creator>
            <dc:date>2026-06-08T23:56:12.239703500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16" table:row="82" table:table="0"/>
          <office:change-info>
            <dc:creator>Unknown Author</dc:creator>
            <dc:date>2026-06-09T00:17:57.403484300</dc:date>
          </office:change-info>
          <table:previous>
            <table:change-track-table-cell/>
          </table:previous>
        </table:cell-content-change>
        <table:cell-content-change table:id="ct50" table:acceptance-state="accepted">
          <table:cell-address table:column="16" table:row="83" table:table="0"/>
          <office:change-info>
            <dc:creator>Unknown Author</dc:creator>
            <dc:date>2026-06-09T00:18:01.758490700</dc:date>
          </office:change-info>
          <table:previous>
            <table:change-track-table-cell office:value-type="float" office:value="0"/>
          </table:previous>
        </table:cell-content-change>
        <table:cell-content-change table:id="ct51" table:acceptance-state="accepted">
          <table:cell-address table:column="16" table:row="84" table:table="0"/>
          <office:change-info>
            <dc:creator>Unknown Author</dc:creator>
            <dc:date>2026-06-09T00:18:01.758498400</dc:date>
          </office:change-info>
          <table:previous>
            <table:change-track-table-cell office:value-type="float" office:value="0"/>
          </table:previous>
        </table:cell-content-change>
        <table:cell-content-change table:id="ct52" table:acceptance-state="accepted">
          <table:cell-address table:column="16" table:row="85" table:table="0"/>
          <office:change-info>
            <dc:creator>Unknown Author</dc:creator>
            <dc:date>2026-06-09T00:18:01.758500600</dc:date>
          </office:change-info>
          <table:previous>
            <table:change-track-table-cell office:value-type="float" office:value="0"/>
          </table:previous>
        </table:cell-content-change>
        <table:cell-content-change table:id="ct53" table:acceptance-state="accepted">
          <table:cell-address table:column="16" table:row="86" table:table="0"/>
          <office:change-info>
            <dc:creator>Unknown Author</dc:creator>
            <dc:date>2026-06-09T00:18:01.758502700</dc:date>
          </office:change-info>
          <table:previous>
            <table:change-track-table-cell office:value-type="float" office:value="0"/>
          </table:previous>
        </table:cell-content-change>
        <table:cell-content-change table:id="ct54" table:acceptance-state="accepted">
          <table:cell-address table:column="16" table:row="87" table:table="0"/>
          <office:change-info>
            <dc:creator>Unknown Author</dc:creator>
            <dc:date>2026-06-09T00:18:01.758504700</dc:date>
          </office:change-info>
          <table:previous>
            <table:change-track-table-cell office:value-type="float" office:value="0"/>
          </table:previous>
        </table:cell-content-change>
        <table:cell-content-change table:id="ct55" table:acceptance-state="accepted">
          <table:cell-address table:column="13" table:row="153" table:table="0"/>
          <office:change-info>
            <dc:creator>Unknown Author</dc:creator>
            <dc:date>2026-06-09T00:18:31.074496900</dc:date>
          </office:change-info>
          <table:previous>
            <table:change-track-table-cell office:value-type="float" office:value="46182"/>
          </table:previous>
        </table:cell-content-change>
        <table:cell-content-change table:id="ct56" table:acceptance-state="accepted">
          <table:cell-address table:column="16" table:row="153" table:table="0"/>
          <office:change-info>
            <dc:creator>Unknown Author</dc:creator>
            <dc:date>2026-06-09T00:18:54.410528500</dc:date>
          </office:change-info>
          <table:previous>
            <table:change-track-table-cell/>
          </table:previous>
        </table:cell-content-change>
        <table:cell-content-change table:id="ct57" table:acceptance-state="accepted">
          <table:cell-address table:column="13" table:row="138" table:table="0"/>
          <office:change-info>
            <dc:creator>Unknown Author</dc:creator>
            <dc:date>2026-06-09T00:20:08.581257300</dc:date>
          </office:change-info>
          <table:previous>
            <table:change-track-table-cell office:value-type="float" office:value="46178"/>
          </table:previous>
        </table:cell-content-change>
        <table:cell-content-change table:id="ct58" table:acceptance-state="accepted">
          <table:cell-address table:column="14" table:row="138" table:table="0"/>
          <office:change-info>
            <dc:creator>Unknown Author</dc:creator>
            <dc:date>2026-06-09T00:20:12.764149500</dc:date>
          </office:change-info>
          <table:previous>
            <table:change-track-table-cell office:value-type="float" office:value="46178"/>
          </table:previous>
        </table:cell-content-change>
        <table:cell-content-change table:id="ct59" table:acceptance-state="accepted">
          <table:cell-address table:column="16" table:row="139" table:table="0"/>
          <office:change-info>
            <dc:creator>Unknown Author</dc:creator>
            <dc:date>2026-06-09T00:21:59.199734700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13" table:row="145" table:table="0"/>
          <office:change-info>
            <dc:creator>Unknown Author</dc:creator>
            <dc:date>2026-06-09T00:22:24.454105300</dc:date>
          </office:change-info>
          <table:previous>
            <table:change-track-table-cell office:value-type="float" office:value="46181"/>
          </table:previous>
        </table:cell-content-change>
        <table:cell-content-change table:id="ct61" table:acceptance-state="accepted">
          <table:cell-address table:column="14" table:row="145" table:table="0"/>
          <office:change-info>
            <dc:creator>Unknown Author</dc:creator>
            <dc:date>2026-06-09T00:22:24.454126200</dc:date>
          </office:change-info>
          <table:previous>
            <table:change-track-table-cell office:value-type="float" office:value="46181"/>
          </table:previous>
        </table:cell-content-change>
        <table:cell-content-change table:id="ct62" table:acceptance-state="accepted">
          <table:cell-address table:column="16" table:row="145" table:table="0"/>
          <office:change-info>
            <dc:creator>Unknown Author</dc:creator>
            <dc:date>2026-06-09T00:22:30.137029100</dc:date>
          </office:change-info>
          <table:previous>
            <table:change-track-table-cell office:value-type="float" office:value="100"/>
          </table:previous>
        </table:cell-content-change>
        <table:cell-content-change table:id="ct63" table:acceptance-state="accepted">
          <table:cell-address table:column="13" table:row="95" table:table="0"/>
          <office:change-info>
            <dc:creator>Unknown Author</dc:creator>
            <dc:date>2026-06-09T00:23:36.820599100</dc:date>
          </office:change-info>
          <table:previous>
            <table:change-track-table-cell office:value-type="float" office:value="46178"/>
          </table:previous>
        </table:cell-content-change>
        <table:cell-content-change table:id="ct64" table:acceptance-state="accepted">
          <table:cell-address table:column="14" table:row="95" table:table="0"/>
          <office:change-info>
            <dc:creator>Unknown Author</dc:creator>
            <dc:date>2026-06-09T00:23:39.838262500</dc:date>
          </office:change-info>
          <table:previous>
            <table:change-track-table-cell office:value-type="float" office:value="46178"/>
          </table:previous>
        </table:cell-content-change>
        <table:cell-content-change table:id="ct65" table:acceptance-state="accepted">
          <table:cell-address table:column="13" table:row="115" table:table="0"/>
          <office:change-info>
            <dc:creator>Unknown Author</dc:creator>
            <dc:date>2026-06-09T00:25:08.685779100</dc:date>
          </office:change-info>
          <table:previous>
            <table:change-track-table-cell office:value-type="float" office:value="46178"/>
          </table:previous>
        </table:cell-content-change>
        <table:cell-content-change table:id="ct66" table:acceptance-state="accepted">
          <table:cell-address table:column="14" table:row="115" table:table="0"/>
          <office:change-info>
            <dc:creator>Unknown Author</dc:creator>
            <dc:date>2026-06-09T00:25:16.458008700</dc:date>
          </office:change-info>
          <table:previous>
            <table:change-track-table-cell office:value-type="float" office:value="46178"/>
          </table:previous>
        </table:cell-content-change>
        <table:cell-content-change table:id="ct67" table:acceptance-state="accepted">
          <table:cell-address table:column="13" table:row="116" table:table="0"/>
          <office:change-info>
            <dc:creator>Unknown Author</dc:creator>
            <dc:date>2026-06-09T00:25:23.385065500</dc:date>
          </office:change-info>
          <table:previous>
            <table:change-track-table-cell office:value-type="float" office:value="46178"/>
          </table:previous>
        </table:cell-content-change>
        <table:cell-content-change table:id="ct68" table:acceptance-state="accepted">
          <table:cell-address table:column="14" table:row="116" table:table="0"/>
          <office:change-info>
            <dc:creator>Unknown Author</dc:creator>
            <dc:date>2026-06-09T00:25:23.385079800</dc:date>
          </office:change-info>
          <table:previous>
            <table:change-track-table-cell office:value-type="float" office:value="46178"/>
          </table:previous>
        </table:cell-content-change>
        <table:cell-content-change table:id="ct69" table:acceptance-state="accepted">
          <table:cell-address table:column="13" table:row="105" table:table="0"/>
          <office:change-info>
            <dc:creator>Unknown Author</dc:creator>
            <dc:date>2026-06-09T00:30:14.984806000</dc:date>
          </office:change-info>
          <table:previous>
            <table:change-track-table-cell office:value-type="float" office:value="46178"/>
          </table:previous>
        </table:cell-content-change>
        <table:cell-content-change table:id="ct70" table:acceptance-state="accepted">
          <table:cell-address table:column="14" table:row="104" table:table="0"/>
          <office:change-info>
            <dc:creator>Unknown Author</dc:creator>
            <dc:date>2026-06-09T00:30:27.985239100</dc:date>
          </office:change-info>
          <table:previous>
            <table:change-track-table-cell office:value-type="float" office:value="46181"/>
          </table:previous>
        </table:cell-content-change>
        <table:cell-content-change table:id="ct71" table:acceptance-state="accepted">
          <table:cell-address table:column="16" table:row="105" table:table="0"/>
          <office:change-info>
            <dc:creator>Unknown Author</dc:creator>
            <dc:date>2026-06-09T00:30:48.158968900</dc:date>
          </office:change-info>
          <table:previous>
            <table:change-track-table-cell office:value-type="float" office:value="0"/>
          </table:previous>
        </table:cell-content-change>
        <table:cell-content-change table:id="ct72" table:acceptance-state="accepted">
          <table:cell-address table:column="16" table:row="106" table:table="0"/>
          <office:change-info>
            <dc:creator>Unknown Author</dc:creator>
            <dc:date>2026-06-09T00:30:54.296219900</dc:date>
          </office:change-info>
          <table:previous>
            <table:change-track-table-cell office:value-type="float" office:value="0"/>
          </table:previous>
        </table:cell-content-change>
        <table:cell-content-change table:id="ct73" table:acceptance-state="accepted">
          <table:cell-address table:column="16" table:row="107" table:table="0"/>
          <office:change-info>
            <dc:creator>Unknown Author</dc:creator>
            <dc:date>2026-06-09T00:30:54.296230300</dc:date>
          </office:change-info>
          <table:previous>
            <table:change-track-table-cell office:value-type="float" office:value="0"/>
          </table:previous>
        </table:cell-content-change>
        <table:cell-content-change table:id="ct74" table:acceptance-state="accepted">
          <table:cell-address table:column="16" table:row="108" table:table="0"/>
          <office:change-info>
            <dc:creator>Unknown Author</dc:creator>
            <dc:date>2026-06-09T00:30:54.296232600</dc:date>
          </office:change-info>
          <table:previous>
            <table:change-track-table-cell office:value-type="float" office:value="0"/>
          </table:previous>
        </table:cell-content-change>
        <table:cell-content-change table:id="ct75" table:acceptance-state="accepted">
          <table:cell-address table:column="16" table:row="109" table:table="0"/>
          <office:change-info>
            <dc:creator>Unknown Author</dc:creator>
            <dc:date>2026-06-09T00:30:54.296235200</dc:date>
          </office:change-info>
          <table:previous>
            <table:change-track-table-cell office:value-type="float" office:value="0"/>
          </table:previous>
        </table:cell-content-change>
        <table:cell-content-change table:id="ct76" table:acceptance-state="accepted">
          <table:cell-address table:column="16" table:row="110" table:table="0"/>
          <office:change-info>
            <dc:creator>Unknown Author</dc:creator>
            <dc:date>2026-06-09T00:30:54.296237400</dc:date>
          </office:change-info>
          <table:previous>
            <table:change-track-table-cell office:value-type="float" office:value="0"/>
          </table:previous>
        </table:cell-content-change>
        <table:cell-content-change table:id="ct77" table:acceptance-state="accepted">
          <table:cell-address table:column="13" table:row="151" table:table="0"/>
          <office:change-info>
            <dc:creator>Unknown Author</dc:creator>
            <dc:date>2026-06-09T00:31:55.923869100</dc:date>
          </office:change-info>
          <table:previous>
            <table:change-track-table-cell office:value-type="float" office:value="46181"/>
          </table:previous>
        </table:cell-content-change>
        <table:cell-content-change table:id="ct78" table:acceptance-state="accepted">
          <table:cell-address table:column="14" table:row="156" table:table="0"/>
          <office:change-info>
            <dc:creator>Unknown Author</dc:creator>
            <dc:date>2026-06-09T06:04:38.370536200</dc:date>
          </office:change-info>
          <table:previous>
            <table:change-track-table-cell office:value-type="float" office:value="46181"/>
          </table:previous>
        </table:cell-content-change>
        <table:cell-content-change table:id="ct79" table:acceptance-state="accepted">
          <table:cell-address table:column="16" table:row="156" table:table="0"/>
          <office:change-info>
            <dc:creator>Unknown Author</dc:creator>
            <dc:date>2026-06-09T06:05:29.216183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13" table:row="168" table:table="0"/>
          <office:change-info>
            <dc:creator>Unknown Author</dc:creator>
            <dc:date>2026-06-09T06:06:03.1012246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16" table:row="168" table:table="0"/>
          <office:change-info>
            <dc:creator>Unknown Author</dc:creator>
            <dc:date>2026-06-09T06:06:23.417541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16" table:row="169" table:table="0"/>
          <office:change-info>
            <dc:creator>Unknown Author</dc:creator>
            <dc:date>2026-06-09T06:06:23.4175537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14" table:row="167" table:table="0"/>
          <office:change-info>
            <dc:creator>Unknown Author</dc:creator>
            <dc:date>2026-06-09T06:06:29.590512400</dc:date>
          </office:change-info>
          <table:previous>
            <table:change-track-table-cell office:value-type="float" office:value="46182"/>
          </table:previous>
        </table:cell-content-change>
        <table:cell-content-change table:id="ct84" table:acceptance-state="accepted">
          <table:cell-address table:column="14" table:row="131" table:table="0"/>
          <office:change-info>
            <dc:creator>Unknown Author</dc:creator>
            <dc:date>2026-06-09T06:07:42.191711200</dc:date>
          </office:change-info>
          <table:previous>
            <table:change-track-table-cell office:value-type="float" office:value="46181"/>
          </table:previous>
        </table:cell-content-change>
        <table:cell-content-change table:id="ct85" table:acceptance-state="accepted">
          <table:cell-address table:column="16" table:row="128" table:table="0"/>
          <office:change-info>
            <dc:creator>Unknown Author</dc:creator>
            <dc:date>2026-06-09T06:08:02.386446000</dc:date>
          </office:change-info>
          <table:previous>
            <table:change-track-table-cell/>
          </table:previous>
        </table:cell-content-change>
        <table:cell-content-change table:id="ct86" table:acceptance-state="accepted">
          <table:cell-address table:column="13" table:row="133" table:table="0"/>
          <office:change-info>
            <dc:creator>Unknown Author</dc:creator>
            <dc:date>2026-06-09T06:08:14.323506700</dc:date>
          </office:change-info>
          <table:previous>
            <table:change-track-table-cell office:value-type="float" office:value="46181"/>
          </table:previous>
        </table:cell-content-change>
        <table:cell-content-change table:id="ct87" table:acceptance-state="accepted">
          <table:cell-address table:column="16" table:row="184" table:table="0"/>
          <office:change-info>
            <dc:creator>Unknown Author</dc:creator>
            <dc:date>2026-06-09T06:10:30.050859900</dc:date>
          </office:change-info>
          <table:previous table:id="ct47">
            <table:change-track-table-cell office:value-type="float" office:value="50"/>
          </table:previous>
        </table:cell-content-change>
        <table:cell-content-change table:id="ct88" table:acceptance-state="accepted">
          <table:cell-address table:column="16" table:row="185" table:table="0"/>
          <office:change-info>
            <dc:creator>Unknown Author</dc:creator>
            <dc:date>2026-06-09T06:10:30.050868300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16" table:row="186" table:table="0"/>
          <office:change-info>
            <dc:creator>Unknown Author</dc:creator>
            <dc:date>2026-06-09T06:10:30.050871100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16" table:row="187" table:table="0"/>
          <office:change-info>
            <dc:creator>Unknown Author</dc:creator>
            <dc:date>2026-06-09T06:10:30.050873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16" table:row="188" table:table="0"/>
          <office:change-info>
            <dc:creator>Unknown Author</dc:creator>
            <dc:date>2026-06-09T06:10:30.050875600</dc:date>
          </office:change-info>
          <table:previous>
            <table:change-track-table-cell office:value-type="float" office:value="0"/>
          </table:previous>
        </table:cell-content-change>
        <table:cell-content-change table:id="ct92" table:acceptance-state="accepted">
          <table:cell-address table:column="16" table:row="113" table:table="0"/>
          <office:change-info>
            <dc:creator>Unknown Author</dc:creator>
            <dc:date>2026-06-09T06:12:02.406374100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16" table:row="114" table:table="0"/>
          <office:change-info>
            <dc:creator>Unknown Author</dc:creator>
            <dc:date>2026-06-09T06:12:02.406385800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7" table:row="195" table:table="0"/>
          <office:change-info>
            <dc:creator>Unknown Author</dc:creator>
            <dc:date>2026-06-09T06:15:51.299393800</dc:date>
          </office:change-info>
          <table:previous>
            <table:change-track-table-cell office:value-type="string">
              <text:p>未確定</text:p>
            </table:change-track-table-cell>
          </table:previous>
        </table:cell-content-change>
        <table:cell-content-change table:id="ct95" table:acceptance-state="accepted">
          <table:cell-address table:column="7" table:row="196" table:table="0"/>
          <office:change-info>
            <dc:creator>Unknown Author</dc:creator>
            <dc:date>2026-06-09T06:23:21.3305345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5" table:row="195" table:table="0"/>
          <office:change-info>
            <dc:creator>Unknown Author</dc:creator>
            <dc:date>2026-06-09T06:23:36.851799100</dc:date>
          </office:change-info>
          <table:previous>
            <table:change-track-table-cell office:value-type="string">
              <text:p>オリジナル機能</text:p>
            </table:change-track-table-cell>
          </table:previous>
        </table:cell-content-change>
        <table:cell-content-change table:id="ct97" table:acceptance-state="accepted">
          <table:cell-address table:column="7" table:row="196" table:table="0"/>
          <office:change-info>
            <dc:creator>Unknown Author</dc:creator>
            <dc:date>2026-06-09T06:23:42.161510800</dc:date>
          </office:change-info>
          <table:previous table:id="ct95">
            <table:change-track-table-cell office:value-type="string">
              <text:p>タイムセール</text:p>
            </table:change-track-table-cell>
          </table:previous>
        </table:cell-content-change>
        <table:cell-content-change table:id="ct98" table:acceptance-state="accepted">
          <table:cell-address table:column="7" table:row="196" table:table="0"/>
          <office:change-info>
            <dc:creator>Unknown Author</dc:creator>
            <dc:date>2026-06-09T06:24:05.849239500</dc:date>
          </office:change-info>
          <table:previous table:id="ct97">
            <table:change-track-table-cell/>
          </table:previous>
        </table:cell-content-change>
        <table:cell-content-change table:id="ct99" table:acceptance-state="accepted">
          <table:cell-address table:column="7" table:row="196" table:table="0"/>
          <office:change-info>
            <dc:creator>Unknown Author</dc:creator>
            <dc:date>2026-06-09T06:24:19.266461600</dc:date>
          </office:change-info>
          <table:previous table:id="ct98">
            <table:change-track-table-cell office:value-type="string">
              <text:p>支払い方法選択画面</text:p>
            </table:change-track-table-cell>
          </table:previous>
        </table:cell-content-change>
        <table:cell-content-change table:id="ct100" table:acceptance-state="accepted">
          <table:cell-address table:column="7" table:row="196" table:table="0"/>
          <office:change-info>
            <dc:creator>Unknown Author</dc:creator>
            <dc:date>2026-06-09T06:24:37.138862500</dc:date>
          </office:change-info>
          <table:previous table:id="ct99">
            <table:change-track-table-cell/>
          </table:previous>
        </table:cell-content-change>
        <table:cell-content-change table:id="ct101" table:acceptance-state="accepted">
          <table:cell-address table:column="7" table:row="196" table:table="0"/>
          <office:change-info>
            <dc:creator>Unknown Author</dc:creator>
            <dc:date>2026-06-09T06:25:35.967677500</dc:date>
          </office:change-info>
          <table:previous table:id="ct100">
            <table:change-track-table-cell office:value-type="string">
              <text:p>支払方法選択画面表示処理</text:p>
            </table:change-track-table-cell>
          </table:previous>
        </table:cell-content-change>
        <table:cell-content-change table:id="ct102" table:acceptance-state="accepted">
          <table:cell-address table:column="5" table:row="195" table:table="0"/>
          <office:change-info>
            <dc:creator>Unknown Author</dc:creator>
            <dc:date>2026-06-09T06:26:23.386544300</dc:date>
          </office:change-info>
          <table:previous table:id="ct96">
            <table:change-track-table-cell office:value-type="string">
              <text:p>オリジナル機能（タイムセール）</text:p>
            </table:change-track-table-cell>
          </table:previous>
        </table:cell-content-change>
        <table:cell-content-change table:id="ct103" table:acceptance-state="accepted">
          <table:cell-address table:column="5" table:row="195" table:table="0"/>
          <office:change-info>
            <dc:creator>Unknown Author</dc:creator>
            <dc:date>2026-06-09T06:26:53.252240700</dc:date>
          </office:change-info>
          <table:previous table:id="ct102">
            <table:change-track-table-cell office:value-type="string">
              <text:p>オリジナル機能（クーポン）</text:p>
            </table:change-track-table-cell>
          </table:previous>
        </table:cell-content-change>
        <table:cell-content-change table:id="ct104" table:acceptance-state="accepted">
          <table:cell-address table:column="7" table:row="197" table:table="0"/>
          <office:change-info>
            <dc:creator>Unknown Author</dc:creator>
            <dc:date>2026-06-09T06:27:31.940177700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7" table:row="197" table:table="0"/>
          <office:change-info>
            <dc:creator>Unknown Author</dc:creator>
            <dc:date>2026-06-09T06:27:41.636266000</dc:date>
          </office:change-info>
          <table:previous table:id="ct104">
            <table:change-track-table-cell office:value-type="string">
              <text:p>注文確認画面表示処理</text:p>
            </table:change-track-table-cell>
          </table:previous>
        </table:cell-content-change>
        <table:cell-content-change table:id="ct106" table:acceptance-state="accepted">
          <table:cell-address table:column="7" table:row="197" table:table="0"/>
          <office:change-info>
            <dc:creator>Unknown Author</dc:creator>
            <dc:date>2026-06-09T06:28:01.891196300</dc:date>
          </office:change-info>
          <table:previous table:id="ct105">
            <table:change-track-table-cell office:value-type="string">
              <text:p>注文確認画面表示処理　コントローラーの編集</text:p>
            </table:change-track-table-cell>
          </table:previous>
        </table:cell-content-change>
        <table:cell-content-change table:id="ct107" table:acceptance-state="accepted">
          <table:cell-address table:column="7" table:row="202" table:table="0"/>
          <office:change-info>
            <dc:creator>Unknown Author</dc:creator>
            <dc:date>2026-06-09T06:28:33.941269700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7" table:row="202" table:table="0"/>
          <office:change-info>
            <dc:creator>Unknown Author</dc:creator>
            <dc:date>2026-06-09T06:28:42.276663200</dc:date>
          </office:change-info>
          <table:previous table:id="ct107">
            <table:change-track-table-cell office:value-type="string">
              <text:p>ご注文の確定ボタン 押下時処理</text:p>
            </table:change-track-table-cell>
          </table:previous>
        </table:cell-content-change>
        <table:cell-content-change table:id="ct109" table:acceptance-state="accepted">
          <table:cell-address table:column="7" table:row="202" table:table="0"/>
          <office:change-info>
            <dc:creator>Unknown Author</dc:creator>
            <dc:date>2026-06-09T06:28:50.120940700</dc:date>
          </office:change-info>
          <table:previous table:id="ct108">
            <table:change-track-table-cell office:value-type="string">
              <text:p>ご注文の確定ボタン 押下時処理　コントローラーの編集</text:p>
            </table:change-track-table-cell>
          </table:previous>
        </table:cell-content-change>
        <table:cell-content-change table:id="ct110" table:acceptance-state="accepted">
          <table:cell-address table:column="7" table:row="202" table:table="0"/>
          <office:change-info>
            <dc:creator>Unknown Author</dc:creator>
            <dc:date>2026-06-09T06:29:13.753443800</dc:date>
          </office:change-info>
          <table:previous>
            <table:change-track-table-cell/>
          </table:previous>
        </table:cell-content-change>
        <table:cell-content-change table:id="ct111" table:acceptance-state="accepted">
          <table:cell-address table:column="7" table:row="202" table:table="0"/>
          <office:change-info>
            <dc:creator>Unknown Author</dc:creator>
            <dc:date>2026-06-09T06:29:21.249233500</dc:date>
          </office:change-info>
          <table:previous table:id="ct110">
            <table:change-track-table-cell office:value-type="string">
              <text:p>注文完了画面表示処理</text:p>
            </table:change-track-table-cell>
          </table:previous>
        </table:cell-content-change>
        <table:cell-content-change table:id="ct112" table:acceptance-state="accepted">
          <table:cell-address table:column="7" table:row="202" table:table="0"/>
          <office:change-info>
            <dc:creator>Unknown Author</dc:creator>
            <dc:date>2026-06-09T06:29:32.995245000</dc:date>
          </office:change-info>
          <table:previous table:id="ct111">
            <table:change-track-table-cell office:value-type="string">
              <text:p>注文完了画面表示処理　コントローラーの編集</text:p>
            </table:change-track-table-cell>
          </table:previous>
        </table:cell-content-change>
        <table:cell-content-change table:id="ct113" table:acceptance-state="accepted">
          <table:cell-address table:column="9" table:row="195" table:table="0"/>
          <office:change-info>
            <dc:creator>Unknown Author</dc:creator>
            <dc:date>2026-06-09T06:31:29.262398600</dc:date>
          </office:change-info>
          <table:previous table:id="ct1">
            <table:change-track-table-cell office:value-type="string">
              <text:p>全員</text:p>
            </table:change-track-table-cell>
          </table:previous>
        </table:cell-content-change>
        <table:cell-content-change table:id="ct114" table:acceptance-state="accepted">
          <table:cell-address table:column="3" table:row="194" table:table="0"/>
          <office:change-info>
            <dc:creator>Unknown Author</dc:creator>
            <dc:date>2026-06-09T06:31:44.171279400</dc:date>
          </office:change-info>
          <table:previous>
            <table:change-track-table-cell office:value-type="string">
              <text:p>任意機能</text:p>
            </table:change-track-table-cell>
          </table:previous>
        </table:cell-content-change>
        <table:cell-content-change table:id="ct115" table:acceptance-state="accepted">
          <table:cell-address table:column="5" table:row="195" table:table="0"/>
          <office:change-info>
            <dc:creator>Unknown Author</dc:creator>
            <dc:date>2026-06-09T06:31:58.745455900</dc:date>
          </office:change-info>
          <table:previous table:id="ct103">
            <table:change-track-table-cell office:value-type="string">
              <text:p>オリジナル機能（クーポン・タイムセール）</text:p>
            </table:change-track-table-cell>
          </table:previous>
        </table:cell-content-change>
        <table:cell-content-change table:id="ct116" table:acceptance-state="accepted">
          <table:cell-address table:column="7" table:row="203" table:table="0"/>
          <office:change-info>
            <dc:creator>Unknown Author</dc:creator>
            <dc:date>2026-06-09T06:38:14.644429100</dc:date>
          </office:change-info>
          <table:previous>
            <table:change-track-table-cell/>
          </table:previous>
        </table:cell-content-change>
        <table:cell-content-change table:id="ct117" table:acceptance-state="accepted">
          <table:cell-address table:column="14" table:row="142" table:table="0"/>
          <office:change-info>
            <dc:creator>Unknown Author</dc:creator>
            <dc:date>2026-06-09T06:45:06.763986900</dc:date>
          </office:change-info>
          <table:previous>
            <table:change-track-table-cell office:value-type="float" office:value="46181"/>
          </table:previous>
        </table:cell-content-change>
        <table:cell-content-change table:id="ct118" table:acceptance-state="accepted">
          <table:cell-address table:column="16" table:row="142" table:table="0"/>
          <office:change-info>
            <dc:creator>Unknown Author</dc:creator>
            <dc:date>2026-06-09T06:46:58.907816000</dc:date>
          </office:change-info>
          <table:previous>
            <table:change-track-table-cell/>
          </table:previous>
        </table:cell-content-change>
        <table:cell-content-change table:id="ct119" table:acceptance-state="accepted">
          <table:cell-address table:column="5" table:row="195" table:table="0"/>
          <office:change-info>
            <dc:creator>Unknown Author</dc:creator>
            <dc:date>2026-06-09T06:47:23.005316800</dc:date>
          </office:change-info>
          <table:previous table:id="ct115">
            <table:change-track-table-cell office:value-type="string">
              <text:p>クーポン・タイムセール）</text:p>
            </table:change-track-table-cell>
          </table:previous>
        </table:cell-content-change>
        <table:cell-content-change table:id="ct120" table:acceptance-state="accepted">
          <table:cell-address table:column="7" table:row="203" table:table="0"/>
          <office:change-info>
            <dc:creator>Unknown Author</dc:creator>
            <dc:date>2026-06-09T06:49:21.146672000</dc:date>
          </office:change-info>
          <table:previous table:id="ct116">
            <table:change-track-table-cell office:value-type="string">
              <text:p>HTMLも追加</text:p>
            </table:change-track-table-cell>
          </table:previous>
        </table:cell-content-change>
        <table:cell-content-change table:id="ct121" table:acceptance-state="accepted">
          <table:cell-address table:column="7" table:row="203" table:table="0"/>
          <office:change-info>
            <dc:creator>Unknown Author</dc:creator>
            <dc:date>2026-06-09T06:58:17.876422700</dc:date>
          </office:change-info>
          <table:previous table:id="ct120">
            <table:change-track-table-cell/>
          </table:previous>
        </table:cell-content-change>
        <table:cell-content-change table:id="ct122" table:acceptance-state="accepted">
          <table:cell-address table:column="7" table:row="203" table:table="0"/>
          <office:change-info>
            <dc:creator>Unknown Author</dc:creator>
            <dc:date>2026-06-09T06:58:40.164188600</dc:date>
          </office:change-info>
          <table:previous table:id="ct121">
            <table:change-track-table-cell office:value-type="string">
              <text:p>payment_input</text:p>
            </table:change-track-table-cell>
          </table:previous>
        </table:cell-content-change>
        <table:cell-content-change table:id="ct123" table:acceptance-state="accepted">
          <table:cell-address table:column="7" table:row="203" table:table="0"/>
          <office:change-info>
            <dc:creator>Unknown Author</dc:creator>
            <dc:date>2026-06-09T06:59:11.322354700</dc:date>
          </office:change-info>
          <table:previous table:id="ct122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4" table:acceptance-state="accepted">
          <table:cell-address table:column="7" table:row="197" table:table="0"/>
          <office:change-info>
            <dc:creator>Unknown Author</dc:creator>
            <dc:date>2026-06-09T06:59:15.560677200</dc:date>
          </office:change-info>
          <table:previous table:id="ct106">
            <table:change-track-table-cell office:value-type="string">
              <text:p>注文確認画面 表示処理用　コントローラーの編集</text:p>
            </table:change-track-table-cell>
          </table:previous>
        </table:cell-content-change>
        <table:cell-content-change table:id="ct125" table:acceptance-state="accepted">
          <table:cell-address table:column="7" table:row="202" table:table="0"/>
          <office:change-info>
            <dc:creator>Unknown Author</dc:creator>
            <dc:date>2026-06-09T07:00:17.385880100</dc:date>
          </office:change-info>
          <table:previous table:id="ct109">
            <table:change-track-table-cell office:value-type="string">
              <text:p>ご注文の確定ボタン 押下時処理用　コントローラーの編集</text:p>
            </table:change-track-table-cell>
          </table:previous>
        </table:cell-content-change>
        <table:cell-content-change table:id="ct126" table:acceptance-state="accepted">
          <table:cell-address table:column="7" table:row="197" table:table="0"/>
          <office:change-info>
            <dc:creator>Unknown Author</dc:creator>
            <dc:date>2026-06-09T07:01:07.322305200</dc:date>
          </office:change-info>
          <table:previous table:id="ct124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7" table:acceptance-state="accepted">
          <table:cell-address table:column="7" table:row="202" table:table="0"/>
          <office:change-info>
            <dc:creator>Unknown Author</dc:creator>
            <dc:date>2026-06-09T07:01:40.125743800</dc:date>
          </office:change-info>
          <table:previous table:id="ct125">
            <table:change-track-table-cell office:value-type="string">
              <text:p>注文確認画面表示処理　コントローラーの編</text:p>
            </table:change-track-table-cell>
          </table:previous>
        </table:cell-content-change>
        <table:cell-content-change table:id="ct128" table:acceptance-state="accepted">
          <table:cell-address table:column="7" table:row="202" table:table="0"/>
          <office:change-info>
            <dc:creator>Unknown Author</dc:creator>
            <dc:date>2026-06-09T07:01:51.262059200</dc:date>
          </office:change-info>
          <table:previous table:id="ct112">
            <table:change-track-table-cell office:value-type="string">
              <text:p>注文完了画面 表示処理用　コントローラーの編集</text:p>
            </table:change-track-table-cell>
          </table:previous>
        </table:cell-content-change>
        <table:cell-content-change table:id="ct129" table:acceptance-state="accepted">
          <table:cell-address table:column="7" table:row="202" table:table="0"/>
          <office:change-info>
            <dc:creator>Unknown Author</dc:creator>
            <dc:date>2026-06-09T07:02:00.701973400</dc:date>
          </office:change-info>
          <table:previous table:id="ct128">
            <table:change-track-table-cell office:value-type="string">
              <text:p>注文確認画面　コントローラーの編</text:p>
            </table:change-track-table-cell>
          </table:previous>
        </table:cell-content-change>
        <table:cell-content-change table:id="ct130" table:acceptance-state="accepted">
          <table:cell-address table:column="7" table:row="202" table:table="0"/>
          <office:change-info>
            <dc:creator>Unknown Author</dc:creator>
            <dc:date>2026-06-09T07:02:38.200440000</dc:date>
          </office:change-info>
          <table:previous table:id="ct127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1" table:acceptance-state="accepted">
          <table:cell-address table:column="7" table:row="202" table:table="0"/>
          <office:change-info>
            <dc:creator>Unknown Author</dc:creator>
            <dc:date>2026-06-09T07:02:38.200474700</dc:date>
          </office:change-info>
          <table:previous table:id="ct129">
            <table:change-track-table-cell office:value-type="string">
              <text:p>注文確認画面　テンプレートファイルの編</text:p>
            </table:change-track-table-cell>
          </table:previous>
        </table:cell-content-change>
        <table:movement table:id="ct132" table:acceptance-state="accepted">
          <table:source-range-address table:start-column="7" table:start-row="198" table:start-table="0" table:end-column="7" table:end-row="199" table:end-table="0"/>
          <table:target-range-address table:start-column="7" table:start-row="199" table:start-table="0" table:end-column="7" table:end-row="200" table:end-table="0"/>
          <office:change-info>
            <dc:creator>Unknown Author</dc:creator>
            <dc:date>2026-06-09T07:02:39.676009100</dc:date>
          </office:change-info>
          <table:dependencies>
            <table:dependency table:id="ct174"/>
            <table:dependency table:id="ct168"/>
            <table:dependency table:id="ct164"/>
            <table:dependency table:id="ct134"/>
            <table:dependency table:id="ct133"/>
          </table:dependencies>
          <table:deletions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</table:deletions>
        </table:movement>
        <table:cell-content-change table:id="ct133" table:acceptance-state="accepted">
          <table:cell-address table:column="7" table:row="198" table:table="0"/>
          <office:change-info>
            <dc:creator>Unknown Author</dc:creator>
            <dc:date>2026-06-09T07:03:08.373566300</dc:date>
          </office:change-info>
          <table:previous>
            <table:change-track-table-cell/>
          </table:previous>
        </table:cell-content-change>
        <table:cell-content-change table:id="ct134" table:acceptance-state="accepted">
          <table:cell-address table:column="7" table:row="202" table:table="0"/>
          <office:change-info>
            <dc:creator>Unknown Author</dc:creator>
            <dc:date>2026-06-09T07:03:29.417049600</dc:date>
          </office:change-info>
          <table:previous table:id="ct130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5" table:acceptance-state="accepted">
          <table:cell-address table:column="7" table:row="204" table:table="0"/>
          <office:change-info>
            <dc:creator>Unknown Author</dc:creator>
            <dc:date>2026-06-09T07:03:43.701777500</dc:date>
          </office:change-info>
          <table:previous>
            <table:change-track-table-cell/>
          </table:previous>
        </table:cell-content-change>
        <table:cell-content-change table:id="ct136" table:acceptance-state="accepted">
          <table:cell-address table:column="7" table:row="202" table:table="0"/>
          <office:change-info>
            <dc:creator>Unknown Author</dc:creator>
            <dc:date>2026-06-09T07:04:50.244882200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7" table:row="202" table:table="0"/>
          <office:change-info>
            <dc:creator>Unknown Author</dc:creator>
            <dc:date>2026-06-09T07:05:04.451893300</dc:date>
          </office:change-info>
          <table:previous table:id="ct136">
            <table:change-track-table-cell office:value-type="string">
              <text:p>ご注文の確定ボタン 押下時処</text:p>
            </table:change-track-table-cell>
          </table:previous>
        </table:cell-content-change>
        <table:cell-content-change table:id="ct138" table:acceptance-state="accepted">
          <table:cell-address table:column="11" table:row="195" table:table="0"/>
          <office:change-info>
            <dc:creator>Unknown Author</dc:creator>
            <dc:date>2026-06-09T07:09:29.992236100</dc:date>
          </office:change-info>
          <table:previous table:id="ct2">
            <table:change-track-table-cell office:value-type="float" office:value="46188"/>
          </table:previous>
        </table:cell-content-change>
        <table:cell-content-change table:id="ct139" table:acceptance-state="accepted">
          <table:cell-address table:column="12" table:row="195" table:table="0"/>
          <office:change-info>
            <dc:creator>Unknown Author</dc:creator>
            <dc:date>2026-06-09T07:09:34.959118000</dc:date>
          </office:change-info>
          <table:previous table:id="ct3">
            <table:change-track-table-cell office:value-type="float" office:value="46189"/>
          </table:previous>
        </table:cell-content-change>
        <table:cell-content-change table:id="ct140" table:acceptance-state="accepted">
          <table:cell-address table:column="12" table:row="195" table:table="0"/>
          <office:change-info>
            <dc:creator>Unknown Author</dc:creator>
            <dc:date>2026-06-09T07:09:45.357686400</dc:date>
          </office:change-info>
          <table:previous table:id="ct139">
            <table:change-track-table-cell office:value-type="float" office:value="46184"/>
          </table:previous>
        </table:cell-content-change>
        <table:cell-content-change table:id="ct141" table:acceptance-state="accepted">
          <table:cell-address table:column="12" table:row="196" table:table="0"/>
          <office:change-info>
            <dc:creator>Unknown Author</dc:creator>
            <dc:date>2026-06-09T07:10:07.109385500</dc:date>
          </office:change-info>
          <table:previous>
            <table:change-track-table-cell office:value-type="float" office:value="46183"/>
          </table:previous>
        </table:cell-content-change>
        <table:cell-content-change table:id="ct142" table:acceptance-state="accepted">
          <table:cell-address table:column="7" table:row="203" table:table="0"/>
          <office:change-info>
            <dc:creator>Unknown Author</dc:creator>
            <dc:date>2026-06-09T07:11:07.614540700</dc:date>
          </office:change-info>
          <table:previous>
            <table:change-track-table-cell/>
          </table:previous>
        </table:cell-content-change>
        <table:cell-content-change table:id="ct143" table:acceptance-state="accepted">
          <table:cell-address table:column="7" table:row="203" table:table="0"/>
          <office:change-info>
            <dc:creator>Unknown Author</dc:creator>
            <dc:date>2026-06-09T07:11:25.329166600</dc:date>
          </office:change-info>
          <table:previous table:id="ct142">
            <table:change-track-table-cell office:value-type="string">
              <text:p>注文完了画面表示処</text:p>
            </table:change-track-table-cell>
          </table:previous>
        </table:cell-content-change>
        <table:cell-content-change table:id="ct144" table:acceptance-state="accepted">
          <table:cell-address table:column="7" table:row="204" table:table="0"/>
          <office:change-info>
            <dc:creator>Unknown Author</dc:creator>
            <dc:date>2026-06-09T07:11:56.201648600</dc:date>
          </office:change-info>
          <table:previous>
            <table:change-track-table-cell office:value-type="string">
              <text:p>注文完了画</text:p>
            </table:change-track-table-cell>
          </table:previous>
        </table:cell-content-change>
        <table:cell-content-change table:id="ct145" table:acceptance-state="accepted">
          <table:cell-address table:column="7" table:row="204" table:table="0"/>
          <office:change-info>
            <dc:creator>Unknown Author</dc:creator>
            <dc:date>2026-06-09T07:12:05.929646200</dc:date>
          </office:change-info>
          <table:previous table:id="ct144">
            <table:change-track-table-cell office:value-type="string">
              <text:p>　</text:p>
            </table:change-track-table-cell>
          </table:previous>
        </table:cell-content-change>
        <table:cell-content-change table:id="ct146" table:acceptance-state="accepted">
          <table:cell-address table:column="7" table:row="204" table:table="0"/>
          <office:change-info>
            <dc:creator>Unknown Author</dc:creator>
            <dc:date>2026-06-09T07:12:16.623917500</dc:date>
          </office:change-info>
          <table:previous table:id="ct145">
            <table:change-track-table-cell office:value-type="string">
              <text:p>注文完了画</text:p>
            </table:change-track-table-cell>
          </table:previous>
        </table:cell-content-change>
        <table:cell-content-change table:id="ct147" table:acceptance-state="accepted">
          <table:cell-address table:column="5" table:row="195" table:table="0"/>
          <office:change-info>
            <dc:creator>Unknown Author</dc:creator>
            <dc:date>2026-06-09T07:13:59.883000900</dc:date>
          </office:change-info>
          <table:previous table:id="ct119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48" table:acceptance-state="accepted">
          <table:cell-address table:column="5" table:row="195" table:table="0"/>
          <office:change-info>
            <dc:creator>Unknown Author</dc:creator>
            <dc:date>2026-06-09T07:14:05.937175100</dc:date>
          </office:change-info>
          <table:previous table:id="ct147">
            <table:change-track-table-cell office:value-type="string">
              <text:p>クーポン機能・タイムセール機能</text:p>
            </table:change-track-table-cell>
          </table:previous>
        </table:cell-content-change>
        <table:cell-content-change table:id="ct149" table:acceptance-state="accepted">
          <table:cell-address table:column="5" table:row="195" table:table="0"/>
          <office:change-info>
            <dc:creator>Unknown Author</dc:creator>
            <dc:date>2026-06-09T07:14:32.903263000</dc:date>
          </office:change-info>
          <table:previous table:id="ct148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50" table:acceptance-state="accepted">
          <table:cell-address table:column="9" table:row="195" table:table="0"/>
          <office:change-info>
            <dc:creator>Unknown Author</dc:creator>
            <dc:date>2026-06-09T07:14:49.652133100</dc:date>
          </office:change-info>
          <table:previous table:id="ct113">
            <table:change-track-table-cell/>
          </table:previous>
        </table:cell-content-change>
        <table:cell-content-change table:id="ct151" table:acceptance-state="accepted">
          <table:cell-address table:column="7" table:row="199" table:table="0"/>
          <office:change-info>
            <dc:creator>Unknown Author</dc:creator>
            <dc:date>2026-06-09T07:16:19.646696900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7" table:row="199" table:table="0"/>
          <office:change-info>
            <dc:creator>Unknown Author</dc:creator>
            <dc:date>2026-06-09T07:16:41.014911400</dc:date>
          </office:change-info>
          <table:previous table:id="ct151">
            <table:change-track-table-cell office:value-type="string">
              <text:p>クーポン</text:p>
            </table:change-track-table-cell>
          </table:previous>
        </table:cell-content-change>
        <table:cell-content-change table:id="ct153" table:acceptance-state="accepted">
          <table:cell-address table:column="7" table:row="201" table:table="0"/>
          <office:change-info>
            <dc:creator>Unknown Author</dc:creator>
            <dc:date>2026-06-09T07:22:22.8176108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7" table:row="201" table:table="0"/>
          <office:change-info>
            <dc:creator>Unknown Author</dc:creator>
            <dc:date>2026-06-09T07:31:06.557540700</dc:date>
          </office:change-info>
          <table:previous table:id="ct153">
            <table:change-track-table-cell office:value-type="string">
              <text:p>会員詳細画面</text:p>
            </table:change-track-table-cell>
          </table:previous>
        </table:cell-content-change>
        <table:cell-content-change table:id="ct155" table:acceptance-state="accepted">
          <table:cell-address table:column="7" table:row="199" table:table="0"/>
          <office:change-info>
            <dc:creator>Unknown Author</dc:creator>
            <dc:date>2026-06-09T07:31:30.336023900</dc:date>
          </office:change-info>
          <table:previous table:id="ct152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6" table:acceptance-state="accepted">
          <table:cell-address table:column="7" table:row="201" table:table="0"/>
          <office:change-info>
            <dc:creator>Unknown Author</dc:creator>
            <dc:date>2026-06-09T07:31:48.578184600</dc:date>
          </office:change-info>
          <table:previous table:id="ct154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7" table:acceptance-state="accepted">
          <table:cell-address table:column="7" table:row="201" table:table="0"/>
          <office:change-info>
            <dc:creator>Unknown Author</dc:creator>
            <dc:date>2026-06-09T07:31:53.746087900</dc:date>
          </office:change-info>
          <table:previous table:id="ct156">
            <table:change-track-table-cell office:value-type="string">
              <text:p>会員詳細画面　</text:p>
            </table:change-track-table-cell>
          </table:previous>
        </table:cell-content-change>
        <table:cell-content-change table:id="ct158" table:acceptance-state="accepted">
          <table:cell-address table:column="7" table:row="201" table:table="0"/>
          <office:change-info>
            <dc:creator>Unknown Author</dc:creator>
            <dc:date>2026-06-09T07:31:58.664304600</dc:date>
          </office:change-info>
          <table:previous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9" table:acceptance-state="accepted">
          <table:cell-address table:column="7" table:row="208" table:table="0"/>
          <office:change-info>
            <dc:creator>Unknown Author</dc:creator>
            <dc:date>2026-06-09T07:32:00.3847928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7" table:row="201" table:table="0"/>
          <office:change-info>
            <dc:creator>Unknown Author</dc:creator>
            <dc:date>2026-06-09T07:32:12.270330700</dc:date>
          </office:change-info>
          <table:previous table:id="ct158">
            <table:change-track-table-cell/>
          </table:previous>
        </table:cell-content-change>
        <table:cell-content-change table:id="ct161" table:acceptance-state="accepted">
          <table:cell-address table:column="7" table:row="209" table:table="0"/>
          <office:change-info>
            <dc:creator>Unknown Author</dc:creator>
            <dc:date>2026-06-09T07:35:16.181993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7" table:row="209" table:table="0"/>
          <office:change-info>
            <dc:creator>Unknown Author</dc:creator>
            <dc:date>2026-06-09T07:35:40.344580200</dc:date>
          </office:change-info>
          <table:previous table:id="ct161">
            <table:change-track-table-cell office:value-type="string">
              <text:p>HTML編集</text:p>
            </table:change-track-table-cell>
          </table:previous>
        </table:cell-content-change>
        <table:movement table:id="ct163" table:acceptance-state="accepted">
          <table:source-range-address table:start-column="7" table:start-row="205" table:start-table="0" table:end-column="7" table:end-row="207" table:end-table="0"/>
          <table:target-range-address table:start-column="7" table:start-row="211" table:start-table="0" table:end-column="7" table:end-row="214" table:end-table="0"/>
          <office:change-info>
            <dc:creator>Unknown Author</dc:creator>
            <dc:date>2026-06-09T07:36:22.125718800</dc:date>
          </office:change-info>
          <table:dependencies>
            <table:dependency table:id="ct299"/>
            <table:dependency table:id="ct261"/>
            <table:dependency table:id="ct216"/>
            <table:dependency table:id="ct165"/>
          </table:dependencies>
        </table:movement>
        <table:movement table:id="ct164" table:acceptance-state="accepted">
          <table:source-range-address table:start-column="7" table:start-row="199" table:start-table="0" table:end-column="7" table:end-row="204" table:end-table="0"/>
          <table:target-range-address table:start-column="7" table:start-row="202" table:start-table="0" table:end-column="7" table:end-row="207" table:end-table="0"/>
          <office:change-info>
            <dc:creator>Unknown Author</dc:creator>
            <dc:date>2026-06-09T07:36:33.518376600</dc:date>
          </office:change-info>
          <table:dependencies>
            <table:dependency table:id="ct175"/>
            <table:dependency table:id="ct174"/>
            <table:dependency table:id="ct169"/>
            <table:dependency table:id="ct168"/>
          </table:dependencies>
          <table:deletions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</table:deletions>
        </table:movement>
        <table:movement table:id="ct165" table:acceptance-state="accepted">
          <table:source-range-address table:start-column="7" table:start-row="211" table:start-table="0" table:end-column="7" table:end-row="214" table:end-table="0"/>
          <table:target-range-address table:start-column="7" table:start-row="199" table:start-table="0" table:end-column="7" table:end-row="201" table:end-table="0"/>
          <office:change-info>
            <dc:creator>Unknown Author</dc:creator>
            <dc:date>2026-06-09T07:36:41.724896300</dc:date>
          </office:change-info>
          <table:dependencies>
            <table:dependency table:id="ct299"/>
            <table:dependency table:id="ct264"/>
            <table:dependency table:id="ct257"/>
            <table:dependency table:id="ct174"/>
            <table:dependency table:id="ct168"/>
          </table:dependencies>
        </table:movement>
        <table:movement table:id="ct166" table:acceptance-state="accepted">
          <table:source-range-address table:start-column="11" table:start-row="205" table:start-table="0" table:end-column="12" table:end-row="207" table:end-table="0"/>
          <table:target-range-address table:start-column="11" table:start-row="199" table:start-table="0" table:end-column="12" table:end-row="201" table:end-table="0"/>
          <office:change-info>
            <dc:creator>Unknown Author</dc:creator>
            <dc:date>2026-06-09T07:36:46.811527800</dc:date>
          </office:change-info>
          <table:dependencies>
            <table:dependency table:id="ct232"/>
            <table:dependency table:id="ct188"/>
          </table:dependencies>
        </table:movement>
        <table:cell-content-change table:id="ct167" table:acceptance-state="accepted">
          <table:cell-address table:column="9" table:row="209" table:table="0"/>
          <office:change-info>
            <dc:creator>Unknown Author</dc:creator>
            <dc:date>2026-06-09T07:37:37.610783100</dc:date>
          </office:change-info>
          <table:previous>
            <table:change-track-table-cell/>
          </table:previous>
        </table:cell-content-change>
        <table:movement table:id="ct168" table:acceptance-state="accepted">
          <table:source-range-address table:start-column="7" table:start-row="200" table:start-table="0" table:end-column="7" table:end-row="209" table:end-table="0"/>
          <table:target-range-address table:start-column="7" table:start-row="201" table:start-table="0" table:end-column="7" table:end-row="210" table:end-table="0"/>
          <office:change-info>
            <dc:creator>Unknown Author</dc:creator>
            <dc:date>2026-06-09T07:39:20.683894800</dc:date>
          </office:change-info>
          <table:dependencies>
            <table:dependency table:id="ct215"/>
            <table:dependency table:id="ct175"/>
            <table:dependency table:id="ct174"/>
            <table:dependency table:id="ct169"/>
          </table:dependencies>
          <table:deletions>
            <table:cell-content-deletion>
              <table:cell-address table:column="7" table:row="203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3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5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69" table:acceptance-state="accepted">
          <table:cell-address table:column="7" table:row="201" table:table="0"/>
          <office:change-info>
            <dc:creator>Unknown Author</dc:creator>
            <dc:date>2026-06-09T07:39:43.206209900</dc:date>
          </office:change-info>
          <table:previous>
            <table:change-track-table-cell/>
          </table:previous>
        </table:cell-content-change>
        <table:cell-content-change table:id="ct170" table:acceptance-state="accepted">
          <table:cell-address table:column="9" table:row="199" table:table="0"/>
          <office:change-info>
            <dc:creator>Unknown Author</dc:creator>
            <dc:date>2026-06-09T07:39:47.774283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1" table:acceptance-state="accepted">
          <table:cell-address table:column="9" table:row="200" table:table="0"/>
          <office:change-info>
            <dc:creator>Unknown Author</dc:creator>
            <dc:date>2026-06-09T07:39:53.331128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2" table:acceptance-state="accepted">
          <table:cell-address table:column="9" table:row="201" table:table="0"/>
          <office:change-info>
            <dc:creator>Unknown Author</dc:creator>
            <dc:date>2026-06-09T07:39:53.33115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3" table:acceptance-state="accepted">
          <table:cell-address table:column="9" table:row="202" table:table="0"/>
          <office:change-info>
            <dc:creator>Unknown Author</dc:creator>
            <dc:date>2026-06-09T07:39:53.331159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movement table:id="ct174" table:acceptance-state="accepted">
          <table:source-range-address table:start-column="7" table:start-row="200" table:start-table="0" table:end-column="7" table:end-row="210" table:end-table="0"/>
          <table:target-range-address table:start-column="7" table:start-row="201" table:start-table="0" table:end-column="7" table:end-row="211" table:end-table="0"/>
          <office:change-info>
            <dc:creator>Unknown Author</dc:creator>
            <dc:date>2026-06-09T07:40:05.750780000</dc:date>
          </office:change-info>
          <table:dependencies>
            <table:dependency table:id="ct216"/>
            <table:dependency table:id="ct215"/>
            <table:dependency table:id="ct175"/>
          </table:dependencies>
          <table:deletions>
            <table:cell-content-deletion>
              <table:cell-address table:column="7" table:row="203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3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5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2" table:table="0"/>
              <table:change-track-table-cell office:value-type="string">
                <text:p>会員詳細画面　動作確認</text:p>
              </table:change-track-table-cell>
            </table:cell-content-deletion>
            <table:cell-content-deletion>
              <table:cell-address table:column="7" table:row="203" table:table="0"/>
              <table:change-track-table-cell office:value-type="string">
                <text:p>注文確認画面 表示処理用　コントローラー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5" table:table="0"/>
              <table:change-track-table-cell office:value-type="string">
                <text:p>注文確認画面　動作確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9" table:table="0"/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>
              <table:cell-address table:column="7" table:row="211" table:table="0"/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57">
              <table:change-track-table-cell office:value-type="string">
                <text:p>会員詳細画面　テンプレートファイルの編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75" table:acceptance-state="accepted">
          <table:cell-address table:column="7" table:row="200" table:table="0"/>
          <office:change-info>
            <dc:creator>Unknown Author</dc:creator>
            <dc:date>2026-06-09T07:40:24.705317900</dc:date>
          </office:change-info>
          <table:previous>
            <table:change-track-table-cell/>
          </table:previous>
        </table:cell-content-change>
        <table:cell-content-change table:id="ct176" table:acceptance-state="accepted">
          <table:cell-address table:column="9" table:row="203" table:table="0"/>
          <office:change-info>
            <dc:creator>Unknown Author</dc:creator>
            <dc:date>2026-06-09T07:40:38.0416213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7" table:acceptance-state="accepted">
          <table:cell-address table:column="9" table:row="196" table:table="0"/>
          <office:change-info>
            <dc:creator>Unknown Author</dc:creator>
            <dc:date>2026-06-09T07:55:27.368847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8" table:acceptance-state="accepted">
          <table:cell-address table:column="9" table:row="197" table:table="0"/>
          <office:change-info>
            <dc:creator>Unknown Author</dc:creator>
            <dc:date>2026-06-09T07:55:31.8073439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9" table:acceptance-state="accepted">
          <table:cell-address table:column="9" table:row="198" table:table="0"/>
          <office:change-info>
            <dc:creator>Unknown Author</dc:creator>
            <dc:date>2026-06-09T07:55:36.2954691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0" table:acceptance-state="accepted">
          <table:cell-address table:column="9" table:row="204" table:table="0"/>
          <office:change-info>
            <dc:creator>Unknown Author</dc:creator>
            <dc:date>2026-06-09T07:56:10.918308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1" table:acceptance-state="accepted">
          <table:cell-address table:column="9" table:row="205" table:table="0"/>
          <office:change-info>
            <dc:creator>Unknown Author</dc:creator>
            <dc:date>2026-06-09T07:56:23.91172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2" table:acceptance-state="accepted">
          <table:cell-address table:column="6" table:row="213" table:table="0"/>
          <office:change-info>
            <dc:creator>Unknown Author</dc:creator>
            <dc:date>2026-06-09T07:56:45.483620300</dc:date>
          </office:change-info>
          <table:previous>
            <table:change-track-table-cell table:cell-address="WBS.G214" table:formula="of:=IF([.$H203]=&quot;&quot;;&quot;&quot;;IF([.$G212]=&quot;&quot;;1;[.$G212]+1))" office:value-type="float" office:value="17"/>
          </table:previous>
        </table:cell-content-change>
        <table:cell-content-change table:id="ct183" table:acceptance-state="accepted">
          <table:cell-address table:column="6" table:row="214" table:table="0"/>
          <office:change-info>
            <dc:creator>Unknown Author</dc:creator>
            <dc:date>2026-06-09T07:56:45.483667800</dc:date>
          </office:change-info>
          <table:previous>
            <table:change-track-table-cell table:cell-address="WBS.G215" table:formula="of:=IF([.$H204]=&quot;&quot;;&quot;&quot;;IF([.$G214]=&quot;&quot;;1;[.$G214]+1))" office:value-type="float" office:value="1"/>
          </table:previous>
        </table:cell-content-change>
        <table:cell-content-change table:id="ct184" table:acceptance-state="accepted">
          <table:cell-address table:column="9" table:row="205" table:table="0"/>
          <office:change-info>
            <dc:creator>Unknown Author</dc:creator>
            <dc:date>2026-06-09T07:57:06.942326600</dc:date>
          </office:change-info>
          <table:previous table:id="ct181">
            <table:change-track-table-cell/>
          </table:previous>
        </table:cell-content-change>
        <table:cell-content-change table:id="ct185" table:acceptance-state="accepted">
          <table:cell-address table:column="9" table:row="206" table:table="0"/>
          <office:change-info>
            <dc:creator>Unknown Author</dc:creator>
            <dc:date>2026-06-09T07:57:11.220942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9" table:row="209" table:table="0"/>
          <office:change-info>
            <dc:creator>Unknown Author</dc:creator>
            <dc:date>2026-06-09T07:59:19.057563900</dc:date>
          </office:change-info>
          <table:previous table:id="ct167">
            <table:change-track-table-cell office:value-type="string">
              <text:p>上田</text:p>
            </table:change-track-table-cell>
          </table:previous>
        </table:cell-content-change>
        <table:cell-content-change table:id="ct187" table:acceptance-state="accepted">
          <table:cell-address table:column="12" table:row="204" table:table="0"/>
          <office:change-info>
            <dc:creator>Unknown Author</dc:creator>
            <dc:date>2026-06-09T07:59:45.182360200</dc:date>
          </office:change-info>
          <table:previous>
            <table:change-track-table-cell office:value-type="float" office:value="46183"/>
          </table:previous>
        </table:cell-content-change>
        <table:cell-content-change table:id="ct188" table:acceptance-state="accepted">
          <table:cell-address table:column="12" table:row="205" table:table="0"/>
          <office:change-info>
            <dc:creator>Unknown Author</dc:creator>
            <dc:date>2026-06-09T08:00:06.682975700</dc:date>
          </office:change-info>
          <table:previous>
            <table:change-track-table-cell office:value-type="float" office:value="46183"/>
          </table:previous>
        </table:cell-content-change>
        <table:cell-content-change table:id="ct189" table:acceptance-state="accepted">
          <table:cell-address table:column="6" table:row="2" table:table="0"/>
          <office:change-info>
            <dc:creator>Unknown Author</dc:creator>
            <dc:date>2026-06-09T08:03:07.7583261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16" table:row="65" table:table="0"/>
          <office:change-info>
            <dc:creator>Unknown Author</dc:creator>
            <dc:date>2026-06-09T08:09:28.336946300</dc:date>
          </office:change-info>
          <table:previous>
            <table:change-track-table-cell office:value-type="float" office:value="0"/>
          </table:previous>
        </table:cell-content-change>
        <table:cell-content-change table:id="ct191" table:acceptance-state="accepted">
          <table:cell-address table:column="16" table:row="71" table:table="0"/>
          <office:change-info>
            <dc:creator>Unknown Author</dc:creator>
            <dc:date>2026-06-09T08:10:00.336876300</dc:date>
          </office:change-info>
          <table:previous>
            <table:change-track-table-cell office:value-type="float" office:value="0"/>
          </table:previous>
        </table:cell-content-change>
        <table:cell-content-change table:id="ct192" table:acceptance-state="accepted">
          <table:cell-address table:column="16" table:row="67" table:table="0"/>
          <office:change-info>
            <dc:creator>Unknown Author</dc:creator>
            <dc:date>2026-06-09T08:10:04.819187400</dc:date>
          </office:change-info>
          <table:previous>
            <table:change-track-table-cell office:value-type="float" office:value="0"/>
          </table:previous>
        </table:cell-content-change>
        <table:cell-content-change table:id="ct193" table:acceptance-state="accepted">
          <table:cell-address table:column="16" table:row="68" table:table="0"/>
          <office:change-info>
            <dc:creator>Unknown Author</dc:creator>
            <dc:date>2026-06-09T08:10:04.819206100</dc:date>
          </office:change-info>
          <table:previous>
            <table:change-track-table-cell office:value-type="float" office:value="0"/>
          </table:previous>
        </table:cell-content-change>
        <table:cell-content-change table:id="ct194" table:acceptance-state="accepted">
          <table:cell-address table:column="16" table:row="69" table:table="0"/>
          <office:change-info>
            <dc:creator>Unknown Author</dc:creator>
            <dc:date>2026-06-09T08:10:04.819210700</dc:date>
          </office:change-info>
          <table:previous>
            <table:change-track-table-cell office:value-type="float" office:value="0"/>
          </table:previous>
        </table:cell-content-change>
        <table:cell-content-change table:id="ct195" table:acceptance-state="accepted">
          <table:cell-address table:column="16" table:row="70" table:table="0"/>
          <office:change-info>
            <dc:creator>Unknown Author</dc:creator>
            <dc:date>2026-06-09T08:10:04.819214400</dc:date>
          </office:change-info>
          <table:previous>
            <table:change-track-table-cell office:value-type="float" office:value="0"/>
          </table:previous>
        </table:cell-content-change>
        <table:cell-content-change table:id="ct196" table:acceptance-state="accepted">
          <table:cell-address table:column="16" table:row="59" table:table="0"/>
          <office:change-info>
            <dc:creator>Unknown Author</dc:creator>
            <dc:date>2026-06-09T08:12:16.731038200</dc:date>
          </office:change-info>
          <table:previous>
            <table:change-track-table-cell office:value-type="float" office:value="0"/>
          </table:previous>
        </table:cell-content-change>
        <table:cell-content-change table:id="ct197" table:acceptance-state="accepted">
          <table:cell-address table:column="16" table:row="53" table:table="0"/>
          <office:change-info>
            <dc:creator>Unknown Author</dc:creator>
            <dc:date>2026-06-09T08:12:37.297761300</dc:date>
          </office:change-info>
          <table:previous>
            <table:change-track-table-cell office:value-type="float" office:value="0"/>
          </table:previous>
        </table:cell-content-change>
        <table:cell-content-change table:id="ct198" table:acceptance-state="accepted">
          <table:cell-address table:column="16" table:row="54" table:table="0"/>
          <office:change-info>
            <dc:creator>Unknown Author</dc:creator>
            <dc:date>2026-06-09T08:12:37.297777400</dc:date>
          </office:change-info>
          <table:previous>
            <table:change-track-table-cell office:value-type="float" office:value="0"/>
          </table:previous>
        </table:cell-content-change>
        <table:cell-content-change table:id="ct199" table:acceptance-state="accepted">
          <table:cell-address table:column="16" table:row="55" table:table="0"/>
          <office:change-info>
            <dc:creator>Unknown Author</dc:creator>
            <dc:date>2026-06-09T08:12:37.297781000</dc:date>
          </office:change-info>
          <table:previous>
            <table:change-track-table-cell office:value-type="float" office:value="0"/>
          </table:previous>
        </table:cell-content-change>
        <table:cell-content-change table:id="ct200" table:acceptance-state="accepted">
          <table:cell-address table:column="16" table:row="56" table:table="0"/>
          <office:change-info>
            <dc:creator>Unknown Author</dc:creator>
            <dc:date>2026-06-09T08:12:37.297783400</dc:date>
          </office:change-info>
          <table:previous>
            <table:change-track-table-cell office:value-type="float" office:value="0"/>
          </table:previous>
        </table:cell-content-change>
        <table:cell-content-change table:id="ct201" table:acceptance-state="accepted">
          <table:cell-address table:column="16" table:row="57" table:table="0"/>
          <office:change-info>
            <dc:creator>Unknown Author</dc:creator>
            <dc:date>2026-06-09T08:12:37.297785800</dc:date>
          </office:change-info>
          <table:previous>
            <table:change-track-table-cell office:value-type="float" office:value="0"/>
          </table:previous>
        </table:cell-content-change>
        <table:cell-content-change table:id="ct202" table:acceptance-state="accepted">
          <table:cell-address table:column="14" table:row="40" table:table="0"/>
          <office:change-info>
            <dc:creator>Unknown Author</dc:creator>
            <dc:date>2026-06-09T08:14:20.908930100</dc:date>
          </office:change-info>
          <table:previous>
            <table:change-track-table-cell office:value-type="float" office:value="46176"/>
          </table:previous>
        </table:cell-content-change>
        <table:cell-content-change table:id="ct203" table:acceptance-state="accepted">
          <table:cell-address table:column="14" table:row="104" table:table="0"/>
          <office:change-info>
            <dc:creator>Unknown Author</dc:creator>
            <dc:date>2026-06-09T08:21:03.834652400</dc:date>
          </office:change-info>
          <table:previous table:id="ct70">
            <table:change-track-table-cell office:value-type="float" office:value="46181"/>
          </table:previous>
        </table:cell-content-change>
        <table:cell-content-change table:id="ct204" table:acceptance-state="accepted">
          <table:cell-address table:column="16" table:row="104" table:table="0"/>
          <office:change-info>
            <dc:creator>Unknown Author</dc:creator>
            <dc:date>2026-06-09T08:21:08.839652300</dc:date>
          </office:change-info>
          <table:previous>
            <table:change-track-table-cell office:value-type="float" office:value="0"/>
          </table:previous>
        </table:cell-content-change>
        <table:cell-content-change table:id="ct205" table:acceptance-state="accepted">
          <table:cell-address table:column="14" table:row="104" table:table="0"/>
          <office:change-info>
            <dc:creator>Unknown Author</dc:creator>
            <dc:date>2026-06-09T08:23:12.510942600</dc:date>
          </office:change-info>
          <table:previous table:id="ct203">
            <table:change-track-table-cell office:value-type="float" office:value="46182"/>
          </table:previous>
        </table:cell-content-change>
        <table:cell-content-change table:id="ct206" table:acceptance-state="accepted">
          <table:cell-address table:column="12" table:row="196" table:table="0"/>
          <office:change-info>
            <dc:creator>Unknown Author</dc:creator>
            <dc:date>2026-06-09T08:41:11.908247800</dc:date>
          </office:change-info>
          <table:previous table:id="ct141">
            <table:change-track-table-cell office:value-type="float" office:value="46184"/>
          </table:previous>
        </table:cell-content-change>
        <table:cell-content-change table:id="ct207" table:acceptance-state="accepted">
          <table:cell-address table:column="12" table:row="197" table:table="0"/>
          <office:change-info>
            <dc:creator>Unknown Author</dc:creator>
            <dc:date>2026-06-09T08:41:15.907126400</dc:date>
          </office:change-info>
          <table:previous>
            <table:change-track-table-cell office:value-type="float" office:value="46184"/>
          </table:previous>
        </table:cell-content-change>
        <table:cell-content-change table:id="ct208" table:acceptance-state="accepted">
          <table:cell-address table:column="12" table:row="198" table:table="0"/>
          <office:change-info>
            <dc:creator>Unknown Author</dc:creator>
            <dc:date>2026-06-09T08:41:15.907165000</dc:date>
          </office:change-info>
          <table:previous>
            <table:change-track-table-cell office:value-type="float" office:value="46184"/>
          </table:previous>
        </table:cell-content-change>
        <table:cell-content-change table:id="ct209" table:acceptance-state="accepted">
          <table:cell-address table:column="12" table:row="195" table:table="0"/>
          <office:change-info>
            <dc:creator>Unknown Author</dc:creator>
            <dc:date>2026-06-09T08:43:14.139264700</dc:date>
          </office:change-info>
          <table:previous table:id="ct140">
            <table:change-track-table-cell office:value-type="float" office:value="46183"/>
          </table:previous>
        </table:cell-content-change>
        <table:cell-content-change table:id="ct210" table:acceptance-state="accepted">
          <table:cell-address table:column="12" table:row="199" table:table="0"/>
          <office:change-info>
            <dc:creator>Unknown Author</dc:creator>
            <dc:date>2026-06-09T08:43:30.443245400</dc:date>
          </office:change-info>
          <table:previous>
            <table:change-track-table-cell office:value-type="float" office:value="46184"/>
          </table:previous>
        </table:cell-content-change>
        <table:cell-content-change table:id="ct211" table:acceptance-state="accepted">
          <table:cell-address table:column="12" table:row="200" table:table="0"/>
          <office:change-info>
            <dc:creator>Unknown Author</dc:creator>
            <dc:date>2026-06-09T08:43:34.816774100</dc:date>
          </office:change-info>
          <table:previous>
            <table:change-track-table-cell office:value-type="float" office:value="46184"/>
          </table:previous>
        </table:cell-content-change>
        <table:cell-content-change table:id="ct212" table:acceptance-state="accepted">
          <table:cell-address table:column="12" table:row="201" table:table="0"/>
          <office:change-info>
            <dc:creator>Unknown Author</dc:creator>
            <dc:date>2026-06-09T08:43:34.816854600</dc:date>
          </office:change-info>
          <table:previous>
            <table:change-track-table-cell office:value-type="float" office:value="46184"/>
          </table:previous>
        </table:cell-content-change>
        <table:cell-content-change table:id="ct213" table:acceptance-state="accepted">
          <table:cell-address table:column="12" table:row="202" table:table="0"/>
          <office:change-info>
            <dc:creator>Unknown Author</dc:creator>
            <dc:date>2026-06-09T08:43:34.816894200</dc:date>
          </office:change-info>
          <table:previous>
            <table:change-track-table-cell office:value-type="float" office:value="46184"/>
          </table:previous>
        </table:cell-content-change>
        <table:cell-content-change table:id="ct214" table:acceptance-state="accepted">
          <table:cell-address table:column="12" table:row="203" table:table="0"/>
          <office:change-info>
            <dc:creator>Unknown Author</dc:creator>
            <dc:date>2026-06-09T08:43:34.816929200</dc:date>
          </office:change-info>
          <table:previous>
            <table:change-track-table-cell office:value-type="float" office:value="46184"/>
          </table:previous>
        </table:cell-content-change>
        <table:movement table:id="ct215" table:acceptance-state="accepted">
          <table:source-range-address table:column="7" table:row="210" table:table="0"/>
          <table:target-range-address table:column="7" table:row="213" table:table="0"/>
          <office:change-info>
            <dc:creator>Unknown Author</dc:creator>
            <dc:date>2026-06-09T08:43:59.684320100</dc:date>
          </office:change-info>
          <table:dependencies>
            <table:dependency table:id="ct261"/>
            <table:dependency table:id="ct216"/>
          </table:dependencies>
        </table:movement>
        <table:movement table:id="ct216" table:acceptance-state="accepted">
          <table:source-range-address table:start-column="7" table:start-row="211" table:start-table="0" table:end-column="7" table:end-row="213" table:end-table="0"/>
          <table:target-range-address table:start-column="7" table:start-row="210" table:start-table="0" table:end-column="7" table:end-row="211" table:end-table="0"/>
          <office:change-info>
            <dc:creator>Unknown Author</dc:creator>
            <dc:date>2026-06-09T08:44:05.890438000</dc:date>
          </office:change-info>
          <table:dependencies>
            <table:dependency table:id="ct299"/>
            <table:dependency table:id="ct257"/>
          </table:dependencies>
          <table:deletions>
            <table:cell-content-deletion>
              <table:cell-address table:column="7" table:row="211" table:table="0"/>
              <table:change-track-table-cell office:value-type="string">
                <text:p>ヘッダーテンプレート　HTMLの編集</text:p>
              </table:change-track-table-cell>
            </table:cell-content-deletion>
          </table:deletions>
        </table:movement>
        <table:cell-content-change table:id="ct217" table:acceptance-state="accepted">
          <table:cell-address table:column="9" table:row="211" table:table="0"/>
          <office:change-info>
            <dc:creator>Unknown Author</dc:creator>
            <dc:date>2026-06-09T08:44:16.216384600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12" table:row="211" table:table="0"/>
          <office:change-info>
            <dc:creator>Unknown Author</dc:creator>
            <dc:date>2026-06-09T08:45:26.422017700</dc:date>
          </office:change-info>
          <table:previous>
            <table:change-track-table-cell office:value-type="float" office:value="46186"/>
          </table:previous>
        </table:cell-content-change>
        <table:cell-content-change table:id="ct219" table:acceptance-state="accepted">
          <table:cell-address table:column="13" table:row="92" table:table="0"/>
          <office:change-info>
            <dc:creator>Unknown Author</dc:creator>
            <dc:date>2026-06-10T06:25:54.595644400</dc:date>
          </office:change-info>
          <table:previous>
            <table:change-track-table-cell/>
          </table:previous>
        </table:cell-content-change>
        <table:cell-content-change table:id="ct220" table:acceptance-state="accepted">
          <table:cell-address table:column="13" table:row="92" table:table="0"/>
          <office:change-info>
            <dc:creator>Unknown Author</dc:creator>
            <dc:date>2026-06-10T06:26:03.103040200</dc:date>
          </office:change-info>
          <table:previous table:id="ct219">
            <table:change-track-table-cell office:value-type="string">
              <text:p>2626/0610</text:p>
            </table:change-track-table-cell>
          </table:previous>
        </table:cell-content-change>
        <table:cell-content-change table:id="ct221" table:acceptance-state="accepted">
          <table:cell-address table:column="16" table:row="89" table:table="0"/>
          <office:change-info>
            <dc:creator>Unknown Author</dc:creator>
            <dc:date>2026-06-10T06:28:42.187650400</dc:date>
          </office:change-info>
          <table:previous>
            <table:change-track-table-cell office:value-type="float" office:value="0"/>
          </table:previous>
        </table:cell-content-change>
        <table:cell-content-change table:id="ct222" table:acceptance-state="accepted">
          <table:cell-address table:column="16" table:row="90" table:table="0"/>
          <office:change-info>
            <dc:creator>Unknown Author</dc:creator>
            <dc:date>2026-06-10T06:28:42.187661200</dc:date>
          </office:change-info>
          <table:previous>
            <table:change-track-table-cell office:value-type="float" office:value="0"/>
          </table:previous>
        </table:cell-content-change>
        <table:cell-content-change table:id="ct223" table:acceptance-state="accepted">
          <table:cell-address table:column="16" table:row="91" table:table="0"/>
          <office:change-info>
            <dc:creator>Unknown Author</dc:creator>
            <dc:date>2026-06-10T06:28:42.187664200</dc:date>
          </office:change-info>
          <table:previous>
            <table:change-track-table-cell office:value-type="float" office:value="0"/>
          </table:previous>
        </table:cell-content-change>
        <table:cell-content-change table:id="ct224" table:acceptance-state="accepted">
          <table:cell-address table:column="16" table:row="92" table:table="0"/>
          <office:change-info>
            <dc:creator>Unknown Author</dc:creator>
            <dc:date>2026-06-10T06:28:42.187666500</dc:date>
          </office:change-info>
          <table:previous>
            <table:change-track-table-cell office:value-type="float" office:value="0"/>
          </table:previous>
        </table:cell-content-change>
        <table:cell-content-change table:id="ct225" table:acceptance-state="accepted">
          <table:cell-address table:column="16" table:row="94" table:table="0"/>
          <office:change-info>
            <dc:creator>Unknown Author</dc:creator>
            <dc:date>2026-06-10T06:28:48.039499700</dc:date>
          </office:change-info>
          <table:previous>
            <table:change-track-table-cell office:value-type="float" office:value="0"/>
          </table:previous>
        </table:cell-content-change>
        <table:cell-content-change table:id="ct226" table:acceptance-state="accepted">
          <table:cell-address table:column="16" table:row="96" table:table="0"/>
          <office:change-info>
            <dc:creator>Unknown Author</dc:creator>
            <dc:date>2026-06-10T06:29:05.191359600</dc:date>
          </office:change-info>
          <table:previous>
            <table:change-track-table-cell office:value-type="float" office:value="0"/>
          </table:previous>
        </table:cell-content-change>
        <table:cell-content-change table:id="ct227" table:acceptance-state="accepted">
          <table:cell-address table:column="16" table:row="97" table:table="0"/>
          <office:change-info>
            <dc:creator>Unknown Author</dc:creator>
            <dc:date>2026-06-10T06:29:08.123550700</dc:date>
          </office:change-info>
          <table:previous>
            <table:change-track-table-cell office:value-type="float" office:value="0"/>
          </table:previous>
        </table:cell-content-change>
        <table:cell-content-change table:id="ct228" table:acceptance-state="accepted">
          <table:cell-address table:column="16" table:row="99" table:table="0"/>
          <office:change-info>
            <dc:creator>Unknown Author</dc:creator>
            <dc:date>2026-06-10T06:29:10.835691100</dc:date>
          </office:change-info>
          <table:previous>
            <table:change-track-table-cell office:value-type="float" office:value="0"/>
          </table:previous>
        </table:cell-content-change>
        <table:cell-content-change table:id="ct229" table:acceptance-state="accepted">
          <table:cell-address table:column="16" table:row="123" table:table="0"/>
          <office:change-info>
            <dc:creator>Unknown Author</dc:creator>
            <dc:date>2026-06-10T06:32:41.3511181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16" table:row="124" table:table="0"/>
          <office:change-info>
            <dc:creator>Unknown Author</dc:creator>
            <dc:date>2026-06-10T06:32:41.351131300</dc:date>
          </office:change-info>
          <table:previous>
            <table:change-track-table-cell/>
          </table:previous>
        </table:cell-content-change>
        <table:cell-content-change table:id="ct231" table:acceptance-state="accepted">
          <table:cell-address table:column="17" table:row="2" table:table="0"/>
          <office:change-info>
            <dc:creator>Unknown Author</dc:creator>
            <dc:date>2026-06-10T06:36:29.8941779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1" table:row="206" table:table="0"/>
          <office:change-info>
            <dc:creator>Unknown Author</dc:creator>
            <dc:date>2026-06-10T06:37:02.250878400</dc:date>
          </office:change-info>
          <table:previous>
            <table:change-track-table-cell office:value-type="float" office:value="46183"/>
          </table:previous>
        </table:cell-content-change>
        <table:cell-content-change table:id="ct233" table:acceptance-state="accepted">
          <table:cell-address table:column="15" table:row="257" table:table="0"/>
          <office:change-info>
            <dc:creator>Unknown Author</dc:creator>
            <dc:date>2026-06-10T06:37:43.794464500</dc:date>
          </office:change-info>
          <table:previous>
            <table:change-track-table-cell table:cell-address="WBS.P258" table:formula="of:=IF([.$L258]&lt;&gt;&quot;&quot;;NETWORKDAYS([.$L258];[.$M258];[$休日.$B$4:.$B$304]);&quot;&quot;)" office:value-type="float" office:value="1"/>
          </table:previous>
        </table:cell-content-change>
        <table:cell-content-change table:id="ct234" table:acceptance-state="accepted">
          <table:cell-address table:column="17" table:row="2" table:table="0"/>
          <office:change-info>
            <dc:creator>Unknown Author</dc:creator>
            <dc:date>2026-06-10T06:39:06.180892900</dc:date>
          </office:change-info>
          <table:previous table:id="ct231">
            <table:change-track-table-cell table:cell-address="WBS.R3" table:formula="of:=COUNTIF()" office:value-type="float" office:value="0"/>
          </table:previous>
        </table:cell-content-change>
        <table:cell-content-change table:id="ct235" table:acceptance-state="accepted">
          <table:cell-address table:column="17" table:row="2" table:table="0"/>
          <office:change-info>
            <dc:creator>Unknown Author</dc:creator>
            <dc:date>2026-06-10T06:41:13.170191000</dc:date>
          </office:change-info>
          <table:previous table:id="ct234">
            <table:change-track-table-cell table:cell-address="WBS.R3" table:formula="of:=COUNTIF([.P:.P]:!null)" office:value-type="float" office:value="0"/>
          </table:previous>
        </table:cell-content-change>
        <table:cell-content-change table:id="ct236" table:acceptance-state="accepted">
          <table:cell-address table:column="17" table:row="2" table:table="0"/>
          <office:change-info>
            <dc:creator>Unknown Author</dc:creator>
            <dc:date>2026-06-10T06:41:45.476728200</dc:date>
          </office:change-info>
          <table:previous table:id="ct235">
            <table:change-track-table-cell table:cell-address="WBS.R3" table:formula="of:=COUNTIF([.P:.P]:&gt;0)" office:value-type="float" office:value="0"/>
          </table:previous>
        </table:cell-content-change>
        <table:cell-content-change table:id="ct237" table:acceptance-state="accepted">
          <table:cell-address table:column="17" table:row="2" table:table="0"/>
          <office:change-info>
            <dc:creator>Unknown Author</dc:creator>
            <dc:date>2026-06-10T06:43:15.035628400</dc:date>
          </office:change-info>
          <table:previous table:id="ct236">
            <table:change-track-table-cell table:cell-address="WBS.R3" table:formula="of:=COUNTIF([.P:.P];&gt;0)" office:value-type="float" office:value="0"/>
          </table:previous>
        </table:cell-content-change>
        <table:cell-content-change table:id="ct238" table:acceptance-state="accepted">
          <table:cell-address table:column="15" table:row="2" table:table="0"/>
          <office:change-info>
            <dc:creator>Unknown Author</dc:creator>
            <dc:date>2026-06-10T06:43:38.678200400</dc:date>
          </office:change-info>
          <table:previous>
            <table:change-track-table-cell/>
          </table:previous>
        </table:cell-content-change>
        <table:cell-content-change table:id="ct239" table:acceptance-state="accepted">
          <table:cell-address table:column="16" table:row="151" table:table="0"/>
          <office:change-info>
            <dc:creator>Unknown Author</dc:creator>
            <dc:date>2026-06-11T06:33:14.483780700</dc:date>
          </office:change-info>
          <table:previous>
            <table:change-track-table-cell/>
          </table:previous>
        </table:cell-content-change>
        <table:cell-content-change table:id="ct240" table:acceptance-state="accepted">
          <table:cell-address table:column="13" table:row="196" table:table="0"/>
          <office:change-info>
            <dc:creator>Unknown Author</dc:creator>
            <dc:date>2026-06-11T06:34:45.925971800</dc:date>
          </office:change-info>
          <table:previous>
            <table:change-track-table-cell office:value-type="float" office:value="265328"/>
          </table:previous>
        </table:cell-content-change>
        <table:cell-content-change table:id="ct241" table:acceptance-state="accepted">
          <table:cell-address table:column="9" table:row="196" table:table="0"/>
          <office:change-info>
            <dc:creator>Unknown Author</dc:creator>
            <dc:date>2026-06-11T06:36:20.723038900</dc:date>
          </office:change-info>
          <table:previous table:id="ct177">
            <table:change-track-table-cell office:value-type="string">
              <text:p>伊藤</text:p>
            </table:change-track-table-cell>
          </table:previous>
        </table:cell-content-change>
        <table:cell-content-change table:id="ct242" table:acceptance-state="accepted">
          <table:cell-address table:column="9" table:row="197" table:table="0"/>
          <office:change-info>
            <dc:creator>Unknown Author</dc:creator>
            <dc:date>2026-06-11T06:36:25.413193300</dc:date>
          </office:change-info>
          <table:previous table:id="ct178">
            <table:change-track-table-cell office:value-type="string">
              <text:p>伊藤</text:p>
            </table:change-track-table-cell>
          </table:previous>
        </table:cell-content-change>
        <table:cell-content-change table:id="ct243" table:acceptance-state="accepted">
          <table:cell-address table:column="9" table:row="198" table:table="0"/>
          <office:change-info>
            <dc:creator>Unknown Author</dc:creator>
            <dc:date>2026-06-11T06:36:25.413203900</dc:date>
          </office:change-info>
          <table:previous table:id="ct179">
            <table:change-track-table-cell office:value-type="string">
              <text:p>伊藤</text:p>
            </table:change-track-table-cell>
          </table:previous>
        </table:cell-content-change>
        <table:cell-content-change table:id="ct244" table:acceptance-state="accepted">
          <table:cell-address table:column="9" table:row="205" table:table="0"/>
          <office:change-info>
            <dc:creator>Unknown Author</dc:creator>
            <dc:date>2026-06-11T06:36:34.968125900</dc:date>
          </office:change-info>
          <table:previous table:id="ct184">
            <table:change-track-table-cell office:value-type="string">
              <text:p>伊藤</text:p>
            </table:change-track-table-cell>
          </table:previous>
        </table:cell-content-change>
        <table:cell-content-change table:id="ct245" table:acceptance-state="accepted">
          <table:cell-address table:column="13" table:row="229" table:table="0"/>
          <office:change-info>
            <dc:creator>Unknown Author</dc:creator>
            <dc:date>2026-06-11T06:38:58.879667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6" table:acceptance-state="accepted">
          <table:cell-address table:column="13" table:row="230" table:table="0"/>
          <office:change-info>
            <dc:creator>Unknown Author</dc:creator>
            <dc:date>2026-06-11T06:38:58.8796943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7" table:acceptance-state="accepted">
          <table:cell-address table:column="13" table:row="231" table:table="0"/>
          <office:change-info>
            <dc:creator>Unknown Author</dc:creator>
            <dc:date>2026-06-11T06:38:58.8797040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8" table:acceptance-state="accepted">
          <table:cell-address table:column="13" table:row="232" table:table="0"/>
          <office:change-info>
            <dc:creator>Unknown Author</dc:creator>
            <dc:date>2026-06-11T06:38:58.879712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9" table:acceptance-state="accepted">
          <table:cell-address table:column="16" table:row="229" table:table="0"/>
          <office:change-info>
            <dc:creator>Unknown Author</dc:creator>
            <dc:date>2026-06-11T06:41:27.729150700</dc:date>
          </office:change-info>
          <table:previous>
            <table:change-track-table-cell office:value-type="float" office:value="0"/>
          </table:previous>
        </table:cell-content-change>
        <table:cell-content-change table:id="ct250" table:acceptance-state="accepted">
          <table:cell-address table:column="16" table:row="230" table:table="0"/>
          <office:change-info>
            <dc:creator>Unknown Author</dc:creator>
            <dc:date>2026-06-11T06:41:31.496904100</dc:date>
          </office:change-info>
          <table:previous>
            <table:change-track-table-cell office:value-type="float" office:value="0"/>
          </table:previous>
        </table:cell-content-change>
        <table:cell-content-change table:id="ct251" table:acceptance-state="accepted">
          <table:cell-address table:column="9" table:row="229" table:table="0"/>
          <office:change-info>
            <dc:creator>Unknown Author</dc:creator>
            <dc:date>2026-06-11T06:45:35.527149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2" table:acceptance-state="accepted">
          <table:cell-address table:column="9" table:row="230" table:table="0"/>
          <office:change-info>
            <dc:creator>Unknown Author</dc:creator>
            <dc:date>2026-06-11T06:45:45.586697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3" table:acceptance-state="accepted">
          <table:cell-address table:column="9" table:row="231" table:table="0"/>
          <office:change-info>
            <dc:creator>Unknown Author</dc:creator>
            <dc:date>2026-06-11T06:45:45.5867246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4" table:acceptance-state="accepted">
          <table:cell-address table:column="9" table:row="253" table:table="0"/>
          <office:change-info>
            <dc:creator>Unknown Author</dc:creator>
            <dc:date>2026-06-11T06:45:53.6282965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5" table:acceptance-state="accepted">
          <table:cell-address table:column="9" table:row="254" table:table="0"/>
          <office:change-info>
            <dc:creator>Unknown Author</dc:creator>
            <dc:date>2026-06-11T06:46:00.730581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6" table:acceptance-state="accepted">
          <table:cell-address table:column="16" table:row="254" table:table="0"/>
          <office:change-info>
            <dc:creator>Unknown Author</dc:creator>
            <dc:date>2026-06-11T06:47:04.600203300</dc:date>
          </office:change-info>
          <table:previous>
            <table:change-track-table-cell office:value-type="float" office:value="0"/>
          </table:previous>
        </table:cell-content-change>
        <table:cell-content-change table:id="ct257" table:acceptance-state="accepted">
          <table:cell-address table:column="5" table:row="213" table:table="0"/>
          <office:change-info>
            <dc:creator>Unknown Author</dc:creator>
            <dc:date>2026-06-12T06:18:27.072852800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9" table:row="213" table:table="0"/>
          <office:change-info>
            <dc:creator>Unknown Author</dc:creator>
            <dc:date>2026-06-12T06:18:35.0289666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11" table:row="213" table:table="0"/>
          <office:change-info>
            <dc:creator>Unknown Author</dc:creator>
            <dc:date>2026-06-12T06:18:56.741250800</dc:date>
          </office:change-info>
          <table:previous>
            <table:change-track-table-cell office:value-type="float" office:value="265329"/>
          </table:previous>
        </table:cell-content-change>
        <table:cell-content-change table:id="ct260" table:acceptance-state="accepted">
          <table:cell-address table:column="14" table:row="213" table:table="0"/>
          <office:change-info>
            <dc:creator>Unknown Author</dc:creator>
            <dc:date>2026-06-12T06:19:07.528505500</dc:date>
          </office:change-info>
          <table:previous>
            <table:change-track-table-cell office:value-type="float" office:value="265330"/>
          </table:previous>
        </table:cell-content-change>
        <table:movement table:id="ct261" table:acceptance-state="accepted">
          <table:source-range-address table:column="7" table:row="213" table:table="0"/>
          <table:target-range-address table:column="5" table:row="213" table:table="0"/>
          <office:change-info>
            <dc:creator>Unknown Author</dc:creator>
            <dc:date>2026-06-12T06:21:40.092090000</dc:date>
          </office:change-info>
        </table:movement>
        <table:cell-content-change table:id="ct262" table:acceptance-state="accepted">
          <table:cell-address table:column="6" table:row="213" table:table="0"/>
          <office:change-info>
            <dc:creator>Unknown Author</dc:creator>
            <dc:date>2026-06-12T06:22:05.385827100</dc:date>
          </office:change-info>
          <table:previous table:id="ct182">
            <table:change-track-table-cell table:cell-address="WBS.G214" table:formula="of:=IF([.$H201]=&quot;&quot;;&quot;&quot;;IF([.$G212]=&quot;&quot;;1;[.$G212]+1))" office:value-type="float" office:value="17"/>
          </table:previous>
        </table:cell-content-change>
        <table:cell-content-change table:id="ct263" table:acceptance-state="accepted">
          <table:cell-address table:column="4" table:row="213" table:table="0"/>
          <office:change-info>
            <dc:creator>Unknown Author</dc:creator>
            <dc:date>2026-06-12T06:22:24.053300100</dc:date>
          </office:change-info>
          <table:previous>
            <table:change-track-table-cell table:cell-address="WBS.E214" table:formula="of:=IF(AND([.$F214]&lt;&gt;&quot;&quot;;[.$D212]&lt;&gt;&quot;&quot;);1;IF([.$F214]&lt;&gt;&quot;&quot;;MAX(INDIRECT([.$B214]):[.$E212])+1;&quot;&quot;))" office:value-type="float" office:value="4"/>
          </table:previous>
        </table:cell-content-change>
        <table:cell-content-change table:id="ct264" table:acceptance-state="accepted">
          <table:cell-address table:column="7" table:row="214" table:table="0"/>
          <office:change-info>
            <dc:creator>Unknown Author</dc:creator>
            <dc:date>2026-06-12T06:22:43.6643863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7" table:row="215" table:table="0"/>
          <office:change-info>
            <dc:creator>Unknown Author</dc:creator>
            <dc:date>2026-06-12T06:22:51.977443400</dc:date>
          </office:change-info>
          <table:previous>
            <table:change-track-table-cell/>
          </table:previous>
        </table:cell-content-change>
        <table:insertion table:id="ct266" table:acceptance-state="accepted" table:type="row" table:position="216" table:table="0">
          <office:change-info>
            <dc:creator>Unknown Author</dc:creator>
            <dc:date>2026-06-12T06:22:59.810627000</dc:date>
          </office:change-info>
          <table:dependencies>
            <table:dependency table:id="ct596"/>
            <table:dependency table:id="ct586"/>
            <table:dependency table:id="ct574"/>
            <table:dependency table:id="ct558"/>
            <table:dependency table:id="ct329"/>
            <table:dependency table:id="ct326"/>
            <table:dependency table:id="ct321"/>
            <table:dependency table:id="ct301"/>
            <table:dependency table:id="ct284"/>
            <table:dependency table:id="ct273"/>
          </table:dependencies>
        </table:insertion>
        <table:insertion table:id="ct267" table:acceptance-state="accepted" table:type="row" table:position="226" table:table="0">
          <office:change-info>
            <dc:creator>Unknown Author</dc:creator>
            <dc:date>2026-06-12T06:23:07.028581800</dc:date>
          </office:change-info>
          <table:dependencies>
            <table:dependency table:id="ct298"/>
            <table:dependency table:id="ct277"/>
          </table:dependencies>
        </table:insertion>
        <table:insertion table:id="ct268" table:acceptance-state="accepted" table:type="row" table:position="225" table:table="0">
          <office:change-info>
            <dc:creator>Unknown Author</dc:creator>
            <dc:date>2026-06-12T06:23:09.544240000</dc:date>
          </office:change-info>
          <table:dependencies>
            <table:dependency table:id="ct604"/>
            <table:dependency table:id="ct595"/>
            <table:dependency table:id="ct573"/>
            <table:dependency table:id="ct566"/>
            <table:dependency table:id="ct345"/>
            <table:dependency table:id="ct338"/>
            <table:dependency table:id="ct297"/>
            <table:dependency table:id="ct295"/>
            <table:dependency table:id="ct276"/>
          </table:dependencies>
        </table:insertion>
        <table:cell-content-change table:id="ct269" table:acceptance-state="accepted">
          <table:cell-address table:column="6" table:row="214" table:table="0"/>
          <office:change-info>
            <dc:creator>Unknown Author</dc:creator>
            <dc:date>2026-06-12T06:23:19.879236600</dc:date>
          </office:change-info>
          <table:previous table:id="ct183">
            <table:change-track-table-cell/>
          </table:previous>
        </table:cell-content-change>
        <table:insertion table:id="ct270" table:acceptance-state="accepted" table:type="row" table:position="218" table:table="0">
          <office:change-info>
            <dc:creator>Unknown Author</dc:creator>
            <dc:date>2026-06-12T06:23:28.434361900</dc:date>
          </office:change-info>
          <table:dependencies>
            <table:dependency table:id="ct605"/>
            <table:dependency table:id="ct588"/>
            <table:dependency table:id="ct576"/>
            <table:dependency table:id="ct560"/>
            <table:dependency table:id="ct331"/>
            <table:dependency table:id="ct286"/>
            <table:dependency table:id="ct275"/>
          </table:dependencies>
        </table:insertion>
        <table:insertion table:id="ct271" table:acceptance-state="accepted" table:type="row" table:position="217" table:table="0">
          <office:change-info>
            <dc:creator>Unknown Author</dc:creator>
            <dc:date>2026-06-12T06:23:34.318054800</dc:date>
          </office:change-info>
          <table:dependencies>
            <table:dependency table:id="ct597"/>
            <table:dependency table:id="ct587"/>
            <table:dependency table:id="ct575"/>
            <table:dependency table:id="ct559"/>
            <table:dependency table:id="ct358"/>
            <table:dependency table:id="ct347"/>
            <table:dependency table:id="ct330"/>
            <table:dependency table:id="ct285"/>
            <table:dependency table:id="ct274"/>
          </table:dependencies>
        </table:insertion>
        <table:cell-content-change table:id="ct272" table:acceptance-state="accepted">
          <table:cell-address table:column="6" table:row="215" table:table="0"/>
          <office:change-info>
            <dc:creator>Unknown Author</dc:creator>
            <dc:date>2026-06-12T06:23:59.451742000</dc:date>
          </office:change-info>
          <table:previous>
            <table:change-track-table-cell table:cell-address="WBS.G216" table:formula="of:=IF([.$H216]=&quot;&quot;;&quot;&quot;;IF([.$G215]=&quot;&quot;;1;[.$G215]+1))" office:value-type="float" office:value="2"/>
          </table:previous>
        </table:cell-content-change>
        <table:cell-content-change table:id="ct273" table:acceptance-state="accepted">
          <table:cell-address table:column="6" table:row="216" table:table="0"/>
          <office:change-info>
            <dc:creator>Unknown Author</dc:creator>
            <dc:date>2026-06-12T06:23:59.451779100</dc:date>
          </office:change-info>
          <table:previous>
            <table:change-track-table-cell table:cell-address="WBS.G217" table:formula="of:=IF([.$H217]=&quot;&quot;;&quot;&quot;;IF([.$G216]=&quot;&quot;;1;[.$G216]+1))" office:value-type="float" office:value="3"/>
          </table:previous>
        </table:cell-content-change>
        <table:cell-content-change table:id="ct274" table:acceptance-state="accepted">
          <table:cell-address table:column="6" table:row="217" table:table="0"/>
          <office:change-info>
            <dc:creator>Unknown Author</dc:creator>
            <dc:date>2026-06-12T06:23:59.451790000</dc:date>
          </office:change-info>
          <table:previous>
            <table:change-track-table-cell table:cell-address="WBS.G218" table:formula="of:=IF([.$H218]=&quot;&quot;;&quot;&quot;;IF([.$G217]=&quot;&quot;;1;[.$G217]+1))" office:value-type="float" office:value="4"/>
          </table:previous>
        </table:cell-content-change>
        <table:cell-content-change table:id="ct275" table:acceptance-state="accepted">
          <table:cell-address table:column="6" table:row="218" table:table="0"/>
          <office:change-info>
            <dc:creator>Unknown Author</dc:creator>
            <dc:date>2026-06-12T06:23:59.451799700</dc:date>
          </office:change-info>
          <table:previous>
            <table:change-track-table-cell table:cell-address="WBS.G219" table:formula="of:=IF([.$H219]=&quot;&quot;;&quot;&quot;;IF([.$G218]=&quot;&quot;;1;[.$G218]+1))" office:value-type="float" office:value="5"/>
          </table:previous>
        </table:cell-content-change>
        <table:cell-content-change table:id="ct276" table:acceptance-state="accepted">
          <table:cell-address table:column="6" table:row="225" table:table="0"/>
          <office:change-info>
            <dc:creator>Unknown Author</dc:creator>
            <dc:date>2026-06-12T06:23:59.451808200</dc:date>
          </office:change-info>
          <table:previous>
            <table:change-track-table-cell table:cell-address="WBS.G226" table:formula="of:=IF([.$H226]=&quot;&quot;;&quot;&quot;;IF([.$G219]=&quot;&quot;;1;[.$G219]+1))" office:value-type="float" office:value="6"/>
          </table:previous>
        </table:cell-content-change>
        <table:cell-content-change table:id="ct277" table:acceptance-state="accepted">
          <table:cell-address table:column="6" table:row="226" table:table="0"/>
          <office:change-info>
            <dc:creator>Unknown Author</dc:creator>
            <dc:date>2026-06-12T06:23:59.451816500</dc:date>
          </office:change-info>
          <table:previous>
            <table:change-track-table-cell table:cell-address="WBS.G227" table:formula="of:=IF([.$H227]=&quot;&quot;;&quot;&quot;;IF([.$G226]=&quot;&quot;;1;[.$G226]+1))" office:value-type="string"/>
          </table:previous>
        </table:cell-content-change>
        <table:insertion table:id="ct278" table:acceptance-state="accepted" table:type="row" table:position="224" table:table="0">
          <office:change-info>
            <dc:creator>Unknown Author</dc:creator>
            <dc:date>2026-06-12T06:24:03.667072100</dc:date>
          </office:change-info>
          <table:dependencies>
            <table:dependency table:id="ct603"/>
            <table:dependency table:id="ct594"/>
            <table:dependency table:id="ct572"/>
            <table:dependency table:id="ct565"/>
            <table:dependency table:id="ct357"/>
            <table:dependency table:id="ct349"/>
            <table:dependency table:id="ct346"/>
            <table:dependency table:id="ct344"/>
            <table:dependency table:id="ct337"/>
            <table:dependency table:id="ct296"/>
            <table:dependency table:id="ct294"/>
          </table:dependencies>
        </table:insertion>
        <table:insertion table:id="ct279" table:acceptance-state="accepted" table:type="row" table:position="223" table:table="0">
          <office:change-info>
            <dc:creator>Unknown Author</dc:creator>
            <dc:date>2026-06-12T06:24:05.610371300</dc:date>
          </office:change-info>
          <table:dependencies>
            <table:dependency table:id="ct602"/>
            <table:dependency table:id="ct593"/>
            <table:dependency table:id="ct571"/>
            <table:dependency table:id="ct564"/>
            <table:dependency table:id="ct343"/>
            <table:dependency table:id="ct336"/>
            <table:dependency table:id="ct328"/>
            <table:dependency table:id="ct293"/>
          </table:dependencies>
        </table:insertion>
        <table:insertion table:id="ct280" table:acceptance-state="accepted" table:type="row" table:position="222" table:table="0">
          <office:change-info>
            <dc:creator>Unknown Author</dc:creator>
            <dc:date>2026-06-12T06:24:07.895953700</dc:date>
          </office:change-info>
          <table:dependencies>
            <table:dependency table:id="ct601"/>
            <table:dependency table:id="ct592"/>
            <table:dependency table:id="ct570"/>
            <table:dependency table:id="ct348"/>
            <table:dependency table:id="ct342"/>
            <table:dependency table:id="ct335"/>
            <table:dependency table:id="ct292"/>
          </table:dependencies>
        </table:insertion>
        <table:insertion table:id="ct281" table:acceptance-state="accepted" table:type="row" table:position="221" table:table="0">
          <office:change-info>
            <dc:creator>Unknown Author</dc:creator>
            <dc:date>2026-06-12T06:24:09.347102000</dc:date>
          </office:change-info>
          <table:dependencies>
            <table:dependency table:id="ct600"/>
            <table:dependency table:id="ct591"/>
            <table:dependency table:id="ct569"/>
            <table:dependency table:id="ct563"/>
            <table:dependency table:id="ct341"/>
            <table:dependency table:id="ct334"/>
            <table:dependency table:id="ct325"/>
            <table:dependency table:id="ct291"/>
            <table:dependency table:id="ct290"/>
          </table:dependencies>
        </table:insertion>
        <table:insertion table:id="ct282" table:acceptance-state="accepted" table:type="row" table:position="220" table:table="0">
          <office:change-info>
            <dc:creator>Unknown Author</dc:creator>
            <dc:date>2026-06-12T06:24:10.657119700</dc:date>
          </office:change-info>
          <table:dependencies>
            <table:dependency table:id="ct599"/>
            <table:dependency table:id="ct590"/>
            <table:dependency table:id="ct568"/>
            <table:dependency table:id="ct562"/>
            <table:dependency table:id="ct340"/>
            <table:dependency table:id="ct333"/>
            <table:dependency table:id="ct324"/>
            <table:dependency table:id="ct289"/>
            <table:dependency table:id="ct288"/>
          </table:dependencies>
        </table:insertion>
        <table:insertion table:id="ct283" table:acceptance-state="accepted" table:type="row" table:position="219" table:table="0">
          <office:change-info>
            <dc:creator>Unknown Author</dc:creator>
            <dc:date>2026-06-12T06:24:11.562293900</dc:date>
          </office:change-info>
          <table:dependencies>
            <table:dependency table:id="ct598"/>
            <table:dependency table:id="ct589"/>
            <table:dependency table:id="ct567"/>
            <table:dependency table:id="ct561"/>
            <table:dependency table:id="ct339"/>
            <table:dependency table:id="ct332"/>
            <table:dependency table:id="ct287"/>
          </table:dependencies>
        </table:insertion>
        <table:cell-content-change table:id="ct284" table:acceptance-state="accepted">
          <table:cell-address table:column="7" table:row="216" table:table="0"/>
          <office:change-info>
            <dc:creator>Unknown Author</dc:creator>
            <dc:date>2026-06-12T06:24:30.8569401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7" table:row="217" table:table="0"/>
          <office:change-info>
            <dc:creator>Unknown Author</dc:creator>
            <dc:date>2026-06-12T06:24:43.2036586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7" table:row="218" table:table="0"/>
          <office:change-info>
            <dc:creator>Unknown Author</dc:creator>
            <dc:date>2026-06-12T06:24:52.7773061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7" table:row="219" table:table="0"/>
          <office:change-info>
            <dc:creator>Unknown Author</dc:creator>
            <dc:date>2026-06-12T06:25:02.2500309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7" table:row="220" table:table="0"/>
          <office:change-info>
            <dc:creator>Unknown Author</dc:creator>
            <dc:date>2026-06-12T06:25:24.040312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7" table:row="220" table:table="0"/>
          <office:change-info>
            <dc:creator>Unknown Author</dc:creator>
            <dc:date>2026-06-12T06:25:55.288833600</dc:date>
          </office:change-info>
          <table:previous table:id="ct288">
            <table:change-track-table-cell office:value-type="string">
              <text:p>メインコンテンツの編集</text:p>
            </table:change-track-table-cell>
          </table:previous>
        </table:cell-content-change>
        <table:cell-content-change table:id="ct290" table:acceptance-state="accepted">
          <table:cell-address table:column="7" table:row="221" table:table="0"/>
          <office:change-info>
            <dc:creator>Unknown Author</dc:creator>
            <dc:date>2026-06-12T06:26:01.1415108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7" table:row="221" table:table="0"/>
          <office:change-info>
            <dc:creator>Unknown Author</dc:creator>
            <dc:date>2026-06-12T06:26:12.006856800</dc:date>
          </office:change-info>
          <table:previous table:id="ct290">
            <table:change-track-table-cell office:value-type="string">
              <text:p>商品知覧画面の</text:p>
            </table:change-track-table-cell>
          </table:previous>
        </table:cell-content-change>
        <table:cell-content-change table:id="ct292" table:acceptance-state="accepted">
          <table:cell-address table:column="7" table:row="222" table:table="0"/>
          <office:change-info>
            <dc:creator>Unknown Author</dc:creator>
            <dc:date>2026-06-12T06:26:20.628808600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7" table:row="223" table:table="0"/>
          <office:change-info>
            <dc:creator>Unknown Author</dc:creator>
            <dc:date>2026-06-12T06:26:33.6975728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7" table:row="224" table:table="0"/>
          <office:change-info>
            <dc:creator>Unknown Author</dc:creator>
            <dc:date>2026-06-12T06:26:42.933465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7" table:row="225" table:table="0"/>
          <office:change-info>
            <dc:creator>Unknown Author</dc:creator>
            <dc:date>2026-06-12T06:26:52.488173900</dc:date>
          </office:change-info>
          <table:previous>
            <table:change-track-table-cell/>
          </table:previous>
        </table:cell-content-change>
        <table:cell-content-change table:id="ct296" table:acceptance-state="accepted">
          <table:cell-address table:column="6" table:row="224" table:table="0"/>
          <office:change-info>
            <dc:creator>Unknown Author</dc:creator>
            <dc:date>2026-06-12T06:26:57.558950900</dc:date>
          </office:change-info>
          <table:previous>
            <table:change-track-table-cell/>
          </table:previous>
        </table:cell-content-change>
        <table:cell-content-change table:id="ct297" table:acceptance-state="accepted">
          <table:cell-address table:column="6" table:row="225" table:table="0"/>
          <office:change-info>
            <dc:creator>Unknown Author</dc:creator>
            <dc:date>2026-06-12T06:26:57.558973900</dc:date>
          </office:change-info>
          <table:previous table:id="ct276">
            <table:change-track-table-cell office:value-type="float" office:value="6"/>
          </table:previous>
        </table:cell-content-change>
        <table:cell-content-change table:id="ct298" table:acceptance-state="accepted">
          <table:cell-address table:column="6" table:row="226" table:table="0"/>
          <office:change-info>
            <dc:creator>Unknown Author</dc:creator>
            <dc:date>2026-06-12T06:27:06.464822200</dc:date>
          </office:change-info>
          <table:previous table:id="ct277">
            <table:change-track-table-cell office:value-type="float" office:value="7"/>
          </table:previous>
        </table:cell-content-change>
        <table:insertion table:id="ct299" table:acceptance-state="accepted" table:type="row" table:position="212" table:table="0">
          <office:change-info>
            <dc:creator>Unknown Author</dc:creator>
            <dc:date>2026-06-12T06:27:56.923445100</dc:date>
          </office:change-info>
        </table:insertion>
        <table:cell-content-change table:id="ct300" table:acceptance-state="accepted">
          <table:cell-address table:column="16" table:row="214" table:table="0"/>
          <office:change-info>
            <dc:creator>Unknown Author</dc:creator>
            <dc:date>2026-06-12T06:28:12.2668831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2" table:row="216" table:table="0"/>
          <office:change-info>
            <dc:creator>Unknown Author</dc:creator>
            <dc:date>2026-06-12T06:28:55.927929500</dc:date>
          </office:change-info>
          <table:previous>
            <table:change-track-table-cell office:value-type="float" office:value="265330"/>
          </table:previous>
        </table:cell-content-change>
        <table:movement table:id="ct302" table:acceptance-state="accepted">
          <table:source-range-address table:column="14" table:row="215" table:table="0"/>
          <table:target-range-address table:column="14" table:row="213" table:table="0"/>
          <office:change-info>
            <dc:creator>Unknown Author</dc:creator>
            <dc:date>2026-06-12T06:31:20.702140800</dc:date>
          </office:change-info>
          <table:dependencies>
            <table:dependency table:id="ct557"/>
          </table:dependencies>
          <table:deletions>
            <table:cell-content-deletion table:id="ct260">
              <table:change-track-table-cell/>
            </table:cell-content-deletion>
          </table:deletions>
        </table:movement>
        <table:movement table:id="ct303" table:acceptance-state="accepted">
          <table:source-range-address table:column="16" table:row="215" table:table="0"/>
          <table:target-range-address table:column="16" table:row="213" table:table="0"/>
          <office:change-info>
            <dc:creator>Unknown Author</dc:creator>
            <dc:date>2026-06-12T06:31:24.527015500</dc:date>
          </office:change-info>
        </table:movement>
        <table:cell-content-change table:id="ct304" table:acceptance-state="accepted">
          <table:cell-address table:column="9" table:row="196" table:table="0"/>
          <office:change-info>
            <dc:creator>Unknown Author</dc:creator>
            <dc:date>2026-06-12T06:32:49.469194600</dc:date>
          </office:change-info>
          <table:previous table:id="ct241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5" table:acceptance-state="accepted">
          <table:cell-address table:column="9" table:row="197" table:table="0"/>
          <office:change-info>
            <dc:creator>Unknown Author</dc:creator>
            <dc:date>2026-06-12T06:32:55.104596300</dc:date>
          </office:change-info>
          <table:previous table:id="ct242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6" table:acceptance-state="accepted">
          <table:cell-address table:column="9" table:row="204" table:table="0"/>
          <office:change-info>
            <dc:creator>Unknown Author</dc:creator>
            <dc:date>2026-06-12T06:33:01.451355100</dc:date>
          </office:change-info>
          <table:previous table:id="ct180">
            <table:change-track-table-cell office:value-type="string">
              <text:p>上田</text:p>
            </table:change-track-table-cell>
          </table:previous>
        </table:cell-content-change>
        <table:cell-content-change table:id="ct307" table:acceptance-state="accepted">
          <table:cell-address table:column="9" table:row="205" table:table="0"/>
          <office:change-info>
            <dc:creator>Unknown Author</dc:creator>
            <dc:date>2026-06-12T06:33:01.451375500</dc:date>
          </office:change-info>
          <table:previous table:id="ct244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8" table:acceptance-state="accepted">
          <table:cell-address table:column="9" table:row="206" table:table="0"/>
          <office:change-info>
            <dc:creator>Unknown Author</dc:creator>
            <dc:date>2026-06-12T06:33:10.717321300</dc:date>
          </office:change-info>
          <table:previous table:id="ct185">
            <table:change-track-table-cell office:value-type="string">
              <text:p>上田、伊藤</text:p>
            </table:change-track-table-cell>
          </table:previous>
        </table:cell-content-change>
        <table:cell-content-change table:id="ct309" table:acceptance-state="accepted">
          <table:cell-address table:column="9" table:row="207" table:table="0"/>
          <office:change-info>
            <dc:creator>Unknown Author</dc:creator>
            <dc:date>2026-06-12T06:33:10.7173404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0" table:acceptance-state="accepted">
          <table:cell-address table:column="9" table:row="208" table:table="0"/>
          <office:change-info>
            <dc:creator>Unknown Author</dc:creator>
            <dc:date>2026-06-12T06:33:10.717349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1" table:acceptance-state="accepted">
          <table:cell-address table:column="9" table:row="209" table:table="0"/>
          <office:change-info>
            <dc:creator>Unknown Author</dc:creator>
            <dc:date>2026-06-12T06:33:10.717352100</dc:date>
          </office:change-info>
          <table:previous table:id="ct186">
            <table:change-track-table-cell office:value-type="string">
              <text:p>上田</text:p>
            </table:change-track-table-cell>
          </table:previous>
        </table:cell-content-change>
        <table:cell-content-change table:id="ct312" table:acceptance-state="accepted">
          <table:cell-address table:column="9" table:row="210" table:table="0"/>
          <office:change-info>
            <dc:creator>Unknown Author</dc:creator>
            <dc:date>2026-06-12T06:33:10.717353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3" table:acceptance-state="accepted">
          <table:cell-address table:column="9" table:row="211" table:table="0"/>
          <office:change-info>
            <dc:creator>Unknown Author</dc:creator>
            <dc:date>2026-06-12T06:33:10.717355900</dc:date>
          </office:change-info>
          <table:previous table:id="ct217">
            <table:change-track-table-cell office:value-type="string">
              <text:p>全員</text:p>
            </table:change-track-table-cell>
          </table:previous>
        </table:cell-content-change>
        <table:cell-content-change table:id="ct314" table:acceptance-state="accepted">
          <table:cell-address table:column="9" table:row="198" table:table="0"/>
          <office:change-info>
            <dc:creator>Unknown Author</dc:creator>
            <dc:date>2026-06-12T06:33:27.545094800</dc:date>
          </office:change-info>
          <table:previous table:id="ct243">
            <table:change-track-table-cell office:value-type="string">
              <text:p>伊藤、上田</text:p>
            </table:change-track-table-cell>
          </table:previous>
        </table:cell-content-change>
        <table:cell-content-change table:id="ct315" table:acceptance-state="accepted">
          <table:cell-address table:column="9" table:row="195" table:table="0"/>
          <office:change-info>
            <dc:creator>Unknown Author</dc:creator>
            <dc:date>2026-06-12T06:33:39.359703600</dc:date>
          </office:change-info>
          <table:previous table:id="ct150"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316" table:acceptance-state="accepted">
          <table:cell-address table:column="16" table:row="253" table:table="0"/>
          <office:change-info>
            <dc:creator>Unknown Author</dc:creator>
            <dc:date>2026-06-12T06:34:02.756738800</dc:date>
          </office:change-info>
          <table:previous>
            <table:change-track-table-cell office:value-type="float" office:value="0"/>
          </table:previous>
        </table:cell-content-change>
        <table:cell-content-change table:id="ct317" table:acceptance-state="accepted">
          <table:cell-address table:column="16" table:row="195" table:table="0"/>
          <office:change-info>
            <dc:creator>Unknown Author</dc:creator>
            <dc:date>2026-06-15T06:27:45.278599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16" table:row="198" table:table="0"/>
          <office:change-info>
            <dc:creator>Unknown Author</dc:creator>
            <dc:date>2026-06-15T06:27:45.2790421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16" table:row="206" table:table="0"/>
          <office:change-info>
            <dc:creator>Unknown Author</dc:creator>
            <dc:date>2026-06-15T06:27:45.279088900</dc:date>
          </office:change-info>
          <table:previous>
            <table:change-track-table-cell/>
          </table:previous>
        </table:cell-content-change>
        <table:cell-content-change table:id="ct320" table:acceptance-state="accepted">
          <table:cell-address table:column="13" table:row="270" table:table="0"/>
          <office:change-info>
            <dc:creator>Unknown Author</dc:creator>
            <dc:date>2026-06-15T06:28:16.111582200</dc:date>
          </office:change-info>
          <table:previous>
            <table:change-track-table-cell office:value-type="float" office:value="46197"/>
          </table:previous>
        </table:cell-content-change>
        <table:cell-content-change table:id="ct321" table:acceptance-state="accepted">
          <table:cell-address table:column="13" table:row="216" table:table="0"/>
          <office:change-info>
            <dc:creator>Unknown Author</dc:creator>
            <dc:date>2026-06-15T06:30:14.343355800</dc:date>
          </office:change-info>
          <table:previous>
            <table:change-track-table-cell office:value-type="float" office:value="265330"/>
          </table:previous>
        </table:cell-content-change>
        <table:cell-content-change table:id="ct322" table:acceptance-state="accepted">
          <table:cell-address table:column="14" table:row="213" table:table="0"/>
          <office:change-info>
            <dc:creator>Unknown Author</dc:creator>
            <dc:date>2026-06-15T06:31:10.253528900</dc:date>
          </office:change-info>
          <table:previous>
            <table:change-track-table-cell office:value-type="float" office:value="265330"/>
          </table:previous>
        </table:cell-content-change>
        <table:cell-content-change table:id="ct323" table:acceptance-state="accepted">
          <table:cell-address table:column="16" table:row="213" table:table="0"/>
          <office:change-info>
            <dc:creator>Unknown Author</dc:creator>
            <dc:date>2026-06-15T06:31:53.336596400</dc:date>
          </office:change-info>
          <table:previous>
            <table:change-track-table-cell office:value-type="float" office:value="100"/>
          </table:previous>
        </table:cell-content-change>
        <table:cell-content-change table:id="ct324" table:acceptance-state="accepted">
          <table:cell-address table:column="14" table:row="220" table:table="0"/>
          <office:change-info>
            <dc:creator>Unknown Author</dc:creator>
            <dc:date>2026-06-15T06:32:21.078405000</dc:date>
          </office:change-info>
          <table:previous>
            <table:change-track-table-cell/>
          </table:previous>
        </table:cell-content-change>
        <table:cell-content-change table:id="ct325" table:acceptance-state="accepted">
          <table:cell-address table:column="14" table:row="221" table:table="0"/>
          <office:change-info>
            <dc:creator>Unknown Author</dc:creator>
            <dc:date>2026-06-15T06:32:25.582351100</dc:date>
          </office:change-info>
          <table:previous>
            <table:change-track-table-cell/>
          </table:previous>
        </table:cell-content-change>
        <table:cell-content-change table:id="ct326" table:acceptance-state="accepted">
          <table:cell-address table:column="14" table:row="216" table:table="0"/>
          <office:change-info>
            <dc:creator>Unknown Author</dc:creator>
            <dc:date>2026-06-15T06:32:30.359058500</dc:date>
          </office:change-info>
          <table:previous>
            <table:change-track-table-cell/>
          </table:previous>
        </table:cell-content-change>
        <table:cell-content-change table:id="ct327">
          <table:cell-address table:column="16" table:row="152" table:table="0"/>
          <office:change-info>
            <dc:creator>Unknown Author</dc:creator>
            <dc:date>2026-06-15T06:41:47.884593200</dc:date>
          </office:change-info>
          <table:previous>
            <table:change-track-table-cell office:value-type="float" office:value="100"/>
          </table:previous>
        </table:cell-content-change>
        <table:cell-content-change table:id="ct328">
          <table:cell-address table:column="14" table:row="223" table:table="0"/>
          <office:change-info>
            <dc:creator>Unknown Author</dc:creator>
            <dc:date>2026-06-16T06:42:37.487203300</dc:date>
          </office:change-info>
          <table:previous>
            <table:change-track-table-cell office:value-type="float" office:value="265333"/>
          </table:previous>
        </table:cell-content-change>
        <table:cell-content-change table:id="ct329">
          <table:cell-address table:column="15" table:row="216" table:table="0"/>
          <office:change-info>
            <dc:creator>Unknown Author</dc:creator>
            <dc:date>2026-06-16T06:45:18.873827600</dc:date>
          </office:change-info>
          <table:previous>
            <table:change-track-table-cell/>
          </table:previous>
        </table:cell-content-change>
        <table:cell-content-change table:id="ct330">
          <table:cell-address table:column="15" table:row="217" table:table="0"/>
          <office:change-info>
            <dc:creator>Unknown Author</dc:creator>
            <dc:date>2026-06-16T06:45:21.011643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218" table:table="0"/>
          <office:change-info>
            <dc:creator>Unknown Author</dc:creator>
            <dc:date>2026-06-16T06:45:22.919032900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219" table:table="0"/>
          <office:change-info>
            <dc:creator>Unknown Author</dc:creator>
            <dc:date>2026-06-16T06:45:24.563238600</dc:date>
          </office:change-info>
          <table:previous>
            <table:change-track-table-cell/>
          </table:previous>
        </table:cell-content-change>
        <table:cell-content-change table:id="ct333">
          <table:cell-address table:column="15" table:row="220" table:table="0"/>
          <office:change-info>
            <dc:creator>Unknown Author</dc:creator>
            <dc:date>2026-06-16T06:45:26.1735698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5" table:row="221" table:table="0"/>
          <office:change-info>
            <dc:creator>Unknown Author</dc:creator>
            <dc:date>2026-06-16T06:45:27.7445377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5" table:row="222" table:table="0"/>
          <office:change-info>
            <dc:creator>Unknown Author</dc:creator>
            <dc:date>2026-06-16T06:45:29.678146900</dc:date>
          </office:change-info>
          <table:previous>
            <table:change-track-table-cell/>
          </table:previous>
        </table:cell-content-change>
        <table:cell-content-change table:id="ct336">
          <table:cell-address table:column="15" table:row="223" table:table="0"/>
          <office:change-info>
            <dc:creator>Unknown Author</dc:creator>
            <dc:date>2026-06-16T06:45:31.373985300</dc:date>
          </office:change-info>
          <table:previous>
            <table:change-track-table-cell/>
          </table:previous>
        </table:cell-content-change>
        <table:cell-content-change table:id="ct337">
          <table:cell-address table:column="15" table:row="224" table:table="0"/>
          <office:change-info>
            <dc:creator>Unknown Author</dc:creator>
            <dc:date>2026-06-16T06:45:34.116792500</dc:date>
          </office:change-info>
          <table:previous>
            <table:change-track-table-cell/>
          </table:previous>
        </table:cell-content-change>
        <table:cell-content-change table:id="ct338">
          <table:cell-address table:column="15" table:row="225" table:table="0"/>
          <office:change-info>
            <dc:creator>Unknown Author</dc:creator>
            <dc:date>2026-06-16T06:45:36.956464300</dc:date>
          </office:change-info>
          <table:previous>
            <table:change-track-table-cell/>
          </table:previous>
        </table:cell-content-change>
        <table:cell-content-change table:id="ct339">
          <table:cell-address table:column="15" table:row="219" table:table="0"/>
          <office:change-info>
            <dc:creator>Unknown Author</dc:creator>
            <dc:date>2026-06-16T06:46:59.718690000</dc:date>
          </office:change-info>
          <table:previous table:id="ct332">
            <table:change-track-table-cell office:value-type="float" office:value="1"/>
          </table:previous>
        </table:cell-content-change>
        <table:cell-content-change table:id="ct340">
          <table:cell-address table:column="15" table:row="220" table:table="0"/>
          <office:change-info>
            <dc:creator>Unknown Author</dc:creator>
            <dc:date>2026-06-16T06:46:59.718710800</dc:date>
          </office:change-info>
          <table:previous table:id="ct333">
            <table:change-track-table-cell office:value-type="float" office:value="1"/>
          </table:previous>
        </table:cell-content-change>
        <table:cell-content-change table:id="ct341">
          <table:cell-address table:column="15" table:row="221" table:table="0"/>
          <office:change-info>
            <dc:creator>Unknown Author</dc:creator>
            <dc:date>2026-06-16T06:46:59.718714200</dc:date>
          </office:change-info>
          <table:previous table:id="ct334">
            <table:change-track-table-cell office:value-type="float" office:value="1"/>
          </table:previous>
        </table:cell-content-change>
        <table:cell-content-change table:id="ct342">
          <table:cell-address table:column="15" table:row="222" table:table="0"/>
          <office:change-info>
            <dc:creator>Unknown Author</dc:creator>
            <dc:date>2026-06-16T06:46:59.718717300</dc:date>
          </office:change-info>
          <table:previous table:id="ct335">
            <table:change-track-table-cell office:value-type="float" office:value="1"/>
          </table:previous>
        </table:cell-content-change>
        <table:cell-content-change table:id="ct343">
          <table:cell-address table:column="15" table:row="223" table:table="0"/>
          <office:change-info>
            <dc:creator>Unknown Author</dc:creator>
            <dc:date>2026-06-16T06:46:59.718720600</dc:date>
          </office:change-info>
          <table:previous table:id="ct336">
            <table:change-track-table-cell office:value-type="float" office:value="1"/>
          </table:previous>
        </table:cell-content-change>
        <table:cell-content-change table:id="ct344">
          <table:cell-address table:column="15" table:row="224" table:table="0"/>
          <office:change-info>
            <dc:creator>Unknown Author</dc:creator>
            <dc:date>2026-06-16T06:46:59.718723300</dc:date>
          </office:change-info>
          <table:previous table:id="ct337">
            <table:change-track-table-cell office:value-type="float" office:value="1"/>
          </table:previous>
        </table:cell-content-change>
        <table:cell-content-change table:id="ct345">
          <table:cell-address table:column="15" table:row="225" table:table="0"/>
          <office:change-info>
            <dc:creator>Unknown Author</dc:creator>
            <dc:date>2026-06-16T06:46:59.718726500</dc:date>
          </office:change-info>
          <table:previous table:id="ct338">
            <table:change-track-table-cell office:value-type="float" office:value="1"/>
          </table:previous>
        </table:cell-content-change>
        <table:cell-content-change table:id="ct346">
          <table:cell-address table:column="14" table:row="224" table:table="0"/>
          <office:change-info>
            <dc:creator>Unknown Author</dc:creator>
            <dc:date>2026-06-16T06:50:11.120673900</dc:date>
          </office:change-info>
          <table:previous>
            <table:change-track-table-cell office:value-type="float" office:value="265333"/>
          </table:previous>
        </table:cell-content-change>
        <table:cell-content-change table:id="ct347">
          <table:cell-address table:column="16" table:row="217" table:table="0"/>
          <office:change-info>
            <dc:creator>Unknown Author</dc:creator>
            <dc:date>2026-06-16T06:50:29.290669200</dc:date>
          </office:change-info>
          <table:previous>
            <table:change-track-table-cell office:value-type="float" office:value="100"/>
          </table:previous>
        </table:cell-content-change>
        <table:cell-content-change table:id="ct348">
          <table:cell-address table:column="16" table:row="222" table:table="0"/>
          <office:change-info>
            <dc:creator>Unknown Author</dc:creator>
            <dc:date>2026-06-16T06:50:31.384478900</dc:date>
          </office:change-info>
          <table:previous>
            <table:change-track-table-cell office:value-type="float" office:value="100"/>
          </table:previous>
        </table:cell-content-change>
        <table:cell-content-change table:id="ct349">
          <table:cell-address table:column="16" table:row="224" table:table="0"/>
          <office:change-info>
            <dc:creator>Unknown Author</dc:creator>
            <dc:date>2026-06-16T06:50:33.253046000</dc:date>
          </office:change-info>
          <table:previous>
            <table:change-track-table-cell office:value-type="float" office:value="100"/>
          </table:previous>
        </table:cell-content-change>
        <table:cell-content-change table:id="ct350">
          <table:cell-address table:column="14" table:row="233" table:table="0"/>
          <office:change-info>
            <dc:creator>Unknown Author</dc:creator>
            <dc:date>2026-06-17T06:37:55.485343300</dc:date>
          </office:change-info>
          <table:previous>
            <table:change-track-table-cell/>
          </table:previous>
        </table:cell-content-change>
        <table:cell-content-change table:id="ct351">
          <table:cell-address table:column="13" table:row="236" table:table="0"/>
          <office:change-info>
            <dc:creator>Unknown Author</dc:creator>
            <dc:date>2026-06-17T06:38:36.841496100</dc:date>
          </office:change-info>
          <table:previous>
            <table:change-track-table-cell office:value-type="float" office:value="46192"/>
          </table:previous>
        </table:cell-content-change>
        <table:cell-content-change table:id="ct352">
          <table:cell-address table:column="14" table:row="236" table:table="0"/>
          <office:change-info>
            <dc:creator>Unknown Author</dc:creator>
            <dc:date>2026-06-17T06:39:17.647918200</dc:date>
          </office:change-info>
          <table:previous>
            <table:change-track-table-cell office:value-type="float" office:value="46190"/>
          </table:previous>
        </table:cell-content-change>
        <table:cell-content-change table:id="ct353">
          <table:cell-address table:column="16" table:row="231" table:table="0"/>
          <office:change-info>
            <dc:creator>Unknown Author</dc:creator>
            <dc:date>2026-06-17T06:40:12.960099800</dc:date>
          </office:change-info>
          <table:previous>
            <table:change-track-table-cell office:value-type="float" office:value="0"/>
          </table:previous>
        </table:cell-content-change>
        <table:cell-content-change table:id="ct354">
          <table:cell-address table:column="16" table:row="232" table:table="0"/>
          <office:change-info>
            <dc:creator>Unknown Author</dc:creator>
            <dc:date>2026-06-17T06:40:12.960124800</dc:date>
          </office:change-info>
          <table:previous>
            <table:change-track-table-cell office:value-type="float" office:value="0"/>
          </table:previous>
        </table:cell-content-change>
        <table:cell-content-change table:id="ct355">
          <table:cell-address table:column="16" table:row="233" table:table="0"/>
          <office:change-info>
            <dc:creator>Unknown Author</dc:creator>
            <dc:date>2026-06-17T06:40:12.960131300</dc:date>
          </office:change-info>
          <table:previous>
            <table:change-track-table-cell office:value-type="float" office:value="0"/>
          </table:previous>
        </table:cell-content-change>
        <table:cell-content-change table:id="ct356">
          <table:cell-address table:column="16" table:row="228" table:table="0"/>
          <office:change-info>
            <dc:creator>Unknown Author</dc:creator>
            <dc:date>2026-06-17T06:40:14.423526500</dc:date>
          </office:change-info>
          <table:previous>
            <table:change-track-table-cell office:value-type="float" office:value="0"/>
          </table:previous>
        </table:cell-content-change>
        <table:cell-content-change table:id="ct357">
          <table:cell-address table:column="14" table:row="224" table:table="0"/>
          <office:change-info>
            <dc:creator>Unknown Author</dc:creator>
            <dc:date>2026-06-17T06:41:48.057752000</dc:date>
          </office:change-info>
          <table:previous table:id="ct346">
            <table:change-track-table-cell office:value-type="float" office:value="265333"/>
          </table:previous>
        </table:cell-content-change>
        <table:cell-content-change table:id="ct358">
          <table:cell-address table:column="14" table:row="217" table:table="0"/>
          <office:change-info>
            <dc:creator>Unknown Author</dc:creator>
            <dc:date>2026-06-17T06:42:07.940849600</dc:date>
          </office:change-info>
          <table:previous>
            <table:change-track-table-cell office:value-type="float" office:value="265333"/>
          </table:previous>
        </table:cell-content-change>
        <table:insertion table:id="ct359" table:type="row" table:position="247" table:count="15" table:table="0">
          <office:change-info>
            <dc:creator>Unknown Author</dc:creator>
            <dc:date>2026-06-17T06:48:59.051433000</dc:date>
          </office:change-info>
          <table:dependencies>
            <table:dependency table:id="ct721"/>
            <table:dependency table:id="ct636"/>
            <table:dependency table:id="ct618"/>
            <table:dependency table:id="ct617"/>
            <table:dependency table:id="ct616"/>
            <table:dependency table:id="ct615"/>
            <table:dependency table:id="ct614"/>
            <table:dependency table:id="ct613"/>
            <table:dependency table:id="ct612"/>
            <table:dependency table:id="ct611"/>
            <table:dependency table:id="ct610"/>
            <table:dependency table:id="ct609"/>
            <table:dependency table:id="ct608"/>
            <table:dependency table:id="ct607"/>
            <table:dependency table:id="ct606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</table:dependencies>
        </table:insertion>
        <table:movement table:id="ct360">
          <table:source-range-address table:start-column="3" table:start-row="227" table:start-table="0" table:end-column="17" table:end-row="226" table:end-table="0"/>
          <table:target-range-address table:start-column="3" table:start-row="248" table:start-table="0" table:end-column="17" table:end-row="260" table:end-table="0"/>
          <office:change-info>
            <dc:creator>Unknown Author</dc:creator>
            <dc:date>2026-06-17T06:49:23.078314800</dc:date>
          </office:change-info>
          <table:dependencies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</table:dependencies>
        </table:movement>
        <table:deletion table:id="ct361" table:type="row" table:position="267" table:table="0" table:multi-deletion-spanned="7">
          <office:change-info>
            <dc:creator>Unknown Author</dc:creator>
            <dc:date>2026-06-17T06:49:34.606749800</dc:date>
          </office:change-info>
          <table:deletions>
            <table:change-deletion table:id="ct704"/>
            <table:change-deletion table:id="ct701"/>
          </table:deletions>
        </table:deletion>
        <table:deletion table:id="ct362" table:type="row" table:position="267" table:table="0">
          <office:change-info>
            <dc:creator>Unknown Author</dc:creator>
            <dc:date>2026-06-17T06:49:34.606842400</dc:date>
          </office:change-info>
          <table:deletions>
            <table:change-deletion table:id="ct361"/>
          </table:deletions>
        </table:deletion>
        <table:deletion table:id="ct363" table:type="row" table:position="267" table:table="0">
          <office:change-info>
            <dc:creator>Unknown Author</dc:creator>
            <dc:date>2026-06-17T06:49:34.606871900</dc:date>
          </office:change-info>
          <table:deletions>
            <table:change-deletion table:id="ct362"/>
          </table:deletions>
        </table:deletion>
        <table:deletion table:id="ct364" table:type="row" table:position="267" table:table="0">
          <office:change-info>
            <dc:creator>Unknown Author</dc:creator>
            <dc:date>2026-06-17T06:49:34.606898900</dc:date>
          </office:change-info>
          <table:deletions>
            <table:change-deletion table:id="ct363"/>
          </table:deletions>
        </table:deletion>
        <table:deletion table:id="ct365" table:type="row" table:position="267" table:table="0">
          <office:change-info>
            <dc:creator>Unknown Author</dc:creator>
            <dc:date>2026-06-17T06:49:34.606926300</dc:date>
          </office:change-info>
          <table:deletions>
            <table:change-deletion table:id="ct364"/>
          </table:deletions>
        </table:deletion>
        <table:deletion table:id="ct366" table:type="row" table:position="267" table:table="0">
          <office:change-info>
            <dc:creator>Unknown Author</dc:creator>
            <dc:date>2026-06-17T06:49:34.606953000</dc:date>
          </office:change-info>
          <table:deletions>
            <table:change-deletion table:id="ct365"/>
          </table:deletions>
        </table:deletion>
        <table:deletion table:id="ct367" table:type="row" table:position="267" table:table="0">
          <office:change-info>
            <dc:creator>Unknown Author</dc:creator>
            <dc:date>2026-06-17T06:49:34.606979700</dc:date>
          </office:change-info>
          <table:deletions>
            <table:change-deletion table:id="ct366"/>
          </table:deletions>
        </table:deletion>
        <table:deletion table:id="ct368" table:type="row" table:position="267" table:table="0">
          <office:change-info>
            <dc:creator>Unknown Author</dc:creator>
            <dc:date>2026-06-17T06:49:39.957452800</dc:date>
          </office:change-info>
          <table:deletions>
            <table:change-deletion table:id="ct367"/>
          </table:deletions>
          <table:cut-offs>
            <table:insertion-cut-off table:id="ct359" table:position="-1"/>
          </table:cut-offs>
        </table:deletion>
        <table:cell-content-change table:id="ct369">
          <table:cell-address table:column="2" table:row="247" table:table="0"/>
          <office:change-info>
            <dc:creator>Unknown Author</dc:creator>
            <dc:date>2026-06-17T06:49:52.799141900</dc:date>
          </office:change-info>
          <table:previous>
            <table:change-track-table-cell/>
          </table:previous>
        </table:cell-content-change>
        <table:cell-content-change table:id="ct370">
          <table:cell-address table:column="2" table:row="248" table:table="0"/>
          <office:change-info>
            <dc:creator>Unknown Author</dc:creator>
            <dc:date>2026-06-17T06:49:52.799165400</dc:date>
          </office:change-info>
          <table:previous>
            <table:change-track-table-cell/>
          </table:previous>
        </table:cell-content-change>
        <table:cell-content-change table:id="ct371">
          <table:cell-address table:column="2" table:row="249" table:table="0"/>
          <office:change-info>
            <dc:creator>Unknown Author</dc:creator>
            <dc:date>2026-06-17T06:49:52.799175900</dc:date>
          </office:change-info>
          <table:previous>
            <table:change-track-table-cell/>
          </table:previous>
        </table:cell-content-change>
        <table:cell-content-change table:id="ct372">
          <table:cell-address table:column="2" table:row="250" table:table="0"/>
          <office:change-info>
            <dc:creator>Unknown Author</dc:creator>
            <dc:date>2026-06-17T06:49:52.799186600</dc:date>
          </office:change-info>
          <table:previous>
            <table:change-track-table-cell/>
          </table:previous>
        </table:cell-content-change>
        <table:cell-content-change table:id="ct373">
          <table:cell-address table:column="2" table:row="251" table:table="0"/>
          <office:change-info>
            <dc:creator>Unknown Author</dc:creator>
            <dc:date>2026-06-17T06:49:52.799197300</dc:date>
          </office:change-info>
          <table:previous>
            <table:change-track-table-cell/>
          </table:previous>
        </table:cell-content-change>
        <table:cell-content-change table:id="ct374">
          <table:cell-address table:column="2" table:row="252" table:table="0"/>
          <office:change-info>
            <dc:creator>Unknown Author</dc:creator>
            <dc:date>2026-06-17T06:49:52.799206300</dc:date>
          </office:change-info>
          <table:previous>
            <table:change-track-table-cell/>
          </table:previous>
        </table:cell-content-change>
        <table:cell-content-change table:id="ct375">
          <table:cell-address table:column="2" table:row="253" table:table="0"/>
          <office:change-info>
            <dc:creator>Unknown Author</dc:creator>
            <dc:date>2026-06-17T06:49:52.799215100</dc:date>
          </office:change-info>
          <table:previous>
            <table:change-track-table-cell/>
          </table:previous>
        </table:cell-content-change>
        <table:cell-content-change table:id="ct376">
          <table:cell-address table:column="2" table:row="254" table:table="0"/>
          <office:change-info>
            <dc:creator>Unknown Author</dc:creator>
            <dc:date>2026-06-17T06:49:52.799224100</dc:date>
          </office:change-info>
          <table:previous>
            <table:change-track-table-cell/>
          </table:previous>
        </table:cell-content-change>
        <table:cell-content-change table:id="ct377">
          <table:cell-address table:column="2" table:row="255" table:table="0"/>
          <office:change-info>
            <dc:creator>Unknown Author</dc:creator>
            <dc:date>2026-06-17T06:49:52.799233500</dc:date>
          </office:change-info>
          <table:previous>
            <table:change-track-table-cell/>
          </table:previous>
        </table:cell-content-change>
        <table:cell-content-change table:id="ct378">
          <table:cell-address table:column="2" table:row="256" table:table="0"/>
          <office:change-info>
            <dc:creator>Unknown Author</dc:creator>
            <dc:date>2026-06-17T06:49:52.799242400</dc:date>
          </office:change-info>
          <table:previous>
            <table:change-track-table-cell/>
          </table:previous>
        </table:cell-content-change>
        <table:cell-content-change table:id="ct379">
          <table:cell-address table:column="2" table:row="257" table:table="0"/>
          <office:change-info>
            <dc:creator>Unknown Author</dc:creator>
            <dc:date>2026-06-17T06:49:52.799250900</dc:date>
          </office:change-info>
          <table:previous>
            <table:change-track-table-cell/>
          </table:previous>
        </table:cell-content-change>
        <table:cell-content-change table:id="ct380">
          <table:cell-address table:column="2" table:row="258" table:table="0"/>
          <office:change-info>
            <dc:creator>Unknown Author</dc:creator>
            <dc:date>2026-06-17T06:49:52.799263600</dc:date>
          </office:change-info>
          <table:previous>
            <table:change-track-table-cell/>
          </table:previous>
        </table:cell-content-change>
        <table:cell-content-change table:id="ct381">
          <table:cell-address table:column="2" table:row="259" table:table="0"/>
          <office:change-info>
            <dc:creator>Unknown Author</dc:creator>
            <dc:date>2026-06-17T06:49:52.799271500</dc:date>
          </office:change-info>
          <table:previous>
            <table:change-track-table-cell/>
          </table:previous>
        </table:cell-content-change>
        <table:cell-content-change table:id="ct382">
          <table:cell-address table:column="2" table:row="260" table:table="0"/>
          <office:change-info>
            <dc:creator>Unknown Author</dc:creator>
            <dc:date>2026-06-17T06:49:52.799279500</dc:date>
          </office:change-info>
          <table:previous>
            <table:change-track-table-cell/>
          </table:previous>
        </table:cell-content-change>
        <table:cell-content-change table:id="ct383">
          <table:cell-address table:column="2" table:row="261" table:table="0"/>
          <office:change-info>
            <dc:creator>Unknown Author</dc:creator>
            <dc:date>2026-06-17T06:49:52.799287500</dc:date>
          </office:change-info>
          <table:previous>
            <table:change-track-table-cell/>
          </table:previous>
        </table:cell-content-change>
        <table:cell-content-change table:id="ct384">
          <table:cell-address table:column="2" table:row="267" table:table="0"/>
          <office:change-info>
            <dc:creator>Unknown Author</dc:creator>
            <dc:date>2026-06-17T06:49:52.799300200</dc:date>
          </office:change-info>
          <table:previous>
            <table:change-track-table-cell table:cell-address="WBS.C268" table:formula="of:=IF(AND([.$D268]&lt;&gt;&quot;&quot;;[.$D268]&lt;&gt;&quot;○&quot;);MAX([.$C$3:.$C247])+1;[.$C247])" office:value-type="float" office:value="12"/>
          </table:previous>
        </table:cell-content-change>
        <table:cell-content-change table:id="ct385">
          <table:cell-address table:column="1" table:row="247" table:table="0"/>
          <office:change-info>
            <dc:creator>Unknown Author</dc:creator>
            <dc:date>2026-06-17T06:50:02.364509100</dc:date>
          </office:change-info>
          <table:previous>
            <table:change-track-table-cell/>
          </table:previous>
        </table:cell-content-change>
        <table:cell-content-change table:id="ct386">
          <table:cell-address table:column="1" table:row="248" table:table="0"/>
          <office:change-info>
            <dc:creator>Unknown Author</dc:creator>
            <dc:date>2026-06-17T06:50:02.364532400</dc:date>
          </office:change-info>
          <table:previous>
            <table:change-track-table-cell/>
          </table:previous>
        </table:cell-content-change>
        <table:cell-content-change table:id="ct387">
          <table:cell-address table:column="1" table:row="249" table:table="0"/>
          <office:change-info>
            <dc:creator>Unknown Author</dc:creator>
            <dc:date>2026-06-17T06:50:02.364541200</dc:date>
          </office:change-info>
          <table:previous>
            <table:change-track-table-cell/>
          </table:previous>
        </table:cell-content-change>
        <table:cell-content-change table:id="ct388">
          <table:cell-address table:column="1" table:row="250" table:table="0"/>
          <office:change-info>
            <dc:creator>Unknown Author</dc:creator>
            <dc:date>2026-06-17T06:50:02.364550100</dc:date>
          </office:change-info>
          <table:previous>
            <table:change-track-table-cell/>
          </table:previous>
        </table:cell-content-change>
        <table:cell-content-change table:id="ct389">
          <table:cell-address table:column="1" table:row="251" table:table="0"/>
          <office:change-info>
            <dc:creator>Unknown Author</dc:creator>
            <dc:date>2026-06-17T06:50:02.364558800</dc:date>
          </office:change-info>
          <table:previous>
            <table:change-track-table-cell/>
          </table:previous>
        </table:cell-content-change>
        <table:cell-content-change table:id="ct390">
          <table:cell-address table:column="1" table:row="252" table:table="0"/>
          <office:change-info>
            <dc:creator>Unknown Author</dc:creator>
            <dc:date>2026-06-17T06:50:02.364566700</dc:date>
          </office:change-info>
          <table:previous>
            <table:change-track-table-cell/>
          </table:previous>
        </table:cell-content-change>
        <table:cell-content-change table:id="ct391">
          <table:cell-address table:column="1" table:row="253" table:table="0"/>
          <office:change-info>
            <dc:creator>Unknown Author</dc:creator>
            <dc:date>2026-06-17T06:50:02.364575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1" table:row="254" table:table="0"/>
          <office:change-info>
            <dc:creator>Unknown Author</dc:creator>
            <dc:date>2026-06-17T06:50:02.364583000</dc:date>
          </office:change-info>
          <table:previous>
            <table:change-track-table-cell/>
          </table:previous>
        </table:cell-content-change>
        <table:cell-content-change table:id="ct393">
          <table:cell-address table:column="1" table:row="255" table:table="0"/>
          <office:change-info>
            <dc:creator>Unknown Author</dc:creator>
            <dc:date>2026-06-17T06:50:02.364591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1" table:row="256" table:table="0"/>
          <office:change-info>
            <dc:creator>Unknown Author</dc:creator>
            <dc:date>2026-06-17T06:50:02.364599300</dc:date>
          </office:change-info>
          <table:previous>
            <table:change-track-table-cell/>
          </table:previous>
        </table:cell-content-change>
        <table:cell-content-change table:id="ct395">
          <table:cell-address table:column="1" table:row="257" table:table="0"/>
          <office:change-info>
            <dc:creator>Unknown Author</dc:creator>
            <dc:date>2026-06-17T06:50:02.364607500</dc:date>
          </office:change-info>
          <table:previous>
            <table:change-track-table-cell/>
          </table:previous>
        </table:cell-content-change>
        <table:cell-content-change table:id="ct396">
          <table:cell-address table:column="1" table:row="258" table:table="0"/>
          <office:change-info>
            <dc:creator>Unknown Author</dc:creator>
            <dc:date>2026-06-17T06:50:02.364615800</dc:date>
          </office:change-info>
          <table:previous>
            <table:change-track-table-cell/>
          </table:previous>
        </table:cell-content-change>
        <table:cell-content-change table:id="ct397">
          <table:cell-address table:column="1" table:row="259" table:table="0"/>
          <office:change-info>
            <dc:creator>Unknown Author</dc:creator>
            <dc:date>2026-06-17T06:50:02.364624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1" table:row="260" table:table="0"/>
          <office:change-info>
            <dc:creator>Unknown Author</dc:creator>
            <dc:date>2026-06-17T06:50:02.364632100</dc:date>
          </office:change-info>
          <table:previous>
            <table:change-track-table-cell/>
          </table:previous>
        </table:cell-content-change>
        <table:cell-content-change table:id="ct399">
          <table:cell-address table:column="1" table:row="261" table:table="0"/>
          <office:change-info>
            <dc:creator>Unknown Author</dc:creator>
            <dc:date>2026-06-17T06:50:02.364641300</dc:date>
          </office:change-info>
          <table:previous>
            <table:change-track-table-cell/>
          </table:previous>
        </table:cell-content-change>
        <table:cell-content-change table:id="ct400">
          <table:cell-address table:column="1" table:row="267" table:table="0"/>
          <office:change-info>
            <dc:creator>Unknown Author</dc:creator>
            <dc:date>2026-06-17T06:50:02.364656600</dc:date>
          </office:change-info>
          <table:previous>
            <table:change-track-table-cell table:cell-address="WBS.B268" table:formula="of:=IF(AND([.$D268]&lt;&gt;&quot;&quot;;[.$F268]=&quot;&quot;);&quot;E&quot;&amp;ROW();[.$B171])" office:value-type="string">
              <text:p>E263</text:p>
            </table:change-track-table-cell>
          </table:previous>
        </table:cell-content-change>
        <table:cell-content-change table:id="ct401">
          <table:cell-address table:column="1" table:row="267" table:table="0"/>
          <office:change-info>
            <dc:creator>Unknown Author</dc:creator>
            <dc:date>2026-06-17T06:50:02.364670000</dc:date>
          </office:change-info>
          <table:previous>
            <table:change-track-table-cell table:cell-address="WBS.B268" table:formula="of:=IF(AND([.$D268]&lt;&gt;&quot;&quot;;[.$F268]=&quot;&quot;);&quot;E&quot;&amp;ROW();[.$B172])" office:value-type="string">
              <text:p>E263</text:p>
            </table:change-track-table-cell>
          </table:previous>
        </table:cell-content-change>
        <table:cell-content-change table:id="ct402">
          <table:cell-address table:column="1" table:row="268" table:table="0"/>
          <office:change-info>
            <dc:creator>Unknown Author</dc:creator>
            <dc:date>2026-06-17T06:50:02.364682400</dc:date>
          </office:change-info>
          <table:previous>
            <table:change-track-table-cell table:cell-address="WBS.B269" table:formula="of:=IF(AND([.$D269]&lt;&gt;&quot;&quot;;[.$F269]=&quot;&quot;);&quot;E&quot;&amp;ROW();[.$B173])" office:value-type="string">
              <text:p>E147</text:p>
            </table:change-track-table-cell>
          </table:previous>
        </table:cell-content-change>
        <table:cell-content-change table:id="ct403">
          <table:cell-address table:column="1" table:row="269" table:table="0"/>
          <office:change-info>
            <dc:creator>Unknown Author</dc:creator>
            <dc:date>2026-06-17T06:50:02.364694900</dc:date>
          </office:change-info>
          <table:previous>
            <table:change-track-table-cell table:cell-address="WBS.B270" table:formula="of:=IF(AND([.$D270]&lt;&gt;&quot;&quot;;[.$F270]=&quot;&quot;);&quot;E&quot;&amp;ROW();[.$B174])" office:value-type="string">
              <text:p>E147</text:p>
            </table:change-track-table-cell>
          </table:previous>
        </table:cell-content-change>
        <table:cell-content-change table:id="ct404">
          <table:cell-address table:column="1" table:row="270" table:table="0"/>
          <office:change-info>
            <dc:creator>Unknown Author</dc:creator>
            <dc:date>2026-06-17T06:50:02.364707100</dc:date>
          </office:change-info>
          <table:previous>
            <table:change-track-table-cell table:cell-address="WBS.B271" table:formula="of:=IF(AND([.$D271]&lt;&gt;&quot;&quot;;[.$F271]=&quot;&quot;);&quot;E&quot;&amp;ROW();[.$B175])" office:value-type="string">
              <text:p>E147</text:p>
            </table:change-track-table-cell>
          </table:previous>
        </table:cell-content-change>
        <table:cell-content-change table:id="ct405">
          <table:cell-address table:column="1" table:row="271" table:table="0"/>
          <office:change-info>
            <dc:creator>Unknown Author</dc:creator>
            <dc:date>2026-06-17T06:50:02.364719700</dc:date>
          </office:change-info>
          <table:previous>
            <table:change-track-table-cell table:cell-address="WBS.B272" table:formula="of:=IF(AND([.$D272]&lt;&gt;&quot;&quot;;[.$F272]=&quot;&quot;);&quot;E&quot;&amp;ROW();[.$B176])" office:value-type="string">
              <text:p>E147</text:p>
            </table:change-track-table-cell>
          </table:previous>
        </table:cell-content-change>
        <table:cell-content-change table:id="ct406">
          <table:cell-address table:column="1" table:row="272" table:table="0"/>
          <office:change-info>
            <dc:creator>Unknown Author</dc:creator>
            <dc:date>2026-06-17T06:50:02.364733200</dc:date>
          </office:change-info>
          <table:previous>
            <table:change-track-table-cell table:cell-address="WBS.B273" table:formula="of:=IF(AND([.$D273]&lt;&gt;&quot;&quot;;[.$F273]=&quot;&quot;);&quot;E&quot;&amp;ROW();[.$B177])" office:value-type="string">
              <text:p>E147</text:p>
            </table:change-track-table-cell>
          </table:previous>
        </table:cell-content-change>
        <table:cell-content-change table:id="ct407">
          <table:cell-address table:column="1" table:row="273" table:table="0"/>
          <office:change-info>
            <dc:creator>Unknown Author</dc:creator>
            <dc:date>2026-06-17T06:50:02.364746000</dc:date>
          </office:change-info>
          <table:previous>
            <table:change-track-table-cell table:cell-address="WBS.B274" table:formula="of:=IF(AND([.$D274]&lt;&gt;&quot;&quot;;[.$F274]=&quot;&quot;);&quot;E&quot;&amp;ROW();[.$B178])" office:value-type="string">
              <text:p>E147</text:p>
            </table:change-track-table-cell>
          </table:previous>
        </table:cell-content-change>
        <table:cell-content-change table:id="ct408">
          <table:cell-address table:column="1" table:row="274" table:table="0"/>
          <office:change-info>
            <dc:creator>Unknown Author</dc:creator>
            <dc:date>2026-06-17T06:50:02.364758300</dc:date>
          </office:change-info>
          <table:previous>
            <table:change-track-table-cell table:cell-address="WBS.B275" table:formula="of:=IF(AND([.$D275]&lt;&gt;&quot;&quot;;[.$F275]=&quot;&quot;);&quot;E&quot;&amp;ROW();[.$B179])" office:value-type="string">
              <text:p>E147</text:p>
            </table:change-track-table-cell>
          </table:previous>
        </table:cell-content-change>
        <table:cell-content-change table:id="ct409">
          <table:cell-address table:column="1" table:row="276" table:table="0"/>
          <office:change-info>
            <dc:creator>Unknown Author</dc:creator>
            <dc:date>2026-06-17T06:50:02.364771500</dc:date>
          </office:change-info>
          <table:previous>
            <table:change-track-table-cell table:cell-address="WBS.B277" table:formula="of:=IF(AND([.$D277]&lt;&gt;&quot;&quot;;[.$F277]=&quot;&quot;);&quot;E&quot;&amp;ROW();[.$B180])" office:value-type="string">
              <text:p>E147</text:p>
            </table:change-track-table-cell>
          </table:previous>
        </table:cell-content-change>
        <table:cell-content-change table:id="ct410">
          <table:cell-address table:column="1" table:row="277" table:table="0"/>
          <office:change-info>
            <dc:creator>Unknown Author</dc:creator>
            <dc:date>2026-06-17T06:50:02.364785000</dc:date>
          </office:change-info>
          <table:previous>
            <table:change-track-table-cell table:cell-address="WBS.B278" table:formula="of:=IF(AND([.$D278]&lt;&gt;&quot;&quot;;[.$F278]=&quot;&quot;);&quot;E&quot;&amp;ROW();[.$B180])" office:value-type="string">
              <text:p>E147</text:p>
            </table:change-track-table-cell>
          </table:previous>
        </table:cell-content-change>
        <table:cell-content-change table:id="ct411">
          <table:cell-address table:column="1" table:row="278" table:table="0"/>
          <office:change-info>
            <dc:creator>Unknown Author</dc:creator>
            <dc:date>2026-06-17T06:50:02.364799300</dc:date>
          </office:change-info>
          <table:previous>
            <table:change-track-table-cell table:cell-address="WBS.B279" table:formula="of:=IF(AND([.$D279]&lt;&gt;&quot;&quot;;[.$D279]=&quot;&quot;);&quot;E&quot;&amp;ROW();[.$B181])" office:value-type="string">
              <text:p>E147</text:p>
            </table:change-track-table-cell>
          </table:previous>
        </table:cell-content-change>
        <table:cell-content-change table:id="ct412">
          <table:cell-address table:column="1" table:row="279" table:table="0"/>
          <office:change-info>
            <dc:creator>Unknown Author</dc:creator>
            <dc:date>2026-06-17T06:50:02.364812500</dc:date>
          </office:change-info>
          <table:previous>
            <table:change-track-table-cell table:cell-address="WBS.B280" table:formula="of:=IF(AND([.$D280]&lt;&gt;&quot;&quot;;[.$F280]=&quot;&quot;);&quot;E&quot;&amp;ROW();[.$B182])" office:value-type="string">
              <text:p>E147</text:p>
            </table:change-track-table-cell>
          </table:previous>
        </table:cell-content-change>
        <table:cell-content-change table:id="ct413">
          <table:cell-address table:column="1" table:row="280" table:table="0"/>
          <office:change-info>
            <dc:creator>Unknown Author</dc:creator>
            <dc:date>2026-06-17T06:50:02.364825300</dc:date>
          </office:change-info>
          <table:previous>
            <table:change-track-table-cell table:cell-address="WBS.B281" table:formula="of:=IF(AND([.$D281]&lt;&gt;&quot;&quot;;[.$F281]=&quot;&quot;);&quot;E&quot;&amp;ROW();[.$B183])" office:value-type="string">
              <text:p>E147</text:p>
            </table:change-track-table-cell>
          </table:previous>
        </table:cell-content-change>
        <table:cell-content-change table:id="ct414">
          <table:cell-address table:column="1" table:row="281" table:table="0"/>
          <office:change-info>
            <dc:creator>Unknown Author</dc:creator>
            <dc:date>2026-06-17T06:50:02.364837700</dc:date>
          </office:change-info>
          <table:previous>
            <table:change-track-table-cell table:cell-address="WBS.B282" table:formula="of:=IF(AND([.$D282]&lt;&gt;&quot;&quot;;[.$F282]=&quot;&quot;);&quot;E&quot;&amp;ROW();[.$B184])" office:value-type="string">
              <text:p>E147</text:p>
            </table:change-track-table-cell>
          </table:previous>
        </table:cell-content-change>
        <table:cell-content-change table:id="ct415">
          <table:cell-address table:column="1" table:row="282" table:table="0"/>
          <office:change-info>
            <dc:creator>Unknown Author</dc:creator>
            <dc:date>2026-06-17T06:50:02.364850400</dc:date>
          </office:change-info>
          <table:previous>
            <table:change-track-table-cell table:cell-address="WBS.B283" table:formula="of:=IF(AND([.$D283]&lt;&gt;&quot;&quot;;[.$F283]=&quot;&quot;);&quot;E&quot;&amp;ROW();[.$B185])" office:value-type="string">
              <text:p>E147</text:p>
            </table:change-track-table-cell>
          </table:previous>
        </table:cell-content-change>
        <table:cell-content-change table:id="ct416">
          <table:cell-address table:column="1" table:row="283" table:table="0"/>
          <office:change-info>
            <dc:creator>Unknown Author</dc:creator>
            <dc:date>2026-06-17T06:50:02.364862800</dc:date>
          </office:change-info>
          <table:previous>
            <table:change-track-table-cell table:cell-address="WBS.B284" table:formula="of:=IF(AND([.$D284]&lt;&gt;&quot;&quot;;[.$F284]=&quot;&quot;);&quot;E&quot;&amp;ROW();[.$B186])" office:value-type="string">
              <text:p>E147</text:p>
            </table:change-track-table-cell>
          </table:previous>
        </table:cell-content-change>
        <table:cell-content-change table:id="ct417">
          <table:cell-address table:column="1" table:row="284" table:table="0"/>
          <office:change-info>
            <dc:creator>Unknown Author</dc:creator>
            <dc:date>2026-06-17T06:50:02.364875700</dc:date>
          </office:change-info>
          <table:previous>
            <table:change-track-table-cell table:cell-address="WBS.B285" table:formula="of:=IF(AND([.$D285]&lt;&gt;&quot;&quot;;[.$F285]=&quot;&quot;);&quot;E&quot;&amp;ROW();[.$B187])" office:value-type="string">
              <text:p>E147</text:p>
            </table:change-track-table-cell>
          </table:previous>
        </table:cell-content-change>
        <table:cell-content-change table:id="ct418">
          <table:cell-address table:column="1" table:row="285" table:table="0"/>
          <office:change-info>
            <dc:creator>Unknown Author</dc:creator>
            <dc:date>2026-06-17T06:50:02.364888200</dc:date>
          </office:change-info>
          <table:previous>
            <table:change-track-table-cell table:cell-address="WBS.B286" table:formula="of:=IF(AND([.$D286]&lt;&gt;&quot;&quot;;[.$F286]=&quot;&quot;);&quot;E&quot;&amp;ROW();[.$B188])" office:value-type="string">
              <text:p>E147</text:p>
            </table:change-track-table-cell>
          </table:previous>
        </table:cell-content-change>
        <table:cell-content-change table:id="ct419">
          <table:cell-address table:column="1" table:row="286" table:table="0"/>
          <office:change-info>
            <dc:creator>Unknown Author</dc:creator>
            <dc:date>2026-06-17T06:50:02.364900900</dc:date>
          </office:change-info>
          <table:previous>
            <table:change-track-table-cell table:cell-address="WBS.B287" table:formula="of:=IF(AND([.$D287]&lt;&gt;&quot;&quot;;[.$F287]=&quot;&quot;);&quot;E&quot;&amp;ROW();[.$B189])" office:value-type="string">
              <text:p>E85</text:p>
            </table:change-track-table-cell>
          </table:previous>
        </table:cell-content-change>
        <table:cell-content-change table:id="ct420">
          <table:cell-address table:column="1" table:row="287" table:table="0"/>
          <office:change-info>
            <dc:creator>Unknown Author</dc:creator>
            <dc:date>2026-06-17T06:50:02.364913400</dc:date>
          </office:change-info>
          <table:previous>
            <table:change-track-table-cell table:cell-address="WBS.B288" table:formula="of:=IF(AND([.$D288]&lt;&gt;&quot;&quot;;[.$F288]=&quot;&quot;);&quot;E&quot;&amp;ROW();[.$B190])" office:value-type="string">
              <text:p>E85</text:p>
            </table:change-track-table-cell>
          </table:previous>
        </table:cell-content-change>
        <table:cell-content-change table:id="ct421">
          <table:cell-address table:column="1" table:row="288" table:table="0"/>
          <office:change-info>
            <dc:creator>Unknown Author</dc:creator>
            <dc:date>2026-06-17T06:50:02.364926700</dc:date>
          </office:change-info>
          <table:previous>
            <table:change-track-table-cell table:cell-address="WBS.B289" table:formula="of:=IF(AND([.$D289]&lt;&gt;&quot;&quot;;[.$F289]=&quot;&quot;);&quot;E&quot;&amp;ROW();[.$B191])" office:value-type="string">
              <text:p>E85</text:p>
            </table:change-track-table-cell>
          </table:previous>
        </table:cell-content-change>
        <table:cell-content-change table:id="ct422">
          <table:cell-address table:column="1" table:row="289" table:table="0"/>
          <office:change-info>
            <dc:creator>Unknown Author</dc:creator>
            <dc:date>2026-06-17T06:50:02.364938800</dc:date>
          </office:change-info>
          <table:previous>
            <table:change-track-table-cell table:cell-address="WBS.B290" table:formula="of:=IF(AND([.$D290]&lt;&gt;&quot;&quot;;[.$F290]=&quot;&quot;);&quot;E&quot;&amp;ROW();[.$B192])" office:value-type="string">
              <text:p>E109</text:p>
            </table:change-track-table-cell>
          </table:previous>
        </table:cell-content-change>
        <table:cell-content-change table:id="ct423">
          <table:cell-address table:column="1" table:row="290" table:table="0"/>
          <office:change-info>
            <dc:creator>Unknown Author</dc:creator>
            <dc:date>2026-06-17T06:50:02.364951700</dc:date>
          </office:change-info>
          <table:previous>
            <table:change-track-table-cell table:cell-address="WBS.B291" table:formula="of:=IF(AND([.$D291]&lt;&gt;&quot;&quot;;[.$F291]=&quot;&quot;);&quot;E&quot;&amp;ROW();[.$B193])" office:value-type="string">
              <text:p>E109</text:p>
            </table:change-track-table-cell>
          </table:previous>
        </table:cell-content-change>
        <table:cell-content-change table:id="ct424">
          <table:cell-address table:column="1" table:row="291" table:table="0"/>
          <office:change-info>
            <dc:creator>Unknown Author</dc:creator>
            <dc:date>2026-06-17T06:50:02.364964100</dc:date>
          </office:change-info>
          <table:previous>
            <table:change-track-table-cell table:cell-address="WBS.B292" table:formula="of:=IF(AND([.$D292]&lt;&gt;&quot;&quot;;[.$F292]=&quot;&quot;);&quot;E&quot;&amp;ROW();[.$B194])" office:value-type="string">
              <text:p>E109</text:p>
            </table:change-track-table-cell>
          </table:previous>
        </table:cell-content-change>
        <table:cell-content-change table:id="ct425">
          <table:cell-address table:column="1" table:row="292" table:table="0"/>
          <office:change-info>
            <dc:creator>Unknown Author</dc:creator>
            <dc:date>2026-06-17T06:50:02.364976100</dc:date>
          </office:change-info>
          <table:previous>
            <table:change-track-table-cell table:cell-address="WBS.B293" table:formula="of:=IF(AND([.$D293]&lt;&gt;&quot;&quot;;[.$F293]=&quot;&quot;);&quot;E&quot;&amp;ROW();[.$B195])" office:value-type="string">
              <text:p>E190</text:p>
            </table:change-track-table-cell>
          </table:previous>
        </table:cell-content-change>
        <table:cell-content-change table:id="ct426">
          <table:cell-address table:column="1" table:row="293" table:table="0"/>
          <office:change-info>
            <dc:creator>Unknown Author</dc:creator>
            <dc:date>2026-06-17T06:50:02.364988600</dc:date>
          </office:change-info>
          <table:previous>
            <table:change-track-table-cell table:cell-address="WBS.B294" table:formula="of:=IF(AND([.$D294]&lt;&gt;&quot;&quot;;[.$F294]=&quot;&quot;);&quot;E&quot;&amp;ROW();[.$B196])" office:value-type="string">
              <text:p>E109</text:p>
            </table:change-track-table-cell>
          </table:previous>
        </table:cell-content-change>
        <table:cell-content-change table:id="ct427">
          <table:cell-address table:column="1" table:row="294" table:table="0"/>
          <office:change-info>
            <dc:creator>Unknown Author</dc:creator>
            <dc:date>2026-06-17T06:50:02.365001300</dc:date>
          </office:change-info>
          <table:previous>
            <table:change-track-table-cell table:cell-address="WBS.B295" table:formula="of:=IF(AND([.$D295]&lt;&gt;&quot;&quot;;[.$F295]=&quot;&quot;);&quot;E&quot;&amp;ROW();[.$B197])" office:value-type="string">
              <text:p>E109</text:p>
            </table:change-track-table-cell>
          </table:previous>
        </table:cell-content-change>
        <table:cell-content-change table:id="ct428">
          <table:cell-address table:column="1" table:row="295" table:table="0"/>
          <office:change-info>
            <dc:creator>Unknown Author</dc:creator>
            <dc:date>2026-06-17T06:50:02.365013700</dc:date>
          </office:change-info>
          <table:previous>
            <table:change-track-table-cell table:cell-address="WBS.B296" table:formula="of:=IF(AND([.$D296]&lt;&gt;&quot;&quot;;[.$F296]=&quot;&quot;);&quot;E&quot;&amp;ROW();[.$B198])" office:value-type="string">
              <text:p>E109</text:p>
            </table:change-track-table-cell>
          </table:previous>
        </table:cell-content-change>
        <table:cell-content-change table:id="ct429">
          <table:cell-address table:column="1" table:row="296" table:table="0"/>
          <office:change-info>
            <dc:creator>Unknown Author</dc:creator>
            <dc:date>2026-06-17T06:50:02.365025800</dc:date>
          </office:change-info>
          <table:previous>
            <table:change-track-table-cell table:cell-address="WBS.B297" table:formula="of:=IF(AND([.$D297]&lt;&gt;&quot;&quot;;[.$F297]=&quot;&quot;);&quot;E&quot;&amp;ROW();[.$B199])" office:value-type="string">
              <text:p>E109</text:p>
            </table:change-track-table-cell>
          </table:previous>
        </table:cell-content-change>
        <table:cell-content-change table:id="ct430">
          <table:cell-address table:column="1" table:row="297" table:table="0"/>
          <office:change-info>
            <dc:creator>Unknown Author</dc:creator>
            <dc:date>2026-06-17T06:50:02.365038400</dc:date>
          </office:change-info>
          <table:previous>
            <table:change-track-table-cell table:cell-address="WBS.B298" table:formula="of:=IF(AND([.$D298]&lt;&gt;&quot;&quot;;[.$F298]=&quot;&quot;);&quot;E&quot;&amp;ROW();[.$B200])" office:value-type="string">
              <text:p>E109</text:p>
            </table:change-track-table-cell>
          </table:previous>
        </table:cell-content-change>
        <table:cell-content-change table:id="ct431">
          <table:cell-address table:column="1" table:row="298" table:table="0"/>
          <office:change-info>
            <dc:creator>Unknown Author</dc:creator>
            <dc:date>2026-06-17T06:50:02.365051000</dc:date>
          </office:change-info>
          <table:previous>
            <table:change-track-table-cell table:cell-address="WBS.B299" table:formula="of:=IF(AND([.$D299]&lt;&gt;&quot;&quot;;[.$F299]=&quot;&quot;);&quot;E&quot;&amp;ROW();[.$B201])" office:value-type="string">
              <text:p>E119</text:p>
            </table:change-track-table-cell>
          </table:previous>
        </table:cell-content-change>
        <table:deletion table:id="ct432" table:type="row" table:position="227" table:table="0" table:multi-deletion-spanned="13">
          <office:change-info>
            <dc:creator>Unknown Author</dc:creator>
            <dc:date>2026-06-17T07:22:47.453941200</dc:date>
          </office:change-info>
          <table:deletions>
            <table:cell-content-deletion>
              <table:cell-address table:column="19" table:row="227" table:table="0"/>
              <table:change-track-table-cell table:cell-address="WBS.T228" table:formula="of:=SUM([.$V228:.$FM228])" office:value-type="float" office:value="0"/>
            </table:cell-content-deletion>
            <table:cell-content-deletion>
              <table:cell-address table:column="2" table:row="227" table:table="0"/>
              <table:change-track-table-cell table:cell-address="WBS.C228" table:formula="of:=IF(AND([.$D268]&lt;&gt;&quot;&quot;;[.$D268]&lt;&gt;&quot;○&quot;);MAX([.$C$3:.$C216])+1;[.$C216])" office:value-type="float" office:value="11"/>
            </table:cell-content-deletion>
            <table:cell-content-deletion>
              <table:cell-address table:column="1" table:row="227" table:table="0"/>
              <table:change-track-table-cell table:cell-address="WBS.B228" table:formula="of:=IF(AND([.$D268]&lt;&gt;&quot;&quot;;[.$F268]=&quot;&quot;);&quot;E&quot;&amp;ROW();[.$B139])" office:value-type="string">
                <text:p>E223</text:p>
              </table:change-track-table-cell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33" table:type="row" table:position="227" table:table="0">
          <office:change-info>
            <dc:creator>Unknown Author</dc:creator>
            <dc:date>2026-06-17T07:22:47.454090900</dc:date>
          </office:change-info>
          <table:deletions>
            <table:cell-content-deletion>
              <table:cell-address table:column="19" table:row="227" table:table="0"/>
              <table:change-track-table-cell table:cell-address="WBS.T228" table:formula="of:=SUM([.$V228:.$FM228])" office:value-type="float" office:value="0"/>
            </table:cell-content-deletion>
            <table:cell-content-deletion>
              <table:cell-address table:column="2" table:row="227" table:table="0"/>
              <table:change-track-table-cell table:cell-address="WBS.C228" table:formula="of:=IF(AND([.$D268]&lt;&gt;&quot;&quot;;[.$D268]&lt;&gt;&quot;○&quot;);MAX([.$C$3:.$C227])+1;[.$C227])" office:value-type="float" office:value="11"/>
            </table:cell-content-deletion>
            <table:cell-content-deletion>
              <table:cell-address table:column="1" table:row="227" table:table="0"/>
              <table:change-track-table-cell table:cell-address="WBS.B228" table:formula="of:=IF(AND([.$D268]&lt;&gt;&quot;&quot;;[.$F268]=&quot;&quot;);&quot;E&quot;&amp;ROW();[.$B139])" office:value-type="string">
                <text:p>E223</text:p>
              </table:change-track-table-cell>
            </table:cell-content-deletion>
            <table:change-deletion table:id="ct432"/>
          </table:deletions>
          <table:cut-offs>
            <table:movement-cut-off table:id="ct360" table:start-position="1" table:end-position="0"/>
          </table:cut-offs>
        </table:deletion>
        <table:deletion table:id="ct434" table:type="row" table:position="227" table:table="0">
          <office:change-info>
            <dc:creator>Unknown Author</dc:creator>
            <dc:date>2026-06-17T07:22:47.454143500</dc:date>
          </office:change-info>
          <table:deletions>
            <table:cell-content-deletion>
              <table:cell-address table:column="19" table:row="227" table:table="0"/>
              <table:change-track-table-cell table:cell-address="WBS.T228" table:formula="of:=SUM([.$V228:.$FM228])" office:value-type="float" office:value="0"/>
            </table:cell-content-deletion>
            <table:cell-content-deletion>
              <table:cell-address table:column="2" table:row="227" table:table="0"/>
              <table:change-track-table-cell table:cell-address="WBS.C228" table:formula="of:=IF(AND([.$D268]&lt;&gt;&quot;&quot;;[.$D268]&lt;&gt;&quot;○&quot;);MAX([.$C$3:.$C227])+1;[.$C227])" office:value-type="float" office:value="11"/>
            </table:cell-content-deletion>
            <table:cell-content-deletion>
              <table:cell-address table:column="1" table:row="227" table:table="0"/>
              <table:change-track-table-cell table:cell-address="WBS.B228" table:formula="of:=IF(AND([.$D268]&lt;&gt;&quot;&quot;;[.$F268]=&quot;&quot;);&quot;E&quot;&amp;ROW();[.$B139])" office:value-type="string">
                <text:p>E223</text:p>
              </table:change-track-table-cell>
            </table:cell-content-deletion>
            <table:change-deletion table:id="ct433"/>
          </table:deletions>
          <table:cut-offs>
            <table:movement-cut-off table:id="ct360" table:start-position="1" table:end-position="0"/>
          </table:cut-offs>
        </table:deletion>
        <table:deletion table:id="ct435" table:type="row" table:position="227" table:table="0">
          <office:change-info>
            <dc:creator>Unknown Author</dc:creator>
            <dc:date>2026-06-17T07:22:47.454190200</dc:date>
          </office:change-info>
          <table:deletions>
            <table:cell-content-deletion>
              <table:cell-address table:column="19" table:row="227" table:table="0"/>
              <table:change-track-table-cell table:cell-address="WBS.T228" table:formula="of:=SUM([.$V228:.$FM228])" office:value-type="float" office:value="0"/>
            </table:cell-content-deletion>
            <table:cell-content-deletion>
              <table:cell-address table:column="2" table:row="227" table:table="0"/>
              <table:change-track-table-cell table:cell-address="WBS.C228" table:formula="of:=IF(AND([.$D268]&lt;&gt;&quot;&quot;;[.$D268]&lt;&gt;&quot;○&quot;);MAX([.$C$3:.$C227])+1;[.$C227])" office:value-type="float" office:value="11"/>
            </table:cell-content-deletion>
            <table:cell-content-deletion>
              <table:cell-address table:column="1" table:row="227" table:table="0"/>
              <table:change-track-table-cell table:cell-address="WBS.B228" table:formula="of:=IF(AND([.$D268]&lt;&gt;&quot;&quot;;[.$F268]=&quot;&quot;);&quot;E&quot;&amp;ROW();[.$B139])" office:value-type="string">
                <text:p>E223</text:p>
              </table:change-track-table-cell>
            </table:cell-content-deletion>
            <table:change-deletion table:id="ct434"/>
          </table:deletions>
          <table:cut-offs>
            <table:movement-cut-off table:id="ct360" table:start-position="1" table:end-position="0"/>
          </table:cut-offs>
        </table:deletion>
        <table:deletion table:id="ct436" table:type="row" table:position="227" table:table="0">
          <office:change-info>
            <dc:creator>Unknown Author</dc:creator>
            <dc:date>2026-06-17T07:22:47.454235900</dc:date>
          </office:change-info>
          <table:deletions>
            <table:cell-content-deletion>
              <table:cell-address table:column="19" table:row="227" table:table="0"/>
              <table:change-track-table-cell table:cell-address="WBS.T228" table:formula="of:=SUM([.$V228:.$FM228])" office:value-type="float" office:value="0"/>
            </table:cell-content-deletion>
            <table:cell-content-deletion>
              <table:cell-address table:column="2" table:row="227" table:table="0"/>
              <table:change-track-table-cell table:cell-address="WBS.C228" table:formula="of:=IF(AND([.$D268]&lt;&gt;&quot;&quot;;[.$D268]&lt;&gt;&quot;○&quot;);MAX([.$C$3:.$C227])+1;[.$C227])" office:value-type="float" office:value="11"/>
            </table:cell-content-deletion>
            <table:cell-content-deletion>
              <table:cell-address table:column="1" table:row="227" table:table="0"/>
              <table:change-track-table-cell table:cell-address="WBS.B228" table:formula="of:=IF(AND([.$D268]&lt;&gt;&quot;&quot;;[.$F268]=&quot;&quot;);&quot;E&quot;&amp;ROW();[.$B139])" office:value-type="string">
                <text:p>E223</text:p>
              </table:change-track-table-cell>
            </table:cell-content-deletion>
            <table:change-deletion table:id="ct435"/>
          </table:deletions>
          <table:cut-offs>
            <table:movement-cut-off table:id="ct360" table:start-position="1" table:end-position="0"/>
          </table:cut-offs>
        </table:deletion>
        <table:deletion table:id="ct437" table:type="row" table:position="227" table:table="0">
          <office:change-info>
            <dc:creator>Unknown Author</dc:creator>
            <dc:date>2026-06-17T07:22:47.454281000</dc:date>
          </office:change-info>
          <table:deletions>
            <table:cell-content-deletion>
              <table:cell-address table:column="19" table:row="227" table:table="0"/>
              <table:change-track-table-cell table:cell-address="WBS.T228" table:formula="of:=SUM([.$V228:.$FM228])" office:value-type="float" office:value="0"/>
            </table:cell-content-deletion>
            <table:cell-content-deletion>
              <table:cell-address table:column="2" table:row="227" table:table="0"/>
              <table:change-track-table-cell table:cell-address="WBS.C228" table:formula="of:=IF(AND([.$D268]&lt;&gt;&quot;&quot;;[.$D268]&lt;&gt;&quot;○&quot;);MAX([.$C$3:.$C227])+1;[.$C227])" office:value-type="float" office:value="11"/>
            </table:cell-content-deletion>
            <table:cell-content-deletion>
              <table:cell-address table:column="1" table:row="227" table:table="0"/>
              <table:change-track-table-cell table:cell-address="WBS.B228" table:formula="of:=IF(AND([.$D268]&lt;&gt;&quot;&quot;;[.$F268]=&quot;&quot;);&quot;E&quot;&amp;ROW();[.$B139])" office:value-type="string">
                <text:p>E223</text:p>
              </table:change-track-table-cell>
            </table:cell-content-deletion>
            <table:change-deletion table:id="ct436"/>
          </table:deletions>
          <table:cut-offs>
            <table:movement-cut-off table:id="ct360" table:start-position="1" table:end-position="0"/>
          </table:cut-offs>
        </table:deletion>
        <table:deletion table:id="ct438" table:type="row" table:position="227" table:table="0">
          <office:change-info>
            <dc:creator>Unknown Author</dc:creator>
            <dc:date>2026-06-17T07:22:47.454326700</dc:date>
          </office:change-info>
          <table:deletions>
            <table:cell-content-deletion>
              <table:cell-address table:column="19" table:row="227" table:table="0"/>
              <table:change-track-table-cell table:cell-address="WBS.T228" table:formula="of:=SUM([.$V228:.$FM228])" office:value-type="float" office:value="0"/>
            </table:cell-content-deletion>
            <table:cell-content-deletion>
              <table:cell-address table:column="2" table:row="227" table:table="0"/>
              <table:change-track-table-cell table:cell-address="WBS.C228" table:formula="of:=IF(AND([.$D268]&lt;&gt;&quot;&quot;;[.$D268]&lt;&gt;&quot;○&quot;);MAX([.$C$3:.$C227])+1;[.$C227])" office:value-type="float" office:value="11"/>
            </table:cell-content-deletion>
            <table:cell-content-deletion>
              <table:cell-address table:column="1" table:row="227" table:table="0"/>
              <table:change-track-table-cell table:cell-address="WBS.B228" table:formula="of:=IF(AND([.$D268]&lt;&gt;&quot;&quot;;[.$F268]=&quot;&quot;);&quot;E&quot;&amp;ROW();[.$B139])" office:value-type="string">
                <text:p>E223</text:p>
              </table:change-track-table-cell>
            </table:cell-content-deletion>
            <table:change-deletion table:id="ct437"/>
          </table:deletions>
          <table:cut-offs>
            <table:movement-cut-off table:id="ct360" table:start-position="1" table:end-position="0"/>
          </table:cut-offs>
        </table:deletion>
        <table:deletion table:id="ct439" table:type="row" table:position="227" table:table="0">
          <office:change-info>
            <dc:creator>Unknown Author</dc:creator>
            <dc:date>2026-06-17T07:22:47.454372800</dc:date>
          </office:change-info>
          <table:deletions>
            <table:cell-content-deletion>
              <table:cell-address table:column="19" table:row="227" table:table="0"/>
              <table:change-track-table-cell table:cell-address="WBS.T228" table:formula="of:=SUM([.$V228:.$FM228])" office:value-type="float" office:value="0"/>
            </table:cell-content-deletion>
            <table:cell-content-deletion>
              <table:cell-address table:column="2" table:row="227" table:table="0"/>
              <table:change-track-table-cell table:cell-address="WBS.C228" table:formula="of:=IF(AND([.$D268]&lt;&gt;&quot;&quot;;[.$D268]&lt;&gt;&quot;○&quot;);MAX([.$C$3:.$C227])+1;[.$C227])" office:value-type="float" office:value="11"/>
            </table:cell-content-deletion>
            <table:cell-content-deletion>
              <table:cell-address table:column="1" table:row="227" table:table="0"/>
              <table:change-track-table-cell table:cell-address="WBS.B228" table:formula="of:=IF(AND([.$D268]&lt;&gt;&quot;&quot;;[.$F268]=&quot;&quot;);&quot;E&quot;&amp;ROW();[.$B139])" office:value-type="string">
                <text:p>E223</text:p>
              </table:change-track-table-cell>
            </table:cell-content-deletion>
            <table:change-deletion table:id="ct438"/>
          </table:deletions>
          <table:cut-offs>
            <table:movement-cut-off table:id="ct360" table:start-position="1" table:end-position="0"/>
          </table:cut-offs>
        </table:deletion>
        <table:deletion table:id="ct440" table:type="row" table:position="227" table:table="0">
          <office:change-info>
            <dc:creator>Unknown Author</dc:creator>
            <dc:date>2026-06-17T07:22:47.454419300</dc:date>
          </office:change-info>
          <table:deletions>
            <table:cell-content-deletion>
              <table:cell-address table:column="19" table:row="227" table:table="0"/>
              <table:change-track-table-cell table:cell-address="WBS.T228" table:formula="of:=SUM([.$V228:.$FM228])" office:value-type="float" office:value="0"/>
            </table:cell-content-deletion>
            <table:cell-content-deletion>
              <table:cell-address table:column="2" table:row="227" table:table="0"/>
              <table:change-track-table-cell table:cell-address="WBS.C228" table:formula="of:=IF(AND([.$D268]&lt;&gt;&quot;&quot;;[.$D268]&lt;&gt;&quot;○&quot;);MAX([.$C$3:.$C227])+1;[.$C227])" office:value-type="float" office:value="11"/>
            </table:cell-content-deletion>
            <table:cell-content-deletion>
              <table:cell-address table:column="1" table:row="227" table:table="0"/>
              <table:change-track-table-cell table:cell-address="WBS.B228" table:formula="of:=IF(AND([.$D268]&lt;&gt;&quot;&quot;;[.$F268]=&quot;&quot;);&quot;E&quot;&amp;ROW();[.$B139])" office:value-type="string">
                <text:p>E223</text:p>
              </table:change-track-table-cell>
            </table:cell-content-deletion>
            <table:change-deletion table:id="ct439"/>
          </table:deletions>
          <table:cut-offs>
            <table:movement-cut-off table:id="ct360" table:start-position="1" table:end-position="0"/>
          </table:cut-offs>
        </table:deletion>
        <table:deletion table:id="ct441" table:type="row" table:position="227" table:table="0">
          <office:change-info>
            <dc:creator>Unknown Author</dc:creator>
            <dc:date>2026-06-17T07:22:47.454465100</dc:date>
          </office:change-info>
          <table:deletions>
            <table:cell-content-deletion>
              <table:cell-address table:column="19" table:row="227" table:table="0"/>
              <table:change-track-table-cell table:cell-address="WBS.T228" table:formula="of:=SUM([.$V228:.$FM228])" office:value-type="float" office:value="0"/>
            </table:cell-content-deletion>
            <table:cell-content-deletion>
              <table:cell-address table:column="2" table:row="227" table:table="0"/>
              <table:change-track-table-cell table:cell-address="WBS.C228" table:formula="of:=IF(AND([.$D268]&lt;&gt;&quot;&quot;;[.$D268]&lt;&gt;&quot;○&quot;);MAX([.$C$3:.$C227])+1;[.$C227])" office:value-type="float" office:value="11"/>
            </table:cell-content-deletion>
            <table:cell-content-deletion>
              <table:cell-address table:column="1" table:row="227" table:table="0"/>
              <table:change-track-table-cell table:cell-address="WBS.B228" table:formula="of:=IF(AND([.$D268]&lt;&gt;&quot;&quot;;[.$F268]=&quot;&quot;);&quot;E&quot;&amp;ROW();[.$B139])" office:value-type="string">
                <text:p>E223</text:p>
              </table:change-track-table-cell>
            </table:cell-content-deletion>
            <table:change-deletion table:id="ct440"/>
          </table:deletions>
          <table:cut-offs>
            <table:movement-cut-off table:id="ct360" table:start-position="1" table:end-position="0"/>
          </table:cut-offs>
        </table:deletion>
        <table:deletion table:id="ct442" table:type="row" table:position="227" table:table="0">
          <office:change-info>
            <dc:creator>Unknown Author</dc:creator>
            <dc:date>2026-06-17T07:22:47.454511200</dc:date>
          </office:change-info>
          <table:deletions>
            <table:cell-content-deletion>
              <table:cell-address table:column="19" table:row="227" table:table="0"/>
              <table:change-track-table-cell table:cell-address="WBS.T228" table:formula="of:=SUM([.$V228:.$FM228])" office:value-type="float" office:value="0"/>
            </table:cell-content-deletion>
            <table:cell-content-deletion>
              <table:cell-address table:column="2" table:row="227" table:table="0"/>
              <table:change-track-table-cell table:cell-address="WBS.C228" table:formula="of:=IF(AND([.$D268]&lt;&gt;&quot;&quot;;[.$D268]&lt;&gt;&quot;○&quot;);MAX([.$C$3:.$C227])+1;[.$C227])" office:value-type="float" office:value="11"/>
            </table:cell-content-deletion>
            <table:cell-content-deletion>
              <table:cell-address table:column="1" table:row="227" table:table="0"/>
              <table:change-track-table-cell table:cell-address="WBS.B228" table:formula="of:=IF(AND([.$D268]&lt;&gt;&quot;&quot;;[.$F268]=&quot;&quot;);&quot;E&quot;&amp;ROW();[.$B139])" office:value-type="string">
                <text:p>E223</text:p>
              </table:change-track-table-cell>
            </table:cell-content-deletion>
            <table:change-deletion table:id="ct441"/>
          </table:deletions>
          <table:cut-offs>
            <table:movement-cut-off table:id="ct360" table:start-position="1" table:end-position="0"/>
          </table:cut-offs>
        </table:deletion>
        <table:deletion table:id="ct443" table:type="row" table:position="227" table:table="0">
          <office:change-info>
            <dc:creator>Unknown Author</dc:creator>
            <dc:date>2026-06-17T07:22:47.454556600</dc:date>
          </office:change-info>
          <table:deletions>
            <table:cell-content-deletion>
              <table:cell-address table:column="19" table:row="227" table:table="0"/>
              <table:change-track-table-cell table:cell-address="WBS.T228" table:formula="of:=SUM([.$V228:.$FM228])" office:value-type="float" office:value="0"/>
            </table:cell-content-deletion>
            <table:cell-content-deletion>
              <table:cell-address table:column="2" table:row="227" table:table="0"/>
              <table:change-track-table-cell table:cell-address="WBS.C228" table:formula="of:=IF(AND([.$D268]&lt;&gt;&quot;&quot;;[.$D268]&lt;&gt;&quot;○&quot;);MAX([.$C$3:.$C227])+1;[.$C227])" office:value-type="float" office:value="11"/>
            </table:cell-content-deletion>
            <table:cell-content-deletion>
              <table:cell-address table:column="1" table:row="227" table:table="0"/>
              <table:change-track-table-cell table:cell-address="WBS.B228" table:formula="of:=IF(AND([.$D268]&lt;&gt;&quot;&quot;;[.$F268]=&quot;&quot;);&quot;E&quot;&amp;ROW();[.$B139])" office:value-type="string">
                <text:p>E223</text:p>
              </table:change-track-table-cell>
            </table:cell-content-deletion>
            <table:change-deletion table:id="ct442"/>
          </table:deletions>
          <table:cut-offs>
            <table:movement-cut-off table:id="ct360" table:start-position="1" table:end-position="0"/>
          </table:cut-offs>
        </table:deletion>
        <table:deletion table:id="ct444" table:type="row" table:position="227" table:table="0">
          <office:change-info>
            <dc:creator>Unknown Author</dc:creator>
            <dc:date>2026-06-17T07:22:47.454603700</dc:date>
          </office:change-info>
          <table:deletions>
            <table:cell-content-deletion>
              <table:cell-address table:column="19" table:row="227" table:table="0"/>
              <table:change-track-table-cell table:cell-address="WBS.T228" table:formula="of:=SUM([.$V228:.$FM228])" office:value-type="float" office:value="0"/>
            </table:cell-content-deletion>
            <table:cell-content-deletion>
              <table:cell-address table:column="2" table:row="227" table:table="0"/>
              <table:change-track-table-cell table:cell-address="WBS.C228" table:formula="of:=IF(AND([.$D268]&lt;&gt;&quot;&quot;;[.$D268]&lt;&gt;&quot;○&quot;);MAX([.$C$3:.$C227])+1;[.$C227])" office:value-type="float" office:value="11"/>
            </table:cell-content-deletion>
            <table:cell-content-deletion>
              <table:cell-address table:column="1" table:row="227" table:table="0"/>
              <table:change-track-table-cell table:cell-address="WBS.B228" table:formula="of:=IF(AND([.$D268]&lt;&gt;&quot;&quot;;[.$F268]=&quot;&quot;);&quot;E&quot;&amp;ROW();[.$B139])" office:value-type="string">
                <text:p>E223</text:p>
              </table:change-track-table-cell>
            </table:cell-content-deletion>
            <table:change-deletion table:id="ct443"/>
          </table:deletions>
          <table:cut-offs>
            <table:movement-cut-off table:id="ct360" table:start-position="1" table:end-position="0"/>
          </table:cut-offs>
        </table:deletion>
        <table:deletion table:id="ct445" table:type="row" table:position="227" table:table="0">
          <office:change-info>
            <dc:creator>Unknown Author</dc:creator>
            <dc:date>2026-06-17T07:23:04.763616300</dc:date>
          </office:change-info>
          <table:deletions>
            <table:change-deletion table:id="ct444"/>
          </table:deletions>
          <table:cut-offs>
            <table:movement-cut-off table:id="ct360" table:start-position="1" table:end-position="0"/>
          </table:cut-offs>
        </table:deletion>
        <table:cell-content-change table:id="ct446">
          <table:cell-address table:column="11" table:row="248" table:table="0"/>
          <office:change-info>
            <dc:creator>Unknown Author</dc:creator>
            <dc:date>2026-06-17T07:29:10.490255300</dc:date>
          </office:change-info>
          <table:previous>
            <table:change-track-table-cell office:value-type="float" office:value="46190"/>
          </table:previous>
        </table:cell-content-change>
        <table:cell-content-change table:id="ct447">
          <table:cell-address table:column="11" table:row="249" table:table="0"/>
          <office:change-info>
            <dc:creator>Unknown Author</dc:creator>
            <dc:date>2026-06-17T07:29:10.490289000</dc:date>
          </office:change-info>
          <table:previous>
            <table:change-track-table-cell office:value-type="float" office:value="46190"/>
          </table:previous>
        </table:cell-content-change>
        <table:cell-content-change table:id="ct448">
          <table:cell-address table:column="11" table:row="250" table:table="0"/>
          <office:change-info>
            <dc:creator>Unknown Author</dc:creator>
            <dc:date>2026-06-17T07:29:10.490302400</dc:date>
          </office:change-info>
          <table:previous>
            <table:change-track-table-cell office:value-type="float" office:value="46190"/>
          </table:previous>
        </table:cell-content-change>
        <table:cell-content-change table:id="ct449">
          <table:cell-address table:column="11" table:row="251" table:table="0"/>
          <office:change-info>
            <dc:creator>Unknown Author</dc:creator>
            <dc:date>2026-06-17T07:29:10.490314700</dc:date>
          </office:change-info>
          <table:previous>
            <table:change-track-table-cell office:value-type="float" office:value="46190"/>
          </table:previous>
        </table:cell-content-change>
        <table:cell-content-change table:id="ct450">
          <table:cell-address table:column="11" table:row="252" table:table="0"/>
          <office:change-info>
            <dc:creator>Unknown Author</dc:creator>
            <dc:date>2026-06-17T07:29:10.490326900</dc:date>
          </office:change-info>
          <table:previous>
            <table:change-track-table-cell office:value-type="float" office:value="46190"/>
          </table:previous>
        </table:cell-content-change>
        <table:cell-content-change table:id="ct451">
          <table:cell-address table:column="11" table:row="253" table:table="0"/>
          <office:change-info>
            <dc:creator>Unknown Author</dc:creator>
            <dc:date>2026-06-17T07:29:10.490339500</dc:date>
          </office:change-info>
          <table:previous>
            <table:change-track-table-cell office:value-type="float" office:value="46190"/>
          </table:previous>
        </table:cell-content-change>
        <table:cell-content-change table:id="ct452">
          <table:cell-address table:column="11" table:row="254" table:table="0"/>
          <office:change-info>
            <dc:creator>Unknown Author</dc:creator>
            <dc:date>2026-06-17T07:29:10.490351700</dc:date>
          </office:change-info>
          <table:previous>
            <table:change-track-table-cell office:value-type="float" office:value="46190"/>
          </table:previous>
        </table:cell-content-change>
        <table:cell-content-change table:id="ct453">
          <table:cell-address table:column="11" table:row="255" table:table="0"/>
          <office:change-info>
            <dc:creator>Unknown Author</dc:creator>
            <dc:date>2026-06-17T07:29:10.490363700</dc:date>
          </office:change-info>
          <table:previous>
            <table:change-track-table-cell office:value-type="float" office:value="46190"/>
          </table:previous>
        </table:cell-content-change>
        <table:cell-content-change table:id="ct454">
          <table:cell-address table:column="11" table:row="256" table:table="0"/>
          <office:change-info>
            <dc:creator>Unknown Author</dc:creator>
            <dc:date>2026-06-17T07:29:10.490376900</dc:date>
          </office:change-info>
          <table:previous>
            <table:change-track-table-cell office:value-type="float" office:value="46190"/>
          </table:previous>
        </table:cell-content-change>
        <table:cell-content-change table:id="ct455">
          <table:cell-address table:column="11" table:row="257" table:table="0"/>
          <office:change-info>
            <dc:creator>Unknown Author</dc:creator>
            <dc:date>2026-06-17T07:29:10.490388800</dc:date>
          </office:change-info>
          <table:previous>
            <table:change-track-table-cell office:value-type="float" office:value="46190"/>
          </table:previous>
        </table:cell-content-change>
        <table:cell-content-change table:id="ct456">
          <table:cell-address table:column="11" table:row="258" table:table="0"/>
          <office:change-info>
            <dc:creator>Unknown Author</dc:creator>
            <dc:date>2026-06-17T07:29:10.490402900</dc:date>
          </office:change-info>
          <table:previous>
            <table:change-track-table-cell office:value-type="float" office:value="46190"/>
          </table:previous>
        </table:cell-content-change>
        <table:cell-content-change table:id="ct457">
          <table:cell-address table:column="11" table:row="259" table:table="0"/>
          <office:change-info>
            <dc:creator>Unknown Author</dc:creator>
            <dc:date>2026-06-17T07:29:10.490415100</dc:date>
          </office:change-info>
          <table:previous>
            <table:change-track-table-cell office:value-type="float" office:value="46190"/>
          </table:previous>
        </table:cell-content-change>
        <table:cell-content-change table:id="ct458">
          <table:cell-address table:column="11" table:row="260" table:table="0"/>
          <office:change-info>
            <dc:creator>Unknown Author</dc:creator>
            <dc:date>2026-06-17T07:29:10.490427200</dc:date>
          </office:change-info>
          <table:previous>
            <table:change-track-table-cell office:value-type="float" office:value="46190"/>
          </table:previous>
        </table:cell-content-change>
        <table:cell-content-change table:id="ct459">
          <table:cell-address table:column="12" table:row="248" table:table="0"/>
          <office:change-info>
            <dc:creator>Unknown Author</dc:creator>
            <dc:date>2026-06-17T07:29:10.490440300</dc:date>
          </office:change-info>
          <table:previous>
            <table:change-track-table-cell office:value-type="float" office:value="46190"/>
          </table:previous>
        </table:cell-content-change>
        <table:cell-content-change table:id="ct460">
          <table:cell-address table:column="12" table:row="249" table:table="0"/>
          <office:change-info>
            <dc:creator>Unknown Author</dc:creator>
            <dc:date>2026-06-17T07:29:10.490452900</dc:date>
          </office:change-info>
          <table:previous>
            <table:change-track-table-cell office:value-type="float" office:value="46190"/>
          </table:previous>
        </table:cell-content-change>
        <table:cell-content-change table:id="ct461">
          <table:cell-address table:column="12" table:row="250" table:table="0"/>
          <office:change-info>
            <dc:creator>Unknown Author</dc:creator>
            <dc:date>2026-06-17T07:29:10.490466700</dc:date>
          </office:change-info>
          <table:previous>
            <table:change-track-table-cell office:value-type="float" office:value="46190"/>
          </table:previous>
        </table:cell-content-change>
        <table:cell-content-change table:id="ct462">
          <table:cell-address table:column="12" table:row="251" table:table="0"/>
          <office:change-info>
            <dc:creator>Unknown Author</dc:creator>
            <dc:date>2026-06-17T07:29:10.490478900</dc:date>
          </office:change-info>
          <table:previous>
            <table:change-track-table-cell office:value-type="float" office:value="46190"/>
          </table:previous>
        </table:cell-content-change>
        <table:cell-content-change table:id="ct463">
          <table:cell-address table:column="12" table:row="252" table:table="0"/>
          <office:change-info>
            <dc:creator>Unknown Author</dc:creator>
            <dc:date>2026-06-17T07:29:10.490491800</dc:date>
          </office:change-info>
          <table:previous>
            <table:change-track-table-cell office:value-type="float" office:value="46190"/>
          </table:previous>
        </table:cell-content-change>
        <table:cell-content-change table:id="ct464">
          <table:cell-address table:column="12" table:row="253" table:table="0"/>
          <office:change-info>
            <dc:creator>Unknown Author</dc:creator>
            <dc:date>2026-06-17T07:29:10.490504100</dc:date>
          </office:change-info>
          <table:previous>
            <table:change-track-table-cell office:value-type="float" office:value="46190"/>
          </table:previous>
        </table:cell-content-change>
        <table:cell-content-change table:id="ct465">
          <table:cell-address table:column="12" table:row="254" table:table="0"/>
          <office:change-info>
            <dc:creator>Unknown Author</dc:creator>
            <dc:date>2026-06-17T07:29:10.490516200</dc:date>
          </office:change-info>
          <table:previous>
            <table:change-track-table-cell office:value-type="float" office:value="46190"/>
          </table:previous>
        </table:cell-content-change>
        <table:cell-content-change table:id="ct466">
          <table:cell-address table:column="12" table:row="255" table:table="0"/>
          <office:change-info>
            <dc:creator>Unknown Author</dc:creator>
            <dc:date>2026-06-17T07:29:10.490528100</dc:date>
          </office:change-info>
          <table:previous>
            <table:change-track-table-cell office:value-type="float" office:value="46190"/>
          </table:previous>
        </table:cell-content-change>
        <table:cell-content-change table:id="ct467">
          <table:cell-address table:column="12" table:row="256" table:table="0"/>
          <office:change-info>
            <dc:creator>Unknown Author</dc:creator>
            <dc:date>2026-06-17T07:29:10.490539900</dc:date>
          </office:change-info>
          <table:previous>
            <table:change-track-table-cell office:value-type="float" office:value="46190"/>
          </table:previous>
        </table:cell-content-change>
        <table:cell-content-change table:id="ct468">
          <table:cell-address table:column="12" table:row="257" table:table="0"/>
          <office:change-info>
            <dc:creator>Unknown Author</dc:creator>
            <dc:date>2026-06-17T07:29:10.490551700</dc:date>
          </office:change-info>
          <table:previous>
            <table:change-track-table-cell office:value-type="float" office:value="46190"/>
          </table:previous>
        </table:cell-content-change>
        <table:cell-content-change table:id="ct469">
          <table:cell-address table:column="12" table:row="258" table:table="0"/>
          <office:change-info>
            <dc:creator>Unknown Author</dc:creator>
            <dc:date>2026-06-17T07:29:10.490564300</dc:date>
          </office:change-info>
          <table:previous>
            <table:change-track-table-cell office:value-type="float" office:value="46190"/>
          </table:previous>
        </table:cell-content-change>
        <table:cell-content-change table:id="ct470">
          <table:cell-address table:column="12" table:row="259" table:table="0"/>
          <office:change-info>
            <dc:creator>Unknown Author</dc:creator>
            <dc:date>2026-06-17T07:29:10.490576300</dc:date>
          </office:change-info>
          <table:previous>
            <table:change-track-table-cell office:value-type="float" office:value="46190"/>
          </table:previous>
        </table:cell-content-change>
        <table:cell-content-change table:id="ct471">
          <table:cell-address table:column="12" table:row="260" table:table="0"/>
          <office:change-info>
            <dc:creator>Unknown Author</dc:creator>
            <dc:date>2026-06-17T07:29:10.490588400</dc:date>
          </office:change-info>
          <table:previous>
            <table:change-track-table-cell office:value-type="float" office:value="46190"/>
          </table:previous>
        </table:cell-content-change>
        <table:cell-content-change table:id="ct472">
          <table:cell-address table:column="10" table:row="243" table:table="0"/>
          <office:change-info>
            <dc:creator>Unknown Author</dc:creator>
            <dc:date>2026-06-17T07:29:26.372021400</dc:date>
          </office:change-info>
          <table:previous>
            <table:change-track-table-cell/>
          </table:previous>
        </table:cell-content-change>
        <table:cell-content-change table:id="ct473">
          <table:cell-address table:column="11" table:row="227" table:table="0"/>
          <office:change-info>
            <dc:creator>Unknown Author</dc:creator>
            <dc:date>2026-06-17T07:30:27.857821800</dc:date>
          </office:change-info>
          <table:previous>
            <table:change-track-table-cell office:value-type="float" office:value="46191"/>
          </table:previous>
        </table:cell-content-change>
        <table:cell-content-change table:id="ct474">
          <table:cell-address table:column="11" table:row="228" table:table="0"/>
          <office:change-info>
            <dc:creator>Unknown Author</dc:creator>
            <dc:date>2026-06-17T07:30:27.857854100</dc:date>
          </office:change-info>
          <table:previous>
            <table:change-track-table-cell office:value-type="float" office:value="46191"/>
          </table:previous>
        </table:cell-content-change>
        <table:cell-content-change table:id="ct475">
          <table:cell-address table:column="11" table:row="229" table:table="0"/>
          <office:change-info>
            <dc:creator>Unknown Author</dc:creator>
            <dc:date>2026-06-17T07:30:27.857861300</dc:date>
          </office:change-info>
          <table:previous>
            <table:change-track-table-cell office:value-type="float" office:value="46191"/>
          </table:previous>
        </table:cell-content-change>
        <table:cell-content-change table:id="ct476">
          <table:cell-address table:column="11" table:row="230" table:table="0"/>
          <office:change-info>
            <dc:creator>Unknown Author</dc:creator>
            <dc:date>2026-06-17T07:30:27.857867800</dc:date>
          </office:change-info>
          <table:previous>
            <table:change-track-table-cell office:value-type="float" office:value="46191"/>
          </table:previous>
        </table:cell-content-change>
        <table:cell-content-change table:id="ct477">
          <table:cell-address table:column="11" table:row="231" table:table="0"/>
          <office:change-info>
            <dc:creator>Unknown Author</dc:creator>
            <dc:date>2026-06-17T07:30:27.857875100</dc:date>
          </office:change-info>
          <table:previous>
            <table:change-track-table-cell office:value-type="float" office:value="46191"/>
          </table:previous>
        </table:cell-content-change>
        <table:cell-content-change table:id="ct478">
          <table:cell-address table:column="11" table:row="232" table:table="0"/>
          <office:change-info>
            <dc:creator>Unknown Author</dc:creator>
            <dc:date>2026-06-17T07:30:27.857881400</dc:date>
          </office:change-info>
          <table:previous>
            <table:change-track-table-cell office:value-type="float" office:value="46191"/>
          </table:previous>
        </table:cell-content-change>
        <table:cell-content-change table:id="ct479">
          <table:cell-address table:column="11" table:row="233" table:table="0"/>
          <office:change-info>
            <dc:creator>Unknown Author</dc:creator>
            <dc:date>2026-06-17T07:30:27.857887600</dc:date>
          </office:change-info>
          <table:previous>
            <table:change-track-table-cell office:value-type="float" office:value="46191"/>
          </table:previous>
        </table:cell-content-change>
        <table:cell-content-change table:id="ct480">
          <table:cell-address table:column="11" table:row="234" table:table="0"/>
          <office:change-info>
            <dc:creator>Unknown Author</dc:creator>
            <dc:date>2026-06-17T07:30:27.857893600</dc:date>
          </office:change-info>
          <table:previous>
            <table:change-track-table-cell/>
          </table:previous>
        </table:cell-content-change>
        <table:cell-content-change table:id="ct481">
          <table:cell-address table:column="11" table:row="235" table:table="0"/>
          <office:change-info>
            <dc:creator>Unknown Author</dc:creator>
            <dc:date>2026-06-17T07:30:27.857900000</dc:date>
          </office:change-info>
          <table:previous>
            <table:change-track-table-cell office:value-type="float" office:value="46192"/>
          </table:previous>
        </table:cell-content-change>
        <table:cell-content-change table:id="ct482">
          <table:cell-address table:column="11" table:row="236" table:table="0"/>
          <office:change-info>
            <dc:creator>Unknown Author</dc:creator>
            <dc:date>2026-06-17T07:30:27.857906300</dc:date>
          </office:change-info>
          <table:previous>
            <table:change-track-table-cell office:value-type="float" office:value="46192"/>
          </table:previous>
        </table:cell-content-change>
        <table:cell-content-change table:id="ct483">
          <table:cell-address table:column="11" table:row="237" table:table="0"/>
          <office:change-info>
            <dc:creator>Unknown Author</dc:creator>
            <dc:date>2026-06-17T07:30:27.857912400</dc:date>
          </office:change-info>
          <table:previous>
            <table:change-track-table-cell office:value-type="float" office:value="46192"/>
          </table:previous>
        </table:cell-content-change>
        <table:cell-content-change table:id="ct484">
          <table:cell-address table:column="11" table:row="238" table:table="0"/>
          <office:change-info>
            <dc:creator>Unknown Author</dc:creator>
            <dc:date>2026-06-17T07:30:27.857918800</dc:date>
          </office:change-info>
          <table:previous>
            <table:change-track-table-cell office:value-type="float" office:value="46192"/>
          </table:previous>
        </table:cell-content-change>
        <table:cell-content-change table:id="ct485">
          <table:cell-address table:column="11" table:row="239" table:table="0"/>
          <office:change-info>
            <dc:creator>Unknown Author</dc:creator>
            <dc:date>2026-06-17T07:30:27.857924900</dc:date>
          </office:change-info>
          <table:previous>
            <table:change-track-table-cell office:value-type="float" office:value="46195"/>
          </table:previous>
        </table:cell-content-change>
        <table:cell-content-change table:id="ct486">
          <table:cell-address table:column="11" table:row="240" table:table="0"/>
          <office:change-info>
            <dc:creator>Unknown Author</dc:creator>
            <dc:date>2026-06-17T07:30:27.857931000</dc:date>
          </office:change-info>
          <table:previous>
            <table:change-track-table-cell office:value-type="float" office:value="46195"/>
          </table:previous>
        </table:cell-content-change>
        <table:cell-content-change table:id="ct487">
          <table:cell-address table:column="11" table:row="241" table:table="0"/>
          <office:change-info>
            <dc:creator>Unknown Author</dc:creator>
            <dc:date>2026-06-17T07:30:27.857937200</dc:date>
          </office:change-info>
          <table:previous>
            <table:change-track-table-cell office:value-type="float" office:value="46196"/>
          </table:previous>
        </table:cell-content-change>
        <table:cell-content-change table:id="ct488">
          <table:cell-address table:column="11" table:row="242" table:table="0"/>
          <office:change-info>
            <dc:creator>Unknown Author</dc:creator>
            <dc:date>2026-06-17T07:30:27.857943100</dc:date>
          </office:change-info>
          <table:previous>
            <table:change-track-table-cell/>
          </table:previous>
        </table:cell-content-change>
        <table:cell-content-change table:id="ct489">
          <table:cell-address table:column="11" table:row="243" table:table="0"/>
          <office:change-info>
            <dc:creator>Unknown Author</dc:creator>
            <dc:date>2026-06-17T07:30:27.857949100</dc:date>
          </office:change-info>
          <table:previous>
            <table:change-track-table-cell office:value-type="float" office:value="46196"/>
          </table:previous>
        </table:cell-content-change>
        <table:cell-content-change table:id="ct490">
          <table:cell-address table:column="11" table:row="244" table:table="0"/>
          <office:change-info>
            <dc:creator>Unknown Author</dc:creator>
            <dc:date>2026-06-17T07:30:27.857955200</dc:date>
          </office:change-info>
          <table:previous>
            <table:change-track-table-cell office:value-type="float" office:value="46196"/>
          </table:previous>
        </table:cell-content-change>
        <table:cell-content-change table:id="ct491">
          <table:cell-address table:column="11" table:row="245" table:table="0"/>
          <office:change-info>
            <dc:creator>Unknown Author</dc:creator>
            <dc:date>2026-06-17T07:30:27.857961300</dc:date>
          </office:change-info>
          <table:previous>
            <table:change-track-table-cell office:value-type="float" office:value="46196"/>
          </table:previous>
        </table:cell-content-change>
        <table:cell-content-change table:id="ct492">
          <table:cell-address table:column="11" table:row="246" table:table="0"/>
          <office:change-info>
            <dc:creator>Unknown Author</dc:creator>
            <dc:date>2026-06-17T07:30:27.857967400</dc:date>
          </office:change-info>
          <table:previous>
            <table:change-track-table-cell office:value-type="float" office:value="46196"/>
          </table:previous>
        </table:cell-content-change>
        <table:cell-content-change table:id="ct493">
          <table:cell-address table:column="12" table:row="227" table:table="0"/>
          <office:change-info>
            <dc:creator>Unknown Author</dc:creator>
            <dc:date>2026-06-17T07:30:27.857974000</dc:date>
          </office:change-info>
          <table:previous>
            <table:change-track-table-cell office:value-type="float" office:value="46196"/>
          </table:previous>
        </table:cell-content-change>
        <table:cell-content-change table:id="ct494">
          <table:cell-address table:column="12" table:row="228" table:table="0"/>
          <office:change-info>
            <dc:creator>Unknown Author</dc:creator>
            <dc:date>2026-06-17T07:30:27.857980600</dc:date>
          </office:change-info>
          <table:previous>
            <table:change-track-table-cell office:value-type="float" office:value="46191"/>
          </table:previous>
        </table:cell-content-change>
        <table:cell-content-change table:id="ct495">
          <table:cell-address table:column="12" table:row="229" table:table="0"/>
          <office:change-info>
            <dc:creator>Unknown Author</dc:creator>
            <dc:date>2026-06-17T07:30:27.857986900</dc:date>
          </office:change-info>
          <table:previous>
            <table:change-track-table-cell office:value-type="float" office:value="46191"/>
          </table:previous>
        </table:cell-content-change>
        <table:cell-content-change table:id="ct496">
          <table:cell-address table:column="12" table:row="230" table:table="0"/>
          <office:change-info>
            <dc:creator>Unknown Author</dc:creator>
            <dc:date>2026-06-17T07:30:27.857993000</dc:date>
          </office:change-info>
          <table:previous>
            <table:change-track-table-cell office:value-type="float" office:value="46191"/>
          </table:previous>
        </table:cell-content-change>
        <table:cell-content-change table:id="ct497">
          <table:cell-address table:column="12" table:row="231" table:table="0"/>
          <office:change-info>
            <dc:creator>Unknown Author</dc:creator>
            <dc:date>2026-06-17T07:30:27.857999600</dc:date>
          </office:change-info>
          <table:previous>
            <table:change-track-table-cell office:value-type="float" office:value="46191"/>
          </table:previous>
        </table:cell-content-change>
        <table:cell-content-change table:id="ct498">
          <table:cell-address table:column="12" table:row="232" table:table="0"/>
          <office:change-info>
            <dc:creator>Unknown Author</dc:creator>
            <dc:date>2026-06-17T07:30:27.858005900</dc:date>
          </office:change-info>
          <table:previous>
            <table:change-track-table-cell office:value-type="float" office:value="46191"/>
          </table:previous>
        </table:cell-content-change>
        <table:cell-content-change table:id="ct499">
          <table:cell-address table:column="12" table:row="233" table:table="0"/>
          <office:change-info>
            <dc:creator>Unknown Author</dc:creator>
            <dc:date>2026-06-17T07:30:27.858012000</dc:date>
          </office:change-info>
          <table:previous>
            <table:change-track-table-cell office:value-type="float" office:value="46191"/>
          </table:previous>
        </table:cell-content-change>
        <table:cell-content-change table:id="ct500">
          <table:cell-address table:column="12" table:row="234" table:table="0"/>
          <office:change-info>
            <dc:creator>Unknown Author</dc:creator>
            <dc:date>2026-06-17T07:30:27.858017800</dc:date>
          </office:change-info>
          <table:previous>
            <table:change-track-table-cell/>
          </table:previous>
        </table:cell-content-change>
        <table:cell-content-change table:id="ct501">
          <table:cell-address table:column="12" table:row="235" table:table="0"/>
          <office:change-info>
            <dc:creator>Unknown Author</dc:creator>
            <dc:date>2026-06-17T07:30:27.858023800</dc:date>
          </office:change-info>
          <table:previous>
            <table:change-track-table-cell office:value-type="float" office:value="46192"/>
          </table:previous>
        </table:cell-content-change>
        <table:cell-content-change table:id="ct502">
          <table:cell-address table:column="12" table:row="236" table:table="0"/>
          <office:change-info>
            <dc:creator>Unknown Author</dc:creator>
            <dc:date>2026-06-17T07:30:27.858030100</dc:date>
          </office:change-info>
          <table:previous>
            <table:change-track-table-cell office:value-type="float" office:value="46192"/>
          </table:previous>
        </table:cell-content-change>
        <table:cell-content-change table:id="ct503">
          <table:cell-address table:column="12" table:row="237" table:table="0"/>
          <office:change-info>
            <dc:creator>Unknown Author</dc:creator>
            <dc:date>2026-06-17T07:30:27.858036800</dc:date>
          </office:change-info>
          <table:previous>
            <table:change-track-table-cell office:value-type="float" office:value="46192"/>
          </table:previous>
        </table:cell-content-change>
        <table:cell-content-change table:id="ct504">
          <table:cell-address table:column="12" table:row="238" table:table="0"/>
          <office:change-info>
            <dc:creator>Unknown Author</dc:creator>
            <dc:date>2026-06-17T07:30:27.858043000</dc:date>
          </office:change-info>
          <table:previous>
            <table:change-track-table-cell office:value-type="float" office:value="46192"/>
          </table:previous>
        </table:cell-content-change>
        <table:cell-content-change table:id="ct505">
          <table:cell-address table:column="12" table:row="239" table:table="0"/>
          <office:change-info>
            <dc:creator>Unknown Author</dc:creator>
            <dc:date>2026-06-17T07:30:27.858049100</dc:date>
          </office:change-info>
          <table:previous>
            <table:change-track-table-cell office:value-type="float" office:value="46196"/>
          </table:previous>
        </table:cell-content-change>
        <table:cell-content-change table:id="ct506">
          <table:cell-address table:column="12" table:row="240" table:table="0"/>
          <office:change-info>
            <dc:creator>Unknown Author</dc:creator>
            <dc:date>2026-06-17T07:30:27.858055400</dc:date>
          </office:change-info>
          <table:previous>
            <table:change-track-table-cell office:value-type="float" office:value="46196"/>
          </table:previous>
        </table:cell-content-change>
        <table:cell-content-change table:id="ct507">
          <table:cell-address table:column="12" table:row="241" table:table="0"/>
          <office:change-info>
            <dc:creator>Unknown Author</dc:creator>
            <dc:date>2026-06-17T07:30:27.858062000</dc:date>
          </office:change-info>
          <table:previous>
            <table:change-track-table-cell office:value-type="float" office:value="46196"/>
          </table:previous>
        </table:cell-content-change>
        <table:cell-content-change table:id="ct508">
          <table:cell-address table:column="12" table:row="242" table:table="0"/>
          <office:change-info>
            <dc:creator>Unknown Author</dc:creator>
            <dc:date>2026-06-17T07:30:27.858068300</dc:date>
          </office:change-info>
          <table:previous>
            <table:change-track-table-cell/>
          </table:previous>
        </table:cell-content-change>
        <table:cell-content-change table:id="ct509">
          <table:cell-address table:column="12" table:row="243" table:table="0"/>
          <office:change-info>
            <dc:creator>Unknown Author</dc:creator>
            <dc:date>2026-06-17T07:30:27.858074200</dc:date>
          </office:change-info>
          <table:previous>
            <table:change-track-table-cell office:value-type="float" office:value="46196"/>
          </table:previous>
        </table:cell-content-change>
        <table:cell-content-change table:id="ct510">
          <table:cell-address table:column="12" table:row="244" table:table="0"/>
          <office:change-info>
            <dc:creator>Unknown Author</dc:creator>
            <dc:date>2026-06-17T07:30:27.858080300</dc:date>
          </office:change-info>
          <table:previous>
            <table:change-track-table-cell office:value-type="float" office:value="46196"/>
          </table:previous>
        </table:cell-content-change>
        <table:cell-content-change table:id="ct511">
          <table:cell-address table:column="12" table:row="245" table:table="0"/>
          <office:change-info>
            <dc:creator>Unknown Author</dc:creator>
            <dc:date>2026-06-17T07:30:27.858086700</dc:date>
          </office:change-info>
          <table:previous>
            <table:change-track-table-cell office:value-type="float" office:value="46196"/>
          </table:previous>
        </table:cell-content-change>
        <table:cell-content-change table:id="ct512">
          <table:cell-address table:column="12" table:row="246" table:table="0"/>
          <office:change-info>
            <dc:creator>Unknown Author</dc:creator>
            <dc:date>2026-06-17T07:30:27.858092900</dc:date>
          </office:change-info>
          <table:previous>
            <table:change-track-table-cell office:value-type="float" office:value="46196"/>
          </table:previous>
        </table:cell-content-change>
        <table:cell-content-change table:id="ct513">
          <table:cell-address table:column="11" table:row="234" table:table="0"/>
          <office:change-info>
            <dc:creator>Unknown Author</dc:creator>
            <dc:date>2026-06-17T07:30:47.008340800</dc:date>
          </office:change-info>
          <table:previous table:id="ct480">
            <table:change-track-table-cell office:value-type="float" office:value="-1"/>
          </table:previous>
        </table:cell-content-change>
        <table:cell-content-change table:id="ct514">
          <table:cell-address table:column="12" table:row="234" table:table="0"/>
          <office:change-info>
            <dc:creator>Unknown Author</dc:creator>
            <dc:date>2026-06-17T07:30:47.008352900</dc:date>
          </office:change-info>
          <table:previous table:id="ct500">
            <table:change-track-table-cell office:value-type="float" office:value="-1"/>
          </table:previous>
        </table:cell-content-change>
        <table:cell-content-change table:id="ct515">
          <table:cell-address table:column="11" table:row="242" table:table="0"/>
          <office:change-info>
            <dc:creator>Unknown Author</dc:creator>
            <dc:date>2026-06-17T07:30:58.703676700</dc:date>
          </office:change-info>
          <table:previous table:id="ct488">
            <table:change-track-table-cell office:value-type="float" office:value="-1"/>
          </table:previous>
        </table:cell-content-change>
        <table:cell-content-change table:id="ct516">
          <table:cell-address table:column="12" table:row="242" table:table="0"/>
          <office:change-info>
            <dc:creator>Unknown Author</dc:creator>
            <dc:date>2026-06-17T07:30:58.703690300</dc:date>
          </office:change-info>
          <table:previous table:id="ct508">
            <table:change-track-table-cell office:value-type="float" office:value="-1"/>
          </table:previous>
        </table:cell-content-change>
        <table:cell-content-change table:id="ct517">
          <table:cell-address table:column="16" table:row="242" table:table="0"/>
          <office:change-info>
            <dc:creator>Unknown Author</dc:creator>
            <dc:date>2026-06-17T07:31:01.315287700</dc:date>
          </office:change-info>
          <table:previous>
            <table:change-track-table-cell office:value-type="float" office:value="0"/>
          </table:previous>
        </table:cell-content-change>
        <table:cell-content-change table:id="ct518">
          <table:cell-address table:column="10" table:row="227" table:table="0"/>
          <office:change-info>
            <dc:creator>Unknown Author</dc:creator>
            <dc:date>2026-06-17T07:35:00.011032300</dc:date>
          </office:change-info>
          <table:previous>
            <table:change-track-table-cell/>
          </table:previous>
        </table:cell-content-change>
        <table:cell-content-change table:id="ct519">
          <table:cell-address table:column="13" table:row="227" table:table="0"/>
          <office:change-info>
            <dc:creator>Unknown Author</dc:creator>
            <dc:date>2026-06-17T07:35:12.602167300</dc:date>
          </office:change-info>
          <table:previous>
            <table:change-track-table-cell office:value-type="float" office:value="265329"/>
          </table:previous>
        </table:cell-content-change>
        <table:cell-content-change table:id="ct520">
          <table:cell-address table:column="10" table:row="227" table:table="0"/>
          <office:change-info>
            <dc:creator>Unknown Author</dc:creator>
            <dc:date>2026-06-17T07:35:26.766619400</dc:date>
          </office:change-info>
          <table:previous table:id="ct518">
            <table:change-track-table-cell office:value-type="float" office:value="21915"/>
          </table:previous>
        </table:cell-content-change>
        <table:cell-content-change table:id="ct521">
          <table:cell-address table:column="13" table:row="227" table:table="0"/>
          <office:change-info>
            <dc:creator>Unknown Author</dc:creator>
            <dc:date>2026-06-17T07:35:33.176323700</dc:date>
          </office:change-info>
          <table:previous table:id="ct519">
            <table:change-track-table-cell office:value-type="float" office:value="243414"/>
          </table:previous>
        </table:cell-content-change>
        <table:cell-content-change table:id="ct522">
          <table:cell-address table:column="13" table:row="195" table:table="0"/>
          <office:change-info>
            <dc:creator>Unknown Author</dc:creator>
            <dc:date>2026-06-17T07:35:44.431850600</dc:date>
          </office:change-info>
          <table:previous>
            <table:change-track-table-cell office:value-type="float" office:value="265329"/>
          </table:previous>
        </table:cell-content-change>
        <table:cell-content-change table:id="ct523">
          <table:cell-address table:column="13" table:row="196" table:table="0"/>
          <office:change-info>
            <dc:creator>Unknown Author</dc:creator>
            <dc:date>2026-06-17T07:35:52.974728000</dc:date>
          </office:change-info>
          <table:previous table:id="ct240">
            <table:change-track-table-cell office:value-type="float" office:value="265329"/>
          </table:previous>
        </table:cell-content-change>
        <table:cell-content-change table:id="ct524">
          <table:cell-address table:column="13" table:row="197" table:table="0"/>
          <office:change-info>
            <dc:creator>Unknown Author</dc:creator>
            <dc:date>2026-06-17T07:35:52.974759100</dc:date>
          </office:change-info>
          <table:previous>
            <table:change-track-table-cell office:value-type="float" office:value="265329"/>
          </table:previous>
        </table:cell-content-change>
        <table:cell-content-change table:id="ct525">
          <table:cell-address table:column="13" table:row="198" table:table="0"/>
          <office:change-info>
            <dc:creator>Unknown Author</dc:creator>
            <dc:date>2026-06-17T07:35:52.974774600</dc:date>
          </office:change-info>
          <table:previous>
            <table:change-track-table-cell office:value-type="float" office:value="265329"/>
          </table:previous>
        </table:cell-content-change>
        <table:cell-content-change table:id="ct526">
          <table:cell-address table:column="13" table:row="199" table:table="0"/>
          <office:change-info>
            <dc:creator>Unknown Author</dc:creator>
            <dc:date>2026-06-17T07:35:58.326580800</dc:date>
          </office:change-info>
          <table:previous>
            <table:change-track-table-cell office:value-type="float" office:value="265328"/>
          </table:previous>
        </table:cell-content-change>
        <table:cell-content-change table:id="ct527">
          <table:cell-address table:column="13" table:row="200" table:table="0"/>
          <office:change-info>
            <dc:creator>Unknown Author</dc:creator>
            <dc:date>2026-06-17T07:36:02.818834600</dc:date>
          </office:change-info>
          <table:previous>
            <table:change-track-table-cell office:value-type="float" office:value="265328"/>
          </table:previous>
        </table:cell-content-change>
        <table:cell-content-change table:id="ct528">
          <table:cell-address table:column="13" table:row="201" table:table="0"/>
          <office:change-info>
            <dc:creator>Unknown Author</dc:creator>
            <dc:date>2026-06-17T07:36:02.818892900</dc:date>
          </office:change-info>
          <table:previous>
            <table:change-track-table-cell office:value-type="float" office:value="265328"/>
          </table:previous>
        </table:cell-content-change>
        <table:cell-content-change table:id="ct529">
          <table:cell-address table:column="13" table:row="202" table:table="0"/>
          <office:change-info>
            <dc:creator>Unknown Author</dc:creator>
            <dc:date>2026-06-17T07:36:02.818909900</dc:date>
          </office:change-info>
          <table:previous>
            <table:change-track-table-cell office:value-type="float" office:value="265328"/>
          </table:previous>
        </table:cell-content-change>
        <table:cell-content-change table:id="ct530">
          <table:cell-address table:column="13" table:row="203" table:table="0"/>
          <office:change-info>
            <dc:creator>Unknown Author</dc:creator>
            <dc:date>2026-06-17T07:36:02.818925100</dc:date>
          </office:change-info>
          <table:previous>
            <table:change-track-table-cell office:value-type="float" office:value="265328"/>
          </table:previous>
        </table:cell-content-change>
        <table:cell-content-change table:id="ct531">
          <table:cell-address table:column="13" table:row="204" table:table="0"/>
          <office:change-info>
            <dc:creator>Unknown Author</dc:creator>
            <dc:date>2026-06-17T07:36:10.529503000</dc:date>
          </office:change-info>
          <table:previous>
            <table:change-track-table-cell office:value-type="float" office:value="265329"/>
          </table:previous>
        </table:cell-content-change>
        <table:cell-content-change table:id="ct532">
          <table:cell-address table:column="13" table:row="205" table:table="0"/>
          <office:change-info>
            <dc:creator>Unknown Author</dc:creator>
            <dc:date>2026-06-17T07:36:14.935061900</dc:date>
          </office:change-info>
          <table:previous>
            <table:change-track-table-cell office:value-type="float" office:value="265329"/>
          </table:previous>
        </table:cell-content-change>
        <table:cell-content-change table:id="ct533">
          <table:cell-address table:column="13" table:row="206" table:table="0"/>
          <office:change-info>
            <dc:creator>Unknown Author</dc:creator>
            <dc:date>2026-06-17T07:36:14.935100800</dc:date>
          </office:change-info>
          <table:previous>
            <table:change-track-table-cell office:value-type="float" office:value="265329"/>
          </table:previous>
        </table:cell-content-change>
        <table:cell-content-change table:id="ct534">
          <table:cell-address table:column="13" table:row="207" table:table="0"/>
          <office:change-info>
            <dc:creator>Unknown Author</dc:creator>
            <dc:date>2026-06-17T07:36:14.935110400</dc:date>
          </office:change-info>
          <table:previous>
            <table:change-track-table-cell office:value-type="float" office:value="265329"/>
          </table:previous>
        </table:cell-content-change>
        <table:cell-content-change table:id="ct535">
          <table:cell-address table:column="13" table:row="208" table:table="0"/>
          <office:change-info>
            <dc:creator>Unknown Author</dc:creator>
            <dc:date>2026-06-17T07:36:14.935120900</dc:date>
          </office:change-info>
          <table:previous>
            <table:change-track-table-cell office:value-type="float" office:value="265329"/>
          </table:previous>
        </table:cell-content-change>
        <table:cell-content-change table:id="ct536">
          <table:cell-address table:column="13" table:row="209" table:table="0"/>
          <office:change-info>
            <dc:creator>Unknown Author</dc:creator>
            <dc:date>2026-06-17T07:36:14.935129700</dc:date>
          </office:change-info>
          <table:previous>
            <table:change-track-table-cell office:value-type="float" office:value="265329"/>
          </table:previous>
        </table:cell-content-change>
        <table:cell-content-change table:id="ct537">
          <table:cell-address table:column="13" table:row="210" table:table="0"/>
          <office:change-info>
            <dc:creator>Unknown Author</dc:creator>
            <dc:date>2026-06-17T07:36:20.024919600</dc:date>
          </office:change-info>
          <table:previous>
            <table:change-track-table-cell office:value-type="float" office:value="265328"/>
          </table:previous>
        </table:cell-content-change>
        <table:cell-content-change table:id="ct538">
          <table:cell-address table:column="13" table:row="211" table:table="0"/>
          <office:change-info>
            <dc:creator>Unknown Author</dc:creator>
            <dc:date>2026-06-17T07:36:24.182735500</dc:date>
          </office:change-info>
          <table:previous>
            <table:change-track-table-cell office:value-type="float" office:value="265329"/>
          </table:previous>
        </table:cell-content-change>
        <table:cell-content-change table:id="ct539">
          <table:cell-address table:column="14" table:row="195" table:table="0"/>
          <office:change-info>
            <dc:creator>Unknown Author</dc:creator>
            <dc:date>2026-06-17T07:36:30.617072700</dc:date>
          </office:change-info>
          <table:previous>
            <table:change-track-table-cell office:value-type="float" office:value="265330"/>
          </table:previous>
        </table:cell-content-change>
        <table:cell-content-change table:id="ct540">
          <table:cell-address table:column="14" table:row="196" table:table="0"/>
          <office:change-info>
            <dc:creator>Unknown Author</dc:creator>
            <dc:date>2026-06-17T07:36:34.563072100</dc:date>
          </office:change-info>
          <table:previous>
            <table:change-track-table-cell office:value-type="float" office:value="265330"/>
          </table:previous>
        </table:cell-content-change>
        <table:cell-content-change table:id="ct541">
          <table:cell-address table:column="14" table:row="197" table:table="0"/>
          <office:change-info>
            <dc:creator>Unknown Author</dc:creator>
            <dc:date>2026-06-17T07:36:34.563112500</dc:date>
          </office:change-info>
          <table:previous>
            <table:change-track-table-cell office:value-type="float" office:value="265330"/>
          </table:previous>
        </table:cell-content-change>
        <table:cell-content-change table:id="ct542">
          <table:cell-address table:column="14" table:row="198" table:table="0"/>
          <office:change-info>
            <dc:creator>Unknown Author</dc:creator>
            <dc:date>2026-06-17T07:36:34.563121900</dc:date>
          </office:change-info>
          <table:previous>
            <table:change-track-table-cell office:value-type="float" office:value="265330"/>
          </table:previous>
        </table:cell-content-change>
        <table:cell-content-change table:id="ct543">
          <table:cell-address table:column="14" table:row="199" table:table="0"/>
          <office:change-info>
            <dc:creator>Unknown Author</dc:creator>
            <dc:date>2026-06-17T07:36:40.104868000</dc:date>
          </office:change-info>
          <table:previous>
            <table:change-track-table-cell office:value-type="float" office:value="265328"/>
          </table:previous>
        </table:cell-content-change>
        <table:cell-content-change table:id="ct544">
          <table:cell-address table:column="14" table:row="200" table:table="0"/>
          <office:change-info>
            <dc:creator>Unknown Author</dc:creator>
            <dc:date>2026-06-17T07:36:46.582658900</dc:date>
          </office:change-info>
          <table:previous>
            <table:change-track-table-cell office:value-type="float" office:value="265328"/>
          </table:previous>
        </table:cell-content-change>
        <table:cell-content-change table:id="ct545">
          <table:cell-address table:column="14" table:row="201" table:table="0"/>
          <office:change-info>
            <dc:creator>Unknown Author</dc:creator>
            <dc:date>2026-06-17T07:36:46.582701000</dc:date>
          </office:change-info>
          <table:previous>
            <table:change-track-table-cell office:value-type="float" office:value="265328"/>
          </table:previous>
        </table:cell-content-change>
        <table:cell-content-change table:id="ct546">
          <table:cell-address table:column="14" table:row="202" table:table="0"/>
          <office:change-info>
            <dc:creator>Unknown Author</dc:creator>
            <dc:date>2026-06-17T07:36:46.582710300</dc:date>
          </office:change-info>
          <table:previous>
            <table:change-track-table-cell office:value-type="float" office:value="265328"/>
          </table:previous>
        </table:cell-content-change>
        <table:cell-content-change table:id="ct547">
          <table:cell-address table:column="14" table:row="203" table:table="0"/>
          <office:change-info>
            <dc:creator>Unknown Author</dc:creator>
            <dc:date>2026-06-17T07:36:46.582719400</dc:date>
          </office:change-info>
          <table:previous>
            <table:change-track-table-cell office:value-type="float" office:value="265328"/>
          </table:previous>
        </table:cell-content-change>
        <table:cell-content-change table:id="ct548">
          <table:cell-address table:column="14" table:row="210" table:table="0"/>
          <office:change-info>
            <dc:creator>Unknown Author</dc:creator>
            <dc:date>2026-06-17T07:36:50.352437400</dc:date>
          </office:change-info>
          <table:previous>
            <table:change-track-table-cell office:value-type="float" office:value="265328"/>
          </table:previous>
        </table:cell-content-change>
        <table:cell-content-change table:id="ct549">
          <table:cell-address table:column="14" table:row="211" table:table="0"/>
          <office:change-info>
            <dc:creator>Unknown Author</dc:creator>
            <dc:date>2026-06-17T07:36:55.323592000</dc:date>
          </office:change-info>
          <table:previous>
            <table:change-track-table-cell office:value-type="float" office:value="265330"/>
          </table:previous>
        </table:cell-content-change>
        <table:cell-content-change table:id="ct550">
          <table:cell-address table:column="14" table:row="204" table:table="0"/>
          <office:change-info>
            <dc:creator>Unknown Author</dc:creator>
            <dc:date>2026-06-17T07:37:00.594326100</dc:date>
          </office:change-info>
          <table:previous>
            <table:change-track-table-cell office:value-type="float" office:value="265330"/>
          </table:previous>
        </table:cell-content-change>
        <table:cell-content-change table:id="ct551">
          <table:cell-address table:column="14" table:row="205" table:table="0"/>
          <office:change-info>
            <dc:creator>Unknown Author</dc:creator>
            <dc:date>2026-06-17T07:37:00.594378700</dc:date>
          </office:change-info>
          <table:previous>
            <table:change-track-table-cell office:value-type="float" office:value="265330"/>
          </table:previous>
        </table:cell-content-change>
        <table:cell-content-change table:id="ct552">
          <table:cell-address table:column="14" table:row="206" table:table="0"/>
          <office:change-info>
            <dc:creator>Unknown Author</dc:creator>
            <dc:date>2026-06-17T07:37:00.594395700</dc:date>
          </office:change-info>
          <table:previous>
            <table:change-track-table-cell office:value-type="float" office:value="265330"/>
          </table:previous>
        </table:cell-content-change>
        <table:cell-content-change table:id="ct553">
          <table:cell-address table:column="14" table:row="207" table:table="0"/>
          <office:change-info>
            <dc:creator>Unknown Author</dc:creator>
            <dc:date>2026-06-17T07:37:00.594412000</dc:date>
          </office:change-info>
          <table:previous>
            <table:change-track-table-cell office:value-type="float" office:value="265330"/>
          </table:previous>
        </table:cell-content-change>
        <table:cell-content-change table:id="ct554">
          <table:cell-address table:column="14" table:row="208" table:table="0"/>
          <office:change-info>
            <dc:creator>Unknown Author</dc:creator>
            <dc:date>2026-06-17T07:37:00.594431100</dc:date>
          </office:change-info>
          <table:previous>
            <table:change-track-table-cell office:value-type="float" office:value="265330"/>
          </table:previous>
        </table:cell-content-change>
        <table:cell-content-change table:id="ct555">
          <table:cell-address table:column="14" table:row="209" table:table="0"/>
          <office:change-info>
            <dc:creator>Unknown Author</dc:creator>
            <dc:date>2026-06-17T07:37:00.594439700</dc:date>
          </office:change-info>
          <table:previous>
            <table:change-track-table-cell office:value-type="float" office:value="265330"/>
          </table:previous>
        </table:cell-content-change>
        <table:cell-content-change table:id="ct556">
          <table:cell-address table:column="14" table:row="214" table:table="0"/>
          <office:change-info>
            <dc:creator>Unknown Author</dc:creator>
            <dc:date>2026-06-17T07:37:14.676694800</dc:date>
          </office:change-info>
          <table:previous>
            <table:change-track-table-cell office:value-type="float" office:value="265330"/>
          </table:previous>
        </table:cell-content-change>
        <table:cell-content-change table:id="ct557">
          <table:cell-address table:column="14" table:row="215" table:table="0"/>
          <office:change-info>
            <dc:creator>Unknown Author</dc:creator>
            <dc:date>2026-06-17T07:37:18.931707000</dc:date>
          </office:change-info>
          <table:previous>
            <table:change-track-table-cell office:value-type="float" office:value="265333"/>
          </table:previous>
        </table:cell-content-change>
        <table:cell-content-change table:id="ct558">
          <table:cell-address table:column="14" table:row="216" table:table="0"/>
          <office:change-info>
            <dc:creator>Unknown Author</dc:creator>
            <dc:date>2026-06-17T07:37:22.400547800</dc:date>
          </office:change-info>
          <table:previous table:id="ct326">
            <table:change-track-table-cell office:value-type="float" office:value="265333"/>
          </table:previous>
        </table:cell-content-change>
        <table:cell-content-change table:id="ct559">
          <table:cell-address table:column="14" table:row="217" table:table="0"/>
          <office:change-info>
            <dc:creator>Unknown Author</dc:creator>
            <dc:date>2026-06-17T07:37:26.103176500</dc:date>
          </office:change-info>
          <table:previous table:id="ct358">
            <table:change-track-table-cell office:value-type="float" office:value="265335"/>
          </table:previous>
        </table:cell-content-change>
        <table:cell-content-change table:id="ct560">
          <table:cell-address table:column="14" table:row="218" table:table="0"/>
          <office:change-info>
            <dc:creator>Unknown Author</dc:creator>
            <dc:date>2026-06-17T07:37:30.500479700</dc:date>
          </office:change-info>
          <table:previous>
            <table:change-track-table-cell office:value-type="float" office:value="265330"/>
          </table:previous>
        </table:cell-content-change>
        <table:cell-content-change table:id="ct561">
          <table:cell-address table:column="14" table:row="219" table:table="0"/>
          <office:change-info>
            <dc:creator>Unknown Author</dc:creator>
            <dc:date>2026-06-17T07:37:33.437553500</dc:date>
          </office:change-info>
          <table:previous>
            <table:change-track-table-cell office:value-type="float" office:value="265333"/>
          </table:previous>
        </table:cell-content-change>
        <table:cell-content-change table:id="ct562">
          <table:cell-address table:column="14" table:row="220" table:table="0"/>
          <office:change-info>
            <dc:creator>Unknown Author</dc:creator>
            <dc:date>2026-06-17T07:37:36.593652800</dc:date>
          </office:change-info>
          <table:previous table:id="ct324">
            <table:change-track-table-cell office:value-type="float" office:value="265333"/>
          </table:previous>
        </table:cell-content-change>
        <table:cell-content-change table:id="ct563">
          <table:cell-address table:column="14" table:row="221" table:table="0"/>
          <office:change-info>
            <dc:creator>Unknown Author</dc:creator>
            <dc:date>2026-06-17T07:37:41.648789100</dc:date>
          </office:change-info>
          <table:previous table:id="ct325">
            <table:change-track-table-cell office:value-type="float" office:value="265333"/>
          </table:previous>
        </table:cell-content-change>
        <table:cell-content-change table:id="ct564">
          <table:cell-address table:column="14" table:row="223" table:table="0"/>
          <office:change-info>
            <dc:creator>Unknown Author</dc:creator>
            <dc:date>2026-06-17T07:37:45.219984100</dc:date>
          </office:change-info>
          <table:previous table:id="ct328">
            <table:change-track-table-cell office:value-type="float" office:value="265334"/>
          </table:previous>
        </table:cell-content-change>
        <table:cell-content-change table:id="ct565">
          <table:cell-address table:column="14" table:row="224" table:table="0"/>
          <office:change-info>
            <dc:creator>Unknown Author</dc:creator>
            <dc:date>2026-06-17T07:37:48.165596900</dc:date>
          </office:change-info>
          <table:previous table:id="ct357">
            <table:change-track-table-cell office:value-type="float" office:value="265335"/>
          </table:previous>
        </table:cell-content-change>
        <table:cell-content-change table:id="ct566">
          <table:cell-address table:column="14" table:row="225" table:table="0"/>
          <office:change-info>
            <dc:creator>Unknown Author</dc:creator>
            <dc:date>2026-06-17T07:37:51.194081000</dc:date>
          </office:change-info>
          <table:previous>
            <table:change-track-table-cell office:value-type="float" office:value="265333"/>
          </table:previous>
        </table:cell-content-change>
        <table:cell-content-change table:id="ct567">
          <table:cell-address table:column="13" table:row="219" table:table="0"/>
          <office:change-info>
            <dc:creator>Unknown Author</dc:creator>
            <dc:date>2026-06-17T07:38:03.494802700</dc:date>
          </office:change-info>
          <table:previous>
            <table:change-track-table-cell office:value-type="float" office:value="265333"/>
          </table:previous>
        </table:cell-content-change>
        <table:cell-content-change table:id="ct568">
          <table:cell-address table:column="13" table:row="220" table:table="0"/>
          <office:change-info>
            <dc:creator>Unknown Author</dc:creator>
            <dc:date>2026-06-17T07:38:03.494843900</dc:date>
          </office:change-info>
          <table:previous>
            <table:change-track-table-cell office:value-type="float" office:value="265333"/>
          </table:previous>
        </table:cell-content-change>
        <table:cell-content-change table:id="ct569">
          <table:cell-address table:column="13" table:row="221" table:table="0"/>
          <office:change-info>
            <dc:creator>Unknown Author</dc:creator>
            <dc:date>2026-06-17T07:38:03.494854100</dc:date>
          </office:change-info>
          <table:previous>
            <table:change-track-table-cell office:value-type="float" office:value="265333"/>
          </table:previous>
        </table:cell-content-change>
        <table:cell-content-change table:id="ct570">
          <table:cell-address table:column="13" table:row="222" table:table="0"/>
          <office:change-info>
            <dc:creator>Unknown Author</dc:creator>
            <dc:date>2026-06-17T07:38:03.494863200</dc:date>
          </office:change-info>
          <table:previous>
            <table:change-track-table-cell office:value-type="float" office:value="265333"/>
          </table:previous>
        </table:cell-content-change>
        <table:cell-content-change table:id="ct571">
          <table:cell-address table:column="13" table:row="223" table:table="0"/>
          <office:change-info>
            <dc:creator>Unknown Author</dc:creator>
            <dc:date>2026-06-17T07:38:03.494872300</dc:date>
          </office:change-info>
          <table:previous>
            <table:change-track-table-cell office:value-type="float" office:value="265333"/>
          </table:previous>
        </table:cell-content-change>
        <table:cell-content-change table:id="ct572">
          <table:cell-address table:column="13" table:row="224" table:table="0"/>
          <office:change-info>
            <dc:creator>Unknown Author</dc:creator>
            <dc:date>2026-06-17T07:38:03.494881500</dc:date>
          </office:change-info>
          <table:previous>
            <table:change-track-table-cell office:value-type="float" office:value="265333"/>
          </table:previous>
        </table:cell-content-change>
        <table:cell-content-change table:id="ct573">
          <table:cell-address table:column="13" table:row="225" table:table="0"/>
          <office:change-info>
            <dc:creator>Unknown Author</dc:creator>
            <dc:date>2026-06-17T07:38:03.494890300</dc:date>
          </office:change-info>
          <table:previous>
            <table:change-track-table-cell office:value-type="float" office:value="265333"/>
          </table:previous>
        </table:cell-content-change>
        <table:cell-content-change table:id="ct574">
          <table:cell-address table:column="13" table:row="216" table:table="0"/>
          <office:change-info>
            <dc:creator>Unknown Author</dc:creator>
            <dc:date>2026-06-17T07:38:07.323146200</dc:date>
          </office:change-info>
          <table:previous table:id="ct321">
            <table:change-track-table-cell office:value-type="float" office:value="265333"/>
          </table:previous>
        </table:cell-content-change>
        <table:cell-content-change table:id="ct575">
          <table:cell-address table:column="13" table:row="217" table:table="0"/>
          <office:change-info>
            <dc:creator>Unknown Author</dc:creator>
            <dc:date>2026-06-17T07:38:07.323181600</dc:date>
          </office:change-info>
          <table:previous>
            <table:change-track-table-cell office:value-type="float" office:value="265333"/>
          </table:previous>
        </table:cell-content-change>
        <table:cell-content-change table:id="ct576">
          <table:cell-address table:column="13" table:row="218" table:table="0"/>
          <office:change-info>
            <dc:creator>Unknown Author</dc:creator>
            <dc:date>2026-06-17T07:38:24.926765000</dc:date>
          </office:change-info>
          <table:previous>
            <table:change-track-table-cell office:value-type="float" office:value="265330"/>
          </table:previous>
        </table:cell-content-change>
        <table:cell-content-change table:id="ct577">
          <table:cell-address table:column="13" table:row="213" table:table="0"/>
          <office:change-info>
            <dc:creator>Unknown Author</dc:creator>
            <dc:date>2026-06-17T07:38:29.276755600</dc:date>
          </office:change-info>
          <table:previous>
            <table:change-track-table-cell office:value-type="float" office:value="265330"/>
          </table:previous>
        </table:cell-content-change>
        <table:cell-content-change table:id="ct578">
          <table:cell-address table:column="13" table:row="214" table:table="0"/>
          <office:change-info>
            <dc:creator>Unknown Author</dc:creator>
            <dc:date>2026-06-17T07:38:29.276801200</dc:date>
          </office:change-info>
          <table:previous>
            <table:change-track-table-cell office:value-type="float" office:value="265330"/>
          </table:previous>
        </table:cell-content-change>
        <table:cell-content-change table:id="ct579">
          <table:cell-address table:column="13" table:row="215" table:table="0"/>
          <office:change-info>
            <dc:creator>Unknown Author</dc:creator>
            <dc:date>2026-06-17T07:38:29.276811400</dc:date>
          </office:change-info>
          <table:previous>
            <table:change-track-table-cell office:value-type="float" office:value="265330"/>
          </table:previous>
        </table:cell-content-change>
        <table:cell-content-change table:id="ct580">
          <table:cell-address table:column="12" table:row="213" table:table="0"/>
          <office:change-info>
            <dc:creator>Unknown Author</dc:creator>
            <dc:date>2026-06-17T07:38:31.922512000</dc:date>
          </office:change-info>
          <table:previous>
            <table:change-track-table-cell office:value-type="float" office:value="265330"/>
          </table:previous>
        </table:cell-content-change>
        <table:cell-content-change table:id="ct581">
          <table:cell-address table:column="12" table:row="214" table:table="0"/>
          <office:change-info>
            <dc:creator>Unknown Author</dc:creator>
            <dc:date>2026-06-17T07:38:31.922570100</dc:date>
          </office:change-info>
          <table:previous>
            <table:change-track-table-cell office:value-type="float" office:value="265330"/>
          </table:previous>
        </table:cell-content-change>
        <table:cell-content-change table:id="ct582">
          <table:cell-address table:column="12" table:row="215" table:table="0"/>
          <office:change-info>
            <dc:creator>Unknown Author</dc:creator>
            <dc:date>2026-06-17T07:38:31.922586800</dc:date>
          </office:change-info>
          <table:previous>
            <table:change-track-table-cell office:value-type="float" office:value="265330"/>
          </table:previous>
        </table:cell-content-change>
        <table:cell-content-change table:id="ct583">
          <table:cell-address table:column="11" table:row="213" table:table="0"/>
          <office:change-info>
            <dc:creator>Unknown Author</dc:creator>
            <dc:date>2026-06-17T07:38:37.946336800</dc:date>
          </office:change-info>
          <table:previous table:id="ct259">
            <table:change-track-table-cell office:value-type="float" office:value="265330"/>
          </table:previous>
        </table:cell-content-change>
        <table:cell-content-change table:id="ct584">
          <table:cell-address table:column="11" table:row="214" table:table="0"/>
          <office:change-info>
            <dc:creator>Unknown Author</dc:creator>
            <dc:date>2026-06-17T07:38:37.946390300</dc:date>
          </office:change-info>
          <table:previous>
            <table:change-track-table-cell office:value-type="float" office:value="265330"/>
          </table:previous>
        </table:cell-content-change>
        <table:cell-content-change table:id="ct585">
          <table:cell-address table:column="11" table:row="215" table:table="0"/>
          <office:change-info>
            <dc:creator>Unknown Author</dc:creator>
            <dc:date>2026-06-17T07:38:37.946420600</dc:date>
          </office:change-info>
          <table:previous>
            <table:change-track-table-cell office:value-type="float" office:value="265330"/>
          </table:previous>
        </table:cell-content-change>
        <table:cell-content-change table:id="ct586">
          <table:cell-address table:column="11" table:row="216" table:table="0"/>
          <office:change-info>
            <dc:creator>Unknown Author</dc:creator>
            <dc:date>2026-06-17T07:39:40.414357900</dc:date>
          </office:change-info>
          <table:previous>
            <table:change-track-table-cell office:value-type="float" office:value="265330"/>
          </table:previous>
        </table:cell-content-change>
        <table:cell-content-change table:id="ct587">
          <table:cell-address table:column="11" table:row="217" table:table="0"/>
          <office:change-info>
            <dc:creator>Unknown Author</dc:creator>
            <dc:date>2026-06-17T07:39:40.414423400</dc:date>
          </office:change-info>
          <table:previous>
            <table:change-track-table-cell office:value-type="float" office:value="265330"/>
          </table:previous>
        </table:cell-content-change>
        <table:cell-content-change table:id="ct588">
          <table:cell-address table:column="11" table:row="218" table:table="0"/>
          <office:change-info>
            <dc:creator>Unknown Author</dc:creator>
            <dc:date>2026-06-17T07:39:40.414440200</dc:date>
          </office:change-info>
          <table:previous>
            <table:change-track-table-cell office:value-type="float" office:value="265330"/>
          </table:previous>
        </table:cell-content-change>
        <table:cell-content-change table:id="ct589">
          <table:cell-address table:column="11" table:row="219" table:table="0"/>
          <office:change-info>
            <dc:creator>Unknown Author</dc:creator>
            <dc:date>2026-06-17T07:39:40.414455300</dc:date>
          </office:change-info>
          <table:previous>
            <table:change-track-table-cell office:value-type="float" office:value="265330"/>
          </table:previous>
        </table:cell-content-change>
        <table:cell-content-change table:id="ct590">
          <table:cell-address table:column="11" table:row="220" table:table="0"/>
          <office:change-info>
            <dc:creator>Unknown Author</dc:creator>
            <dc:date>2026-06-17T07:39:40.414470200</dc:date>
          </office:change-info>
          <table:previous>
            <table:change-track-table-cell office:value-type="float" office:value="265330"/>
          </table:previous>
        </table:cell-content-change>
        <table:cell-content-change table:id="ct591">
          <table:cell-address table:column="11" table:row="221" table:table="0"/>
          <office:change-info>
            <dc:creator>Unknown Author</dc:creator>
            <dc:date>2026-06-17T07:39:40.414485100</dc:date>
          </office:change-info>
          <table:previous>
            <table:change-track-table-cell office:value-type="float" office:value="265330"/>
          </table:previous>
        </table:cell-content-change>
        <table:cell-content-change table:id="ct592">
          <table:cell-address table:column="11" table:row="222" table:table="0"/>
          <office:change-info>
            <dc:creator>Unknown Author</dc:creator>
            <dc:date>2026-06-17T07:39:40.414499900</dc:date>
          </office:change-info>
          <table:previous>
            <table:change-track-table-cell office:value-type="float" office:value="265330"/>
          </table:previous>
        </table:cell-content-change>
        <table:cell-content-change table:id="ct593">
          <table:cell-address table:column="11" table:row="223" table:table="0"/>
          <office:change-info>
            <dc:creator>Unknown Author</dc:creator>
            <dc:date>2026-06-17T07:39:40.414514500</dc:date>
          </office:change-info>
          <table:previous>
            <table:change-track-table-cell office:value-type="float" office:value="265330"/>
          </table:previous>
        </table:cell-content-change>
        <table:cell-content-change table:id="ct594">
          <table:cell-address table:column="11" table:row="224" table:table="0"/>
          <office:change-info>
            <dc:creator>Unknown Author</dc:creator>
            <dc:date>2026-06-17T07:39:40.414528900</dc:date>
          </office:change-info>
          <table:previous>
            <table:change-track-table-cell office:value-type="float" office:value="265330"/>
          </table:previous>
        </table:cell-content-change>
        <table:cell-content-change table:id="ct595">
          <table:cell-address table:column="11" table:row="225" table:table="0"/>
          <office:change-info>
            <dc:creator>Unknown Author</dc:creator>
            <dc:date>2026-06-17T07:39:40.414544200</dc:date>
          </office:change-info>
          <table:previous>
            <table:change-track-table-cell office:value-type="float" office:value="265330"/>
          </table:previous>
        </table:cell-content-change>
        <table:cell-content-change table:id="ct596">
          <table:cell-address table:column="12" table:row="216" table:table="0"/>
          <office:change-info>
            <dc:creator>Unknown Author</dc:creator>
            <dc:date>2026-06-17T07:39:40.779577700</dc:date>
          </office:change-info>
          <table:previous table:id="ct301">
            <table:change-track-table-cell office:value-type="float" office:value="265334"/>
          </table:previous>
        </table:cell-content-change>
        <table:cell-content-change table:id="ct597">
          <table:cell-address table:column="12" table:row="217" table:table="0"/>
          <office:change-info>
            <dc:creator>Unknown Author</dc:creator>
            <dc:date>2026-06-17T07:39:40.779631300</dc:date>
          </office:change-info>
          <table:previous>
            <table:change-track-table-cell office:value-type="float" office:value="265334"/>
          </table:previous>
        </table:cell-content-change>
        <table:cell-content-change table:id="ct598">
          <table:cell-address table:column="12" table:row="219" table:table="0"/>
          <office:change-info>
            <dc:creator>Unknown Author</dc:creator>
            <dc:date>2026-06-17T07:39:41.181829600</dc:date>
          </office:change-info>
          <table:previous>
            <table:change-track-table-cell office:value-type="float" office:value="265334"/>
          </table:previous>
        </table:cell-content-change>
        <table:cell-content-change table:id="ct599">
          <table:cell-address table:column="12" table:row="220" table:table="0"/>
          <office:change-info>
            <dc:creator>Unknown Author</dc:creator>
            <dc:date>2026-06-17T07:39:41.181895600</dc:date>
          </office:change-info>
          <table:previous>
            <table:change-track-table-cell office:value-type="float" office:value="265334"/>
          </table:previous>
        </table:cell-content-change>
        <table:cell-content-change table:id="ct600">
          <table:cell-address table:column="12" table:row="221" table:table="0"/>
          <office:change-info>
            <dc:creator>Unknown Author</dc:creator>
            <dc:date>2026-06-17T07:39:41.181913200</dc:date>
          </office:change-info>
          <table:previous>
            <table:change-track-table-cell office:value-type="float" office:value="265334"/>
          </table:previous>
        </table:cell-content-change>
        <table:cell-content-change table:id="ct601">
          <table:cell-address table:column="12" table:row="222" table:table="0"/>
          <office:change-info>
            <dc:creator>Unknown Author</dc:creator>
            <dc:date>2026-06-17T07:39:41.181929200</dc:date>
          </office:change-info>
          <table:previous>
            <table:change-track-table-cell office:value-type="float" office:value="265334"/>
          </table:previous>
        </table:cell-content-change>
        <table:cell-content-change table:id="ct602">
          <table:cell-address table:column="12" table:row="223" table:table="0"/>
          <office:change-info>
            <dc:creator>Unknown Author</dc:creator>
            <dc:date>2026-06-17T07:39:41.181945400</dc:date>
          </office:change-info>
          <table:previous>
            <table:change-track-table-cell office:value-type="float" office:value="265334"/>
          </table:previous>
        </table:cell-content-change>
        <table:cell-content-change table:id="ct603">
          <table:cell-address table:column="12" table:row="224" table:table="0"/>
          <office:change-info>
            <dc:creator>Unknown Author</dc:creator>
            <dc:date>2026-06-17T07:39:41.181961500</dc:date>
          </office:change-info>
          <table:previous>
            <table:change-track-table-cell office:value-type="float" office:value="265334"/>
          </table:previous>
        </table:cell-content-change>
        <table:cell-content-change table:id="ct604">
          <table:cell-address table:column="12" table:row="225" table:table="0"/>
          <office:change-info>
            <dc:creator>Unknown Author</dc:creator>
            <dc:date>2026-06-17T07:39:41.181977100</dc:date>
          </office:change-info>
          <table:previous>
            <table:change-track-table-cell office:value-type="float" office:value="265334"/>
          </table:previous>
        </table:cell-content-change>
        <table:cell-content-change table:id="ct605">
          <table:cell-address table:column="12" table:row="218" table:table="0"/>
          <office:change-info>
            <dc:creator>Unknown Author</dc:creator>
            <dc:date>2026-06-17T07:39:48.045364500</dc:date>
          </office:change-info>
          <table:previous>
            <table:change-track-table-cell office:value-type="float" office:value="265330"/>
          </table:previous>
        </table:cell-content-change>
        <table:cell-content-change table:id="ct606">
          <table:cell-address table:column="13" table:row="260" table:table="0"/>
          <office:change-info>
            <dc:creator>Unknown Author</dc:creator>
            <dc:date>2026-06-19T06:41:47.046124600</dc:date>
          </office:change-info>
          <table:previous>
            <table:change-track-table-cell office:value-type="float" office:value="46196"/>
          </table:previous>
        </table:cell-content-change>
        <table:cell-content-change table:id="ct607">
          <table:cell-address table:column="13" table:row="248" table:table="0"/>
          <office:change-info>
            <dc:creator>Unknown Author</dc:creator>
            <dc:date>2026-06-19T06:43:35.843021100</dc:date>
          </office:change-info>
          <table:previous>
            <table:change-track-table-cell office:value-type="float" office:value="46192"/>
          </table:previous>
        </table:cell-content-change>
        <table:cell-content-change table:id="ct608">
          <table:cell-address table:column="16" table:row="256" table:table="0"/>
          <office:change-info>
            <dc:creator>Unknown Author</dc:creator>
            <dc:date>2026-06-19T06:44:42.508860400</dc:date>
          </office:change-info>
          <table:previous>
            <table:change-track-table-cell office:value-type="float" office:value="0"/>
          </table:previous>
        </table:cell-content-change>
        <table:cell-content-change table:id="ct609">
          <table:cell-address table:column="16" table:row="257" table:table="0"/>
          <office:change-info>
            <dc:creator>Unknown Author</dc:creator>
            <dc:date>2026-06-19T06:44:42.508885600</dc:date>
          </office:change-info>
          <table:previous>
            <table:change-track-table-cell office:value-type="float" office:value="0"/>
          </table:previous>
        </table:cell-content-change>
        <table:cell-content-change table:id="ct610">
          <table:cell-address table:column="16" table:row="258" table:table="0"/>
          <office:change-info>
            <dc:creator>Unknown Author</dc:creator>
            <dc:date>2026-06-19T06:44:42.508889500</dc:date>
          </office:change-info>
          <table:previous>
            <table:change-track-table-cell office:value-type="float" office:value="0"/>
          </table:previous>
        </table:cell-content-change>
        <table:cell-content-change table:id="ct611">
          <table:cell-address table:column="16" table:row="259" table:table="0"/>
          <office:change-info>
            <dc:creator>Unknown Author</dc:creator>
            <dc:date>2026-06-19T06:44:42.508891800</dc:date>
          </office:change-info>
          <table:previous>
            <table:change-track-table-cell office:value-type="float" office:value="0"/>
          </table:previous>
        </table:cell-content-change>
        <table:cell-content-change table:id="ct612">
          <table:cell-address table:column="16" table:row="260" table:table="0"/>
          <office:change-info>
            <dc:creator>Unknown Author</dc:creator>
            <dc:date>2026-06-19T06:44:42.508893900</dc:date>
          </office:change-info>
          <table:previous>
            <table:change-track-table-cell office:value-type="float" office:value="0"/>
          </table:previous>
        </table:cell-content-change>
        <table:cell-content-change table:id="ct613">
          <table:cell-address table:column="16" table:row="255" table:table="0"/>
          <office:change-info>
            <dc:creator>Unknown Author</dc:creator>
            <dc:date>2026-06-19T06:44:44.931402000</dc:date>
          </office:change-info>
          <table:previous>
            <table:change-track-table-cell office:value-type="float" office:value="0"/>
          </table:previous>
        </table:cell-content-change>
        <table:cell-content-change table:id="ct614">
          <table:cell-address table:column="16" table:row="248" table:table="0"/>
          <office:change-info>
            <dc:creator>Unknown Author</dc:creator>
            <dc:date>2026-06-19T06:44:48.322562200</dc:date>
          </office:change-info>
          <table:previous>
            <table:change-track-table-cell office:value-type="float" office:value="0"/>
          </table:previous>
        </table:cell-content-change>
        <table:cell-content-change table:id="ct615">
          <table:cell-address table:column="16" table:row="249" table:table="0"/>
          <office:change-info>
            <dc:creator>Unknown Author</dc:creator>
            <dc:date>2026-06-19T06:44:48.322587900</dc:date>
          </office:change-info>
          <table:previous>
            <table:change-track-table-cell office:value-type="float" office:value="0"/>
          </table:previous>
        </table:cell-content-change>
        <table:cell-content-change table:id="ct616">
          <table:cell-address table:column="16" table:row="250" table:table="0"/>
          <office:change-info>
            <dc:creator>Unknown Author</dc:creator>
            <dc:date>2026-06-19T06:44:48.322593800</dc:date>
          </office:change-info>
          <table:previous>
            <table:change-track-table-cell office:value-type="float" office:value="0"/>
          </table:previous>
        </table:cell-content-change>
        <table:cell-content-change table:id="ct617">
          <table:cell-address table:column="16" table:row="251" table:table="0"/>
          <office:change-info>
            <dc:creator>Unknown Author</dc:creator>
            <dc:date>2026-06-19T06:44:48.322598000</dc:date>
          </office:change-info>
          <table:previous>
            <table:change-track-table-cell office:value-type="float" office:value="0"/>
          </table:previous>
        </table:cell-content-change>
        <table:cell-content-change table:id="ct618">
          <table:cell-address table:column="16" table:row="252" table:table="0"/>
          <office:change-info>
            <dc:creator>Unknown Author</dc:creator>
            <dc:date>2026-06-19T06:44:48.322601800</dc:date>
          </office:change-info>
          <table:previous>
            <table:change-track-table-cell office:value-type="float" office:value="0"/>
          </table:previous>
        </table:cell-content-change>
        <table:cell-content-change table:id="ct619">
          <table:cell-address table:column="13" table:row="238" table:table="0"/>
          <office:change-info>
            <dc:creator>Unknown Author</dc:creator>
            <dc:date>2026-06-19T06:47:33.707406200</dc:date>
          </office:change-info>
          <table:previous>
            <table:change-track-table-cell/>
          </table:previous>
        </table:cell-content-change>
        <table:cell-content-change table:id="ct620">
          <table:cell-address table:column="16" table:row="227" table:table="0"/>
          <office:change-info>
            <dc:creator>Unknown Author</dc:creator>
            <dc:date>2026-06-19T06:49:14.070517300</dc:date>
          </office:change-info>
          <table:previous>
            <table:change-track-table-cell office:value-type="float" office:value="0"/>
          </table:previous>
        </table:cell-content-change>
        <table:cell-content-change table:id="ct621">
          <table:cell-address table:column="16" table:row="235" table:table="0"/>
          <office:change-info>
            <dc:creator>Unknown Author</dc:creator>
            <dc:date>2026-06-19T06:49:18.518945700</dc:date>
          </office:change-info>
          <table:previous>
            <table:change-track-table-cell office:value-type="float" office:value="0"/>
          </table:previous>
        </table:cell-content-change>
        <table:cell-content-change table:id="ct622">
          <table:cell-address table:column="16" table:row="236" table:table="0"/>
          <office:change-info>
            <dc:creator>Unknown Author</dc:creator>
            <dc:date>2026-06-19T06:49:18.518974200</dc:date>
          </office:change-info>
          <table:previous>
            <table:change-track-table-cell office:value-type="float" office:value="0"/>
          </table:previous>
        </table:cell-content-change>
        <table:cell-content-change table:id="ct623">
          <table:cell-address table:column="16" table:row="237" table:table="0"/>
          <office:change-info>
            <dc:creator>Unknown Author</dc:creator>
            <dc:date>2026-06-19T06:49:18.518980800</dc:date>
          </office:change-info>
          <table:previous>
            <table:change-track-table-cell office:value-type="float" office:value="0"/>
          </table:previous>
        </table:cell-content-change>
        <table:cell-content-change table:id="ct624">
          <table:cell-address table:column="16" table:row="238" table:table="0"/>
          <office:change-info>
            <dc:creator>Unknown Author</dc:creator>
            <dc:date>2026-06-19T06:49:18.518986700</dc:date>
          </office:change-info>
          <table:previous>
            <table:change-track-table-cell office:value-type="float" office:value="0"/>
          </table:previous>
        </table:cell-content-change>
        <table:cell-content-change table:id="ct625">
          <table:cell-address table:column="16" table:row="239" table:table="0"/>
          <office:change-info>
            <dc:creator>Unknown Author</dc:creator>
            <dc:date>2026-06-19T06:49:18.518991700</dc:date>
          </office:change-info>
          <table:previous>
            <table:change-track-table-cell office:value-type="float" office:value="0"/>
          </table:previous>
        </table:cell-content-change>
        <table:cell-content-change table:id="ct626">
          <table:cell-address table:column="16" table:row="240" table:table="0"/>
          <office:change-info>
            <dc:creator>Unknown Author</dc:creator>
            <dc:date>2026-06-19T06:49:18.518996500</dc:date>
          </office:change-info>
          <table:previous>
            <table:change-track-table-cell office:value-type="float" office:value="0"/>
          </table:previous>
        </table:cell-content-change>
        <table:cell-content-change table:id="ct627">
          <table:cell-address table:column="16" table:row="241" table:table="0"/>
          <office:change-info>
            <dc:creator>Unknown Author</dc:creator>
            <dc:date>2026-06-19T06:49:18.519001100</dc:date>
          </office:change-info>
          <table:previous>
            <table:change-track-table-cell office:value-type="float" office:value="0"/>
          </table:previous>
        </table:cell-content-change>
        <table:cell-content-change table:id="ct628">
          <table:cell-address table:column="16" table:row="243" table:table="0"/>
          <office:change-info>
            <dc:creator>Unknown Author</dc:creator>
            <dc:date>2026-06-19T06:49:34.487446800</dc:date>
          </office:change-info>
          <table:previous>
            <table:change-track-table-cell office:value-type="float" office:value="0"/>
          </table:previous>
        </table:cell-content-change>
        <table:cell-content-change table:id="ct629">
          <table:cell-address table:column="16" table:row="244" table:table="0"/>
          <office:change-info>
            <dc:creator>Unknown Author</dc:creator>
            <dc:date>2026-06-19T06:49:34.487474900</dc:date>
          </office:change-info>
          <table:previous>
            <table:change-track-table-cell office:value-type="float" office:value="0"/>
          </table:previous>
        </table:cell-content-change>
        <table:cell-content-change table:id="ct630">
          <table:cell-address table:column="16" table:row="245" table:table="0"/>
          <office:change-info>
            <dc:creator>Unknown Author</dc:creator>
            <dc:date>2026-06-19T06:49:34.487480400</dc:date>
          </office:change-info>
          <table:previous>
            <table:change-track-table-cell office:value-type="float" office:value="0"/>
          </table:previous>
        </table:cell-content-change>
        <table:cell-content-change table:id="ct631">
          <table:cell-address table:column="16" table:row="246" table:table="0"/>
          <office:change-info>
            <dc:creator>Unknown Author</dc:creator>
            <dc:date>2026-06-19T06:49:34.487485100</dc:date>
          </office:change-info>
          <table:previous>
            <table:change-track-table-cell office:value-type="float" office:value="0"/>
          </table:previous>
        </table:cell-content-change>
        <table:cell-content-change table:id="ct632">
          <table:cell-address table:column="13" table:row="271" table:table="0"/>
          <office:change-info>
            <dc:creator>Unknown Author</dc:creator>
            <dc:date>2026-06-19T07:05:53.438585600</dc:date>
          </office:change-info>
          <table:previous>
            <table:change-track-table-cell office:value-type="float" office:value="46188"/>
          </table:previous>
        </table:cell-content-change>
        <table:insertion table:id="ct633" table:type="row" table:position="262" table:count="4" table:table="0">
          <office:change-info>
            <dc:creator>Unknown Author</dc:creator>
            <dc:date>2026-06-19T07:18:44.916924900</dc:date>
          </office:change-info>
          <table:dependencies>
            <table:dependency table:id="ct704"/>
            <table:dependency table:id="ct703"/>
            <table:dependency table:id="ct702"/>
            <table:dependency table:id="ct682"/>
            <table:dependency table:id="ct681"/>
            <table:dependency table:id="ct680"/>
            <table:dependency table:id="ct677"/>
            <table:dependency table:id="ct660"/>
            <table:dependency table:id="ct659"/>
            <table:dependency table:id="ct652"/>
            <table:dependency table:id="ct651"/>
            <table:dependency table:id="ct650"/>
            <table:dependency table:id="ct649"/>
            <table:dependency table:id="ct646"/>
            <table:dependency table:id="ct644"/>
            <table:dependency table:id="ct643"/>
            <table:dependency table:id="ct642"/>
            <table:dependency table:id="ct641"/>
            <table:dependency table:id="ct640"/>
            <table:dependency table:id="ct639"/>
            <table:dependency table:id="ct638"/>
            <table:dependency table:id="ct637"/>
            <table:dependency table:id="ct635"/>
          </table:dependencies>
        </table:insertion>
        <table:insertion table:id="ct634" table:type="row" table:position="267" table:table="0">
          <office:change-info>
            <dc:creator>Unknown Author</dc:creator>
            <dc:date>2026-06-19T07:18:51.872890400</dc:date>
          </office:change-info>
          <table:dependencies>
            <table:dependency table:id="ct692"/>
            <table:dependency table:id="ct691"/>
            <table:dependency table:id="ct690"/>
            <table:dependency table:id="ct689"/>
            <table:dependency table:id="ct688"/>
            <table:dependency table:id="ct687"/>
            <table:dependency table:id="ct686"/>
            <table:dependency table:id="ct685"/>
            <table:dependency table:id="ct684"/>
            <table:dependency table:id="ct683"/>
            <table:dependency table:id="ct679"/>
            <table:dependency table:id="ct678"/>
            <table:dependency table:id="ct676"/>
            <table:dependency table:id="ct675"/>
            <table:dependency table:id="ct674"/>
            <table:dependency table:id="ct673"/>
            <table:dependency table:id="ct672"/>
            <table:dependency table:id="ct671"/>
            <table:dependency table:id="ct670"/>
            <table:dependency table:id="ct669"/>
            <table:dependency table:id="ct668"/>
            <table:dependency table:id="ct667"/>
            <table:dependency table:id="ct666"/>
            <table:dependency table:id="ct665"/>
            <table:dependency table:id="ct664"/>
            <table:dependency table:id="ct663"/>
            <table:dependency table:id="ct662"/>
            <table:dependency table:id="ct661"/>
            <table:dependency table:id="ct658"/>
            <table:dependency table:id="ct657"/>
            <table:dependency table:id="ct656"/>
            <table:dependency table:id="ct655"/>
            <table:dependency table:id="ct654"/>
            <table:dependency table:id="ct653"/>
            <table:dependency table:id="ct647"/>
          </table:dependencies>
        </table:insertion>
        <table:cell-content-change table:id="ct635">
          <table:cell-address table:column="5" table:row="262" table:table="0"/>
          <office:change-info>
            <dc:creator>Unknown Author</dc:creator>
            <dc:date>2026-06-19T07:19:34.166962800</dc:date>
          </office:change-info>
          <table:previous>
            <table:change-track-table-cell office:value-type="string">
              <text:p>バグ探し兼URLテスト担当 </text:p>
            </table:change-track-table-cell>
          </table:previous>
        </table:cell-content-change>
        <table:cell-content-change table:id="ct636">
          <table:cell-address table:column="3" table:row="261" table:table="0"/>
          <office:change-info>
            <dc:creator>Unknown Author</dc:creator>
            <dc:date>2026-06-19T07:20:35.347665300</dc:date>
          </office:change-info>
          <table:previous>
            <table:change-track-table-cell/>
          </table:previous>
        </table:cell-content-change>
        <table:movement table:id="ct637">
          <table:source-range-address table:column="3" table:row="262" table:table="0"/>
          <table:target-range-address table:column="5" table:row="262" table:table="0"/>
          <office:change-info>
            <dc:creator>Unknown Author</dc:creator>
            <dc:date>2026-06-19T07:20:36.206153600</dc:date>
          </office:change-info>
        </table:movement>
        <table:cell-content-change table:id="ct638">
          <table:cell-address table:column="7" table:row="263" table:table="0"/>
          <office:change-info>
            <dc:creator>Unknown Author</dc:creator>
            <dc:date>2026-06-19T07:21:05.707201300</dc:date>
          </office:change-info>
          <table:previous>
            <table:change-track-table-cell/>
          </table:previous>
        </table:cell-content-change>
        <table:cell-content-change table:id="ct639">
          <table:cell-address table:column="7" table:row="264" table:table="0"/>
          <office:change-info>
            <dc:creator>Unknown Author</dc:creator>
            <dc:date>2026-06-19T07:21:14.681438200</dc:date>
          </office:change-info>
          <table:previous>
            <table:change-track-table-cell/>
          </table:previous>
        </table:cell-content-change>
        <table:cell-content-change table:id="ct640">
          <table:cell-address table:column="7" table:row="265" table:table="0"/>
          <office:change-info>
            <dc:creator>Unknown Author</dc:creator>
            <dc:date>2026-06-19T07:21:19.695798400</dc:date>
          </office:change-info>
          <table:previous>
            <table:change-track-table-cell/>
          </table:previous>
        </table:cell-content-change>
        <table:cell-content-change table:id="ct641">
          <table:cell-address table:column="5" table:row="267" table:table="0"/>
          <office:change-info>
            <dc:creator>Unknown Author</dc:creator>
            <dc:date>2026-06-19T07:21:54.302331100</dc:date>
          </office:change-info>
          <table:previous>
            <table:change-track-table-cell/>
          </table:previous>
        </table:cell-content-change>
        <table:cell-content-change table:id="ct642">
          <table:cell-address table:column="7" table:row="267" table:table="0"/>
          <office:change-info>
            <dc:creator>Unknown Author</dc:creator>
            <dc:date>2026-06-19T07:22:12.696409900</dc:date>
          </office:change-info>
          <table:previous>
            <table:change-track-table-cell office:value-type="string">
              <text:p>新機能追加</text:p>
            </table:change-track-table-cell>
          </table:previous>
        </table:cell-content-change>
        <table:cell-content-change table:id="ct643">
          <table:cell-address table:column="3" table:row="267" table:table="0"/>
          <office:change-info>
            <dc:creator>Unknown Author</dc:creator>
            <dc:date>2026-06-19T07:22:19.133472600</dc:date>
          </office:change-info>
          <table:previous>
            <table:change-track-table-cell/>
          </table:previous>
        </table:cell-content-change>
        <table:cell-content-change table:id="ct644">
          <table:cell-address table:column="3" table:row="267" table:table="0"/>
          <office:change-info>
            <dc:creator>Unknown Author</dc:creator>
            <dc:date>2026-06-19T07:22:27.923378400</dc:date>
          </office:change-info>
          <table:previous table:id="ct643">
            <table:change-track-table-cell office:value-type="string">
              <text:p>発表資料担当 </text:p>
            </table:change-track-table-cell>
          </table:previous>
        </table:cell-content-change>
        <table:insertion table:id="ct645" table:type="row" table:position="275" table:table="0">
          <office:change-info>
            <dc:creator>Unknown Author</dc:creator>
            <dc:date>2026-06-19T07:22:49.046316000</dc:date>
          </office:change-info>
          <table:dependencies>
            <table:dependency table:id="ct714"/>
            <table:dependency table:id="ct713"/>
            <table:dependency table:id="ct712"/>
            <table:dependency table:id="ct711"/>
            <table:dependency table:id="ct710"/>
            <table:dependency table:id="ct709"/>
            <table:dependency table:id="ct708"/>
            <table:dependency table:id="ct707"/>
            <table:dependency table:id="ct706"/>
          </table:dependencies>
        </table:insertion>
        <table:cell-content-change table:id="ct646">
          <table:cell-address table:column="3" table:row="267" table:table="0"/>
          <office:change-info>
            <dc:creator>Unknown Author</dc:creator>
            <dc:date>2026-06-19T07:23:09.716589500</dc:date>
          </office:change-info>
          <table:previous table:id="ct644">
            <table:change-track-table-cell/>
          </table:previous>
        </table:cell-content-change>
        <table:insertion table:id="ct647" table:type="row" table:position="267" table:table="0">
          <office:change-info>
            <dc:creator>Unknown Author</dc:creator>
            <dc:date>2026-06-19T07:24:21.460308200</dc:date>
          </office:change-info>
          <table:dependencies>
            <table:dependency table:id="ct860"/>
            <table:dependency table:id="ct859"/>
            <table:dependency table:id="ct701"/>
            <table:dependency table:id="ct700"/>
            <table:dependency table:id="ct699"/>
            <table:dependency table:id="ct698"/>
            <table:dependency table:id="ct697"/>
            <table:dependency table:id="ct696"/>
            <table:dependency table:id="ct695"/>
            <table:dependency table:id="ct694"/>
            <table:dependency table:id="ct693"/>
            <table:dependency table:id="ct648"/>
          </table:dependencies>
        </table:insertion>
        <table:cell-content-change table:id="ct648">
          <table:cell-address table:column="3" table:row="267" table:table="0"/>
          <office:change-info>
            <dc:creator>Unknown Author</dc:creator>
            <dc:date>2026-06-19T07:25:12.612127200</dc:date>
          </office:change-info>
          <table:previous>
            <table:change-track-table-cell/>
          </table:previous>
        </table:cell-content-change>
        <table:cell-content-change table:id="ct649">
          <table:cell-address table:column="6" table:row="263" table:table="0"/>
          <office:change-info>
            <dc:creator>Unknown Author</dc:creator>
            <dc:date>2026-06-22T08:04:17.733754400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267" table:table="0"/>
          <office:change-info>
            <dc:creator>Unknown Author</dc:creator>
            <dc:date>2026-06-22T08:05:43.810278800</dc:date>
          </office:change-info>
          <table:previous>
            <table:change-track-table-cell office:value-type="float" office:value="1"/>
          </table:previous>
        </table:cell-content-change>
        <table:cell-content-change table:id="ct651">
          <table:cell-address table:column="4" table:row="267" table:table="0"/>
          <office:change-info>
            <dc:creator>Unknown Author</dc:creator>
            <dc:date>2026-06-22T08:05:48.556060500</dc:date>
          </office:change-info>
          <table:previous>
            <table:change-track-table-cell/>
          </table:previous>
        </table:cell-content-change>
        <table:cell-content-change table:id="ct652">
          <table:cell-address table:column="6" table:row="267" table:table="0"/>
          <office:change-info>
            <dc:creator>Unknown Author</dc:creator>
            <dc:date>2026-06-22T08:05:55.469504900</dc:date>
          </office:change-info>
          <table:previous>
            <table:change-track-table-cell office:value-type="string">
              <text:p>デプロイ手順書の読み込み</text:p>
            </table:change-track-table-cell>
          </table:previous>
        </table:cell-content-change>
        <table:cell-content-change table:id="ct653">
          <table:cell-address table:column="6" table:row="267" table:table="0"/>
          <office:change-info>
            <dc:creator>Unknown Author</dc:creator>
            <dc:date>2026-06-22T08:06:06.160765900</dc:date>
          </office:change-info>
          <table:previous>
            <table:change-track-table-cell office:value-type="string">
              <text:p>必要なデータの準備</text:p>
            </table:change-track-table-cell>
          </table:previous>
        </table:cell-content-change>
        <table:cell-content-change table:id="ct654">
          <table:cell-address table:column="5" table:row="267" table:table="0"/>
          <office:change-info>
            <dc:creator>Unknown Author</dc:creator>
            <dc:date>2026-06-22T08:06:06.948351300</dc:date>
          </office:change-info>
          <table:previous>
            <table:change-track-table-cell office:value-type="float" office:value="2"/>
          </table:previous>
        </table:cell-content-change>
        <table:cell-content-change table:id="ct655">
          <table:cell-address table:column="4" table:row="267" table:table="0"/>
          <office:change-info>
            <dc:creator>Unknown Author</dc:creator>
            <dc:date>2026-06-22T08:06:10.409128900</dc:date>
          </office:change-info>
          <table:previous>
            <table:change-track-table-cell/>
          </table:previous>
        </table:cell-content-change>
        <table:cell-content-change table:id="ct656">
          <table:cell-address table:column="6" table:row="267" table:table="0"/>
          <office:change-info>
            <dc:creator>Unknown Author</dc:creator>
            <dc:date>2026-06-22T08:06:17.361344000</dc:date>
          </office:change-info>
          <table:previous>
            <table:change-track-table-cell office:value-type="string">
              <text:p>AWSサービスによるデプロイ</text:p>
            </table:change-track-table-cell>
          </table:previous>
        </table:cell-content-change>
        <table:cell-content-change table:id="ct657">
          <table:cell-address table:column="5" table:row="267" table:table="0"/>
          <office:change-info>
            <dc:creator>Unknown Author</dc:creator>
            <dc:date>2026-06-22T08:06:18.017436000</dc:date>
          </office:change-info>
          <table:previous>
            <table:change-track-table-cell office:value-type="float" office:value="3"/>
          </table:previous>
        </table:cell-content-change>
        <table:cell-content-change table:id="ct658">
          <table:cell-address table:column="4" table:row="267" table:table="0"/>
          <office:change-info>
            <dc:creator>Unknown Author</dc:creator>
            <dc:date>2026-06-22T08:06:20.274830900</dc:date>
          </office:change-info>
          <table:previous>
            <table:change-track-table-cell/>
          </table:previous>
        </table:cell-content-change>
        <table:cell-content-change table:id="ct659">
          <table:cell-address table:column="8" table:row="267" table:table="0"/>
          <office:change-info>
            <dc:creator>Unknown Author</dc:creator>
            <dc:date>2026-06-22T08:06:31.496413200</dc:date>
          </office:change-info>
          <table:previous>
            <table:change-track-table-cell office:value-type="string">
              <text:p>デプロイ手順書の内容把握</text:p>
            </table:change-track-table-cell>
          </table:previous>
        </table:cell-content-change>
        <table:cell-content-change table:id="ct660">
          <table:cell-address table:column="7" table:row="267" table:table="0"/>
          <office:change-info>
            <dc:creator>Unknown Author</dc:creator>
            <dc:date>2026-06-22T08:06:35.871780800</dc:date>
          </office:change-info>
          <table:previous>
            <table:change-track-table-cell office:value-type="float" office:value="1"/>
          </table:previous>
        </table:cell-content-change>
        <table:cell-content-change table:id="ct661">
          <table:cell-address table:column="8" table:row="267" table:table="0"/>
          <office:change-info>
            <dc:creator>Unknown Author</dc:creator>
            <dc:date>2026-06-22T08:06:42.453978800</dc:date>
          </office:change-info>
          <table:previous>
            <table:change-track-table-cell office:value-type="string">
              <text:p>実行環境に必要なデータの把握</text:p>
            </table:change-track-table-cell>
          </table:previous>
        </table:cell-content-change>
        <table:cell-content-change table:id="ct662">
          <table:cell-address table:column="7" table:row="267" table:table="0"/>
          <office:change-info>
            <dc:creator>Unknown Author</dc:creator>
            <dc:date>2026-06-22T08:06:43.107584400</dc:date>
          </office:change-info>
          <table:previous>
            <table:change-track-table-cell office:value-type="float" office:value="2"/>
          </table:previous>
        </table:cell-content-change>
        <table:cell-content-change table:id="ct663">
          <table:cell-address table:column="8" table:row="267" table:table="0"/>
          <office:change-info>
            <dc:creator>Unknown Author</dc:creator>
            <dc:date>2026-06-22T08:06:50.111822500</dc:date>
          </office:change-info>
          <table:previous>
            <table:change-track-table-cell office:value-type="string">
              <text:p>SQL文の準備</text:p>
            </table:change-track-table-cell>
          </table:previous>
        </table:cell-content-change>
        <table:cell-content-change table:id="ct664">
          <table:cell-address table:column="7" table:row="267" table:table="0"/>
          <office:change-info>
            <dc:creator>Unknown Author</dc:creator>
            <dc:date>2026-06-22T08:06:50.828349400</dc:date>
          </office:change-info>
          <table:previous>
            <table:change-track-table-cell office:value-type="float" office:value="1"/>
          </table:previous>
        </table:cell-content-change>
        <table:cell-content-change table:id="ct665">
          <table:cell-address table:column="8" table:row="267" table:table="0"/>
          <office:change-info>
            <dc:creator>Unknown Author</dc:creator>
            <dc:date>2026-06-22T08:06:55.473565300</dc:date>
          </office:change-info>
          <table:previous>
            <table:change-track-table-cell office:value-type="string">
              <text:p>デプロイ用のソースコード、画像ファイルの準備</text:p>
            </table:change-track-table-cell>
          </table:previous>
        </table:cell-content-change>
        <table:cell-content-change table:id="ct666">
          <table:cell-address table:column="7" table:row="267" table:table="0"/>
          <office:change-info>
            <dc:creator>Unknown Author</dc:creator>
            <dc:date>2026-06-22T08:06:56.100316400</dc:date>
          </office:change-info>
          <table:previous>
            <table:change-track-table-cell office:value-type="float" office:value="2"/>
          </table:previous>
        </table:cell-content-change>
        <table:cell-content-change table:id="ct667">
          <table:cell-address table:column="8" table:row="267" table:table="0"/>
          <office:change-info>
            <dc:creator>Unknown Author</dc:creator>
            <dc:date>2026-06-22T08:06:59.625009600</dc:date>
          </office:change-info>
          <table:previous>
            <table:change-track-table-cell office:value-type="string">
              <text:p>Linux用RPMファイルの準備</text:p>
            </table:change-track-table-cell>
          </table:previous>
        </table:cell-content-change>
        <table:cell-content-change table:id="ct668">
          <table:cell-address table:column="7" table:row="267" table:table="0"/>
          <office:change-info>
            <dc:creator>Unknown Author</dc:creator>
            <dc:date>2026-06-22T08:07:00.240643700</dc:date>
          </office:change-info>
          <table:previous>
            <table:change-track-table-cell office:value-type="float" office:value="3"/>
          </table:previous>
        </table:cell-content-change>
        <table:cell-content-change table:id="ct669">
          <table:cell-address table:column="8" table:row="267" table:table="0"/>
          <office:change-info>
            <dc:creator>Unknown Author</dc:creator>
            <dc:date>2026-06-22T08:07:03.907141000</dc:date>
          </office:change-info>
          <table:previous>
            <table:change-track-table-cell office:value-type="string">
              <text:p>安心サンドボックスへの接続準備</text:p>
            </table:change-track-table-cell>
          </table:previous>
        </table:cell-content-change>
        <table:cell-content-change table:id="ct670">
          <table:cell-address table:column="7" table:row="267" table:table="0"/>
          <office:change-info>
            <dc:creator>Unknown Author</dc:creator>
            <dc:date>2026-06-22T08:07:04.541275500</dc:date>
          </office:change-info>
          <table:previous>
            <table:change-track-table-cell office:value-type="float" office:value="4"/>
          </table:previous>
        </table:cell-content-change>
        <table:cell-content-change table:id="ct671">
          <table:cell-address table:column="8" table:row="267" table:table="0"/>
          <office:change-info>
            <dc:creator>Unknown Author</dc:creator>
            <dc:date>2026-06-22T08:07:08.342343300</dc:date>
          </office:change-info>
          <table:previous>
            <table:change-track-table-cell office:value-type="string">
              <text:p>環境構築作業の実施</text:p>
            </table:change-track-table-cell>
          </table:previous>
        </table:cell-content-change>
        <table:cell-content-change table:id="ct672">
          <table:cell-address table:column="7" table:row="267" table:table="0"/>
          <office:change-info>
            <dc:creator>Unknown Author</dc:creator>
            <dc:date>2026-06-22T08:07:09.108235900</dc:date>
          </office:change-info>
          <table:previous>
            <table:change-track-table-cell office:value-type="float" office:value="1"/>
          </table:previous>
        </table:cell-content-change>
        <table:cell-content-change table:id="ct673">
          <table:cell-address table:column="8" table:row="267" table:table="0"/>
          <office:change-info>
            <dc:creator>Unknown Author</dc:creator>
            <dc:date>2026-06-22T08:07:12.053318100</dc:date>
          </office:change-info>
          <table:previous>
            <table:change-track-table-cell office:value-type="string">
              <text:p>Webアプリケーションの準備作業の実施</text:p>
            </table:change-track-table-cell>
          </table:previous>
        </table:cell-content-change>
        <table:cell-content-change table:id="ct674">
          <table:cell-address table:column="7" table:row="267" table:table="0"/>
          <office:change-info>
            <dc:creator>Unknown Author</dc:creator>
            <dc:date>2026-06-22T08:07:12.615649600</dc:date>
          </office:change-info>
          <table:previous>
            <table:change-track-table-cell office:value-type="float" office:value="2"/>
          </table:previous>
        </table:cell-content-change>
        <table:cell-content-change table:id="ct675">
          <table:cell-address table:column="8" table:row="267" table:table="0"/>
          <office:change-info>
            <dc:creator>Unknown Author</dc:creator>
            <dc:date>2026-06-22T08:07:15.616628800</dc:date>
          </office:change-info>
          <table:previous>
            <table:change-track-table-cell office:value-type="string">
              <text:p>Webアプリケーションのデプロイ作業の実施</text:p>
            </table:change-track-table-cell>
          </table:previous>
        </table:cell-content-change>
        <table:cell-content-change table:id="ct676">
          <table:cell-address table:column="7" table:row="267" table:table="0"/>
          <office:change-info>
            <dc:creator>Unknown Author</dc:creator>
            <dc:date>2026-06-22T08:07:16.169833300</dc:date>
          </office:change-info>
          <table:previous>
            <table:change-track-table-cell office:value-type="float" office:value="3"/>
          </table:previous>
        </table:cell-content-change>
        <table:cell-content-change table:id="ct677">
          <table:cell-address table:column="6" table:row="267" table:table="0"/>
          <office:change-info>
            <dc:creator>Unknown Author</dc:creator>
            <dc:date>2026-06-22T08:07:19.513353200</dc:date>
          </office:change-info>
          <table:previous>
            <table:change-track-table-cell/>
          </table:previous>
        </table:cell-content-change>
        <table:cell-content-change table:id="ct678">
          <table:cell-address table:column="6" table:row="267" table:table="0"/>
          <office:change-info>
            <dc:creator>Unknown Author</dc:creator>
            <dc:date>2026-06-22T08:07:25.698825900</dc:date>
          </office:change-info>
          <table:previous>
            <table:change-track-table-cell/>
          </table:previous>
        </table:cell-content-change>
        <table:cell-content-change table:id="ct679">
          <table:cell-address table:column="6" table:row="267" table:table="0"/>
          <office:change-info>
            <dc:creator>Unknown Author</dc:creator>
            <dc:date>2026-06-22T08:07:33.029436400</dc:date>
          </office:change-info>
          <table:previous>
            <table:change-track-table-cell/>
          </table:previous>
        </table:cell-content-change>
        <table:deletion table:id="ct680" table:type="row" table:position="267" table:table="0" table:multi-deletion-spanned="14">
          <office:change-info>
            <dc:creator>Unknown Author</dc:creator>
            <dc:date>2026-06-22T08:09:13.696522800</dc:date>
          </office:change-info>
          <table:deletions>
            <table:cell-content-deletion table:id="ct646">
              <table:change-track-table-cell office:value-type="string">
                <text:p>再度デプロイ</text:p>
              </table:change-track-table-cell>
            </table:cell-content-deletion>
          </table:deletions>
        </table:deletion>
        <table:deletion table:id="ct681" table:type="row" table:position="267" table:table="0">
          <office:change-info>
            <dc:creator>Unknown Author</dc:creator>
            <dc:date>2026-06-22T08:09:13.696637700</dc:date>
          </office:change-info>
          <table:deletions>
            <table:change-deletion table:id="ct680"/>
            <table:cell-content-deletion table:id="ct652">
              <table:change-track-table-cell/>
            </table:cell-content-deletion>
            <table:cell-content-deletion table:id="ct651">
              <table:change-track-table-cell office:value-type="float" office:value="1"/>
            </table:cell-content-deletion>
            <table:cell-content-deletion table:id="ct650">
              <table:change-track-table-cell/>
            </table:cell-content-deletion>
          </table:deletions>
        </table:deletion>
        <table:deletion table:id="ct682" table:type="row" table:position="267" table:table="0">
          <office:change-info>
            <dc:creator>Unknown Author</dc:creator>
            <dc:date>2026-06-22T08:09:13.696673000</dc:date>
          </office:change-info>
          <table:deletions>
            <table:change-deletion table:id="ct681"/>
            <table:cell-content-deletion table:id="ct677">
              <table:change-track-table-cell office:value-type="float" office:value="1"/>
            </table:cell-content-deletion>
            <table:cell-content-deletion table:id="ct660">
              <table:change-track-table-cell office:value-type="string">
                <text:p>デプロイ手順書の内容把握</text:p>
              </table:change-track-table-cell>
            </table:cell-content-deletion>
            <table:cell-content-deletion table:id="ct659">
              <table:change-track-table-cell/>
            </table:cell-content-deletion>
          </table:deletions>
          <table:cut-offs>
            <table:insertion-cut-off table:id="ct633" table:position="-1"/>
          </table:cut-offs>
        </table:deletion>
        <table:deletion table:id="ct683" table:type="row" table:position="267" table:table="0">
          <office:change-info>
            <dc:creator>Unknown Author</dc:creator>
            <dc:date>2026-06-22T08:09:13.696705100</dc:date>
          </office:change-info>
          <table:deletions>
            <table:cell-content-deletion>
              <table:cell-address table:column="6" table:row="267" table:table="0"/>
              <table:change-track-table-cell office:value-type="float" office:value="2"/>
            </table:cell-content-deletion>
            <table:change-deletion table:id="ct682"/>
            <table:cell-content-deletion table:id="ct662">
              <table:change-track-table-cell office:value-type="string">
                <text:p>実行環境に必要なデータの把握</text:p>
              </table:change-track-table-cell>
            </table:cell-content-deletion>
            <table:cell-content-deletion table:id="ct661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4" table:type="row" table:position="267" table:table="0">
          <office:change-info>
            <dc:creator>Unknown Author</dc:creator>
            <dc:date>2026-06-22T08:09:13.697077200</dc:date>
          </office:change-info>
          <table:deletions>
            <table:change-deletion table:id="ct683"/>
            <table:cell-content-deletion table:id="ct655">
              <table:change-track-table-cell office:value-type="float" office:value="2"/>
            </table:cell-content-deletion>
            <table:cell-content-deletion table:id="ct654">
              <table:change-track-table-cell office:value-type="string">
                <text:p>必要なデータの準備</text:p>
              </table:change-track-table-cell>
            </table:cell-content-deletion>
            <table:cell-content-deletion table:id="ct653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5" table:type="row" table:position="267" table:table="0">
          <office:change-info>
            <dc:creator>Unknown Author</dc:creator>
            <dc:date>2026-06-22T08:09:13.697133800</dc:date>
          </office:change-info>
          <table:deletions>
            <table:change-deletion table:id="ct684"/>
            <table:cell-content-deletion table:id="ct678">
              <table:change-track-table-cell office:value-type="float" office:value="1"/>
            </table:cell-content-deletion>
            <table:cell-content-deletion table:id="ct664">
              <table:change-track-table-cell office:value-type="string">
                <text:p>SQL文の準備</text:p>
              </table:change-track-table-cell>
            </table:cell-content-deletion>
            <table:cell-content-deletion table:id="ct663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6" table:type="row" table:position="267" table:table="0">
          <office:change-info>
            <dc:creator>Unknown Author</dc:creator>
            <dc:date>2026-06-22T08:09:13.697167000</dc:date>
          </office:change-info>
          <table:deletions>
            <table:cell-content-deletion>
              <table:cell-address table:column="6" table:row="267" table:table="0"/>
              <table:change-track-table-cell office:value-type="float" office:value="2"/>
            </table:cell-content-deletion>
            <table:change-deletion table:id="ct685"/>
            <table:cell-content-deletion table:id="ct666">
              <table:change-track-table-cell office:value-type="string">
                <text:p>デプロイ用のソースコード、画像ファイルの準備</text:p>
              </table:change-track-table-cell>
            </table:cell-content-deletion>
            <table:cell-content-deletion table:id="ct665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7" table:type="row" table:position="267" table:table="0">
          <office:change-info>
            <dc:creator>Unknown Author</dc:creator>
            <dc:date>2026-06-22T08:09:13.697206600</dc:date>
          </office:change-info>
          <table:deletions>
            <table:cell-content-deletion>
              <table:cell-address table:column="6" table:row="267" table:table="0"/>
              <table:change-track-table-cell office:value-type="float" office:value="3"/>
            </table:cell-content-deletion>
            <table:change-deletion table:id="ct686"/>
            <table:cell-content-deletion table:id="ct668">
              <table:change-track-table-cell office:value-type="string">
                <text:p>Linux用RPMファイルの準備</text:p>
              </table:change-track-table-cell>
            </table:cell-content-deletion>
            <table:cell-content-deletion table:id="ct667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8" table:type="row" table:position="267" table:table="0">
          <office:change-info>
            <dc:creator>Unknown Author</dc:creator>
            <dc:date>2026-06-22T08:09:13.697240200</dc:date>
          </office:change-info>
          <table:deletions>
            <table:cell-content-deletion>
              <table:cell-address table:column="6" table:row="267" table:table="0"/>
              <table:change-track-table-cell office:value-type="float" office:value="4"/>
            </table:cell-content-deletion>
            <table:change-deletion table:id="ct687"/>
            <table:cell-content-deletion table:id="ct670">
              <table:change-track-table-cell office:value-type="string">
                <text:p>安心サンドボックスへの接続準備</text:p>
              </table:change-track-table-cell>
            </table:cell-content-deletion>
            <table:cell-content-deletion table:id="ct669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9" table:type="row" table:position="267" table:table="0">
          <office:change-info>
            <dc:creator>Unknown Author</dc:creator>
            <dc:date>2026-06-22T08:09:13.697273200</dc:date>
          </office:change-info>
          <table:deletions>
            <table:change-deletion table:id="ct688"/>
            <table:cell-content-deletion table:id="ct658">
              <table:change-track-table-cell office:value-type="float" office:value="3"/>
            </table:cell-content-deletion>
            <table:cell-content-deletion table:id="ct657">
              <table:change-track-table-cell office:value-type="string">
                <text:p>AWSサービスによるデプロイ</text:p>
              </table:change-track-table-cell>
            </table:cell-content-deletion>
            <table:cell-content-deletion table:id="ct656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90" table:type="row" table:position="267" table:table="0">
          <office:change-info>
            <dc:creator>Unknown Author</dc:creator>
            <dc:date>2026-06-22T08:09:13.697304900</dc:date>
          </office:change-info>
          <table:deletions>
            <table:change-deletion table:id="ct689"/>
            <table:cell-content-deletion table:id="ct679">
              <table:change-track-table-cell office:value-type="float" office:value="1"/>
            </table:cell-content-deletion>
            <table:cell-content-deletion table:id="ct672">
              <table:change-track-table-cell office:value-type="string">
                <text:p>環境構築作業の実施</text:p>
              </table:change-track-table-cell>
            </table:cell-content-deletion>
            <table:cell-content-deletion table:id="ct671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91" table:type="row" table:position="267" table:table="0">
          <office:change-info>
            <dc:creator>Unknown Author</dc:creator>
            <dc:date>2026-06-22T08:09:13.697337300</dc:date>
          </office:change-info>
          <table:deletions>
            <table:cell-content-deletion>
              <table:cell-address table:column="6" table:row="267" table:table="0"/>
              <table:change-track-table-cell office:value-type="float" office:value="2"/>
            </table:cell-content-deletion>
            <table:change-deletion table:id="ct690"/>
            <table:cell-content-deletion table:id="ct674">
              <table:change-track-table-cell office:value-type="string">
                <text:p>Webアプリケーションの準備作業の実施</text:p>
              </table:change-track-table-cell>
            </table:cell-content-deletion>
            <table:cell-content-deletion table:id="ct673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92" table:type="row" table:position="267" table:table="0">
          <office:change-info>
            <dc:creator>Unknown Author</dc:creator>
            <dc:date>2026-06-22T08:09:13.697370300</dc:date>
          </office:change-info>
          <table:deletions>
            <table:cell-content-deletion>
              <table:cell-address table:column="6" table:row="267" table:table="0"/>
              <table:change-track-table-cell office:value-type="float" office:value="3"/>
            </table:cell-content-deletion>
            <table:change-deletion table:id="ct691"/>
            <table:cell-content-deletion table:id="ct676">
              <table:change-track-table-cell office:value-type="string">
                <text:p>Webアプリケーションのデプロイ作業の実施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93" table:type="row" table:position="267" table:table="0">
          <office:change-info>
            <dc:creator>Unknown Author</dc:creator>
            <dc:date>2026-06-22T08:09:13.697403000</dc:date>
          </office:change-info>
          <table:deletions>
            <table:change-deletion table:id="ct692"/>
            <table:cell-content-deletion table:id="ct648">
              <table:change-track-table-cell office:value-type="string">
                <text:p>テスト</text:p>
              </table:change-track-table-cell>
            </table:cell-content-deletion>
          </table:deletions>
          <table:cut-offs>
            <table:insertion-cut-off table:id="ct647" table:position="1"/>
          </table:cut-offs>
        </table:deletion>
        <table:deletion table:id="ct694" table:type="row" table:position="267" table:table="0" table:multi-deletion-spanned="8">
          <office:change-info>
            <dc:creator>Unknown Author</dc:creator>
            <dc:date>2026-06-22T08:09:19.583912000</dc:date>
          </office:change-info>
          <table:deletions>
            <table:change-deletion table:id="ct693"/>
          </table:deletions>
          <table:cut-offs>
            <table:insertion-cut-off table:id="ct647" table:position="1"/>
          </table:cut-offs>
        </table:deletion>
        <table:deletion table:id="ct695" table:type="row" table:position="267" table:table="0">
          <office:change-info>
            <dc:creator>Unknown Author</dc:creator>
            <dc:date>2026-06-22T08:09:19.584021100</dc:date>
          </office:change-info>
          <table:deletions>
            <table:change-deletion table:id="ct694"/>
          </table:deletions>
          <table:cut-offs>
            <table:insertion-cut-off table:id="ct647" table:position="1"/>
          </table:cut-offs>
        </table:deletion>
        <table:deletion table:id="ct696" table:type="row" table:position="267" table:table="0">
          <office:change-info>
            <dc:creator>Unknown Author</dc:creator>
            <dc:date>2026-06-22T08:09:19.584052700</dc:date>
          </office:change-info>
          <table:deletions>
            <table:change-deletion table:id="ct695"/>
          </table:deletions>
          <table:cut-offs>
            <table:insertion-cut-off table:id="ct647" table:position="1"/>
          </table:cut-offs>
        </table:deletion>
        <table:deletion table:id="ct697" table:type="row" table:position="267" table:table="0">
          <office:change-info>
            <dc:creator>Unknown Author</dc:creator>
            <dc:date>2026-06-22T08:09:19.584084100</dc:date>
          </office:change-info>
          <table:deletions>
            <table:change-deletion table:id="ct696"/>
          </table:deletions>
          <table:cut-offs>
            <table:insertion-cut-off table:id="ct647" table:position="1"/>
          </table:cut-offs>
        </table:deletion>
        <table:deletion table:id="ct698" table:type="row" table:position="267" table:table="0">
          <office:change-info>
            <dc:creator>Unknown Author</dc:creator>
            <dc:date>2026-06-22T08:09:19.584114600</dc:date>
          </office:change-info>
          <table:deletions>
            <table:change-deletion table:id="ct697"/>
          </table:deletions>
          <table:cut-offs>
            <table:insertion-cut-off table:id="ct647" table:position="1"/>
          </table:cut-offs>
        </table:deletion>
        <table:deletion table:id="ct699" table:type="row" table:position="267" table:table="0">
          <office:change-info>
            <dc:creator>Unknown Author</dc:creator>
            <dc:date>2026-06-22T08:09:19.584145400</dc:date>
          </office:change-info>
          <table:deletions>
            <table:change-deletion table:id="ct698"/>
          </table:deletions>
          <table:cut-offs>
            <table:insertion-cut-off table:id="ct647" table:position="1"/>
          </table:cut-offs>
        </table:deletion>
        <table:deletion table:id="ct700" table:type="row" table:position="267" table:table="0">
          <office:change-info>
            <dc:creator>Unknown Author</dc:creator>
            <dc:date>2026-06-22T08:09:19.584176100</dc:date>
          </office:change-info>
          <table:deletions>
            <table:change-deletion table:id="ct699"/>
            <table:change-deletion table:id="ct647"/>
          </table:deletions>
          <table:cut-offs>
            <table:insertion-cut-off table:id="ct634" table:position="1"/>
          </table:cut-offs>
        </table:deletion>
        <table:deletion table:id="ct701" table:type="row" table:position="267" table:table="0">
          <office:change-info>
            <dc:creator>Unknown Author</dc:creator>
            <dc:date>2026-06-22T08:09:19.584206900</dc:date>
          </office:change-info>
          <table:deletions>
            <table:change-deletion table:id="ct700"/>
            <table:change-deletion table:id="ct634"/>
          </table:deletions>
        </table:deletion>
        <table:deletion table:id="ct702" table:type="row" table:position="267" table:table="0" table:multi-deletion-spanned="3">
          <office:change-info>
            <dc:creator>Unknown Author</dc:creator>
            <dc:date>2026-06-22T08:09:26.523421000</dc:date>
          </office:change-info>
          <table:deletions>
            <table:cell-content-deletion>
              <table:cell-address table:column="3" table:row="267" table:table="0"/>
              <table:change-track-table-cell office:value-type="string">
                <text:p>新機能 </text:p>
              </table:change-track-table-cell>
            </table:cell-content-deletion>
          </table:deletions>
        </table:deletion>
        <table:deletion table:id="ct703" table:type="row" table:position="267" table:table="0">
          <office:change-info>
            <dc:creator>Unknown Author</dc:creator>
            <dc:date>2026-06-22T08:09:26.523537500</dc:date>
          </office:change-info>
          <table:deletions>
            <table:change-deletion table:id="ct702"/>
            <table:cell-content-deletion table:id="ct641">
              <table:change-track-table-cell office:value-type="string">
                <text:p>新機能追加</text:p>
              </table:change-track-table-cell>
            </table:cell-content-deletion>
          </table:deletions>
        </table:deletion>
        <table:deletion table:id="ct704" table:type="row" table:position="267" table:table="0">
          <office:change-info>
            <dc:creator>Unknown Author</dc:creator>
            <dc:date>2026-06-22T08:09:26.523571900</dc:date>
          </office:change-info>
          <table:deletions>
            <table:change-deletion table:id="ct703"/>
            <table:cell-content-deletion table:id="ct642">
              <table:change-track-table-cell office:value-type="string">
                <text:p>未確定</text:p>
              </table:change-track-table-cell>
            </table:cell-content-deletion>
          </table:deletions>
          <table:cut-offs>
            <table:insertion-cut-off table:id="ct633" table:position="-1"/>
          </table:cut-offs>
        </table:deletion>
        <table:insertion table:id="ct705" table:type="row" table:position="266" table:table="0">
          <office:change-info>
            <dc:creator>Unknown Author</dc:creator>
            <dc:date>2026-06-22T08:09:33.300721200</dc:date>
          </office:change-info>
        </table:insertion>
        <table:deletion table:id="ct706" table:type="row" table:position="275" table:table="0" table:multi-deletion-spanned="9">
          <office:change-info>
            <dc:creator>Unknown Author</dc:creator>
            <dc:date>2026-06-22T08:10:07.012223900</dc:date>
          </office:change-info>
          <table:cut-offs>
            <table:insertion-cut-off table:id="ct645" table:position="1"/>
          </table:cut-offs>
        </table:deletion>
        <table:deletion table:id="ct707" table:type="row" table:position="275" table:table="0">
          <office:change-info>
            <dc:creator>Unknown Author</dc:creator>
            <dc:date>2026-06-22T08:10:07.012334100</dc:date>
          </office:change-info>
          <table:deletions>
            <table:change-deletion table:id="ct706"/>
          </table:deletions>
          <table:cut-offs>
            <table:insertion-cut-off table:id="ct645" table:position="1"/>
          </table:cut-offs>
        </table:deletion>
        <table:deletion table:id="ct708" table:type="row" table:position="275" table:table="0">
          <office:change-info>
            <dc:creator>Unknown Author</dc:creator>
            <dc:date>2026-06-22T08:10:07.012368800</dc:date>
          </office:change-info>
          <table:deletions>
            <table:change-deletion table:id="ct707"/>
          </table:deletions>
          <table:cut-offs>
            <table:insertion-cut-off table:id="ct645" table:position="1"/>
          </table:cut-offs>
        </table:deletion>
        <table:deletion table:id="ct709" table:type="row" table:position="275" table:table="0">
          <office:change-info>
            <dc:creator>Unknown Author</dc:creator>
            <dc:date>2026-06-22T08:10:07.012400500</dc:date>
          </office:change-info>
          <table:deletions>
            <table:change-deletion table:id="ct708"/>
          </table:deletions>
          <table:cut-offs>
            <table:insertion-cut-off table:id="ct645" table:position="1"/>
          </table:cut-offs>
        </table:deletion>
        <table:deletion table:id="ct710" table:type="row" table:position="275" table:table="0">
          <office:change-info>
            <dc:creator>Unknown Author</dc:creator>
            <dc:date>2026-06-22T08:10:07.012432600</dc:date>
          </office:change-info>
          <table:deletions>
            <table:change-deletion table:id="ct709"/>
          </table:deletions>
          <table:cut-offs>
            <table:insertion-cut-off table:id="ct645" table:position="1"/>
          </table:cut-offs>
        </table:deletion>
        <table:deletion table:id="ct711" table:type="row" table:position="275" table:table="0">
          <office:change-info>
            <dc:creator>Unknown Author</dc:creator>
            <dc:date>2026-06-22T08:10:07.012464200</dc:date>
          </office:change-info>
          <table:deletions>
            <table:change-deletion table:id="ct710"/>
          </table:deletions>
          <table:cut-offs>
            <table:insertion-cut-off table:id="ct645" table:position="1"/>
          </table:cut-offs>
        </table:deletion>
        <table:deletion table:id="ct712" table:type="row" table:position="275" table:table="0">
          <office:change-info>
            <dc:creator>Unknown Author</dc:creator>
            <dc:date>2026-06-22T08:10:07.012495600</dc:date>
          </office:change-info>
          <table:deletions>
            <table:change-deletion table:id="ct711"/>
          </table:deletions>
          <table:cut-offs>
            <table:insertion-cut-off table:id="ct645" table:position="1"/>
          </table:cut-offs>
        </table:deletion>
        <table:deletion table:id="ct713" table:type="row" table:position="275" table:table="0">
          <office:change-info>
            <dc:creator>Unknown Author</dc:creator>
            <dc:date>2026-06-22T08:10:07.012526900</dc:date>
          </office:change-info>
          <table:deletions>
            <table:change-deletion table:id="ct712"/>
          </table:deletions>
          <table:cut-offs>
            <table:insertion-cut-off table:id="ct645" table:position="1"/>
          </table:cut-offs>
        </table:deletion>
        <table:deletion table:id="ct714" table:type="row" table:position="275" table:table="0">
          <office:change-info>
            <dc:creator>Unknown Author</dc:creator>
            <dc:date>2026-06-22T08:10:07.012558200</dc:date>
          </office:change-info>
          <table:deletions>
            <table:change-deletion table:id="ct713"/>
          </table:deletions>
          <table:cut-offs>
            <table:insertion-cut-off table:id="ct645" table:position="1"/>
          </table:cut-offs>
        </table:deletion>
        <table:cell-content-change table:id="ct715">
          <table:cell-address table:column="13" table:row="272" table:table="0"/>
          <office:change-info>
            <dc:creator>Unknown Author</dc:creator>
            <dc:date>2026-06-22T08:11:30.417626400</dc:date>
          </office:change-info>
          <table:previous>
            <table:change-track-table-cell office:value-type="float" office:value="46192"/>
          </table:previous>
        </table:cell-content-change>
        <table:cell-content-change table:id="ct716">
          <table:cell-address table:column="16" table:row="270" table:table="0"/>
          <office:change-info>
            <dc:creator>Unknown Author</dc:creator>
            <dc:date>2026-06-22T08:11:51.190308600</dc:date>
          </office:change-info>
          <table:previous>
            <table:change-track-table-cell office:value-type="float" office:value="0"/>
          </table:previous>
        </table:cell-content-change>
        <table:cell-content-change table:id="ct717">
          <table:cell-address table:column="16" table:row="271" table:table="0"/>
          <office:change-info>
            <dc:creator>Unknown Author</dc:creator>
            <dc:date>2026-06-23T08:30:04.682337600</dc:date>
          </office:change-info>
          <table:previous>
            <table:change-track-table-cell office:value-type="float" office:value="0"/>
          </table:previous>
        </table:cell-content-change>
        <table:cell-content-change table:id="ct718">
          <table:cell-address table:column="16" table:row="272" table:table="0"/>
          <office:change-info>
            <dc:creator>Unknown Author</dc:creator>
            <dc:date>2026-06-23T08:30:04.682355600</dc:date>
          </office:change-info>
          <table:previous>
            <table:change-track-table-cell office:value-type="float" office:value="0"/>
          </table:previous>
        </table:cell-content-change>
        <table:cell-content-change table:id="ct719">
          <table:cell-address table:column="16" table:row="271" table:table="0"/>
          <office:change-info>
            <dc:creator>Unknown Author</dc:creator>
            <dc:date>2026-06-24T08:13:49.159888600</dc:date>
          </office:change-info>
          <table:previous table:id="ct717">
            <table:change-track-table-cell office:value-type="float" office:value="101"/>
          </table:previous>
        </table:cell-content-change>
        <table:cell-content-change table:id="ct720">
          <table:cell-address table:column="16" table:row="272" table:table="0"/>
          <office:change-info>
            <dc:creator>Unknown Author</dc:creator>
            <dc:date>2026-06-24T08:13:49.159898600</dc:date>
          </office:change-info>
          <table:previous table:id="ct718">
            <table:change-track-table-cell office:value-type="float" office:value="102"/>
          </table:previous>
        </table:cell-content-change>
        <table:cell-content-change table:id="ct721">
          <table:cell-address table:column="15" table:row="260" table:table="0"/>
          <office:change-info>
            <dc:creator>Unknown Author</dc:creator>
            <dc:date>2026-06-24T08:15:55.648032800</dc:date>
          </office:change-info>
          <table:previous>
            <table:change-track-table-cell table:cell-address="WBS.P261" table:formula="of:=IF([.$L261]&lt;&gt;&quot;&quot;;NETWORKDAYS([.$L261];[.$M261];[$休日.$B$4:.$B$304]);&quot;&quot;)" office:value-type="float" office:value="1"/>
          </table:previous>
        </table:cell-content-change>
        <table:cell-content-change table:id="ct722">
          <table:cell-address table:column="13" table:row="267" table:table="0"/>
          <office:change-info>
            <dc:creator>Unknown Author</dc:creator>
            <dc:date>2026-06-25T07:36:41.032365800</dc:date>
          </office:change-info>
          <table:previous>
            <table:change-track-table-cell office:value-type="date" office:date-value="2026-06-25"/>
          </table:previous>
        </table:cell-content-change>
        <table:cell-content-change table:id="ct723">
          <table:cell-address table:column="13" table:row="276" table:table="0"/>
          <office:change-info>
            <dc:creator>Unknown Author</dc:creator>
            <dc:date>2026-06-25T07:36:58.318768900</dc:date>
          </office:change-info>
          <table:previous>
            <table:change-track-table-cell/>
          </table:previous>
        </table:cell-content-change>
        <table:cell-content-change table:id="ct724">
          <table:cell-address table:column="16" table:row="273" table:table="0"/>
          <office:change-info>
            <dc:creator>Unknown Author</dc:creator>
            <dc:date>2026-06-25T07:37:15.685656000</dc:date>
          </office:change-info>
          <table:previous>
            <table:change-track-table-cell office:value-type="float" office:value="0"/>
          </table:previous>
        </table:cell-content-change>
        <table:cell-content-change table:id="ct725">
          <table:cell-address table:column="16" table:row="276" table:table="0"/>
          <office:change-info>
            <dc:creator>Unknown Author</dc:creator>
            <dc:date>2026-06-25T07:37:18.794314500</dc:date>
          </office:change-info>
          <table:previous>
            <table:change-track-table-cell office:value-type="float" office:value="0"/>
          </table:previous>
        </table:cell-content-change>
        <table:cell-content-change table:id="ct726">
          <table:cell-address table:column="16" table:row="278" table:table="0"/>
          <office:change-info>
            <dc:creator>Unknown Author</dc:creator>
            <dc:date>2026-06-25T07:37:20.780002600</dc:date>
          </office:change-info>
          <table:previous>
            <table:change-track-table-cell office:value-type="float" office:value="0"/>
          </table:previous>
        </table:cell-content-change>
        <table:cell-content-change table:id="ct727">
          <table:cell-address table:column="16" table:row="267" table:table="0"/>
          <office:change-info>
            <dc:creator>Unknown Author</dc:creator>
            <dc:date>2026-06-25T07:37:27.113913900</dc:date>
          </office:change-info>
          <table:previous>
            <table:change-track-table-cell office:value-type="float" office:value="0"/>
          </table:previous>
        </table:cell-content-change>
        <table:cell-content-change table:id="ct728">
          <table:cell-address table:column="16" table:row="268" table:table="0"/>
          <office:change-info>
            <dc:creator>Unknown Author</dc:creator>
            <dc:date>2026-06-25T07:37:27.113933000</dc:date>
          </office:change-info>
          <table:previous>
            <table:change-track-table-cell office:value-type="float" office:value="0"/>
          </table:previous>
        </table:cell-content-change>
        <table:cell-content-change table:id="ct729">
          <table:cell-address table:column="16" table:row="269" table:table="0"/>
          <office:change-info>
            <dc:creator>Unknown Author</dc:creator>
            <dc:date>2026-06-25T07:37:27.113938200</dc:date>
          </office:change-info>
          <table:previous>
            <table:change-track-table-cell office:value-type="float" office:value="0"/>
          </table:previous>
        </table:cell-content-change>
        <table:cell-content-change table:id="ct730">
          <table:cell-address table:column="9" table:row="405" table:table="0"/>
          <office:change-info>
            <dc:creator>Unknown Author</dc:creator>
            <dc:date>2026-06-25T07:39:19.498503800</dc:date>
          </office:change-info>
          <table:previous>
            <table:change-track-table-cell office:value-type="string">
              <text:p>森</text:p>
            </table:change-track-table-cell>
          </table:previous>
        </table:cell-content-change>
        <table:cell-content-change table:id="ct731">
          <table:cell-address table:column="9" table:row="406" table:table="0"/>
          <office:change-info>
            <dc:creator>Unknown Author</dc:creator>
            <dc:date>2026-06-25T07:39:19.498511600</dc:date>
          </office:change-info>
          <table:previous>
            <table:change-track-table-cell office:value-type="string">
              <text:p>芹沢</text:p>
            </table:change-track-table-cell>
          </table:previous>
        </table:cell-content-change>
        <table:cell-content-change table:id="ct732">
          <table:cell-address table:column="16" table:row="277" table:table="0"/>
          <office:change-info>
            <dc:creator>Unknown Author</dc:creator>
            <dc:date>2026-06-25T07:39:31.843371900</dc:date>
          </office:change-info>
          <table:previous>
            <table:change-track-table-cell office:value-type="float" office:value="0"/>
          </table:previous>
        </table:cell-content-change>
        <table:cell-content-change table:id="ct733">
          <table:cell-address table:column="16" table:row="279" table:table="0"/>
          <office:change-info>
            <dc:creator>Unknown Author</dc:creator>
            <dc:date>2026-06-25T07:39:35.026301300</dc:date>
          </office:change-info>
          <table:previous>
            <table:change-track-table-cell office:value-type="float" office:value="0"/>
          </table:previous>
        </table:cell-content-change>
        <table:cell-content-change table:id="ct734">
          <table:cell-address table:column="16" table:row="279" table:table="0"/>
          <office:change-info>
            <dc:creator>Unknown Author</dc:creator>
            <dc:date>2026-06-25T07:39:36.938801700</dc:date>
          </office:change-info>
          <table:previous table:id="ct733">
            <table:change-track-table-cell table:cell-address="WBS.Q280" table:formula="of:=IF([.$L280]&lt;&gt;&quot;&quot;;NETWORKDAYS([.$L280];[.$M280];[$休日.$B$4:.$B$304]);&quot;&quot;)" office:value-type="string"/>
          </table:previous>
        </table:cell-content-change>
        <table:cell-content-change table:id="ct735">
          <table:cell-address table:column="16" table:row="280" table:table="0"/>
          <office:change-info>
            <dc:creator>Unknown Author</dc:creator>
            <dc:date>2026-06-25T07:39:36.938829800</dc:date>
          </office:change-info>
          <table:previous>
            <table:change-track-table-cell office:value-type="float" office:value="0"/>
          </table:previous>
        </table:cell-content-change>
        <table:cell-content-change table:id="ct736">
          <table:cell-address table:column="16" table:row="281" table:table="0"/>
          <office:change-info>
            <dc:creator>Unknown Author</dc:creator>
            <dc:date>2026-06-25T07:39:36.938847300</dc:date>
          </office:change-info>
          <table:previous>
            <table:change-track-table-cell office:value-type="float" office:value="0"/>
          </table:previous>
        </table:cell-content-change>
        <table:cell-content-change table:id="ct737">
          <table:cell-address table:column="16" table:row="282" table:table="0"/>
          <office:change-info>
            <dc:creator>Unknown Author</dc:creator>
            <dc:date>2026-06-25T07:39:36.938856600</dc:date>
          </office:change-info>
          <table:previous>
            <table:change-track-table-cell office:value-type="float" office:value="0"/>
          </table:previous>
        </table:cell-content-change>
        <table:cell-content-change table:id="ct738">
          <table:cell-address table:column="16" table:row="283" table:table="0"/>
          <office:change-info>
            <dc:creator>Unknown Author</dc:creator>
            <dc:date>2026-06-25T07:39:36.938865200</dc:date>
          </office:change-info>
          <table:previous>
            <table:change-track-table-cell office:value-type="float" office:value="0"/>
          </table:previous>
        </table:cell-content-change>
        <table:cell-content-change table:id="ct739">
          <table:cell-address table:column="16" table:row="284" table:table="0"/>
          <office:change-info>
            <dc:creator>Unknown Author</dc:creator>
            <dc:date>2026-06-25T07:39:36.938874000</dc:date>
          </office:change-info>
          <table:previous>
            <table:change-track-table-cell office:value-type="float" office:value="0"/>
          </table:previous>
        </table:cell-content-change>
        <table:cell-content-change table:id="ct740">
          <table:cell-address table:column="16" table:row="285" table:table="0"/>
          <office:change-info>
            <dc:creator>Unknown Author</dc:creator>
            <dc:date>2026-06-25T07:39:36.938883200</dc:date>
          </office:change-info>
          <table:previous>
            <table:change-track-table-cell office:value-type="float" office:value="0"/>
          </table:previous>
        </table:cell-content-change>
        <table:cell-content-change table:id="ct741">
          <table:cell-address table:column="16" table:row="286" table:table="0"/>
          <office:change-info>
            <dc:creator>Unknown Author</dc:creator>
            <dc:date>2026-06-25T07:39:36.938891900</dc:date>
          </office:change-info>
          <table:previous>
            <table:change-track-table-cell office:value-type="float" office:value="0"/>
          </table:previous>
        </table:cell-content-change>
        <table:cell-content-change table:id="ct742">
          <table:cell-address table:column="16" table:row="287" table:table="0"/>
          <office:change-info>
            <dc:creator>Unknown Author</dc:creator>
            <dc:date>2026-06-25T07:39:36.938900100</dc:date>
          </office:change-info>
          <table:previous>
            <table:change-track-table-cell office:value-type="float" office:value="0"/>
          </table:previous>
        </table:cell-content-change>
        <table:cell-content-change table:id="ct743">
          <table:cell-address table:column="16" table:row="288" table:table="0"/>
          <office:change-info>
            <dc:creator>Unknown Author</dc:creator>
            <dc:date>2026-06-25T07:39:36.938908500</dc:date>
          </office:change-info>
          <table:previous>
            <table:change-track-table-cell office:value-type="float" office:value="0"/>
          </table:previous>
        </table:cell-content-change>
        <table:cell-content-change table:id="ct744">
          <table:cell-address table:column="16" table:row="289" table:table="0"/>
          <office:change-info>
            <dc:creator>Unknown Author</dc:creator>
            <dc:date>2026-06-25T07:39:36.938917800</dc:date>
          </office:change-info>
          <table:previous>
            <table:change-track-table-cell office:value-type="float" office:value="0"/>
          </table:previous>
        </table:cell-content-change>
        <table:cell-content-change table:id="ct745">
          <table:cell-address table:column="16" table:row="290" table:table="0"/>
          <office:change-info>
            <dc:creator>Unknown Author</dc:creator>
            <dc:date>2026-06-25T07:39:36.938926600</dc:date>
          </office:change-info>
          <table:previous>
            <table:change-track-table-cell office:value-type="float" office:value="0"/>
          </table:previous>
        </table:cell-content-change>
        <table:cell-content-change table:id="ct746">
          <table:cell-address table:column="16" table:row="291" table:table="0"/>
          <office:change-info>
            <dc:creator>Unknown Author</dc:creator>
            <dc:date>2026-06-25T07:39:36.938935200</dc:date>
          </office:change-info>
          <table:previous>
            <table:change-track-table-cell office:value-type="float" office:value="0"/>
          </table:previous>
        </table:cell-content-change>
        <table:cell-content-change table:id="ct747">
          <table:cell-address table:column="16" table:row="292" table:table="0"/>
          <office:change-info>
            <dc:creator>Unknown Author</dc:creator>
            <dc:date>2026-06-25T07:39:36.938943500</dc:date>
          </office:change-info>
          <table:previous>
            <table:change-track-table-cell office:value-type="float" office:value="0"/>
          </table:previous>
        </table:cell-content-change>
        <table:cell-content-change table:id="ct748">
          <table:cell-address table:column="16" table:row="293" table:table="0"/>
          <office:change-info>
            <dc:creator>Unknown Author</dc:creator>
            <dc:date>2026-06-25T07:39:36.938952000</dc:date>
          </office:change-info>
          <table:previous>
            <table:change-track-table-cell office:value-type="float" office:value="0"/>
          </table:previous>
        </table:cell-content-change>
        <table:cell-content-change table:id="ct749">
          <table:cell-address table:column="16" table:row="294" table:table="0"/>
          <office:change-info>
            <dc:creator>Unknown Author</dc:creator>
            <dc:date>2026-06-25T07:39:36.938960800</dc:date>
          </office:change-info>
          <table:previous>
            <table:change-track-table-cell office:value-type="float" office:value="0"/>
          </table:previous>
        </table:cell-content-change>
        <table:cell-content-change table:id="ct750">
          <table:cell-address table:column="16" table:row="295" table:table="0"/>
          <office:change-info>
            <dc:creator>Unknown Author</dc:creator>
            <dc:date>2026-06-25T07:39:36.938969400</dc:date>
          </office:change-info>
          <table:previous>
            <table:change-track-table-cell office:value-type="float" office:value="0"/>
          </table:previous>
        </table:cell-content-change>
        <table:cell-content-change table:id="ct751">
          <table:cell-address table:column="16" table:row="297" table:table="0"/>
          <office:change-info>
            <dc:creator>Unknown Author</dc:creator>
            <dc:date>2026-06-25T07:39:44.978571900</dc:date>
          </office:change-info>
          <table:previous>
            <table:change-track-table-cell office:value-type="float" office:value="0"/>
          </table:previous>
        </table:cell-content-change>
        <table:cell-content-change table:id="ct752">
          <table:cell-address table:column="16" table:row="297" table:table="0"/>
          <office:change-info>
            <dc:creator>Unknown Author</dc:creator>
            <dc:date>2026-06-25T07:39:46.733348100</dc:date>
          </office:change-info>
          <table:previous table:id="ct751">
            <table:change-track-table-cell table:cell-address="WBS.Q298" table:formula="of:=IF([.$L298]&lt;&gt;&quot;&quot;;NETWORKDAYS([.$L298];[.$M298];[$休日.$B$4:.$B$304]);&quot;&quot;)" office:value-type="string"/>
          </table:previous>
        </table:cell-content-change>
        <table:cell-content-change table:id="ct753">
          <table:cell-address table:column="16" table:row="298" table:table="0"/>
          <office:change-info>
            <dc:creator>Unknown Author</dc:creator>
            <dc:date>2026-06-25T07:39:46.733371400</dc:date>
          </office:change-info>
          <table:previous>
            <table:change-track-table-cell office:value-type="float" office:value="0"/>
          </table:previous>
        </table:cell-content-change>
        <table:cell-content-change table:id="ct754">
          <table:cell-address table:column="16" table:row="299" table:table="0"/>
          <office:change-info>
            <dc:creator>Unknown Author</dc:creator>
            <dc:date>2026-06-25T07:39:46.733389900</dc:date>
          </office:change-info>
          <table:previous>
            <table:change-track-table-cell office:value-type="float" office:value="0"/>
          </table:previous>
        </table:cell-content-change>
        <table:cell-content-change table:id="ct755">
          <table:cell-address table:column="16" table:row="300" table:table="0"/>
          <office:change-info>
            <dc:creator>Unknown Author</dc:creator>
            <dc:date>2026-06-25T07:39:46.733397800</dc:date>
          </office:change-info>
          <table:previous>
            <table:change-track-table-cell office:value-type="float" office:value="0"/>
          </table:previous>
        </table:cell-content-change>
        <table:cell-content-change table:id="ct756">
          <table:cell-address table:column="16" table:row="301" table:table="0"/>
          <office:change-info>
            <dc:creator>Unknown Author</dc:creator>
            <dc:date>2026-06-25T07:39:46.733406300</dc:date>
          </office:change-info>
          <table:previous>
            <table:change-track-table-cell office:value-type="float" office:value="0"/>
          </table:previous>
        </table:cell-content-change>
        <table:cell-content-change table:id="ct757">
          <table:cell-address table:column="16" table:row="302" table:table="0"/>
          <office:change-info>
            <dc:creator>Unknown Author</dc:creator>
            <dc:date>2026-06-25T07:39:46.733414200</dc:date>
          </office:change-info>
          <table:previous>
            <table:change-track-table-cell office:value-type="float" office:value="0"/>
          </table:previous>
        </table:cell-content-change>
        <table:cell-content-change table:id="ct758">
          <table:cell-address table:column="16" table:row="303" table:table="0"/>
          <office:change-info>
            <dc:creator>Unknown Author</dc:creator>
            <dc:date>2026-06-25T07:39:46.733422500</dc:date>
          </office:change-info>
          <table:previous>
            <table:change-track-table-cell office:value-type="float" office:value="0"/>
          </table:previous>
        </table:cell-content-change>
        <table:cell-content-change table:id="ct759">
          <table:cell-address table:column="16" table:row="304" table:table="0"/>
          <office:change-info>
            <dc:creator>Unknown Author</dc:creator>
            <dc:date>2026-06-25T07:39:46.733442800</dc:date>
          </office:change-info>
          <table:previous>
            <table:change-track-table-cell office:value-type="float" office:value="0"/>
          </table:previous>
        </table:cell-content-change>
        <table:cell-content-change table:id="ct760">
          <table:cell-address table:column="16" table:row="305" table:table="0"/>
          <office:change-info>
            <dc:creator>Unknown Author</dc:creator>
            <dc:date>2026-06-25T07:39:46.733450600</dc:date>
          </office:change-info>
          <table:previous>
            <table:change-track-table-cell office:value-type="float" office:value="0"/>
          </table:previous>
        </table:cell-content-change>
        <table:cell-content-change table:id="ct761">
          <table:cell-address table:column="16" table:row="306" table:table="0"/>
          <office:change-info>
            <dc:creator>Unknown Author</dc:creator>
            <dc:date>2026-06-25T07:39:46.733458500</dc:date>
          </office:change-info>
          <table:previous>
            <table:change-track-table-cell office:value-type="float" office:value="0"/>
          </table:previous>
        </table:cell-content-change>
        <table:cell-content-change table:id="ct762">
          <table:cell-address table:column="16" table:row="307" table:table="0"/>
          <office:change-info>
            <dc:creator>Unknown Author</dc:creator>
            <dc:date>2026-06-25T07:39:46.733466600</dc:date>
          </office:change-info>
          <table:previous>
            <table:change-track-table-cell office:value-type="float" office:value="0"/>
          </table:previous>
        </table:cell-content-change>
        <table:cell-content-change table:id="ct763">
          <table:cell-address table:column="16" table:row="308" table:table="0"/>
          <office:change-info>
            <dc:creator>Unknown Author</dc:creator>
            <dc:date>2026-06-25T07:39:46.733474600</dc:date>
          </office:change-info>
          <table:previous>
            <table:change-track-table-cell office:value-type="float" office:value="0"/>
          </table:previous>
        </table:cell-content-change>
        <table:cell-content-change table:id="ct764">
          <table:cell-address table:column="16" table:row="309" table:table="0"/>
          <office:change-info>
            <dc:creator>Unknown Author</dc:creator>
            <dc:date>2026-06-25T07:39:46.733482700</dc:date>
          </office:change-info>
          <table:previous>
            <table:change-track-table-cell office:value-type="float" office:value="0"/>
          </table:previous>
        </table:cell-content-change>
        <table:cell-content-change table:id="ct765">
          <table:cell-address table:column="16" table:row="310" table:table="0"/>
          <office:change-info>
            <dc:creator>Unknown Author</dc:creator>
            <dc:date>2026-06-25T07:39:46.733490400</dc:date>
          </office:change-info>
          <table:previous>
            <table:change-track-table-cell office:value-type="float" office:value="0"/>
          </table:previous>
        </table:cell-content-change>
        <table:cell-content-change table:id="ct766">
          <table:cell-address table:column="16" table:row="311" table:table="0"/>
          <office:change-info>
            <dc:creator>Unknown Author</dc:creator>
            <dc:date>2026-06-25T07:39:46.733498300</dc:date>
          </office:change-info>
          <table:previous>
            <table:change-track-table-cell office:value-type="float" office:value="0"/>
          </table:previous>
        </table:cell-content-change>
        <table:cell-content-change table:id="ct767">
          <table:cell-address table:column="16" table:row="312" table:table="0"/>
          <office:change-info>
            <dc:creator>Unknown Author</dc:creator>
            <dc:date>2026-06-25T07:39:46.733506600</dc:date>
          </office:change-info>
          <table:previous>
            <table:change-track-table-cell office:value-type="float" office:value="0"/>
          </table:previous>
        </table:cell-content-change>
        <table:cell-content-change table:id="ct768">
          <table:cell-address table:column="16" table:row="313" table:table="0"/>
          <office:change-info>
            <dc:creator>Unknown Author</dc:creator>
            <dc:date>2026-06-25T07:39:46.733514800</dc:date>
          </office:change-info>
          <table:previous>
            <table:change-track-table-cell office:value-type="float" office:value="0"/>
          </table:previous>
        </table:cell-content-change>
        <table:cell-content-change table:id="ct769">
          <table:cell-address table:column="16" table:row="314" table:table="0"/>
          <office:change-info>
            <dc:creator>Unknown Author</dc:creator>
            <dc:date>2026-06-25T07:39:46.733522700</dc:date>
          </office:change-info>
          <table:previous>
            <table:change-track-table-cell office:value-type="float" office:value="0"/>
          </table:previous>
        </table:cell-content-change>
        <table:cell-content-change table:id="ct770">
          <table:cell-address table:column="16" table:row="316" table:table="0"/>
          <office:change-info>
            <dc:creator>Unknown Author</dc:creator>
            <dc:date>2026-06-25T07:39:50.353017100</dc:date>
          </office:change-info>
          <table:previous>
            <table:change-track-table-cell office:value-type="float" office:value="0"/>
          </table:previous>
        </table:cell-content-change>
        <table:cell-content-change table:id="ct771">
          <table:cell-address table:column="16" table:row="316" table:table="0"/>
          <office:change-info>
            <dc:creator>Unknown Author</dc:creator>
            <dc:date>2026-06-25T07:39:52.286901600</dc:date>
          </office:change-info>
          <table:previous table:id="ct770">
            <table:change-track-table-cell table:cell-address="WBS.Q317" table:formula="of:=IF([.$L317]&lt;&gt;&quot;&quot;;NETWORKDAYS([.$L317];[.$M317];[$休日.$B$4:.$B$304]);&quot;&quot;)" office:value-type="string"/>
          </table:previous>
        </table:cell-content-change>
        <table:cell-content-change table:id="ct772">
          <table:cell-address table:column="16" table:row="317" table:table="0"/>
          <office:change-info>
            <dc:creator>Unknown Author</dc:creator>
            <dc:date>2026-06-25T07:39:52.286924800</dc:date>
          </office:change-info>
          <table:previous>
            <table:change-track-table-cell office:value-type="float" office:value="0"/>
          </table:previous>
        </table:cell-content-change>
        <table:cell-content-change table:id="ct773">
          <table:cell-address table:column="16" table:row="318" table:table="0"/>
          <office:change-info>
            <dc:creator>Unknown Author</dc:creator>
            <dc:date>2026-06-25T07:39:52.286946000</dc:date>
          </office:change-info>
          <table:previous>
            <table:change-track-table-cell office:value-type="float" office:value="0"/>
          </table:previous>
        </table:cell-content-change>
        <table:cell-content-change table:id="ct774">
          <table:cell-address table:column="16" table:row="319" table:table="0"/>
          <office:change-info>
            <dc:creator>Unknown Author</dc:creator>
            <dc:date>2026-06-25T07:39:52.286954500</dc:date>
          </office:change-info>
          <table:previous>
            <table:change-track-table-cell office:value-type="float" office:value="0"/>
          </table:previous>
        </table:cell-content-change>
        <table:cell-content-change table:id="ct775">
          <table:cell-address table:column="16" table:row="320" table:table="0"/>
          <office:change-info>
            <dc:creator>Unknown Author</dc:creator>
            <dc:date>2026-06-25T07:39:52.286963100</dc:date>
          </office:change-info>
          <table:previous>
            <table:change-track-table-cell office:value-type="float" office:value="0"/>
          </table:previous>
        </table:cell-content-change>
        <table:cell-content-change table:id="ct776">
          <table:cell-address table:column="16" table:row="321" table:table="0"/>
          <office:change-info>
            <dc:creator>Unknown Author</dc:creator>
            <dc:date>2026-06-25T07:39:52.286972300</dc:date>
          </office:change-info>
          <table:previous>
            <table:change-track-table-cell office:value-type="float" office:value="0"/>
          </table:previous>
        </table:cell-content-change>
        <table:cell-content-change table:id="ct777">
          <table:cell-address table:column="16" table:row="322" table:table="0"/>
          <office:change-info>
            <dc:creator>Unknown Author</dc:creator>
            <dc:date>2026-06-25T07:39:52.286981800</dc:date>
          </office:change-info>
          <table:previous>
            <table:change-track-table-cell office:value-type="float" office:value="0"/>
          </table:previous>
        </table:cell-content-change>
        <table:cell-content-change table:id="ct778">
          <table:cell-address table:column="16" table:row="323" table:table="0"/>
          <office:change-info>
            <dc:creator>Unknown Author</dc:creator>
            <dc:date>2026-06-25T07:39:52.286991300</dc:date>
          </office:change-info>
          <table:previous>
            <table:change-track-table-cell office:value-type="float" office:value="0"/>
          </table:previous>
        </table:cell-content-change>
        <table:cell-content-change table:id="ct779">
          <table:cell-address table:column="16" table:row="324" table:table="0"/>
          <office:change-info>
            <dc:creator>Unknown Author</dc:creator>
            <dc:date>2026-06-25T07:39:52.287000900</dc:date>
          </office:change-info>
          <table:previous>
            <table:change-track-table-cell office:value-type="float" office:value="0"/>
          </table:previous>
        </table:cell-content-change>
        <table:cell-content-change table:id="ct780">
          <table:cell-address table:column="16" table:row="325" table:table="0"/>
          <office:change-info>
            <dc:creator>Unknown Author</dc:creator>
            <dc:date>2026-06-25T07:39:52.287008900</dc:date>
          </office:change-info>
          <table:previous>
            <table:change-track-table-cell office:value-type="float" office:value="0"/>
          </table:previous>
        </table:cell-content-change>
        <table:cell-content-change table:id="ct781">
          <table:cell-address table:column="16" table:row="326" table:table="0"/>
          <office:change-info>
            <dc:creator>Unknown Author</dc:creator>
            <dc:date>2026-06-25T07:39:52.287017000</dc:date>
          </office:change-info>
          <table:previous>
            <table:change-track-table-cell office:value-type="float" office:value="0"/>
          </table:previous>
        </table:cell-content-change>
        <table:cell-content-change table:id="ct782">
          <table:cell-address table:column="16" table:row="327" table:table="0"/>
          <office:change-info>
            <dc:creator>Unknown Author</dc:creator>
            <dc:date>2026-06-25T07:39:52.287041300</dc:date>
          </office:change-info>
          <table:previous>
            <table:change-track-table-cell office:value-type="float" office:value="0"/>
          </table:previous>
        </table:cell-content-change>
        <table:cell-content-change table:id="ct783">
          <table:cell-address table:column="16" table:row="328" table:table="0"/>
          <office:change-info>
            <dc:creator>Unknown Author</dc:creator>
            <dc:date>2026-06-25T07:39:52.287051800</dc:date>
          </office:change-info>
          <table:previous>
            <table:change-track-table-cell office:value-type="float" office:value="0"/>
          </table:previous>
        </table:cell-content-change>
        <table:cell-content-change table:id="ct784">
          <table:cell-address table:column="16" table:row="329" table:table="0"/>
          <office:change-info>
            <dc:creator>Unknown Author</dc:creator>
            <dc:date>2026-06-25T07:39:52.287062800</dc:date>
          </office:change-info>
          <table:previous>
            <table:change-track-table-cell office:value-type="float" office:value="0"/>
          </table:previous>
        </table:cell-content-change>
        <table:cell-content-change table:id="ct785">
          <table:cell-address table:column="16" table:row="330" table:table="0"/>
          <office:change-info>
            <dc:creator>Unknown Author</dc:creator>
            <dc:date>2026-06-25T07:39:52.287081800</dc:date>
          </office:change-info>
          <table:previous>
            <table:change-track-table-cell office:value-type="float" office:value="0"/>
          </table:previous>
        </table:cell-content-change>
        <table:cell-content-change table:id="ct786">
          <table:cell-address table:column="16" table:row="331" table:table="0"/>
          <office:change-info>
            <dc:creator>Unknown Author</dc:creator>
            <dc:date>2026-06-25T07:39:52.287093900</dc:date>
          </office:change-info>
          <table:previous>
            <table:change-track-table-cell office:value-type="float" office:value="0"/>
          </table:previous>
        </table:cell-content-change>
        <table:cell-content-change table:id="ct787">
          <table:cell-address table:column="16" table:row="332" table:table="0"/>
          <office:change-info>
            <dc:creator>Unknown Author</dc:creator>
            <dc:date>2026-06-25T07:39:52.287103000</dc:date>
          </office:change-info>
          <table:previous>
            <table:change-track-table-cell office:value-type="float" office:value="0"/>
          </table:previous>
        </table:cell-content-change>
        <table:cell-content-change table:id="ct788">
          <table:cell-address table:column="16" table:row="333" table:table="0"/>
          <office:change-info>
            <dc:creator>Unknown Author</dc:creator>
            <dc:date>2026-06-25T07:39:52.287112100</dc:date>
          </office:change-info>
          <table:previous>
            <table:change-track-table-cell office:value-type="float" office:value="0"/>
          </table:previous>
        </table:cell-content-change>
        <table:cell-content-change table:id="ct789">
          <table:cell-address table:column="16" table:row="334" table:table="0"/>
          <office:change-info>
            <dc:creator>Unknown Author</dc:creator>
            <dc:date>2026-06-25T07:39:52.287120900</dc:date>
          </office:change-info>
          <table:previous>
            <table:change-track-table-cell office:value-type="float" office:value="0"/>
          </table:previous>
        </table:cell-content-change>
        <table:cell-content-change table:id="ct790">
          <table:cell-address table:column="16" table:row="335" table:table="0"/>
          <office:change-info>
            <dc:creator>Unknown Author</dc:creator>
            <dc:date>2026-06-25T07:39:52.287129500</dc:date>
          </office:change-info>
          <table:previous>
            <table:change-track-table-cell office:value-type="float" office:value="0"/>
          </table:previous>
        </table:cell-content-change>
        <table:cell-content-change table:id="ct791">
          <table:cell-address table:column="16" table:row="336" table:table="0"/>
          <office:change-info>
            <dc:creator>Unknown Author</dc:creator>
            <dc:date>2026-06-25T07:39:52.287138300</dc:date>
          </office:change-info>
          <table:previous>
            <table:change-track-table-cell office:value-type="float" office:value="0"/>
          </table:previous>
        </table:cell-content-change>
        <table:cell-content-change table:id="ct792">
          <table:cell-address table:column="16" table:row="337" table:table="0"/>
          <office:change-info>
            <dc:creator>Unknown Author</dc:creator>
            <dc:date>2026-06-25T07:39:52.287147700</dc:date>
          </office:change-info>
          <table:previous>
            <table:change-track-table-cell office:value-type="float" office:value="0"/>
          </table:previous>
        </table:cell-content-change>
        <table:cell-content-change table:id="ct793">
          <table:cell-address table:column="16" table:row="338" table:table="0"/>
          <office:change-info>
            <dc:creator>Unknown Author</dc:creator>
            <dc:date>2026-06-25T07:39:52.287156700</dc:date>
          </office:change-info>
          <table:previous>
            <table:change-track-table-cell office:value-type="float" office:value="0"/>
          </table:previous>
        </table:cell-content-change>
        <table:cell-content-change table:id="ct794">
          <table:cell-address table:column="16" table:row="339" table:table="0"/>
          <office:change-info>
            <dc:creator>Unknown Author</dc:creator>
            <dc:date>2026-06-25T07:39:52.287167300</dc:date>
          </office:change-info>
          <table:previous>
            <table:change-track-table-cell office:value-type="float" office:value="0"/>
          </table:previous>
        </table:cell-content-change>
        <table:cell-content-change table:id="ct795">
          <table:cell-address table:column="16" table:row="340" table:table="0"/>
          <office:change-info>
            <dc:creator>Unknown Author</dc:creator>
            <dc:date>2026-06-25T07:39:52.287184500</dc:date>
          </office:change-info>
          <table:previous>
            <table:change-track-table-cell office:value-type="float" office:value="0"/>
          </table:previous>
        </table:cell-content-change>
        <table:cell-content-change table:id="ct796">
          <table:cell-address table:column="16" table:row="341" table:table="0"/>
          <office:change-info>
            <dc:creator>Unknown Author</dc:creator>
            <dc:date>2026-06-25T07:39:52.287193600</dc:date>
          </office:change-info>
          <table:previous>
            <table:change-track-table-cell office:value-type="float" office:value="0"/>
          </table:previous>
        </table:cell-content-change>
        <table:cell-content-change table:id="ct797">
          <table:cell-address table:column="16" table:row="342" table:table="0"/>
          <office:change-info>
            <dc:creator>Unknown Author</dc:creator>
            <dc:date>2026-06-25T07:39:52.287201300</dc:date>
          </office:change-info>
          <table:previous>
            <table:change-track-table-cell office:value-type="float" office:value="0"/>
          </table:previous>
        </table:cell-content-change>
        <table:cell-content-change table:id="ct798">
          <table:cell-address table:column="16" table:row="343" table:table="0"/>
          <office:change-info>
            <dc:creator>Unknown Author</dc:creator>
            <dc:date>2026-06-25T07:39:52.287209700</dc:date>
          </office:change-info>
          <table:previous>
            <table:change-track-table-cell office:value-type="float" office:value="0"/>
          </table:previous>
        </table:cell-content-change>
        <table:cell-content-change table:id="ct799">
          <table:cell-address table:column="16" table:row="344" table:table="0"/>
          <office:change-info>
            <dc:creator>Unknown Author</dc:creator>
            <dc:date>2026-06-25T07:39:52.287217600</dc:date>
          </office:change-info>
          <table:previous>
            <table:change-track-table-cell office:value-type="float" office:value="0"/>
          </table:previous>
        </table:cell-content-change>
        <table:cell-content-change table:id="ct800">
          <table:cell-address table:column="16" table:row="345" table:table="0"/>
          <office:change-info>
            <dc:creator>Unknown Author</dc:creator>
            <dc:date>2026-06-25T07:39:52.287225500</dc:date>
          </office:change-info>
          <table:previous>
            <table:change-track-table-cell office:value-type="float" office:value="0"/>
          </table:previous>
        </table:cell-content-change>
        <table:cell-content-change table:id="ct801">
          <table:cell-address table:column="16" table:row="346" table:table="0"/>
          <office:change-info>
            <dc:creator>Unknown Author</dc:creator>
            <dc:date>2026-06-25T07:39:52.287233100</dc:date>
          </office:change-info>
          <table:previous>
            <table:change-track-table-cell office:value-type="float" office:value="0"/>
          </table:previous>
        </table:cell-content-change>
        <table:cell-content-change table:id="ct802">
          <table:cell-address table:column="16" table:row="347" table:table="0"/>
          <office:change-info>
            <dc:creator>Unknown Author</dc:creator>
            <dc:date>2026-06-25T07:39:52.287241200</dc:date>
          </office:change-info>
          <table:previous>
            <table:change-track-table-cell office:value-type="float" office:value="0"/>
          </table:previous>
        </table:cell-content-change>
        <table:cell-content-change table:id="ct803">
          <table:cell-address table:column="16" table:row="348" table:table="0"/>
          <office:change-info>
            <dc:creator>Unknown Author</dc:creator>
            <dc:date>2026-06-25T07:39:52.287249000</dc:date>
          </office:change-info>
          <table:previous>
            <table:change-track-table-cell office:value-type="float" office:value="0"/>
          </table:previous>
        </table:cell-content-change>
        <table:cell-content-change table:id="ct804">
          <table:cell-address table:column="16" table:row="349" table:table="0"/>
          <office:change-info>
            <dc:creator>Unknown Author</dc:creator>
            <dc:date>2026-06-25T07:39:52.287256800</dc:date>
          </office:change-info>
          <table:previous>
            <table:change-track-table-cell office:value-type="float" office:value="0"/>
          </table:previous>
        </table:cell-content-change>
        <table:cell-content-change table:id="ct805">
          <table:cell-address table:column="16" table:row="350" table:table="0"/>
          <office:change-info>
            <dc:creator>Unknown Author</dc:creator>
            <dc:date>2026-06-25T07:39:52.287264600</dc:date>
          </office:change-info>
          <table:previous>
            <table:change-track-table-cell office:value-type="float" office:value="0"/>
          </table:previous>
        </table:cell-content-change>
        <table:cell-content-change table:id="ct806">
          <table:cell-address table:column="16" table:row="352" table:table="0"/>
          <office:change-info>
            <dc:creator>Unknown Author</dc:creator>
            <dc:date>2026-06-25T07:39:56.751025200</dc:date>
          </office:change-info>
          <table:previous>
            <table:change-track-table-cell office:value-type="float" office:value="0"/>
          </table:previous>
        </table:cell-content-change>
        <table:cell-content-change table:id="ct807">
          <table:cell-address table:column="16" table:row="353" table:table="0"/>
          <office:change-info>
            <dc:creator>Unknown Author</dc:creator>
            <dc:date>2026-06-25T07:39:56.751053600</dc:date>
          </office:change-info>
          <table:previous>
            <table:change-track-table-cell office:value-type="float" office:value="0"/>
          </table:previous>
        </table:cell-content-change>
        <table:cell-content-change table:id="ct808">
          <table:cell-address table:column="16" table:row="354" table:table="0"/>
          <office:change-info>
            <dc:creator>Unknown Author</dc:creator>
            <dc:date>2026-06-25T07:39:56.751063100</dc:date>
          </office:change-info>
          <table:previous>
            <table:change-track-table-cell office:value-type="float" office:value="0"/>
          </table:previous>
        </table:cell-content-change>
        <table:cell-content-change table:id="ct809">
          <table:cell-address table:column="16" table:row="355" table:table="0"/>
          <office:change-info>
            <dc:creator>Unknown Author</dc:creator>
            <dc:date>2026-06-25T07:39:56.751071800</dc:date>
          </office:change-info>
          <table:previous>
            <table:change-track-table-cell office:value-type="float" office:value="0"/>
          </table:previous>
        </table:cell-content-change>
        <table:cell-content-change table:id="ct810">
          <table:cell-address table:column="16" table:row="356" table:table="0"/>
          <office:change-info>
            <dc:creator>Unknown Author</dc:creator>
            <dc:date>2026-06-25T07:39:56.751080700</dc:date>
          </office:change-info>
          <table:previous>
            <table:change-track-table-cell office:value-type="float" office:value="0"/>
          </table:previous>
        </table:cell-content-change>
        <table:cell-content-change table:id="ct811">
          <table:cell-address table:column="16" table:row="357" table:table="0"/>
          <office:change-info>
            <dc:creator>Unknown Author</dc:creator>
            <dc:date>2026-06-25T07:39:56.751089500</dc:date>
          </office:change-info>
          <table:previous>
            <table:change-track-table-cell office:value-type="float" office:value="0"/>
          </table:previous>
        </table:cell-content-change>
        <table:cell-content-change table:id="ct812">
          <table:cell-address table:column="16" table:row="358" table:table="0"/>
          <office:change-info>
            <dc:creator>Unknown Author</dc:creator>
            <dc:date>2026-06-25T07:39:56.751098500</dc:date>
          </office:change-info>
          <table:previous>
            <table:change-track-table-cell office:value-type="float" office:value="0"/>
          </table:previous>
        </table:cell-content-change>
        <table:cell-content-change table:id="ct813">
          <table:cell-address table:column="16" table:row="360" table:table="0"/>
          <office:change-info>
            <dc:creator>Unknown Author</dc:creator>
            <dc:date>2026-06-25T07:40:00.357397700</dc:date>
          </office:change-info>
          <table:previous>
            <table:change-track-table-cell office:value-type="float" office:value="0"/>
          </table:previous>
        </table:cell-content-change>
        <table:cell-content-change table:id="ct814">
          <table:cell-address table:column="16" table:row="361" table:table="0"/>
          <office:change-info>
            <dc:creator>Unknown Author</dc:creator>
            <dc:date>2026-06-25T07:40:00.357429900</dc:date>
          </office:change-info>
          <table:previous>
            <table:change-track-table-cell office:value-type="float" office:value="0"/>
          </table:previous>
        </table:cell-content-change>
        <table:cell-content-change table:id="ct815">
          <table:cell-address table:column="16" table:row="362" table:table="0"/>
          <office:change-info>
            <dc:creator>Unknown Author</dc:creator>
            <dc:date>2026-06-25T07:40:00.357442300</dc:date>
          </office:change-info>
          <table:previous>
            <table:change-track-table-cell office:value-type="float" office:value="0"/>
          </table:previous>
        </table:cell-content-change>
        <table:cell-content-change table:id="ct816">
          <table:cell-address table:column="16" table:row="363" table:table="0"/>
          <office:change-info>
            <dc:creator>Unknown Author</dc:creator>
            <dc:date>2026-06-25T07:40:00.357453400</dc:date>
          </office:change-info>
          <table:previous>
            <table:change-track-table-cell office:value-type="float" office:value="0"/>
          </table:previous>
        </table:cell-content-change>
        <table:cell-content-change table:id="ct817">
          <table:cell-address table:column="16" table:row="364" table:table="0"/>
          <office:change-info>
            <dc:creator>Unknown Author</dc:creator>
            <dc:date>2026-06-25T07:40:00.357466700</dc:date>
          </office:change-info>
          <table:previous>
            <table:change-track-table-cell office:value-type="float" office:value="0"/>
          </table:previous>
        </table:cell-content-change>
        <table:cell-content-change table:id="ct818">
          <table:cell-address table:column="16" table:row="365" table:table="0"/>
          <office:change-info>
            <dc:creator>Unknown Author</dc:creator>
            <dc:date>2026-06-25T07:40:00.357478300</dc:date>
          </office:change-info>
          <table:previous>
            <table:change-track-table-cell office:value-type="float" office:value="0"/>
          </table:previous>
        </table:cell-content-change>
        <table:cell-content-change table:id="ct819">
          <table:cell-address table:column="16" table:row="366" table:table="0"/>
          <office:change-info>
            <dc:creator>Unknown Author</dc:creator>
            <dc:date>2026-06-25T07:40:00.357489500</dc:date>
          </office:change-info>
          <table:previous>
            <table:change-track-table-cell office:value-type="float" office:value="0"/>
          </table:previous>
        </table:cell-content-change>
        <table:cell-content-change table:id="ct820">
          <table:cell-address table:column="16" table:row="367" table:table="0"/>
          <office:change-info>
            <dc:creator>Unknown Author</dc:creator>
            <dc:date>2026-06-25T07:40:00.357501000</dc:date>
          </office:change-info>
          <table:previous>
            <table:change-track-table-cell office:value-type="float" office:value="0"/>
          </table:previous>
        </table:cell-content-change>
        <table:cell-content-change table:id="ct821">
          <table:cell-address table:column="16" table:row="368" table:table="0"/>
          <office:change-info>
            <dc:creator>Unknown Author</dc:creator>
            <dc:date>2026-06-25T07:40:00.357512100</dc:date>
          </office:change-info>
          <table:previous>
            <table:change-track-table-cell office:value-type="float" office:value="0"/>
          </table:previous>
        </table:cell-content-change>
        <table:cell-content-change table:id="ct822">
          <table:cell-address table:column="16" table:row="370" table:table="0"/>
          <office:change-info>
            <dc:creator>Unknown Author</dc:creator>
            <dc:date>2026-06-25T07:40:03.815954000</dc:date>
          </office:change-info>
          <table:previous>
            <table:change-track-table-cell office:value-type="float" office:value="0"/>
          </table:previous>
        </table:cell-content-change>
        <table:cell-content-change table:id="ct823">
          <table:cell-address table:column="16" table:row="371" table:table="0"/>
          <office:change-info>
            <dc:creator>Unknown Author</dc:creator>
            <dc:date>2026-06-25T07:40:03.815981100</dc:date>
          </office:change-info>
          <table:previous>
            <table:change-track-table-cell office:value-type="float" office:value="0"/>
          </table:previous>
        </table:cell-content-change>
        <table:cell-content-change table:id="ct824">
          <table:cell-address table:column="16" table:row="372" table:table="0"/>
          <office:change-info>
            <dc:creator>Unknown Author</dc:creator>
            <dc:date>2026-06-25T07:40:03.815989900</dc:date>
          </office:change-info>
          <table:previous>
            <table:change-track-table-cell office:value-type="float" office:value="0"/>
          </table:previous>
        </table:cell-content-change>
        <table:cell-content-change table:id="ct825">
          <table:cell-address table:column="16" table:row="373" table:table="0"/>
          <office:change-info>
            <dc:creator>Unknown Author</dc:creator>
            <dc:date>2026-06-25T07:40:03.815998200</dc:date>
          </office:change-info>
          <table:previous>
            <table:change-track-table-cell office:value-type="float" office:value="0"/>
          </table:previous>
        </table:cell-content-change>
        <table:cell-content-change table:id="ct826">
          <table:cell-address table:column="16" table:row="374" table:table="0"/>
          <office:change-info>
            <dc:creator>Unknown Author</dc:creator>
            <dc:date>2026-06-25T07:40:03.816006500</dc:date>
          </office:change-info>
          <table:previous>
            <table:change-track-table-cell office:value-type="float" office:value="0"/>
          </table:previous>
        </table:cell-content-change>
        <table:cell-content-change table:id="ct827">
          <table:cell-address table:column="16" table:row="375" table:table="0"/>
          <office:change-info>
            <dc:creator>Unknown Author</dc:creator>
            <dc:date>2026-06-25T07:40:03.816014400</dc:date>
          </office:change-info>
          <table:previous>
            <table:change-track-table-cell office:value-type="float" office:value="0"/>
          </table:previous>
        </table:cell-content-change>
        <table:cell-content-change table:id="ct828">
          <table:cell-address table:column="16" table:row="377" table:table="0"/>
          <office:change-info>
            <dc:creator>Unknown Author</dc:creator>
            <dc:date>2026-06-25T07:40:11.932488200</dc:date>
          </office:change-info>
          <table:previous>
            <table:change-track-table-cell office:value-type="float" office:value="0"/>
          </table:previous>
        </table:cell-content-change>
        <table:cell-content-change table:id="ct829">
          <table:cell-address table:column="16" table:row="378" table:table="0"/>
          <office:change-info>
            <dc:creator>Unknown Author</dc:creator>
            <dc:date>2026-06-25T07:40:11.932514100</dc:date>
          </office:change-info>
          <table:previous>
            <table:change-track-table-cell office:value-type="float" office:value="0"/>
          </table:previous>
        </table:cell-content-change>
        <table:cell-content-change table:id="ct830">
          <table:cell-address table:column="16" table:row="379" table:table="0"/>
          <office:change-info>
            <dc:creator>Unknown Author</dc:creator>
            <dc:date>2026-06-25T07:40:11.932523000</dc:date>
          </office:change-info>
          <table:previous>
            <table:change-track-table-cell office:value-type="float" office:value="0"/>
          </table:previous>
        </table:cell-content-change>
        <table:cell-content-change table:id="ct831">
          <table:cell-address table:column="16" table:row="380" table:table="0"/>
          <office:change-info>
            <dc:creator>Unknown Author</dc:creator>
            <dc:date>2026-06-25T07:40:11.932531900</dc:date>
          </office:change-info>
          <table:previous>
            <table:change-track-table-cell office:value-type="float" office:value="0"/>
          </table:previous>
        </table:cell-content-change>
        <table:cell-content-change table:id="ct832">
          <table:cell-address table:column="16" table:row="377" table:table="0"/>
          <office:change-info>
            <dc:creator>Unknown Author</dc:creator>
            <dc:date>2026-06-25T07:40:29.800541600</dc:date>
          </office:change-info>
          <table:previous table:id="ct828">
            <table:change-track-table-cell table:cell-address="WBS.Q378" table:formula="of:=IF([.$L378]&lt;&gt;&quot;&quot;;NETWORKDAYS([.$L378];[.$M378];[$休日.$B$4:.$B$304]);&quot;&quot;)" office:value-type="string"/>
          </table:previous>
        </table:cell-content-change>
        <table:cell-content-change table:id="ct833">
          <table:cell-address table:column="16" table:row="378" table:table="0"/>
          <office:change-info>
            <dc:creator>Unknown Author</dc:creator>
            <dc:date>2026-06-25T07:40:29.800562700</dc:date>
          </office:change-info>
          <table:previous table:id="ct829">
            <table:change-track-table-cell table:cell-address="WBS.Q379" table:formula="of:=IF([.$L379]&lt;&gt;&quot;&quot;;NETWORKDAYS([.$L379];[.$M379];[$休日.$B$4:.$B$304]);&quot;&quot;)" office:value-type="string"/>
          </table:previous>
        </table:cell-content-change>
        <table:cell-content-change table:id="ct834">
          <table:cell-address table:column="16" table:row="379" table:table="0"/>
          <office:change-info>
            <dc:creator>Unknown Author</dc:creator>
            <dc:date>2026-06-25T07:40:29.800577400</dc:date>
          </office:change-info>
          <table:previous table:id="ct830">
            <table:change-track-table-cell table:cell-address="WBS.Q380" table:formula="of:=IF([.$L380]&lt;&gt;&quot;&quot;;NETWORKDAYS([.$L380];[.$M380];[$休日.$B$4:.$B$304]);&quot;&quot;)" office:value-type="string"/>
          </table:previous>
        </table:cell-content-change>
        <table:cell-content-change table:id="ct835">
          <table:cell-address table:column="16" table:row="380" table:table="0"/>
          <office:change-info>
            <dc:creator>Unknown Author</dc:creator>
            <dc:date>2026-06-25T07:40:29.800589500</dc:date>
          </office:change-info>
          <table:previous table:id="ct831">
            <table:change-track-table-cell table:cell-address="WBS.Q381" table:formula="of:=IF([.$L381]&lt;&gt;&quot;&quot;;NETWORKDAYS([.$L381];[.$M381];[$休日.$B$4:.$B$304]);&quot;&quot;)" office:value-type="string"/>
          </table:previous>
        </table:cell-content-change>
        <table:cell-content-change table:id="ct836">
          <table:cell-address table:column="16" table:row="381" table:table="0"/>
          <office:change-info>
            <dc:creator>Unknown Author</dc:creator>
            <dc:date>2026-06-25T07:40:29.800597800</dc:date>
          </office:change-info>
          <table:previous>
            <table:change-track-table-cell/>
          </table:previous>
        </table:cell-content-change>
        <table:cell-content-change table:id="ct837">
          <table:cell-address table:column="16" table:row="382" table:table="0"/>
          <office:change-info>
            <dc:creator>Unknown Author</dc:creator>
            <dc:date>2026-06-25T07:40:29.800622400</dc:date>
          </office:change-info>
          <table:previous>
            <table:change-track-table-cell office:value-type="float" office:value="0"/>
          </table:previous>
        </table:cell-content-change>
        <table:cell-content-change table:id="ct838">
          <table:cell-address table:column="16" table:row="383" table:table="0"/>
          <office:change-info>
            <dc:creator>Unknown Author</dc:creator>
            <dc:date>2026-06-25T07:40:29.800631400</dc:date>
          </office:change-info>
          <table:previous>
            <table:change-track-table-cell office:value-type="float" office:value="0"/>
          </table:previous>
        </table:cell-content-change>
        <table:cell-content-change table:id="ct839">
          <table:cell-address table:column="16" table:row="384" table:table="0"/>
          <office:change-info>
            <dc:creator>Unknown Author</dc:creator>
            <dc:date>2026-06-25T07:40:29.800639600</dc:date>
          </office:change-info>
          <table:previous>
            <table:change-track-table-cell office:value-type="float" office:value="0"/>
          </table:previous>
        </table:cell-content-change>
        <table:cell-content-change table:id="ct840">
          <table:cell-address table:column="16" table:row="385" table:table="0"/>
          <office:change-info>
            <dc:creator>Unknown Author</dc:creator>
            <dc:date>2026-06-25T07:40:29.800647400</dc:date>
          </office:change-info>
          <table:previous>
            <table:change-track-table-cell/>
          </table:previous>
        </table:cell-content-change>
        <table:cell-content-change table:id="ct841">
          <table:cell-address table:column="16" table:row="386" table:table="0"/>
          <office:change-info>
            <dc:creator>Unknown Author</dc:creator>
            <dc:date>2026-06-25T07:40:29.800655000</dc:date>
          </office:change-info>
          <table:previous>
            <table:change-track-table-cell office:value-type="float" office:value="0"/>
          </table:previous>
        </table:cell-content-change>
        <table:cell-content-change table:id="ct842">
          <table:cell-address table:column="16" table:row="387" table:table="0"/>
          <office:change-info>
            <dc:creator>Unknown Author</dc:creator>
            <dc:date>2026-06-25T07:40:29.800662000</dc:date>
          </office:change-info>
          <table:previous>
            <table:change-track-table-cell office:value-type="float" office:value="0"/>
          </table:previous>
        </table:cell-content-change>
        <table:cell-content-change table:id="ct843">
          <table:cell-address table:column="16" table:row="388" table:table="0"/>
          <office:change-info>
            <dc:creator>Unknown Author</dc:creator>
            <dc:date>2026-06-25T07:40:29.800669400</dc:date>
          </office:change-info>
          <table:previous>
            <table:change-track-table-cell office:value-type="float" office:value="0"/>
          </table:previous>
        </table:cell-content-change>
        <table:cell-content-change table:id="ct844">
          <table:cell-address table:column="16" table:row="389" table:table="0"/>
          <office:change-info>
            <dc:creator>Unknown Author</dc:creator>
            <dc:date>2026-06-25T07:40:29.800677000</dc:date>
          </office:change-info>
          <table:previous>
            <table:change-track-table-cell/>
          </table:previous>
        </table:cell-content-change>
        <table:cell-content-change table:id="ct845">
          <table:cell-address table:column="16" table:row="390" table:table="0"/>
          <office:change-info>
            <dc:creator>Unknown Author</dc:creator>
            <dc:date>2026-06-25T07:40:29.800684300</dc:date>
          </office:change-info>
          <table:previous>
            <table:change-track-table-cell office:value-type="float" office:value="0"/>
          </table:previous>
        </table:cell-content-change>
        <table:cell-content-change table:id="ct846">
          <table:cell-address table:column="16" table:row="391" table:table="0"/>
          <office:change-info>
            <dc:creator>Unknown Author</dc:creator>
            <dc:date>2026-06-25T07:40:34.584341100</dc:date>
          </office:change-info>
          <table:previous>
            <table:change-track-table-cell office:value-type="float" office:value="0"/>
          </table:previous>
        </table:cell-content-change>
        <table:cell-content-change table:id="ct847">
          <table:cell-address table:column="16" table:row="392" table:table="0"/>
          <office:change-info>
            <dc:creator>Unknown Author</dc:creator>
            <dc:date>2026-06-25T07:40:34.584356100</dc:date>
          </office:change-info>
          <table:previous>
            <table:change-track-table-cell office:value-type="float" office:value="0"/>
          </table:previous>
        </table:cell-content-change>
        <table:cell-content-change table:id="ct848">
          <table:cell-address table:column="16" table:row="393" table:table="0"/>
          <office:change-info>
            <dc:creator>Unknown Author</dc:creator>
            <dc:date>2026-06-25T07:40:34.584363500</dc:date>
          </office:change-info>
          <table:previous>
            <table:change-track-table-cell office:value-type="float" office:value="0"/>
          </table:previous>
        </table:cell-content-change>
        <table:cell-content-change table:id="ct849">
          <table:cell-address table:column="16" table:row="394" table:table="0"/>
          <office:change-info>
            <dc:creator>Unknown Author</dc:creator>
            <dc:date>2026-06-25T07:40:34.584370700</dc:date>
          </office:change-info>
          <table:previous>
            <table:change-track-table-cell office:value-type="float" office:value="0"/>
          </table:previous>
        </table:cell-content-change>
        <table:cell-content-change table:id="ct850">
          <table:cell-address table:column="16" table:row="395" table:table="0"/>
          <office:change-info>
            <dc:creator>Unknown Author</dc:creator>
            <dc:date>2026-06-25T07:40:34.584378000</dc:date>
          </office:change-info>
          <table:previous>
            <table:change-track-table-cell office:value-type="float" office:value="0"/>
          </table:previous>
        </table:cell-content-change>
        <table:cell-content-change table:id="ct851">
          <table:cell-address table:column="16" table:row="396" table:table="0"/>
          <office:change-info>
            <dc:creator>Unknown Author</dc:creator>
            <dc:date>2026-06-25T07:40:34.584385100</dc:date>
          </office:change-info>
          <table:previous>
            <table:change-track-table-cell office:value-type="float" office:value="0"/>
          </table:previous>
        </table:cell-content-change>
        <table:cell-content-change table:id="ct852">
          <table:cell-address table:column="16" table:row="397" table:table="0"/>
          <office:change-info>
            <dc:creator>Unknown Author</dc:creator>
            <dc:date>2026-06-25T07:40:34.584392300</dc:date>
          </office:change-info>
          <table:previous>
            <table:change-track-table-cell office:value-type="float" office:value="0"/>
          </table:previous>
        </table:cell-content-change>
        <table:cell-content-change table:id="ct853">
          <table:cell-address table:column="16" table:row="398" table:table="0"/>
          <office:change-info>
            <dc:creator>Unknown Author</dc:creator>
            <dc:date>2026-06-25T07:40:34.584399700</dc:date>
          </office:change-info>
          <table:previous>
            <table:change-track-table-cell office:value-type="float" office:value="0"/>
          </table:previous>
        </table:cell-content-change>
        <table:cell-content-change table:id="ct854">
          <table:cell-address table:column="16" table:row="399" table:table="0"/>
          <office:change-info>
            <dc:creator>Unknown Author</dc:creator>
            <dc:date>2026-06-25T07:40:34.584406600</dc:date>
          </office:change-info>
          <table:previous>
            <table:change-track-table-cell office:value-type="float" office:value="0"/>
          </table:previous>
        </table:cell-content-change>
        <table:cell-content-change table:id="ct855">
          <table:cell-address table:column="16" table:row="400" table:table="0"/>
          <office:change-info>
            <dc:creator>Unknown Author</dc:creator>
            <dc:date>2026-06-25T07:40:34.584414400</dc:date>
          </office:change-info>
          <table:previous>
            <table:change-track-table-cell office:value-type="float" office:value="0"/>
          </table:previous>
        </table:cell-content-change>
        <table:cell-content-change table:id="ct856">
          <table:cell-address table:column="16" table:row="401" table:table="0"/>
          <office:change-info>
            <dc:creator>Unknown Author</dc:creator>
            <dc:date>2026-06-25T07:40:34.584422000</dc:date>
          </office:change-info>
          <table:previous>
            <table:change-track-table-cell office:value-type="float" office:value="0"/>
          </table:previous>
        </table:cell-content-change>
        <table:cell-content-change table:id="ct857">
          <table:cell-address table:column="16" table:row="402" table:table="0"/>
          <office:change-info>
            <dc:creator>Unknown Author</dc:creator>
            <dc:date>2026-06-25T07:40:34.584429500</dc:date>
          </office:change-info>
          <table:previous>
            <table:change-track-table-cell office:value-type="float" office:value="0"/>
          </table:previous>
        </table:cell-content-change>
        <table:cell-content-change table:id="ct858">
          <table:cell-address table:column="16" table:row="403" table:table="0"/>
          <office:change-info>
            <dc:creator>Unknown Author</dc:creator>
            <dc:date>2026-06-25T07:40:34.584438500</dc:date>
          </office:change-info>
          <table:previous>
            <table:change-track-table-cell office:value-type="float" office:value="0"/>
          </table:previous>
        </table:cell-content-change>
        <table:cell-content-change table:id="ct859">
          <table:cell-address table:column="16" table:row="267" table:table="0"/>
          <office:change-info>
            <dc:creator>Unknown Author</dc:creator>
            <dc:date>2026-06-25T07:40:43.462556300</dc:date>
          </office:change-info>
          <table:previous>
            <table:change-track-table-cell office:value-type="float" office:value="0"/>
          </table:previous>
        </table:cell-content-change>
        <table:deletion table:id="ct860" table:type="row" table:position="267" table:table="0">
          <office:change-info>
            <dc:creator>Unknown Author</dc:creator>
            <dc:date>2026-06-25T07:40:54.166842300</dc:date>
          </office:change-info>
          <table:deletions>
            <table:cell-content-deletion table:id="ct859">
              <table:change-track-table-cell table:cell-address="WBS.Q268" table:formula="of:=IF([.$L268]&lt;&gt;&quot;&quot;;NETWORKDAYS([.$L268];[.$M268];[$休日.$B$4:.$B$304]);&quot;&quot;)" office:value-type="float" office:value="3"/>
            </table:cell-content-deletion>
            <table:cell-content-deletion table:id="ct400">
              <table:change-track-table-cell table:cell-address="WBS.B268" table:formula="of:=IF(AND([.$D268]&lt;&gt;&quot;&quot;;[.$F268]=&quot;&quot;);&quot;E&quot;&amp;ROW();[.$B186])" office:value-type="string">
                <text:p>E263</text:p>
              </table:change-track-table-cell>
            </table:cell-content-deletion>
            <table:cell-content-deletion table:id="ct384">
              <table:change-track-table-cell table:cell-address="WBS.C268" table:formula="of:=IF(AND([.$D268]&lt;&gt;&quot;&quot;;[.$D268]&lt;&gt;&quot;○&quot;);MAX([.$C$3:.$C262])+1;[.$C262])" office:value-type="float" office:value="14"/>
            </table:cell-content-deletion>
            <table:change-deletion table:id="ct368"/>
            <table:cell-content-deletion>
              <table:cell-address table:column="4" table:row="267" table:table="0"/>
              <table:change-track-table-cell table:cell-address="WBS.E268" table:formula="of:=IF(AND([.$F268]&lt;&gt;&quot;&quot;;[.$D247]&lt;&gt;&quot;&quot;);1;IF([.$F268]&lt;&gt;&quot;&quot;;MAX(INDIRECT([.$B268]):[.$E247])+1;&quot;&quot;))" office:value-type="string"/>
            </table:cell-content-deletion>
            <table:cell-content-deletion>
              <table:cell-address table:column="6" table:row="267" table:table="0"/>
              <table:change-track-table-cell table:cell-address="WBS.G268" table:formula="of:=IF([.$H268]=&quot;&quot;;&quot;&quot;;IF([.$G247]=&quot;&quot;;1;[.$G247]+1))" office:value-type="string"/>
            </table:cell-content-deletion>
            <table:cell-content-deletion>
              <table:cell-address table:column="15" table:row="267" table:table="0"/>
              <table:change-track-table-cell table:cell-address="WBS.P268" table:formula="of:=IF([.$L268]&lt;&gt;&quot;&quot;;NETWORKDAYS([.$L268];[.$M268];[$休日.$B$4:.$B$304]);&quot;&quot;)" office:value-type="float" office:value="3"/>
            </table:cell-content-deletion>
            <table:cell-content-deletion>
              <table:cell-address table:column="17" table:row="267" table:table="0"/>
              <table:change-track-table-cell table:cell-address="WBS.R268" table:formula="of:=IF(OR(AND([.$N268]=&quot;&quot;;[.$L268]&lt;&gt;&quot;&quot;;[.$L268]&lt;=[.$U$1]);AND([.$M268]&lt;&gt;&quot;&quot;;[.Q268]&lt;100;[.$M268]&lt;=[.$U$1]));&quot;遅延&quot;;&quot;&quot;)" office:value-type="string"/>
            </table:cell-content-deletion>
            <table:cell-content-deletion>
              <table:cell-address table:column="19" table:row="267" table:table="0"/>
              <table:change-track-table-cell table:cell-address="WBS.T268" table:formula="of:=SUM([.$V268:.$FM268])" office:value-type="float" office:value="0"/>
            </table:cell-content-deletion>
          </table:deletions>
        </table:deletion>
        <table:cell-content-change table:id="ct861">
          <table:cell-address table:column="16" table:row="100" table:table="0"/>
          <office:change-info>
            <dc:creator>Unknown Author</dc:creator>
            <dc:date>2026-06-25T07:41:32.320952000</dc:date>
          </office:change-info>
          <table:previous>
            <table:change-track-table-cell office:value-type="float" office:value="0"/>
          </table:previous>
        </table:cell-content-change>
        <table:cell-content-change table:id="ct862">
          <table:cell-address table:column="16" table:row="88" table:table="0"/>
          <office:change-info>
            <dc:creator>Unknown Author</dc:creator>
            <dc:date>2026-06-25T07:41:38.155350200</dc:date>
          </office:change-info>
          <table:previous>
            <table:change-track-table-cell office:value-type="float" office:value="0"/>
          </table:previous>
        </table:cell-content-change>
        <table:cell-content-change table:id="ct863">
          <table:cell-address table:column="16" table:row="48" table:table="0"/>
          <office:change-info>
            <dc:creator>Unknown Author</dc:creator>
            <dc:date>2026-06-25T07:41:44.986246500</dc:date>
          </office:change-info>
          <table:previous>
            <table:change-track-table-cell office:value-type="float" office:value="0"/>
          </table:previous>
        </table:cell-content-change>
        <table:cell-content-change table:id="ct864">
          <table:cell-address table:column="10" table:row="243" table:table="0"/>
          <office:change-info>
            <dc:creator>Unknown Author</dc:creator>
            <dc:date>2026-06-25T07:46:16.764596300</dc:date>
          </office:change-info>
          <table:previous table:id="ct472">
            <table:change-track-table-cell office:value-type="float" office:value="1"/>
          </table:previous>
        </table:cell-content-change>
        <table:deletion table:id="ct865" table:type="row" table:position="9" table:table="0">
          <office:change-info>
            <dc:creator>Unknown Author</dc:creator>
            <dc:date>2026-06-25T07:46:22.236892200</dc:date>
          </office:change-info>
        </table:deletion>
        <table:deletion table:id="ct866" table:type="row" table:position="14" table:table="0">
          <office:change-info>
            <dc:creator>Unknown Author</dc:creator>
            <dc:date>2026-06-25T07:46:25.961118400</dc:date>
          </office:change-info>
        </table:deletion>
        <table:deletion table:id="ct867" table:type="row" table:position="20" table:table="0">
          <office:change-info>
            <dc:creator>Unknown Author</dc:creator>
            <dc:date>2026-06-25T07:46:29.518451400</dc:date>
          </office:change-info>
        </table:deletion>
        <table:deletion table:id="ct868" table:type="row" table:position="26" table:table="0">
          <office:change-info>
            <dc:creator>Unknown Author</dc:creator>
            <dc:date>2026-06-25T07:46:34.054994900</dc:date>
          </office:change-info>
        </table:deletion>
        <table:deletion table:id="ct869" table:type="row" table:position="32" table:table="0">
          <office:change-info>
            <dc:creator>Unknown Author</dc:creator>
            <dc:date>2026-06-25T07:46:41.717646900</dc:date>
          </office:change-info>
        </table:deletion>
        <table:deletion table:id="ct870" table:type="row" table:position="37" table:table="0">
          <office:change-info>
            <dc:creator>Unknown Author</dc:creator>
            <dc:date>2026-06-25T07:46:47.668358300</dc:date>
          </office:change-info>
        </table:deletion>
        <table:deletion table:id="ct871" table:type="row" table:position="40" table:table="0" table:multi-deletion-spanned="2">
          <office:change-info>
            <dc:creator>Unknown Author</dc:creator>
            <dc:date>2026-06-25T07:46:54.120211900</dc:date>
          </office:change-info>
          <table:deletions>
            <table:cell-content-deletion>
              <table:cell-address table:column="1" table:row="40" table:table="0"/>
              <table:change-track-table-cell table:cell-address="WBS.B41" table:formula="of:=IF(AND([.$D41]&lt;&gt;&quot;&quot;;[.$F41]=&quot;&quot;);&quot;E&quot;&amp;ROW();[.$B39])" office:value-type="string">
                <text:p>E41</text:p>
              </table:change-track-table-cell>
            </table:cell-content-deletion>
            <table:cell-content-deletion>
              <table:cell-address table:column="2" table:row="40" table:table="0"/>
              <table:change-track-table-cell table:cell-address="WBS.C41" table:formula="of:=IF(AND([.$D41]&lt;&gt;&quot;&quot;;[.$D41]&lt;&gt;&quot;○&quot;);MAX([.$C$3:.$C39])+1;[.$C39])" office:value-type="float" office:value="3"/>
            </table:cell-content-deletion>
            <table:cell-content-deletion>
              <table:cell-address table:column="4" table:row="40" table:table="0"/>
              <table:change-track-table-cell table:cell-address="WBS.E41" table:formula="of:=IF(AND([.$F41]&lt;&gt;&quot;&quot;;[.$D39]&lt;&gt;&quot;&quot;);1;IF([.$F41]&lt;&gt;&quot;&quot;;MAX(INDIRECT([.$B41]):[.$E39])+1;&quot;&quot;))" office:value-type="string"/>
            </table:cell-content-deletion>
            <table:cell-content-deletion>
              <table:cell-address table:column="6" table:row="40" table:table="0"/>
              <table:change-track-table-cell table:cell-address="WBS.G41" table:formula="of:=IF([.$H41]=&quot;&quot;;&quot;&quot;;IF([.$G39]=&quot;&quot;;1;[.$G39]+1))" office:value-type="string"/>
            </table:cell-content-deletion>
            <table:cell-content-deletion>
              <table:cell-address table:column="15" table:row="40" table:table="0"/>
              <table:change-track-table-cell table:cell-address="WBS.P41" table:formula="of:=IF([.$L41]&lt;&gt;&quot;&quot;;NETWORKDAYS([.$L41];[.$M41];[$休日.$B$4:.$B$304]);&quot;&quot;)" office:value-type="float" office:value="4"/>
            </table:cell-content-deletion>
            <table:cell-content-deletion>
              <table:cell-address table:column="17" table:row="40" table:table="0"/>
              <table:change-track-table-cell table:cell-address="WBS.R41" table:formula="of:=IF(OR(AND([.$N41]=&quot;&quot;;[.$L41]&lt;&gt;&quot;&quot;;[.$L41]&lt;=[.$U$1]);AND([.$M41]&lt;&gt;&quot;&quot;;[.Q41]&lt;100;[.$M41]&lt;=[.$U$1]));&quot;遅延&quot;;&quot;&quot;)" office:value-type="string"/>
            </table:cell-content-deletion>
          </table:deletions>
        </table:deletion>
        <table:deletion table:id="ct872" table:type="row" table:position="40" table:table="0">
          <office:change-info>
            <dc:creator>Unknown Author</dc:creator>
            <dc:date>2026-06-25T07:46:54.121152100</dc:date>
          </office:change-info>
          <table:deletions>
            <table:change-deletion table:id="ct871"/>
            <table:cell-content-deletion>
              <table:cell-address table:column="1" table:row="40" table:table="0"/>
              <table:change-track-table-cell table:cell-address="WBS.B42" table:formula="of:=IF(AND([.$D42]&lt;&gt;&quot;&quot;;[.$F42]=&quot;&quot;);&quot;E&quot;&amp;ROW();[.$B41])" office:value-type="string">
                <text:p>E41</text:p>
              </table:change-track-table-cell>
            </table:cell-content-deletion>
            <table:cell-content-deletion>
              <table:cell-address table:column="2" table:row="40" table:table="0"/>
              <table:change-track-table-cell table:cell-address="WBS.C42" table:formula="of:=IF(AND([.$D42]&lt;&gt;&quot;&quot;;[.$D42]&lt;&gt;&quot;○&quot;);MAX([.$C$3:.$C41])+1;[.$C41])" office:value-type="float" office:value="3"/>
            </table:cell-content-deletion>
            <table:cell-content-deletion>
              <table:cell-address table:column="4" table:row="40" table:table="0"/>
              <table:change-track-table-cell table:cell-address="WBS.E42" table:formula="of:=IF(AND([.$F42]&lt;&gt;&quot;&quot;;[.$D41]&lt;&gt;&quot;&quot;);1;IF([.$F42]&lt;&gt;&quot;&quot;;MAX(INDIRECT([.$B42]):[.$E41])+1;&quot;&quot;))" office:value-type="float" office:value="1"/>
            </table:cell-content-deletion>
            <table:cell-content-deletion>
              <table:cell-address table:column="6" table:row="40" table:table="0"/>
              <table:change-track-table-cell table:cell-address="WBS.G42" table:formula="of:=IF([.$H42]=&quot;&quot;;&quot;&quot;;IF([.$G41]=&quot;&quot;;1;[.$G41]+1))" office:value-type="string"/>
            </table:cell-content-deletion>
            <table:cell-content-deletion>
              <table:cell-address table:column="15" table:row="40" table:table="0"/>
              <table:change-track-table-cell table:cell-address="WBS.P42" table:formula="of:=IF([.$L42]&lt;&gt;&quot;&quot;;NETWORKDAYS([.$L42];[.$M42];[$休日.$B$4:.$B$304]);&quot;&quot;)" office:value-type="float" office:value="1"/>
            </table:cell-content-deletion>
            <table:cell-content-deletion>
              <table:cell-address table:column="17" table:row="40" table:table="0"/>
              <table:change-track-table-cell table:cell-address="WBS.R42" table:formula="of:=IF(OR(AND([.$N42]=&quot;&quot;;[.$L42]&lt;&gt;&quot;&quot;;[.$L42]&lt;=[.$U$1]);AND([.$M42]&lt;&gt;&quot;&quot;;[.Q42]&lt;100;[.$M42]&lt;=[.$U$1]));&quot;遅延&quot;;&quot;&quot;)" office:value-type="string"/>
            </table:cell-content-deletion>
          </table:deletions>
        </table:deletion>
        <table:insertion table:id="ct873" table:type="row" table:position="8" table:table="0">
          <office:change-info>
            <dc:creator>Unknown Author</dc:creator>
            <dc:date>2026-06-25T07:47:03.344154300</dc:date>
          </office:change-info>
        </table:insertion>
        <table:insertion table:id="ct874" table:type="row" table:position="13" table:table="0">
          <office:change-info>
            <dc:creator>Unknown Author</dc:creator>
            <dc:date>2026-06-25T07:47:09.103078000</dc:date>
          </office:change-info>
        </table:insertion>
        <table:insertion table:id="ct875" table:type="row" table:position="19" table:table="0">
          <office:change-info>
            <dc:creator>Unknown Author</dc:creator>
            <dc:date>2026-06-25T07:47:17.799365400</dc:date>
          </office:change-info>
        </table:insertion>
        <table:insertion table:id="ct876" table:type="row" table:position="25" table:table="0">
          <office:change-info>
            <dc:creator>Unknown Author</dc:creator>
            <dc:date>2026-06-25T07:47:31.675532700</dc:date>
          </office:change-info>
        </table:insertion>
        <table:insertion table:id="ct877" table:type="row" table:position="31" table:table="0">
          <office:change-info>
            <dc:creator>Unknown Author</dc:creator>
            <dc:date>2026-06-25T07:47:36.189085000</dc:date>
          </office:change-info>
        </table:insertion>
        <table:insertion table:id="ct878" table:type="row" table:position="36" table:table="0">
          <office:change-info>
            <dc:creator>Unknown Author</dc:creator>
            <dc:date>2026-06-25T07:47:39.582143300</dc:date>
          </office:change-info>
        </table:insertion>
        <table:insertion table:id="ct879" table:type="row" table:position="39" table:table="0">
          <office:change-info>
            <dc:creator>Unknown Author</dc:creator>
            <dc:date>2026-06-25T07:47:43.841492900</dc:date>
          </office:change-info>
        </table:insertion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1">
        <office:forms form:automatic-focus="false" form:apply-design-mode="false"/>
        <table:table-column-group>
          <table:table-column table:style-name="co1" table:default-cell-style-name="ce1"/>
          <table:table-column table:style-name="co2" table:default-cell-style-name="ce4"/>
        </table:table-column-group>
        <table:table-column table:style-name="co3" table:default-cell-style-name="ce1"/>
        <table:table-column table:style-name="co4" table:default-cell-style-name="ce1"/>
        <table:table-column-group>
          <table:table-column table:style-name="co3" table:default-cell-style-name="ce1"/>
          <table:table-column table:style-name="co5" table:default-cell-style-name="ce1"/>
        </table:table-column-group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2" table:default-cell-style-name="ce1"/>
        <table:table-column-group>
          <table:table-column table:style-name="co9" table:number-columns-repeated="2" table:default-cell-style-name="ce1"/>
          <table:table-column table:style-name="co10" table:default-cell-style-name="ce1"/>
          <table:table-column table:style-name="co7" table:default-cell-style-name="ce1"/>
          <table:table-column table:style-name="co11" table:default-cell-style-name="ce1"/>
          <table:table-column table:style-name="co11" table:visibility="collapse" table:number-columns-repeated="2" table:default-cell-style-name="ce1"/>
        </table:table-column-group>
        <table:table-column table:style-name="co11" table:default-cell-style-name="ce1"/>
        <table:table-column table:style-name="co12" table:number-columns-repeated="3" table:default-cell-style-name="ce1"/>
        <table:table-column table:style-name="co12" table:number-columns-repeated="2" table:default-cell-style-name="ce116"/>
        <table:table-column table:style-name="co12" table:number-columns-repeated="5" table:default-cell-style-name="ce1"/>
        <table:table-column table:style-name="co12" table:default-cell-style-name="ce116"/>
        <table:table-column table:style-name="co13" table:default-cell-style-name="ce116"/>
        <table:table-column table:style-name="co12" table:number-columns-repeated="5" table:default-cell-style-name="ce1"/>
        <table:table-column table:style-name="co12" table:number-columns-repeated="2" table:default-cell-style-name="ce116"/>
        <table:table-column table:style-name="co12" table:number-columns-repeated="4" table:default-cell-style-name="ce1"/>
        <table:table-column table:style-name="co12" table:default-cell-style-name="ce145"/>
        <table:table-column table:style-name="co12" table:number-columns-repeated="2" table:default-cell-style-name="ce116"/>
        <table:table-column table:style-name="co12" table:default-cell-style-name="ce159"/>
        <table:table-column table:style-name="co12" table:number-columns-repeated="121" table:default-cell-style-name="ce1"/>
        <table:table-column table:style-name="co14" table:number-columns-repeated="855" table:default-cell-style-name="ce1"/>
        <table:table-column table:style-name="co15" table:number-columns-repeated="15360" table:default-cell-style-name="Default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25" calcext:value-type="date">
            <text:p>2026/06/25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16215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16215"/>
        </table:table-row>
        <table:table-row table:style-name="ro1">
          <table:table-cell table:number-columns-repeated="2"/>
          <table:table-cell table:style-name="ce11"/>
          <table:table-cell table:number-columns-repeated="3"/>
          <table:table-cell table:formula="of:=COUNT([.G:.G])" office:value-type="float" office:value="186" calcext:value-type="float">
            <text:p>186</text:p>
          </table:table-cell>
          <table:table-cell table:number-columns-repeated="8"/>
          <table:table-cell table:style-name="ce202" table:formula="of:=[.Q3]/[.R3]" office:value-type="percentage" office:value="1.00862068965517" calcext:value-type="percentage">
            <text:p>101%</text:p>
          </table:table-cell>
          <table:table-cell table:formula="of:=COUNTIF([.Q:.Q];100)" office:value-type="float" office:value="234" calcext:value-type="float">
            <text:p>234</text:p>
          </table:table-cell>
          <table:table-cell table:formula="of:=COUNTIF([.P:.P];&quot;&gt;0&quot;)" office:value-type="float" office:value="232" calcext:value-type="float">
            <text:p>232</text:p>
          </table:table-cell>
          <table:table-cell table:number-columns-repeated="2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16215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1">E</text:span><text:span text:style-name="T1">列の数式用</text:span></text:p>
            </office:annotation>
            <text:p>数式用</text:p>
          </table:table-cell>
          <table:table-cell table:style-name="ce57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2">この作業工程表はサンプルです。作業項目を作成する際の参考としてください。</text:span></text:p>
              <text:p text:style-name="P3"><text:span text:style-name="T2"/></text:p>
            </office:annotation>
            <text:p>#</text:p>
          </table:table-cell>
          <table:table-cell table:style-name="ce117" office:value-type="string" calcext:value-type="string">
            <office:annotation draw:style-name="gr3" draw:text-style-name="P6" svg:width="7.062cm" svg:height="2.574cm" svg:x="8.269cm" svg:y="2.752cm" draw:caption-point-x="-0.116cm" draw:caption-point-y="-0.758cm">
              <dc:creator>井上翔</dc:creator>
              <dc:date>2026-06-04T09:14:21</dc:date>
              <text:p text:style-name="P5"><text:span text:style-name="T3">タスク全体のタイトルを記載</text:span></text:p>
              <text:p text:style-name="P5"><text:span text:style-name="T3">大項目ごとの最終タスクには○をつける</text:span></text:p>
            </office:annotation>
            <text:p>大項目(レベル1)</text:p>
          </table:table-cell>
          <table:table-cell table:style-name="ce128" office:value-type="string" calcext:value-type="string">
            <text:p>#</text:p>
          </table:table-cell>
          <table:table-cell table:style-name="ce117" office:value-type="string" calcext:value-type="string">
            <office:annotation draw:style-name="gr4" draw:text-style-name="P6" svg:width="9.804cm" svg:height="2.539cm" svg:x="19.024cm" svg:y="2.752cm" draw:caption-point-x="-2.909cm" draw:caption-point-y="-0.758cm">
              <dc:creator>井上翔</dc:creator>
              <dc:date>2026-06-04T09:14:21</dc:date>
              <text:p text:style-name="P5"><text:span text:style-name="T3">作業そのものの名前や作業対象を記載する</text:span></text:p>
            </office:annotation>
            <text:p>中項目(レベル2)</text:p>
          </table:table-cell>
          <table:table-cell table:style-name="ce128" office:value-type="string" calcext:value-type="string">
            <text:p>#</text:p>
          </table:table-cell>
          <table:table-cell table:style-name="ce117" office:value-type="string" calcext:value-type="string">
            <office:annotation draw:style-name="gr5" draw:text-style-name="P6" svg:width="7.418cm" svg:height="3.412cm" svg:x="32.157cm" svg:y="2.752cm" draw:caption-point-x="-3.841cm" draw:caption-point-y="-0.758cm">
              <dc:creator>井上翔</dc:creator>
              <dc:date>2026-06-04T09:14:21</dc:date>
              <text:p text:style-name="P5"><text:span text:style-name="T3">作成、レビュー、実施といったタスク名を記載</text:span></text:p>
            </office:annotation>
            <text:p>小項目(レベル3)</text:p>
          </table:table-cell>
          <table:table-cell table:style-name="ce117" office:value-type="string" calcext:value-type="string">
            <office:annotation draw:style-name="gr6" draw:text-style-name="P6" svg:width="7.101cm" svg:height="4.039cm" svg:x="32.404cm" svg:y="2.752cm" draw:caption-point-x="-2.366cm" draw:caption-point-y="-0.758cm">
              <dc:creator>井上翔</dc:creator>
              <dc:date>2026-06-04T09:14:21</dc:date>
              <text:p text:style-name="P5"><text:span text:style-name="T3">タスクによって完成する成果物、またはタスクの対象となる成果物を記載</text:span></text:p>
            </office:annotation>
            <text:p>成果物</text:p>
          </table:table-cell>
          <table:table-cell table:style-name="ce117" office:value-type="string" calcext:value-type="string">
            <text:p>作業者</text:p>
          </table:table-cell>
          <table:table-cell table:style-name="ce117" office:value-type="string" calcext:value-type="string">
            <text:p>確認者</text:p>
          </table:table-cell>
          <table:table-cell table:style-name="ce117" office:value-type="string" calcext:value-type="string">
            <text:p>開始日(予定)</text:p>
          </table:table-cell>
          <table:table-cell table:style-name="ce117" office:value-type="string" calcext:value-type="string">
            <text:p>終了日(予定)</text:p>
          </table:table-cell>
          <table:table-cell table:style-name="ce117" office:value-type="string" calcext:value-type="string">
            <text:p>開始日(実績)</text:p>
          </table:table-cell>
          <table:table-cell table:style-name="ce117" office:value-type="string" calcext:value-type="string">
            <text:p>終了日(実績)</text:p>
          </table:table-cell>
          <table:table-cell table:style-name="ce204" office:value-type="string" calcext:value-type="string">
            <office:annotation draw:style-name="gr7" draw:text-style-name="P6" svg:width="5.721cm" svg:height="1.912cm" svg:x="48.297cm" svg:y="2.752cm" draw:caption-point-x="-2.155cm" draw:caption-point-y="-0.758cm">
              <dc:creator>井上翔</dc:creator>
              <dc:date>2026-06-04T09:14:21</dc:date>
              <text:p text:style-name="P5"><text:span text:style-name="T3">土日祝日を除いた営業日</text:span></text:p>
            </office:annotation>
            <text:p>予定日数</text:p>
          </table:table-cell>
          <table:table-cell table:style-name="ce204" office:value-type="string" calcext:value-type="string">
            <office:annotation draw:style-name="gr8" draw:text-style-name="P8" svg:width="8.141cm" svg:height="4.558cm" svg:x="51.063cm" svg:y="2.752cm" draw:caption-point-x="-3.199cm" draw:caption-point-y="-0.758cm">
              <dc:creator>井上翔</dc:creator>
              <dc:date>2026-06-04T09:14:21</dc:date>
              <text:p text:style-name="P7"><text:span text:style-name="T4">着手：</text:span><text:span text:style-name="T5">10%</text:span></text:p>
              <text:p text:style-name="P7"><text:span text:style-name="T6">成果物の形ができた：</text:span><text:span text:style-name="T7">50%</text:span></text:p>
              <text:p text:style-name="P7"><text:span text:style-name="T6">最終確認中：</text:span><text:span text:style-name="T7">80%</text:span></text:p>
              <text:p text:style-name="P7"><text:span text:style-name="T6">レビュー依頼済み：</text:span><text:span text:style-name="T7">100%</text:span></text:p>
              <text:p text:style-name="P7"><text:span text:style-name="T7"/></text:p>
            </office:annotation>
            <text:p>進捗度</text:p>
          </table:table-cell>
          <table:table-cell table:style-name="ce204" office:value-type="string" calcext:value-type="string">
            <office:annotation draw:style-name="gr9" draw:text-style-name="P8" svg:width="6.568cm" svg:height="1.357cm" svg:x="58.415cm" svg:y="3.554cm" draw:caption-point-x="-8.597cm" draw:caption-point-y="-1.56cm">
              <dc:creator>井上翔</dc:creator>
              <dc:date>2026-06-04T09:14:21</dc:date>
              <text:p text:style-name="P7"><text:span text:style-name="T4">進捗が</text:span><text:span text:style-name="T5">100%</text:span><text:span text:style-name="T6">未満かつ今日が終了日以降であるなら遅延と表示</text:span></text:p>
            </office:annotation>
            <text:p>遅延flg</text:p>
          </table:table-cell>
          <table:table-cell table:style-name="ce301" office:value-type="string" calcext:value-type="string">
            <text:p>予定工数</text:p>
          </table:table-cell>
          <table:table-cell table:style-name="ce204" office:value-type="string" calcext:value-type="string">
            <text:p>実績工数</text:p>
          </table:table-cell>
          <table:table-cell table:style-name="ce310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16215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324" office:value-type="float" office:value="1" calcext:value-type="float">
            <text:p>1</text:p>
          </table:table-cell>
          <table:table-cell table:style-name="ce344" table:number-columns-repeated="2"/>
          <table:table-cell table:style-name="ce360" table:number-columns-repeated="2"/>
          <table:table-cell table:style-name="ce344" table:number-columns-repeated="5"/>
          <table:table-cell table:style-name="ce360" table:number-columns-repeated="2"/>
          <table:table-cell table:style-name="ce344" table:number-columns-repeated="5"/>
          <table:table-cell table:style-name="ce360" table:number-columns-repeated="2"/>
          <table:table-cell table:style-name="ce344" table:number-columns-repeated="4"/>
          <table:table-cell table:style-name="ce379"/>
          <table:table-cell table:style-name="ce360" table:number-columns-repeated="2"/>
          <table:table-cell table:style-name="ce397"/>
          <table:table-cell table:style-name="ce344" table:number-columns-repeated="120"/>
          <table:table-cell table:style-name="ce411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08"/>
          <table:table-cell table:style-name="ce63"/>
          <table:table-cell table:style-name="ce66" table:number-columns-repeated="2"/>
          <table:table-cell table:style-name="ce72"/>
          <table:table-cell table:style-name="ce324"/>
          <table:table-cell table:style-name="ce344" table:number-columns-repeated="2"/>
          <table:table-cell table:style-name="ce360" table:number-columns-repeated="2"/>
          <table:table-cell table:style-name="ce344" table:number-columns-repeated="5"/>
          <table:table-cell table:style-name="ce360" table:number-columns-repeated="2"/>
          <table:table-cell table:style-name="ce344" table:number-columns-repeated="5"/>
          <table:table-cell table:style-name="ce360" table:number-columns-repeated="2"/>
          <table:table-cell table:style-name="ce344" table:number-columns-repeated="4"/>
          <table:table-cell table:style-name="ce379"/>
          <table:table-cell table:style-name="ce360" table:number-columns-repeated="2"/>
          <table:table-cell table:style-name="ce397"/>
          <table:table-cell table:style-name="ce344" table:number-columns-repeated="120"/>
          <table:table-cell table:style-name="ce411"/>
          <table:table-cell table:number-columns-repeated="16215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2]&lt;&gt;&quot;&quot;);1;IF([.$F27]&lt;&gt;&quot;&quot;;MAX(INDIRECT([.$B27]):[.$E72])+1;&quot;&quot;))">
            <text:p/>
          </table:table-cell>
          <table:table-cell table:style-name="ce32"/>
          <table:table-cell table:style-name="ce32" table:formula="of:=IF([.$H27]=&quot;&quot;;&quot;&quot;;IF([.$G72]=&quot;&quot;;1;[.$G7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number-columns-repeated="2" table:style-name="ce38" office:value-type="date" office:date-value="2026-06-03" calcext:value-type="date">
            <text:p>2026/06/03</text:p>
          </table:table-cell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32"/>
          <table:table-cell table:style-name="ce18"/>
          <table:table-cell table:style-name="ce38" table:number-columns-repeated="4"/>
          <table:table-cell table:style-name="ce18"/>
          <table:table-cell table:style-name="ce50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213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213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213" office:value-type="float" office:value="100" calcext:value-type="float">
            <text:p>10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>
            <text:p/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213" office:value-type="float" office:value="100" calcext:value-type="float">
            <text:p>10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>
            <text:p/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3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215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215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5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1]&lt;&gt;&quot;&quot;;[.$F41]=&quot;&quot;);&quot;E&quot;&amp;ROW();[.$B39])" office:value-type="string" office:string-value="E41" calcext:value-type="string">
            <text:p>E41</text:p>
          </table:table-cell>
          <table:table-cell table:style-name="ce13" table:formula="of:=IF(AND([.$D41]&lt;&gt;&quot;&quot;;[.$D41]&lt;&gt;&quot;○&quot;);MAX([.$C$3:.$C39])+1;[.$C39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1]&lt;&gt;&quot;&quot;;[.$D25]&lt;&gt;&quot;&quot;);1;IF([.$F41]&lt;&gt;&quot;&quot;;MAX(INDIRECT([.$B41]):[.$E25])+1;&quot;&quot;))">
            <text:p/>
          </table:table-cell>
          <table:table-cell table:style-name="ce32"/>
          <table:table-cell table:style-name="ce32" table:formula="of:=IF([.$H41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46" table:formula="of:=IF([.$L41]&lt;&gt;&quot;&quot;;NETWORKDAYS([.$L41];[.$M41];[$休日.$B$4:.$B$304]);&quot;&quot;)" office:value-type="float" office:value="4" calcext:value-type="float">
            <text:p>4</text:p>
          </table:table-cell>
          <table:table-cell table:style-name="ce218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1" calcext:value-type="string">
            <text:p>E41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/>
          <table:table-cell table:style-name="ce27" table:formula="of:=IF(AND([.$F42]&lt;&gt;&quot;&quot;;[.$D41]&lt;&gt;&quot;&quot;);1;IF([.$F42]&lt;&gt;&quot;&quot;;MAX(INDIRECT([.$B42]):[.$E4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2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2]&lt;&gt;&quot;&quot;;NETWORKDAYS([.$L42];[.$M4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2]=&quot;&quot;;[.$L42]&lt;&gt;&quot;&quot;;[.$L42]&lt;=[.$U$1]);AND([.$M42]&lt;&gt;&quot;&quot;;[.Q42]&lt;100;[.$M42]&lt;=[.$U$1]));&quot;遅延&quot;;&quot;&quot;)">
            <text:p/>
          </table:table-cell>
          <table:table-cell table:style-name="ce66"/>
          <table:table-cell table:style-name="ce66" table:formula="of:=SUM([.$V42:.$FM42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1" calcext:value-type="string">
            <text:p>E41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>
            <text:p/>
          </table:table-cell>
          <table:table-cell table:style-name="ce32"/>
          <table:table-cell table:style-name="ce32" table:formula="of:=IF([.$H43]=&quot;&quot;;&quot;&quot;;IF([.$G42]=&quot;&quot;;1;[.$G42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4]&lt;&gt;&quot;&quot;;[.$F44]=&quot;&quot;);&quot;E&quot;&amp;ROW();[.$B42])" office:value-type="string" office:string-value="E41" calcext:value-type="string">
            <text:p>E41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221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5]&lt;&gt;&quot;&quot;;[.$F45]=&quot;&quot;);&quot;E&quot;&amp;ROW();[.$B44])" office:value-type="string" office:string-value="E41" calcext:value-type="string">
            <text:p>E41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221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1" calcext:value-type="string">
            <text:p>E41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221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1" calcext:value-type="string">
            <text:p>E41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221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1" calcext:value-type="string">
            <text:p>E41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221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49]&lt;&gt;&quot;&quot;;[.$F49]=&quot;&quot;);&quot;E&quot;&amp;ROW();[.$B48])" office:value-type="string" office:string-value="E41" calcext:value-type="string">
            <text:p>E41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9]&lt;&gt;&quot;&quot;;NETWORKDAYS([.$L49];[.$M49];[$休日.$B$4:.$B$304]);&quot;&quot;)">
            <text:p/>
          </table:table-cell>
          <table:table-cell table:style-name="ce32" table:formula="of:=IF([.$L49]&lt;&gt;&quot;&quot;;NETWORKDAYS([.$L49];[.$M49];[$休日.$B$4:.$B$304]);&quot;&quot;)">
            <text:p/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0]&lt;&gt;&quot;&quot;;[.$F50]=&quot;&quot;);&quot;E&quot;&amp;ROW();[.$B49])" office:value-type="string" office:string-value="E41" calcext:value-type="string">
            <text:p>E41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0]&lt;&gt;&quot;&quot;;NETWORKDAYS([.$L50];[.$M50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1" calcext:value-type="string">
            <text:p>E41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>
            <text:p/>
          </table:table-cell>
          <table:table-cell table:style-name="ce32"/>
          <table:table-cell table:style-name="ce32" table:formula="of:=IF([.$H51]=&quot;&quot;;&quot;&quot;;IF([.$G50]=&quot;&quot;;1;[.$G50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>
            <text:p/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52]&lt;&gt;&quot;&quot;;[.$F52]=&quot;&quot;);&quot;E&quot;&amp;ROW();[.$B51])" office:value-type="string" office:string-value="E41" calcext:value-type="string">
            <text:p>E41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>
            <text:p/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4]&lt;&gt;&quot;&quot;;[.$F54]=&quot;&quot;);&quot;E&quot;&amp;ROW();[.$B52])" office:value-type="string" office:string-value="E41" calcext:value-type="string">
            <text:p>E41</text:p>
          </table:table-cell>
          <table:table-cell table:style-name="ce13" table:formula="of:=IF(AND([.$D54]&lt;&gt;&quot;&quot;;[.$D54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4]&lt;&gt;&quot;&quot;;[.$D53]&lt;&gt;&quot;&quot;);1;IF([.$F54]&lt;&gt;&quot;&quot;;MAX(INDIRECT([.$B54]):[.$E5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4]=&quot;&quot;;&quot;&quot;;IF([.$G52]=&quot;&quot;;1;[.$G5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4]&lt;&gt;&quot;&quot;;NETWORKDAYS([.$L54];[.$M54];[$休日.$B$4:.$B$304]);&quot;&quot;)" office:value-type="float" office:value="1" calcext:value-type="float">
            <text:p>1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54]=&quot;&quot;;[.$L54]&lt;&gt;&quot;&quot;;[.$L54]&lt;=[.$U$1]);AND([.$M54]&lt;&gt;&quot;&quot;;[.Q54]&lt;100;[.$M54]&lt;=[.$U$1]));&quot;遅延&quot;;&quot;&quot;)">
            <text:p/>
          </table:table-cell>
          <table:table-cell table:style-name="ce66"/>
          <table:table-cell table:style-name="ce66" table:formula="of:=SUM([.$V54:.$FM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5]&lt;&gt;&quot;&quot;;[.$F55]=&quot;&quot;);&quot;E&quot;&amp;ROW();[.$B54])" office:value-type="string" office:string-value="E41" calcext:value-type="string">
            <text:p>E41</text:p>
          </table:table-cell>
          <table:table-cell table:style-name="ce13" table:formula="of:=IF(AND([.$D55]&lt;&gt;&quot;&quot;;[.$D55]&lt;&gt;&quot;○&quot;);MAX([.$C$3:.$C54])+1;[.$C54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>
            <text:p/>
          </table:table-cell>
          <table:table-cell table:style-name="ce32"/>
          <table:table-cell table:style-name="ce32" table:formula="of:=IF([.$H55]=&quot;&quot;;&quot;&quot;;IF([.$G54]=&quot;&quot;;1;[.$G54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>
            <text:p/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1" calcext:value-type="string">
            <text:p>E41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>
            <text:p/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1" calcext:value-type="string">
            <text:p>E41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>
            <text:p/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1" calcext:value-type="string">
            <text:p>E41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>
            <text:p/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0]&lt;&gt;&quot;&quot;;[.$F60]=&quot;&quot;);&quot;E&quot;&amp;ROW();[.$B58])" office:value-type="string" office:string-value="E41" calcext:value-type="string">
            <text:p>E41</text:p>
          </table:table-cell>
          <table:table-cell table:style-name="ce13" table:formula="of:=IF(AND([.$D60]&lt;&gt;&quot;&quot;;[.$D60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60]&lt;&gt;&quot;&quot;;[.$D59]&lt;&gt;&quot;&quot;);1;IF([.$F60]&lt;&gt;&quot;&quot;;MAX(INDIRECT([.$B60]):[.$E59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0]=&quot;&quot;;&quot;&quot;;IF([.$G58]=&quot;&quot;;1;[.$G58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0]&lt;&gt;&quot;&quot;;NETWORKDAYS([.$L60];[.$M60];[$休日.$B$4:.$B$304]);&quot;&quot;)" office:value-type="float" office:value="2" calcext:value-type="float">
            <text:p>2</text:p>
          </table:table-cell>
          <table:table-cell table:style-name="ce225" office:value-type="float" office:value="100" calcext:value-type="float">
            <text:p>100</text:p>
          </table:table-cell>
          <table:table-cell table:style-name="ce63" table:formula="of:=IF(OR(AND([.$N60]=&quot;&quot;;[.$L60]&lt;&gt;&quot;&quot;;[.$L60]&lt;=[.$U$1]);AND([.$M60]&lt;&gt;&quot;&quot;;[.Q60]&lt;100;[.$M60]&lt;=[.$U$1]));&quot;遅延&quot;;&quot;&quot;)">
            <text:p/>
          </table:table-cell>
          <table:table-cell table:style-name="ce66"/>
          <table:table-cell table:style-name="ce66" table:formula="of:=SUM([.$V60:.$FM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1]&lt;&gt;&quot;&quot;;[.$F61]=&quot;&quot;);&quot;E&quot;&amp;ROW();[.$B60])" office:value-type="string" office:string-value="E41" calcext:value-type="string">
            <text:p>E41</text:p>
          </table:table-cell>
          <table:table-cell table:style-name="ce13" table:formula="of:=IF(AND([.$D61]&lt;&gt;&quot;&quot;;[.$D61]&lt;&gt;&quot;○&quot;);MAX([.$C$3:.$C60])+1;[.$C60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>
            <text:p/>
          </table:table-cell>
          <table:table-cell table:style-name="ce32"/>
          <table:table-cell table:style-name="ce32" table:formula="of:=IF([.$H61]=&quot;&quot;;&quot;&quot;;IF([.$G60]=&quot;&quot;;1;[.$G60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1]&lt;&gt;&quot;&quot;;NETWORKDAYS([.$L61];[.$M6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>
            <text:p/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1" calcext:value-type="string">
            <text:p>E41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>
            <text:p/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1" calcext:value-type="string">
            <text:p>E41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>
            <text:p/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1" calcext:value-type="string">
            <text:p>E41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1" calcext:value-type="string">
            <text:p>E41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1" calcext:value-type="string">
            <text:p>E41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8]&lt;&gt;&quot;&quot;;[.$F68]=&quot;&quot;);&quot;E&quot;&amp;ROW();[.$B65])" office:value-type="string" office:string-value="E41" calcext:value-type="string">
            <text:p>E41</text:p>
          </table:table-cell>
          <table:table-cell table:style-name="ce13" table:formula="of:=IF(AND([.$D68]&lt;&gt;&quot;&quot;;[.$D68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8]&lt;&gt;&quot;&quot;;[.$D67]&lt;&gt;&quot;&quot;);1;IF([.$F68]&lt;&gt;&quot;&quot;;MAX(INDIRECT([.$B68]):[.$E67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8]=&quot;&quot;;&quot;&quot;;IF([.$G66]=&quot;&quot;;1;[.$G6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68]&lt;&gt;&quot;&quot;;NETWORKDAYS([.$L68];[.$M68];[$休日.$B$4:.$B$304]);&quot;&quot;)" office:value-type="float" office:value="2" calcext:value-type="float">
            <text:p>2</text:p>
          </table:table-cell>
          <table:table-cell table:style-name="ce228" office:value-type="float" office:value="100" calcext:value-type="float">
            <text:p>100</text:p>
          </table:table-cell>
          <table:table-cell table:style-name="ce63" table:formula="of:=IF(OR(AND([.$N68]=&quot;&quot;;[.$L68]&lt;&gt;&quot;&quot;;[.$L68]&lt;=[.$U$1]);AND([.$M68]&lt;&gt;&quot;&quot;;[.Q68]&lt;100;[.$M68]&lt;=[.$U$1]));&quot;遅延&quot;;&quot;&quot;)">
            <text:p/>
          </table:table-cell>
          <table:table-cell table:style-name="ce66"/>
          <table:table-cell table:style-name="ce66" table:formula="of:=SUM([.$V68:.$FM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9]&lt;&gt;&quot;&quot;;[.$F69]=&quot;&quot;);&quot;E&quot;&amp;ROW();[.$B68])" office:value-type="string" office:string-value="E41" calcext:value-type="string">
            <text:p>E41</text:p>
          </table:table-cell>
          <table:table-cell table:style-name="ce13" table:formula="of:=IF(AND([.$D69]&lt;&gt;&quot;&quot;;[.$D69]&lt;&gt;&quot;○&quot;);MAX([.$C$3:.$C68])+1;[.$C68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>
            <text:p/>
          </table:table-cell>
          <table:table-cell table:style-name="ce32"/>
          <table:table-cell table:style-name="ce32" table:formula="of:=IF([.$H69]=&quot;&quot;;&quot;&quot;;IF([.$G68]=&quot;&quot;;1;[.$G68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69]&lt;&gt;&quot;&quot;;NETWORKDAYS([.$L69];[.$M69];[$休日.$B$4:.$B$304]);&quot;&quot;)" office:value-type="float" office:value="1" calcext:value-type="float">
            <text:p>1</text:p>
          </table:table-cell>
          <table:table-cell table:style-name="ce228" office:value-type="float" office:value="100" calcext:value-type="float">
            <text:p>10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>
            <text:p/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1" calcext:value-type="string">
            <text:p>E41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228" office:value-type="float" office:value="100" calcext:value-type="float">
            <text:p>10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>
            <text:p/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 table:style-name="ce2"/>
          <table:table-cell table:style-name="ce7" table:formula="of:=IF(AND([.$D71]&lt;&gt;&quot;&quot;;[.$F71]=&quot;&quot;);&quot;E&quot;&amp;ROW();[.$B70])" office:value-type="string" office:string-value="E41" calcext:value-type="string">
            <text:p>E41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228" office:value-type="float" office:value="100" calcext:value-type="float">
            <text:p>10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>
            <text:p/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2]&lt;&gt;&quot;&quot;;[.$F72]=&quot;&quot;);&quot;E&quot;&amp;ROW();[.$B71])" office:value-type="string" office:string-value="E41" calcext:value-type="string">
            <text:p>E41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>
            <text:p/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74]&lt;&gt;&quot;&quot;;[.$F74]=&quot;&quot;);&quot;E&quot;&amp;ROW();[.$B72])" office:value-type="string" office:string-value="E74" calcext:value-type="string">
            <text:p>E74</text:p>
          </table:table-cell>
          <table:table-cell table:style-name="ce13" table:formula="of:=IF(AND([.$D74]&lt;&gt;&quot;&quot;;[.$D74]&lt;&gt;&quot;○&quot;);MAX([.$C$3:.$C72])+1;[.$C39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/>
          <table:table-cell table:style-name="ce32" table:formula="of:=IF([.$H74]=&quot;&quot;;&quot;&quot;;IF([.$G39]=&quot;&quot;;1;[.$G3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4]&lt;&gt;&quot;&quot;;NETWORKDAYS([.$L74];[.$M74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74]=&quot;&quot;;[.$L74]&lt;&gt;&quot;&quot;;[.$L74]&lt;=[.$U$1]);AND([.$M74]&lt;&gt;&quot;&quot;;[.Q74]&lt;100;[.$M74]&lt;=[.$U$1]));&quot;遅延&quot;;&quot;&quot;)">
            <text:p/>
          </table:table-cell>
          <table:table-cell table:style-name="ce66"/>
          <table:table-cell table:style-name="ce66" table:formula="of:=SUM([.$V74:.$FM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5]&lt;&gt;&quot;&quot;;[.$F75]=&quot;&quot;);&quot;E&quot;&amp;ROW();[.$B74])" office:value-type="string" office:string-value="E74" calcext:value-type="string">
            <text:p>E74</text:p>
          </table:table-cell>
          <table:table-cell table:style-name="ce13" table:formula="of:=IF(AND([.$D75]&lt;&gt;&quot;&quot;;[.$D75]&lt;&gt;&quot;○&quot;);MAX([.$C$3:.$C74])+1;[.$C74])" office:value-type="float" office:value="4" calcext:value-type="float">
            <text:p>4</text:p>
          </table:table-cell>
          <table:table-cell table:style-name="ce19"/>
          <table:table-cell table:style-name="ce27" table:formula="of:=IF(AND([.$F75]&lt;&gt;&quot;&quot;;[.$D74]&lt;&gt;&quot;&quot;);1;IF([.$F75]&lt;&gt;&quot;&quot;;MAX(INDIRECT([.$B75]):[.$E7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5]=&quot;&quot;;&quot;&quot;;IF([.$G74]=&quot;&quot;;1;[.$G74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4" calcext:value-type="string">
            <text:p>E74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>
            <text:p/>
          </table:table-cell>
          <table:table-cell table:style-name="ce32"/>
          <table:table-cell table:style-name="ce32" table:formula="of:=IF([.$H76]=&quot;&quot;;&quot;&quot;;IF([.$G75]=&quot;&quot;;1;[.$G75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77]&lt;&gt;&quot;&quot;;[.$F77]=&quot;&quot;);&quot;E&quot;&amp;ROW();[.$B76])" office:value-type="string" office:string-value="E74" calcext:value-type="string">
            <text:p>E74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8]&lt;&gt;&quot;&quot;;[.$F78]=&quot;&quot;);&quot;E&quot;&amp;ROW();[.$B77])" office:value-type="string" office:string-value="E74" calcext:value-type="string">
            <text:p>E74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8]&lt;&gt;&quot;&quot;;NETWORKDAYS([.$L78];[.$M78];[$休日.$B$4:.$B$304]);&quot;&quot;)">
            <text:p/>
          </table:table-cell>
          <table:table-cell table:style-name="ce226"/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79]&lt;&gt;&quot;&quot;;[.$F79]=&quot;&quot;);&quot;E&quot;&amp;ROW();[.$B78])" office:value-type="string" office:string-value="E74" calcext:value-type="string">
            <text:p>E74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9]&lt;&gt;&quot;&quot;;NETWORKDAYS([.$L79];[.$M79];[$休日.$B$4:.$B$304]);&quot;&quot;)" office:value-type="float" office:value="1" calcext:value-type="float">
            <text:p>1</text:p>
          </table:table-cell>
          <table:table-cell table:style-name="ce237" office:value-type="float" office:value="100" calcext:value-type="float">
            <text:p>100</text:p>
          </table:table-cell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/>
          <table:table-cell table:style-name="ce66" table:formula="of:=SUM([.$V79:.$FM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4" calcext:value-type="string">
            <text:p>E74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>
            <text:p/>
          </table:table-cell>
          <table:table-cell table:style-name="ce32"/>
          <table:table-cell table:style-name="ce32" table:formula="of:=IF([.$H80]=&quot;&quot;;&quot;&quot;;IF([.$G79]=&quot;&quot;;1;[.$G79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237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4" calcext:value-type="string">
            <text:p>E74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237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4" calcext:value-type="string">
            <text:p>E74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2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83" calcext:value-type="string">
            <text:p>E83</text:p>
          </table:table-cell>
          <table:table-cell table:style-name="ce13" table:formula="of:=IF(AND([.$D83]&lt;&gt;&quot;&quot;;[.$D83]&lt;&gt;&quot;○&quot;);MAX([.$C$3:.$C81])+1;[.$C81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3]&lt;&gt;&quot;&quot;;NETWORKDAYS([.$L83];[.$M8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3" calcext:value-type="string">
            <text:p>E83</text:p>
          </table:table-cell>
          <table:table-cell table:style-name="ce13" table:formula="of:=IF(AND([.$D84]&lt;&gt;&quot;&quot;;[.$D84]&lt;&gt;&quot;○&quot;);MAX([.$C$3:.$C83])+1;[.$C83])" office:value-type="float" office:value="5" calcext:value-type="float">
            <text:p>5</text:p>
          </table:table-cell>
          <table:table-cell table:style-name="ce19"/>
          <table:table-cell table:style-name="ce27" table:formula="of:=IF(AND([.$F84]&lt;&gt;&quot;&quot;;[.$D83]&lt;&gt;&quot;&quot;);1;IF([.$F84]&lt;&gt;&quot;&quot;;MAX(INDIRECT([.$B84]):[.$E8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4]=&quot;&quot;;&quot;&quot;;IF([.$G81]=&quot;&quot;;1;[.$G81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4]&lt;&gt;&quot;&quot;;NETWORKDAYS([.$L84];[.$M84];[$休日.$B$4:.$B$304]);&quot;&quot;)" office:value-type="float" office:value="1" calcext:value-type="float">
            <text:p>1</text:p>
          </table:table-cell>
          <table:table-cell table:style-name="ce238" office:value-type="float" office:value="100" calcext:value-type="float">
            <text:p>100</text:p>
          </table:table-cell>
          <table:table-cell table:style-name="ce63" table:formula="of:=IF(OR(AND([.$N84]=&quot;&quot;;[.$L84]&lt;&gt;&quot;&quot;;[.$L84]&lt;=[.$U$1]);AND([.$M84]&lt;&gt;&quot;&quot;;[.Q84]&lt;100;[.$M8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4:.$FM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3" calcext:value-type="string">
            <text:p>E83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>
            <text:p/>
          </table:table-cell>
          <table:table-cell table:style-name="ce32"/>
          <table:table-cell table:style-name="ce32" table:formula="of:=IF([.$H85]=&quot;&quot;;&quot;&quot;;IF([.$G84]=&quot;&quot;;1;[.$G84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238" office:value-type="float" office:value="100" calcext:value-type="float">
            <text:p>10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3" calcext:value-type="string">
            <text:p>E83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238" office:value-type="float" office:value="100" calcext:value-type="float">
            <text:p>10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3" calcext:value-type="string">
            <text:p>E83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238" office:value-type="float" office:value="100" calcext:value-type="float">
            <text:p>10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3" calcext:value-type="string">
            <text:p>E83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238" office:value-type="float" office:value="100" calcext:value-type="float">
            <text:p>10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 table:style-name="ce3"/>
          <table:table-cell table:style-name="ce9" table:formula="of:=IF(AND([.$D89]&lt;&gt;&quot;&quot;;[.$F89]=&quot;&quot;);&quot;E&quot;&amp;ROW();[.$B88])" office:value-type="string" office:string-value="E83" calcext:value-type="string">
            <text:p>E83</text:p>
          </table:table-cell>
          <table:table-cell table:style-name="ce14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21"/>
          <table:table-cell table:style-name="ce29" table:formula="of:=IF(AND([.$F89]&lt;&gt;&quot;&quot;;[.$D88]&lt;&gt;&quot;&quot;);1;IF([.$F89]&lt;&gt;&quot;&quot;;MAX(INDIRECT([.$B89]):[.$E88])+1;&quot;&quot;))">
            <text:p/>
          </table:table-cell>
          <table:table-cell table:style-name="ce33"/>
          <table:table-cell table:style-name="ce33" table:formula="of:=IF([.$H89]=&quot;&quot;;&quot;&quot;;IF([.$G88]=&quot;&quot;;1;[.$G88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89]&lt;&gt;&quot;&quot;;NETWORKDAYS([.$L89];[.$M89];[$休日.$B$4:.$B$304]);&quot;&quot;)">
            <text:p/>
          </table:table-cell>
          <table:table-cell table:style-name="ce32" table:formula="of:=IF([.$L89]&lt;&gt;&quot;&quot;;NETWORKDAYS([.$L89];[.$M89];[$休日.$B$4:.$B$304]);&quot;&quot;)">
            <text:p/>
          </table:table-cell>
          <table:table-cell table:style-name="ce64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7"/>
          <table:table-cell table:style-name="ce67" table:formula="of:=SUM([.$V89:.$FM89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number-columns-repeated="15360"/>
        </table:table-row>
        <table:table-row table:style-name="ro1">
          <table:table-cell/>
          <table:table-cell table:style-name="ce7" table:formula="of:=IF(AND([.$D90]&lt;&gt;&quot;&quot;;[.$F90]=&quot;&quot;);&quot;E&quot;&amp;ROW();[.$B89])" office:value-type="string" office:string-value="E90" calcext:value-type="string">
            <text:p>E90</text:p>
          </table:table-cell>
          <table:table-cell table:style-name="ce13" table:formula="of:=IF(AND([.$D90]&lt;&gt;&quot;&quot;;[.$D90]&lt;&gt;&quot;○&quot;);MAX([.$C$3:.$C89])+1;[.$C89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0]&lt;&gt;&quot;&quot;;[.$D89]&lt;&gt;&quot;&quot;);1;IF([.$F90]&lt;&gt;&quot;&quot;;MAX(INDIRECT([.$B90]):[.$E89])+1;&quot;&quot;))">
            <text:p/>
          </table:table-cell>
          <table:table-cell table:style-name="ce32"/>
          <table:table-cell table:style-name="ce32" table:formula="of:=IF([.$H90]=&quot;&quot;;&quot;&quot;;IF([.$G89]=&quot;&quot;;1;[.$G89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0]&lt;&gt;&quot;&quot;;NETWORKDAYS([.$L90];[.$M90];[$休日.$B$4:.$B$304]);&quot;&quot;)" office:value-type="float" office:value="7" calcext:value-type="float">
            <text:p>7</text:p>
          </table:table-cell>
          <table:table-cell table:style-name="ce239" office:value-type="float" office:value="100" calcext:value-type="float">
            <text:p>100</text:p>
          </table:table-cell>
          <table:table-cell table:style-name="ce63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6"/>
          <table:table-cell table:style-name="ce66" table:formula="of:=SUM([.$V90:.$FM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0" calcext:value-type="string">
            <text:p>E90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/>
          <table:table-cell table:style-name="ce27" table:formula="of:=IF(AND([.$F91]&lt;&gt;&quot;&quot;;[.$D90]&lt;&gt;&quot;&quot;);1;IF([.$F91]&lt;&gt;&quot;&quot;;MAX(INDIRECT([.$B91]):[.$E90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 table:visibility="collapse">
          <table:table-cell/>
          <table:table-cell table:style-name="ce7" table:formula="of:=IF(AND([.$D92]&lt;&gt;&quot;&quot;;[.$F92]=&quot;&quot;);&quot;E&quot;&amp;ROW();[.$B90])" office:value-type="string" office:string-value="E90" calcext:value-type="string">
            <text:p>E90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>
            <text:p/>
          </table:table-cell>
          <table:table-cell table:style-name="ce32"/>
          <table:table-cell table:style-name="ce32" table:formula="of:=IF([.$H92]=&quot;&quot;;&quot;&quot;;IF([.$G91]=&quot;&quot;;1;[.$G91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2]&lt;&gt;&quot;&quot;;NETWORKDAYS([.$L92];[.$M92];[$休日.$B$4:.$B$304]);&quot;&quot;)">
            <text:p/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/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16215"/>
        </table:table-row>
        <table:table-row table:style-name="ro1">
          <table:table-cell/>
          <table:table-cell table:style-name="ce8" table:formula="of:=IF(AND([.$D93]&lt;&gt;&quot;&quot;;[.$F93]=&quot;&quot;);&quot;E&quot;&amp;ROW();[.$B92])" office:value-type="string" office:string-value="E90" calcext:value-type="string">
            <text:p>E90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3]&lt;&gt;&quot;&quot;;NETWORKDAYS([.$L93];[.$M9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94]&lt;&gt;&quot;&quot;;[.$F94]=&quot;&quot;);&quot;E&quot;&amp;ROW();[.$B93])" office:value-type="string" office:string-value="E90" calcext:value-type="string">
            <text:p>E90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0" calcext:value-type="string">
            <text:p>E90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241" office:value-type="float" office:value="100" calcext:value-type="float">
            <text:p>10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0" calcext:value-type="string">
            <text:p>E90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241" office:value-type="float" office:value="100" calcext:value-type="float">
            <text:p>10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6:.$FM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97]&lt;&gt;&quot;&quot;;[.$F97]=&quot;&quot;);&quot;E&quot;&amp;ROW();[.$B95])" office:value-type="string" office:string-value="E90" calcext:value-type="string">
            <text:p>E90</text:p>
          </table:table-cell>
          <table:table-cell table:style-name="ce13" table:formula="of:=IF(AND([.$D97]&lt;&gt;&quot;&quot;;[.$D97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241" office:value-type="float" office:value="100" calcext:value-type="float">
            <text:p>100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98]&lt;&gt;&quot;&quot;;[.$F98]=&quot;&quot;);&quot;E&quot;&amp;ROW();[.$B97])" office:value-type="string" office:string-value="E90" calcext:value-type="string">
            <text:p>E90</text:p>
          </table:table-cell>
          <table:table-cell table:style-name="ce13" table:formula="of:=IF(AND([.$D98]&lt;&gt;&quot;&quot;;[.$D98]&lt;&gt;&quot;○&quot;);MAX([.$C$3:.$C97])+1;[.$C97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241" office:value-type="float" office:value="100" calcext:value-type="float">
            <text:p>10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99]&lt;&gt;&quot;&quot;;[.$F99]=&quot;&quot;);&quot;E&quot;&amp;ROW();[.$B98])" office:value-type="string" office:string-value="E90" calcext:value-type="string">
            <text:p>E90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241" office:value-type="float" office:value="100" calcext:value-type="float">
            <text:p>10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0" calcext:value-type="string">
            <text:p>E90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241" office:value-type="float" office:value="100" calcext:value-type="float">
            <text:p>10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101]&lt;&gt;&quot;&quot;;[.$F101]=&quot;&quot;);&quot;E&quot;&amp;ROW();[.$B100])" office:value-type="string" office:string-value="E90" calcext:value-type="string">
            <text:p>E90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1]&lt;&gt;&quot;&quot;;NETWORKDAYS([.$L101];[.$M101];[$休日.$B$4:.$B$304]);&quot;&quot;)">
            <text:p/>
          </table:table-cell>
          <table:table-cell table:style-name="ce32" table:formula="of:=IF([.$L101]&lt;&gt;&quot;&quot;;NETWORKDAYS([.$L101];[.$M101];[$休日.$B$4:.$B$304]);&quot;&quot;)">
            <text:p/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/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 table:visibility="collapse">
          <table:table-cell/>
          <table:table-cell table:style-name="ce7" table:formula="of:=IF(AND([.$D102]&lt;&gt;&quot;&quot;;[.$F102]=&quot;&quot;);&quot;E&quot;&amp;ROW();[.$B101])" office:value-type="string" office:string-value="E90" calcext:value-type="string">
            <text:p>E90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0" calcext:value-type="string">
            <text:p>E90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0" calcext:value-type="string">
            <text:p>E90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8"/>
          <table:table-cell table:style-name="ce30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0" table:formula="of:=IF([.$H104]=&quot;&quot;;&quot;&quot;;IF([.$G103]=&quot;&quot;;1;[.$G103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4]&lt;&gt;&quot;&quot;;NETWORKDAYS([.$L104];[.$M1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18"/>
          <table:table-cell table:style-name="ce18" table:formula="of:=SUM([.$V104:.$FM104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5]&lt;&gt;&quot;&quot;;[.$F105]=&quot;&quot;);&quot;E&quot;&amp;ROW();[.$B104])" office:value-type="string" office:string-value="E90" calcext:value-type="string">
            <text:p>E90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9"/>
          <table:table-cell table:style-name="ce27" table:formula="of:=IF(AND([.$F105]&lt;&gt;&quot;&quot;;[.$D104]&lt;&gt;&quot;&quot;);1;IF([.$F105]&lt;&gt;&quot;&quot;;MAX(INDIRECT([.$B105]):[.$E104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5]=&quot;&quot;;&quot;&quot;;IF([.$G103]=&quot;&quot;;1;[.$G103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5]&lt;&gt;&quot;&quot;;NETWORKDAYS([.$L105];[.$M105];[$休日.$B$4:.$B$304]);&quot;&quot;)" office:value-type="float" office:value="6" calcext:value-type="float">
            <text:p>6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5:.$FM1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0" calcext:value-type="string">
            <text:p>E90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>
            <text:p/>
          </table:table-cell>
          <table:table-cell table:style-name="ce32"/>
          <table:table-cell table:style-name="ce32" table:formula="of:=IF([.$H106]=&quot;&quot;;&quot;&quot;;IF([.$G105]=&quot;&quot;;1;[.$G105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06]&lt;&gt;&quot;&quot;;NETWORKDAYS([.$L106];[.$M10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0" calcext:value-type="string">
            <text:p>E90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243" office:value-type="float" office:value="100" calcext:value-type="float">
            <text:p>10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0" calcext:value-type="string">
            <text:p>E90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243" office:value-type="float" office:value="100" calcext:value-type="float">
            <text:p>10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0" calcext:value-type="string">
            <text:p>E90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243" office:value-type="float" office:value="100" calcext:value-type="float">
            <text:p>10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0" calcext:value-type="string">
            <text:p>E90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243" office:value-type="float" office:value="100" calcext:value-type="float">
            <text:p>10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0" calcext:value-type="string">
            <text:p>E90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243" office:value-type="float" office:value="100" calcext:value-type="float">
            <text:p>10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0" calcext:value-type="string">
            <text:p>E90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2]&lt;&gt;&quot;&quot;;NETWORKDAYS([.$L112];[.$M112];[$休日.$B$4:.$B$304]);&quot;&quot;)">
            <text:p/>
          </table:table-cell>
          <table:table-cell table:style-name="ce216"/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/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 table:visibility="collapse">
          <table:table-cell/>
          <table:table-cell table:style-name="ce7" table:formula="of:=IF(AND([.$D113]&lt;&gt;&quot;&quot;;[.$F113]=&quot;&quot;);&quot;E&quot;&amp;ROW();[.$B112])" office:value-type="string" office:string-value="E90" calcext:value-type="string">
            <text:p>E90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216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4]&lt;&gt;&quot;&quot;;[.$F114]=&quot;&quot;);&quot;E&quot;&amp;ROW();[.$B113])" office:value-type="string" office:string-value="E114" calcext:value-type="string">
            <text:p>E114</text:p>
          </table:table-cell>
          <table:table-cell table:style-name="ce13" table:formula="of:=IF(AND([.$D114]&lt;&gt;&quot;&quot;;[.$D114]&lt;&gt;&quot;○&quot;);MAX([.$C$3:.$C113])+1;[.$C113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4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4]&lt;&gt;&quot;&quot;;NETWORKDAYS([.$L114];[.$M114];[$休日.$B$4:.$B$304]);&quot;&quot;)" office:value-type="float" office:value="5" calcext:value-type="float">
            <text:p>5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4" calcext:value-type="string">
            <text:p>E114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/>
          <table:table-cell table:style-name="ce27" table:formula="of:=IF(AND([.$F115]&lt;&gt;&quot;&quot;;[.$D114]&lt;&gt;&quot;&quot;);1;IF([.$F115]&lt;&gt;&quot;&quot;;MAX(INDIRECT([.$B115]):[.$E114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5]&lt;&gt;&quot;&quot;;NETWORKDAYS([.$L115];[.$M115];[$休日.$B$4:.$B$304]);&quot;&quot;)" office:value-type="float" office:value="2" calcext:value-type="float">
            <text:p>2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6]&lt;&gt;&quot;&quot;;[.$F115]=&quot;&quot;);&quot;E&quot;&amp;ROW();[.$B114])" office:value-type="string" office:string-value="E114" calcext:value-type="string">
            <text:p>E114</text:p>
          </table:table-cell>
          <table:table-cell table:style-name="ce13" table:formula="of:=IF(AND([.$D116]&lt;&gt;&quot;&quot;;[.$D116]&lt;&gt;&quot;○&quot;);MAX([.$C$3:.$C114])+1;[.$C114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>
            <text:p/>
          </table:table-cell>
          <table:table-cell table:style-name="Default"/>
          <table:table-cell table:style-name="ce32" table:formula="of:=IF([.$H116]=&quot;&quot;;&quot;&quot;;IF([.$G114]=&quot;&quot;;1;[.$G114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6]&lt;&gt;&quot;&quot;;NETWORKDAYS([.$L116];[.$M116];[$休日.$B$4:.$B$304]);&quot;&quot;)" office:value-type="float" office:value="1" calcext:value-type="float">
            <text:p>1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16215"/>
        </table:table-row>
        <table:table-row table:style-name="ro1">
          <table:table-cell/>
          <table:table-cell table:style-name="ce8" table:formula="of:=IF(AND([.$D117]&lt;&gt;&quot;&quot;;[.$F117]=&quot;&quot;);&quot;E&quot;&amp;ROW();[.$B116])" office:value-type="string" office:string-value="E114" calcext:value-type="string">
            <text:p>E114</text:p>
          </table:table-cell>
          <table:table-cell table:style-name="ce13" table:formula="of:=IF(AND([.$D117]&lt;&gt;&quot;&quot;;[.$D117]&lt;&gt;&quot;○&quot;);MAX([.$C$3:.$C116])+1;[.$C116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ce32"/>
          <table:table-cell table:style-name="ce32" table:formula="of:=IF([.$H117]=&quot;&quot;;&quot;&quot;;IF([.$G116]=&quot;&quot;;1;[.$G116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16215"/>
        </table:table-row>
        <table:table-row table:style-name="ro1">
          <table:table-cell/>
          <table:table-cell table:style-name="ce7" table:formula="of:=IF(AND([.$D118]&lt;&gt;&quot;&quot;;[.$F118]=&quot;&quot;);&quot;E&quot;&amp;ROW();[.$B117])" office:value-type="string" office:string-value="E114" calcext:value-type="string">
            <text:p>E114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16215"/>
        </table:table-row>
        <table:table-row table:style-name="ro1">
          <table:table-cell/>
          <table:table-cell table:style-name="ce8" table:formula="of:=IF(AND([.$D119]&lt;&gt;&quot;&quot;;[.$F119]=&quot;&quot;);&quot;E&quot;&amp;ROW();[.$B118])" office:value-type="string" office:string-value="E114" calcext:value-type="string">
            <text:p>E114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0]&lt;&gt;&quot;&quot;;[.$F120]=&quot;&quot;);&quot;E&quot;&amp;ROW();[.$B119])" office:value-type="string" office:string-value="E114" calcext:value-type="string">
            <text:p>E114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0]=&quot;&quot;;&quot;&quot;;IF([.$G119]=&quot;&quot;;1;[.$G119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4" calcext:value-type="string">
            <text:p>E114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1]=&quot;&quot;;&quot;&quot;;IF([.$G120]=&quot;&quot;;1;[.$G120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4" calcext:value-type="string">
            <text:p>E114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2]=&quot;&quot;;&quot;&quot;;IF([.$G121]=&quot;&quot;;1;[.$G121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22]&lt;&gt;&quot;&quot;;NETWORKDAYS([.$L122];[.$M122];[$休日.$B$4:.$B$304]);&quot;&quot;)" office:value-type="float" office:value="2" calcext:value-type="float">
            <text:p>2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4" calcext:value-type="string">
            <text:p>E114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>
            <text:p/>
          </table:table-cell>
          <table:table-cell table:style-name="ce32"/>
          <table:table-cell table:style-name="ce32" table:formula="of:=IF([.$H123]=&quot;&quot;;&quot;&quot;;IF([.$G122]=&quot;&quot;;1;[.$G1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3]&lt;&gt;&quot;&quot;;NETWORKDAYS([.$L123];[.$M123];[$休日.$B$4:.$B$304]);&quot;&quot;)">
            <text:p/>
          </table:table-cell>
          <table:table-cell table:style-name="ce236"/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/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16215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24" calcext:value-type="string">
            <text:p>E124</text:p>
          </table:table-cell>
          <table:table-cell table:style-name="ce13" table:formula="of:=IF(AND([.$D124]&lt;&gt;&quot;&quot;;[.$D124]&lt;&gt;&quot;○&quot;);MAX([.$C$3:.$C123])+1;[.$C123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4]&lt;&gt;&quot;&quot;;NETWORKDAYS([.$L124];[.$M124];[$休日.$B$4:.$B$304]);&quot;&quot;)" office:value-type="float" office:value="7" calcext:value-type="float">
            <text:p>7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4" calcext:value-type="string">
            <text:p>E124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/>
          <table:table-cell table:style-name="ce27" table:formula="of:=IF(AND([.$F125]&lt;&gt;&quot;&quot;;[.$D124]&lt;&gt;&quot;&quot;);1;IF([.$F125]&lt;&gt;&quot;&quot;;MAX(INDIRECT([.$B125]):[.$E124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5]&lt;&gt;&quot;&quot;;NETWORKDAYS([.$L125];[.$M125];[$休日.$B$4:.$B$304]);&quot;&quot;)" office:value-type="float" office:value="5" calcext:value-type="float">
            <text:p>5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 table:formula="of:=SUM([.S126:.S135])" office:value-type="float" office:value="19" calcext:value-type="float">
            <text:p>19</text:p>
          </table:table-cell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4" calcext:value-type="string">
            <text:p>E124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>
            <text:p/>
          </table:table-cell>
          <table:table-cell table:style-name="ce32"/>
          <table:table-cell table:style-name="ce32" table:formula="of:=IF([.$H126]=&quot;&quot;;&quot;&quot;;IF([.$G125]=&quot;&quot;;1;[.$G125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6]&lt;&gt;&quot;&quot;;NETWORKDAYS([.$L126];[.$M126];[$休日.$B$4:.$B$304]);&quot;&quot;)" office:value-type="float" office:value="1" calcext:value-type="float">
            <text:p>1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4" calcext:value-type="string">
            <text:p>E124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4" calcext:value-type="string">
            <text:p>E124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4" calcext:value-type="string">
            <text:p>E124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4" calcext:value-type="string">
            <text:p>E124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4" calcext:value-type="string">
            <text:p>E124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4" calcext:value-type="string">
            <text:p>E124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4" calcext:value-type="string">
            <text:p>E124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4" calcext:value-type="string">
            <text:p>E124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246" office:value-type="float" office:value="100" calcext:value-type="float">
            <text:p>100</text:p>
          </table:table-cell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4" calcext:value-type="string">
            <text:p>E124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246" office:value-type="float" office:value="100" calcext:value-type="float">
            <text:p>100</text:p>
          </table:table-cell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4" calcext:value-type="string">
            <text:p>E124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6]&lt;&gt;&quot;&quot;;NETWORKDAYS([.$L136];[.$M136];[$休日.$B$4:.$B$304]);&quot;&quot;)">
            <text:p/>
          </table:table-cell>
          <table:table-cell table:style-name="ce247"/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/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334"/>
          <table:table-cell table:style-name="ce352" table:number-columns-repeated="2"/>
          <table:table-cell table:style-name="ce366" table:number-columns-repeated="2"/>
          <table:table-cell table:style-name="ce352" table:number-columns-repeated="5"/>
          <table:table-cell table:style-name="ce366" table:number-columns-repeated="2"/>
          <table:table-cell table:style-name="ce352" table:number-columns-repeated="5"/>
          <table:table-cell table:style-name="ce366" table:number-columns-repeated="2"/>
          <table:table-cell table:style-name="ce352" table:number-columns-repeated="4"/>
          <table:table-cell table:style-name="ce385"/>
          <table:table-cell table:style-name="ce366" table:number-columns-repeated="2"/>
          <table:table-cell table:style-name="ce403"/>
          <table:table-cell table:style-name="ce352" table:number-columns-repeated="120"/>
          <table:table-cell table:style-name="ce418"/>
          <table:table-cell table:number-columns-repeated="16215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4" calcext:value-type="string">
            <text:p>E124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248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335"/>
          <table:table-cell table:style-name="ce353" table:number-columns-repeated="2"/>
          <table:table-cell table:style-name="ce367" table:number-columns-repeated="2"/>
          <table:table-cell table:style-name="ce353" table:number-columns-repeated="5"/>
          <table:table-cell table:style-name="ce367" table:number-columns-repeated="2"/>
          <table:table-cell table:style-name="ce353" table:number-columns-repeated="5"/>
          <table:table-cell table:style-name="ce367" table:number-columns-repeated="2"/>
          <table:table-cell table:style-name="ce353" table:number-columns-repeated="4"/>
          <table:table-cell table:style-name="ce386"/>
          <table:table-cell table:style-name="ce367" table:number-columns-repeated="2"/>
          <table:table-cell table:style-name="ce404"/>
          <table:table-cell table:style-name="ce353" table:number-columns-repeated="120"/>
          <table:table-cell table:style-name="ce419"/>
          <table:table-cell table:number-columns-repeated="16215"/>
        </table:table-row>
        <table:table-row table:style-name="ro1">
          <table:table-cell/>
          <table:table-cell table:style-name="ce8" table:formula="of:=IF(AND([.$D138]&lt;&gt;&quot;&quot;;[.$F138]=&quot;&quot;);&quot;E&quot;&amp;ROW();[.$B137])" office:value-type="string" office:string-value="E124" calcext:value-type="string">
            <text:p>E124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8]&lt;&gt;&quot;&quot;;NETWORKDAYS([.$L138];[.$M138];[$休日.$B$4:.$B$304]);&quot;&quot;)" office:value-type="float" office:value="7" calcext:value-type="float">
            <text:p>7</text:p>
          </table:table-cell>
          <table:table-cell table:style-name="ce249" office:value-type="float" office:value="100" calcext:value-type="float">
            <text:p>100</text:p>
          </table:table-cell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4" calcext:value-type="string">
            <text:p>E124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>
            <text:p/>
          </table:table-cell>
          <table:table-cell table:style-name="ce32"/>
          <table:table-cell table:style-name="ce32" table:formula="of:=IF([.$H139]=&quot;&quot;;&quot;&quot;;IF([.$G138]=&quot;&quot;;1;[.$G138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39]&lt;&gt;&quot;&quot;;NETWORKDAYS([.$L139];[.$M13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4" calcext:value-type="string">
            <text:p>E124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4" calcext:value-type="string">
            <text:p>E124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250" office:value-type="float" office:value="100" calcext:value-type="float">
            <text:p>100</text:p>
          </table:table-cell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4" calcext:value-type="string">
            <text:p>E124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250" office:value-type="float" office:value="100" calcext:value-type="float">
            <text:p>100</text:p>
          </table:table-cell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4" calcext:value-type="string">
            <text:p>E124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250" office:value-type="float" office:value="100" calcext:value-type="float">
            <text:p>100</text:p>
          </table:table-cell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4" calcext:value-type="string">
            <text:p>E124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250" office:value-type="float" office:value="100" calcext:value-type="float">
            <text:p>100</text:p>
          </table:table-cell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4" calcext:value-type="string">
            <text:p>E124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250" office:value-type="float" office:value="100" calcext:value-type="float">
            <text:p>100</text:p>
          </table:table-cell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4" calcext:value-type="string">
            <text:p>E124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250" office:value-type="float" office:value="100" calcext:value-type="float">
            <text:p>100</text:p>
          </table:table-cell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4" calcext:value-type="string">
            <text:p>E124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4" calcext:value-type="string">
            <text:p>E124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4" calcext:value-type="string">
            <text:p>E124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4" calcext:value-type="string">
            <text:p>E124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4" calcext:value-type="string">
            <text:p>E124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1]&lt;&gt;&quot;&quot;;NETWORKDAYS([.$L151];[.$M151];[$休日.$B$4:.$B$304]);&quot;&quot;)">
            <text:p/>
          </table:table-cell>
          <table:table-cell table:style-name="ce216"/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/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52" calcext:value-type="string">
            <text:p>E152</text:p>
          </table:table-cell>
          <table:table-cell table:style-name="ce13" table:formula="of:=IF(AND([.$D152]&lt;&gt;&quot;&quot;;[.$D152]&lt;&gt;&quot;○&quot;);MAX([.$C$3:.$C151])+1;[.$C151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52]&lt;&gt;&quot;&quot;;NETWORKDAYS([.$L152];[.$M152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2]&lt;&gt;&quot;&quot;;[.$F153]=&quot;&quot;);&quot;E&quot;&amp;ROW();[.$B152])" office:value-type="string" office:string-value="E152" calcext:value-type="string">
            <text:p>E152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Default"/>
          <table:table-cell table:style-name="ce27" table:formula="of:=IF(AND([.$F153]&lt;&gt;&quot;&quot;;[.$D152]&lt;&gt;&quot;&quot;);1;IF([.$F153]&lt;&gt;&quot;&quot;;MAX(INDIRECT([.$B153]):[.$E15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3]&lt;&gt;&quot;&quot;;NETWORKDAYS([.$L153];[.$M153];[$休日.$B$4:.$B$304]);&quot;&quot;)" office:value-type="float" office:value="2" calcext:value-type="float">
            <text:p>2</text:p>
          </table:table-cell>
          <table:table-cell table:style-name="ce251" office:value-type="float" office:value="100" calcext:value-type="float">
            <text:p>100</text:p>
          </table:table-cell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4]&lt;&gt;&quot;&quot;;[.$F154]=&quot;&quot;);&quot;E&quot;&amp;ROW();[.$B153])" office:value-type="string" office:string-value="E152" calcext:value-type="string">
            <text:p>E152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ce19"/>
          <table:table-cell table:style-name="ce27" table:formula="of:=IF(AND([.$F154]&lt;&gt;&quot;&quot;;[.$D152]&lt;&gt;&quot;&quot;);1;IF([.$F154]&lt;&gt;&quot;&quot;;MAX(INDIRECT([.$B154]):[.$E153])+1;&quot;&quot;))">
            <text:p/>
          </table:table-cell>
          <table:table-cell table:style-name="ce32"/>
          <table:table-cell table:style-name="ce32" table:formula="of:=IF([.$H154]=&quot;&quot;;&quot;&quot;;IF([.$G153]=&quot;&quot;;1;[.$G153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4]&lt;&gt;&quot;&quot;;NETWORKDAYS([.$L154];[.$M154];[$休日.$B$4:.$B$304]);&quot;&quot;)" office:value-type="float" office:value="1" calcext:value-type="float">
            <text:p>1</text:p>
          </table:table-cell>
          <table:table-cell table:style-name="ce251" office:value-type="float" office:value="100" calcext:value-type="float">
            <text:p>100</text:p>
          </table:table-cell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2" calcext:value-type="string">
            <text:p>E152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4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251" office:value-type="float" office:value="100" calcext:value-type="float">
            <text:p>100</text:p>
          </table:table-cell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2" calcext:value-type="string">
            <text:p>E152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251" office:value-type="float" office:value="100" calcext:value-type="float">
            <text:p>100</text:p>
          </table:table-cell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2" calcext:value-type="string">
            <text:p>E152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251" office:value-type="float" office:value="100" calcext:value-type="float">
            <text:p>100</text:p>
          </table:table-cell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2" calcext:value-type="string">
            <text:p>E152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251" office:value-type="float" office:value="100" calcext:value-type="float">
            <text:p>100</text:p>
          </table:table-cell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2" calcext:value-type="string">
            <text:p>E152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9" calcext:value-type="date">
            <text:p>2026/06/09</text:p>
          </table:table-cell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251" office:value-type="float" office:value="100" calcext:value-type="float">
            <text:p>100</text:p>
          </table:table-cell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2" calcext:value-type="string">
            <text:p>E152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251" office:value-type="float" office:value="100" calcext:value-type="float">
            <text:p>100</text:p>
          </table:table-cell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2" calcext:value-type="string">
            <text:p>E152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251" office:value-type="float" office:value="100" calcext:value-type="float">
            <text:p>100</text:p>
          </table:table-cell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2" calcext:value-type="string">
            <text:p>E152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251" office:value-type="float" office:value="100" calcext:value-type="float">
            <text:p>100</text:p>
          </table:table-cell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2" calcext:value-type="string">
            <text:p>E152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251" office:value-type="float" office:value="100" calcext:value-type="float">
            <text:p>100</text:p>
          </table:table-cell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2" calcext:value-type="string">
            <text:p>E152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251" office:value-type="float" office:value="100" calcext:value-type="float">
            <text:p>100</text:p>
          </table:table-cell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2" calcext:value-type="string">
            <text:p>E152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251" office:value-type="float" office:value="100" calcext:value-type="float">
            <text:p>100</text:p>
          </table:table-cell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2" calcext:value-type="string">
            <text:p>E152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6]&lt;&gt;&quot;&quot;;NETWORKDAYS([.$L166];[.$M166];[$休日.$B$4:.$B$304]);&quot;&quot;)">
            <text:p/>
          </table:table-cell>
          <table:table-cell table:style-name="ce252"/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336"/>
          <table:table-cell table:style-name="ce354" table:number-columns-repeated="2"/>
          <table:table-cell table:style-name="ce368" table:number-columns-repeated="2"/>
          <table:table-cell table:style-name="ce354" table:number-columns-repeated="5"/>
          <table:table-cell table:style-name="ce368" table:number-columns-repeated="2"/>
          <table:table-cell table:style-name="ce354" table:number-columns-repeated="5"/>
          <table:table-cell table:style-name="ce368" table:number-columns-repeated="2"/>
          <table:table-cell table:style-name="ce354" table:number-columns-repeated="4"/>
          <table:table-cell table:style-name="ce387"/>
          <table:table-cell table:style-name="ce368" table:number-columns-repeated="2"/>
          <table:table-cell table:style-name="ce405"/>
          <table:table-cell table:style-name="ce354" table:number-columns-repeated="120"/>
          <table:table-cell table:style-name="ce425"/>
          <table:table-cell table:number-columns-repeated="16215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2" calcext:value-type="string">
            <text:p>E152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216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2" calcext:value-type="string">
            <text:p>E152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68]&lt;&gt;&quot;&quot;;NETWORKDAYS([.$L168];[.$M168];[$休日.$B$4:.$B$304]);&quot;&quot;)" office:value-type="float" office:value="2" calcext:value-type="float">
            <text:p>2</text:p>
          </table:table-cell>
          <table:table-cell table:style-name="ce253" office:value-type="float" office:value="100" calcext:value-type="float">
            <text:p>100</text:p>
          </table:table-cell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2" calcext:value-type="string">
            <text:p>E152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>
            <text:p/>
          </table:table-cell>
          <table:table-cell table:style-name="ce32"/>
          <table:table-cell table:style-name="ce32" table:formula="of:=IF([.$H169]=&quot;&quot;;&quot;&quot;;IF([.$G167]=&quot;&quot;;1;[.$G167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9]&lt;&gt;&quot;&quot;;NETWORKDAYS([.$L169];[.$M169];[$休日.$B$4:.$B$304]);&quot;&quot;)" office:value-type="float" office:value="1" calcext:value-type="float">
            <text:p>1</text:p>
          </table:table-cell>
          <table:table-cell table:style-name="ce253" office:value-type="float" office:value="100" calcext:value-type="float">
            <text:p>100</text:p>
          </table:table-cell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2" calcext:value-type="string">
            <text:p>E152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9]=&quot;&quot;;1;[.$G169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253" office:value-type="float" office:value="100" calcext:value-type="float">
            <text:p>100</text:p>
          </table:table-cell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2" calcext:value-type="string">
            <text:p>E152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253" office:value-type="float" office:value="100" calcext:value-type="float">
            <text:p>100</text:p>
          </table:table-cell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2" calcext:value-type="string">
            <text:p>E152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253" office:value-type="float" office:value="100" calcext:value-type="float">
            <text:p>100</text:p>
          </table:table-cell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2" calcext:value-type="string">
            <text:p>E152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253" office:value-type="float" office:value="100" calcext:value-type="float">
            <text:p>100</text:p>
          </table:table-cell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2" calcext:value-type="string">
            <text:p>E152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253" office:value-type="float" office:value="100" calcext:value-type="float">
            <text:p>100</text:p>
          </table:table-cell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2" calcext:value-type="string">
            <text:p>E152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253" office:value-type="float" office:value="100" calcext:value-type="float">
            <text:p>100</text:p>
          </table:table-cell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2" calcext:value-type="string">
            <text:p>E152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253" office:value-type="float" office:value="100" calcext:value-type="float">
            <text:p>100</text:p>
          </table:table-cell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2" calcext:value-type="string">
            <text:p>E152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253" office:value-type="float" office:value="100" calcext:value-type="float">
            <text:p>100</text:p>
          </table:table-cell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2" calcext:value-type="string">
            <text:p>E152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253" office:value-type="float" office:value="100" calcext:value-type="float">
            <text:p>100</text:p>
          </table:table-cell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2" calcext:value-type="string">
            <text:p>E152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79]&lt;&gt;&quot;&quot;;NETWORKDAYS([.$L179];[.$M179];[$休日.$B$4:.$B$304]);&quot;&quot;)">
            <text:p/>
          </table:table-cell>
          <table:table-cell table:style-name="ce216"/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2" calcext:value-type="string">
            <text:p>E152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216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2" calcext:value-type="string">
            <text:p>E152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1]&lt;&gt;&quot;&quot;;NETWORKDAYS([.$L181];[.$M181];[$休日.$B$4:.$B$304]);&quot;&quot;)" office:value-type="float" office:value="3" calcext:value-type="float">
            <text:p>3</text:p>
          </table:table-cell>
          <table:table-cell table:style-name="ce254" office:value-type="float" office:value="100" calcext:value-type="float">
            <text:p>100</text:p>
          </table:table-cell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2" calcext:value-type="string">
            <text:p>E152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>
            <text:p/>
          </table:table-cell>
          <table:table-cell table:style-name="ce32"/>
          <table:table-cell table:style-name="ce32" table:formula="of:=IF([.$H182]=&quot;&quot;;&quot;&quot;;IF([.$G181]=&quot;&quot;;1;[.$G181]+1))" office:value-type="float" office:value="1" calcext:value-type="float">
            <text:p>1</text:p>
          </table:table-cell>
          <table:table-cell table:style-name="ce185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2]&lt;&gt;&quot;&quot;;NETWORKDAYS([.$L182];[.$M182];[$休日.$B$4:.$B$304]);&quot;&quot;)" office:value-type="float" office:value="1" calcext:value-type="float">
            <text:p>1</text:p>
          </table:table-cell>
          <table:table-cell table:style-name="ce254" office:value-type="float" office:value="100" calcext:value-type="float">
            <text:p>100</text:p>
          </table:table-cell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2" calcext:value-type="string">
            <text:p>E152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2" calcext:value-type="string">
            <text:p>E152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2" calcext:value-type="string">
            <text:p>E152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2" calcext:value-type="string">
            <text:p>E152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2" calcext:value-type="string">
            <text:p>E152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2" calcext:value-type="string">
            <text:p>E152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8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9]&lt;&gt;&quot;&quot;;[.$F189]=&quot;&quot;);&quot;E&quot;&amp;ROW();[.$B111])" office:value-type="string" office:string-value="E90" calcext:value-type="string">
            <text:p>E90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8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0" calcext:value-type="string">
            <text:p>E90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8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0" calcext:value-type="string">
            <text:p>E90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8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114" calcext:value-type="string">
            <text:p>E114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8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3]&lt;&gt;&quot;&quot;;[.$F193]=&quot;&quot;);&quot;E&quot;&amp;ROW();[.$B116])" office:value-type="string" office:string-value="E114" calcext:value-type="string">
            <text:p>E114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8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4" calcext:value-type="string">
            <text:p>E114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4]&lt;&gt;&quot;&quot;;NETWORKDAYS([.$L194];[.$M194];[$休日.$B$4:.$B$304]);&quot;&quot;)">
            <text:p/>
          </table:table-cell>
          <table:table-cell table:style-name="ce216"/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95" calcext:value-type="string">
            <text:p>E195</text:p>
          </table:table-cell>
          <table:table-cell table:style-name="ce13" table:formula="of:=IF(AND([.$D195]&lt;&gt;&quot;&quot;;[.$D195]&lt;&gt;&quot;○&quot;);MAX([.$C$3:.$C194])+1;[.$C194])" office:value-type="float" office:value="10" calcext:value-type="float">
            <text:p>10</text:p>
          </table:table-cell>
          <table:table-cell table:style-name="ce19" office:value-type="string" calcext:value-type="string">
            <text:p>オリジナル機能</text:p>
          </table:table-cell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216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2">
          <table:table-cell/>
          <table:table-cell table:style-name="ce7" table:formula="of:=IF(AND([.$D196]&lt;&gt;&quot;&quot;;[.$F196]=&quot;&quot;);&quot;E&quot;&amp;ROW();[.$B119])" office:value-type="string" office:string-value="E114" calcext:value-type="string">
            <text:p>E114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/>
          <table:table-cell table:style-name="ce27" table:formula="of:=IF(AND([.$F196]&lt;&gt;&quot;&quot;;[.$D195]&lt;&gt;&quot;&quot;);1;IF([.$F196]&lt;&gt;&quot;&quot;;MAX(INDIRECT([.$B196]):[.$E195])+1;&quot;&quot;))" office:value-type="float" office:value="1" calcext:value-type="float">
            <text:p>1</text:p>
          </table:table-cell>
          <table:table-cell table:style-name="ce33" office:value-type="string" calcext:value-type="string">
            <text:p>クーポン機能・タイムセール機能</text:p>
          </table:table-cell>
          <table:table-cell table:style-name="ce33" table:formula="of:=IF([.$H196]=&quot;&quot;;&quot;&quot;;IF([.$G195]=&quot;&quot;;1;[.$G195]+1))">
            <text:p/>
          </table:table-cell>
          <table:table-cell table:style-name="ce33"/>
          <table:table-cell table:style-name="ce32"/>
          <table:table-cell table:style-name="ce192" office:value-type="string" calcext:value-type="string">
            <text:p>伊藤、小林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6]&lt;&gt;&quot;&quot;;NETWORKDAYS([.$L196];[.$M196];[$休日.$B$4:.$B$304]);&quot;&quot;)" office:value-type="float" office:value="5" calcext:value-type="float">
            <text:p>5</text:p>
          </table:table-cell>
          <table:table-cell table:style-name="ce261" office:value-type="float" office:value="100" calcext:value-type="float">
            <text:p>100</text:p>
          </table:table-cell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7]&lt;&gt;&quot;&quot;;[.$F197]=&quot;&quot;);&quot;E&quot;&amp;ROW();[.$B120])" office:value-type="string" office:string-value="E114" calcext:value-type="string">
            <text:p>E114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>
            <text:p/>
          </table:table-cell>
          <table:table-cell table:style-name="ce32"/>
          <table:table-cell table:style-name="ce32" table:formula="of:=IF([.$H197]=&quot;&quot;;&quot;&quot;;IF([.$G196]=&quot;&quot;;1;[.$G196]+1))" office:value-type="float" office:value="1" calcext:value-type="float">
            <text:p>1</text:p>
          </table:table-cell>
          <table:table-cell table:style-name="ce186" office:value-type="string" calcext:value-type="string">
            <text:p>支払方法選択画面 表示処理用　コントローラー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7]&lt;&gt;&quot;&quot;;NETWORKDAYS([.$L197];[.$M19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4" calcext:value-type="string">
            <text:p>E114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46" table:formula="of:=IF([.$H198]=&quot;&quot;;&quot;&quot;;IF([.$G197]=&quot;&quot;;1;[.$G197]+1))" office:value-type="float" office:value="2" calcext:value-type="float">
            <text:p>2</text:p>
          </table:table-cell>
          <table:table-cell table:style-name="ce187" office:value-type="string" calcext:value-type="string">
            <text:p><text:span text:style-name="T9">支払方法選択画面　テンプレート</text:span><text:span text:style-name="T10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8]&lt;&gt;&quot;&quot;;NETWORKDAYS([.$L198];[.$M19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8]=&quot;&quot;;[.$L198]&lt;&gt;&quot;&quot;;[.$L198]&lt;=[.$U$1]);AND([.$M198]&lt;&gt;&quot;&quot;;[.Q198]&lt;100;[.$M198]&lt;=[.$U$1]));&quot;遅延&quot;;&quot;&quot;)">
            <text:p/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4" calcext:value-type="string">
            <text:p>E114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32" table:formula="of:=IF([.$H205]=&quot;&quot;;&quot;&quot;;IF([.$G198]=&quot;&quot;;1;[.$G198]+1))" office:value-type="float" office:value="3" calcext:value-type="float">
            <text:p>3</text:p>
          </table:table-cell>
          <table:table-cell table:style-name="ce188" office:value-type="string" calcext:value-type="string">
            <text:p><text:span text:style-name="T11">支払方法選択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9]&lt;&gt;&quot;&quot;;NETWORKDAYS([.$L199];[.$M19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9]=&quot;&quot;;[.$L199]&lt;&gt;&quot;&quot;;[.$L199]&lt;=[.$U$1]);AND([.$M199]&lt;&gt;&quot;&quot;;[.Q199]&lt;100;[.$M199]&lt;=[.$U$1]));&quot;遅延&quot;;&quot;&quot;)">
            <text:p/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4" calcext:value-type="string">
            <text:p>E114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6]=&quot;&quot;;&quot;&quot;;IF([.$G199]=&quot;&quot;;1;[.$G199]+1))" office:value-type="float" office:value="4" calcext:value-type="float">
            <text:p>4</text:p>
          </table:table-cell>
          <table:table-cell table:style-name="ce32" office:value-type="string" calcext:value-type="string">
            <text:p>会員詳細画面 表示処理用　コントローラー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0]&lt;&gt;&quot;&quot;;NETWORKDAYS([.$L200];[.$M200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0]=&quot;&quot;;[.$L200]&lt;&gt;&quot;&quot;;[.$L200]&lt;=[.$U$1]);AND([.$M200]&lt;&gt;&quot;&quot;;[.Q200]&lt;100;[.$M200]&lt;=[.$U$1]));&quot;遅延&quot;;&quot;&quot;)">
            <text:p/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24" calcext:value-type="string">
            <text:p>E124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46" table:formula="of:=IF([.$H206]=&quot;&quot;;&quot;&quot;;IF([.$G200]=&quot;&quot;;1;[.$G200]+1))" office:value-type="float" office:value="5" calcext:value-type="float">
            <text:p>5</text:p>
          </table:table-cell>
          <table:table-cell table:style-name="ce189" office:value-type="string" calcext:value-type="string">
            <text:p>会員詳細画面 表示処理用　エンティティ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4" calcext:value-type="string">
            <text:p>E124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32" table:formula="of:=IF([.$H207]=&quot;&quot;;&quot;&quot;;IF([.$G201]=&quot;&quot;;1;[.$G201]+1))" office:value-type="float" office:value="6" calcext:value-type="float">
            <text:p>6</text:p>
          </table:table-cell>
          <table:table-cell table:style-name="ce189" office:value-type="string" calcext:value-type="string">
            <text:p>会員詳細画面 表示処理用　データベース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4" calcext:value-type="string">
            <text:p>E124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8]=&quot;&quot;;&quot;&quot;;IF([.$G202]=&quot;&quot;;1;[.$G202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8">会員詳細画面　</text:span><text:span text:style-name="T12">テンプレート</text:span><text:span text:style-name="T13">ファイルの編集</text:span>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4" calcext:value-type="string">
            <text:p>E124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9]=&quot;&quot;;&quot;&quot;;IF([.$G203]=&quot;&quot;;1;[.$G203]+1))" office:value-type="float" office:value="8" calcext:value-type="float">
            <text:p>8</text:p>
          </table:table-cell>
          <table:table-cell table:style-name="ce32" office:value-type="string" calcext:value-type="string">
            <text:p>会員詳細画面　動作確認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4]&lt;&gt;&quot;&quot;;NETWORKDAYS([.$L204];[.$M204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4" calcext:value-type="string">
            <text:p>E124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10]=&quot;&quot;;&quot;&quot;;IF([.$G204]=&quot;&quot;;1;[.$G204]+1))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4">注文確認画面 表示処理用</text:span><text:span text:style-name="T15">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5]&lt;&gt;&quot;&quot;;NETWORKDAYS([.$L205];[.$M205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4" calcext:value-type="string">
            <text:p>E124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00]=&quot;&quot;;&quot;&quot;;IF([.$G205]=&quot;&quot;;1;[.$G205]+1))" office:value-type="float" office:value="10" calcext:value-type="float">
            <text:p>10</text:p>
          </table:table-cell>
          <table:table-cell table:style-name="ce186" office:value-type="string" calcext:value-type="string">
            <text:p><text:span text:style-name="T16">注文確認画面</text:span><text:span text:style-name="T17">　</text:span><text:span text:style-name="T18">テンプレート</text:span><text:span text:style-name="T19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0]&lt;&gt;&quot;&quot;;NETWORKDAYS([.$L200];[.$M200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6]=&quot;&quot;;[.$L200]&lt;&gt;&quot;&quot;;[.$L200]&lt;=[.$U$1]);AND([.$M200]&lt;&gt;&quot;&quot;;[.Q206]&lt;100;[.$M200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4" calcext:value-type="string">
            <text:p>E124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3]=&quot;&quot;;&quot;&quot;;IF([.$G206]=&quot;&quot;;1;[.$G206]+1))" office:value-type="float" office:value="11" calcext:value-type="float">
            <text:p>11</text:p>
          </table:table-cell>
          <table:table-cell table:style-name="ce191" office:value-type="string" calcext:value-type="string">
            <text:p><text:span text:style-name="T20">注文確認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7]=&quot;&quot;;[.$L201]&lt;&gt;&quot;&quot;;[.$L201]&lt;=[.$U$1]);AND([.$M201]&lt;&gt;&quot;&quot;;[.Q207]&lt;100;[.$M201]&lt;=[.$U$1]));&quot;遅延&quot;;&quot;&quot;)">
            <text:p/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4" calcext:value-type="string">
            <text:p>E124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4]=&quot;&quot;;&quot;&quot;;IF([.$G207]=&quot;&quot;;1;[.$G207]+1))" office:value-type="float" office:value="12" calcext:value-type="float">
            <text:p>12</text:p>
          </table:table-cell>
          <table:table-cell table:style-name="ce190" office:value-type="string" calcext:value-type="string">
            <text:p><text:span text:style-name="T21">ご注文の確定ボタン 押下時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8]=&quot;&quot;;[.$L202]&lt;&gt;&quot;&quot;;[.$L202]&lt;=[.$U$1]);AND([.$M202]&lt;&gt;&quot;&quot;;[.Q208]&lt;100;[.$M202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4" calcext:value-type="string">
            <text:p>E124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12]=&quot;&quot;;&quot;&quot;;IF([.$G208]=&quot;&quot;;1;[.$G208]+1))" office:value-type="float" office:value="13" calcext:value-type="float">
            <text:p>13</text:p>
          </table:table-cell>
          <table:table-cell table:style-name="ce190" office:value-type="string" calcext:value-type="string">
            <text:p><text:span text:style-name="T21">注文完了画面 表示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9]&lt;&gt;&quot;&quot;;NETWORKDAYS([.$L209];[.$M209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9]=&quot;&quot;;[.$L209]&lt;&gt;&quot;&quot;;[.$L209]&lt;=[.$U$1]);AND([.$M209]&lt;&gt;&quot;&quot;;[.Q209]&lt;100;[.$M209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4" calcext:value-type="string">
            <text:p>E124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1]=&quot;&quot;;&quot;&quot;;IF([.$G209]=&quot;&quot;;1;[.$G209]+1))" office:value-type="float" office:value="14" calcext:value-type="float">
            <text:p>14</text:p>
          </table:table-cell>
          <table:table-cell table:style-name="ce32" office:value-type="string" calcext:value-type="string">
            <text:p><text:span text:style-name="T22">注文完了画面　</text:span><text:span text:style-name="T23">テンプレート</text:span><text:span text:style-name="T24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10]&lt;&gt;&quot;&quot;;NETWORKDAYS([.$L210];[.$M210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4" calcext:value-type="string">
            <text:p>E124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1]=&quot;&quot;;&quot;&quot;;IF([.$G210]=&quot;&quot;;1;[.$G210]+1))" office:value-type="float" office:value="15" calcext:value-type="float">
            <text:p>15</text:p>
          </table:table-cell>
          <table:table-cell table:style-name="ce32" office:value-type="string" calcext:value-type="string">
            <text:p>ヘッダーテンプレート　HTML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626-06-10" calcext:value-type="date">
            <text:p>2626/06/10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11]&lt;&gt;&quot;&quot;;NETWORKDAYS([.$L211];[.$M211];[$休日.$B$4:.$B$304]);&quot;&quot;)" office:value-type="float" office:value="0" calcext:value-type="float">
            <text:p>0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4" calcext:value-type="string">
            <text:p>E124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00]=&quot;&quot;;&quot;&quot;;IF([.$G211]=&quot;&quot;;1;[.$G211]+1))" office:value-type="float" office:value="16" calcext:value-type="float">
            <text:p>16</text:p>
          </table:table-cell>
          <table:table-cell table:style-name="ce32" office:value-type="string" calcext:value-type="string">
            <text:p>クーポン機能・タイムセール機能　動作確認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12]&lt;&gt;&quot;&quot;;NETWORKDAYS([.$L212];[.$M212];[$休日.$B$4:.$B$304]);&quot;&quot;)" office:value-type="float" office:value="5" calcext:value-type="float">
            <text:p>5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4]&lt;&gt;&quot;&quot;;[.$F214]=&quot;&quot;);&quot;E&quot;&amp;ROW();[.$B136])" office:value-type="string" office:string-value="E124" calcext:value-type="string">
            <text:p>E124</text:p>
          </table:table-cell>
          <table:table-cell table:style-name="ce13" table:formula="of:=IF(AND([.$D214]&lt;&gt;&quot;&quot;;[.$D214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CSSの編集</text:p>
          </table:table-cell>
          <table:table-cell table:style-name="ce32"/>
          <table:table-cell table:style-name="Default"/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3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14]&lt;&gt;&quot;&quot;;NETWORKDAYS([.$L214];[.$M214];[$休日.$B$4:.$B$304]);&quot;&quot;)" office:value-type="float" office:value="1" calcext:value-type="float">
            <text:p>1</text:p>
          </table:table-cell>
          <table:table-cell table:style-name="ce262" office:value-type="float" office:value="100" calcext:value-type="float">
            <text:p>100</text:p>
          </table:table-cell>
          <table:table-cell table:style-name="ce63" table:formula="of:=IF(OR(AND([.$N214]=&quot;&quot;;[.$L214]&lt;&gt;&quot;&quot;;[.$L214]&lt;=[.$U$1]);AND([.$M214]&lt;&gt;&quot;&quot;;[.Q214]&lt;100;[.$M214]&lt;=[.$U$1]));&quot;遅延&quot;;&quot;&quot;)">
            <text:p/>
          </table:table-cell>
          <table:table-cell table:style-name="ce66"/>
          <table:table-cell table:style-name="ce66" table:formula="of:=SUM([.$V214:.$FM2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5]&lt;&gt;&quot;&quot;;[.$F215]=&quot;&quot;);&quot;E&quot;&amp;ROW();[.$B137])" office:value-type="string" office:string-value="E124" calcext:value-type="string">
            <text:p>E124</text:p>
          </table:table-cell>
          <table:table-cell table:style-name="ce13" table:formula="of:=IF(AND([.$D215]&lt;&gt;&quot;&quot;;[.$D215]&lt;&gt;&quot;○&quot;);MAX([.$C$3:.$C214])+1;[.$C214])" office:value-type="float" office:value="10" calcext:value-type="float">
            <text:p>10</text:p>
          </table:table-cell>
          <table:table-cell table:style-name="ce19"/>
          <table:table-cell table:style-name="ce27" table:formula="of:=IF(AND([.$F215]&lt;&gt;&quot;&quot;;[.$D214]&lt;&gt;&quot;&quot;);1;IF([.$F215]&lt;&gt;&quot;&quot;;MAX(INDIRECT([.$B215]):[.$E214])+1;&quot;&quot;))">
            <text:p/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ヘッダ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12" calcext:value-type="date">
            <text:p>2026/06/12</text:p>
          </table:table-cell>
          <table:table-cell table:style-name="ce32" table:formula="of:=IF([.$L215]&lt;&gt;&quot;&quot;;NETWORKDAYS([.$L215];[.$M215];[$休日.$B$4:.$B$304]);&quot;&quot;)" office:value-type="float" office:value="1" calcext:value-type="float">
            <text:p>1</text:p>
          </table:table-cell>
          <table:table-cell table:style-name="ce262" office:value-type="float" office:value="100" calcext:value-type="float">
            <text:p>100</text:p>
          </table:table-cell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6]&lt;&gt;&quot;&quot;;[.$F216]=&quot;&quot;);&quot;E&quot;&amp;ROW();[.$B138])" office:value-type="string" office:string-value="E124" calcext:value-type="string">
            <text:p>E124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フッタ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3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2" table:formula="of:=IF([.$L216]&lt;&gt;&quot;&quot;;NETWORKDAYS([.$L216];[.$M216];[$休日.$B$4:.$B$304]);&quot;&quot;)" office:value-type="float" office:value="1" calcext:value-type="float">
            <text:p>1</text:p>
          </table:table-cell>
          <table:table-cell table:style-name="ce262" office:value-type="float" office:value="100" calcext:value-type="float">
            <text:p>100</text:p>
          </table:table-cell>
          <table:table-cell table:style-name="ce63" table:formula="of:=IF(OR(AND([.$N216]=&quot;&quot;;[.$L216]&lt;&gt;&quot;&quot;;[.$L216]&lt;=[.$U$1]);AND([.$M216]&lt;&gt;&quot;&quot;;[.Q214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7]&lt;&gt;&quot;&quot;;[.$F217]=&quot;&quot;);&quot;E&quot;&amp;ROW();[.$B139])" office:value-type="string" office:string-value="E124" calcext:value-type="string">
            <text:p>E124</text:p>
          </table:table-cell>
          <table:table-cell table:style-name="ce13" table:formula="of:=IF(AND([.$D217]&lt;&gt;&quot;&quot;;[.$D217]&lt;&gt;&quot;○&quot;);MAX([.$C$3:.$C216])+1;[.$C216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ナビゲーション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62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8]&lt;&gt;&quot;&quot;;[.$F218]=&quot;&quot;);&quot;E&quot;&amp;ROW();[.$B140])" office:value-type="string" office:string-value="E124" calcext:value-type="string">
            <text:p>E124</text:p>
          </table:table-cell>
          <table:table-cell table:style-name="ce13" table:formula="of:=IF(AND([.$D218]&lt;&gt;&quot;&quot;;[.$D218]&lt;&gt;&quot;○&quot;);MAX([.$C$3:.$C217])+1;[.$C217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サイド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office:value-type="float" office:value="1" calcext:value-type="float">
            <text:p>1</text:p>
          </table:table-cell>
          <table:table-cell table:style-name="ce262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9]&lt;&gt;&quot;&quot;;[.$F219]=&quot;&quot;);&quot;E&quot;&amp;ROW();[.$B141])" office:value-type="string" office:string-value="E124" calcext:value-type="string">
            <text:p>E124</text:p>
          </table:table-cell>
          <table:table-cell table:style-name="ce13" table:formula="of:=IF(AND([.$D219]&lt;&gt;&quot;&quot;;[.$D219]&lt;&gt;&quot;○&quot;);MAX([.$C$3:.$C218])+1;[.$C218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フォント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12" calcext:value-type="date">
            <text:p>2026/06/12</text:p>
          </table:table-cell>
          <table:table-cell table:style-name="ce32" office:value-type="float" office:value="1" calcext:value-type="float">
            <text:p>1</text:p>
          </table:table-cell>
          <table:table-cell table:style-name="ce262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0]&lt;&gt;&quot;&quot;;[.$F220]=&quot;&quot;);&quot;E&quot;&amp;ROW();[.$B142])" office:value-type="string" office:string-value="E124" calcext:value-type="string">
            <text:p>E124</text:p>
          </table:table-cell>
          <table:table-cell table:style-name="ce13" table:formula="of:=IF(AND([.$D220]&lt;&gt;&quot;&quot;;[.$D220]&lt;&gt;&quot;○&quot;);MAX([.$C$3:.$C219])+1;[.$C219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ボタン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62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1]&lt;&gt;&quot;&quot;;[.$F221]=&quot;&quot;);&quot;E&quot;&amp;ROW();[.$B143])" office:value-type="string" office:string-value="E124" calcext:value-type="string">
            <text:p>E124</text:p>
          </table:table-cell>
          <table:table-cell table:style-name="ce13" table:formula="of:=IF(AND([.$D221]&lt;&gt;&quot;&quot;;[.$D221]&lt;&gt;&quot;○&quot;);MAX([.$C$3:.$C220])+1;[.$C220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トップ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62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2]&lt;&gt;&quot;&quot;;[.$F222]=&quot;&quot;);&quot;E&quot;&amp;ROW();[.$B144])" office:value-type="string" office:string-value="E124" calcext:value-type="string">
            <text:p>E124</text:p>
          </table:table-cell>
          <table:table-cell table:style-name="ce13" table:formula="of:=IF(AND([.$D222]&lt;&gt;&quot;&quot;;[.$D222]&lt;&gt;&quot;○&quot;);MAX([.$C$3:.$C221])+1;[.$C221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商品一覧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62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3]&lt;&gt;&quot;&quot;;[.$F223]=&quot;&quot;);&quot;E&quot;&amp;ROW();[.$B145])" office:value-type="string" office:string-value="E124" calcext:value-type="string">
            <text:p>E124</text:p>
          </table:table-cell>
          <table:table-cell table:style-name="ce13" table:formula="of:=IF(AND([.$D223]&lt;&gt;&quot;&quot;;[.$D223]&lt;&gt;&quot;○&quot;);MAX([.$C$3:.$C222])+1;[.$C222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商品詳細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office:value-type="float" office:value="1" calcext:value-type="float">
            <text:p>1</text:p>
          </table:table-cell>
          <table:table-cell table:style-name="ce262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4]&lt;&gt;&quot;&quot;;[.$F224]=&quot;&quot;);&quot;E&quot;&amp;ROW();[.$B146])" office:value-type="string" office:string-value="E124" calcext:value-type="string">
            <text:p>E124</text:p>
          </table:table-cell>
          <table:table-cell table:style-name="ce13" table:formula="of:=IF(AND([.$D224]&lt;&gt;&quot;&quot;;[.$D224]&lt;&gt;&quot;○&quot;);MAX([.$C$3:.$C223])+1;[.$C223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ログイン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2" office:value-type="float" office:value="1" calcext:value-type="float">
            <text:p>1</text:p>
          </table:table-cell>
          <table:table-cell table:style-name="ce262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5]&lt;&gt;&quot;&quot;;[.$F225]=&quot;&quot;);&quot;E&quot;&amp;ROW();[.$B147])" office:value-type="string" office:string-value="E124" calcext:value-type="string">
            <text:p>E124</text:p>
          </table:table-cell>
          <table:table-cell table:style-name="ce13" table:formula="of:=IF(AND([.$D225]&lt;&gt;&quot;&quot;;[.$D225]&lt;&gt;&quot;○&quot;);MAX([.$C$3:.$C224])+1;[.$C224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会員登録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office:value-type="float" office:value="1" calcext:value-type="float">
            <text:p>1</text:p>
          </table:table-cell>
          <table:table-cell table:style-name="ce262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6]&lt;&gt;&quot;&quot;;[.$F226]=&quot;&quot;);&quot;E&quot;&amp;ROW();[.$B148])" office:value-type="string" office:string-value="E124" calcext:value-type="string">
            <text:p>E124</text:p>
          </table:table-cell>
          <table:table-cell table:style-name="ce13" table:formula="of:=IF(AND([.$D226]&lt;&gt;&quot;&quot;;[.$D226]&lt;&gt;&quot;○&quot;);MAX([.$C$3:.$C225])+1;[.$C225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買い物かご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62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7]&lt;&gt;&quot;&quot;;[.$F227]=&quot;&quot;);&quot;E&quot;&amp;ROW();[.$B149])" office:value-type="string" office:string-value="E124" calcext:value-type="string">
            <text:p>E124</text:p>
          </table:table-cell>
          <table:table-cell table:style-name="ce13" table:formula="of:=IF(AND([.$D227]&lt;&gt;&quot;&quot;;[.$D227]&lt;&gt;&quot;○&quot;);MAX([.$C$3:.$C226])+1;[.$C226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8]&lt;&gt;&quot;&quot;;[.$F228]=&quot;&quot;);&quot;E&quot;&amp;ROW();[.$B152])" office:value-type="string" office:string-value="E228" calcext:value-type="string">
            <text:p>E228</text:p>
          </table:table-cell>
          <table:table-cell table:style-name="ce13" table:formula="of:=IF(AND([.$D228]&lt;&gt;&quot;&quot;;[.$D228]&lt;&gt;&quot;○&quot;);MAX([.$C$3:.$C227])+1;#REF!)" office:value-type="float" office:value="11" calcext:value-type="float">
            <text:p>11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28]&lt;&gt;&quot;&quot;;[.$D261]&lt;&gt;&quot;&quot;);1;IF([.$F228]&lt;&gt;&quot;&quot;;MAX(INDIRECT([.$B228]):[.$E261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4"/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28]&lt;&gt;&quot;&quot;;NETWORKDAYS([.$L228];[.$M228];[$休日.$B$4:.$B$304]);&quot;&quot;)" office:value-type="float" office:value="4" calcext:value-type="float">
            <text:p>4</text:p>
          </table:table-cell>
          <table:table-cell table:style-name="ce263" office:value-type="float" office:value="100" calcext:value-type="float">
            <text:p>100</text:p>
          </table:table-cell>
          <table:table-cell table:style-name="ce63" table:formula="of:=IF(OR(AND([.$N228]=&quot;&quot;;[.$L228]&lt;&gt;&quot;&quot;;[.$L228]&lt;=[.$U$1]);AND([.$M228]&lt;&gt;&quot;&quot;;[.Q228]&lt;100;[.$M228]&lt;=[.$U$1]));&quot;遅延&quot;;&quot;&quot;)">
            <text:p/>
          </table:table-cell>
          <table:table-cell table:style-name="ce66"/>
          <table:table-cell table:style-name="ce66" table:formula="of:=SUM([.$V228:.$FM2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9]&lt;&gt;&quot;&quot;;[.$F229]=&quot;&quot;);&quot;E&quot;&amp;ROW();[.$B153])" office:value-type="string" office:string-value="E152" calcext:value-type="string">
            <text:p>E152</text:p>
          </table:table-cell>
          <table:table-cell table:style-name="ce13" table:formula="of:=IF(AND([.$D229]&lt;&gt;&quot;&quot;;[.$D229]&lt;&gt;&quot;○&quot;);MAX([.$C$3:.$C228])+1;[.$C228])" office:value-type="float" office:value="11" calcext:value-type="float">
            <text:p>11</text:p>
          </table:table-cell>
          <table:table-cell table:style-name="ce19"/>
          <table:table-cell table:style-name="ce27" table:formula="of:=IF(AND([.$F229]&lt;&gt;&quot;&quot;;[.$D228]&lt;&gt;&quot;&quot;);1;IF([.$F229]&lt;&gt;&quot;&quot;;MAX(INDIRECT([.$B229]):[.$E228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29]=&quot;&quot;;&quot;&quot;;IF([.$G228]=&quot;&quot;;1;[.$G228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29]&lt;&gt;&quot;&quot;;NETWORKDAYS([.$L229];[.$M229];[$休日.$B$4:.$B$304]);&quot;&quot;)" office:value-type="float" office:value="1" calcext:value-type="float">
            <text:p>1</text:p>
          </table:table-cell>
          <table:table-cell table:style-name="ce264" office:value-type="float" office:value="100" calcext:value-type="float">
            <text:p>10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0]&lt;&gt;&quot;&quot;;[.$F230]=&quot;&quot;);&quot;E&quot;&amp;ROW();[.$B154])" office:value-type="string" office:string-value="E152" calcext:value-type="string">
            <text:p>E152</text:p>
          </table:table-cell>
          <table:table-cell table:style-name="ce13" table:formula="of:=IF(AND([.$D230]&lt;&gt;&quot;&quot;;[.$D230]&lt;&gt;&quot;○&quot;);MAX([.$C$3:.$C229])+1;[.$C229])" office:value-type="float" office:value="11" calcext:value-type="float">
            <text:p>11</text:p>
          </table:table-cell>
          <table:table-cell table:style-name="ce19"/>
          <table:table-cell table:style-name="ce27" table:formula="of:=IF(AND([.$F230]&lt;&gt;&quot;&quot;;[.$D229]&lt;&gt;&quot;&quot;);1;IF([.$F230]&lt;&gt;&quot;&quot;;MAX(INDIRECT([.$B230]):[.$E229])+1;&quot;&quot;))">
            <text:p/>
          </table:table-cell>
          <table:table-cell table:style-name="ce32"/>
          <table:table-cell table:style-name="ce32" table:formula="of:=IF([.$H230]=&quot;&quot;;&quot;&quot;;IF([.$G229]=&quot;&quot;;1;[.$G229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30]&lt;&gt;&quot;&quot;;NETWORKDAYS([.$L230];[.$M230];[$休日.$B$4:.$B$304]);&quot;&quot;)" office:value-type="float" office:value="1" calcext:value-type="float">
            <text:p>1</text:p>
          </table:table-cell>
          <table:table-cell table:style-name="ce264" office:value-type="float" office:value="100" calcext:value-type="float">
            <text:p>100</text:p>
          </table:table-cell>
          <table:table-cell table:style-name="ce63" table:formula="of:=IF(OR(AND([.$N230]=&quot;&quot;;[.$L230]&lt;&gt;&quot;&quot;;[.$L230]&lt;=[.$U$1]);AND([.$M230]&lt;&gt;&quot;&quot;;[.Q230]&lt;100;[.$M230]&lt;=[.$U$1]));&quot;遅延&quot;;&quot;&quot;)">
            <text:p/>
          </table:table-cell>
          <table:table-cell table:style-name="ce66"/>
          <table:table-cell table:style-name="ce66" table:formula="of:=SUM([.$V230:.$FM2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1]&lt;&gt;&quot;&quot;;[.$F231]=&quot;&quot;);&quot;E&quot;&amp;ROW();[.$B155])" office:value-type="string" office:string-value="E152" calcext:value-type="string">
            <text:p>E152</text:p>
          </table:table-cell>
          <table:table-cell table:style-name="ce13" table:formula="of:=IF(AND([.$D231]&lt;&gt;&quot;&quot;;[.$D231]&lt;&gt;&quot;○&quot;);MAX([.$C$3:.$C230])+1;[.$C230])" office:value-type="float" office:value="11" calcext:value-type="float">
            <text:p>11</text:p>
          </table:table-cell>
          <table:table-cell table:style-name="ce19"/>
          <table:table-cell table:style-name="ce27" table:formula="of:=IF(AND([.$F231]&lt;&gt;&quot;&quot;;[.$D230]&lt;&gt;&quot;&quot;);1;IF([.$F231]&lt;&gt;&quot;&quot;;MAX(INDIRECT([.$B231]):[.$E230])+1;&quot;&quot;))">
            <text:p/>
          </table:table-cell>
          <table:table-cell table:style-name="ce32"/>
          <table:table-cell table:style-name="ce32" table:formula="of:=IF([.$H231]=&quot;&quot;;&quot;&quot;;IF([.$G230]=&quot;&quot;;1;[.$G230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31]&lt;&gt;&quot;&quot;;NETWORKDAYS([.$L231];[.$M231];[$休日.$B$4:.$B$304]);&quot;&quot;)" office:value-type="float" office:value="1" calcext:value-type="float">
            <text:p>1</text:p>
          </table:table-cell>
          <table:table-cell table:style-name="ce264" office:value-type="float" office:value="100" calcext:value-type="float">
            <text:p>10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2]&lt;&gt;&quot;&quot;;[.$F232]=&quot;&quot;);&quot;E&quot;&amp;ROW();[.$B156])" office:value-type="string" office:string-value="E152" calcext:value-type="string">
            <text:p>E152</text:p>
          </table:table-cell>
          <table:table-cell table:style-name="ce13" table:formula="of:=IF(AND([.$D232]&lt;&gt;&quot;&quot;;[.$D232]&lt;&gt;&quot;○&quot;);MAX([.$C$3:.$C231])+1;[.$C231])" office:value-type="float" office:value="11" calcext:value-type="float">
            <text:p>11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>
            <text:p/>
          </table:table-cell>
          <table:table-cell table:style-name="ce32"/>
          <table:table-cell table:style-name="ce32" table:formula="of:=IF([.$H233]=&quot;&quot;;&quot;&quot;;IF([.$G231]=&quot;&quot;;1;[.$G231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264" office:value-type="float" office:value="100" calcext:value-type="float">
            <text:p>10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3]&lt;&gt;&quot;&quot;;[.$F233]=&quot;&quot;);&quot;E&quot;&amp;ROW();[.$B157])" office:value-type="string" office:string-value="E152" calcext:value-type="string">
            <text:p>E152</text:p>
          </table:table-cell>
          <table:table-cell table:style-name="ce13" table:formula="of:=IF(AND([.$D233]&lt;&gt;&quot;&quot;;[.$D233]&lt;&gt;&quot;○&quot;);MAX([.$C$3:.$C232])+1;[.$C232])" office:value-type="float" office:value="11" calcext:value-type="float">
            <text:p>11</text:p>
          </table:table-cell>
          <table:table-cell table:style-name="ce19"/>
          <table:table-cell table:style-name="ce27" table:formula="of:=IF(AND([.$F233]&lt;&gt;&quot;&quot;;[.$D232]&lt;&gt;&quot;&quot;);1;IF([.$F233]&lt;&gt;&quot;&quot;;MAX(INDIRECT([.$B233]):[.$E232])+1;&quot;&quot;))">
            <text:p/>
          </table:table-cell>
          <table:table-cell table:style-name="ce32"/>
          <table:table-cell table:style-name="ce32" table:formula="of:=IF([.$H234]=&quot;&quot;;&quot;&quot;;IF([.$G232]=&quot;&quot;;1;[.$G232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264" office:value-type="float" office:value="100" calcext:value-type="float">
            <text:p>10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4]&lt;&gt;&quot;&quot;;[.$F234]=&quot;&quot;);&quot;E&quot;&amp;ROW();[.$B158])" office:value-type="string" office:string-value="E152" calcext:value-type="string">
            <text:p>E152</text:p>
          </table:table-cell>
          <table:table-cell table:style-name="ce13" table:formula="of:=IF(AND([.$D234]&lt;&gt;&quot;&quot;;[.$D234]&lt;&gt;&quot;○&quot;);MAX([.$C$3:.$C233])+1;[.$C233])" office:value-type="float" office:value="11" calcext:value-type="float">
            <text:p>11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4]=&quot;&quot;;&quot;&quot;;IF([.$G233]=&quot;&quot;;1;[.$G233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17" calcext:value-type="date">
            <text:p>2026/06/17</text:p>
          </table:table-cell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264" office:value-type="float" office:value="100" calcext:value-type="float">
            <text:p>10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5]&lt;&gt;&quot;&quot;;[.$F235]=&quot;&quot;);&quot;E&quot;&amp;ROW();[.$B159])" office:value-type="string" office:string-value="E152" calcext:value-type="string">
            <text:p>E152</text:p>
          </table:table-cell>
          <table:table-cell table:style-name="ce13" table:formula="of:=IF(AND([.$D235]&lt;&gt;&quot;&quot;;[.$D235]&lt;&gt;&quot;○&quot;);MAX([.$C$3:.$C234])+1;[.$C234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97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6]&lt;&gt;&quot;&quot;;[.$F236]=&quot;&quot;);&quot;E&quot;&amp;ROW();[.$B159])" office:value-type="string" office:string-value="E152" calcext:value-type="string">
            <text:p>E152</text:p>
          </table:table-cell>
          <table:table-cell table:style-name="ce13" table:formula="of:=IF(AND([.$D236]&lt;&gt;&quot;&quot;;[.$D236]&lt;&gt;&quot;○&quot;);MAX([.$C$3:.$C234])+1;[.$C234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36]=&quot;&quot;;&quot;&quot;;IF([.$G234]=&quot;&quot;;1;[.$G234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36]&lt;&gt;&quot;&quot;;NETWORKDAYS([.$L236];[.$M236];[$休日.$B$4:.$B$304]);&quot;&quot;)" office:value-type="float" office:value="1" calcext:value-type="float">
            <text:p>1</text:p>
          </table:table-cell>
          <table:table-cell table:style-name="ce274" office:value-type="float" office:value="100" calcext:value-type="float">
            <text:p>100</text:p>
          </table:table-cell>
          <table:table-cell table:style-name="ce63" table:formula="of:=IF(OR(AND([.$N236]=&quot;&quot;;[.$L236]&lt;&gt;&quot;&quot;;[.$L236]&lt;=[.$U$1]);AND([.$M236]&lt;&gt;&quot;&quot;;[.Q236]&lt;100;[.$M236]&lt;=[.$U$1]));&quot;遅延&quot;;&quot;&quot;)">
            <text:p/>
          </table:table-cell>
          <table:table-cell table:style-name="ce66"/>
          <table:table-cell table:style-name="ce66" table:formula="of:=SUM([.$V236:.$FM2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60])" office:value-type="string" office:string-value="E152" calcext:value-type="string">
            <text:p>E152</text:p>
          </table:table-cell>
          <table:table-cell table:style-name="ce13" table:formula="of:=IF(AND([.$D237]&lt;&gt;&quot;&quot;;[.$D237]&lt;&gt;&quot;○&quot;);MAX([.$C$3:.$C236])+1;[.$C236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37]=&quot;&quot;;&quot;&quot;;IF([.$G236]=&quot;&quot;;1;[.$G236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274" office:value-type="float" office:value="100" calcext:value-type="float">
            <text:p>10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61])" office:value-type="string" office:string-value="E152" calcext:value-type="string">
            <text:p>E152</text:p>
          </table:table-cell>
          <table:table-cell table:style-name="ce13" table:formula="of:=IF(AND([.$D238]&lt;&gt;&quot;&quot;;[.$D238]&lt;&gt;&quot;○&quot;);MAX([.$C$3:.$C237])+1;[.$C237])" office:value-type="float" office:value="11" calcext:value-type="float">
            <text:p>11</text:p>
          </table:table-cell>
          <table:table-cell table:style-name="ce19"/>
          <table:table-cell table:style-name="ce27" table:formula="of:=IF(AND([.$F238]&lt;&gt;&quot;&quot;;[.$D237]&lt;&gt;&quot;&quot;);1;IF([.$F238]&lt;&gt;&quot;&quot;;MAX(INDIRECT([.$B238]):[.$E237])+1;&quot;&quot;))">
            <text:p/>
          </table:table-cell>
          <table:table-cell table:style-name="ce32"/>
          <table:table-cell table:style-name="ce32" table:formula="of:=IF([.$H238]=&quot;&quot;;&quot;&quot;;IF([.$G237]=&quot;&quot;;1;[.$G237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38]&lt;&gt;&quot;&quot;;NETWORKDAYS([.$L238];[.$M238];[$休日.$B$4:.$B$304]);&quot;&quot;)" office:value-type="float" office:value="1" calcext:value-type="float">
            <text:p>1</text:p>
          </table:table-cell>
          <table:table-cell table:style-name="ce274" office:value-type="float" office:value="100" calcext:value-type="float">
            <text:p>100</text:p>
          </table:table-cell>
          <table:table-cell table:style-name="ce63" table:formula="of:=IF(OR(AND([.$N238]=&quot;&quot;;[.$L238]&lt;&gt;&quot;&quot;;[.$L238]&lt;=[.$U$1]);AND([.$M238]&lt;&gt;&quot;&quot;;[.Q238]&lt;100;[.$M238]&lt;=[.$U$1]));&quot;遅延&quot;;&quot;&quot;)">
            <text:p/>
          </table:table-cell>
          <table:table-cell table:style-name="ce66"/>
          <table:table-cell table:style-name="ce66" table:formula="of:=SUM([.$V238:.$FM2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62])" office:value-type="string" office:string-value="E152" calcext:value-type="string">
            <text:p>E152</text:p>
          </table:table-cell>
          <table:table-cell table:style-name="ce13" table:formula="of:=IF(AND([.$D239]&lt;&gt;&quot;&quot;;[.$D239]&lt;&gt;&quot;○&quot;);MAX([.$C$3:.$C238])+1;[.$C238])" office:value-type="float" office:value="11" calcext:value-type="float">
            <text:p>11</text:p>
          </table:table-cell>
          <table:table-cell table:style-name="ce19"/>
          <table:table-cell table:style-name="ce27" table:formula="of:=IF(AND([.$F239]&lt;&gt;&quot;&quot;;[.$D238]&lt;&gt;&quot;&quot;);1;IF([.$F239]&lt;&gt;&quot;&quot;;MAX(INDIRECT([.$B239]):[.$E238])+1;&quot;&quot;))">
            <text:p/>
          </table:table-cell>
          <table:table-cell table:style-name="ce32"/>
          <table:table-cell table:style-name="ce32" table:formula="of:=IF([.$H239]=&quot;&quot;;&quot;&quot;;IF([.$G238]=&quot;&quot;;1;[.$G238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274" office:value-type="float" office:value="100" calcext:value-type="float">
            <text:p>10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63])" office:value-type="string" office:string-value="E152" calcext:value-type="string">
            <text:p>E152</text:p>
          </table:table-cell>
          <table:table-cell table:style-name="ce13" table:formula="of:=IF(AND([.$D240]&lt;&gt;&quot;&quot;;[.$D240]&lt;&gt;&quot;○&quot;);MAX([.$C$3:.$C239])+1;[.$C239])" office:value-type="float" office:value="11" calcext:value-type="float">
            <text:p>11</text:p>
          </table:table-cell>
          <table:table-cell table:style-name="ce19"/>
          <table:table-cell table:style-name="ce27" table:formula="of:=IF(AND([.$F240]&lt;&gt;&quot;&quot;;[.$D239]&lt;&gt;&quot;&quot;);1;IF([.$F240]&lt;&gt;&quot;&quot;;MAX(INDIRECT([.$B240]):[.$E239])+1;&quot;&quot;))">
            <text:p/>
          </table:table-cell>
          <table:table-cell table:style-name="ce32"/>
          <table:table-cell table:style-name="ce32" table:formula="of:=IF([.$H240]=&quot;&quot;;&quot;&quot;;IF([.$G239]=&quot;&quot;;1;[.$G239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1" calcext:value-type="date">
            <text:p>2026/06/21</text:p>
          </table:table-cell>
          <table:table-cell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274" office:value-type="float" office:value="100" calcext:value-type="float">
            <text:p>10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64])" office:value-type="string" office:string-value="E152" calcext:value-type="string">
            <text:p>E152</text:p>
          </table:table-cell>
          <table:table-cell table:style-name="ce13" table:formula="of:=IF(AND([.$D241]&lt;&gt;&quot;&quot;;[.$D241]&lt;&gt;&quot;○&quot;);MAX([.$C$3:.$C240])+1;[.$C240])" office:value-type="float" office:value="11" calcext:value-type="float">
            <text:p>11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1" calcext:value-type="date">
            <text:p>2026/06/21</text:p>
          </table:table-cell>
          <table:table-cell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274" office:value-type="float" office:value="100" calcext:value-type="float">
            <text:p>10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2]&lt;&gt;&quot;&quot;;[.$F242]=&quot;&quot;);&quot;E&quot;&amp;ROW();[.$B165])" office:value-type="string" office:string-value="E152" calcext:value-type="string">
            <text:p>E152</text:p>
          </table:table-cell>
          <table:table-cell table:style-name="ce13" table:formula="of:=IF(AND([.$D242]&lt;&gt;&quot;&quot;;[.$D242]&lt;&gt;&quot;○&quot;);MAX([.$C$3:.$C241])+1;[.$C241])" office:value-type="float" office:value="11" calcext:value-type="float">
            <text:p>11</text:p>
          </table:table-cell>
          <table:table-cell table:style-name="ce19"/>
          <table:table-cell table:style-name="ce27" table:formula="of:=IF(AND([.$F242]&lt;&gt;&quot;&quot;;[.$D241]&lt;&gt;&quot;&quot;);1;IF([.$F242]&lt;&gt;&quot;&quot;;MAX(INDIRECT([.$B242]):[.$E241])+1;&quot;&quot;))">
            <text:p/>
          </table:table-cell>
          <table:table-cell table:style-name="ce32"/>
          <table:table-cell table:style-name="ce32" table:formula="of:=IF([.$H242]=&quot;&quot;;&quot;&quot;;IF([.$G241]=&quot;&quot;;1;[.$G241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2]&lt;&gt;&quot;&quot;;NETWORKDAYS([.$L242];[.$M242];[$休日.$B$4:.$B$304]);&quot;&quot;)" office:value-type="float" office:value="1" calcext:value-type="float">
            <text:p>1</text:p>
          </table:table-cell>
          <table:table-cell table:style-name="ce274" office:value-type="float" office:value="100" calcext:value-type="float">
            <text:p>100</text:p>
          </table:table-cell>
          <table:table-cell table:style-name="ce63" table:formula="of:=IF(OR(AND([.$N242]=&quot;&quot;;[.$L242]&lt;&gt;&quot;&quot;;[.$L242]&lt;=[.$U$1]);AND([.$M242]&lt;&gt;&quot;&quot;;[.Q242]&lt;100;[.$M242]&lt;=[.$U$1]));&quot;遅延&quot;;&quot;&quot;)">
            <text:p/>
          </table:table-cell>
          <table:table-cell table:style-name="ce66"/>
          <table:table-cell table:style-name="ce66" table:formula="of:=SUM([.$V242:.$FM2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66])" office:value-type="string" office:string-value="E152" calcext:value-type="string">
            <text:p>E152</text:p>
          </table:table-cell>
          <table:table-cell table:style-name="ce13" table:formula="of:=IF(AND([.$D243]&lt;&gt;&quot;&quot;;[.$D243]&lt;&gt;&quot;○&quot;);MAX([.$C$3:.$C242])+1;[.$C242])" office:value-type="float" office:value="11" calcext:value-type="float">
            <text:p>11</text:p>
          </table:table-cell>
          <table:table-cell table:style-name="ce19"/>
          <table:table-cell table:style-name="ce27" table:formula="of:=IF(AND([.$F243]&lt;&gt;&quot;&quot;;[.$D242]&lt;&gt;&quot;&quot;);1;IF([.$F243]&lt;&gt;&quot;&quot;;MAX(INDIRECT([.$B243]):[.$E242])+1;&quot;&quot;))">
            <text:p/>
          </table:table-cell>
          <table:table-cell table:style-name="ce32"/>
          <table:table-cell table:style-name="ce32" table:formula="of:=IF([.$H243]=&quot;&quot;;&quot;&quot;;IF([.$G242]=&quot;&quot;;1;[.$G24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3]&lt;&gt;&quot;&quot;;NETWORKDAYS([.$L243];[.$M243];[$休日.$B$4:.$B$304]);&quot;&quot;)">
            <text:p/>
          </table:table-cell>
          <table:table-cell table:style-name="ce297"/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67])" office:value-type="string" office:string-value="E152" calcext:value-type="string">
            <text:p>E152</text:p>
          </table:table-cell>
          <table:table-cell table:style-name="ce13" table:formula="of:=IF(AND([.$D244]&lt;&gt;&quot;&quot;;[.$D244]&lt;&gt;&quot;○&quot;);MAX([.$C$3:.$C243])+1;[.$C243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44]=&quot;&quot;;&quot;&quot;;IF([.$G243]=&quot;&quot;;1;[.$G24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4]&lt;&gt;&quot;&quot;;NETWORKDAYS([.$L244];[.$M244];[$休日.$B$4:.$B$304]);&quot;&quot;)" office:value-type="float" office:value="1" calcext:value-type="float">
            <text:p>1</text:p>
          </table:table-cell>
          <table:table-cell table:style-name="ce277" office:value-type="float" office:value="100" calcext:value-type="float">
            <text:p>100</text:p>
          </table:table-cell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68])" office:value-type="string" office:string-value="E152" calcext:value-type="string">
            <text:p>E152</text:p>
          </table:table-cell>
          <table:table-cell table:style-name="ce13" table:formula="of:=IF(AND([.$D245]&lt;&gt;&quot;&quot;;[.$D245]&lt;&gt;&quot;○&quot;);MAX([.$C$3:.$C244])+1;[.$C244])" office:value-type="float" office:value="11" calcext:value-type="float">
            <text:p>11</text:p>
          </table:table-cell>
          <table:table-cell table:style-name="ce19"/>
          <table:table-cell table:style-name="ce27" table:formula="of:=IF(AND([.$F245]&lt;&gt;&quot;&quot;;[.$D244]&lt;&gt;&quot;&quot;);1;IF([.$F245]&lt;&gt;&quot;&quot;;MAX(INDIRECT([.$B245]):[.$E244])+1;&quot;&quot;))">
            <text:p/>
          </table:table-cell>
          <table:table-cell table:style-name="ce32"/>
          <table:table-cell table:style-name="ce32" table:formula="of:=IF([.$H245]=&quot;&quot;;&quot;&quot;;IF([.$G244]=&quot;&quot;;1;[.$G244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69])" office:value-type="string" office:string-value="E152" calcext:value-type="string">
            <text:p>E152</text:p>
          </table:table-cell>
          <table:table-cell table:style-name="ce13" table:formula="of:=IF(AND([.$D246]&lt;&gt;&quot;&quot;;[.$D246]&lt;&gt;&quot;○&quot;);MAX([.$C$3:.$C245])+1;[.$C245])" office:value-type="float" office:value="11" calcext:value-type="float">
            <text:p>11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6]&lt;&gt;&quot;&quot;;NETWORKDAYS([.$L246];[.$M24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70])" office:value-type="string" office:string-value="E152" calcext:value-type="string">
            <text:p>E152</text:p>
          </table:table-cell>
          <table:table-cell table:style-name="ce13" table:formula="of:=IF(AND([.$D247]&lt;&gt;&quot;&quot;;[.$D247]&lt;&gt;&quot;○&quot;);MAX([.$C$3:.$C246])+1;[.$C246])" office:value-type="float" office:value="11" calcext:value-type="float">
            <text:p>11</text:p>
          </table:table-cell>
          <table:table-cell table:style-name="ce19"/>
          <table:table-cell table:style-name="ce27" table:formula="of:=IF(AND([.$F247]&lt;&gt;&quot;&quot;;[.$D246]&lt;&gt;&quot;&quot;);1;IF([.$F247]&lt;&gt;&quot;&quot;;MAX(INDIRECT([.$B247]):[.$E246])+1;&quot;&quot;))">
            <text:p/>
          </table:table-cell>
          <table:table-cell table:style-name="ce32"/>
          <table:table-cell table:style-name="ce32" table:formula="of:=IF([.$H247]=&quot;&quot;;&quot;&quot;;IF([.$G246]=&quot;&quot;;1;[.$G246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71])" office:value-type="string" office:string-value="E152" calcext:value-type="string">
            <text:p>E152</text:p>
          </table:table-cell>
          <table:table-cell table:style-name="ce13" table:formula="of:=IF(AND([.$D248]&lt;&gt;&quot;&quot;;[.$D248]&lt;&gt;&quot;○&quot;);MAX([.$C$3:.$C247])+1;[.$C247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72])" office:value-type="string" office:string-value="E249" calcext:value-type="string">
            <text:p>E249</text:p>
          </table:table-cell>
          <table:table-cell table:style-name="ce13" table:formula="of:=IF(AND([.$D249]&lt;&gt;&quot;&quot;;[.$D249]&lt;&gt;&quot;○&quot;);MAX([.$C$3:.$C248])+1;[.$C248])" office:value-type="float" office:value="12" calcext:value-type="float">
            <text:p>12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49]&lt;&gt;&quot;&quot;;[.$D216]&lt;&gt;&quot;&quot;);1;IF([.$F249]&lt;&gt;&quot;&quot;;MAX(INDIRECT(#REF!):[.$E216])+1;&quot;&quot;))">
            <text:p/>
          </table:table-cell>
          <table:table-cell table:style-name="ce32"/>
          <table:table-cell table:style-name="ce32" table:formula="of:=IF([.$H249]=&quot;&quot;;&quot;&quot;;IF([.$G216]=&quot;&quot;;1;[.$G21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49]&lt;&gt;&quot;&quot;;NETWORKDAYS([.$L249];[.$M249];[$休日.$B$4:.$B$304]);&quot;&quot;)" office:value-type="float" office:value="1" calcext:value-type="float">
            <text:p>1</text:p>
          </table:table-cell>
          <table:table-cell table:style-name="ce281" office:value-type="float" office:value="100" calcext:value-type="float">
            <text:p>100</text:p>
          </table:table-cell>
          <table:table-cell table:style-name="ce63" table:formula="of:=IF(OR(AND([.$N249]=&quot;&quot;;[.$L249]&lt;&gt;&quot;&quot;;[.$L249]&lt;=[.$U$1]);AND([.$M249]&lt;&gt;&quot;&quot;;[.Q249]&lt;100;[.$M24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73])" office:value-type="string" office:string-value="E152" calcext:value-type="string">
            <text:p>E152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/>
          <table:table-cell table:style-name="ce27" table:formula="of:=IF(AND([.$F250]&lt;&gt;&quot;&quot;;[.$D249]&lt;&gt;&quot;&quot;);1;IF([.$F250]&lt;&gt;&quot;&quot;;MAX(INDIRECT(#REF!):[.$E249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50]=&quot;&quot;;&quot;&quot;;IF([.$G249]=&quot;&quot;;1;[.$G24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0]&lt;&gt;&quot;&quot;;NETWORKDAYS([.$L250];[.$M250];[$休日.$B$4:.$B$304]);&quot;&quot;)" office:value-type="float" office:value="1" calcext:value-type="float">
            <text:p>1</text:p>
          </table:table-cell>
          <table:table-cell table:style-name="ce281" office:value-type="float" office:value="100" calcext:value-type="float">
            <text:p>100</text:p>
          </table:table-cell>
          <table:table-cell table:style-name="ce63" table:formula="of:=IF(OR(AND([.$N250]=&quot;&quot;;[.$L250]&lt;&gt;&quot;&quot;;[.$L250]&lt;=[.$U$1]);AND([.$M250]&lt;&gt;&quot;&quot;;[.Q250]&lt;100;[.$M25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74])" office:value-type="string" office:string-value="E152" calcext:value-type="string">
            <text:p>E152</text:p>
          </table:table-cell>
          <table:table-cell table:style-name="ce13" table:formula="of:=IF(AND([.$D251]&lt;&gt;&quot;&quot;;[.$D251]&lt;&gt;&quot;○&quot;);MAX([.$C$3:.$C250])+1;[.$C250])" office:value-type="float" office:value="12" calcext:value-type="float">
            <text:p>12</text:p>
          </table:table-cell>
          <table:table-cell table:style-name="ce19"/>
          <table:table-cell table:style-name="ce27" table:formula="of:=IF(AND([.$F251]&lt;&gt;&quot;&quot;;[.$D250]&lt;&gt;&quot;&quot;);1;IF([.$F251]&lt;&gt;&quot;&quot;;MAX(INDIRECT(#REF!):[.$E250])+1;&quot;&quot;))">
            <text:p/>
          </table:table-cell>
          <table:table-cell table:style-name="ce32"/>
          <table:table-cell table:style-name="ce32" table:formula="of:=IF([.$H251]=&quot;&quot;;&quot;&quot;;IF([.$G250]=&quot;&quot;;1;[.$G250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1]&lt;&gt;&quot;&quot;;NETWORKDAYS([.$L251];[.$M251];[$休日.$B$4:.$B$304]);&quot;&quot;)" office:value-type="float" office:value="1" calcext:value-type="float">
            <text:p>1</text:p>
          </table:table-cell>
          <table:table-cell table:style-name="ce281" office:value-type="float" office:value="100" calcext:value-type="float">
            <text:p>10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75])" office:value-type="string" office:string-value="E152" calcext:value-type="string">
            <text:p>E152</text:p>
          </table:table-cell>
          <table:table-cell table:style-name="ce13" table:formula="of:=IF(AND([.$D252]&lt;&gt;&quot;&quot;;[.$D252]&lt;&gt;&quot;○&quot;);MAX([.$C$3:.$C251])+1;[.$C251])" office:value-type="float" office:value="12" calcext:value-type="float">
            <text:p>12</text:p>
          </table:table-cell>
          <table:table-cell table:style-name="ce19"/>
          <table:table-cell table:style-name="ce27" table:formula="of:=IF(AND([.$F252]&lt;&gt;&quot;&quot;;[.$D251]&lt;&gt;&quot;&quot;);1;IF([.$F252]&lt;&gt;&quot;&quot;;MAX(INDIRECT(#REF!):[.$E251])+1;&quot;&quot;))">
            <text:p/>
          </table:table-cell>
          <table:table-cell table:style-name="ce32"/>
          <table:table-cell table:style-name="ce32" table:formula="of:=IF([.$H252]=&quot;&quot;;&quot;&quot;;IF([.$G251]=&quot;&quot;;1;[.$G251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2]&lt;&gt;&quot;&quot;;NETWORKDAYS([.$L252];[.$M252];[$休日.$B$4:.$B$304]);&quot;&quot;)" office:value-type="float" office:value="1" calcext:value-type="float">
            <text:p>1</text:p>
          </table:table-cell>
          <table:table-cell table:style-name="ce281" office:value-type="float" office:value="100" calcext:value-type="float">
            <text:p>10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76])" office:value-type="string" office:string-value="E152" calcext:value-type="string">
            <text:p>E152</text:p>
          </table:table-cell>
          <table:table-cell table:style-name="ce13" table:formula="of:=IF(AND([.$D253]&lt;&gt;&quot;&quot;;[.$D253]&lt;&gt;&quot;○&quot;);MAX([.$C$3:.$C252])+1;[.$C252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53]=&quot;&quot;;&quot;&quot;;IF([.$G252]=&quot;&quot;;1;[.$G25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53]&lt;&gt;&quot;&quot;;NETWORKDAYS([.$L253];[.$M253];[$休日.$B$4:.$B$304]);&quot;&quot;)" office:value-type="float" office:value="1" calcext:value-type="float">
            <text:p>1</text:p>
          </table:table-cell>
          <table:table-cell table:style-name="ce281" office:value-type="float" office:value="100" calcext:value-type="float">
            <text:p>10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77])" office:value-type="string" office:string-value="E152" calcext:value-type="string">
            <text:p>E152</text:p>
          </table:table-cell>
          <table:table-cell table:style-name="ce13" table:formula="of:=IF(AND([.$D254]&lt;&gt;&quot;&quot;;[.$D254]&lt;&gt;&quot;○&quot;);MAX([.$C$3:.$C253])+1;[.$C253])" office:value-type="float" office:value="12" calcext:value-type="float">
            <text:p>12</text:p>
          </table:table-cell>
          <table:table-cell table:style-name="ce19"/>
          <table:table-cell table:style-name="ce27" table:formula="of:=IF(AND([.$F254]&lt;&gt;&quot;&quot;;[.$D253]&lt;&gt;&quot;&quot;);1;IF([.$F254]&lt;&gt;&quot;&quot;;MAX(INDIRECT(#REF!):[.$E253])+1;&quot;&quot;))">
            <text:p/>
          </table:table-cell>
          <table:table-cell table:style-name="ce32"/>
          <table:table-cell table:style-name="ce32" table:formula="of:=IF([.$H254]=&quot;&quot;;&quot;&quot;;IF([.$G253]=&quot;&quot;;1;[.$G253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281" office:value-type="float" office:value="100" calcext:value-type="float">
            <text:p>10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78])" office:value-type="string" office:string-value="E152" calcext:value-type="string">
            <text:p>E152</text:p>
          </table:table-cell>
          <table:table-cell table:style-name="ce13" table:formula="of:=IF(AND([.$D255]&lt;&gt;&quot;&quot;;[.$D255]&lt;&gt;&quot;○&quot;);MAX([.$C$3:.$C254])+1;[.$C254])" office:value-type="float" office:value="12" calcext:value-type="float">
            <text:p>12</text:p>
          </table:table-cell>
          <table:table-cell table:style-name="ce19"/>
          <table:table-cell table:style-name="ce27" table:formula="of:=IF(AND([.$F255]&lt;&gt;&quot;&quot;;[.$D254]&lt;&gt;&quot;&quot;);1;IF([.$F255]&lt;&gt;&quot;&quot;;MAX(INDIRECT(#REF!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春山、伊藤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55]&lt;&gt;&quot;&quot;;NETWORKDAYS([.$L255];[.$M255];[$休日.$B$4:.$B$304]);&quot;&quot;)" office:value-type="float" office:value="1" calcext:value-type="float">
            <text:p>1</text:p>
          </table:table-cell>
          <table:table-cell table:style-name="ce281" office:value-type="float" office:value="100" calcext:value-type="float">
            <text:p>10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79])" office:value-type="string" office:string-value="E152" calcext:value-type="string">
            <text:p>E152</text:p>
          </table:table-cell>
          <table:table-cell table:style-name="ce13" table:formula="of:=IF(AND([.$D256]&lt;&gt;&quot;&quot;;[.$D256]&lt;&gt;&quot;○&quot;);MAX([.$C$3:.$C255])+1;[.$C255])" office:value-type="float" office:value="12" calcext:value-type="float">
            <text:p>12</text:p>
          </table:table-cell>
          <table:table-cell table:style-name="ce19"/>
          <table:table-cell table:style-name="ce27" table:formula="of:=IF(AND([.$F256]&lt;&gt;&quot;&quot;;[.$D255]&lt;&gt;&quot;&quot;);1;IF([.$F256]&lt;&gt;&quot;&quot;;MAX(INDIRECT(#REF!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6]&lt;&gt;&quot;&quot;;NETWORKDAYS([.$L256];[.$M256];[$休日.$B$4:.$B$304]);&quot;&quot;)" office:value-type="float" office:value="1" calcext:value-type="float">
            <text:p>1</text:p>
          </table:table-cell>
          <table:table-cell table:style-name="ce281" office:value-type="float" office:value="100" calcext:value-type="float">
            <text:p>10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80])" office:value-type="string" office:string-value="E152" calcext:value-type="string">
            <text:p>E152</text:p>
          </table:table-cell>
          <table:table-cell table:style-name="ce13" table:formula="of:=IF(AND([.$D257]&lt;&gt;&quot;&quot;;[.$D257]&lt;&gt;&quot;○&quot;);MAX([.$C$3:.$C256])+1;[.$C256])" office:value-type="float" office:value="12" calcext:value-type="float">
            <text:p>12</text:p>
          </table:table-cell>
          <table:table-cell table:style-name="ce19"/>
          <table:table-cell table:style-name="ce27" table:formula="of:=IF(AND([.$F257]&lt;&gt;&quot;&quot;;[.$D256]&lt;&gt;&quot;&quot;);1;IF([.$F257]&lt;&gt;&quot;&quot;;MAX(INDIRECT(#REF!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7]&lt;&gt;&quot;&quot;;NETWORKDAYS([.$L257];[.$M257];[$休日.$B$4:.$B$304]);&quot;&quot;)" office:value-type="float" office:value="1" calcext:value-type="float">
            <text:p>1</text:p>
          </table:table-cell>
          <table:table-cell table:style-name="ce281" office:value-type="float" office:value="100" calcext:value-type="float">
            <text:p>10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81])" office:value-type="string" office:string-value="E152" calcext:value-type="string">
            <text:p>E152</text:p>
          </table:table-cell>
          <table:table-cell table:style-name="ce13" table:formula="of:=IF(AND([.$D258]&lt;&gt;&quot;&quot;;[.$D258]&lt;&gt;&quot;○&quot;);MAX([.$C$3:.$C257])+1;[.$C257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58]=&quot;&quot;;&quot;&quot;;IF([.$G257]=&quot;&quot;;1;[.$G25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8]&lt;&gt;&quot;&quot;;NETWORKDAYS([.$L258];[.$M258];[$休日.$B$4:.$B$304]);&quot;&quot;)" office:value-type="float" office:value="1" calcext:value-type="float">
            <text:p>1</text:p>
          </table:table-cell>
          <table:table-cell table:style-name="ce281" office:value-type="float" office:value="100" calcext:value-type="float">
            <text:p>10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82])" office:value-type="string" office:string-value="E152" calcext:value-type="string">
            <text:p>E152</text:p>
          </table:table-cell>
          <table:table-cell table:style-name="ce13" table:formula="of:=IF(AND([.$D259]&lt;&gt;&quot;&quot;;[.$D259]&lt;&gt;&quot;○&quot;);MAX([.$C$3:.$C258])+1;[.$C258])" office:value-type="float" office:value="12" calcext:value-type="float">
            <text:p>12</text:p>
          </table:table-cell>
          <table:table-cell table:style-name="ce19"/>
          <table:table-cell table:style-name="ce27" table:formula="of:=IF(AND([.$F259]&lt;&gt;&quot;&quot;;[.$D258]&lt;&gt;&quot;&quot;);1;IF([.$F259]&lt;&gt;&quot;&quot;;MAX(INDIRECT(#REF!):[.$E258])+1;&quot;&quot;))">
            <text:p/>
          </table:table-cell>
          <table:table-cell table:style-name="ce32"/>
          <table:table-cell table:style-name="ce32" table:formula="of:=IF([.$H259]=&quot;&quot;;&quot;&quot;;IF([.$G258]=&quot;&quot;;1;[.$G258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9]&lt;&gt;&quot;&quot;;NETWORKDAYS([.$L259];[.$M259];[$休日.$B$4:.$B$304]);&quot;&quot;)" office:value-type="float" office:value="1" calcext:value-type="float">
            <text:p>1</text:p>
          </table:table-cell>
          <table:table-cell table:style-name="ce281" office:value-type="float" office:value="100" calcext:value-type="float">
            <text:p>100</text:p>
          </table:table-cell>
          <table:table-cell table:style-name="ce63" table:formula="of:=IF(OR(AND([.$N259]=&quot;&quot;;[.$L259]&lt;&gt;&quot;&quot;;[.$L259]&lt;=[.$U$1]);AND([.$M259]&lt;&gt;&quot;&quot;;[.Q259]&lt;100;[.$M25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83])" office:value-type="string" office:string-value="E152" calcext:value-type="string">
            <text:p>E152</text:p>
          </table:table-cell>
          <table:table-cell table:style-name="ce13" table:formula="of:=IF(AND([.$D260]&lt;&gt;&quot;&quot;;[.$D260]&lt;&gt;&quot;○&quot;);MAX([.$C$3:.$C259])+1;[.$C259])" office:value-type="float" office:value="12" calcext:value-type="float">
            <text:p>12</text:p>
          </table:table-cell>
          <table:table-cell table:style-name="ce19"/>
          <table:table-cell table:style-name="ce27" table:formula="of:=IF(AND([.$F260]&lt;&gt;&quot;&quot;;[.$D259]&lt;&gt;&quot;&quot;);1;IF([.$F260]&lt;&gt;&quot;&quot;;MAX(INDIRECT(#REF!):[.$E259])+1;&quot;&quot;))">
            <text:p/>
          </table:table-cell>
          <table:table-cell table:style-name="ce32"/>
          <table:table-cell table:style-name="ce32" table:formula="of:=IF([.$H260]=&quot;&quot;;&quot;&quot;;IF([.$G259]=&quot;&quot;;1;[.$G259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281" office:value-type="float" office:value="100" calcext:value-type="float">
            <text:p>10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84])" office:value-type="string" office:string-value="E152" calcext:value-type="string">
            <text:p>E152</text:p>
          </table:table-cell>
          <table:table-cell table:style-name="ce13" table:formula="of:=IF(AND([.$D261]&lt;&gt;&quot;&quot;;[.$D261]&lt;&gt;&quot;○&quot;);MAX([.$C$3:.$C260])+1;[.$C260])" office:value-type="float" office:value="12" calcext:value-type="float">
            <text:p>12</text:p>
          </table:table-cell>
          <table:table-cell table:style-name="ce19"/>
          <table:table-cell table:style-name="ce27" table:formula="of:=IF(AND([.$F261]&lt;&gt;&quot;&quot;;[.$D260]&lt;&gt;&quot;&quot;);1;IF([.$F261]&lt;&gt;&quot;&quot;;MAX(INDIRECT(#REF!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61]&lt;&gt;&quot;&quot;;NETWORKDAYS([.$L261];[.$M261];[$休日.$B$4:.$B$304]);&quot;&quot;)" office:value-type="float" office:value="1" calcext:value-type="float">
            <text:p>1</text:p>
          </table:table-cell>
          <table:table-cell table:style-name="ce281" office:value-type="float" office:value="100" calcext:value-type="float">
            <text:p>10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2]&lt;&gt;&quot;&quot;;[.$F262]=&quot;&quot;);&quot;E&quot;&amp;ROW();[.$B185])" office:value-type="string" office:string-value="E262" calcext:value-type="string">
            <text:p>E262</text:p>
          </table:table-cell>
          <table:table-cell table:style-name="ce13" table:formula="of:=IF(AND([.$D262]&lt;&gt;&quot;&quot;;[.$D262]&lt;&gt;&quot;○&quot;);MAX([.$C$3:.$C261])+1;[.$C261])" office:value-type="float" office:value="13" calcext:value-type="float">
            <text:p>13</text:p>
          </table:table-cell>
          <table:table-cell table:style-name="ce19" office:value-type="string" calcext:value-type="string">
            <text:p>デプロイ後テスト</text:p>
          </table:table-cell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 table:formula="of:=IF([.$L262]&lt;&gt;&quot;&quot;;NETWORKDAYS([.$L262];[.$M262];[$休日.$B$4:.$B$304]);&quot;&quot;)">
            <text:p/>
          </table:table-cell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Default"/>
          <table:table-cell table:style-name="ce27"/>
          <table:table-cell table:style-name="ce124" office:value-type="string" calcext:value-type="string">
            <text:p>バグ探し兼URLテスト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 table:formula="of:=IF([.$L263]&lt;&gt;&quot;&quot;;NETWORKDAYS([.$L263];[.$M263];[$休日.$B$4:.$B$304]);&quot;&quot;)" office:value-type="float" office:value="3" calcext:value-type="float">
            <text:p>3</text:p>
          </table:table-cell>
          <table:table-cell table:style-name="ce282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URLテス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 table:formula="of:=IF([.$L264]&lt;&gt;&quot;&quot;;NETWORKDAYS([.$L264];[.$M264];[$休日.$B$4:.$B$304]);&quot;&quot;)" office:value-type="float" office:value="3" calcext:value-type="float">
            <text:p>3</text:p>
          </table:table-cell>
          <table:table-cell table:style-name="ce282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バグ探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 table:formula="of:=IF([.$L265]&lt;&gt;&quot;&quot;;NETWORKDAYS([.$L265];[.$M265];[$休日.$B$4:.$B$304]);&quot;&quot;)" office:value-type="float" office:value="3" calcext:value-type="float">
            <text:p>3</text:p>
          </table:table-cell>
          <table:table-cell table:style-name="ce282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バグ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 table:formula="of:=IF([.$L266]&lt;&gt;&quot;&quot;;NETWORKDAYS([.$L266];[.$M266];[$休日.$B$4:.$B$304]);&quot;&quot;)" office:value-type="float" office:value="3" calcext:value-type="float">
            <text:p>3</text:p>
          </table:table-cell>
          <table:table-cell table:style-name="ce282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8]&lt;&gt;&quot;&quot;;[.$F268]=&quot;&quot;);&quot;E&quot;&amp;ROW();[.$B187])" office:value-type="string" office:string-value="E268" calcext:value-type="string">
            <text:p>E268</text:p>
          </table:table-cell>
          <table:table-cell table:style-name="ce13" table:formula="of:=IF(AND([.$D268]&lt;&gt;&quot;&quot;;[.$D268]&lt;&gt;&quot;○&quot;);MAX([.$C$3:.$C267])+1;[.$C267])" office:value-type="float" office:value="14" calcext:value-type="float">
            <text:p>14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68]&lt;&gt;&quot;&quot;;[.$D267]&lt;&gt;&quot;&quot;);1;IF([.$F268]&lt;&gt;&quot;&quot;;MAX(INDIRECT([.$B268]):[.$E267])+1;&quot;&quot;))">
            <text:p/>
          </table:table-cell>
          <table:table-cell table:style-name="ce32"/>
          <table:table-cell table:style-name="ce32" table:formula="of:=IF([.$H268]=&quot;&quot;;&quot;&quot;;IF([.$G267]=&quot;&quot;;1;[.$G2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2" table:formula="of:=IF([.$L268]&lt;&gt;&quot;&quot;;NETWORKDAYS([.$L268];[.$M268];[$休日.$B$4:.$B$304]);&quot;&quot;)" office:value-type="float" office:value="3" calcext:value-type="float">
            <text:p>3</text:p>
          </table:table-cell>
          <table:table-cell table:style-name="ce285" office:value-type="float" office:value="100" calcext:value-type="float">
            <text:p>100</text:p>
          </table:table-cell>
          <table:table-cell table:style-name="ce63" table:formula="of:=IF(OR(AND([.$N268]=&quot;&quot;;[.$L268]&lt;&gt;&quot;&quot;;[.$L268]&lt;=[.$U$1]);AND([.$M268]&lt;&gt;&quot;&quot;;[.Q268]&lt;100;[.$M268]&lt;=[.$U$1]));&quot;遅延&quot;;&quot;&quot;)">
            <text:p/>
          </table:table-cell>
          <table:table-cell table:style-name="ce66"/>
          <table:table-cell table:style-name="ce66" table:formula="of:=SUM([.$V268:.$FM2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88])" office:value-type="string" office:string-value="E152" calcext:value-type="string">
            <text:p>E152</text:p>
          </table:table-cell>
          <table:table-cell table:style-name="ce13" table:formula="of:=IF(AND([.$D269]&lt;&gt;&quot;&quot;;[.$D269]&lt;&gt;&quot;○&quot;);MAX([.$C$3:.$C268])+1;[.$C268])" office:value-type="float" office:value="14" calcext:value-type="float">
            <text:p>14</text:p>
          </table:table-cell>
          <table:table-cell table:style-name="ce19"/>
          <table:table-cell table:style-name="ce27" table:formula="of:=IF(AND([.$F269]&lt;&gt;&quot;&quot;;[.$D268]&lt;&gt;&quot;&quot;);1;IF([.$F269]&lt;&gt;&quot;&quot;;MAX(INDIRECT([.$B269]):[.$E268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69]=&quot;&quot;;&quot;&quot;;IF([.$G268]=&quot;&quot;;1;[.$G268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2" table:formula="of:=IF([.$L269]&lt;&gt;&quot;&quot;;NETWORKDAYS([.$L269];[.$M269];[$休日.$B$4:.$B$304]);&quot;&quot;)" office:value-type="float" office:value="2" calcext:value-type="float">
            <text:p>2</text:p>
          </table:table-cell>
          <table:table-cell table:style-name="ce285" office:value-type="float" office:value="100" calcext:value-type="float">
            <text:p>10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89])" office:value-type="string" office:string-value="E90" calcext:value-type="string">
            <text:p>E90</text:p>
          </table:table-cell>
          <table:table-cell table:style-name="ce13" table:formula="of:=IF(AND([.$D270]&lt;&gt;&quot;&quot;;[.$D270]&lt;&gt;&quot;○&quot;);MAX([.$C$3:.$C269])+1;[.$C269])" office:value-type="float" office:value="14" calcext:value-type="float">
            <text:p>14</text:p>
          </table:table-cell>
          <table:table-cell table:style-name="ce19"/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32"/>
          <table:table-cell table:style-name="ce32" table:formula="of:=IF([.$H270]=&quot;&quot;;&quot;&quot;;IF([.$G269]=&quot;&quot;;1;[.$G269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number-columns-repeated="2" table:style-name="ce38" office:value-type="date" office:date-value="2026-06-25" calcext:value-type="date">
            <text:p>2026/06/25</text:p>
          </table:table-cell>
          <table:table-cell table:style-name="ce32" table:formula="of:=IF([.$L270]&lt;&gt;&quot;&quot;;NETWORKDAYS([.$L270];[.$M270];[$休日.$B$4:.$B$304]);&quot;&quot;)" office:value-type="float" office:value="1" calcext:value-type="float">
            <text:p>1</text:p>
          </table:table-cell>
          <table:table-cell table:style-name="ce285" office:value-type="float" office:value="100" calcext:value-type="float">
            <text:p>10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66"/>
          <table:table-cell table:style-name="ce66" table:formula="of:=SUM([.$V270:.$FM2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90])" office:value-type="string" office:string-value="E90" calcext:value-type="string">
            <text:p>E90</text:p>
          </table:table-cell>
          <table:table-cell table:style-name="ce13" table:formula="of:=IF(AND([.$D271]&lt;&gt;&quot;&quot;;[.$D271]&lt;&gt;&quot;○&quot;);MAX([.$C$3:.$C270])+1;[.$C270])" office:value-type="float" office:value="14" calcext:value-type="float">
            <text:p>14</text:p>
          </table:table-cell>
          <table:table-cell table:style-name="ce19"/>
          <table:table-cell table:style-name="ce27" table:formula="of:=IF(AND([.$F271]&lt;&gt;&quot;&quot;;[.$D270]&lt;&gt;&quot;&quot;);1;IF([.$F271]&lt;&gt;&quot;&quot;;MAX(INDIRECT([.$B271]):[.$E270])+1;&quot;&quot;))">
            <text:p/>
          </table:table-cell>
          <table:table-cell table:style-name="ce32"/>
          <table:table-cell table:style-name="ce32" table:formula="of:=IF([.$H271]=&quot;&quot;;&quot;&quot;;IF([.$G270]=&quot;&quot;;1;[.$G270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table:formula="of:=IF([.$L271]&lt;&gt;&quot;&quot;;NETWORKDAYS([.$L271];[.$M271];[$休日.$B$4:.$B$304]);&quot;&quot;)" office:value-type="float" office:value="1" calcext:value-type="float">
            <text:p>1</text:p>
          </table:table-cell>
          <table:table-cell table:style-name="ce285" office:value-type="float" office:value="100" calcext:value-type="float">
            <text:p>100</text:p>
          </table:table-cell>
          <table:table-cell table:style-name="ce63" table:formula="of:=IF(OR(AND([.$N271]=&quot;&quot;;[.$L271]&lt;&gt;&quot;&quot;;[.$L271]&lt;=[.$U$1]);AND([.$M271]&lt;&gt;&quot;&quot;;[.Q271]&lt;100;[.$M271]&lt;=[.$U$1]));&quot;遅延&quot;;&quot;&quot;)">
            <text:p/>
          </table:table-cell>
          <table:table-cell table:style-name="ce66"/>
          <table:table-cell table:style-name="ce66" table:formula="of:=SUM([.$V271:.$FM2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91])" office:value-type="string" office:string-value="E90" calcext:value-type="string">
            <text:p>E90</text:p>
          </table:table-cell>
          <table:table-cell table:style-name="ce13" table:formula="of:=IF(AND([.$D272]&lt;&gt;&quot;&quot;;[.$D272]&lt;&gt;&quot;○&quot;);MAX([.$C$3:.$C271])+1;[.$C271])" office:value-type="float" office:value="14" calcext:value-type="float">
            <text:p>14</text:p>
          </table:table-cell>
          <table:table-cell table:style-name="ce19"/>
          <table:table-cell table:style-name="ce27" table:formula="of:=IF(AND([.$F272]&lt;&gt;&quot;&quot;;[.$D271]&lt;&gt;&quot;&quot;);1;IF([.$F272]&lt;&gt;&quot;&quot;;MAX(INDIRECT([.$B272]):[.$E271])+1;&quot;&quot;))">
            <text:p/>
          </table:table-cell>
          <table:table-cell table:style-name="ce32"/>
          <table:table-cell table:style-name="ce32" table:formula="of:=IF([.$H272]=&quot;&quot;;&quot;&quot;;IF([.$G271]=&quot;&quot;;1;[.$G271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 table:formula="of:=IF([.$L272]&lt;&gt;&quot;&quot;;NETWORKDAYS([.$L272];[.$M272];[$休日.$B$4:.$B$304]);&quot;&quot;)" office:value-type="float" office:value="2" calcext:value-type="float">
            <text:p>2</text:p>
          </table:table-cell>
          <table:table-cell table:style-name="ce285" office:value-type="float" office:value="100" calcext:value-type="float">
            <text:p>100</text:p>
          </table:table-cell>
          <table:table-cell table:style-name="ce63" table:formula="of:=IF(OR(AND([.$N272]=&quot;&quot;;[.$L272]&lt;&gt;&quot;&quot;;[.$L272]&lt;=[.$U$1]);AND([.$M272]&lt;&gt;&quot;&quot;;[.Q272]&lt;100;[.$M272]&lt;=[.$U$1]));&quot;遅延&quot;;&quot;&quot;)">
            <text:p/>
          </table:table-cell>
          <table:table-cell table:style-name="ce66"/>
          <table:table-cell table:style-name="ce66" table:formula="of:=SUM([.$V272:.$FM2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92])" office:value-type="string" office:string-value="E114" calcext:value-type="string">
            <text:p>E114</text:p>
          </table:table-cell>
          <table:table-cell table:style-name="ce13" table:formula="of:=IF(AND([.$D273]&lt;&gt;&quot;&quot;;[.$D273]&lt;&gt;&quot;○&quot;);MAX([.$C$3:.$C272])+1;[.$C272])" office:value-type="float" office:value="14" calcext:value-type="float">
            <text:p>14</text:p>
          </table:table-cell>
          <table:table-cell table:style-name="ce19"/>
          <table:table-cell table:style-name="ce27" table:formula="of:=IF(AND([.$F273]&lt;&gt;&quot;&quot;;[.$D272]&lt;&gt;&quot;&quot;);1;IF([.$F273]&lt;&gt;&quot;&quot;;MAX(INDIRECT([.$B273]):[.$E272])+1;&quot;&quot;))">
            <text:p/>
          </table:table-cell>
          <table:table-cell table:style-name="ce32"/>
          <table:table-cell table:style-name="ce32" table:formula="of:=IF([.$H273]=&quot;&quot;;&quot;&quot;;IF([.$G272]=&quot;&quot;;1;[.$G272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 table:formula="of:=IF([.$L273]&lt;&gt;&quot;&quot;;NETWORKDAYS([.$L273];[.$M273];[$休日.$B$4:.$B$304]);&quot;&quot;)" office:value-type="float" office:value="2" calcext:value-type="float">
            <text:p>2</text:p>
          </table:table-cell>
          <table:table-cell table:style-name="ce285" office:value-type="float" office:value="100" calcext:value-type="float">
            <text:p>10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F274]=&quot;&quot;);&quot;E&quot;&amp;ROW();[.$B193])" office:value-type="string" office:string-value="E114" calcext:value-type="string">
            <text:p>E114</text:p>
          </table:table-cell>
          <table:table-cell table:style-name="ce13" table:formula="of:=IF(AND([.$D274]&lt;&gt;&quot;&quot;;[.$D274]&lt;&gt;&quot;○&quot;);MAX([.$C$3:.$C273])+1;[.$C273])" office:value-type="float" office:value="14" calcext:value-type="float">
            <text:p>14</text:p>
          </table:table-cell>
          <table:table-cell table:style-name="ce18"/>
          <table:table-cell table:style-name="ce27" table:formula="of:=IF(AND([.$F274]&lt;&gt;&quot;&quot;;[.$D273]&lt;&gt;&quot;&quot;);1;IF([.$F274]&lt;&gt;&quot;&quot;;MAX(INDIRECT([.$B274]):[.$E273])+1;&quot;&quot;))">
            <text:p/>
          </table:table-cell>
          <table:table-cell table:style-name="ce18"/>
          <table:table-cell table:style-name="ce30" table:formula="of:=IF([.$H274]=&quot;&quot;;&quot;&quot;;IF([.$G273]=&quot;&quot;;1;[.$G273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number-columns-repeated="3" table:style-name="ce38" office:value-type="date" office:date-value="2026-06-25" calcext:value-type="date">
            <text:p>2026/06/25</text:p>
          </table:table-cell>
          <table:table-cell table:style-name="ce18" table:formula="of:=IF([.$L274]&lt;&gt;&quot;&quot;;NETWORKDAYS([.$L274];[.$M274];[$休日.$B$4:.$B$304]);&quot;&quot;)" office:value-type="float" office:value="2" calcext:value-type="float">
            <text:p>2</text:p>
          </table:table-cell>
          <table:table-cell table:style-name="ce285" office:value-type="float" office:value="100" calcext:value-type="float">
            <text:p>10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18"/>
          <table:table-cell table:style-name="ce18" table:formula="of:=SUM([.$V274:.$FM274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94])" office:value-type="string" office:string-value="E114" calcext:value-type="string">
            <text:p>E114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18"/>
          <table:table-cell table:style-name="ce27" table:formula="of:=IF(AND([.$F275]&lt;&gt;&quot;&quot;;[.$D274]&lt;&gt;&quot;&quot;);1;IF([.$F275]&lt;&gt;&quot;&quot;;MAX(INDIRECT([.$B275]):[.$E274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216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8"/>
          <table:table-cell table:style-name="ce27"/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216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195])" office:value-type="string" office:string-value="E195" calcext:value-type="string">
            <text:p>E195</text:p>
          </table:table-cell>
          <table:table-cell table:style-name="ce13" table:formula="of:=IF(AND([.$D277]&lt;&gt;&quot;&quot;;[.$D277]&lt;&gt;&quot;○&quot;);MAX([.$C$3:.$C275])+1;[.$C275])" office:value-type="float" office:value="14" calcext:value-type="float">
            <text:p>14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77]=&quot;&quot;;&quot;&quot;;IF([.$G273]=&quot;&quot;;1;[.$G2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2" table:formula="of:=IF([.$L277]&lt;&gt;&quot;&quot;;NETWORKDAYS([.$L277];[.$M277];[$休日.$B$4:.$B$304]);&quot;&quot;)" office:value-type="float" office:value="1" calcext:value-type="float">
            <text:p>1</text:p>
          </table:table-cell>
          <table:table-cell table:style-name="ce287" office:value-type="float" office:value="100" calcext:value-type="float">
            <text:p>100</text:p>
          </table:table-cell>
          <table:table-cell table:style-name="ce63" table:formula="of:=IF(OR(AND([.$N277]=&quot;&quot;;[.$L277]&lt;&gt;&quot;&quot;;[.$L277]&lt;=[.$U$1]);AND([.$M277]&lt;&gt;&quot;&quot;;[.Q277]&lt;100;[.$M277]&lt;=[.$U$1]));&quot;遅延&quot;;&quot;&quot;)">
            <text:p/>
          </table:table-cell>
          <table:table-cell table:style-name="ce66"/>
          <table:table-cell table:style-name="ce66" table:formula="of:=SUM([.$V277:.$FM277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8]&lt;&gt;&quot;&quot;;[.$F278]=&quot;&quot;);&quot;E&quot;&amp;ROW();[.$B196])" office:value-type="string" office:string-value="E114" calcext:value-type="string">
            <text:p>E114</text:p>
          </table:table-cell>
          <table:table-cell table:style-name="ce13" table:formula="of:=IF(AND([.$D278]&lt;&gt;&quot;&quot;;[.$D278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table:formula="of:=IF(AND([.$F278]&lt;&gt;&quot;&quot;;[.$D277]&lt;&gt;&quot;&quot;);1;IF([.$F278]&lt;&gt;&quot;&quot;;MAX(INDIRECT([.$B278]):[.$E277])+1;&quot;&quot;))">
            <text:p/>
          </table:table-cell>
          <table:table-cell table:style-name="ce32"/>
          <table:table-cell table:style-name="ce32" table:formula="of:=IF([.$H278]=&quot;&quot;;&quot;&quot;;IF([.$G277]=&quot;&quot;;1;[.$G2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8]&lt;&gt;&quot;&quot;;NETWORKDAYS([.$L278];[.$M278];[$休日.$B$4:.$B$304]);&quot;&quot;)">
            <text:p/>
          </table:table-cell>
          <table:table-cell table:style-name="ce32" table:formula="of:=IF([.$L278]&lt;&gt;&quot;&quot;;NETWORKDAYS([.$L278];[.$M278];[$休日.$B$4:.$B$304]);&quot;&quot;)">
            <text:p/>
          </table:table-cell>
          <table:table-cell table:style-name="ce63" table:formula="of:=IF(OR(AND([.$N278]=&quot;&quot;;[.$L278]&lt;&gt;&quot;&quot;;[.$L278]&lt;=[.$U$1]);AND([.$M278]&lt;&gt;&quot;&quot;;[.Q278]&lt;100;[.$M278]&lt;=[.$U$1]));&quot;遅延&quot;;&quot;&quot;)">
            <text:p/>
          </table:table-cell>
          <table:table-cell table:style-name="ce66"/>
          <table:table-cell table:style-name="ce66" table:formula="of:=SUM([.$V278:.$FM2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197])" office:value-type="string" office:string-value="E279" calcext:value-type="string">
            <text:p>E279</text:p>
          </table:table-cell>
          <table:table-cell table:style-name="ce13" table:formula="of:=IF(AND([.$D279]&lt;&gt;&quot;&quot;;[.$D279]&lt;&gt;&quot;○&quot;);MAX([.$C$3:.$C278])+1;[.$C278])" office:value-type="float" office:value="15" calcext:value-type="float">
            <text:p>15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79]=&quot;&quot;;&quot;&quot;;IF([.$G278]=&quot;&quot;;1;[.$G278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29" calcext:value-type="date">
            <text:p>2026/06/29</text:p>
          </table:table-cell>
          <table:table-cell table:style-name="ce32" table:formula="of:=IF([.$L279]&lt;&gt;&quot;&quot;;NETWORKDAYS([.$L279];[.$M279];[$休日.$B$4:.$B$304]);&quot;&quot;)" office:value-type="float" office:value="1" calcext:value-type="float">
            <text:p>1</text:p>
          </table:table-cell>
          <table:table-cell table:style-name="ce290" office:value-type="float" office:value="100" calcext:value-type="float">
            <text:p>10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198])" office:value-type="string" office:string-value="E114" calcext:value-type="string">
            <text:p>E114</text:p>
          </table:table-cell>
          <table:table-cell table:style-name="ce13" table:formula="of:=IF(AND([.$D280]&lt;&gt;&quot;&quot;;[.$D280]&lt;&gt;&quot;○&quot;);MAX([.$C$3:.$C279])+1;[.$C279])" office:value-type="float" office:value="15" calcext:value-type="float">
            <text:p>15</text:p>
          </table:table-cell>
          <table:table-cell table:style-name="ce19"/>
          <table:table-cell table:style-name="ce27" table:formula="of:=IF(AND([.$F280]&lt;&gt;&quot;&quot;;[.$D279]&lt;&gt;&quot;&quot;);1;IF([.$F280]&lt;&gt;&quot;&quot;;MAX(INDIRECT([.$B280]):[.$E279])+1;&quot;&quot;))">
            <text:p/>
          </table:table-cell>
          <table:table-cell table:style-name="ce32"/>
          <table:table-cell table:style-name="ce32" table:formula="of:=IF([.$H280]=&quot;&quot;;&quot;&quot;;IF([.$G279]=&quot;&quot;;1;[.$G2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0]&lt;&gt;&quot;&quot;;NETWORKDAYS([.$L280];[.$M280];[$休日.$B$4:.$B$304]);&quot;&quot;)">
            <text:p/>
          </table:table-cell>
          <table:table-cell table:style-name="ce32" table:formula="of:=IF([.$L280]&lt;&gt;&quot;&quot;;NETWORKDAYS([.$L280];[.$M280];[$休日.$B$4:.$B$304]);&quot;&quot;)">
            <text:p/>
          </table:table-cell>
          <table:table-cell table:style-name="ce63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66"/>
          <table:table-cell table:style-name="ce66" table:formula="of:=SUM([.$V280:.$FM2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199])" office:value-type="string" office:string-value="E114" calcext:value-type="string">
            <text:p>E114</text:p>
          </table:table-cell>
          <table:table-cell table:style-name="ce13" table:formula="of:=IF(AND([.$D281]&lt;&gt;&quot;&quot;;[.$D281]&lt;&gt;&quot;○&quot;);MAX([.$C$3:.$C280])+1;[.$C280])" office:value-type="float" office:value="15" calcext:value-type="float">
            <text:p>15</text:p>
          </table:table-cell>
          <table:table-cell table:style-name="ce19"/>
          <table:table-cell table:style-name="ce27" table:formula="of:=IF(AND([.$F281]&lt;&gt;&quot;&quot;;[.$D280]&lt;&gt;&quot;&quot;);1;IF([.$F281]&lt;&gt;&quot;&quot;;MAX(INDIRECT([.$B281]):[.$E280])+1;&quot;&quot;))">
            <text:p/>
          </table:table-cell>
          <table:table-cell table:style-name="ce32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1]&lt;&gt;&quot;&quot;;NETWORKDAYS([.$L281];[.$M281];[$休日.$B$4:.$B$304]);&quot;&quot;)">
            <text:p/>
          </table:table-cell>
          <table:table-cell table:style-name="ce32" table:formula="of:=IF([.$L281]&lt;&gt;&quot;&quot;;NETWORKDAYS([.$L281];[.$M281];[$休日.$B$4:.$B$304]);&quot;&quot;)">
            <text:p/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200])" office:value-type="string" office:string-value="E114" calcext:value-type="string">
            <text:p>E114</text:p>
          </table:table-cell>
          <table:table-cell table:style-name="ce13" table:formula="of:=IF(AND([.$D282]&lt;&gt;&quot;&quot;;[.$D282]&lt;&gt;&quot;○&quot;);MAX([.$C$3:.$C281])+1;[.$C281])" office:value-type="float" office:value="15" calcext:value-type="float">
            <text:p>15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32" table:formula="of:=IF([.$L282]&lt;&gt;&quot;&quot;;NETWORKDAYS([.$L282];[.$M282];[$休日.$B$4:.$B$304]);&quot;&quot;)">
            <text:p/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201])" office:value-type="string" office:string-value="E124" calcext:value-type="string">
            <text:p>E124</text:p>
          </table:table-cell>
          <table:table-cell table:style-name="ce13" table:formula="of:=IF(AND([.$D283]&lt;&gt;&quot;&quot;;[.$D283]&lt;&gt;&quot;○&quot;);MAX([.$C$3:.$C282])+1;[.$C282])" office:value-type="float" office:value="15" calcext:value-type="float">
            <text:p>15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32" table:formula="of:=IF([.$L283]&lt;&gt;&quot;&quot;;NETWORKDAYS([.$L283];[.$M283];[$休日.$B$4:.$B$304]);&quot;&quot;)">
            <text:p/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202])" office:value-type="string" office:string-value="E124" calcext:value-type="string">
            <text:p>E124</text:p>
          </table:table-cell>
          <table:table-cell table:style-name="ce13" table:formula="of:=IF(AND([.$D284]&lt;&gt;&quot;&quot;;[.$D284]&lt;&gt;&quot;○&quot;);MAX([.$C$3:.$C283])+1;[.$C283])" office:value-type="float" office:value="15" calcext:value-type="float">
            <text:p>15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32" table:formula="of:=IF([.$L284]&lt;&gt;&quot;&quot;;NETWORKDAYS([.$L284];[.$M284];[$休日.$B$4:.$B$304]);&quot;&quot;)">
            <text:p/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203])" office:value-type="string" office:string-value="E124" calcext:value-type="string">
            <text:p>E124</text:p>
          </table:table-cell>
          <table:table-cell table:style-name="ce13" table:formula="of:=IF(AND([.$D285]&lt;&gt;&quot;&quot;;[.$D285]&lt;&gt;&quot;○&quot;);MAX([.$C$3:.$C284])+1;[.$C284])" office:value-type="float" office:value="15" calcext:value-type="float">
            <text:p>15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32" table:formula="of:=IF([.$L285]&lt;&gt;&quot;&quot;;NETWORKDAYS([.$L285];[.$M285];[$休日.$B$4:.$B$304]);&quot;&quot;)">
            <text:p/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204])" office:value-type="string" office:string-value="E124" calcext:value-type="string">
            <text:p>E124</text:p>
          </table:table-cell>
          <table:table-cell table:style-name="ce13" table:formula="of:=IF(AND([.$D286]&lt;&gt;&quot;&quot;;[.$D286]&lt;&gt;&quot;○&quot;);MAX([.$C$3:.$C285])+1;[.$C285])" office:value-type="float" office:value="15" calcext:value-type="float">
            <text:p>15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32" table:formula="of:=IF([.$L286]&lt;&gt;&quot;&quot;;NETWORKDAYS([.$L286];[.$M286];[$休日.$B$4:.$B$304]);&quot;&quot;)">
            <text:p/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205])" office:value-type="string" office:string-value="E124" calcext:value-type="string">
            <text:p>E124</text:p>
          </table:table-cell>
          <table:table-cell table:style-name="ce13" table:formula="of:=IF(AND([.$D287]&lt;&gt;&quot;&quot;;[.$D287]&lt;&gt;&quot;○&quot;);MAX([.$C$3:.$C286])+1;[.$C286])" office:value-type="float" office:value="15" calcext:value-type="float">
            <text:p>15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32" table:formula="of:=IF([.$L287]&lt;&gt;&quot;&quot;;NETWORKDAYS([.$L287];[.$M287];[$休日.$B$4:.$B$304]);&quot;&quot;)">
            <text:p/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206])" office:value-type="string" office:string-value="E124" calcext:value-type="string">
            <text:p>E124</text:p>
          </table:table-cell>
          <table:table-cell table:style-name="ce13" table:formula="of:=IF(AND([.$D288]&lt;&gt;&quot;&quot;;[.$D288]&lt;&gt;&quot;○&quot;);MAX([.$C$3:.$C287])+1;[.$C287])" office:value-type="float" office:value="15" calcext:value-type="float">
            <text:p>15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32" table:formula="of:=IF([.$L288]&lt;&gt;&quot;&quot;;NETWORKDAYS([.$L288];[.$M288];[$休日.$B$4:.$B$304]);&quot;&quot;)">
            <text:p/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207])" office:value-type="string" office:string-value="E124" calcext:value-type="string">
            <text:p>E124</text:p>
          </table:table-cell>
          <table:table-cell table:style-name="ce13" table:formula="of:=IF(AND([.$D289]&lt;&gt;&quot;&quot;;[.$D289]&lt;&gt;&quot;○&quot;);MAX([.$C$3:.$C288])+1;[.$C288])" office:value-type="float" office:value="15" calcext:value-type="float">
            <text:p>15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32" table:formula="of:=IF([.$L289]&lt;&gt;&quot;&quot;;NETWORKDAYS([.$L289];[.$M289];[$休日.$B$4:.$B$304]);&quot;&quot;)">
            <text:p/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208])" office:value-type="string" office:string-value="E124" calcext:value-type="string">
            <text:p>E124</text:p>
          </table:table-cell>
          <table:table-cell table:style-name="ce13" table:formula="of:=IF(AND([.$D290]&lt;&gt;&quot;&quot;;[.$D290]&lt;&gt;&quot;○&quot;);MAX([.$C$3:.$C289])+1;[.$C289])" office:value-type="float" office:value="15" calcext:value-type="float">
            <text:p>15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32" table:formula="of:=IF([.$L290]&lt;&gt;&quot;&quot;;NETWORKDAYS([.$L290];[.$M290];[$休日.$B$4:.$B$304]);&quot;&quot;)">
            <text:p/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209])" office:value-type="string" office:string-value="E124" calcext:value-type="string">
            <text:p>E124</text:p>
          </table:table-cell>
          <table:table-cell table:style-name="ce13" table:formula="of:=IF(AND([.$D291]&lt;&gt;&quot;&quot;;[.$D291]&lt;&gt;&quot;○&quot;);MAX([.$C$3:.$C290])+1;[.$C290])" office:value-type="float" office:value="15" calcext:value-type="float">
            <text:p>15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32" table:formula="of:=IF([.$L291]&lt;&gt;&quot;&quot;;NETWORKDAYS([.$L291];[.$M291];[$休日.$B$4:.$B$304]);&quot;&quot;)">
            <text:p/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10])" office:value-type="string" office:string-value="E124" calcext:value-type="string">
            <text:p>E124</text:p>
          </table:table-cell>
          <table:table-cell table:style-name="ce13" table:formula="of:=IF(AND([.$D292]&lt;&gt;&quot;&quot;;[.$D292]&lt;&gt;&quot;○&quot;);MAX([.$C$3:.$C291])+1;[.$C291])" office:value-type="float" office:value="15" calcext:value-type="float">
            <text:p>15</text:p>
          </table:table-cell>
          <table:table-cell table:style-name="ce19"/>
          <table:table-cell table:style-name="ce27" table:formula="of:=IF(AND([.$F292]&lt;&gt;&quot;&quot;;[.$D291]&lt;&gt;&quot;&quot;);1;IF([.$F292]&lt;&gt;&quot;&quot;;MAX(INDIRECT([.$B292]):[.$E291])+1;&quot;&quot;))">
            <text:p/>
          </table:table-cell>
          <table:table-cell table:style-name="ce32"/>
          <table:table-cell table:style-name="ce32" table:formula="of:=IF([.$H292]=&quot;&quot;;&quot;&quot;;IF([.$G291]=&quot;&quot;;1;[.$G2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2]&lt;&gt;&quot;&quot;;NETWORKDAYS([.$L292];[.$M292];[$休日.$B$4:.$B$304]);&quot;&quot;)">
            <text:p/>
          </table:table-cell>
          <table:table-cell table:style-name="ce32" table:formula="of:=IF([.$L292]&lt;&gt;&quot;&quot;;NETWORKDAYS([.$L292];[.$M292];[$休日.$B$4:.$B$304]);&quot;&quot;)">
            <text:p/>
          </table:table-cell>
          <table:table-cell table:style-name="ce63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66"/>
          <table:table-cell table:style-name="ce66" table:formula="of:=SUM([.$V292:.$FM2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11])" office:value-type="string" office:string-value="E124" calcext:value-type="string">
            <text:p>E124</text:p>
          </table:table-cell>
          <table:table-cell table:style-name="ce13" table:formula="of:=IF(AND([.$D293]&lt;&gt;&quot;&quot;;[.$D293]&lt;&gt;&quot;○&quot;);MAX([.$C$3:.$C292])+1;[.$C292])" office:value-type="float" office:value="15" calcext:value-type="float">
            <text:p>15</text:p>
          </table:table-cell>
          <table:table-cell table:style-name="ce19"/>
          <table:table-cell table:style-name="ce27" table:formula="of:=IF(AND([.$F293]&lt;&gt;&quot;&quot;;[.$D292]&lt;&gt;&quot;&quot;);1;IF([.$F293]&lt;&gt;&quot;&quot;;MAX(INDIRECT([.$B293]):[.$E292])+1;&quot;&quot;))">
            <text:p/>
          </table:table-cell>
          <table:table-cell table:style-name="ce32"/>
          <table:table-cell table:style-name="ce32" table:formula="of:=IF([.$H293]=&quot;&quot;;&quot;&quot;;IF([.$G292]=&quot;&quot;;1;[.$G2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3]&lt;&gt;&quot;&quot;;NETWORKDAYS([.$L293];[.$M293];[$休日.$B$4:.$B$304]);&quot;&quot;)">
            <text:p/>
          </table:table-cell>
          <table:table-cell table:style-name="ce32" table:formula="of:=IF([.$L293]&lt;&gt;&quot;&quot;;NETWORKDAYS([.$L293];[.$M293];[$休日.$B$4:.$B$304]);&quot;&quot;)">
            <text:p/>
          </table:table-cell>
          <table:table-cell table:style-name="ce63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66"/>
          <table:table-cell table:style-name="ce66" table:formula="of:=SUM([.$V293:.$FM2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12])" office:value-type="string" office:string-value="E124" calcext:value-type="string">
            <text:p>E124</text:p>
          </table:table-cell>
          <table:table-cell table:style-name="ce13" table:formula="of:=IF(AND([.$D294]&lt;&gt;&quot;&quot;;[.$D294]&lt;&gt;&quot;○&quot;);MAX([.$C$3:.$C293])+1;[.$C293])" office:value-type="float" office:value="15" calcext:value-type="float">
            <text:p>15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32" table:formula="of:=IF([.$L294]&lt;&gt;&quot;&quot;;NETWORKDAYS([.$L294];[.$M294];[$休日.$B$4:.$B$304]);&quot;&quot;)">
            <text:p/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13])" office:value-type="float" office:value="0" calcext:value-type="float">
            <text:p>0</text:p>
          </table:table-cell>
          <table:table-cell table:style-name="ce13" table:formula="of:=IF(AND([.$D295]&lt;&gt;&quot;&quot;;[.$D295]&lt;&gt;&quot;○&quot;);MAX([.$C$3:.$C294])+1;[.$C294])" office:value-type="float" office:value="15" calcext:value-type="float">
            <text:p>15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32" table:formula="of:=IF([.$L295]&lt;&gt;&quot;&quot;;NETWORKDAYS([.$L295];[.$M295];[$休日.$B$4:.$B$304]);&quot;&quot;)">
            <text:p/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14])" office:value-type="string" office:string-value="E124" calcext:value-type="string">
            <text:p>E124</text:p>
          </table:table-cell>
          <table:table-cell table:style-name="ce13" table:formula="of:=IF(AND([.$D296]&lt;&gt;&quot;&quot;;[.$D296]&lt;&gt;&quot;○&quot;);MAX([.$C$3:.$C295])+1;[.$C295])" office:value-type="float" office:value="15" calcext:value-type="float">
            <text:p>15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32" table:formula="of:=IF([.$L296]&lt;&gt;&quot;&quot;;NETWORKDAYS([.$L296];[.$M296];[$休日.$B$4:.$B$304]);&quot;&quot;)">
            <text:p/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15])" office:value-type="string" office:string-value="E124" calcext:value-type="string">
            <text:p>E124</text:p>
          </table:table-cell>
          <table:table-cell table:style-name="ce13" table:formula="of:=IF(AND([.$D297]&lt;&gt;&quot;&quot;;[.$D297]&lt;&gt;&quot;○&quot;);MAX([.$C$3:.$C296])+1;[.$C296])" office:value-type="float" office:value="15" calcext:value-type="float">
            <text:p>15</text:p>
          </table:table-cell>
          <table:table-cell table:style-name="ce18"/>
          <table:table-cell table:style-name="ce30" table:formula="of:=IF(AND([.$F297]&lt;&gt;&quot;&quot;;[.$D296]&lt;&gt;&quot;&quot;);1;IF([.$F297]&lt;&gt;&quot;&quot;;MAX(INDIRECT([.$B297]):[.$E296])+1;&quot;&quot;))">
            <text:p/>
          </table:table-cell>
          <table:table-cell table:style-name="ce18"/>
          <table:table-cell table:style-name="ce30" table:formula="of:=IF([.$H297]=&quot;&quot;;&quot;&quot;;IF([.$G296]=&quot;&quot;;1;[.$G296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7]&lt;&gt;&quot;&quot;;NETWORKDAYS([.$L297];[.$M297];[$休日.$B$4:.$B$304]);&quot;&quot;)">
            <text:p/>
          </table:table-cell>
          <table:table-cell table:style-name="ce47"/>
          <table:table-cell table:style-name="ce18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18"/>
          <table:table-cell table:style-name="ce18" table:formula="of:=SUM([.$V297:.$FM297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16])" office:value-type="string" office:string-value="E124" calcext:value-type="string">
            <text:p>E124</text:p>
          </table:table-cell>
          <table:table-cell table:style-name="ce13" table:formula="of:=IF(AND([.$D298]&lt;&gt;&quot;&quot;;[.$D298]&lt;&gt;&quot;○&quot;);MAX([.$C$3:.$C297])+1;[.$C297])" office:value-type="float" office:value="15" calcext:value-type="float">
            <text:p>15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32" table:formula="of:=IF([.$L298]&lt;&gt;&quot;&quot;;NETWORKDAYS([.$L298];[.$M298];[$休日.$B$4:.$B$304]);&quot;&quot;)">
            <text:p/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17])" office:value-type="string" office:string-value="E124" calcext:value-type="string">
            <text:p>E124</text:p>
          </table:table-cell>
          <table:table-cell table:style-name="ce13" table:formula="of:=IF(AND([.$D299]&lt;&gt;&quot;&quot;;[.$D299]&lt;&gt;&quot;○&quot;);MAX([.$C$3:.$C298])+1;[.$C298])" office:value-type="float" office:value="15" calcext:value-type="float">
            <text:p>15</text:p>
          </table:table-cell>
          <table:table-cell table:style-name="ce19"/>
          <table:table-cell table:style-name="ce27" table:formula="of:=IF(AND([.$F299]&lt;&gt;&quot;&quot;;[.$D298]&lt;&gt;&quot;&quot;);1;IF([.$F299]&lt;&gt;&quot;&quot;;MAX(INDIRECT([.$B299]):[.$E298])+1;&quot;&quot;))">
            <text:p/>
          </table:table-cell>
          <table:table-cell table:style-name="ce32"/>
          <table:table-cell table:style-name="ce32" table:formula="of:=IF([.$H299]=&quot;&quot;;&quot;&quot;;IF([.$G298]=&quot;&quot;;1;[.$G2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9]&lt;&gt;&quot;&quot;;NETWORKDAYS([.$L299];[.$M299];[$休日.$B$4:.$B$304]);&quot;&quot;)">
            <text:p/>
          </table:table-cell>
          <table:table-cell table:style-name="ce32" table:formula="of:=IF([.$L299]&lt;&gt;&quot;&quot;;NETWORKDAYS([.$L299];[.$M299];[$休日.$B$4:.$B$304]);&quot;&quot;)">
            <text:p/>
          </table:table-cell>
          <table:table-cell table:style-name="ce63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66"/>
          <table:table-cell table:style-name="ce66" table:formula="of:=SUM([.$V299:.$FM2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02])" office:value-type="string" office:string-value="E124" calcext:value-type="string">
            <text:p>E124</text:p>
          </table:table-cell>
          <table:table-cell table:style-name="ce13" table:formula="of:=IF(AND([.$D300]&lt;&gt;&quot;&quot;;[.$D300]&lt;&gt;&quot;○&quot;);MAX([.$C$3:.$C299])+1;[.$C299])" office:value-type="float" office:value="15" calcext:value-type="float">
            <text:p>15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32" table:formula="of:=IF([.$L300]&lt;&gt;&quot;&quot;;NETWORKDAYS([.$L300];[.$M300];[$休日.$B$4:.$B$304]);&quot;&quot;)">
            <text:p/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03])" office:value-type="string" office:string-value="E124" calcext:value-type="string">
            <text:p>E124</text:p>
          </table:table-cell>
          <table:table-cell table:style-name="ce13" table:formula="of:=IF(AND([.$D301]&lt;&gt;&quot;&quot;;[.$D301]&lt;&gt;&quot;○&quot;);MAX([.$C$3:.$C300])+1;[.$C300])" office:value-type="float" office:value="15" calcext:value-type="float">
            <text:p>15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32" table:formula="of:=IF([.$L301]&lt;&gt;&quot;&quot;;NETWORKDAYS([.$L301];[.$M301];[$休日.$B$4:.$B$304]);&quot;&quot;)">
            <text:p/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04])" office:value-type="string" office:string-value="E124" calcext:value-type="string">
            <text:p>E124</text:p>
          </table:table-cell>
          <table:table-cell table:style-name="ce13" table:formula="of:=IF(AND([.$D302]&lt;&gt;&quot;&quot;;[.$D302]&lt;&gt;&quot;○&quot;);MAX([.$C$3:.$C301])+1;[.$C301])" office:value-type="float" office:value="15" calcext:value-type="float">
            <text:p>15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32" table:formula="of:=IF([.$L302]&lt;&gt;&quot;&quot;;NETWORKDAYS([.$L302];[.$M302];[$休日.$B$4:.$B$304]);&quot;&quot;)">
            <text:p/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05])" office:value-type="string" office:string-value="E124" calcext:value-type="string">
            <text:p>E124</text:p>
          </table:table-cell>
          <table:table-cell table:style-name="ce13" table:formula="of:=IF(AND([.$D303]&lt;&gt;&quot;&quot;;[.$D303]&lt;&gt;&quot;○&quot;);MAX([.$C$3:.$C302])+1;[.$C302])" office:value-type="float" office:value="15" calcext:value-type="float">
            <text:p>15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32" table:formula="of:=IF([.$L303]&lt;&gt;&quot;&quot;;NETWORKDAYS([.$L303];[.$M303];[$休日.$B$4:.$B$304]);&quot;&quot;)">
            <text:p/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06])" office:value-type="string" office:string-value="E124" calcext:value-type="string">
            <text:p>E124</text:p>
          </table:table-cell>
          <table:table-cell table:style-name="ce13" table:formula="of:=IF(AND([.$D304]&lt;&gt;&quot;&quot;;[.$D304]&lt;&gt;&quot;○&quot;);MAX([.$C$3:.$C303])+1;[.$C303])" office:value-type="float" office:value="15" calcext:value-type="float">
            <text:p>15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32" table:formula="of:=IF([.$L304]&lt;&gt;&quot;&quot;;NETWORKDAYS([.$L304];[.$M304];[$休日.$B$4:.$B$304]);&quot;&quot;)">
            <text:p/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07])" office:value-type="string" office:string-value="E124" calcext:value-type="string">
            <text:p>E124</text:p>
          </table:table-cell>
          <table:table-cell table:style-name="ce13" table:formula="of:=IF(AND([.$D305]&lt;&gt;&quot;&quot;;[.$D305]&lt;&gt;&quot;○&quot;);MAX([.$C$3:.$C304])+1;[.$C304])" office:value-type="float" office:value="15" calcext:value-type="float">
            <text:p>15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32" table:formula="of:=IF([.$L305]&lt;&gt;&quot;&quot;;NETWORKDAYS([.$L305];[.$M305];[$休日.$B$4:.$B$304]);&quot;&quot;)">
            <text:p/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08])" office:value-type="string" office:string-value="E124" calcext:value-type="string">
            <text:p>E124</text:p>
          </table:table-cell>
          <table:table-cell table:style-name="ce13" table:formula="of:=IF(AND([.$D306]&lt;&gt;&quot;&quot;;[.$D306]&lt;&gt;&quot;○&quot;);MAX([.$C$3:.$C305])+1;[.$C305])" office:value-type="float" office:value="15" calcext:value-type="float">
            <text:p>15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32" table:formula="of:=IF([.$L306]&lt;&gt;&quot;&quot;;NETWORKDAYS([.$L306];[.$M306];[$休日.$B$4:.$B$304]);&quot;&quot;)">
            <text:p/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09])" office:value-type="string" office:string-value="E124" calcext:value-type="string">
            <text:p>E124</text:p>
          </table:table-cell>
          <table:table-cell table:style-name="ce13" table:formula="of:=IF(AND([.$D307]&lt;&gt;&quot;&quot;;[.$D307]&lt;&gt;&quot;○&quot;);MAX([.$C$3:.$C306])+1;[.$C306])" office:value-type="float" office:value="15" calcext:value-type="float">
            <text:p>15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32" table:formula="of:=IF([.$L307]&lt;&gt;&quot;&quot;;NETWORKDAYS([.$L307];[.$M307];[$休日.$B$4:.$B$304]);&quot;&quot;)">
            <text:p/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10])" office:value-type="string" office:string-value="E124" calcext:value-type="string">
            <text:p>E124</text:p>
          </table:table-cell>
          <table:table-cell table:style-name="ce13" table:formula="of:=IF(AND([.$D308]&lt;&gt;&quot;&quot;;[.$D308]&lt;&gt;&quot;○&quot;);MAX([.$C$3:.$C307])+1;[.$C307])" office:value-type="float" office:value="15" calcext:value-type="float">
            <text:p>15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32" table:formula="of:=IF([.$L308]&lt;&gt;&quot;&quot;;NETWORKDAYS([.$L308];[.$M308];[$休日.$B$4:.$B$304]);&quot;&quot;)">
            <text:p/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11])" office:value-type="string" office:string-value="E124" calcext:value-type="string">
            <text:p>E124</text:p>
          </table:table-cell>
          <table:table-cell table:style-name="ce13" table:formula="of:=IF(AND([.$D309]&lt;&gt;&quot;&quot;;[.$D309]&lt;&gt;&quot;○&quot;);MAX([.$C$3:.$C308])+1;[.$C308])" office:value-type="float" office:value="15" calcext:value-type="float">
            <text:p>15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32" table:formula="of:=IF([.$L309]&lt;&gt;&quot;&quot;;NETWORKDAYS([.$L309];[.$M309];[$休日.$B$4:.$B$304]);&quot;&quot;)">
            <text:p/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.$B212])" office:value-type="string" office:string-value="E124" calcext:value-type="string">
            <text:p>E124</text:p>
          </table:table-cell>
          <table:table-cell table:style-name="ce13" table:formula="of:=IF(AND([.$D310]&lt;&gt;&quot;&quot;;[.$D310]&lt;&gt;&quot;○&quot;);MAX([.$C$3:.$C309])+1;[.$C309])" office:value-type="float" office:value="15" calcext:value-type="float">
            <text:p>15</text:p>
          </table:table-cell>
          <table:table-cell table:style-name="ce19"/>
          <table:table-cell table:style-name="ce27" table:formula="of:=IF(AND([.$F310]&lt;&gt;&quot;&quot;;[.$D309]&lt;&gt;&quot;&quot;);1;IF([.$F310]&lt;&gt;&quot;&quot;;MAX(INDIRECT([.$B310]):[.$E309])+1;&quot;&quot;))">
            <text:p/>
          </table:table-cell>
          <table:table-cell table:style-name="ce32"/>
          <table:table-cell table:style-name="ce32" table:formula="of:=IF([.$H310]=&quot;&quot;;&quot;&quot;;IF([.$G309]=&quot;&quot;;1;[.$G30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0]&lt;&gt;&quot;&quot;;NETWORKDAYS([.$L310];[.$M310];[$休日.$B$4:.$B$304]);&quot;&quot;)">
            <text:p/>
          </table:table-cell>
          <table:table-cell table:style-name="ce32" table:formula="of:=IF([.$L310]&lt;&gt;&quot;&quot;;NETWORKDAYS([.$L310];[.$M310];[$休日.$B$4:.$B$304]);&quot;&quot;)">
            <text:p/>
          </table:table-cell>
          <table:table-cell table:style-name="ce63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66"/>
          <table:table-cell table:style-name="ce66" table:formula="of:=SUM([.$V310:.$FM3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.$B214])" office:value-type="string" office:string-value="E124" calcext:value-type="string">
            <text:p>E124</text:p>
          </table:table-cell>
          <table:table-cell table:style-name="ce13" table:formula="of:=IF(AND([.$D311]&lt;&gt;&quot;&quot;;[.$D311]&lt;&gt;&quot;○&quot;);MAX([.$C$3:.$C310])+1;[.$C310])" office:value-type="float" office:value="15" calcext:value-type="float">
            <text:p>15</text:p>
          </table:table-cell>
          <table:table-cell table:style-name="ce19"/>
          <table:table-cell table:style-name="ce27" table:formula="of:=IF(AND([.$F311]&lt;&gt;&quot;&quot;;[.$D310]&lt;&gt;&quot;&quot;);1;IF([.$F311]&lt;&gt;&quot;&quot;;MAX(INDIRECT([.$B311]):[.$E310])+1;&quot;&quot;))">
            <text:p/>
          </table:table-cell>
          <table:table-cell table:style-name="ce32"/>
          <table:table-cell table:style-name="ce32" table:formula="of:=IF([.$H311]=&quot;&quot;;&quot;&quot;;IF([.$G310]=&quot;&quot;;1;[.$G3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1]&lt;&gt;&quot;&quot;;NETWORKDAYS([.$L311];[.$M311];[$休日.$B$4:.$B$304]);&quot;&quot;)">
            <text:p/>
          </table:table-cell>
          <table:table-cell table:style-name="ce32" table:formula="of:=IF([.$L311]&lt;&gt;&quot;&quot;;NETWORKDAYS([.$L311];[.$M311];[$休日.$B$4:.$B$304]);&quot;&quot;)">
            <text:p/>
          </table:table-cell>
          <table:table-cell table:style-name="ce63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66"/>
          <table:table-cell table:style-name="ce66" table:formula="of:=SUM([.$V311:.$FM3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.$B215])" office:value-type="string" office:string-value="E124" calcext:value-type="string">
            <text:p>E124</text:p>
          </table:table-cell>
          <table:table-cell table:style-name="ce13" table:formula="of:=IF(AND([.$D312]&lt;&gt;&quot;&quot;;[.$D312]&lt;&gt;&quot;○&quot;);MAX([.$C$3:.$C311])+1;[.$C311])" office:value-type="float" office:value="15" calcext:value-type="float">
            <text:p>15</text:p>
          </table:table-cell>
          <table:table-cell table:style-name="ce19"/>
          <table:table-cell table:style-name="ce27" table:formula="of:=IF(AND([.$F312]&lt;&gt;&quot;&quot;;[.$D311]&lt;&gt;&quot;&quot;);1;IF([.$F312]&lt;&gt;&quot;&quot;;MAX(INDIRECT([.$B312]):[.$E311])+1;&quot;&quot;))">
            <text:p/>
          </table:table-cell>
          <table:table-cell table:style-name="ce32"/>
          <table:table-cell table:style-name="ce32" table:formula="of:=IF([.$H312]=&quot;&quot;;&quot;&quot;;IF([.$G311]=&quot;&quot;;1;[.$G3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2]&lt;&gt;&quot;&quot;;NETWORKDAYS([.$L312];[.$M312];[$休日.$B$4:.$B$304]);&quot;&quot;)">
            <text:p/>
          </table:table-cell>
          <table:table-cell table:style-name="ce32" table:formula="of:=IF([.$L312]&lt;&gt;&quot;&quot;;NETWORKDAYS([.$L312];[.$M312];[$休日.$B$4:.$B$304]);&quot;&quot;)">
            <text:p/>
          </table:table-cell>
          <table:table-cell table:style-name="ce63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66"/>
          <table:table-cell table:style-name="ce66" table:formula="of:=SUM([.$V312:.$FM3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.$B216])" office:value-type="string" office:string-value="E124" calcext:value-type="string">
            <text:p>E124</text:p>
          </table:table-cell>
          <table:table-cell table:style-name="ce13" table:formula="of:=IF(AND([.$D313]&lt;&gt;&quot;&quot;;[.$D313]&lt;&gt;&quot;○&quot;);MAX([.$C$3:.$C312])+1;[.$C312])" office:value-type="float" office:value="15" calcext:value-type="float">
            <text:p>15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32" table:formula="of:=IF([.$L313]&lt;&gt;&quot;&quot;;NETWORKDAYS([.$L313];[.$M313];[$休日.$B$4:.$B$304]);&quot;&quot;)">
            <text:p/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#REF!)" office:value-type="string" office:string-value="" calcext:value-type="error">
            <text:p>#REF!</text:p>
          </table:table-cell>
          <table:table-cell table:style-name="ce13" table:formula="of:=IF(AND([.$D314]&lt;&gt;&quot;&quot;;[.$D314]&lt;&gt;&quot;○&quot;);MAX([.$C$3:.$C313])+1;[.$C313])" office:value-type="float" office:value="15" calcext:value-type="float">
            <text:p>15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32" table:formula="of:=IF([.$L314]&lt;&gt;&quot;&quot;;NETWORKDAYS([.$L314];[.$M314];[$休日.$B$4:.$B$304]);&quot;&quot;)">
            <text:p/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#REF!)" office:value-type="string" office:string-value="" calcext:value-type="error">
            <text:p>#REF!</text:p>
          </table:table-cell>
          <table:table-cell table:style-name="ce13" table:formula="of:=IF(AND([.$D315]&lt;&gt;&quot;&quot;;[.$D315]&lt;&gt;&quot;○&quot;);MAX([.$C$3:.$C314])+1;[.$C314])" office:value-type="float" office:value="15" calcext:value-type="float">
            <text:p>15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32" table:formula="of:=IF([.$L315]&lt;&gt;&quot;&quot;;NETWORKDAYS([.$L315];[.$M315];[$休日.$B$4:.$B$304]);&quot;&quot;)">
            <text:p/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#REF!)" office:value-type="string" office:string-value="" calcext:value-type="error">
            <text:p>#REF!</text:p>
          </table:table-cell>
          <table:table-cell table:style-name="ce13" table:formula="of:=IF(AND([.$D316]&lt;&gt;&quot;&quot;;[.$D316]&lt;&gt;&quot;○&quot;);MAX([.$C$3:.$C315])+1;[.$C315])" office:value-type="float" office:value="15" calcext:value-type="float">
            <text:p>15</text:p>
          </table:table-cell>
          <table:table-cell table:style-name="ce18"/>
          <table:table-cell table:style-name="ce30" table:formula="of:=IF(AND([.$F316]&lt;&gt;&quot;&quot;;[.$D315]&lt;&gt;&quot;&quot;);1;IF([.$F316]&lt;&gt;&quot;&quot;;MAX(INDIRECT([.$B316]):[.$E315])+1;&quot;&quot;))">
            <text:p/>
          </table:table-cell>
          <table:table-cell table:style-name="ce18"/>
          <table:table-cell table:style-name="ce30" table:formula="of:=IF([.$H316]=&quot;&quot;;&quot;&quot;;IF([.$G315]=&quot;&quot;;1;[.$G315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16]&lt;&gt;&quot;&quot;;NETWORKDAYS([.$L316];[.$M316];[$休日.$B$4:.$B$304]);&quot;&quot;)">
            <text:p/>
          </table:table-cell>
          <table:table-cell table:style-name="ce47"/>
          <table:table-cell table:style-name="ce18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18"/>
          <table:table-cell table:style-name="ce18" table:formula="of:=SUM([.$V316:.$FM316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#REF!)" office:value-type="string" office:string-value="" calcext:value-type="error">
            <text:p>#REF!</text:p>
          </table:table-cell>
          <table:table-cell table:style-name="ce13" table:formula="of:=IF(AND([.$D317]&lt;&gt;&quot;&quot;;[.$D317]&lt;&gt;&quot;○&quot;);MAX([.$C$3:.$C316])+1;[.$C316])" office:value-type="float" office:value="15" calcext:value-type="float">
            <text:p>15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32" table:formula="of:=IF([.$L317]&lt;&gt;&quot;&quot;;NETWORKDAYS([.$L317];[.$M317];[$休日.$B$4:.$B$304]);&quot;&quot;)">
            <text:p/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#REF!)" office:value-type="string" office:string-value="" calcext:value-type="error">
            <text:p>#REF!</text:p>
          </table:table-cell>
          <table:table-cell table:style-name="ce13" table:formula="of:=IF(AND([.$D318]&lt;&gt;&quot;&quot;;[.$D318]&lt;&gt;&quot;○&quot;);MAX([.$C$3:.$C317])+1;[.$C317])" office:value-type="float" office:value="15" calcext:value-type="float">
            <text:p>15</text:p>
          </table:table-cell>
          <table:table-cell table:style-name="ce19"/>
          <table:table-cell table:style-name="ce27" table:formula="of:=IF(AND([.$F318]&lt;&gt;&quot;&quot;;[.$D317]&lt;&gt;&quot;&quot;);1;IF([.$F318]&lt;&gt;&quot;&quot;;MAX(INDIRECT([.$B318]):[.$E317])+1;&quot;&quot;))">
            <text:p/>
          </table:table-cell>
          <table:table-cell table:style-name="ce32"/>
          <table:table-cell table:style-name="ce32" table:formula="of:=IF([.$H318]=&quot;&quot;;&quot;&quot;;IF([.$G317]=&quot;&quot;;1;[.$G31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8]&lt;&gt;&quot;&quot;;NETWORKDAYS([.$L318];[.$M318];[$休日.$B$4:.$B$304]);&quot;&quot;)">
            <text:p/>
          </table:table-cell>
          <table:table-cell table:style-name="ce32" table:formula="of:=IF([.$L318]&lt;&gt;&quot;&quot;;NETWORKDAYS([.$L318];[.$M318];[$休日.$B$4:.$B$304]);&quot;&quot;)">
            <text:p/>
          </table:table-cell>
          <table:table-cell table:style-name="ce63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66"/>
          <table:table-cell table:style-name="ce66" table:formula="of:=SUM([.$V318:.$FM3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#REF!)" office:value-type="string" office:string-value="" calcext:value-type="error">
            <text:p>#REF!</text:p>
          </table:table-cell>
          <table:table-cell table:style-name="ce13" table:formula="of:=IF(AND([.$D319]&lt;&gt;&quot;&quot;;[.$D319]&lt;&gt;&quot;○&quot;);MAX([.$C$3:.$C318])+1;[.$C318])" office:value-type="float" office:value="15" calcext:value-type="float">
            <text:p>15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32" table:formula="of:=IF([.$L319]&lt;&gt;&quot;&quot;;NETWORKDAYS([.$L319];[.$M319];[$休日.$B$4:.$B$304]);&quot;&quot;)">
            <text:p/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#REF!)" office:value-type="string" office:string-value="" calcext:value-type="error">
            <text:p>#REF!</text:p>
          </table:table-cell>
          <table:table-cell table:style-name="ce13" table:formula="of:=IF(AND([.$D320]&lt;&gt;&quot;&quot;;[.$D320]&lt;&gt;&quot;○&quot;);MAX([.$C$3:.$C319])+1;[.$C319])" office:value-type="float" office:value="15" calcext:value-type="float">
            <text:p>15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32" table:formula="of:=IF([.$L320]&lt;&gt;&quot;&quot;;NETWORKDAYS([.$L320];[.$M320];[$休日.$B$4:.$B$304]);&quot;&quot;)">
            <text:p/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#REF!)" office:value-type="string" office:string-value="" calcext:value-type="error">
            <text:p>#REF!</text:p>
          </table:table-cell>
          <table:table-cell table:style-name="ce13" table:formula="of:=IF(AND([.$D321]&lt;&gt;&quot;&quot;;[.$D321]&lt;&gt;&quot;○&quot;);MAX([.$C$3:.$C320])+1;[.$C320])" office:value-type="float" office:value="15" calcext:value-type="float">
            <text:p>15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32" table:formula="of:=IF([.$L321]&lt;&gt;&quot;&quot;;NETWORKDAYS([.$L321];[.$M321];[$休日.$B$4:.$B$304]);&quot;&quot;)">
            <text:p/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#REF!)" office:value-type="string" office:string-value="" calcext:value-type="error">
            <text:p>#REF!</text:p>
          </table:table-cell>
          <table:table-cell table:style-name="ce13" table:formula="of:=IF(AND([.$D322]&lt;&gt;&quot;&quot;;[.$D322]&lt;&gt;&quot;○&quot;);MAX([.$C$3:.$C321])+1;[.$C321])" office:value-type="float" office:value="15" calcext:value-type="float">
            <text:p>15</text:p>
          </table:table-cell>
          <table:table-cell table:style-name="ce19"/>
          <table:table-cell table:style-name="ce27" table:formula="of:=IF(AND([.$F322]&lt;&gt;&quot;&quot;;[.$D321]&lt;&gt;&quot;&quot;);1;IF([.$F322]&lt;&gt;&quot;&quot;;MAX(INDIRECT([.$B322]):[.$E321])+1;&quot;&quot;))">
            <text:p/>
          </table:table-cell>
          <table:table-cell table:style-name="ce32"/>
          <table:table-cell table:style-name="ce32" table:formula="of:=IF([.$H322]=&quot;&quot;;&quot;&quot;;IF([.$G321]=&quot;&quot;;1;[.$G32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2]&lt;&gt;&quot;&quot;;NETWORKDAYS([.$L322];[.$M322];[$休日.$B$4:.$B$304]);&quot;&quot;)">
            <text:p/>
          </table:table-cell>
          <table:table-cell table:style-name="ce32" table:formula="of:=IF([.$L322]&lt;&gt;&quot;&quot;;NETWORKDAYS([.$L322];[.$M322];[$休日.$B$4:.$B$304]);&quot;&quot;)">
            <text:p/>
          </table:table-cell>
          <table:table-cell table:style-name="ce63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66"/>
          <table:table-cell table:style-name="ce66" table:formula="of:=SUM([.$V322:.$FM3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#REF!)" office:value-type="string" office:string-value="" calcext:value-type="error">
            <text:p>#REF!</text:p>
          </table:table-cell>
          <table:table-cell table:style-name="ce13" table:formula="of:=IF(AND([.$D323]&lt;&gt;&quot;&quot;;[.$D323]&lt;&gt;&quot;○&quot;);MAX([.$C$3:.$C322])+1;[.$C322])" office:value-type="float" office:value="15" calcext:value-type="float">
            <text:p>15</text:p>
          </table:table-cell>
          <table:table-cell table:style-name="ce19"/>
          <table:table-cell table:style-name="ce27" table:formula="of:=IF(AND([.$F323]&lt;&gt;&quot;&quot;;[.$D322]&lt;&gt;&quot;&quot;);1;IF([.$F323]&lt;&gt;&quot;&quot;;MAX(INDIRECT([.$B323]):[.$E322])+1;&quot;&quot;))">
            <text:p/>
          </table:table-cell>
          <table:table-cell table:style-name="ce32"/>
          <table:table-cell table:style-name="ce32" table:formula="of:=IF([.$H323]=&quot;&quot;;&quot;&quot;;IF([.$G322]=&quot;&quot;;1;[.$G3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3]&lt;&gt;&quot;&quot;;NETWORKDAYS([.$L323];[.$M323];[$休日.$B$4:.$B$304]);&quot;&quot;)">
            <text:p/>
          </table:table-cell>
          <table:table-cell table:style-name="ce32" table:formula="of:=IF([.$L323]&lt;&gt;&quot;&quot;;NETWORKDAYS([.$L323];[.$M323];[$休日.$B$4:.$B$304]);&quot;&quot;)">
            <text:p/>
          </table:table-cell>
          <table:table-cell table:style-name="ce63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66"/>
          <table:table-cell table:style-name="ce66" table:formula="of:=SUM([.$V323:.$FM3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#REF!)" office:value-type="string" office:string-value="" calcext:value-type="error">
            <text:p>#REF!</text:p>
          </table:table-cell>
          <table:table-cell table:style-name="ce13" table:formula="of:=IF(AND([.$D324]&lt;&gt;&quot;&quot;;[.$D324]&lt;&gt;&quot;○&quot;);MAX([.$C$3:.$C323])+1;[.$C323])" office:value-type="float" office:value="15" calcext:value-type="float">
            <text:p>15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32" table:formula="of:=IF([.$L324]&lt;&gt;&quot;&quot;;NETWORKDAYS([.$L324];[.$M324];[$休日.$B$4:.$B$304]);&quot;&quot;)">
            <text:p/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#REF!)" office:value-type="string" office:string-value="" calcext:value-type="error">
            <text:p>#REF!</text:p>
          </table:table-cell>
          <table:table-cell table:style-name="ce13" table:formula="of:=IF(AND([.$D325]&lt;&gt;&quot;&quot;;[.$D325]&lt;&gt;&quot;○&quot;);MAX([.$C$3:.$C324])+1;[.$C324])" office:value-type="float" office:value="15" calcext:value-type="float">
            <text:p>15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32" table:formula="of:=IF([.$L325]&lt;&gt;&quot;&quot;;NETWORKDAYS([.$L325];[.$M325];[$休日.$B$4:.$B$304]);&quot;&quot;)">
            <text:p/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#REF!)" office:value-type="string" office:string-value="" calcext:value-type="error">
            <text:p>#REF!</text:p>
          </table:table-cell>
          <table:table-cell table:style-name="ce13" table:formula="of:=IF(AND([.$D326]&lt;&gt;&quot;&quot;;[.$D326]&lt;&gt;&quot;○&quot;);MAX([.$C$3:.$C325])+1;[.$C325])" office:value-type="float" office:value="15" calcext:value-type="float">
            <text:p>15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32" table:formula="of:=IF([.$L326]&lt;&gt;&quot;&quot;;NETWORKDAYS([.$L326];[.$M326];[$休日.$B$4:.$B$304]);&quot;&quot;)">
            <text:p/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[.$B228])" office:value-type="string" office:string-value="E228" calcext:value-type="string">
            <text:p>E228</text:p>
          </table:table-cell>
          <table:table-cell table:style-name="ce13" table:formula="of:=IF(AND([.$D327]&lt;&gt;&quot;&quot;;[.$D327]&lt;&gt;&quot;○&quot;);MAX([.$C$3:.$C326])+1;[.$C326])" office:value-type="float" office:value="15" calcext:value-type="float">
            <text:p>15</text:p>
          </table:table-cell>
          <table:table-cell table:style-name="ce20"/>
          <table:table-cell table:style-name="ce28" table:formula="of:=IF(AND([.$F327]&lt;&gt;&quot;&quot;;[.$D326]&lt;&gt;&quot;&quot;);1;IF([.$F327]&lt;&gt;&quot;&quot;;MAX(INDIRECT([.$B327]):[.$E326])+1;&quot;&quot;))">
            <text:p/>
          </table:table-cell>
          <table:table-cell table:style-name="ce20"/>
          <table:table-cell table:style-name="ce28" table:formula="of:=IF([.$H327]=&quot;&quot;;&quot;&quot;;IF([.$G326]=&quot;&quot;;1;[.$G326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27]&lt;&gt;&quot;&quot;;NETWORKDAYS([.$L327];[.$M327];[$休日.$B$4:.$B$304]);&quot;&quot;)">
            <text:p/>
          </table:table-cell>
          <table:table-cell table:style-name="ce32" table:formula="of:=IF([.$L327]&lt;&gt;&quot;&quot;;NETWORKDAYS([.$L327];[.$M327];[$休日.$B$4:.$B$304]);&quot;&quot;)">
            <text:p/>
          </table:table-cell>
          <table:table-cell table:style-name="ce20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20"/>
          <table:table-cell table:style-name="ce20" table:formula="of:=SUM([.$V327:.$FM327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[.$B229])" office:value-type="string" office:string-value="E152" calcext:value-type="string">
            <text:p>E152</text:p>
          </table:table-cell>
          <table:table-cell table:style-name="ce13" table:formula="of:=IF(AND([.$D328]&lt;&gt;&quot;&quot;;[.$D328]&lt;&gt;&quot;○&quot;);MAX([.$C$3:.$C327])+1;[.$C327])" office:value-type="float" office:value="15" calcext:value-type="float">
            <text:p>15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32" table:formula="of:=IF([.$L328]&lt;&gt;&quot;&quot;;NETWORKDAYS([.$L328];[.$M328];[$休日.$B$4:.$B$304]);&quot;&quot;)">
            <text:p/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30])" office:value-type="string" office:string-value="E152" calcext:value-type="string">
            <text:p>E152</text:p>
          </table:table-cell>
          <table:table-cell table:style-name="ce13" table:formula="of:=IF(AND([.$D329]&lt;&gt;&quot;&quot;;[.$D329]&lt;&gt;&quot;○&quot;);MAX([.$C$3:.$C328])+1;[.$C328])" office:value-type="float" office:value="15" calcext:value-type="float">
            <text:p>15</text:p>
          </table:table-cell>
          <table:table-cell table:style-name="ce19"/>
          <table:table-cell table:style-name="ce27" table:formula="of:=IF(AND([.$F329]&lt;&gt;&quot;&quot;;[.$D328]&lt;&gt;&quot;&quot;);1;IF([.$F329]&lt;&gt;&quot;&quot;;MAX(INDIRECT([.$B329]):[.$E328])+1;&quot;&quot;))">
            <text:p/>
          </table:table-cell>
          <table:table-cell table:style-name="ce32"/>
          <table:table-cell table:style-name="ce32" table:formula="of:=IF([.$H329]=&quot;&quot;;&quot;&quot;;IF([.$G328]=&quot;&quot;;1;[.$G32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9]&lt;&gt;&quot;&quot;;NETWORKDAYS([.$L329];[.$M329];[$休日.$B$4:.$B$304]);&quot;&quot;)">
            <text:p/>
          </table:table-cell>
          <table:table-cell table:style-name="ce32" table:formula="of:=IF([.$L329]&lt;&gt;&quot;&quot;;NETWORKDAYS([.$L329];[.$M329];[$休日.$B$4:.$B$304]);&quot;&quot;)">
            <text:p/>
          </table:table-cell>
          <table:table-cell table:style-name="ce63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66"/>
          <table:table-cell table:style-name="ce66" table:formula="of:=SUM([.$V329:.$FM3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31])" office:value-type="string" office:string-value="E152" calcext:value-type="string">
            <text:p>E152</text:p>
          </table:table-cell>
          <table:table-cell table:style-name="ce13" table:formula="of:=IF(AND([.$D330]&lt;&gt;&quot;&quot;;[.$D330]&lt;&gt;&quot;○&quot;);MAX([.$C$3:.$C329])+1;[.$C329])" office:value-type="float" office:value="15" calcext:value-type="float">
            <text:p>15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32" table:formula="of:=IF([.$L330]&lt;&gt;&quot;&quot;;NETWORKDAYS([.$L330];[.$M330];[$休日.$B$4:.$B$304]);&quot;&quot;)">
            <text:p/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32])" office:value-type="string" office:string-value="E152" calcext:value-type="string">
            <text:p>E152</text:p>
          </table:table-cell>
          <table:table-cell table:style-name="ce13" table:formula="of:=IF(AND([.$D331]&lt;&gt;&quot;&quot;;[.$D331]&lt;&gt;&quot;○&quot;);MAX([.$C$3:.$C330])+1;[.$C330])" office:value-type="float" office:value="15" calcext:value-type="float">
            <text:p>15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32" table:formula="of:=IF([.$L331]&lt;&gt;&quot;&quot;;NETWORKDAYS([.$L331];[.$M331];[$休日.$B$4:.$B$304]);&quot;&quot;)">
            <text:p/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33])" office:value-type="string" office:string-value="E152" calcext:value-type="string">
            <text:p>E152</text:p>
          </table:table-cell>
          <table:table-cell table:style-name="ce13" table:formula="of:=IF(AND([.$D332]&lt;&gt;&quot;&quot;;[.$D332]&lt;&gt;&quot;○&quot;);MAX([.$C$3:.$C331])+1;[.$C331])" office:value-type="float" office:value="15" calcext:value-type="float">
            <text:p>15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32" table:formula="of:=IF([.$L332]&lt;&gt;&quot;&quot;;NETWORKDAYS([.$L332];[.$M332];[$休日.$B$4:.$B$304]);&quot;&quot;)">
            <text:p/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34])" office:value-type="string" office:string-value="E152" calcext:value-type="string">
            <text:p>E152</text:p>
          </table:table-cell>
          <table:table-cell table:style-name="ce13" table:formula="of:=IF(AND([.$D333]&lt;&gt;&quot;&quot;;[.$D333]&lt;&gt;&quot;○&quot;);MAX([.$C$3:.$C332])+1;[.$C332])" office:value-type="float" office:value="15" calcext:value-type="float">
            <text:p>15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32" table:formula="of:=IF([.$L333]&lt;&gt;&quot;&quot;;NETWORKDAYS([.$L333];[.$M333];[$休日.$B$4:.$B$304]);&quot;&quot;)">
            <text:p/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36])" office:value-type="string" office:string-value="E152" calcext:value-type="string">
            <text:p>E152</text:p>
          </table:table-cell>
          <table:table-cell table:style-name="ce13" table:formula="of:=IF(AND([.$D334]&lt;&gt;&quot;&quot;;[.$D334]&lt;&gt;&quot;○&quot;);MAX([.$C$3:.$C333])+1;[.$C333])" office:value-type="float" office:value="15" calcext:value-type="float">
            <text:p>15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32" table:formula="of:=IF([.$L334]&lt;&gt;&quot;&quot;;NETWORKDAYS([.$L334];[.$M334];[$休日.$B$4:.$B$304]);&quot;&quot;)">
            <text:p/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37])" office:value-type="string" office:string-value="E152" calcext:value-type="string">
            <text:p>E152</text:p>
          </table:table-cell>
          <table:table-cell table:style-name="ce13" table:formula="of:=IF(AND([.$D335]&lt;&gt;&quot;&quot;;[.$D335]&lt;&gt;&quot;○&quot;);MAX([.$C$3:.$C334])+1;[.$C334])" office:value-type="float" office:value="15" calcext:value-type="float">
            <text:p>15</text:p>
          </table:table-cell>
          <table:table-cell table:style-name="ce19"/>
          <table:table-cell table:style-name="ce27" table:formula="of:=IF(AND([.$F335]&lt;&gt;&quot;&quot;;[.$D334]&lt;&gt;&quot;&quot;);1;IF([.$F335]&lt;&gt;&quot;&quot;;MAX(INDIRECT([.$B335]):[.$E334])+1;&quot;&quot;))">
            <text:p/>
          </table:table-cell>
          <table:table-cell table:style-name="ce32"/>
          <table:table-cell table:style-name="ce32" table:formula="of:=IF([.$H335]=&quot;&quot;;&quot;&quot;;IF([.$G334]=&quot;&quot;;1;[.$G33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5]&lt;&gt;&quot;&quot;;NETWORKDAYS([.$L335];[.$M335];[$休日.$B$4:.$B$304]);&quot;&quot;)">
            <text:p/>
          </table:table-cell>
          <table:table-cell table:style-name="ce32" table:formula="of:=IF([.$L335]&lt;&gt;&quot;&quot;;NETWORKDAYS([.$L335];[.$M335];[$休日.$B$4:.$B$304]);&quot;&quot;)">
            <text:p/>
          </table:table-cell>
          <table:table-cell table:style-name="ce63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66"/>
          <table:table-cell table:style-name="ce66" table:formula="of:=SUM([.$V335:.$FM3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38])" office:value-type="string" office:string-value="E152" calcext:value-type="string">
            <text:p>E152</text:p>
          </table:table-cell>
          <table:table-cell table:style-name="ce13" table:formula="of:=IF(AND([.$D336]&lt;&gt;&quot;&quot;;[.$D336]&lt;&gt;&quot;○&quot;);MAX([.$C$3:.$C335])+1;[.$C335])" office:value-type="float" office:value="15" calcext:value-type="float">
            <text:p>15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32" table:formula="of:=IF([.$L336]&lt;&gt;&quot;&quot;;NETWORKDAYS([.$L336];[.$M336];[$休日.$B$4:.$B$304]);&quot;&quot;)">
            <text:p/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39])" office:value-type="string" office:string-value="E152" calcext:value-type="string">
            <text:p>E152</text:p>
          </table:table-cell>
          <table:table-cell table:style-name="ce13" table:formula="of:=IF(AND([.$D337]&lt;&gt;&quot;&quot;;[.$D337]&lt;&gt;&quot;○&quot;);MAX([.$C$3:.$C336])+1;[.$C336])" office:value-type="float" office:value="15" calcext:value-type="float">
            <text:p>15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32" table:formula="of:=IF([.$L337]&lt;&gt;&quot;&quot;;NETWORKDAYS([.$L337];[.$M337];[$休日.$B$4:.$B$304]);&quot;&quot;)">
            <text:p/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40])" office:value-type="string" office:string-value="E152" calcext:value-type="string">
            <text:p>E152</text:p>
          </table:table-cell>
          <table:table-cell table:style-name="ce13" table:formula="of:=IF(AND([.$D338]&lt;&gt;&quot;&quot;;[.$D338]&lt;&gt;&quot;○&quot;);MAX([.$C$3:.$C337])+1;[.$C337])" office:value-type="float" office:value="15" calcext:value-type="float">
            <text:p>15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32" table:formula="of:=IF([.$L338]&lt;&gt;&quot;&quot;;NETWORKDAYS([.$L338];[.$M338];[$休日.$B$4:.$B$304]);&quot;&quot;)">
            <text:p/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41])" office:value-type="string" office:string-value="E152" calcext:value-type="string">
            <text:p>E152</text:p>
          </table:table-cell>
          <table:table-cell table:style-name="ce13" table:formula="of:=IF(AND([.$D339]&lt;&gt;&quot;&quot;;[.$D339]&lt;&gt;&quot;○&quot;);MAX([.$C$3:.$C338])+1;[.$C338])" office:value-type="float" office:value="15" calcext:value-type="float">
            <text:p>15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32" table:formula="of:=IF([.$L339]&lt;&gt;&quot;&quot;;NETWORKDAYS([.$L339];[.$M339];[$休日.$B$4:.$B$304]);&quot;&quot;)">
            <text:p/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42])" office:value-type="string" office:string-value="E152" calcext:value-type="string">
            <text:p>E152</text:p>
          </table:table-cell>
          <table:table-cell table:style-name="ce13" table:formula="of:=IF(AND([.$D340]&lt;&gt;&quot;&quot;;[.$D340]&lt;&gt;&quot;○&quot;);MAX([.$C$3:.$C339])+1;[.$C339])" office:value-type="float" office:value="15" calcext:value-type="float">
            <text:p>15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32" table:formula="of:=IF([.$L340]&lt;&gt;&quot;&quot;;NETWORKDAYS([.$L340];[.$M340];[$休日.$B$4:.$B$304]);&quot;&quot;)">
            <text:p/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43])" office:value-type="string" office:string-value="E152" calcext:value-type="string">
            <text:p>E152</text:p>
          </table:table-cell>
          <table:table-cell table:style-name="ce13" table:formula="of:=IF(AND([.$D341]&lt;&gt;&quot;&quot;;[.$D341]&lt;&gt;&quot;○&quot;);MAX([.$C$3:.$C340])+1;[.$C340])" office:value-type="float" office:value="15" calcext:value-type="float">
            <text:p>15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32" table:formula="of:=IF([.$L341]&lt;&gt;&quot;&quot;;NETWORKDAYS([.$L341];[.$M341];[$休日.$B$4:.$B$304]);&quot;&quot;)">
            <text:p/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44])" office:value-type="string" office:string-value="E152" calcext:value-type="string">
            <text:p>E152</text:p>
          </table:table-cell>
          <table:table-cell table:style-name="ce13" table:formula="of:=IF(AND([.$D342]&lt;&gt;&quot;&quot;;[.$D342]&lt;&gt;&quot;○&quot;);MAX([.$C$3:.$C341])+1;[.$C341])" office:value-type="float" office:value="15" calcext:value-type="float">
            <text:p>15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32" table:formula="of:=IF([.$L342]&lt;&gt;&quot;&quot;;NETWORKDAYS([.$L342];[.$M342];[$休日.$B$4:.$B$304]);&quot;&quot;)">
            <text:p/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45])" office:value-type="string" office:string-value="E152" calcext:value-type="string">
            <text:p>E152</text:p>
          </table:table-cell>
          <table:table-cell table:style-name="ce13" table:formula="of:=IF(AND([.$D343]&lt;&gt;&quot;&quot;;[.$D343]&lt;&gt;&quot;○&quot;);MAX([.$C$3:.$C342])+1;[.$C342])" office:value-type="float" office:value="15" calcext:value-type="float">
            <text:p>15</text:p>
          </table:table-cell>
          <table:table-cell table:style-name="ce19"/>
          <table:table-cell table:style-name="ce27" table:formula="of:=IF(AND([.$F343]&lt;&gt;&quot;&quot;;[.$D342]&lt;&gt;&quot;&quot;);1;IF([.$F343]&lt;&gt;&quot;&quot;;MAX(INDIRECT([.$B343]):[.$E342])+1;&quot;&quot;))">
            <text:p/>
          </table:table-cell>
          <table:table-cell table:style-name="ce32"/>
          <table:table-cell table:style-name="ce32" table:formula="of:=IF([.$H343]=&quot;&quot;;&quot;&quot;;IF([.$G342]=&quot;&quot;;1;[.$G34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3]&lt;&gt;&quot;&quot;;NETWORKDAYS([.$L343];[.$M343];[$休日.$B$4:.$B$304]);&quot;&quot;)">
            <text:p/>
          </table:table-cell>
          <table:table-cell table:style-name="ce32" table:formula="of:=IF([.$L343]&lt;&gt;&quot;&quot;;NETWORKDAYS([.$L343];[.$M343];[$休日.$B$4:.$B$304]);&quot;&quot;)">
            <text:p/>
          </table:table-cell>
          <table:table-cell table:style-name="ce63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66"/>
          <table:table-cell table:style-name="ce66" table:formula="of:=SUM([.$V343:.$FM3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46])" office:value-type="string" office:string-value="E152" calcext:value-type="string">
            <text:p>E152</text:p>
          </table:table-cell>
          <table:table-cell table:style-name="ce13" table:formula="of:=IF(AND([.$D344]&lt;&gt;&quot;&quot;;[.$D344]&lt;&gt;&quot;○&quot;);MAX([.$C$3:.$C343])+1;[.$C343])" office:value-type="float" office:value="15" calcext:value-type="float">
            <text:p>15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32" table:formula="of:=IF([.$L344]&lt;&gt;&quot;&quot;;NETWORKDAYS([.$L344];[.$M344];[$休日.$B$4:.$B$304]);&quot;&quot;)">
            <text:p/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47])" office:value-type="string" office:string-value="E152" calcext:value-type="string">
            <text:p>E152</text:p>
          </table:table-cell>
          <table:table-cell table:style-name="ce13" table:formula="of:=IF(AND([.$D345]&lt;&gt;&quot;&quot;;[.$D345]&lt;&gt;&quot;○&quot;);MAX([.$C$3:.$C344])+1;[.$C344])" office:value-type="float" office:value="15" calcext:value-type="float">
            <text:p>15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32" table:formula="of:=IF([.$L345]&lt;&gt;&quot;&quot;;NETWORKDAYS([.$L345];[.$M345];[$休日.$B$4:.$B$304]);&quot;&quot;)">
            <text:p/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67])" office:value-type="float" office:value="0" calcext:value-type="float">
            <text:p>0</text:p>
          </table:table-cell>
          <table:table-cell table:style-name="ce13" table:formula="of:=IF(AND([.$D346]&lt;&gt;&quot;&quot;;[.$D346]&lt;&gt;&quot;○&quot;);MAX([.$C$3:.$C345])+1;[.$C345])" office:value-type="float" office:value="15" calcext:value-type="float">
            <text:p>15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32" table:formula="of:=IF([.$L346]&lt;&gt;&quot;&quot;;NETWORKDAYS([.$L346];[.$M346];[$休日.$B$4:.$B$304]);&quot;&quot;)">
            <text:p/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68])" office:value-type="string" office:string-value="E268" calcext:value-type="string">
            <text:p>E268</text:p>
          </table:table-cell>
          <table:table-cell table:style-name="ce13" table:formula="of:=IF(AND([.$D347]&lt;&gt;&quot;&quot;;[.$D347]&lt;&gt;&quot;○&quot;);MAX([.$C$3:.$C346])+1;[.$C346])" office:value-type="float" office:value="15" calcext:value-type="float">
            <text:p>15</text:p>
          </table:table-cell>
          <table:table-cell table:style-name="ce19"/>
          <table:table-cell table:style-name="ce27" table:formula="of:=IF(AND([.$F347]&lt;&gt;&quot;&quot;;[.$D346]&lt;&gt;&quot;&quot;);1;IF([.$F347]&lt;&gt;&quot;&quot;;MAX(INDIRECT([.$B347]):[.$E346])+1;&quot;&quot;))">
            <text:p/>
          </table:table-cell>
          <table:table-cell table:style-name="ce32"/>
          <table:table-cell table:style-name="ce32" table:formula="of:=IF([.$H347]=&quot;&quot;;&quot;&quot;;IF([.$G346]=&quot;&quot;;1;[.$G34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7]&lt;&gt;&quot;&quot;;NETWORKDAYS([.$L347];[.$M347];[$休日.$B$4:.$B$304]);&quot;&quot;)">
            <text:p/>
          </table:table-cell>
          <table:table-cell table:style-name="ce32" table:formula="of:=IF([.$L347]&lt;&gt;&quot;&quot;;NETWORKDAYS([.$L347];[.$M347];[$休日.$B$4:.$B$304]);&quot;&quot;)">
            <text:p/>
          </table:table-cell>
          <table:table-cell table:style-name="ce63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66"/>
          <table:table-cell table:style-name="ce66" table:formula="of:=SUM([.$V347:.$FM3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69])" office:value-type="string" office:string-value="E152" calcext:value-type="string">
            <text:p>E152</text:p>
          </table:table-cell>
          <table:table-cell table:style-name="ce13" table:formula="of:=IF(AND([.$D348]&lt;&gt;&quot;&quot;;[.$D348]&lt;&gt;&quot;○&quot;);MAX([.$C$3:.$C347])+1;[.$C347])" office:value-type="float" office:value="15" calcext:value-type="float">
            <text:p>15</text:p>
          </table:table-cell>
          <table:table-cell table:style-name="ce19"/>
          <table:table-cell table:style-name="ce27" table:formula="of:=IF(AND([.$F348]&lt;&gt;&quot;&quot;;[.$D347]&lt;&gt;&quot;&quot;);1;IF([.$F348]&lt;&gt;&quot;&quot;;MAX(INDIRECT([.$B348]):[.$E347])+1;&quot;&quot;))">
            <text:p/>
          </table:table-cell>
          <table:table-cell table:style-name="ce32"/>
          <table:table-cell table:style-name="ce32" table:formula="of:=IF([.$H348]=&quot;&quot;;&quot;&quot;;IF([.$G347]=&quot;&quot;;1;[.$G3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8]&lt;&gt;&quot;&quot;;NETWORKDAYS([.$L348];[.$M348];[$休日.$B$4:.$B$304]);&quot;&quot;)">
            <text:p/>
          </table:table-cell>
          <table:table-cell table:style-name="ce32" table:formula="of:=IF([.$L348]&lt;&gt;&quot;&quot;;NETWORKDAYS([.$L348];[.$M348];[$休日.$B$4:.$B$304]);&quot;&quot;)">
            <text:p/>
          </table:table-cell>
          <table:table-cell table:style-name="ce63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66"/>
          <table:table-cell table:style-name="ce66" table:formula="of:=SUM([.$V348:.$FM3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0])" office:value-type="string" office:string-value="E90" calcext:value-type="string">
            <text:p>E90</text:p>
          </table:table-cell>
          <table:table-cell table:style-name="ce13" table:formula="of:=IF(AND([.$D349]&lt;&gt;&quot;&quot;;[.$D349]&lt;&gt;&quot;○&quot;);MAX([.$C$3:.$C348])+1;[.$C348])" office:value-type="float" office:value="15" calcext:value-type="float">
            <text:p>15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32" table:formula="of:=IF([.$L349]&lt;&gt;&quot;&quot;;NETWORKDAYS([.$L349];[.$M349];[$休日.$B$4:.$B$304]);&quot;&quot;)">
            <text:p/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1])" office:value-type="string" office:string-value="E90" calcext:value-type="string">
            <text:p>E90</text:p>
          </table:table-cell>
          <table:table-cell table:style-name="ce13" table:formula="of:=IF(AND([.$D350]&lt;&gt;&quot;&quot;;[.$D350]&lt;&gt;&quot;○&quot;);MAX([.$C$3:.$C349])+1;[.$C349])" office:value-type="float" office:value="15" calcext:value-type="float">
            <text:p>15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32" table:formula="of:=IF([.$L350]&lt;&gt;&quot;&quot;;NETWORKDAYS([.$L350];[.$M350];[$休日.$B$4:.$B$304]);&quot;&quot;)">
            <text:p/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2])" office:value-type="string" office:string-value="E90" calcext:value-type="string">
            <text:p>E90</text:p>
          </table:table-cell>
          <table:table-cell table:style-name="ce13" table:formula="of:=IF(AND([.$D351]&lt;&gt;&quot;&quot;;[.$D351]&lt;&gt;&quot;○&quot;);MAX([.$C$3:.$C350])+1;[.$C350])" office:value-type="float" office:value="15" calcext:value-type="float">
            <text:p>15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32" table:formula="of:=IF([.$L351]&lt;&gt;&quot;&quot;;NETWORKDAYS([.$L351];[.$M351];[$休日.$B$4:.$B$304]);&quot;&quot;)">
            <text:p/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3])" office:value-type="string" office:string-value="E114" calcext:value-type="string">
            <text:p>E114</text:p>
          </table:table-cell>
          <table:table-cell table:style-name="ce13" table:formula="of:=IF(AND([.$D352]&lt;&gt;&quot;&quot;;[.$D352]&lt;&gt;&quot;○&quot;);MAX([.$C$3:.$C351])+1;[.$C351])" office:value-type="float" office:value="15" calcext:value-type="float">
            <text:p>15</text:p>
          </table:table-cell>
          <table:table-cell table:style-name="ce18"/>
          <table:table-cell table:style-name="ce30" table:formula="of:=IF(AND([.$F352]&lt;&gt;&quot;&quot;;[.$D351]&lt;&gt;&quot;&quot;);1;IF([.$F352]&lt;&gt;&quot;&quot;;MAX(INDIRECT([.$B352]):[.$E351])+1;&quot;&quot;))">
            <text:p/>
          </table:table-cell>
          <table:table-cell table:style-name="ce18"/>
          <table:table-cell table:style-name="ce30" table:formula="of:=IF([.$H352]=&quot;&quot;;&quot;&quot;;IF([.$G351]=&quot;&quot;;1;[.$G35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2]&lt;&gt;&quot;&quot;;NETWORKDAYS([.$L352];[.$M352];[$休日.$B$4:.$B$304]);&quot;&quot;)">
            <text:p/>
          </table:table-cell>
          <table:table-cell table:style-name="ce47"/>
          <table:table-cell table:style-name="ce18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18"/>
          <table:table-cell table:style-name="ce18" table:formula="of:=SUM([.$V352:.$FM35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4])" office:value-type="string" office:string-value="E114" calcext:value-type="string">
            <text:p>E114</text:p>
          </table:table-cell>
          <table:table-cell table:style-name="ce13" table:formula="of:=IF(AND([.$D353]&lt;&gt;&quot;&quot;;[.$D353]&lt;&gt;&quot;○&quot;);MAX([.$C$3:.$C352])+1;[.$C352])" office:value-type="float" office:value="15" calcext:value-type="float">
            <text:p>15</text:p>
          </table:table-cell>
          <table:table-cell table:style-name="ce19"/>
          <table:table-cell table:style-name="ce27" table:formula="of:=IF(AND([.$F353]&lt;&gt;&quot;&quot;;[.$D352]&lt;&gt;&quot;&quot;);1;IF([.$F353]&lt;&gt;&quot;&quot;;MAX(INDIRECT([.$B353]):[.$E352])+1;&quot;&quot;))">
            <text:p/>
          </table:table-cell>
          <table:table-cell table:style-name="ce32"/>
          <table:table-cell table:style-name="ce32" table:formula="of:=IF([.$H353]=&quot;&quot;;&quot;&quot;;IF([.$G352]=&quot;&quot;;1;[.$G35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3]&lt;&gt;&quot;&quot;;NETWORKDAYS([.$L353];[.$M353];[$休日.$B$4:.$B$304]);&quot;&quot;)">
            <text:p/>
          </table:table-cell>
          <table:table-cell table:style-name="ce32" table:formula="of:=IF([.$L353]&lt;&gt;&quot;&quot;;NETWORKDAYS([.$L353];[.$M353];[$休日.$B$4:.$B$304]);&quot;&quot;)">
            <text:p/>
          </table:table-cell>
          <table:table-cell table:style-name="ce63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66"/>
          <table:table-cell table:style-name="ce66" table:formula="of:=SUM([.$V353:.$FM3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7])" office:value-type="string" office:string-value="E195" calcext:value-type="string">
            <text:p>E195</text:p>
          </table:table-cell>
          <table:table-cell table:style-name="ce13" table:formula="of:=IF(AND([.$D354]&lt;&gt;&quot;&quot;;[.$D354]&lt;&gt;&quot;○&quot;);MAX([.$C$3:.$C353])+1;[.$C353])" office:value-type="float" office:value="15" calcext:value-type="float">
            <text:p>15</text:p>
          </table:table-cell>
          <table:table-cell table:style-name="ce19"/>
          <table:table-cell table:style-name="ce27" table:formula="of:=IF(AND([.$F354]&lt;&gt;&quot;&quot;;[.$D353]&lt;&gt;&quot;&quot;);1;IF([.$F354]&lt;&gt;&quot;&quot;;MAX(INDIRECT([.$B354]):[.$E353])+1;&quot;&quot;))">
            <text:p/>
          </table:table-cell>
          <table:table-cell table:style-name="ce32"/>
          <table:table-cell table:style-name="ce32" table:formula="of:=IF([.$H354]=&quot;&quot;;&quot;&quot;;IF([.$G353]=&quot;&quot;;1;[.$G35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4]&lt;&gt;&quot;&quot;;NETWORKDAYS([.$L354];[.$M354];[$休日.$B$4:.$B$304]);&quot;&quot;)">
            <text:p/>
          </table:table-cell>
          <table:table-cell table:style-name="ce32" table:formula="of:=IF([.$L354]&lt;&gt;&quot;&quot;;NETWORKDAYS([.$L354];[.$M354];[$休日.$B$4:.$B$304]);&quot;&quot;)">
            <text:p/>
          </table:table-cell>
          <table:table-cell table:style-name="ce63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66"/>
          <table:table-cell table:style-name="ce66" table:formula="of:=SUM([.$V354:.$FM3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8])" office:value-type="string" office:string-value="E114" calcext:value-type="string">
            <text:p>E114</text:p>
          </table:table-cell>
          <table:table-cell table:style-name="ce13" table:formula="of:=IF(AND([.$D355]&lt;&gt;&quot;&quot;;[.$D355]&lt;&gt;&quot;○&quot;);MAX([.$C$3:.$C354])+1;[.$C354])" office:value-type="float" office:value="15" calcext:value-type="float">
            <text:p>15</text:p>
          </table:table-cell>
          <table:table-cell table:style-name="ce19"/>
          <table:table-cell table:style-name="ce27" table:formula="of:=IF(AND([.$F355]&lt;&gt;&quot;&quot;;[.$D354]&lt;&gt;&quot;&quot;);1;IF([.$F355]&lt;&gt;&quot;&quot;;MAX(INDIRECT([.$B355]):[.$E354])+1;&quot;&quot;))">
            <text:p/>
          </table:table-cell>
          <table:table-cell table:style-name="ce32"/>
          <table:table-cell table:style-name="ce32" table:formula="of:=IF([.$H355]=&quot;&quot;;&quot;&quot;;IF([.$G354]=&quot;&quot;;1;[.$G35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5]&lt;&gt;&quot;&quot;;NETWORKDAYS([.$L355];[.$M355];[$休日.$B$4:.$B$304]);&quot;&quot;)">
            <text:p/>
          </table:table-cell>
          <table:table-cell table:style-name="ce32" table:formula="of:=IF([.$L355]&lt;&gt;&quot;&quot;;NETWORKDAYS([.$L355];[.$M355];[$休日.$B$4:.$B$304]);&quot;&quot;)">
            <text:p/>
          </table:table-cell>
          <table:table-cell table:style-name="ce63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66"/>
          <table:table-cell table:style-name="ce66" table:formula="of:=SUM([.$V355:.$FM3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279" calcext:value-type="string">
            <text:p>E279</text:p>
          </table:table-cell>
          <table:table-cell table:style-name="ce13" table:formula="of:=IF(AND([.$D356]&lt;&gt;&quot;&quot;;[.$D356]&lt;&gt;&quot;○&quot;);MAX([.$C$3:.$C355])+1;[.$C355])" office:value-type="float" office:value="15" calcext:value-type="float">
            <text:p>15</text:p>
          </table:table-cell>
          <table:table-cell table:style-name="ce19"/>
          <table:table-cell table:style-name="ce27" table:formula="of:=IF(AND([.$F356]&lt;&gt;&quot;&quot;;[.$D355]&lt;&gt;&quot;&quot;);1;IF([.$F356]&lt;&gt;&quot;&quot;;MAX(INDIRECT([.$B356]):[.$E355])+1;&quot;&quot;))">
            <text:p/>
          </table:table-cell>
          <table:table-cell table:style-name="ce32"/>
          <table:table-cell table:style-name="ce32" table:formula="of:=IF([.$H356]=&quot;&quot;;&quot;&quot;;IF([.$G355]=&quot;&quot;;1;[.$G3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6]&lt;&gt;&quot;&quot;;NETWORKDAYS([.$L356];[.$M356];[$休日.$B$4:.$B$304]);&quot;&quot;)">
            <text:p/>
          </table:table-cell>
          <table:table-cell table:style-name="ce32" table:formula="of:=IF([.$L356]&lt;&gt;&quot;&quot;;NETWORKDAYS([.$L356];[.$M356];[$休日.$B$4:.$B$304]);&quot;&quot;)">
            <text:p/>
          </table:table-cell>
          <table:table-cell table:style-name="ce63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66"/>
          <table:table-cell table:style-name="ce66" table:formula="of:=SUM([.$V356:.$FM3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14" calcext:value-type="string">
            <text:p>E114</text:p>
          </table:table-cell>
          <table:table-cell table:style-name="ce13" table:formula="of:=IF(AND([.$D357]&lt;&gt;&quot;&quot;;[.$D357]&lt;&gt;&quot;○&quot;);MAX([.$C$3:.$C356])+1;[.$C356])" office:value-type="float" office:value="15" calcext:value-type="float">
            <text:p>15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32" table:formula="of:=IF([.$L357]&lt;&gt;&quot;&quot;;NETWORKDAYS([.$L357];[.$M357];[$休日.$B$4:.$B$304]);&quot;&quot;)">
            <text:p/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114" calcext:value-type="string">
            <text:p>E114</text:p>
          </table:table-cell>
          <table:table-cell table:style-name="ce13" table:formula="of:=IF(AND([.$D358]&lt;&gt;&quot;&quot;;[.$D358]&lt;&gt;&quot;○&quot;);MAX([.$C$3:.$C357])+1;[.$C357])" office:value-type="float" office:value="15" calcext:value-type="float">
            <text:p>15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32" table:formula="of:=IF([.$L358]&lt;&gt;&quot;&quot;;NETWORKDAYS([.$L358];[.$M358];[$休日.$B$4:.$B$304]);&quot;&quot;)">
            <text:p/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114" calcext:value-type="string">
            <text:p>E114</text:p>
          </table:table-cell>
          <table:table-cell table:style-name="ce13" table:formula="of:=IF(AND([.$D359]&lt;&gt;&quot;&quot;;[.$D359]&lt;&gt;&quot;○&quot;);MAX([.$C$3:.$C358])+1;[.$C358])" office:value-type="float" office:value="15" calcext:value-type="float">
            <text:p>15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32" table:formula="of:=IF([.$L359]&lt;&gt;&quot;&quot;;NETWORKDAYS([.$L359];[.$M359];[$休日.$B$4:.$B$304]);&quot;&quot;)">
            <text:p/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124" calcext:value-type="string">
            <text:p>E124</text:p>
          </table:table-cell>
          <table:table-cell table:style-name="ce13" table:formula="of:=IF(AND([.$D360]&lt;&gt;&quot;&quot;;[.$D360]&lt;&gt;&quot;○&quot;);MAX([.$C$3:.$C359])+1;[.$C359])" office:value-type="float" office:value="15" calcext:value-type="float">
            <text:p>15</text:p>
          </table:table-cell>
          <table:table-cell table:style-name="ce18"/>
          <table:table-cell table:style-name="ce30" table:formula="of:=IF(AND([.$F360]&lt;&gt;&quot;&quot;;[.$D359]&lt;&gt;&quot;&quot;);1;IF([.$F360]&lt;&gt;&quot;&quot;;MAX(INDIRECT([.$B360]):[.$E359])+1;&quot;&quot;))">
            <text:p/>
          </table:table-cell>
          <table:table-cell table:style-name="ce18"/>
          <table:table-cell table:style-name="ce30" table:formula="of:=IF([.$H360]=&quot;&quot;;&quot;&quot;;IF([.$G359]=&quot;&quot;;1;[.$G35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0]&lt;&gt;&quot;&quot;;NETWORKDAYS([.$L360];[.$M360];[$休日.$B$4:.$B$304]);&quot;&quot;)">
            <text:p/>
          </table:table-cell>
          <table:table-cell table:style-name="ce47"/>
          <table:table-cell table:style-name="ce18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18"/>
          <table:table-cell table:style-name="ce18" table:formula="of:=SUM([.$V360:.$FM36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124" calcext:value-type="string">
            <text:p>E124</text:p>
          </table:table-cell>
          <table:table-cell table:style-name="ce13" table:formula="of:=IF(AND([.$D361]&lt;&gt;&quot;&quot;;[.$D361]&lt;&gt;&quot;○&quot;);MAX([.$C$3:.$C360])+1;[.$C360])" office:value-type="float" office:value="15" calcext:value-type="float">
            <text:p>15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32" table:formula="of:=IF([.$L361]&lt;&gt;&quot;&quot;;NETWORKDAYS([.$L361];[.$M361];[$休日.$B$4:.$B$304]);&quot;&quot;)">
            <text:p/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24" calcext:value-type="string">
            <text:p>E124</text:p>
          </table:table-cell>
          <table:table-cell table:style-name="ce13" table:formula="of:=IF(AND([.$D362]&lt;&gt;&quot;&quot;;[.$D362]&lt;&gt;&quot;○&quot;);MAX([.$C$3:.$C361])+1;[.$C361])" office:value-type="float" office:value="15" calcext:value-type="float">
            <text:p>15</text:p>
          </table:table-cell>
          <table:table-cell table:style-name="ce19"/>
          <table:table-cell table:style-name="ce27" table:formula="of:=IF(AND([.$F362]&lt;&gt;&quot;&quot;;[.$D361]&lt;&gt;&quot;&quot;);1;IF([.$F362]&lt;&gt;&quot;&quot;;MAX(INDIRECT([.$B362]):[.$E361])+1;&quot;&quot;))">
            <text:p/>
          </table:table-cell>
          <table:table-cell table:style-name="ce32"/>
          <table:table-cell table:style-name="ce32" table:formula="of:=IF([.$H362]=&quot;&quot;;&quot;&quot;;IF([.$G361]=&quot;&quot;;1;[.$G36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2]&lt;&gt;&quot;&quot;;NETWORKDAYS([.$L362];[.$M362];[$休日.$B$4:.$B$304]);&quot;&quot;)">
            <text:p/>
          </table:table-cell>
          <table:table-cell table:style-name="ce32" table:formula="of:=IF([.$L362]&lt;&gt;&quot;&quot;;NETWORKDAYS([.$L362];[.$M362];[$休日.$B$4:.$B$304]);&quot;&quot;)">
            <text:p/>
          </table:table-cell>
          <table:table-cell table:style-name="ce63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66"/>
          <table:table-cell table:style-name="ce66" table:formula="of:=SUM([.$V362:.$FM3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24" calcext:value-type="string">
            <text:p>E124</text:p>
          </table:table-cell>
          <table:table-cell table:style-name="ce13" table:formula="of:=IF(AND([.$D363]&lt;&gt;&quot;&quot;;[.$D363]&lt;&gt;&quot;○&quot;);MAX([.$C$3:.$C362])+1;[.$C362])" office:value-type="float" office:value="15" calcext:value-type="float">
            <text:p>15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32" table:formula="of:=IF([.$L363]&lt;&gt;&quot;&quot;;NETWORKDAYS([.$L363];[.$M363];[$休日.$B$4:.$B$304]);&quot;&quot;)">
            <text:p/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24" calcext:value-type="string">
            <text:p>E124</text:p>
          </table:table-cell>
          <table:table-cell table:style-name="ce13" table:formula="of:=IF(AND([.$D364]&lt;&gt;&quot;&quot;;[.$D364]&lt;&gt;&quot;○&quot;);MAX([.$C$3:.$C363])+1;[.$C363])" office:value-type="float" office:value="15" calcext:value-type="float">
            <text:p>15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32" table:formula="of:=IF([.$L364]&lt;&gt;&quot;&quot;;NETWORKDAYS([.$L364];[.$M364];[$休日.$B$4:.$B$304]);&quot;&quot;)">
            <text:p/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24" calcext:value-type="string">
            <text:p>E124</text:p>
          </table:table-cell>
          <table:table-cell table:style-name="ce13" table:formula="of:=IF(AND([.$D365]&lt;&gt;&quot;&quot;;[.$D365]&lt;&gt;&quot;○&quot;);MAX([.$C$3:.$C364])+1;[.$C364])" office:value-type="float" office:value="15" calcext:value-type="float">
            <text:p>15</text:p>
          </table:table-cell>
          <table:table-cell table:style-name="ce19"/>
          <table:table-cell table:style-name="ce27" table:formula="of:=IF(AND([.$F365]&lt;&gt;&quot;&quot;;[.$D364]&lt;&gt;&quot;&quot;);1;IF([.$F365]&lt;&gt;&quot;&quot;;MAX(INDIRECT([.$B365]):[.$E364])+1;&quot;&quot;))">
            <text:p/>
          </table:table-cell>
          <table:table-cell table:style-name="ce32"/>
          <table:table-cell table:style-name="ce32" table:formula="of:=IF([.$H365]=&quot;&quot;;&quot;&quot;;IF([.$G364]=&quot;&quot;;1;[.$G36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5]&lt;&gt;&quot;&quot;;NETWORKDAYS([.$L365];[.$M365];[$休日.$B$4:.$B$304]);&quot;&quot;)">
            <text:p/>
          </table:table-cell>
          <table:table-cell table:style-name="ce32" table:formula="of:=IF([.$L365]&lt;&gt;&quot;&quot;;NETWORKDAYS([.$L365];[.$M365];[$休日.$B$4:.$B$304]);&quot;&quot;)">
            <text:p/>
          </table:table-cell>
          <table:table-cell table:style-name="ce63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66"/>
          <table:table-cell table:style-name="ce66" table:formula="of:=SUM([.$V365:.$FM3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24" calcext:value-type="string">
            <text:p>E124</text:p>
          </table:table-cell>
          <table:table-cell table:style-name="ce13" table:formula="of:=IF(AND([.$D366]&lt;&gt;&quot;&quot;;[.$D366]&lt;&gt;&quot;○&quot;);MAX([.$C$3:.$C365])+1;[.$C365])" office:value-type="float" office:value="15" calcext:value-type="float">
            <text:p>15</text:p>
          </table:table-cell>
          <table:table-cell table:style-name="ce19"/>
          <table:table-cell table:style-name="ce27" table:formula="of:=IF(AND([.$F366]&lt;&gt;&quot;&quot;;[.$D365]&lt;&gt;&quot;&quot;);1;IF([.$F366]&lt;&gt;&quot;&quot;;MAX(INDIRECT([.$B366]):[.$E365])+1;&quot;&quot;))">
            <text:p/>
          </table:table-cell>
          <table:table-cell table:style-name="ce32"/>
          <table:table-cell table:style-name="ce32" table:formula="of:=IF([.$H366]=&quot;&quot;;&quot;&quot;;IF([.$G365]=&quot;&quot;;1;[.$G3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6]&lt;&gt;&quot;&quot;;NETWORKDAYS([.$L366];[.$M366];[$休日.$B$4:.$B$304]);&quot;&quot;)">
            <text:p/>
          </table:table-cell>
          <table:table-cell table:style-name="ce32" table:formula="of:=IF([.$L366]&lt;&gt;&quot;&quot;;NETWORKDAYS([.$L366];[.$M366];[$休日.$B$4:.$B$304]);&quot;&quot;)">
            <text:p/>
          </table:table-cell>
          <table:table-cell table:style-name="ce63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66"/>
          <table:table-cell table:style-name="ce66" table:formula="of:=SUM([.$V366:.$FM3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24" calcext:value-type="string">
            <text:p>E124</text:p>
          </table:table-cell>
          <table:table-cell table:style-name="ce13" table:formula="of:=IF(AND([.$D367]&lt;&gt;&quot;&quot;;[.$D367]&lt;&gt;&quot;○&quot;);MAX([.$C$3:.$C366])+1;[.$C366])" office:value-type="float" office:value="15" calcext:value-type="float">
            <text:p>15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32" table:formula="of:=IF([.$L367]&lt;&gt;&quot;&quot;;NETWORKDAYS([.$L367];[.$M367];[$休日.$B$4:.$B$304]);&quot;&quot;)">
            <text:p/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string" office:string-value="E124" calcext:value-type="string">
            <text:p>E124</text:p>
          </table:table-cell>
          <table:table-cell table:style-name="ce13" table:formula="of:=IF(AND([.$D368]&lt;&gt;&quot;&quot;;[.$D368]&lt;&gt;&quot;○&quot;);MAX([.$C$3:.$C367])+1;[.$C367])" office:value-type="float" office:value="15" calcext:value-type="float">
            <text:p>15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32" table:formula="of:=IF([.$L368]&lt;&gt;&quot;&quot;;NETWORKDAYS([.$L368];[.$M368];[$休日.$B$4:.$B$304]);&quot;&quot;)">
            <text:p/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24" calcext:value-type="string">
            <text:p>E124</text:p>
          </table:table-cell>
          <table:table-cell table:style-name="ce13" table:formula="of:=IF(AND([.$D369]&lt;&gt;&quot;&quot;;[.$D369]&lt;&gt;&quot;○&quot;);MAX([.$C$3:.$C368])+1;[.$C368])" office:value-type="float" office:value="15" calcext:value-type="float">
            <text:p>15</text:p>
          </table:table-cell>
          <table:table-cell table:style-name="ce19"/>
          <table:table-cell table:style-name="ce27" table:formula="of:=IF(AND([.$F369]&lt;&gt;&quot;&quot;;[.$D368]&lt;&gt;&quot;&quot;);1;IF([.$F369]&lt;&gt;&quot;&quot;;MAX(INDIRECT([.$B369]):[.$E368])+1;&quot;&quot;))">
            <text:p/>
          </table:table-cell>
          <table:table-cell table:style-name="ce32"/>
          <table:table-cell table:style-name="ce32" table:formula="of:=IF([.$H369]=&quot;&quot;;&quot;&quot;;IF([.$G368]=&quot;&quot;;1;[.$G3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9]&lt;&gt;&quot;&quot;;NETWORKDAYS([.$L369];[.$M369];[$休日.$B$4:.$B$304]);&quot;&quot;)">
            <text:p/>
          </table:table-cell>
          <table:table-cell table:style-name="ce32" table:formula="of:=IF([.$L369]&lt;&gt;&quot;&quot;;NETWORKDAYS([.$L369];[.$M369];[$休日.$B$4:.$B$304]);&quot;&quot;)">
            <text:p/>
          </table:table-cell>
          <table:table-cell table:style-name="ce63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66"/>
          <table:table-cell table:style-name="ce66" table:formula="of:=SUM([.$V369:.$FM3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24" calcext:value-type="string">
            <text:p>E124</text:p>
          </table:table-cell>
          <table:table-cell table:style-name="ce13" table:formula="of:=IF(AND([.$D370]&lt;&gt;&quot;&quot;;[.$D370]&lt;&gt;&quot;○&quot;);MAX([.$C$3:.$C369])+1;[.$C369])" office:value-type="float" office:value="15" calcext:value-type="float">
            <text:p>15</text:p>
          </table:table-cell>
          <table:table-cell table:style-name="ce18"/>
          <table:table-cell table:style-name="ce30" table:formula="of:=IF(AND([.$F370]&lt;&gt;&quot;&quot;;[.$D369]&lt;&gt;&quot;&quot;);1;IF([.$F370]&lt;&gt;&quot;&quot;;MAX(INDIRECT([.$B370]):[.$E369])+1;&quot;&quot;))">
            <text:p/>
          </table:table-cell>
          <table:table-cell table:style-name="ce18"/>
          <table:table-cell table:style-name="ce30" table:formula="of:=IF([.$H370]=&quot;&quot;;&quot;&quot;;IF([.$G369]=&quot;&quot;;1;[.$G36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0]&lt;&gt;&quot;&quot;;NETWORKDAYS([.$L370];[.$M370];[$休日.$B$4:.$B$304]);&quot;&quot;)">
            <text:p/>
          </table:table-cell>
          <table:table-cell table:style-name="ce47"/>
          <table:table-cell table:style-name="ce18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18"/>
          <table:table-cell table:style-name="ce18" table:formula="of:=SUM([.$V370:.$FM37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4" calcext:value-type="string">
            <text:p>E124</text:p>
          </table:table-cell>
          <table:table-cell table:style-name="ce13" table:formula="of:=IF(AND([.$D371]&lt;&gt;&quot;&quot;;[.$D371]&lt;&gt;&quot;○&quot;);MAX([.$C$3:.$C370])+1;[.$C370])" office:value-type="float" office:value="15" calcext:value-type="float">
            <text:p>15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32" table:formula="of:=IF([.$L371]&lt;&gt;&quot;&quot;;NETWORKDAYS([.$L371];[.$M371];[$休日.$B$4:.$B$304]);&quot;&quot;)">
            <text:p/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float" office:value="0" calcext:value-type="float">
            <text:p>0</text:p>
          </table:table-cell>
          <table:table-cell table:style-name="ce13" table:formula="of:=IF(AND([.$D372]&lt;&gt;&quot;&quot;;[.$D372]&lt;&gt;&quot;○&quot;);MAX([.$C$3:.$C371])+1;[.$C371])" office:value-type="float" office:value="15" calcext:value-type="float">
            <text:p>15</text:p>
          </table:table-cell>
          <table:table-cell table:style-name="ce19"/>
          <table:table-cell table:style-name="ce27" table:formula="of:=IF(AND([.$F372]&lt;&gt;&quot;&quot;;[.$D371]&lt;&gt;&quot;&quot;);1;IF([.$F372]&lt;&gt;&quot;&quot;;MAX(INDIRECT([.$B372]):[.$E371])+1;&quot;&quot;))">
            <text:p/>
          </table:table-cell>
          <table:table-cell table:style-name="ce32"/>
          <table:table-cell table:style-name="ce32" table:formula="of:=IF([.$H372]=&quot;&quot;;&quot;&quot;;IF([.$G371]=&quot;&quot;;1;[.$G3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2]&lt;&gt;&quot;&quot;;NETWORKDAYS([.$L372];[.$M372];[$休日.$B$4:.$B$304]);&quot;&quot;)">
            <text:p/>
          </table:table-cell>
          <table:table-cell table:style-name="ce32" table:formula="of:=IF([.$L372]&lt;&gt;&quot;&quot;;NETWORKDAYS([.$L372];[.$M372];[$休日.$B$4:.$B$304]);&quot;&quot;)">
            <text:p/>
          </table:table-cell>
          <table:table-cell table:style-name="ce63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66"/>
          <table:table-cell table:style-name="ce66" table:formula="of:=SUM([.$V372:.$FM3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4" calcext:value-type="string">
            <text:p>E124</text:p>
          </table:table-cell>
          <table:table-cell table:style-name="ce13" table:formula="of:=IF(AND([.$D373]&lt;&gt;&quot;&quot;;[.$D373]&lt;&gt;&quot;○&quot;);MAX([.$C$3:.$C372])+1;[.$C372])" office:value-type="float" office:value="15" calcext:value-type="float">
            <text:p>15</text:p>
          </table:table-cell>
          <table:table-cell table:style-name="ce19"/>
          <table:table-cell table:style-name="ce27" table:formula="of:=IF(AND([.$F373]&lt;&gt;&quot;&quot;;[.$D372]&lt;&gt;&quot;&quot;);1;IF([.$F373]&lt;&gt;&quot;&quot;;MAX(INDIRECT([.$B373]):[.$E372])+1;&quot;&quot;))">
            <text:p/>
          </table:table-cell>
          <table:table-cell table:style-name="ce32"/>
          <table:table-cell table:style-name="ce32" table:formula="of:=IF([.$H373]=&quot;&quot;;&quot;&quot;;IF([.$G372]=&quot;&quot;;1;[.$G3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3]&lt;&gt;&quot;&quot;;NETWORKDAYS([.$L373];[.$M373];[$休日.$B$4:.$B$304]);&quot;&quot;)">
            <text:p/>
          </table:table-cell>
          <table:table-cell table:style-name="ce32" table:formula="of:=IF([.$L373]&lt;&gt;&quot;&quot;;NETWORKDAYS([.$L373];[.$M373];[$休日.$B$4:.$B$304]);&quot;&quot;)">
            <text:p/>
          </table:table-cell>
          <table:table-cell table:style-name="ce63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66"/>
          <table:table-cell table:style-name="ce66" table:formula="of:=SUM([.$V373:.$FM3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string" office:string-value="E124" calcext:value-type="string">
            <text:p>E124</text:p>
          </table:table-cell>
          <table:table-cell table:style-name="ce13" table:formula="of:=IF(AND([.$D374]&lt;&gt;&quot;&quot;;[.$D374]&lt;&gt;&quot;○&quot;);MAX([.$C$3:.$C373])+1;[.$C373])" office:value-type="float" office:value="15" calcext:value-type="float">
            <text:p>15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32" table:formula="of:=IF([.$L374]&lt;&gt;&quot;&quot;;NETWORKDAYS([.$L374];[.$M374];[$休日.$B$4:.$B$304]);&quot;&quot;)">
            <text:p/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4" calcext:value-type="string">
            <text:p>E124</text:p>
          </table:table-cell>
          <table:table-cell table:style-name="ce13" table:formula="of:=IF(AND([.$D375]&lt;&gt;&quot;&quot;;[.$D375]&lt;&gt;&quot;○&quot;);MAX([.$C$3:.$C374])+1;[.$C374])" office:value-type="float" office:value="15" calcext:value-type="float">
            <text:p>15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32" table:formula="of:=IF([.$L375]&lt;&gt;&quot;&quot;;NETWORKDAYS([.$L375];[.$M375];[$休日.$B$4:.$B$304]);&quot;&quot;)">
            <text:p/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4" calcext:value-type="string">
            <text:p>E124</text:p>
          </table:table-cell>
          <table:table-cell table:style-name="ce13" table:formula="of:=IF(AND([.$D376]&lt;&gt;&quot;&quot;;[.$D376]&lt;&gt;&quot;○&quot;);MAX([.$C$3:.$C375])+1;[.$C375])" office:value-type="float" office:value="15" calcext:value-type="float">
            <text:p>15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32" table:formula="of:=IF([.$L376]&lt;&gt;&quot;&quot;;NETWORKDAYS([.$L376];[.$M376];[$休日.$B$4:.$B$304]);&quot;&quot;)">
            <text:p/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4" calcext:value-type="string">
            <text:p>E124</text:p>
          </table:table-cell>
          <table:table-cell table:style-name="ce13" table:formula="of:=IF(AND([.$D377]&lt;&gt;&quot;&quot;;[.$D377]&lt;&gt;&quot;○&quot;);MAX([.$C$3:.$C376])+1;[.$C376])" office:value-type="float" office:value="15" calcext:value-type="float">
            <text:p>15</text:p>
          </table:table-cell>
          <table:table-cell table:style-name="ce18"/>
          <table:table-cell table:style-name="ce30" table:formula="of:=IF(AND([.$F377]&lt;&gt;&quot;&quot;;[.$D376]&lt;&gt;&quot;&quot;);1;IF([.$F377]&lt;&gt;&quot;&quot;;MAX(INDIRECT([.$B377]):[.$E376])+1;&quot;&quot;))">
            <text:p/>
          </table:table-cell>
          <table:table-cell table:style-name="ce18"/>
          <table:table-cell table:style-name="ce30" table:formula="of:=IF([.$H377]=&quot;&quot;;&quot;&quot;;IF([.$G376]=&quot;&quot;;1;[.$G376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7]&lt;&gt;&quot;&quot;;NETWORKDAYS([.$L377];[.$M377];[$休日.$B$4:.$B$304]);&quot;&quot;)">
            <text:p/>
          </table:table-cell>
          <table:table-cell table:style-name="ce47"/>
          <table:table-cell table:style-name="ce18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18"/>
          <table:table-cell table:style-name="ce18" table:formula="of:=SUM([.$V377:.$FM377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4" calcext:value-type="string">
            <text:p>E124</text:p>
          </table:table-cell>
          <table:table-cell table:style-name="ce13" table:formula="of:=IF(AND([.$D378]&lt;&gt;&quot;&quot;;[.$D378]&lt;&gt;&quot;○&quot;);MAX([.$C$3:.$C377])+1;[.$C377])" office:value-type="float" office:value="15" calcext:value-type="float">
            <text:p>15</text:p>
          </table:table-cell>
          <table:table-cell table:style-name="ce19"/>
          <table:table-cell table:style-name="ce27" table:formula="of:=IF(AND([.$F378]&lt;&gt;&quot;&quot;;[.$D377]&lt;&gt;&quot;&quot;);1;IF([.$F378]&lt;&gt;&quot;&quot;;MAX(INDIRECT([.$B378]):[.$E377])+1;&quot;&quot;))">
            <text:p/>
          </table:table-cell>
          <table:table-cell table:style-name="ce32"/>
          <table:table-cell table:style-name="ce32" table:formula="of:=IF([.$H378]=&quot;&quot;;&quot;&quot;;IF([.$G377]=&quot;&quot;;1;[.$G3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8]&lt;&gt;&quot;&quot;;NETWORKDAYS([.$L378];[.$M378];[$休日.$B$4:.$B$304]);&quot;&quot;)">
            <text:p/>
          </table:table-cell>
          <table:table-cell table:style-name="ce32" table:formula="of:=IF([.$L378]&lt;&gt;&quot;&quot;;NETWORKDAYS([.$L378];[.$M378];[$休日.$B$4:.$B$304]);&quot;&quot;)">
            <text:p/>
          </table:table-cell>
          <table:table-cell table:style-name="ce63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66"/>
          <table:table-cell table:style-name="ce66" table:formula="of:=SUM([.$V378:.$FM3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4" calcext:value-type="string">
            <text:p>E124</text:p>
          </table:table-cell>
          <table:table-cell table:style-name="ce13" table:formula="of:=IF(AND([.$D379]&lt;&gt;&quot;&quot;;[.$D379]&lt;&gt;&quot;○&quot;);MAX([.$C$3:.$C378])+1;[.$C378])" office:value-type="float" office:value="15" calcext:value-type="float">
            <text:p>15</text:p>
          </table:table-cell>
          <table:table-cell table:style-name="ce19"/>
          <table:table-cell table:style-name="ce27" table:formula="of:=IF(AND([.$F379]&lt;&gt;&quot;&quot;;[.$D378]&lt;&gt;&quot;&quot;);1;IF([.$F379]&lt;&gt;&quot;&quot;;MAX(INDIRECT([.$B379]):[.$E378])+1;&quot;&quot;))">
            <text:p/>
          </table:table-cell>
          <table:table-cell table:style-name="ce32"/>
          <table:table-cell table:style-name="ce32" table:formula="of:=IF([.$H379]=&quot;&quot;;&quot;&quot;;IF([.$G378]=&quot;&quot;;1;[.$G3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9]&lt;&gt;&quot;&quot;;NETWORKDAYS([.$L379];[.$M379];[$休日.$B$4:.$B$304]);&quot;&quot;)">
            <text:p/>
          </table:table-cell>
          <table:table-cell table:style-name="ce32" table:formula="of:=IF([.$L379]&lt;&gt;&quot;&quot;;NETWORKDAYS([.$L379];[.$M379];[$休日.$B$4:.$B$304]);&quot;&quot;)">
            <text:p/>
          </table:table-cell>
          <table:table-cell table:style-name="ce63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66"/>
          <table:table-cell table:style-name="ce66" table:formula="of:=SUM([.$V379:.$FM3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4" calcext:value-type="string">
            <text:p>E124</text:p>
          </table:table-cell>
          <table:table-cell table:style-name="ce13" table:formula="of:=IF(AND([.$D380]&lt;&gt;&quot;&quot;;[.$D380]&lt;&gt;&quot;○&quot;);MAX([.$C$3:.$C379])+1;[.$C379])" office:value-type="float" office:value="15" calcext:value-type="float">
            <text:p>15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32" table:formula="of:=IF([.$L380]&lt;&gt;&quot;&quot;;NETWORKDAYS([.$L380];[.$M380];[$休日.$B$4:.$B$304]);&quot;&quot;)">
            <text:p/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4" calcext:value-type="string">
            <text:p>E124</text:p>
          </table:table-cell>
          <table:table-cell table:style-name="ce13" table:formula="of:=IF(AND([.$D381]&lt;&gt;&quot;&quot;;[.$D381]&lt;&gt;&quot;○&quot;);MAX([.$C$3:.$C380])+1;[.$C380])" office:value-type="float" office:value="15" calcext:value-type="float">
            <text:p>15</text:p>
          </table:table-cell>
          <table:table-cell table:style-name="ce19"/>
          <table:table-cell table:style-name="ce27" table:formula="of:=IF(AND([.$F381]&lt;&gt;&quot;&quot;;[.$D380]&lt;&gt;&quot;&quot;);1;IF([.$F381]&lt;&gt;&quot;&quot;;MAX(INDIRECT([.$B381]):[.$E380])+1;&quot;&quot;))">
            <text:p/>
          </table:table-cell>
          <table:table-cell table:style-name="ce32"/>
          <table:table-cell table:style-name="ce32" table:formula="of:=IF([.$H381]=&quot;&quot;;&quot;&quot;;IF([.$G380]=&quot;&quot;;1;[.$G3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1]&lt;&gt;&quot;&quot;;NETWORKDAYS([.$L381];[.$M381];[$休日.$B$4:.$B$304]);&quot;&quot;)">
            <text:p/>
          </table:table-cell>
          <table:table-cell table:style-name="ce32" table:formula="of:=IF([.$L381]&lt;&gt;&quot;&quot;;NETWORKDAYS([.$L381];[.$M381];[$休日.$B$4:.$B$304]);&quot;&quot;)">
            <text:p/>
          </table:table-cell>
          <table:table-cell table:style-name="ce63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66"/>
          <table:table-cell table:style-name="ce66" table:formula="of:=SUM([.$V381:.$FM3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4" calcext:value-type="string">
            <text:p>E124</text:p>
          </table:table-cell>
          <table:table-cell table:style-name="ce13" table:formula="of:=IF(AND([.$D382]&lt;&gt;&quot;&quot;;[.$D382]&lt;&gt;&quot;○&quot;);MAX([.$C$3:.$C381])+1;[.$C381])" office:value-type="float" office:value="15" calcext:value-type="float">
            <text:p>15</text:p>
          </table:table-cell>
          <table:table-cell table:style-name="ce18"/>
          <table:table-cell table:style-name="ce30" table:formula="of:=IF(AND([.$F382]&lt;&gt;&quot;&quot;;[.$D381]&lt;&gt;&quot;&quot;);1;IF([.$F382]&lt;&gt;&quot;&quot;;MAX(INDIRECT([.$B382]):[.$E381])+1;&quot;&quot;))">
            <text:p/>
          </table:table-cell>
          <table:table-cell table:style-name="ce18"/>
          <table:table-cell table:style-name="ce30" table:formula="of:=IF([.$H382]=&quot;&quot;;&quot;&quot;;IF([.$G381]=&quot;&quot;;1;[.$G38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2]&lt;&gt;&quot;&quot;;NETWORKDAYS([.$L382];[.$M382];[$休日.$B$4:.$B$304]);&quot;&quot;)">
            <text:p/>
          </table:table-cell>
          <table:table-cell table:style-name="ce32" table:formula="of:=IF([.$L382]&lt;&gt;&quot;&quot;;NETWORKDAYS([.$L382];[.$M382];[$休日.$B$4:.$B$304]);&quot;&quot;)">
            <text:p/>
          </table:table-cell>
          <table:table-cell table:style-name="ce18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18"/>
          <table:table-cell table:style-name="ce18" table:formula="of:=SUM([.$V382:.$FM38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4" calcext:value-type="string">
            <text:p>E124</text:p>
          </table:table-cell>
          <table:table-cell table:style-name="ce13" table:formula="of:=IF(AND([.$D383]&lt;&gt;&quot;&quot;;[.$D383]&lt;&gt;&quot;○&quot;);MAX([.$C$3:.$C382])+1;[.$C382])" office:value-type="float" office:value="15" calcext:value-type="float">
            <text:p>15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32" table:formula="of:=IF([.$L383]&lt;&gt;&quot;&quot;;NETWORKDAYS([.$L383];[.$M383];[$休日.$B$4:.$B$304]);&quot;&quot;)">
            <text:p/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4" calcext:value-type="string">
            <text:p>E124</text:p>
          </table:table-cell>
          <table:table-cell table:style-name="ce13" table:formula="of:=IF(AND([.$D384]&lt;&gt;&quot;&quot;;[.$D384]&lt;&gt;&quot;○&quot;);MAX([.$C$3:.$C383])+1;[.$C383])" office:value-type="float" office:value="15" calcext:value-type="float">
            <text:p>15</text:p>
          </table:table-cell>
          <table:table-cell table:style-name="ce19"/>
          <table:table-cell table:style-name="ce27" table:formula="of:=IF(AND([.$F384]&lt;&gt;&quot;&quot;;[.$D383]&lt;&gt;&quot;&quot;);1;IF([.$F384]&lt;&gt;&quot;&quot;;MAX(INDIRECT([.$B384]):[.$E383])+1;&quot;&quot;))">
            <text:p/>
          </table:table-cell>
          <table:table-cell table:style-name="ce32"/>
          <table:table-cell table:style-name="ce32" table:formula="of:=IF([.$H384]=&quot;&quot;;&quot;&quot;;IF([.$G383]=&quot;&quot;;1;[.$G3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4]&lt;&gt;&quot;&quot;;NETWORKDAYS([.$L384];[.$M384];[$休日.$B$4:.$B$304]);&quot;&quot;)">
            <text:p/>
          </table:table-cell>
          <table:table-cell table:style-name="ce32" table:formula="of:=IF([.$L384]&lt;&gt;&quot;&quot;;NETWORKDAYS([.$L384];[.$M384];[$休日.$B$4:.$B$304]);&quot;&quot;)">
            <text:p/>
          </table:table-cell>
          <table:table-cell table:style-name="ce63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66"/>
          <table:table-cell table:style-name="ce66" table:formula="of:=SUM([.$V384:.$FM3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4" calcext:value-type="string">
            <text:p>E124</text:p>
          </table:table-cell>
          <table:table-cell table:style-name="ce13" table:formula="of:=IF(AND([.$D385]&lt;&gt;&quot;&quot;;[.$D385]&lt;&gt;&quot;○&quot;);MAX([.$C$3:.$C384])+1;[.$C384])" office:value-type="float" office:value="15" calcext:value-type="float">
            <text:p>15</text:p>
          </table:table-cell>
          <table:table-cell table:style-name="ce19"/>
          <table:table-cell table:style-name="ce27" table:formula="of:=IF(AND([.$F385]&lt;&gt;&quot;&quot;;[.$D384]&lt;&gt;&quot;&quot;);1;IF([.$F385]&lt;&gt;&quot;&quot;;MAX(INDIRECT([.$B385]):[.$E384])+1;&quot;&quot;))">
            <text:p/>
          </table:table-cell>
          <table:table-cell table:style-name="ce32"/>
          <table:table-cell table:style-name="ce32" table:formula="of:=IF([.$H385]=&quot;&quot;;&quot;&quot;;IF([.$G384]=&quot;&quot;;1;[.$G3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5]&lt;&gt;&quot;&quot;;NETWORKDAYS([.$L385];[.$M385];[$休日.$B$4:.$B$304]);&quot;&quot;)">
            <text:p/>
          </table:table-cell>
          <table:table-cell table:style-name="ce32" table:formula="of:=IF([.$L385]&lt;&gt;&quot;&quot;;NETWORKDAYS([.$L385];[.$M385];[$休日.$B$4:.$B$304]);&quot;&quot;)">
            <text:p/>
          </table:table-cell>
          <table:table-cell table:style-name="ce63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66"/>
          <table:table-cell table:style-name="ce66" table:formula="of:=SUM([.$V385:.$FM3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124" calcext:value-type="string">
            <text:p>E124</text:p>
          </table:table-cell>
          <table:table-cell table:style-name="ce13" table:formula="of:=IF(AND([.$D386]&lt;&gt;&quot;&quot;;[.$D386]&lt;&gt;&quot;○&quot;);MAX([.$C$3:.$C385])+1;[.$C385])" office:value-type="float" office:value="15" calcext:value-type="float">
            <text:p>15</text:p>
          </table:table-cell>
          <table:table-cell table:style-name="ce18"/>
          <table:table-cell table:style-name="ce30" table:formula="of:=IF(AND([.$F386]&lt;&gt;&quot;&quot;;[.$D385]&lt;&gt;&quot;&quot;);1;IF([.$F386]&lt;&gt;&quot;&quot;;MAX(INDIRECT([.$B386]):[.$E385])+1;&quot;&quot;))">
            <text:p/>
          </table:table-cell>
          <table:table-cell table:style-name="ce18"/>
          <table:table-cell table:style-name="ce30" table:formula="of:=IF([.$H386]=&quot;&quot;;&quot;&quot;;IF([.$G385]=&quot;&quot;;1;[.$G385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6]&lt;&gt;&quot;&quot;;NETWORKDAYS([.$L386];[.$M386];[$休日.$B$4:.$B$304]);&quot;&quot;)">
            <text:p/>
          </table:table-cell>
          <table:table-cell table:style-name="ce32" table:formula="of:=IF([.$L386]&lt;&gt;&quot;&quot;;NETWORKDAYS([.$L386];[.$M386];[$休日.$B$4:.$B$304]);&quot;&quot;)">
            <text:p/>
          </table:table-cell>
          <table:table-cell table:style-name="ce18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18"/>
          <table:table-cell table:style-name="ce18" table:formula="of:=SUM([.$V386:.$FM386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E124" calcext:value-type="string">
            <text:p>E124</text:p>
          </table:table-cell>
          <table:table-cell table:style-name="ce13" table:formula="of:=IF(AND([.$D387]&lt;&gt;&quot;&quot;;[.$D387]&lt;&gt;&quot;○&quot;);MAX([.$C$3:.$C386])+1;[.$C386])" office:value-type="float" office:value="15" calcext:value-type="float">
            <text:p>15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32" table:formula="of:=IF([.$L387]&lt;&gt;&quot;&quot;;NETWORKDAYS([.$L387];[.$M387];[$休日.$B$4:.$B$304]);&quot;&quot;)">
            <text:p/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88]&lt;&gt;&quot;&quot;;[.$F388]=&quot;&quot;);&quot;E&quot;&amp;ROW();[.$B311])" office:value-type="string" office:string-value="E124" calcext:value-type="string">
            <text:p>E124</text:p>
          </table:table-cell>
          <table:table-cell table:style-name="ce13" table:formula="of:=IF(AND([.$D388]&lt;&gt;&quot;&quot;;[.$D388]&lt;&gt;&quot;○&quot;);MAX([.$C$3:.$C387])+1;[.$C387])" office:value-type="float" office:value="15" calcext:value-type="float">
            <text:p>15</text:p>
          </table:table-cell>
          <table:table-cell table:style-name="ce19"/>
          <table:table-cell table:style-name="ce27" table:formula="of:=IF(AND([.$F388]&lt;&gt;&quot;&quot;;[.$D387]&lt;&gt;&quot;&quot;);1;IF([.$F388]&lt;&gt;&quot;&quot;;MAX(INDIRECT([.$B388]):[.$E387])+1;&quot;&quot;))">
            <text:p/>
          </table:table-cell>
          <table:table-cell table:style-name="ce32"/>
          <table:table-cell table:style-name="ce32" table:formula="of:=IF([.$H388]=&quot;&quot;;&quot;&quot;;IF([.$G387]=&quot;&quot;;1;[.$G3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8]&lt;&gt;&quot;&quot;;NETWORKDAYS([.$L388];[.$M388];[$休日.$B$4:.$B$304]);&quot;&quot;)">
            <text:p/>
          </table:table-cell>
          <table:table-cell table:style-name="ce32" table:formula="of:=IF([.$L388]&lt;&gt;&quot;&quot;;NETWORKDAYS([.$L388];[.$M388];[$休日.$B$4:.$B$304]);&quot;&quot;)">
            <text:p/>
          </table:table-cell>
          <table:table-cell table:style-name="ce63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66"/>
          <table:table-cell table:style-name="ce66" table:formula="of:=SUM([.$V388:.$FM3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89]&lt;&gt;&quot;&quot;;[.$F389]=&quot;&quot;);&quot;E&quot;&amp;ROW();[.$B312])" office:value-type="string" office:string-value="E124" calcext:value-type="string">
            <text:p>E124</text:p>
          </table:table-cell>
          <table:table-cell table:style-name="ce13" table:formula="of:=IF(AND([.$D389]&lt;&gt;&quot;&quot;;[.$D389]&lt;&gt;&quot;○&quot;);MAX([.$C$3:.$C388])+1;[.$C388])" office:value-type="float" office:value="15" calcext:value-type="float">
            <text:p>15</text:p>
          </table:table-cell>
          <table:table-cell table:style-name="ce19"/>
          <table:table-cell table:style-name="ce27" table:formula="of:=IF(AND([.$F389]&lt;&gt;&quot;&quot;;[.$D388]&lt;&gt;&quot;&quot;);1;IF([.$F389]&lt;&gt;&quot;&quot;;MAX(INDIRECT([.$B389]):[.$E388])+1;&quot;&quot;))">
            <text:p/>
          </table:table-cell>
          <table:table-cell table:style-name="ce32"/>
          <table:table-cell table:style-name="ce32" table:formula="of:=IF([.$H389]=&quot;&quot;;&quot;&quot;;IF([.$G388]=&quot;&quot;;1;[.$G3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9]&lt;&gt;&quot;&quot;;NETWORKDAYS([.$L389];[.$M389];[$休日.$B$4:.$B$304]);&quot;&quot;)">
            <text:p/>
          </table:table-cell>
          <table:table-cell table:style-name="ce32" table:formula="of:=IF([.$L389]&lt;&gt;&quot;&quot;;NETWORKDAYS([.$L389];[.$M389];[$休日.$B$4:.$B$304]);&quot;&quot;)">
            <text:p/>
          </table:table-cell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6"/>
          <table:table-cell table:style-name="ce66" table:formula="of:=SUM([.$V389:.$FM3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90]&lt;&gt;&quot;&quot;;[.$F390]=&quot;&quot;);&quot;E&quot;&amp;ROW();[.$B313])" office:value-type="string" office:string-value="E124" calcext:value-type="string">
            <text:p>E124</text:p>
          </table:table-cell>
          <table:table-cell table:style-name="ce13" table:formula="of:=IF(AND([.$D390]&lt;&gt;&quot;&quot;;[.$D390]&lt;&gt;&quot;○&quot;);MAX([.$C$3:.$C389])+1;[.$C389])" office:value-type="float" office:value="15" calcext:value-type="float">
            <text:p>15</text:p>
          </table:table-cell>
          <table:table-cell table:style-name="ce18"/>
          <table:table-cell table:style-name="ce30" table:formula="of:=IF(AND([.$F390]&lt;&gt;&quot;&quot;;[.$D389]&lt;&gt;&quot;&quot;);1;IF([.$F390]&lt;&gt;&quot;&quot;;MAX(INDIRECT([.$B390]):[.$E389])+1;&quot;&quot;))">
            <text:p/>
          </table:table-cell>
          <table:table-cell table:style-name="ce18"/>
          <table:table-cell table:style-name="ce30" table:formula="of:=IF([.$H390]=&quot;&quot;;&quot;&quot;;IF([.$G389]=&quot;&quot;;1;[.$G38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90]&lt;&gt;&quot;&quot;;NETWORKDAYS([.$L390];[.$M390];[$休日.$B$4:.$B$304]);&quot;&quot;)">
            <text:p/>
          </table:table-cell>
          <table:table-cell table:style-name="ce32" table:formula="of:=IF([.$L390]&lt;&gt;&quot;&quot;;NETWORKDAYS([.$L390];[.$M390];[$休日.$B$4:.$B$304]);&quot;&quot;)">
            <text:p/>
          </table:table-cell>
          <table:table-cell table:style-name="ce18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18"/>
          <table:table-cell table:style-name="ce18" table:formula="of:=SUM([.$V390:.$FM39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91]&lt;&gt;&quot;&quot;;[.$F391]=&quot;&quot;);&quot;E&quot;&amp;ROW();[.$B314])" office:value-type="string" office:string-value="" calcext:value-type="error">
            <text:p>#REF!</text:p>
          </table:table-cell>
          <table:table-cell table:style-name="ce13" table:formula="of:=IF(AND([.$D391]&lt;&gt;&quot;&quot;;[.$D391]&lt;&gt;&quot;○&quot;);MAX([.$C$3:.$C390])+1;[.$C390])" office:value-type="float" office:value="15" calcext:value-type="float">
            <text:p>15</text:p>
          </table:table-cell>
          <table:table-cell table:style-name="ce19"/>
          <table:table-cell table:style-name="ce27" table:formula="of:=IF(AND([.$F391]&lt;&gt;&quot;&quot;;[.$D390]&lt;&gt;&quot;&quot;);1;IF([.$F391]&lt;&gt;&quot;&quot;;MAX(INDIRECT([.$B391]):[.$E390])+1;&quot;&quot;))">
            <text:p/>
          </table:table-cell>
          <table:table-cell table:style-name="ce32"/>
          <table:table-cell table:style-name="ce32" table:formula="of:=IF([.$H391]=&quot;&quot;;&quot;&quot;;IF([.$G390]=&quot;&quot;;1;[.$G3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1]&lt;&gt;&quot;&quot;;NETWORKDAYS([.$L391];[.$M391];[$休日.$B$4:.$B$304]);&quot;&quot;)">
            <text:p/>
          </table:table-cell>
          <table:table-cell table:style-name="ce32" table:formula="of:=IF([.$L391]&lt;&gt;&quot;&quot;;NETWORKDAYS([.$L391];[.$M391];[$休日.$B$4:.$B$304]);&quot;&quot;)">
            <text:p/>
          </table:table-cell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6"/>
          <table:table-cell table:style-name="ce66" table:formula="of:=SUM([.$V391:.$FM3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92]&lt;&gt;&quot;&quot;;[.$F392]=&quot;&quot;);&quot;E&quot;&amp;ROW();[.$B315])" office:value-type="string" office:string-value="" calcext:value-type="error">
            <text:p>#REF!</text:p>
          </table:table-cell>
          <table:table-cell table:style-name="ce13" table:formula="of:=IF(AND([.$D392]&lt;&gt;&quot;&quot;;[.$D392]&lt;&gt;&quot;○&quot;);MAX([.$C$3:.$C391])+1;[.$C391])" office:value-type="float" office:value="15" calcext:value-type="float">
            <text:p>15</text:p>
          </table:table-cell>
          <table:table-cell table:style-name="ce19"/>
          <table:table-cell table:style-name="ce27" table:formula="of:=IF(AND([.$F392]&lt;&gt;&quot;&quot;;[.$D391]&lt;&gt;&quot;&quot;);1;IF([.$F392]&lt;&gt;&quot;&quot;;MAX(INDIRECT([.$B392]):[.$E391])+1;&quot;&quot;))">
            <text:p/>
          </table:table-cell>
          <table:table-cell table:style-name="ce32"/>
          <table:table-cell table:style-name="ce32" table:formula="of:=IF([.$H392]=&quot;&quot;;&quot;&quot;;IF([.$G391]=&quot;&quot;;1;[.$G3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2]&lt;&gt;&quot;&quot;;NETWORKDAYS([.$L392];[.$M392];[$休日.$B$4:.$B$304]);&quot;&quot;)">
            <text:p/>
          </table:table-cell>
          <table:table-cell table:style-name="ce32" table:formula="of:=IF([.$L392]&lt;&gt;&quot;&quot;;NETWORKDAYS([.$L392];[.$M392];[$休日.$B$4:.$B$304]);&quot;&quot;)">
            <text:p/>
          </table:table-cell>
          <table:table-cell table:style-name="ce63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66"/>
          <table:table-cell table:style-name="ce66" table:formula="of:=SUM([.$V392:.$FM3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93]&lt;&gt;&quot;&quot;;[.$F393]=&quot;&quot;);&quot;E&quot;&amp;ROW();[.$B316])" office:value-type="string" office:string-value="" calcext:value-type="error">
            <text:p>#REF!</text:p>
          </table:table-cell>
          <table:table-cell table:style-name="ce13" table:formula="of:=IF(AND([.$D393]&lt;&gt;&quot;&quot;;[.$D393]&lt;&gt;&quot;○&quot;);MAX([.$C$3:.$C392])+1;[.$C392])" office:value-type="float" office:value="15" calcext:value-type="float">
            <text:p>15</text:p>
          </table:table-cell>
          <table:table-cell table:style-name="ce19"/>
          <table:table-cell table:style-name="ce27" table:formula="of:=IF(AND([.$F393]&lt;&gt;&quot;&quot;;[.$D392]&lt;&gt;&quot;&quot;);1;IF([.$F393]&lt;&gt;&quot;&quot;;MAX(INDIRECT([.$B393]):[.$E392])+1;&quot;&quot;))">
            <text:p/>
          </table:table-cell>
          <table:table-cell table:style-name="ce32"/>
          <table:table-cell table:style-name="ce32" table:formula="of:=IF([.$H393]=&quot;&quot;;&quot;&quot;;IF([.$G392]=&quot;&quot;;1;[.$G3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3]&lt;&gt;&quot;&quot;;NETWORKDAYS([.$L393];[.$M393];[$休日.$B$4:.$B$304]);&quot;&quot;)">
            <text:p/>
          </table:table-cell>
          <table:table-cell table:style-name="ce32" table:formula="of:=IF([.$L393]&lt;&gt;&quot;&quot;;NETWORKDAYS([.$L393];[.$M393];[$休日.$B$4:.$B$304]);&quot;&quot;)">
            <text:p/>
          </table:table-cell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6"/>
          <table:table-cell table:style-name="ce66" table:formula="of:=SUM([.$V393:.$FM3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94]&lt;&gt;&quot;&quot;;[.$F394]=&quot;&quot;);&quot;E&quot;&amp;ROW();[.$B317])" office:value-type="string" office:string-value="" calcext:value-type="error">
            <text:p>#REF!</text:p>
          </table:table-cell>
          <table:table-cell table:style-name="ce13" table:formula="of:=IF(AND([.$D394]&lt;&gt;&quot;&quot;;[.$D394]&lt;&gt;&quot;○&quot;);MAX([.$C$3:.$C393])+1;[.$C393])" office:value-type="float" office:value="15" calcext:value-type="float">
            <text:p>15</text:p>
          </table:table-cell>
          <table:table-cell table:style-name="ce19"/>
          <table:table-cell table:style-name="ce27" table:formula="of:=IF(AND([.$F394]&lt;&gt;&quot;&quot;;[.$D393]&lt;&gt;&quot;&quot;);1;IF([.$F394]&lt;&gt;&quot;&quot;;MAX(INDIRECT([.$B394]):[.$E393])+1;&quot;&quot;))">
            <text:p/>
          </table:table-cell>
          <table:table-cell table:style-name="ce32"/>
          <table:table-cell table:style-name="ce32" table:formula="of:=IF([.$H394]=&quot;&quot;;&quot;&quot;;IF([.$G393]=&quot;&quot;;1;[.$G3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4]&lt;&gt;&quot;&quot;;NETWORKDAYS([.$L394];[.$M394];[$休日.$B$4:.$B$304]);&quot;&quot;)">
            <text:p/>
          </table:table-cell>
          <table:table-cell table:style-name="ce32" table:formula="of:=IF([.$L394]&lt;&gt;&quot;&quot;;NETWORKDAYS([.$L394];[.$M394];[$休日.$B$4:.$B$304]);&quot;&quot;)">
            <text:p/>
          </table:table-cell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6"/>
          <table:table-cell table:style-name="ce66" table:formula="of:=SUM([.$V394:.$FM3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95]&lt;&gt;&quot;&quot;;[.$F395]=&quot;&quot;);&quot;E&quot;&amp;ROW();[.$B318])" office:value-type="string" office:string-value="" calcext:value-type="error">
            <text:p>#REF!</text:p>
          </table:table-cell>
          <table:table-cell table:style-name="ce13" table:formula="of:=IF(AND([.$D395]&lt;&gt;&quot;&quot;;[.$D395]&lt;&gt;&quot;○&quot;);MAX([.$C$3:.$C394])+1;[.$C394])" office:value-type="float" office:value="15" calcext:value-type="float">
            <text:p>15</text:p>
          </table:table-cell>
          <table:table-cell table:style-name="ce19"/>
          <table:table-cell table:style-name="ce27" table:formula="of:=IF(AND([.$F395]&lt;&gt;&quot;&quot;;[.$D394]&lt;&gt;&quot;&quot;);1;IF([.$F395]&lt;&gt;&quot;&quot;;MAX(INDIRECT([.$B395]):[.$E394])+1;&quot;&quot;))">
            <text:p/>
          </table:table-cell>
          <table:table-cell table:style-name="ce32"/>
          <table:table-cell table:style-name="ce32" table:formula="of:=IF([.$H395]=&quot;&quot;;&quot;&quot;;IF([.$G394]=&quot;&quot;;1;[.$G3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5]&lt;&gt;&quot;&quot;;NETWORKDAYS([.$L395];[.$M395];[$休日.$B$4:.$B$304]);&quot;&quot;)">
            <text:p/>
          </table:table-cell>
          <table:table-cell table:style-name="ce32" table:formula="of:=IF([.$L395]&lt;&gt;&quot;&quot;;NETWORKDAYS([.$L395];[.$M395];[$休日.$B$4:.$B$304]);&quot;&quot;)">
            <text:p/>
          </table:table-cell>
          <table:table-cell table:style-name="ce63" table:formula="of:=IF(OR(AND([.$N395]=&quot;&quot;;[.$L395]&lt;&gt;&quot;&quot;;[.$L395]&lt;=[.$U$1]);AND([.$M395]&lt;&gt;&quot;&quot;;[.Q395]&lt;100;[.$M395]&lt;=[.$U$1]));&quot;遅延&quot;;&quot;&quot;)">
            <text:p/>
          </table:table-cell>
          <table:table-cell table:style-name="ce66"/>
          <table:table-cell table:style-name="ce66" table:formula="of:=SUM([.$V395:.$FM3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96]&lt;&gt;&quot;&quot;;[.$F396]=&quot;&quot;);&quot;E&quot;&amp;ROW();[.$B319])" office:value-type="string" office:string-value="" calcext:value-type="error">
            <text:p>#REF!</text:p>
          </table:table-cell>
          <table:table-cell table:style-name="ce13" table:formula="of:=IF(AND([.$D396]&lt;&gt;&quot;&quot;;[.$D396]&lt;&gt;&quot;○&quot;);MAX([.$C$3:.$C395])+1;[.$C395])" office:value-type="float" office:value="15" calcext:value-type="float">
            <text:p>15</text:p>
          </table:table-cell>
          <table:table-cell table:style-name="ce19"/>
          <table:table-cell table:style-name="ce27" table:formula="of:=IF(AND([.$F396]&lt;&gt;&quot;&quot;;[.$D395]&lt;&gt;&quot;&quot;);1;IF([.$F396]&lt;&gt;&quot;&quot;;MAX(INDIRECT([.$B396]):[.$E395])+1;&quot;&quot;))">
            <text:p/>
          </table:table-cell>
          <table:table-cell table:style-name="ce32"/>
          <table:table-cell table:style-name="ce32" table:formula="of:=IF([.$H396]=&quot;&quot;;&quot;&quot;;IF([.$G395]=&quot;&quot;;1;[.$G3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6]&lt;&gt;&quot;&quot;;NETWORKDAYS([.$L396];[.$M396];[$休日.$B$4:.$B$304]);&quot;&quot;)">
            <text:p/>
          </table:table-cell>
          <table:table-cell table:style-name="ce32" table:formula="of:=IF([.$L396]&lt;&gt;&quot;&quot;;NETWORKDAYS([.$L396];[.$M396];[$休日.$B$4:.$B$304]);&quot;&quot;)">
            <text:p/>
          </table:table-cell>
          <table:table-cell table:style-name="ce63" table:formula="of:=IF(OR(AND([.$N396]=&quot;&quot;;[.$L396]&lt;&gt;&quot;&quot;;[.$L396]&lt;=[.$U$1]);AND([.$M396]&lt;&gt;&quot;&quot;;[.Q396]&lt;100;[.$M396]&lt;=[.$U$1]));&quot;遅延&quot;;&quot;&quot;)">
            <text:p/>
          </table:table-cell>
          <table:table-cell table:style-name="ce66"/>
          <table:table-cell table:style-name="ce66" table:formula="of:=SUM([.$V396:.$FM3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97]&lt;&gt;&quot;&quot;;[.$F397]=&quot;&quot;);&quot;E&quot;&amp;ROW();[.$B320])" office:value-type="string" office:string-value="" calcext:value-type="error">
            <text:p>#REF!</text:p>
          </table:table-cell>
          <table:table-cell table:style-name="ce13" table:formula="of:=IF(AND([.$D397]&lt;&gt;&quot;&quot;;[.$D397]&lt;&gt;&quot;○&quot;);MAX([.$C$3:.$C396])+1;[.$C396])" office:value-type="float" office:value="15" calcext:value-type="float">
            <text:p>15</text:p>
          </table:table-cell>
          <table:table-cell table:style-name="ce19"/>
          <table:table-cell table:style-name="ce27" table:formula="of:=IF(AND([.$F397]&lt;&gt;&quot;&quot;;[.$D396]&lt;&gt;&quot;&quot;);1;IF([.$F397]&lt;&gt;&quot;&quot;;MAX(INDIRECT([.$B397]):[.$E396])+1;&quot;&quot;))">
            <text:p/>
          </table:table-cell>
          <table:table-cell table:style-name="ce32"/>
          <table:table-cell table:style-name="ce32" table:formula="of:=IF([.$H397]=&quot;&quot;;&quot;&quot;;IF([.$G396]=&quot;&quot;;1;[.$G3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7]&lt;&gt;&quot;&quot;;NETWORKDAYS([.$L397];[.$M397];[$休日.$B$4:.$B$304]);&quot;&quot;)">
            <text:p/>
          </table:table-cell>
          <table:table-cell table:style-name="ce32" table:formula="of:=IF([.$L397]&lt;&gt;&quot;&quot;;NETWORKDAYS([.$L397];[.$M397];[$休日.$B$4:.$B$304]);&quot;&quot;)">
            <text:p/>
          </table:table-cell>
          <table:table-cell table:style-name="ce63" table:formula="of:=IF(OR(AND([.$N397]=&quot;&quot;;[.$L397]&lt;&gt;&quot;&quot;;[.$L397]&lt;=[.$U$1]);AND([.$M397]&lt;&gt;&quot;&quot;;[.Q397]&lt;100;[.$M397]&lt;=[.$U$1]));&quot;遅延&quot;;&quot;&quot;)">
            <text:p/>
          </table:table-cell>
          <table:table-cell table:style-name="ce66"/>
          <table:table-cell table:style-name="ce66" table:formula="of:=SUM([.$V397:.$FM3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98]&lt;&gt;&quot;&quot;;[.$F398]=&quot;&quot;);&quot;E&quot;&amp;ROW();[.$B321])" office:value-type="string" office:string-value="" calcext:value-type="error">
            <text:p>#REF!</text:p>
          </table:table-cell>
          <table:table-cell table:style-name="ce13" table:formula="of:=IF(AND([.$D398]&lt;&gt;&quot;&quot;;[.$D398]&lt;&gt;&quot;○&quot;);MAX([.$C$3:.$C397])+1;[.$C397])" office:value-type="float" office:value="15" calcext:value-type="float">
            <text:p>15</text:p>
          </table:table-cell>
          <table:table-cell table:style-name="ce19"/>
          <table:table-cell table:style-name="ce27" table:formula="of:=IF(AND([.$F398]&lt;&gt;&quot;&quot;;[.$D397]&lt;&gt;&quot;&quot;);1;IF([.$F398]&lt;&gt;&quot;&quot;;MAX(INDIRECT([.$B398]):[.$E397])+1;&quot;&quot;))">
            <text:p/>
          </table:table-cell>
          <table:table-cell table:style-name="ce32"/>
          <table:table-cell table:style-name="ce32" table:formula="of:=IF([.$H398]=&quot;&quot;;&quot;&quot;;IF([.$G397]=&quot;&quot;;1;[.$G3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8]&lt;&gt;&quot;&quot;;NETWORKDAYS([.$L398];[.$M398];[$休日.$B$4:.$B$304]);&quot;&quot;)">
            <text:p/>
          </table:table-cell>
          <table:table-cell table:style-name="ce32" table:formula="of:=IF([.$L398]&lt;&gt;&quot;&quot;;NETWORKDAYS([.$L398];[.$M398];[$休日.$B$4:.$B$304]);&quot;&quot;)">
            <text:p/>
          </table:table-cell>
          <table:table-cell table:style-name="ce63" table:formula="of:=IF(OR(AND([.$N398]=&quot;&quot;;[.$L398]&lt;&gt;&quot;&quot;;[.$L398]&lt;=[.$U$1]);AND([.$M398]&lt;&gt;&quot;&quot;;[.Q398]&lt;100;[.$M398]&lt;=[.$U$1]));&quot;遅延&quot;;&quot;&quot;)">
            <text:p/>
          </table:table-cell>
          <table:table-cell table:style-name="ce66"/>
          <table:table-cell table:style-name="ce66" table:formula="of:=SUM([.$V398:.$FM3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99]&lt;&gt;&quot;&quot;;[.$F399]=&quot;&quot;);&quot;E&quot;&amp;ROW();[.$B322])" office:value-type="string" office:string-value="" calcext:value-type="error">
            <text:p>#REF!</text:p>
          </table:table-cell>
          <table:table-cell table:style-name="ce13" table:formula="of:=IF(AND([.$D399]&lt;&gt;&quot;&quot;;[.$D399]&lt;&gt;&quot;○&quot;);MAX([.$C$3:.$C398])+1;[.$C398])" office:value-type="float" office:value="15" calcext:value-type="float">
            <text:p>15</text:p>
          </table:table-cell>
          <table:table-cell table:style-name="ce19"/>
          <table:table-cell table:style-name="ce27" table:formula="of:=IF(AND([.$F399]&lt;&gt;&quot;&quot;;[.$D398]&lt;&gt;&quot;&quot;);1;IF([.$F399]&lt;&gt;&quot;&quot;;MAX(INDIRECT([.$B399]):[.$E398])+1;&quot;&quot;))">
            <text:p/>
          </table:table-cell>
          <table:table-cell table:style-name="ce32"/>
          <table:table-cell table:style-name="ce32" table:formula="of:=IF([.$H399]=&quot;&quot;;&quot;&quot;;IF([.$G398]=&quot;&quot;;1;[.$G3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9]&lt;&gt;&quot;&quot;;NETWORKDAYS([.$L399];[.$M399];[$休日.$B$4:.$B$304]);&quot;&quot;)">
            <text:p/>
          </table:table-cell>
          <table:table-cell table:style-name="ce32" table:formula="of:=IF([.$L399]&lt;&gt;&quot;&quot;;NETWORKDAYS([.$L399];[.$M399];[$休日.$B$4:.$B$304]);&quot;&quot;)">
            <text:p/>
          </table:table-cell>
          <table:table-cell table:style-name="ce63" table:formula="of:=IF(OR(AND([.$N399]=&quot;&quot;;[.$L399]&lt;&gt;&quot;&quot;;[.$L399]&lt;=[.$U$1]);AND([.$M399]&lt;&gt;&quot;&quot;;[.Q399]&lt;100;[.$M399]&lt;=[.$U$1]));&quot;遅延&quot;;&quot;&quot;)">
            <text:p/>
          </table:table-cell>
          <table:table-cell table:style-name="ce66"/>
          <table:table-cell table:style-name="ce66" table:formula="of:=SUM([.$V399:.$FM3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00]&lt;&gt;&quot;&quot;;[.$F400]=&quot;&quot;);&quot;E&quot;&amp;ROW();[.$B323])" office:value-type="string" office:string-value="" calcext:value-type="error">
            <text:p>#REF!</text:p>
          </table:table-cell>
          <table:table-cell table:style-name="ce13" table:formula="of:=IF(AND([.$D400]&lt;&gt;&quot;&quot;;[.$D400]&lt;&gt;&quot;○&quot;);MAX([.$C$3:.$C399])+1;[.$C399])" office:value-type="float" office:value="15" calcext:value-type="float">
            <text:p>15</text:p>
          </table:table-cell>
          <table:table-cell table:style-name="ce19"/>
          <table:table-cell table:style-name="ce27" table:formula="of:=IF(AND([.$F400]&lt;&gt;&quot;&quot;;[.$D399]&lt;&gt;&quot;&quot;);1;IF([.$F400]&lt;&gt;&quot;&quot;;MAX(INDIRECT([.$B400]):[.$E399])+1;&quot;&quot;))">
            <text:p/>
          </table:table-cell>
          <table:table-cell table:style-name="ce32"/>
          <table:table-cell table:style-name="ce32" table:formula="of:=IF([.$H400]=&quot;&quot;;&quot;&quot;;IF([.$G399]=&quot;&quot;;1;[.$G3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0]&lt;&gt;&quot;&quot;;NETWORKDAYS([.$L400];[.$M400];[$休日.$B$4:.$B$304]);&quot;&quot;)">
            <text:p/>
          </table:table-cell>
          <table:table-cell table:style-name="ce32" table:formula="of:=IF([.$L400]&lt;&gt;&quot;&quot;;NETWORKDAYS([.$L400];[.$M400];[$休日.$B$4:.$B$304]);&quot;&quot;)">
            <text:p/>
          </table:table-cell>
          <table:table-cell table:style-name="ce63" table:formula="of:=IF(OR(AND([.$N400]=&quot;&quot;;[.$L400]&lt;&gt;&quot;&quot;;[.$L400]&lt;=[.$U$1]);AND([.$M400]&lt;&gt;&quot;&quot;;[.Q400]&lt;100;[.$M400]&lt;=[.$U$1]));&quot;遅延&quot;;&quot;&quot;)">
            <text:p/>
          </table:table-cell>
          <table:table-cell table:style-name="ce66"/>
          <table:table-cell table:style-name="ce66" table:formula="of:=SUM([.$V400:.$FM4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01]&lt;&gt;&quot;&quot;;[.$F401]=&quot;&quot;);&quot;E&quot;&amp;ROW();[.$B324])" office:value-type="string" office:string-value="" calcext:value-type="error">
            <text:p>#REF!</text:p>
          </table:table-cell>
          <table:table-cell table:style-name="ce13" table:formula="of:=IF(AND([.$D401]&lt;&gt;&quot;&quot;;[.$D401]&lt;&gt;&quot;○&quot;);MAX([.$C$3:.$C400])+1;[.$C400])" office:value-type="float" office:value="15" calcext:value-type="float">
            <text:p>15</text:p>
          </table:table-cell>
          <table:table-cell table:style-name="ce19"/>
          <table:table-cell table:style-name="ce27" table:formula="of:=IF(AND([.$F401]&lt;&gt;&quot;&quot;;[.$D400]&lt;&gt;&quot;&quot;);1;IF([.$F401]&lt;&gt;&quot;&quot;;MAX(INDIRECT([.$B401]):[.$E400])+1;&quot;&quot;))">
            <text:p/>
          </table:table-cell>
          <table:table-cell table:style-name="ce32"/>
          <table:table-cell table:style-name="ce32" table:formula="of:=IF([.$H401]=&quot;&quot;;&quot;&quot;;IF([.$G400]=&quot;&quot;;1;[.$G4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1]&lt;&gt;&quot;&quot;;NETWORKDAYS([.$L401];[.$M401];[$休日.$B$4:.$B$304]);&quot;&quot;)">
            <text:p/>
          </table:table-cell>
          <table:table-cell table:style-name="ce32" table:formula="of:=IF([.$L401]&lt;&gt;&quot;&quot;;NETWORKDAYS([.$L401];[.$M401];[$休日.$B$4:.$B$304]);&quot;&quot;)">
            <text:p/>
          </table:table-cell>
          <table:table-cell table:style-name="ce63" table:formula="of:=IF(OR(AND([.$N401]=&quot;&quot;;[.$L401]&lt;&gt;&quot;&quot;;[.$L401]&lt;=[.$U$1]);AND([.$M401]&lt;&gt;&quot;&quot;;[.Q401]&lt;100;[.$M401]&lt;=[.$U$1]));&quot;遅延&quot;;&quot;&quot;)">
            <text:p/>
          </table:table-cell>
          <table:table-cell table:style-name="ce66"/>
          <table:table-cell table:style-name="ce66" table:formula="of:=SUM([.$V401:.$FM4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02]&lt;&gt;&quot;&quot;;[.$F402]=&quot;&quot;);&quot;E&quot;&amp;ROW();[.$B325])" office:value-type="string" office:string-value="" calcext:value-type="error">
            <text:p>#REF!</text:p>
          </table:table-cell>
          <table:table-cell table:style-name="ce13" table:formula="of:=IF(AND([.$D402]&lt;&gt;&quot;&quot;;[.$D402]&lt;&gt;&quot;○&quot;);MAX([.$C$3:.$C401])+1;[.$C401])" office:value-type="float" office:value="15" calcext:value-type="float">
            <text:p>15</text:p>
          </table:table-cell>
          <table:table-cell table:style-name="ce19"/>
          <table:table-cell table:style-name="ce27" table:formula="of:=IF(AND([.$F402]&lt;&gt;&quot;&quot;;[.$D401]&lt;&gt;&quot;&quot;);1;IF([.$F402]&lt;&gt;&quot;&quot;;MAX(INDIRECT([.$B402]):[.$E401])+1;&quot;&quot;))">
            <text:p/>
          </table:table-cell>
          <table:table-cell table:style-name="ce32"/>
          <table:table-cell table:style-name="ce32" table:formula="of:=IF([.$H402]=&quot;&quot;;&quot;&quot;;IF([.$G401]=&quot;&quot;;1;[.$G4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2]&lt;&gt;&quot;&quot;;NETWORKDAYS([.$L402];[.$M402];[$休日.$B$4:.$B$304]);&quot;&quot;)">
            <text:p/>
          </table:table-cell>
          <table:table-cell table:style-name="ce32" table:formula="of:=IF([.$L402]&lt;&gt;&quot;&quot;;NETWORKDAYS([.$L402];[.$M402];[$休日.$B$4:.$B$304]);&quot;&quot;)">
            <text:p/>
          </table:table-cell>
          <table:table-cell table:style-name="ce63" table:formula="of:=IF(OR(AND([.$N402]=&quot;&quot;;[.$L402]&lt;&gt;&quot;&quot;;[.$L402]&lt;=[.$U$1]);AND([.$M402]&lt;&gt;&quot;&quot;;[.Q402]&lt;100;[.$M402]&lt;=[.$U$1]));&quot;遅延&quot;;&quot;&quot;)">
            <text:p/>
          </table:table-cell>
          <table:table-cell table:style-name="ce66"/>
          <table:table-cell table:style-name="ce66" table:formula="of:=SUM([.$V402:.$FM4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03]&lt;&gt;&quot;&quot;;[.$F403]=&quot;&quot;);&quot;E&quot;&amp;ROW();[.$B326])" office:value-type="string" office:string-value="" calcext:value-type="error">
            <text:p>#REF!</text:p>
          </table:table-cell>
          <table:table-cell table:style-name="ce13" table:formula="of:=IF(AND([.$D403]&lt;&gt;&quot;&quot;;[.$D403]&lt;&gt;&quot;○&quot;);MAX([.$C$3:.$C402])+1;[.$C402])" office:value-type="float" office:value="15" calcext:value-type="float">
            <text:p>15</text:p>
          </table:table-cell>
          <table:table-cell table:style-name="ce19"/>
          <table:table-cell table:style-name="ce27" table:formula="of:=IF(AND([.$F403]&lt;&gt;&quot;&quot;;[.$D402]&lt;&gt;&quot;&quot;);1;IF([.$F403]&lt;&gt;&quot;&quot;;MAX(INDIRECT([.$B403]):[.$E402])+1;&quot;&quot;))">
            <text:p/>
          </table:table-cell>
          <table:table-cell table:style-name="ce32"/>
          <table:table-cell table:style-name="ce32" table:formula="of:=IF([.$H403]=&quot;&quot;;&quot;&quot;;IF([.$G402]=&quot;&quot;;1;[.$G4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3]&lt;&gt;&quot;&quot;;NETWORKDAYS([.$L403];[.$M403];[$休日.$B$4:.$B$304]);&quot;&quot;)">
            <text:p/>
          </table:table-cell>
          <table:table-cell table:style-name="ce32" table:formula="of:=IF([.$L403]&lt;&gt;&quot;&quot;;NETWORKDAYS([.$L403];[.$M403];[$休日.$B$4:.$B$304]);&quot;&quot;)">
            <text:p/>
          </table:table-cell>
          <table:table-cell table:style-name="ce63" table:formula="of:=IF(OR(AND([.$N403]=&quot;&quot;;[.$L403]&lt;&gt;&quot;&quot;;[.$L403]&lt;=[.$U$1]);AND([.$M403]&lt;&gt;&quot;&quot;;[.Q403]&lt;100;[.$M403]&lt;=[.$U$1]));&quot;遅延&quot;;&quot;&quot;)">
            <text:p/>
          </table:table-cell>
          <table:table-cell table:style-name="ce66"/>
          <table:table-cell table:style-name="ce66" table:formula="of:=SUM([.$V403:.$FM4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04]&lt;&gt;&quot;&quot;;[.$F404]=&quot;&quot;);&quot;E&quot;&amp;ROW();[.$B327])" office:value-type="string" office:string-value="E228" calcext:value-type="string">
            <text:p>E228</text:p>
          </table:table-cell>
          <table:table-cell table:style-name="ce13" table:formula="of:=IF(AND([.$D404]&lt;&gt;&quot;&quot;;[.$D404]&lt;&gt;&quot;○&quot;);MAX([.$C$3:.$C403])+1;[.$C403])" office:value-type="float" office:value="15" calcext:value-type="float">
            <text:p>15</text:p>
          </table:table-cell>
          <table:table-cell table:style-name="ce19"/>
          <table:table-cell table:style-name="ce27" table:formula="of:=IF(AND([.$F404]&lt;&gt;&quot;&quot;;[.$D403]&lt;&gt;&quot;&quot;);1;IF([.$F404]&lt;&gt;&quot;&quot;;MAX(INDIRECT([.$B404]):[.$E403])+1;&quot;&quot;))">
            <text:p/>
          </table:table-cell>
          <table:table-cell table:style-name="ce32"/>
          <table:table-cell table:style-name="ce32" table:formula="of:=IF([.$H404]=&quot;&quot;;&quot;&quot;;IF([.$G403]=&quot;&quot;;1;[.$G4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4]&lt;&gt;&quot;&quot;;NETWORKDAYS([.$L404];[.$M404];[$休日.$B$4:.$B$304]);&quot;&quot;)">
            <text:p/>
          </table:table-cell>
          <table:table-cell table:style-name="ce32" table:formula="of:=IF([.$L404]&lt;&gt;&quot;&quot;;NETWORKDAYS([.$L404];[.$M404];[$休日.$B$4:.$B$304]);&quot;&quot;)">
            <text:p/>
          </table:table-cell>
          <table:table-cell table:style-name="ce63" table:formula="of:=IF(OR(AND([.$N404]=&quot;&quot;;[.$L404]&lt;&gt;&quot;&quot;;[.$L404]&lt;=[.$U$1]);AND([.$M404]&lt;&gt;&quot;&quot;;[.Q404]&lt;100;[.$M404]&lt;=[.$U$1]));&quot;遅延&quot;;&quot;&quot;)">
            <text:p/>
          </table:table-cell>
          <table:table-cell table:style-name="ce66"/>
          <table:table-cell table:style-name="ce66" table:formula="of:=SUM([.$V404:.$FM4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405]=&quot;&quot;;[.$L405]&lt;&gt;&quot;&quot;;[.$L405]&lt;=[.$U$1]);AND([.$M405]&lt;&gt;&quot;&quot;;[.Q405]&lt;100;[.$M405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6]&lt;&gt;&quot;&quot;;NETWORKDAYS([.$L406];[.$M406];[$休日.$B$4:.$B$304]);&quot;&quot;)">
            <text:p/>
          </table:table-cell>
          <table:table-cell table:style-name="ce61"/>
          <table:table-cell table:style-name="ce63" table:formula="of:=IF(OR(AND([.$N406]=&quot;&quot;;[.$L406]&lt;&gt;&quot;&quot;;[.$L406]&lt;=[.$U$1]);AND([.$M406]&lt;&gt;&quot;&quot;;[.Q406]&lt;100;[.$M406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404];[.$J406];[.V$5:.V$404])" office:value-type="float" office:value="0" calcext:value-type="float">
            <text:p>0</text:p>
          </table:table-cell>
          <table:table-cell table:style-name="ce90" table:formula="of:=SUMIF([.$J5:.$J404];[.$J406];[.W$5:.W$404])" office:value-type="float" office:value="0" calcext:value-type="float">
            <text:p>0</text:p>
          </table:table-cell>
          <table:table-cell table:style-name="ce90" table:formula="of:=SUMIF([.$J5:.$J404];[.$J406];[.X$5:.X$404])" office:value-type="float" office:value="0" calcext:value-type="float">
            <text:p>0</text:p>
          </table:table-cell>
          <table:table-cell table:style-name="ce114" table:formula="of:=SUMIF([.$J5:.$J404];[.$J406];[.Y$5:.Y$404])" office:value-type="float" office:value="0" calcext:value-type="float">
            <text:p>0</text:p>
          </table:table-cell>
          <table:table-cell table:style-name="ce114" table:formula="of:=SUMIF([.$J5:.$J404];[.$J406];[.Z$5:.Z$404])" office:value-type="float" office:value="0" calcext:value-type="float">
            <text:p>0</text:p>
          </table:table-cell>
          <table:table-cell table:style-name="ce90" table:formula="of:=SUMIF([.$J5:.$J404];[.$J406];[.AA$5:.AA$404])" office:value-type="float" office:value="0" calcext:value-type="float">
            <text:p>0</text:p>
          </table:table-cell>
          <table:table-cell table:style-name="ce90" table:formula="of:=SUMIF([.$J5:.$J404];[.$J406];[.AB$5:.AB$404])" office:value-type="float" office:value="0" calcext:value-type="float">
            <text:p>0</text:p>
          </table:table-cell>
          <table:table-cell table:style-name="ce90" table:formula="of:=SUMIF([.$J5:.$J404];[.$J406];[.AC$5:.AC$404])" office:value-type="float" office:value="0" calcext:value-type="float">
            <text:p>0</text:p>
          </table:table-cell>
          <table:table-cell table:style-name="ce90" table:formula="of:=SUMIF([.$J5:.$J404];[.$J406];[.AD$5:.AD$404])" office:value-type="float" office:value="0" calcext:value-type="float">
            <text:p>0</text:p>
          </table:table-cell>
          <table:table-cell table:style-name="ce90" table:formula="of:=SUMIF([.$J5:.$J404];[.$J406];[.AE$5:.AE$404])" office:value-type="float" office:value="0" calcext:value-type="float">
            <text:p>0</text:p>
          </table:table-cell>
          <table:table-cell table:style-name="ce114" table:formula="of:=SUMIF([.$J5:.$J404];[.$J406];[.AF$5:.AF$404])" office:value-type="float" office:value="0" calcext:value-type="float">
            <text:p>0</text:p>
          </table:table-cell>
          <table:table-cell table:style-name="ce114" table:formula="of:=SUMIF([.$J5:.$J404];[.$J406];[.AG$5:.AG$404])" office:value-type="float" office:value="0" calcext:value-type="float">
            <text:p>0</text:p>
          </table:table-cell>
          <table:table-cell table:style-name="ce90" table:formula="of:=SUMIF([.$J5:.$J404];[.$J406];[.AH$5:.AH$404])" office:value-type="float" office:value="0" calcext:value-type="float">
            <text:p>0</text:p>
          </table:table-cell>
          <table:table-cell table:style-name="ce90" table:formula="of:=SUMIF([.$J5:.$J404];[.$J406];[.AI$5:.AI$404])" office:value-type="float" office:value="0" calcext:value-type="float">
            <text:p>0</text:p>
          </table:table-cell>
          <table:table-cell table:style-name="ce90" table:formula="of:=SUMIF([.$J5:.$J404];[.$J406];[.AJ$5:.AJ$404])" office:value-type="float" office:value="0" calcext:value-type="float">
            <text:p>0</text:p>
          </table:table-cell>
          <table:table-cell table:style-name="ce90" table:formula="of:=SUMIF([.$J5:.$J404];[.$J406];[.AK$5:.AK$404])" office:value-type="float" office:value="0" calcext:value-type="float">
            <text:p>0</text:p>
          </table:table-cell>
          <table:table-cell table:style-name="ce90" table:formula="of:=SUMIF([.$J5:.$J404];[.$J406];[.AL$5:.AL$404])" office:value-type="float" office:value="0" calcext:value-type="float">
            <text:p>0</text:p>
          </table:table-cell>
          <table:table-cell table:style-name="ce114" table:formula="of:=SUMIF([.$J5:.$J404];[.$J406];[.AM$5:.AM$404])" office:value-type="float" office:value="0" calcext:value-type="float">
            <text:p>0</text:p>
          </table:table-cell>
          <table:table-cell table:style-name="ce114" table:formula="of:=SUMIF([.$J5:.$J404];[.$J406];[.AN$5:.AN$404])" office:value-type="float" office:value="0" calcext:value-type="float">
            <text:p>0</text:p>
          </table:table-cell>
          <table:table-cell table:style-name="ce90" table:formula="of:=SUMIF([.$J5:.$J404];[.$J406];[.AO$5:.AO$404])" office:value-type="float" office:value="0" calcext:value-type="float">
            <text:p>0</text:p>
          </table:table-cell>
          <table:table-cell table:style-name="ce90" table:formula="of:=SUMIF([.$J5:.$J404];[.$J406];[.AP$5:.AP$404])" office:value-type="float" office:value="0" calcext:value-type="float">
            <text:p>0</text:p>
          </table:table-cell>
          <table:table-cell table:style-name="ce90" table:formula="of:=SUMIF([.$J5:.$J404];[.$J406];[.AQ$5:.AQ$404])" office:value-type="float" office:value="0" calcext:value-type="float">
            <text:p>0</text:p>
          </table:table-cell>
          <table:table-cell table:style-name="ce90" table:formula="of:=SUMIF([.$J5:.$J404];[.$J406];[.AR$5:.AR$404])" office:value-type="float" office:value="0" calcext:value-type="float">
            <text:p>0</text:p>
          </table:table-cell>
          <table:table-cell table:style-name="ce143" table:formula="of:=SUMIF([.$J5:.$J404];[.$J406];[.AS$5:.AS$404])" office:value-type="float" office:value="0" calcext:value-type="float">
            <text:p>0</text:p>
          </table:table-cell>
          <table:table-cell table:style-name="ce114" table:formula="of:=SUMIF([.$J5:.$J404];[.$J406];[.AT$5:.AT$404])" office:value-type="float" office:value="0" calcext:value-type="float">
            <text:p>0</text:p>
          </table:table-cell>
          <table:table-cell table:style-name="ce114" table:formula="of:=SUMIF([.$J5:.$J404];[.$J406];[.AU$5:.AU$404])" office:value-type="float" office:value="0" calcext:value-type="float">
            <text:p>0</text:p>
          </table:table-cell>
          <table:table-cell table:style-name="ce157" table:formula="of:=SUMIF([.$J5:.$J404];[.$J406];[.AV$5:.AV$404])" office:value-type="float" office:value="0" calcext:value-type="float">
            <text:p>0</text:p>
          </table:table-cell>
          <table:table-cell table:style-name="ce90" table:formula="of:=SUMIF([.$J5:.$J404];[.$J406];[.AW$5:.AW$404])" office:value-type="float" office:value="0" calcext:value-type="float">
            <text:p>0</text:p>
          </table:table-cell>
          <table:table-cell table:style-name="ce90" table:formula="of:=SUMIF([.$J5:.$J404];[.$J406];[.AX$5:.AX$404])" office:value-type="float" office:value="0" calcext:value-type="float">
            <text:p>0</text:p>
          </table:table-cell>
          <table:table-cell table:style-name="ce90" table:formula="of:=SUMIF([.$J5:.$J404];[.$J406];[.AY$5:.AY$404])" office:value-type="float" office:value="0" calcext:value-type="float">
            <text:p>0</text:p>
          </table:table-cell>
          <table:table-cell table:style-name="ce90" table:formula="of:=SUMIF([.$J5:.$J404];[.$J406];[.AZ$5:.AZ$404])" office:value-type="float" office:value="0" calcext:value-type="float">
            <text:p>0</text:p>
          </table:table-cell>
          <table:table-cell table:style-name="ce90" table:formula="of:=SUMIF([.$J5:.$J404];[.$J406];[.BA$5:.BA$404])" office:value-type="float" office:value="0" calcext:value-type="float">
            <text:p>0</text:p>
          </table:table-cell>
          <table:table-cell table:style-name="ce90" table:formula="of:=SUMIF([.$J5:.$J404];[.$J406];[.BB$5:.BB$404])" office:value-type="float" office:value="0" calcext:value-type="float">
            <text:p>0</text:p>
          </table:table-cell>
          <table:table-cell table:style-name="ce90" table:formula="of:=SUMIF([.$J5:.$J404];[.$J406];[.BC$5:.BC$404])" office:value-type="float" office:value="0" calcext:value-type="float">
            <text:p>0</text:p>
          </table:table-cell>
          <table:table-cell table:style-name="ce90" table:formula="of:=SUMIF([.$J5:.$J404];[.$J406];[.BD$5:.BD$404])" office:value-type="float" office:value="0" calcext:value-type="float">
            <text:p>0</text:p>
          </table:table-cell>
          <table:table-cell table:style-name="ce90" table:formula="of:=SUMIF([.$J5:.$J404];[.$J406];[.BE$5:.BE$404])" office:value-type="float" office:value="0" calcext:value-type="float">
            <text:p>0</text:p>
          </table:table-cell>
          <table:table-cell table:style-name="ce90" table:formula="of:=SUMIF([.$J5:.$J404];[.$J406];[.BF$5:.BF$404])" office:value-type="float" office:value="0" calcext:value-type="float">
            <text:p>0</text:p>
          </table:table-cell>
          <table:table-cell table:style-name="ce90" table:formula="of:=SUMIF([.$J5:.$J404];[.$J406];[.BG$5:.BG$404])" office:value-type="float" office:value="0" calcext:value-type="float">
            <text:p>0</text:p>
          </table:table-cell>
          <table:table-cell table:style-name="ce90" table:formula="of:=SUMIF([.$J5:.$J404];[.$J406];[.BH$5:.BH$404])" office:value-type="float" office:value="0" calcext:value-type="float">
            <text:p>0</text:p>
          </table:table-cell>
          <table:table-cell table:style-name="ce90" table:formula="of:=SUMIF([.$J5:.$J404];[.$J406];[.BI$5:.BI$404])" office:value-type="float" office:value="0" calcext:value-type="float">
            <text:p>0</text:p>
          </table:table-cell>
          <table:table-cell table:style-name="ce90" table:formula="of:=SUMIF([.$J5:.$J404];[.$J406];[.BJ$5:.BJ$404])" office:value-type="float" office:value="0" calcext:value-type="float">
            <text:p>0</text:p>
          </table:table-cell>
          <table:table-cell table:style-name="ce90" table:formula="of:=SUMIF([.$J5:.$J404];[.$J406];[.BK$5:.BK$404])" office:value-type="float" office:value="0" calcext:value-type="float">
            <text:p>0</text:p>
          </table:table-cell>
          <table:table-cell table:style-name="ce90" table:formula="of:=SUMIF([.$J5:.$J404];[.$J406];[.BL$5:.BL$404])" office:value-type="float" office:value="0" calcext:value-type="float">
            <text:p>0</text:p>
          </table:table-cell>
          <table:table-cell table:style-name="ce90" table:formula="of:=SUMIF([.$J5:.$J404];[.$J406];[.BM$5:.BM$404])" office:value-type="float" office:value="0" calcext:value-type="float">
            <text:p>0</text:p>
          </table:table-cell>
          <table:table-cell table:style-name="ce90" table:formula="of:=SUMIF([.$J5:.$J404];[.$J406];[.BN$5:.BN$404])" office:value-type="float" office:value="0" calcext:value-type="float">
            <text:p>0</text:p>
          </table:table-cell>
          <table:table-cell table:style-name="ce90" table:formula="of:=SUMIF([.$J5:.$J404];[.$J406];[.BO$5:.BO$404])" office:value-type="float" office:value="0" calcext:value-type="float">
            <text:p>0</text:p>
          </table:table-cell>
          <table:table-cell table:style-name="ce90" table:formula="of:=SUMIF([.$J5:.$J404];[.$J406];[.BP$5:.BP$404])" office:value-type="float" office:value="0" calcext:value-type="float">
            <text:p>0</text:p>
          </table:table-cell>
          <table:table-cell table:style-name="ce90" table:formula="of:=SUMIF([.$J5:.$J404];[.$J406];[.BQ$5:.BQ$404])" office:value-type="float" office:value="0" calcext:value-type="float">
            <text:p>0</text:p>
          </table:table-cell>
          <table:table-cell table:style-name="ce90" table:formula="of:=SUMIF([.$J5:.$J404];[.$J406];[.BR$5:.BR$404])" office:value-type="float" office:value="0" calcext:value-type="float">
            <text:p>0</text:p>
          </table:table-cell>
          <table:table-cell table:style-name="ce90" table:formula="of:=SUMIF([.$J5:.$J404];[.$J406];[.BS$5:.BS$404])" office:value-type="float" office:value="0" calcext:value-type="float">
            <text:p>0</text:p>
          </table:table-cell>
          <table:table-cell table:style-name="ce90" table:formula="of:=SUMIF([.$J5:.$J404];[.$J406];[.BT$5:.BT$404])" office:value-type="float" office:value="0" calcext:value-type="float">
            <text:p>0</text:p>
          </table:table-cell>
          <table:table-cell table:style-name="ce90" table:formula="of:=SUMIF([.$J5:.$J404];[.$J406];[.BU$5:.BU$404])" office:value-type="float" office:value="0" calcext:value-type="float">
            <text:p>0</text:p>
          </table:table-cell>
          <table:table-cell table:style-name="ce90" table:formula="of:=SUMIF([.$J5:.$J404];[.$J406];[.BV$5:.BV$404])" office:value-type="float" office:value="0" calcext:value-type="float">
            <text:p>0</text:p>
          </table:table-cell>
          <table:table-cell table:style-name="ce90" table:formula="of:=SUMIF([.$J5:.$J404];[.$J406];[.BW$5:.BW$404])" office:value-type="float" office:value="0" calcext:value-type="float">
            <text:p>0</text:p>
          </table:table-cell>
          <table:table-cell table:style-name="ce90" table:formula="of:=SUMIF([.$J5:.$J404];[.$J406];[.BX$5:.BX$404])" office:value-type="float" office:value="0" calcext:value-type="float">
            <text:p>0</text:p>
          </table:table-cell>
          <table:table-cell table:style-name="ce90" table:formula="of:=SUMIF([.$J5:.$J404];[.$J406];[.BY$5:.BY$404])" office:value-type="float" office:value="0" calcext:value-type="float">
            <text:p>0</text:p>
          </table:table-cell>
          <table:table-cell table:style-name="ce90" table:formula="of:=SUMIF([.$J5:.$J404];[.$J406];[.BZ$5:.BZ$404])" office:value-type="float" office:value="0" calcext:value-type="float">
            <text:p>0</text:p>
          </table:table-cell>
          <table:table-cell table:style-name="ce90" table:formula="of:=SUMIF([.$J5:.$J404];[.$J406];[.CA$5:.CA$404])" office:value-type="float" office:value="0" calcext:value-type="float">
            <text:p>0</text:p>
          </table:table-cell>
          <table:table-cell table:style-name="ce90" table:formula="of:=SUMIF([.$J5:.$J404];[.$J406];[.CB$5:.CB$404])" office:value-type="float" office:value="0" calcext:value-type="float">
            <text:p>0</text:p>
          </table:table-cell>
          <table:table-cell table:style-name="ce90" table:formula="of:=SUMIF([.$J5:.$J404];[.$J406];[.CC$5:.CC$404])" office:value-type="float" office:value="0" calcext:value-type="float">
            <text:p>0</text:p>
          </table:table-cell>
          <table:table-cell table:style-name="ce90" table:formula="of:=SUMIF([.$J5:.$J404];[.$J406];[.CD$5:.CD$404])" office:value-type="float" office:value="0" calcext:value-type="float">
            <text:p>0</text:p>
          </table:table-cell>
          <table:table-cell table:style-name="ce90" table:formula="of:=SUMIF([.$J5:.$J404];[.$J406];[.CE$5:.CE$404])" office:value-type="float" office:value="0" calcext:value-type="float">
            <text:p>0</text:p>
          </table:table-cell>
          <table:table-cell table:style-name="ce90" table:formula="of:=SUMIF([.$J5:.$J404];[.$J406];[.CF$5:.CF$404])" office:value-type="float" office:value="0" calcext:value-type="float">
            <text:p>0</text:p>
          </table:table-cell>
          <table:table-cell table:style-name="ce90" table:formula="of:=SUMIF([.$J5:.$J404];[.$J406];[.CG$5:.CG$404])" office:value-type="float" office:value="0" calcext:value-type="float">
            <text:p>0</text:p>
          </table:table-cell>
          <table:table-cell table:style-name="ce90" table:formula="of:=SUMIF([.$J5:.$J404];[.$J406];[.CH$5:.CH$404])" office:value-type="float" office:value="0" calcext:value-type="float">
            <text:p>0</text:p>
          </table:table-cell>
          <table:table-cell table:style-name="ce90" table:formula="of:=SUMIF([.$J5:.$J404];[.$J406];[.CI$5:.CI$404])" office:value-type="float" office:value="0" calcext:value-type="float">
            <text:p>0</text:p>
          </table:table-cell>
          <table:table-cell table:style-name="ce90" table:formula="of:=SUMIF([.$J5:.$J404];[.$J406];[.CJ$5:.CJ$404])" office:value-type="float" office:value="0" calcext:value-type="float">
            <text:p>0</text:p>
          </table:table-cell>
          <table:table-cell table:style-name="ce90" table:formula="of:=SUMIF([.$J5:.$J404];[.$J406];[.CK$5:.CK$404])" office:value-type="float" office:value="0" calcext:value-type="float">
            <text:p>0</text:p>
          </table:table-cell>
          <table:table-cell table:style-name="ce90" table:formula="of:=SUMIF([.$J5:.$J404];[.$J406];[.CL$5:.CL$404])" office:value-type="float" office:value="0" calcext:value-type="float">
            <text:p>0</text:p>
          </table:table-cell>
          <table:table-cell table:style-name="ce90" table:formula="of:=SUMIF([.$J5:.$J404];[.$J406];[.CM$5:.CM$404])" office:value-type="float" office:value="0" calcext:value-type="float">
            <text:p>0</text:p>
          </table:table-cell>
          <table:table-cell table:style-name="ce90" table:formula="of:=SUMIF([.$J5:.$J404];[.$J406];[.CN$5:.CN$404])" office:value-type="float" office:value="0" calcext:value-type="float">
            <text:p>0</text:p>
          </table:table-cell>
          <table:table-cell table:style-name="ce90" table:formula="of:=SUMIF([.$J5:.$J404];[.$J406];[.CO$5:.CO$404])" office:value-type="float" office:value="0" calcext:value-type="float">
            <text:p>0</text:p>
          </table:table-cell>
          <table:table-cell table:style-name="ce90" table:formula="of:=SUMIF([.$J5:.$J404];[.$J406];[.CP$5:.CP$404])" office:value-type="float" office:value="0" calcext:value-type="float">
            <text:p>0</text:p>
          </table:table-cell>
          <table:table-cell table:style-name="ce90" table:formula="of:=SUMIF([.$J5:.$J404];[.$J406];[.CQ$5:.CQ$404])" office:value-type="float" office:value="0" calcext:value-type="float">
            <text:p>0</text:p>
          </table:table-cell>
          <table:table-cell table:style-name="ce90" table:formula="of:=SUMIF([.$J5:.$J404];[.$J406];[.CR$5:.CR$404])" office:value-type="float" office:value="0" calcext:value-type="float">
            <text:p>0</text:p>
          </table:table-cell>
          <table:table-cell table:style-name="ce90" table:formula="of:=SUMIF([.$J5:.$J404];[.$J406];[.CS$5:.CS$404])" office:value-type="float" office:value="0" calcext:value-type="float">
            <text:p>0</text:p>
          </table:table-cell>
          <table:table-cell table:style-name="ce90" table:formula="of:=SUMIF([.$J5:.$J404];[.$J406];[.CT$5:.CT$404])" office:value-type="float" office:value="0" calcext:value-type="float">
            <text:p>0</text:p>
          </table:table-cell>
          <table:table-cell table:style-name="ce90" table:formula="of:=SUMIF([.$J5:.$J404];[.$J406];[.CU$5:.CU$404])" office:value-type="float" office:value="0" calcext:value-type="float">
            <text:p>0</text:p>
          </table:table-cell>
          <table:table-cell table:style-name="ce90" table:formula="of:=SUMIF([.$J5:.$J404];[.$J406];[.CV$5:.CV$404])" office:value-type="float" office:value="0" calcext:value-type="float">
            <text:p>0</text:p>
          </table:table-cell>
          <table:table-cell table:style-name="ce90" table:formula="of:=SUMIF([.$J5:.$J404];[.$J406];[.CW$5:.CW$404])" office:value-type="float" office:value="0" calcext:value-type="float">
            <text:p>0</text:p>
          </table:table-cell>
          <table:table-cell table:style-name="ce90" table:formula="of:=SUMIF([.$J5:.$J404];[.$J406];[.CX$5:.CX$404])" office:value-type="float" office:value="0" calcext:value-type="float">
            <text:p>0</text:p>
          </table:table-cell>
          <table:table-cell table:style-name="ce90" table:formula="of:=SUMIF([.$J5:.$J404];[.$J406];[.CY$5:.CY$404])" office:value-type="float" office:value="0" calcext:value-type="float">
            <text:p>0</text:p>
          </table:table-cell>
          <table:table-cell table:style-name="ce90" table:formula="of:=SUMIF([.$J5:.$J404];[.$J406];[.CZ$5:.CZ$404])" office:value-type="float" office:value="0" calcext:value-type="float">
            <text:p>0</text:p>
          </table:table-cell>
          <table:table-cell table:style-name="ce90" table:formula="of:=SUMIF([.$J5:.$J404];[.$J406];[.DA$5:.DA$404])" office:value-type="float" office:value="0" calcext:value-type="float">
            <text:p>0</text:p>
          </table:table-cell>
          <table:table-cell table:style-name="ce90" table:formula="of:=SUMIF([.$J5:.$J404];[.$J406];[.DB$5:.DB$404])" office:value-type="float" office:value="0" calcext:value-type="float">
            <text:p>0</text:p>
          </table:table-cell>
          <table:table-cell table:style-name="ce90" table:formula="of:=SUMIF([.$J5:.$J404];[.$J406];[.DC$5:.DC$404])" office:value-type="float" office:value="0" calcext:value-type="float">
            <text:p>0</text:p>
          </table:table-cell>
          <table:table-cell table:style-name="ce90" table:formula="of:=SUMIF([.$J5:.$J404];[.$J406];[.DD$5:.DD$404])" office:value-type="float" office:value="0" calcext:value-type="float">
            <text:p>0</text:p>
          </table:table-cell>
          <table:table-cell table:style-name="ce90" table:formula="of:=SUMIF([.$J5:.$J404];[.$J406];[.DE$5:.DE$404])" office:value-type="float" office:value="0" calcext:value-type="float">
            <text:p>0</text:p>
          </table:table-cell>
          <table:table-cell table:style-name="ce90" table:formula="of:=SUMIF([.$J5:.$J404];[.$J406];[.DF$5:.DF$404])" office:value-type="float" office:value="0" calcext:value-type="float">
            <text:p>0</text:p>
          </table:table-cell>
          <table:table-cell table:style-name="ce90" table:formula="of:=SUMIF([.$J5:.$J404];[.$J406];[.DG$5:.DG$404])" office:value-type="float" office:value="0" calcext:value-type="float">
            <text:p>0</text:p>
          </table:table-cell>
          <table:table-cell table:style-name="ce90" table:formula="of:=SUMIF([.$J5:.$J404];[.$J406];[.DH$5:.DH$404])" office:value-type="float" office:value="0" calcext:value-type="float">
            <text:p>0</text:p>
          </table:table-cell>
          <table:table-cell table:style-name="ce90" table:formula="of:=SUMIF([.$J5:.$J404];[.$J406];[.DI$5:.DI$404])" office:value-type="float" office:value="0" calcext:value-type="float">
            <text:p>0</text:p>
          </table:table-cell>
          <table:table-cell table:style-name="ce90" table:formula="of:=SUMIF([.$J5:.$J404];[.$J406];[.DJ$5:.DJ$404])" office:value-type="float" office:value="0" calcext:value-type="float">
            <text:p>0</text:p>
          </table:table-cell>
          <table:table-cell table:style-name="ce90" table:formula="of:=SUMIF([.$J5:.$J404];[.$J406];[.DK$5:.DK$404])" office:value-type="float" office:value="0" calcext:value-type="float">
            <text:p>0</text:p>
          </table:table-cell>
          <table:table-cell table:style-name="ce90" table:formula="of:=SUMIF([.$J5:.$J404];[.$J406];[.DL$5:.DL$404])" office:value-type="float" office:value="0" calcext:value-type="float">
            <text:p>0</text:p>
          </table:table-cell>
          <table:table-cell table:style-name="ce90" table:formula="of:=SUMIF([.$J5:.$J404];[.$J406];[.DM$5:.DM$404])" office:value-type="float" office:value="0" calcext:value-type="float">
            <text:p>0</text:p>
          </table:table-cell>
          <table:table-cell table:style-name="ce90" table:formula="of:=SUMIF([.$J5:.$J404];[.$J406];[.DN$5:.DN$404])" office:value-type="float" office:value="0" calcext:value-type="float">
            <text:p>0</text:p>
          </table:table-cell>
          <table:table-cell table:style-name="ce90" table:formula="of:=SUMIF([.$J5:.$J404];[.$J406];[.DO$5:.DO$404])" office:value-type="float" office:value="0" calcext:value-type="float">
            <text:p>0</text:p>
          </table:table-cell>
          <table:table-cell table:style-name="ce90" table:formula="of:=SUMIF([.$J5:.$J404];[.$J406];[.DP$5:.DP$404])" office:value-type="float" office:value="0" calcext:value-type="float">
            <text:p>0</text:p>
          </table:table-cell>
          <table:table-cell table:style-name="ce90" table:formula="of:=SUMIF([.$J5:.$J404];[.$J406];[.DQ$5:.DQ$404])" office:value-type="float" office:value="0" calcext:value-type="float">
            <text:p>0</text:p>
          </table:table-cell>
          <table:table-cell table:style-name="ce90" table:formula="of:=SUMIF([.$J5:.$J404];[.$J406];[.DR$5:.DR$404])" office:value-type="float" office:value="0" calcext:value-type="float">
            <text:p>0</text:p>
          </table:table-cell>
          <table:table-cell table:style-name="ce90" table:formula="of:=SUMIF([.$J5:.$J404];[.$J406];[.DS$5:.DS$404])" office:value-type="float" office:value="0" calcext:value-type="float">
            <text:p>0</text:p>
          </table:table-cell>
          <table:table-cell table:style-name="ce90" table:formula="of:=SUMIF([.$J5:.$J404];[.$J406];[.DT$5:.DT$404])" office:value-type="float" office:value="0" calcext:value-type="float">
            <text:p>0</text:p>
          </table:table-cell>
          <table:table-cell table:style-name="ce90" table:formula="of:=SUMIF([.$J5:.$J404];[.$J406];[.DU$5:.DU$404])" office:value-type="float" office:value="0" calcext:value-type="float">
            <text:p>0</text:p>
          </table:table-cell>
          <table:table-cell table:style-name="ce90" table:formula="of:=SUMIF([.$J5:.$J404];[.$J406];[.DV$5:.DV$404])" office:value-type="float" office:value="0" calcext:value-type="float">
            <text:p>0</text:p>
          </table:table-cell>
          <table:table-cell table:style-name="ce90" table:formula="of:=SUMIF([.$J5:.$J404];[.$J406];[.DW$5:.DW$404])" office:value-type="float" office:value="0" calcext:value-type="float">
            <text:p>0</text:p>
          </table:table-cell>
          <table:table-cell table:style-name="ce90" table:formula="of:=SUMIF([.$J5:.$J404];[.$J406];[.DX$5:.DX$404])" office:value-type="float" office:value="0" calcext:value-type="float">
            <text:p>0</text:p>
          </table:table-cell>
          <table:table-cell table:style-name="ce90" table:formula="of:=SUMIF([.$J5:.$J404];[.$J406];[.DY$5:.DY$404])" office:value-type="float" office:value="0" calcext:value-type="float">
            <text:p>0</text:p>
          </table:table-cell>
          <table:table-cell table:style-name="ce90" table:formula="of:=SUMIF([.$J5:.$J404];[.$J406];[.DZ$5:.DZ$404])" office:value-type="float" office:value="0" calcext:value-type="float">
            <text:p>0</text:p>
          </table:table-cell>
          <table:table-cell table:style-name="ce90" table:formula="of:=SUMIF([.$J5:.$J404];[.$J406];[.EA$5:.EA$404])" office:value-type="float" office:value="0" calcext:value-type="float">
            <text:p>0</text:p>
          </table:table-cell>
          <table:table-cell table:style-name="ce90" table:formula="of:=SUMIF([.$J5:.$J404];[.$J406];[.EB$5:.EB$404])" office:value-type="float" office:value="0" calcext:value-type="float">
            <text:p>0</text:p>
          </table:table-cell>
          <table:table-cell table:style-name="ce90" table:formula="of:=SUMIF([.$J5:.$J404];[.$J406];[.EC$5:.EC$404])" office:value-type="float" office:value="0" calcext:value-type="float">
            <text:p>0</text:p>
          </table:table-cell>
          <table:table-cell table:style-name="ce90" table:formula="of:=SUMIF([.$J5:.$J404];[.$J406];[.ED$5:.ED$404])" office:value-type="float" office:value="0" calcext:value-type="float">
            <text:p>0</text:p>
          </table:table-cell>
          <table:table-cell table:style-name="ce90" table:formula="of:=SUMIF([.$J5:.$J404];[.$J406];[.EE$5:.EE$404])" office:value-type="float" office:value="0" calcext:value-type="float">
            <text:p>0</text:p>
          </table:table-cell>
          <table:table-cell table:style-name="ce90" table:formula="of:=SUMIF([.$J5:.$J404];[.$J406];[.EF$5:.EF$404])" office:value-type="float" office:value="0" calcext:value-type="float">
            <text:p>0</text:p>
          </table:table-cell>
          <table:table-cell table:style-name="ce90" table:formula="of:=SUMIF([.$J5:.$J404];[.$J406];[.EG$5:.EG$404])" office:value-type="float" office:value="0" calcext:value-type="float">
            <text:p>0</text:p>
          </table:table-cell>
          <table:table-cell table:style-name="ce90" table:formula="of:=SUMIF([.$J5:.$J404];[.$J406];[.EH$5:.EH$404])" office:value-type="float" office:value="0" calcext:value-type="float">
            <text:p>0</text:p>
          </table:table-cell>
          <table:table-cell table:style-name="ce90" table:formula="of:=SUMIF([.$J5:.$J404];[.$J406];[.EI$5:.EI$404])" office:value-type="float" office:value="0" calcext:value-type="float">
            <text:p>0</text:p>
          </table:table-cell>
          <table:table-cell table:style-name="ce90" table:formula="of:=SUMIF([.$J5:.$J404];[.$J406];[.EJ$5:.EJ$404])" office:value-type="float" office:value="0" calcext:value-type="float">
            <text:p>0</text:p>
          </table:table-cell>
          <table:table-cell table:style-name="ce90" table:formula="of:=SUMIF([.$J5:.$J404];[.$J406];[.EK$5:.EK$404])" office:value-type="float" office:value="0" calcext:value-type="float">
            <text:p>0</text:p>
          </table:table-cell>
          <table:table-cell table:style-name="ce90" table:formula="of:=SUMIF([.$J5:.$J404];[.$J406];[.EL$5:.EL$404])" office:value-type="float" office:value="0" calcext:value-type="float">
            <text:p>0</text:p>
          </table:table-cell>
          <table:table-cell table:style-name="ce90" table:formula="of:=SUMIF([.$J5:.$J404];[.$J406];[.EM$5:.EM$404])" office:value-type="float" office:value="0" calcext:value-type="float">
            <text:p>0</text:p>
          </table:table-cell>
          <table:table-cell table:style-name="ce90" table:formula="of:=SUMIF([.$J5:.$J404];[.$J406];[.EN$5:.EN$404])" office:value-type="float" office:value="0" calcext:value-type="float">
            <text:p>0</text:p>
          </table:table-cell>
          <table:table-cell table:style-name="ce90" table:formula="of:=SUMIF([.$J5:.$J404];[.$J406];[.EO$5:.EO$404])" office:value-type="float" office:value="0" calcext:value-type="float">
            <text:p>0</text:p>
          </table:table-cell>
          <table:table-cell table:style-name="ce90" table:formula="of:=SUMIF([.$J5:.$J404];[.$J406];[.EP$5:.EP$404])" office:value-type="float" office:value="0" calcext:value-type="float">
            <text:p>0</text:p>
          </table:table-cell>
          <table:table-cell table:style-name="ce90" table:formula="of:=SUMIF([.$J5:.$J404];[.$J406];[.EQ$5:.EQ$404])" office:value-type="float" office:value="0" calcext:value-type="float">
            <text:p>0</text:p>
          </table:table-cell>
          <table:table-cell table:style-name="ce90" table:formula="of:=SUMIF([.$J5:.$J404];[.$J406];[.ER$5:.ER$404])" office:value-type="float" office:value="0" calcext:value-type="float">
            <text:p>0</text:p>
          </table:table-cell>
          <table:table-cell table:style-name="ce90" table:formula="of:=SUMIF([.$J5:.$J404];[.$J406];[.ES$5:.ES$404])" office:value-type="float" office:value="0" calcext:value-type="float">
            <text:p>0</text:p>
          </table:table-cell>
          <table:table-cell table:style-name="ce90" table:formula="of:=SUMIF([.$J5:.$J404];[.$J406];[.ET$5:.ET$404])" office:value-type="float" office:value="0" calcext:value-type="float">
            <text:p>0</text:p>
          </table:table-cell>
          <table:table-cell table:style-name="ce90" table:formula="of:=SUMIF([.$J5:.$J404];[.$J406];[.EU$5:.EU$404])" office:value-type="float" office:value="0" calcext:value-type="float">
            <text:p>0</text:p>
          </table:table-cell>
          <table:table-cell table:style-name="ce90" table:formula="of:=SUMIF([.$J5:.$J404];[.$J406];[.EV$5:.EV$404])" office:value-type="float" office:value="0" calcext:value-type="float">
            <text:p>0</text:p>
          </table:table-cell>
          <table:table-cell table:style-name="ce90" table:formula="of:=SUMIF([.$J5:.$J404];[.$J406];[.EW$5:.EW$404])" office:value-type="float" office:value="0" calcext:value-type="float">
            <text:p>0</text:p>
          </table:table-cell>
          <table:table-cell table:style-name="ce90" table:formula="of:=SUMIF([.$J5:.$J404];[.$J406];[.EX$5:.EX$404])" office:value-type="float" office:value="0" calcext:value-type="float">
            <text:p>0</text:p>
          </table:table-cell>
          <table:table-cell table:style-name="ce90" table:formula="of:=SUMIF([.$J5:.$J404];[.$J406];[.EY$5:.EY$404])" office:value-type="float" office:value="0" calcext:value-type="float">
            <text:p>0</text:p>
          </table:table-cell>
          <table:table-cell table:style-name="ce90" table:formula="of:=SUMIF([.$J5:.$J404];[.$J406];[.EZ$5:.EZ$404])" office:value-type="float" office:value="0" calcext:value-type="float">
            <text:p>0</text:p>
          </table:table-cell>
          <table:table-cell table:style-name="ce90" table:formula="of:=SUMIF([.$J5:.$J404];[.$J406];[.FA$5:.FA$404])" office:value-type="float" office:value="0" calcext:value-type="float">
            <text:p>0</text:p>
          </table:table-cell>
          <table:table-cell table:style-name="ce90" table:formula="of:=SUMIF([.$J5:.$J404];[.$J406];[.FB$5:.FB$404])" office:value-type="float" office:value="0" calcext:value-type="float">
            <text:p>0</text:p>
          </table:table-cell>
          <table:table-cell table:style-name="ce90" table:formula="of:=SUMIF([.$J5:.$J404];[.$J406];[.FC$5:.FC$404])" office:value-type="float" office:value="0" calcext:value-type="float">
            <text:p>0</text:p>
          </table:table-cell>
          <table:table-cell table:style-name="ce90" table:formula="of:=SUMIF([.$J5:.$J404];[.$J406];[.FD$5:.FD$404])" office:value-type="float" office:value="0" calcext:value-type="float">
            <text:p>0</text:p>
          </table:table-cell>
          <table:table-cell table:style-name="ce90" table:formula="of:=SUMIF([.$J5:.$J404];[.$J406];[.FE$5:.FE$404])" office:value-type="float" office:value="0" calcext:value-type="float">
            <text:p>0</text:p>
          </table:table-cell>
          <table:table-cell table:style-name="ce90" table:formula="of:=SUMIF([.$J5:.$J404];[.$J406];[.FF$5:.FF$404])" office:value-type="float" office:value="0" calcext:value-type="float">
            <text:p>0</text:p>
          </table:table-cell>
          <table:table-cell table:style-name="ce90" table:formula="of:=SUMIF([.$J5:.$J404];[.$J406];[.FG$5:.FG$404])" office:value-type="float" office:value="0" calcext:value-type="float">
            <text:p>0</text:p>
          </table:table-cell>
          <table:table-cell table:style-name="ce90" table:formula="of:=SUMIF([.$J5:.$J404];[.$J406];[.FH$5:.FH$404])" office:value-type="float" office:value="0" calcext:value-type="float">
            <text:p>0</text:p>
          </table:table-cell>
          <table:table-cell table:style-name="ce90" table:formula="of:=SUMIF([.$J5:.$J404];[.$J406];[.FI$5:.FI$404])" office:value-type="float" office:value="0" calcext:value-type="float">
            <text:p>0</text:p>
          </table:table-cell>
          <table:table-cell table:style-name="ce90" table:formula="of:=SUMIF([.$J5:.$J404];[.$J406];[.FJ$5:.FJ$404])" office:value-type="float" office:value="0" calcext:value-type="float">
            <text:p>0</text:p>
          </table:table-cell>
          <table:table-cell table:style-name="ce90" table:formula="of:=SUMIF([.$J5:.$J404];[.$J406];[.FK$5:.FK$404])" office:value-type="float" office:value="0" calcext:value-type="float">
            <text:p>0</text:p>
          </table:table-cell>
          <table:table-cell table:style-name="ce90" table:formula="of:=SUMIF([.$J5:.$J404];[.$J406];[.FL$5:.FL$404])" office:value-type="float" office:value="0" calcext:value-type="float">
            <text:p>0</text:p>
          </table:table-cell>
          <table:table-cell table:style-name="ce90" table:formula="of:=SUMIF([.$J5:.$J404];[.$J406];[.FM$5:.FM$404])" office:value-type="float" office:value="0" calcext:value-type="float">
            <text:p>0</text:p>
          </table:table-cell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7]&lt;&gt;&quot;&quot;;NETWORKDAYS([.$L407];[.$M407];[$休日.$B$4:.$B$304]);&quot;&quot;)">
            <text:p/>
          </table:table-cell>
          <table:table-cell table:style-name="ce61"/>
          <table:table-cell table:style-name="ce63" table:formula="of:=IF(OR(AND([.$N407]=&quot;&quot;;[.$L407]&lt;&gt;&quot;&quot;;[.$L407]&lt;=[.$U$1]);AND([.$M407]&lt;&gt;&quot;&quot;;[.Q407]&lt;100;[.$M407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405];[.$J407];[.V$5:.V$404])" office:value-type="float" office:value="0" calcext:value-type="float">
            <text:p>0</text:p>
          </table:table-cell>
          <table:table-cell table:style-name="ce90" table:formula="of:=SUMIF([.$J6:.$J405];[.$J407];[.W$5:.W$404])" office:value-type="float" office:value="0" calcext:value-type="float">
            <text:p>0</text:p>
          </table:table-cell>
          <table:table-cell table:style-name="ce90" table:formula="of:=SUMIF([.$J6:.$J405];[.$J407];[.X$5:.X$404])" office:value-type="float" office:value="0" calcext:value-type="float">
            <text:p>0</text:p>
          </table:table-cell>
          <table:table-cell table:style-name="ce114" table:formula="of:=SUMIF([.$J6:.$J405];[.$J407];[.Y$5:.Y$404])" office:value-type="float" office:value="0" calcext:value-type="float">
            <text:p>0</text:p>
          </table:table-cell>
          <table:table-cell table:style-name="ce114" table:formula="of:=SUMIF([.$J6:.$J405];[.$J407];[.Z$5:.Z$404])" office:value-type="float" office:value="0" calcext:value-type="float">
            <text:p>0</text:p>
          </table:table-cell>
          <table:table-cell table:style-name="ce90" table:formula="of:=SUMIF([.$J6:.$J405];[.$J407];[.AA$5:.AA$404])" office:value-type="float" office:value="0" calcext:value-type="float">
            <text:p>0</text:p>
          </table:table-cell>
          <table:table-cell table:style-name="ce90" table:formula="of:=SUMIF([.$J6:.$J405];[.$J407];[.AB$5:.AB$404])" office:value-type="float" office:value="0" calcext:value-type="float">
            <text:p>0</text:p>
          </table:table-cell>
          <table:table-cell table:style-name="ce90" table:formula="of:=SUMIF([.$J6:.$J405];[.$J407];[.AC$5:.AC$404])" office:value-type="float" office:value="0" calcext:value-type="float">
            <text:p>0</text:p>
          </table:table-cell>
          <table:table-cell table:style-name="ce90" table:formula="of:=SUMIF([.$J6:.$J405];[.$J407];[.AD$5:.AD$404])" office:value-type="float" office:value="0" calcext:value-type="float">
            <text:p>0</text:p>
          </table:table-cell>
          <table:table-cell table:style-name="ce90" table:formula="of:=SUMIF([.$J6:.$J405];[.$J407];[.AE$5:.AE$404])" office:value-type="float" office:value="0" calcext:value-type="float">
            <text:p>0</text:p>
          </table:table-cell>
          <table:table-cell table:style-name="ce114" table:formula="of:=SUMIF([.$J6:.$J405];[.$J407];[.AF$5:.AF$404])" office:value-type="float" office:value="0" calcext:value-type="float">
            <text:p>0</text:p>
          </table:table-cell>
          <table:table-cell table:style-name="ce114" table:formula="of:=SUMIF([.$J6:.$J405];[.$J407];[.AG$5:.AG$404])" office:value-type="float" office:value="0" calcext:value-type="float">
            <text:p>0</text:p>
          </table:table-cell>
          <table:table-cell table:style-name="ce90" table:formula="of:=SUMIF([.$J6:.$J405];[.$J407];[.AH$5:.AH$404])" office:value-type="float" office:value="0" calcext:value-type="float">
            <text:p>0</text:p>
          </table:table-cell>
          <table:table-cell table:style-name="ce90" table:formula="of:=SUMIF([.$J6:.$J405];[.$J407];[.AI$5:.AI$404])" office:value-type="float" office:value="0" calcext:value-type="float">
            <text:p>0</text:p>
          </table:table-cell>
          <table:table-cell table:style-name="ce90" table:formula="of:=SUMIF([.$J6:.$J405];[.$J407];[.AJ$5:.AJ$404])" office:value-type="float" office:value="0" calcext:value-type="float">
            <text:p>0</text:p>
          </table:table-cell>
          <table:table-cell table:style-name="ce90" table:formula="of:=SUMIF([.$J6:.$J405];[.$J407];[.AK$5:.AK$404])" office:value-type="float" office:value="0" calcext:value-type="float">
            <text:p>0</text:p>
          </table:table-cell>
          <table:table-cell table:style-name="ce90" table:formula="of:=SUMIF([.$J6:.$J405];[.$J407];[.AL$5:.AL$404])" office:value-type="float" office:value="0" calcext:value-type="float">
            <text:p>0</text:p>
          </table:table-cell>
          <table:table-cell table:style-name="ce114" table:formula="of:=SUMIF([.$J6:.$J405];[.$J407];[.AM$5:.AM$404])" office:value-type="float" office:value="0" calcext:value-type="float">
            <text:p>0</text:p>
          </table:table-cell>
          <table:table-cell table:style-name="ce114" table:formula="of:=SUMIF([.$J6:.$J405];[.$J407];[.AN$5:.AN$404])" office:value-type="float" office:value="0" calcext:value-type="float">
            <text:p>0</text:p>
          </table:table-cell>
          <table:table-cell table:style-name="ce90" table:formula="of:=SUMIF([.$J6:.$J405];[.$J407];[.AO$5:.AO$404])" office:value-type="float" office:value="0" calcext:value-type="float">
            <text:p>0</text:p>
          </table:table-cell>
          <table:table-cell table:style-name="ce90" table:formula="of:=SUMIF([.$J6:.$J405];[.$J407];[.AP$5:.AP$404])" office:value-type="float" office:value="0" calcext:value-type="float">
            <text:p>0</text:p>
          </table:table-cell>
          <table:table-cell table:style-name="ce90" table:formula="of:=SUMIF([.$J6:.$J405];[.$J407];[.AQ$5:.AQ$404])" office:value-type="float" office:value="0" calcext:value-type="float">
            <text:p>0</text:p>
          </table:table-cell>
          <table:table-cell table:style-name="ce90" table:formula="of:=SUMIF([.$J6:.$J405];[.$J407];[.AR$5:.AR$404])" office:value-type="float" office:value="0" calcext:value-type="float">
            <text:p>0</text:p>
          </table:table-cell>
          <table:table-cell table:style-name="ce143" table:formula="of:=SUMIF([.$J6:.$J405];[.$J407];[.AS$5:.AS$404])" office:value-type="float" office:value="0" calcext:value-type="float">
            <text:p>0</text:p>
          </table:table-cell>
          <table:table-cell table:style-name="ce114" table:formula="of:=SUMIF([.$J6:.$J405];[.$J407];[.AT$5:.AT$404])" office:value-type="float" office:value="0" calcext:value-type="float">
            <text:p>0</text:p>
          </table:table-cell>
          <table:table-cell table:style-name="ce114" table:formula="of:=SUMIF([.$J6:.$J405];[.$J407];[.AU$5:.AU$404])" office:value-type="float" office:value="0" calcext:value-type="float">
            <text:p>0</text:p>
          </table:table-cell>
          <table:table-cell table:style-name="ce157" table:formula="of:=SUMIF([.$J6:.$J405];[.$J407];[.AV$5:.AV$404])" office:value-type="float" office:value="0" calcext:value-type="float">
            <text:p>0</text:p>
          </table:table-cell>
          <table:table-cell table:style-name="ce90" table:formula="of:=SUMIF([.$J6:.$J405];[.$J407];[.AW$5:.AW$404])" office:value-type="float" office:value="0" calcext:value-type="float">
            <text:p>0</text:p>
          </table:table-cell>
          <table:table-cell table:style-name="ce90" table:formula="of:=SUMIF([.$J6:.$J405];[.$J407];[.AX$5:.AX$404])" office:value-type="float" office:value="0" calcext:value-type="float">
            <text:p>0</text:p>
          </table:table-cell>
          <table:table-cell table:style-name="ce90" table:formula="of:=SUMIF([.$J6:.$J405];[.$J407];[.AY$5:.AY$404])" office:value-type="float" office:value="0" calcext:value-type="float">
            <text:p>0</text:p>
          </table:table-cell>
          <table:table-cell table:style-name="ce90" table:formula="of:=SUMIF([.$J6:.$J405];[.$J407];[.AZ$5:.AZ$404])" office:value-type="float" office:value="0" calcext:value-type="float">
            <text:p>0</text:p>
          </table:table-cell>
          <table:table-cell table:style-name="ce90" table:formula="of:=SUMIF([.$J6:.$J405];[.$J407];[.BA$5:.BA$404])" office:value-type="float" office:value="0" calcext:value-type="float">
            <text:p>0</text:p>
          </table:table-cell>
          <table:table-cell table:style-name="ce90" table:formula="of:=SUMIF([.$J6:.$J405];[.$J407];[.BB$5:.BB$404])" office:value-type="float" office:value="0" calcext:value-type="float">
            <text:p>0</text:p>
          </table:table-cell>
          <table:table-cell table:style-name="ce90" table:formula="of:=SUMIF([.$J6:.$J405];[.$J407];[.BC$5:.BC$404])" office:value-type="float" office:value="0" calcext:value-type="float">
            <text:p>0</text:p>
          </table:table-cell>
          <table:table-cell table:style-name="ce90" table:formula="of:=SUMIF([.$J6:.$J405];[.$J407];[.BD$5:.BD$404])" office:value-type="float" office:value="0" calcext:value-type="float">
            <text:p>0</text:p>
          </table:table-cell>
          <table:table-cell table:style-name="ce90" table:formula="of:=SUMIF([.$J6:.$J405];[.$J407];[.BE$5:.BE$404])" office:value-type="float" office:value="0" calcext:value-type="float">
            <text:p>0</text:p>
          </table:table-cell>
          <table:table-cell table:style-name="ce90" table:formula="of:=SUMIF([.$J6:.$J405];[.$J407];[.BF$5:.BF$404])" office:value-type="float" office:value="0" calcext:value-type="float">
            <text:p>0</text:p>
          </table:table-cell>
          <table:table-cell table:style-name="ce90" table:formula="of:=SUMIF([.$J6:.$J405];[.$J407];[.BG$5:.BG$404])" office:value-type="float" office:value="0" calcext:value-type="float">
            <text:p>0</text:p>
          </table:table-cell>
          <table:table-cell table:style-name="ce90" table:formula="of:=SUMIF([.$J6:.$J405];[.$J407];[.BH$5:.BH$404])" office:value-type="float" office:value="0" calcext:value-type="float">
            <text:p>0</text:p>
          </table:table-cell>
          <table:table-cell table:style-name="ce90" table:formula="of:=SUMIF([.$J6:.$J405];[.$J407];[.BI$5:.BI$404])" office:value-type="float" office:value="0" calcext:value-type="float">
            <text:p>0</text:p>
          </table:table-cell>
          <table:table-cell table:style-name="ce90" table:formula="of:=SUMIF([.$J6:.$J405];[.$J407];[.BJ$5:.BJ$404])" office:value-type="float" office:value="0" calcext:value-type="float">
            <text:p>0</text:p>
          </table:table-cell>
          <table:table-cell table:style-name="ce90" table:formula="of:=SUMIF([.$J6:.$J405];[.$J407];[.BK$5:.BK$404])" office:value-type="float" office:value="0" calcext:value-type="float">
            <text:p>0</text:p>
          </table:table-cell>
          <table:table-cell table:style-name="ce90" table:formula="of:=SUMIF([.$J6:.$J405];[.$J407];[.BL$5:.BL$404])" office:value-type="float" office:value="0" calcext:value-type="float">
            <text:p>0</text:p>
          </table:table-cell>
          <table:table-cell table:style-name="ce90" table:formula="of:=SUMIF([.$J6:.$J405];[.$J407];[.BM$5:.BM$404])" office:value-type="float" office:value="0" calcext:value-type="float">
            <text:p>0</text:p>
          </table:table-cell>
          <table:table-cell table:style-name="ce90" table:formula="of:=SUMIF([.$J6:.$J405];[.$J407];[.BN$5:.BN$404])" office:value-type="float" office:value="0" calcext:value-type="float">
            <text:p>0</text:p>
          </table:table-cell>
          <table:table-cell table:style-name="ce90" table:formula="of:=SUMIF([.$J6:.$J405];[.$J407];[.BO$5:.BO$404])" office:value-type="float" office:value="0" calcext:value-type="float">
            <text:p>0</text:p>
          </table:table-cell>
          <table:table-cell table:style-name="ce90" table:formula="of:=SUMIF([.$J6:.$J405];[.$J407];[.BP$5:.BP$404])" office:value-type="float" office:value="0" calcext:value-type="float">
            <text:p>0</text:p>
          </table:table-cell>
          <table:table-cell table:style-name="ce90" table:formula="of:=SUMIF([.$J6:.$J405];[.$J407];[.BQ$5:.BQ$404])" office:value-type="float" office:value="0" calcext:value-type="float">
            <text:p>0</text:p>
          </table:table-cell>
          <table:table-cell table:style-name="ce90" table:formula="of:=SUMIF([.$J6:.$J405];[.$J407];[.BR$5:.BR$404])" office:value-type="float" office:value="0" calcext:value-type="float">
            <text:p>0</text:p>
          </table:table-cell>
          <table:table-cell table:style-name="ce90" table:formula="of:=SUMIF([.$J6:.$J405];[.$J407];[.BS$5:.BS$404])" office:value-type="float" office:value="0" calcext:value-type="float">
            <text:p>0</text:p>
          </table:table-cell>
          <table:table-cell table:style-name="ce90" table:formula="of:=SUMIF([.$J6:.$J405];[.$J407];[.BT$5:.BT$404])" office:value-type="float" office:value="0" calcext:value-type="float">
            <text:p>0</text:p>
          </table:table-cell>
          <table:table-cell table:style-name="ce90" table:formula="of:=SUMIF([.$J6:.$J405];[.$J407];[.BU$5:.BU$404])" office:value-type="float" office:value="0" calcext:value-type="float">
            <text:p>0</text:p>
          </table:table-cell>
          <table:table-cell table:style-name="ce90" table:formula="of:=SUMIF([.$J6:.$J405];[.$J407];[.BV$5:.BV$404])" office:value-type="float" office:value="0" calcext:value-type="float">
            <text:p>0</text:p>
          </table:table-cell>
          <table:table-cell table:style-name="ce90" table:formula="of:=SUMIF([.$J6:.$J405];[.$J407];[.BW$5:.BW$404])" office:value-type="float" office:value="0" calcext:value-type="float">
            <text:p>0</text:p>
          </table:table-cell>
          <table:table-cell table:style-name="ce90" table:formula="of:=SUMIF([.$J6:.$J405];[.$J407];[.BX$5:.BX$404])" office:value-type="float" office:value="0" calcext:value-type="float">
            <text:p>0</text:p>
          </table:table-cell>
          <table:table-cell table:style-name="ce90" table:formula="of:=SUMIF([.$J6:.$J405];[.$J407];[.BY$5:.BY$404])" office:value-type="float" office:value="0" calcext:value-type="float">
            <text:p>0</text:p>
          </table:table-cell>
          <table:table-cell table:style-name="ce90" table:formula="of:=SUMIF([.$J6:.$J405];[.$J407];[.BZ$5:.BZ$404])" office:value-type="float" office:value="0" calcext:value-type="float">
            <text:p>0</text:p>
          </table:table-cell>
          <table:table-cell table:style-name="ce90" table:formula="of:=SUMIF([.$J6:.$J405];[.$J407];[.CA$5:.CA$404])" office:value-type="float" office:value="0" calcext:value-type="float">
            <text:p>0</text:p>
          </table:table-cell>
          <table:table-cell table:style-name="ce90" table:formula="of:=SUMIF([.$J6:.$J405];[.$J407];[.CB$5:.CB$404])" office:value-type="float" office:value="0" calcext:value-type="float">
            <text:p>0</text:p>
          </table:table-cell>
          <table:table-cell table:style-name="ce90" table:formula="of:=SUMIF([.$J6:.$J405];[.$J407];[.CC$5:.CC$404])" office:value-type="float" office:value="0" calcext:value-type="float">
            <text:p>0</text:p>
          </table:table-cell>
          <table:table-cell table:style-name="ce90" table:formula="of:=SUMIF([.$J6:.$J405];[.$J407];[.CD$5:.CD$404])" office:value-type="float" office:value="0" calcext:value-type="float">
            <text:p>0</text:p>
          </table:table-cell>
          <table:table-cell table:style-name="ce90" table:formula="of:=SUMIF([.$J6:.$J405];[.$J407];[.CE$5:.CE$404])" office:value-type="float" office:value="0" calcext:value-type="float">
            <text:p>0</text:p>
          </table:table-cell>
          <table:table-cell table:style-name="ce90" table:formula="of:=SUMIF([.$J6:.$J405];[.$J407];[.CF$5:.CF$404])" office:value-type="float" office:value="0" calcext:value-type="float">
            <text:p>0</text:p>
          </table:table-cell>
          <table:table-cell table:style-name="ce90" table:formula="of:=SUMIF([.$J6:.$J405];[.$J407];[.CG$5:.CG$404])" office:value-type="float" office:value="0" calcext:value-type="float">
            <text:p>0</text:p>
          </table:table-cell>
          <table:table-cell table:style-name="ce90" table:formula="of:=SUMIF([.$J6:.$J405];[.$J407];[.CH$5:.CH$404])" office:value-type="float" office:value="0" calcext:value-type="float">
            <text:p>0</text:p>
          </table:table-cell>
          <table:table-cell table:style-name="ce90" table:formula="of:=SUMIF([.$J6:.$J405];[.$J407];[.CI$5:.CI$404])" office:value-type="float" office:value="0" calcext:value-type="float">
            <text:p>0</text:p>
          </table:table-cell>
          <table:table-cell table:style-name="ce90" table:formula="of:=SUMIF([.$J6:.$J405];[.$J407];[.CJ$5:.CJ$404])" office:value-type="float" office:value="0" calcext:value-type="float">
            <text:p>0</text:p>
          </table:table-cell>
          <table:table-cell table:style-name="ce90" table:formula="of:=SUMIF([.$J6:.$J405];[.$J407];[.CK$5:.CK$404])" office:value-type="float" office:value="0" calcext:value-type="float">
            <text:p>0</text:p>
          </table:table-cell>
          <table:table-cell table:style-name="ce90" table:formula="of:=SUMIF([.$J6:.$J405];[.$J407];[.CL$5:.CL$404])" office:value-type="float" office:value="0" calcext:value-type="float">
            <text:p>0</text:p>
          </table:table-cell>
          <table:table-cell table:style-name="ce90" table:formula="of:=SUMIF([.$J6:.$J405];[.$J407];[.CM$5:.CM$404])" office:value-type="float" office:value="0" calcext:value-type="float">
            <text:p>0</text:p>
          </table:table-cell>
          <table:table-cell table:style-name="ce90" table:formula="of:=SUMIF([.$J6:.$J405];[.$J407];[.CN$5:.CN$404])" office:value-type="float" office:value="0" calcext:value-type="float">
            <text:p>0</text:p>
          </table:table-cell>
          <table:table-cell table:style-name="ce90" table:formula="of:=SUMIF([.$J6:.$J405];[.$J407];[.CO$5:.CO$404])" office:value-type="float" office:value="0" calcext:value-type="float">
            <text:p>0</text:p>
          </table:table-cell>
          <table:table-cell table:style-name="ce90" table:formula="of:=SUMIF([.$J6:.$J405];[.$J407];[.CP$5:.CP$404])" office:value-type="float" office:value="0" calcext:value-type="float">
            <text:p>0</text:p>
          </table:table-cell>
          <table:table-cell table:style-name="ce90" table:formula="of:=SUMIF([.$J6:.$J405];[.$J407];[.CQ$5:.CQ$404])" office:value-type="float" office:value="0" calcext:value-type="float">
            <text:p>0</text:p>
          </table:table-cell>
          <table:table-cell table:style-name="ce90" table:formula="of:=SUMIF([.$J6:.$J405];[.$J407];[.CR$5:.CR$404])" office:value-type="float" office:value="0" calcext:value-type="float">
            <text:p>0</text:p>
          </table:table-cell>
          <table:table-cell table:style-name="ce90" table:formula="of:=SUMIF([.$J6:.$J405];[.$J407];[.CS$5:.CS$404])" office:value-type="float" office:value="0" calcext:value-type="float">
            <text:p>0</text:p>
          </table:table-cell>
          <table:table-cell table:style-name="ce90" table:formula="of:=SUMIF([.$J6:.$J405];[.$J407];[.CT$5:.CT$404])" office:value-type="float" office:value="0" calcext:value-type="float">
            <text:p>0</text:p>
          </table:table-cell>
          <table:table-cell table:style-name="ce90" table:formula="of:=SUMIF([.$J6:.$J405];[.$J407];[.CU$5:.CU$404])" office:value-type="float" office:value="0" calcext:value-type="float">
            <text:p>0</text:p>
          </table:table-cell>
          <table:table-cell table:style-name="ce90" table:formula="of:=SUMIF([.$J6:.$J405];[.$J407];[.CV$5:.CV$404])" office:value-type="float" office:value="0" calcext:value-type="float">
            <text:p>0</text:p>
          </table:table-cell>
          <table:table-cell table:style-name="ce90" table:formula="of:=SUMIF([.$J6:.$J405];[.$J407];[.CW$5:.CW$404])" office:value-type="float" office:value="0" calcext:value-type="float">
            <text:p>0</text:p>
          </table:table-cell>
          <table:table-cell table:style-name="ce90" table:formula="of:=SUMIF([.$J6:.$J405];[.$J407];[.CX$5:.CX$404])" office:value-type="float" office:value="0" calcext:value-type="float">
            <text:p>0</text:p>
          </table:table-cell>
          <table:table-cell table:style-name="ce90" table:formula="of:=SUMIF([.$J6:.$J405];[.$J407];[.CY$5:.CY$404])" office:value-type="float" office:value="0" calcext:value-type="float">
            <text:p>0</text:p>
          </table:table-cell>
          <table:table-cell table:style-name="ce90" table:formula="of:=SUMIF([.$J6:.$J405];[.$J407];[.CZ$5:.CZ$404])" office:value-type="float" office:value="0" calcext:value-type="float">
            <text:p>0</text:p>
          </table:table-cell>
          <table:table-cell table:style-name="ce90" table:formula="of:=SUMIF([.$J6:.$J405];[.$J407];[.DA$5:.DA$404])" office:value-type="float" office:value="0" calcext:value-type="float">
            <text:p>0</text:p>
          </table:table-cell>
          <table:table-cell table:style-name="ce90" table:formula="of:=SUMIF([.$J6:.$J405];[.$J407];[.DB$5:.DB$404])" office:value-type="float" office:value="0" calcext:value-type="float">
            <text:p>0</text:p>
          </table:table-cell>
          <table:table-cell table:style-name="ce90" table:formula="of:=SUMIF([.$J6:.$J405];[.$J407];[.DC$5:.DC$404])" office:value-type="float" office:value="0" calcext:value-type="float">
            <text:p>0</text:p>
          </table:table-cell>
          <table:table-cell table:style-name="ce90" table:formula="of:=SUMIF([.$J6:.$J405];[.$J407];[.DD$5:.DD$404])" office:value-type="float" office:value="0" calcext:value-type="float">
            <text:p>0</text:p>
          </table:table-cell>
          <table:table-cell table:style-name="ce90" table:formula="of:=SUMIF([.$J6:.$J405];[.$J407];[.DE$5:.DE$404])" office:value-type="float" office:value="0" calcext:value-type="float">
            <text:p>0</text:p>
          </table:table-cell>
          <table:table-cell table:style-name="ce90" table:formula="of:=SUMIF([.$J6:.$J405];[.$J407];[.DF$5:.DF$404])" office:value-type="float" office:value="0" calcext:value-type="float">
            <text:p>0</text:p>
          </table:table-cell>
          <table:table-cell table:style-name="ce90" table:formula="of:=SUMIF([.$J6:.$J405];[.$J407];[.DG$5:.DG$404])" office:value-type="float" office:value="0" calcext:value-type="float">
            <text:p>0</text:p>
          </table:table-cell>
          <table:table-cell table:style-name="ce90" table:formula="of:=SUMIF([.$J6:.$J405];[.$J407];[.DH$5:.DH$404])" office:value-type="float" office:value="0" calcext:value-type="float">
            <text:p>0</text:p>
          </table:table-cell>
          <table:table-cell table:style-name="ce90" table:formula="of:=SUMIF([.$J6:.$J405];[.$J407];[.DI$5:.DI$404])" office:value-type="float" office:value="0" calcext:value-type="float">
            <text:p>0</text:p>
          </table:table-cell>
          <table:table-cell table:style-name="ce90" table:formula="of:=SUMIF([.$J6:.$J405];[.$J407];[.DJ$5:.DJ$404])" office:value-type="float" office:value="0" calcext:value-type="float">
            <text:p>0</text:p>
          </table:table-cell>
          <table:table-cell table:style-name="ce90" table:formula="of:=SUMIF([.$J6:.$J405];[.$J407];[.DK$5:.DK$404])" office:value-type="float" office:value="0" calcext:value-type="float">
            <text:p>0</text:p>
          </table:table-cell>
          <table:table-cell table:style-name="ce90" table:formula="of:=SUMIF([.$J6:.$J405];[.$J407];[.DL$5:.DL$404])" office:value-type="float" office:value="0" calcext:value-type="float">
            <text:p>0</text:p>
          </table:table-cell>
          <table:table-cell table:style-name="ce90" table:formula="of:=SUMIF([.$J6:.$J405];[.$J407];[.DM$5:.DM$404])" office:value-type="float" office:value="0" calcext:value-type="float">
            <text:p>0</text:p>
          </table:table-cell>
          <table:table-cell table:style-name="ce90" table:formula="of:=SUMIF([.$J6:.$J405];[.$J407];[.DN$5:.DN$404])" office:value-type="float" office:value="0" calcext:value-type="float">
            <text:p>0</text:p>
          </table:table-cell>
          <table:table-cell table:style-name="ce90" table:formula="of:=SUMIF([.$J6:.$J405];[.$J407];[.DO$5:.DO$404])" office:value-type="float" office:value="0" calcext:value-type="float">
            <text:p>0</text:p>
          </table:table-cell>
          <table:table-cell table:style-name="ce90" table:formula="of:=SUMIF([.$J6:.$J405];[.$J407];[.DP$5:.DP$404])" office:value-type="float" office:value="0" calcext:value-type="float">
            <text:p>0</text:p>
          </table:table-cell>
          <table:table-cell table:style-name="ce90" table:formula="of:=SUMIF([.$J6:.$J405];[.$J407];[.DQ$5:.DQ$404])" office:value-type="float" office:value="0" calcext:value-type="float">
            <text:p>0</text:p>
          </table:table-cell>
          <table:table-cell table:style-name="ce90" table:formula="of:=SUMIF([.$J6:.$J405];[.$J407];[.DR$5:.DR$404])" office:value-type="float" office:value="0" calcext:value-type="float">
            <text:p>0</text:p>
          </table:table-cell>
          <table:table-cell table:style-name="ce90" table:formula="of:=SUMIF([.$J6:.$J405];[.$J407];[.DS$5:.DS$404])" office:value-type="float" office:value="0" calcext:value-type="float">
            <text:p>0</text:p>
          </table:table-cell>
          <table:table-cell table:style-name="ce90" table:formula="of:=SUMIF([.$J6:.$J405];[.$J407];[.DT$5:.DT$404])" office:value-type="float" office:value="0" calcext:value-type="float">
            <text:p>0</text:p>
          </table:table-cell>
          <table:table-cell table:style-name="ce90" table:formula="of:=SUMIF([.$J6:.$J405];[.$J407];[.DU$5:.DU$404])" office:value-type="float" office:value="0" calcext:value-type="float">
            <text:p>0</text:p>
          </table:table-cell>
          <table:table-cell table:style-name="ce90" table:formula="of:=SUMIF([.$J6:.$J405];[.$J407];[.DV$5:.DV$404])" office:value-type="float" office:value="0" calcext:value-type="float">
            <text:p>0</text:p>
          </table:table-cell>
          <table:table-cell table:style-name="ce90" table:formula="of:=SUMIF([.$J6:.$J405];[.$J407];[.DW$5:.DW$404])" office:value-type="float" office:value="0" calcext:value-type="float">
            <text:p>0</text:p>
          </table:table-cell>
          <table:table-cell table:style-name="ce90" table:formula="of:=SUMIF([.$J6:.$J405];[.$J407];[.DX$5:.DX$404])" office:value-type="float" office:value="0" calcext:value-type="float">
            <text:p>0</text:p>
          </table:table-cell>
          <table:table-cell table:style-name="ce90" table:formula="of:=SUMIF([.$J6:.$J405];[.$J407];[.DY$5:.DY$404])" office:value-type="float" office:value="0" calcext:value-type="float">
            <text:p>0</text:p>
          </table:table-cell>
          <table:table-cell table:style-name="ce90" table:formula="of:=SUMIF([.$J6:.$J405];[.$J407];[.DZ$5:.DZ$404])" office:value-type="float" office:value="0" calcext:value-type="float">
            <text:p>0</text:p>
          </table:table-cell>
          <table:table-cell table:style-name="ce90" table:formula="of:=SUMIF([.$J6:.$J405];[.$J407];[.EA$5:.EA$404])" office:value-type="float" office:value="0" calcext:value-type="float">
            <text:p>0</text:p>
          </table:table-cell>
          <table:table-cell table:style-name="ce90" table:formula="of:=SUMIF([.$J6:.$J405];[.$J407];[.EB$5:.EB$404])" office:value-type="float" office:value="0" calcext:value-type="float">
            <text:p>0</text:p>
          </table:table-cell>
          <table:table-cell table:style-name="ce90" table:formula="of:=SUMIF([.$J6:.$J405];[.$J407];[.EC$5:.EC$404])" office:value-type="float" office:value="0" calcext:value-type="float">
            <text:p>0</text:p>
          </table:table-cell>
          <table:table-cell table:style-name="ce90" table:formula="of:=SUMIF([.$J6:.$J405];[.$J407];[.ED$5:.ED$404])" office:value-type="float" office:value="0" calcext:value-type="float">
            <text:p>0</text:p>
          </table:table-cell>
          <table:table-cell table:style-name="ce90" table:formula="of:=SUMIF([.$J6:.$J405];[.$J407];[.EE$5:.EE$404])" office:value-type="float" office:value="0" calcext:value-type="float">
            <text:p>0</text:p>
          </table:table-cell>
          <table:table-cell table:style-name="ce90" table:formula="of:=SUMIF([.$J6:.$J405];[.$J407];[.EF$5:.EF$404])" office:value-type="float" office:value="0" calcext:value-type="float">
            <text:p>0</text:p>
          </table:table-cell>
          <table:table-cell table:style-name="ce90" table:formula="of:=SUMIF([.$J6:.$J405];[.$J407];[.EG$5:.EG$404])" office:value-type="float" office:value="0" calcext:value-type="float">
            <text:p>0</text:p>
          </table:table-cell>
          <table:table-cell table:style-name="ce90" table:formula="of:=SUMIF([.$J6:.$J405];[.$J407];[.EH$5:.EH$404])" office:value-type="float" office:value="0" calcext:value-type="float">
            <text:p>0</text:p>
          </table:table-cell>
          <table:table-cell table:style-name="ce90" table:formula="of:=SUMIF([.$J6:.$J405];[.$J407];[.EI$5:.EI$404])" office:value-type="float" office:value="0" calcext:value-type="float">
            <text:p>0</text:p>
          </table:table-cell>
          <table:table-cell table:style-name="ce90" table:formula="of:=SUMIF([.$J6:.$J405];[.$J407];[.EJ$5:.EJ$404])" office:value-type="float" office:value="0" calcext:value-type="float">
            <text:p>0</text:p>
          </table:table-cell>
          <table:table-cell table:style-name="ce90" table:formula="of:=SUMIF([.$J6:.$J405];[.$J407];[.EK$5:.EK$404])" office:value-type="float" office:value="0" calcext:value-type="float">
            <text:p>0</text:p>
          </table:table-cell>
          <table:table-cell table:style-name="ce90" table:formula="of:=SUMIF([.$J6:.$J405];[.$J407];[.EL$5:.EL$404])" office:value-type="float" office:value="0" calcext:value-type="float">
            <text:p>0</text:p>
          </table:table-cell>
          <table:table-cell table:style-name="ce90" table:formula="of:=SUMIF([.$J6:.$J405];[.$J407];[.EM$5:.EM$404])" office:value-type="float" office:value="0" calcext:value-type="float">
            <text:p>0</text:p>
          </table:table-cell>
          <table:table-cell table:style-name="ce90" table:formula="of:=SUMIF([.$J6:.$J405];[.$J407];[.EN$5:.EN$404])" office:value-type="float" office:value="0" calcext:value-type="float">
            <text:p>0</text:p>
          </table:table-cell>
          <table:table-cell table:style-name="ce90" table:formula="of:=SUMIF([.$J6:.$J405];[.$J407];[.EO$5:.EO$404])" office:value-type="float" office:value="0" calcext:value-type="float">
            <text:p>0</text:p>
          </table:table-cell>
          <table:table-cell table:style-name="ce90" table:formula="of:=SUMIF([.$J6:.$J405];[.$J407];[.EP$5:.EP$404])" office:value-type="float" office:value="0" calcext:value-type="float">
            <text:p>0</text:p>
          </table:table-cell>
          <table:table-cell table:style-name="ce90" table:formula="of:=SUMIF([.$J6:.$J405];[.$J407];[.EQ$5:.EQ$404])" office:value-type="float" office:value="0" calcext:value-type="float">
            <text:p>0</text:p>
          </table:table-cell>
          <table:table-cell table:style-name="ce90" table:formula="of:=SUMIF([.$J6:.$J405];[.$J407];[.ER$5:.ER$404])" office:value-type="float" office:value="0" calcext:value-type="float">
            <text:p>0</text:p>
          </table:table-cell>
          <table:table-cell table:style-name="ce90" table:formula="of:=SUMIF([.$J6:.$J405];[.$J407];[.ES$5:.ES$404])" office:value-type="float" office:value="0" calcext:value-type="float">
            <text:p>0</text:p>
          </table:table-cell>
          <table:table-cell table:style-name="ce90" table:formula="of:=SUMIF([.$J6:.$J405];[.$J407];[.ET$5:.ET$404])" office:value-type="float" office:value="0" calcext:value-type="float">
            <text:p>0</text:p>
          </table:table-cell>
          <table:table-cell table:style-name="ce90" table:formula="of:=SUMIF([.$J6:.$J405];[.$J407];[.EU$5:.EU$404])" office:value-type="float" office:value="0" calcext:value-type="float">
            <text:p>0</text:p>
          </table:table-cell>
          <table:table-cell table:style-name="ce90" table:formula="of:=SUMIF([.$J6:.$J405];[.$J407];[.EV$5:.EV$404])" office:value-type="float" office:value="0" calcext:value-type="float">
            <text:p>0</text:p>
          </table:table-cell>
          <table:table-cell table:style-name="ce90" table:formula="of:=SUMIF([.$J6:.$J405];[.$J407];[.EW$5:.EW$404])" office:value-type="float" office:value="0" calcext:value-type="float">
            <text:p>0</text:p>
          </table:table-cell>
          <table:table-cell table:style-name="ce90" table:formula="of:=SUMIF([.$J6:.$J405];[.$J407];[.EX$5:.EX$404])" office:value-type="float" office:value="0" calcext:value-type="float">
            <text:p>0</text:p>
          </table:table-cell>
          <table:table-cell table:style-name="ce90" table:formula="of:=SUMIF([.$J6:.$J405];[.$J407];[.EY$5:.EY$404])" office:value-type="float" office:value="0" calcext:value-type="float">
            <text:p>0</text:p>
          </table:table-cell>
          <table:table-cell table:style-name="ce90" table:formula="of:=SUMIF([.$J6:.$J405];[.$J407];[.EZ$5:.EZ$404])" office:value-type="float" office:value="0" calcext:value-type="float">
            <text:p>0</text:p>
          </table:table-cell>
          <table:table-cell table:style-name="ce90" table:formula="of:=SUMIF([.$J6:.$J405];[.$J407];[.FA$5:.FA$404])" office:value-type="float" office:value="0" calcext:value-type="float">
            <text:p>0</text:p>
          </table:table-cell>
          <table:table-cell table:style-name="ce90" table:formula="of:=SUMIF([.$J6:.$J405];[.$J407];[.FB$5:.FB$404])" office:value-type="float" office:value="0" calcext:value-type="float">
            <text:p>0</text:p>
          </table:table-cell>
          <table:table-cell table:style-name="ce90" table:formula="of:=SUMIF([.$J6:.$J405];[.$J407];[.FC$5:.FC$404])" office:value-type="float" office:value="0" calcext:value-type="float">
            <text:p>0</text:p>
          </table:table-cell>
          <table:table-cell table:style-name="ce90" table:formula="of:=SUMIF([.$J6:.$J405];[.$J407];[.FD$5:.FD$404])" office:value-type="float" office:value="0" calcext:value-type="float">
            <text:p>0</text:p>
          </table:table-cell>
          <table:table-cell table:style-name="ce90" table:formula="of:=SUMIF([.$J6:.$J405];[.$J407];[.FE$5:.FE$404])" office:value-type="float" office:value="0" calcext:value-type="float">
            <text:p>0</text:p>
          </table:table-cell>
          <table:table-cell table:style-name="ce90" table:formula="of:=SUMIF([.$J6:.$J405];[.$J407];[.FF$5:.FF$404])" office:value-type="float" office:value="0" calcext:value-type="float">
            <text:p>0</text:p>
          </table:table-cell>
          <table:table-cell table:style-name="ce90" table:formula="of:=SUMIF([.$J6:.$J405];[.$J407];[.FG$5:.FG$404])" office:value-type="float" office:value="0" calcext:value-type="float">
            <text:p>0</text:p>
          </table:table-cell>
          <table:table-cell table:style-name="ce90" table:formula="of:=SUMIF([.$J6:.$J405];[.$J407];[.FH$5:.FH$404])" office:value-type="float" office:value="0" calcext:value-type="float">
            <text:p>0</text:p>
          </table:table-cell>
          <table:table-cell table:style-name="ce90" table:formula="of:=SUMIF([.$J6:.$J405];[.$J407];[.FI$5:.FI$404])" office:value-type="float" office:value="0" calcext:value-type="float">
            <text:p>0</text:p>
          </table:table-cell>
          <table:table-cell table:style-name="ce90" table:formula="of:=SUMIF([.$J6:.$J405];[.$J407];[.FJ$5:.FJ$404])" office:value-type="float" office:value="0" calcext:value-type="float">
            <text:p>0</text:p>
          </table:table-cell>
          <table:table-cell table:style-name="ce90" table:formula="of:=SUMIF([.$J6:.$J405];[.$J407];[.FK$5:.FK$404])" office:value-type="float" office:value="0" calcext:value-type="float">
            <text:p>0</text:p>
          </table:table-cell>
          <table:table-cell table:style-name="ce90" table:formula="of:=SUMIF([.$J6:.$J405];[.$J407];[.FL$5:.FL$404])" office:value-type="float" office:value="0" calcext:value-type="float">
            <text:p>0</text:p>
          </table:table-cell>
          <table:table-cell table:style-name="ce90" table:formula="of:=SUMIF([.$J6:.$J405];[.$J407];[.FM$5:.FM$404])" office:value-type="float" office:value="0" calcext:value-type="float">
            <text:p>0</text:p>
          </table:table-cell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8]&lt;&gt;&quot;&quot;;NETWORKDAYS([.$L408];[.$M408];[$休日.$B$4:.$B$304]);&quot;&quot;)">
            <text:p/>
          </table:table-cell>
          <table:table-cell table:style-name="ce61"/>
          <table:table-cell table:style-name="ce63" table:formula="of:=IF(OR(AND([.$N408]=&quot;&quot;;[.$L408]&lt;&gt;&quot;&quot;;[.$L408]&lt;=[.$U$1]);AND([.$M408]&lt;&gt;&quot;&quot;;[.Q408]&lt;100;[.$M408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406];[.$J408];[.V$5:.V$404])" office:value-type="float" office:value="0" calcext:value-type="float">
            <text:p>0</text:p>
          </table:table-cell>
          <table:table-cell table:style-name="ce90" table:formula="of:=SUMIF([.$J7:.$J406];[.$J408];[.W$5:.W$404])" office:value-type="float" office:value="0" calcext:value-type="float">
            <text:p>0</text:p>
          </table:table-cell>
          <table:table-cell table:style-name="ce90" table:formula="of:=SUMIF([.$J7:.$J406];[.$J408];[.X$5:.X$404])" office:value-type="float" office:value="0" calcext:value-type="float">
            <text:p>0</text:p>
          </table:table-cell>
          <table:table-cell table:style-name="ce114" table:formula="of:=SUMIF([.$J7:.$J406];[.$J408];[.Y$5:.Y$404])" office:value-type="float" office:value="0" calcext:value-type="float">
            <text:p>0</text:p>
          </table:table-cell>
          <table:table-cell table:style-name="ce114" table:formula="of:=SUMIF([.$J7:.$J406];[.$J408];[.Z$5:.Z$404])" office:value-type="float" office:value="0" calcext:value-type="float">
            <text:p>0</text:p>
          </table:table-cell>
          <table:table-cell table:style-name="ce90" table:formula="of:=SUMIF([.$J7:.$J406];[.$J408];[.AA$5:.AA$404])" office:value-type="float" office:value="0" calcext:value-type="float">
            <text:p>0</text:p>
          </table:table-cell>
          <table:table-cell table:style-name="ce90" table:formula="of:=SUMIF([.$J7:.$J406];[.$J408];[.AB$5:.AB$404])" office:value-type="float" office:value="0" calcext:value-type="float">
            <text:p>0</text:p>
          </table:table-cell>
          <table:table-cell table:style-name="ce90" table:formula="of:=SUMIF([.$J7:.$J406];[.$J408];[.AC$5:.AC$404])" office:value-type="float" office:value="0" calcext:value-type="float">
            <text:p>0</text:p>
          </table:table-cell>
          <table:table-cell table:style-name="ce90" table:formula="of:=SUMIF([.$J7:.$J406];[.$J408];[.AD$5:.AD$404])" office:value-type="float" office:value="0" calcext:value-type="float">
            <text:p>0</text:p>
          </table:table-cell>
          <table:table-cell table:style-name="ce90" table:formula="of:=SUMIF([.$J7:.$J406];[.$J408];[.AE$5:.AE$404])" office:value-type="float" office:value="0" calcext:value-type="float">
            <text:p>0</text:p>
          </table:table-cell>
          <table:table-cell table:style-name="ce114" table:formula="of:=SUMIF([.$J7:.$J406];[.$J408];[.AF$5:.AF$404])" office:value-type="float" office:value="0" calcext:value-type="float">
            <text:p>0</text:p>
          </table:table-cell>
          <table:table-cell table:style-name="ce114" table:formula="of:=SUMIF([.$J7:.$J406];[.$J408];[.AG$5:.AG$404])" office:value-type="float" office:value="0" calcext:value-type="float">
            <text:p>0</text:p>
          </table:table-cell>
          <table:table-cell table:style-name="ce90" table:formula="of:=SUMIF([.$J7:.$J406];[.$J408];[.AH$5:.AH$404])" office:value-type="float" office:value="0" calcext:value-type="float">
            <text:p>0</text:p>
          </table:table-cell>
          <table:table-cell table:style-name="ce90" table:formula="of:=SUMIF([.$J7:.$J406];[.$J408];[.AI$5:.AI$404])" office:value-type="float" office:value="0" calcext:value-type="float">
            <text:p>0</text:p>
          </table:table-cell>
          <table:table-cell table:style-name="ce90" table:formula="of:=SUMIF([.$J7:.$J406];[.$J408];[.AJ$5:.AJ$404])" office:value-type="float" office:value="0" calcext:value-type="float">
            <text:p>0</text:p>
          </table:table-cell>
          <table:table-cell table:style-name="ce90" table:formula="of:=SUMIF([.$J7:.$J406];[.$J408];[.AK$5:.AK$404])" office:value-type="float" office:value="0" calcext:value-type="float">
            <text:p>0</text:p>
          </table:table-cell>
          <table:table-cell table:style-name="ce90" table:formula="of:=SUMIF([.$J7:.$J406];[.$J408];[.AL$5:.AL$404])" office:value-type="float" office:value="0" calcext:value-type="float">
            <text:p>0</text:p>
          </table:table-cell>
          <table:table-cell table:style-name="ce114" table:formula="of:=SUMIF([.$J7:.$J406];[.$J408];[.AM$5:.AM$404])" office:value-type="float" office:value="0" calcext:value-type="float">
            <text:p>0</text:p>
          </table:table-cell>
          <table:table-cell table:style-name="ce114" table:formula="of:=SUMIF([.$J7:.$J406];[.$J408];[.AN$5:.AN$404])" office:value-type="float" office:value="0" calcext:value-type="float">
            <text:p>0</text:p>
          </table:table-cell>
          <table:table-cell table:style-name="ce90" table:formula="of:=SUMIF([.$J7:.$J406];[.$J408];[.AO$5:.AO$404])" office:value-type="float" office:value="0" calcext:value-type="float">
            <text:p>0</text:p>
          </table:table-cell>
          <table:table-cell table:style-name="ce90" table:formula="of:=SUMIF([.$J7:.$J406];[.$J408];[.AP$5:.AP$404])" office:value-type="float" office:value="0" calcext:value-type="float">
            <text:p>0</text:p>
          </table:table-cell>
          <table:table-cell table:style-name="ce90" table:formula="of:=SUMIF([.$J7:.$J406];[.$J408];[.AQ$5:.AQ$404])" office:value-type="float" office:value="0" calcext:value-type="float">
            <text:p>0</text:p>
          </table:table-cell>
          <table:table-cell table:style-name="ce90" table:formula="of:=SUMIF([.$J7:.$J406];[.$J408];[.AR$5:.AR$404])" office:value-type="float" office:value="0" calcext:value-type="float">
            <text:p>0</text:p>
          </table:table-cell>
          <table:table-cell table:style-name="ce143" table:formula="of:=SUMIF([.$J7:.$J406];[.$J408];[.AS$5:.AS$404])" office:value-type="float" office:value="0" calcext:value-type="float">
            <text:p>0</text:p>
          </table:table-cell>
          <table:table-cell table:style-name="ce114" table:formula="of:=SUMIF([.$J7:.$J406];[.$J408];[.AT$5:.AT$404])" office:value-type="float" office:value="0" calcext:value-type="float">
            <text:p>0</text:p>
          </table:table-cell>
          <table:table-cell table:style-name="ce114" table:formula="of:=SUMIF([.$J7:.$J406];[.$J408];[.AU$5:.AU$404])" office:value-type="float" office:value="0" calcext:value-type="float">
            <text:p>0</text:p>
          </table:table-cell>
          <table:table-cell table:style-name="ce157" table:formula="of:=SUMIF([.$J7:.$J406];[.$J408];[.AV$5:.AV$404])" office:value-type="float" office:value="0" calcext:value-type="float">
            <text:p>0</text:p>
          </table:table-cell>
          <table:table-cell table:style-name="ce90" table:formula="of:=SUMIF([.$J7:.$J406];[.$J408];[.AW$5:.AW$404])" office:value-type="float" office:value="0" calcext:value-type="float">
            <text:p>0</text:p>
          </table:table-cell>
          <table:table-cell table:style-name="ce90" table:formula="of:=SUMIF([.$J7:.$J406];[.$J408];[.AX$5:.AX$404])" office:value-type="float" office:value="0" calcext:value-type="float">
            <text:p>0</text:p>
          </table:table-cell>
          <table:table-cell table:style-name="ce90" table:formula="of:=SUMIF([.$J7:.$J406];[.$J408];[.AY$5:.AY$404])" office:value-type="float" office:value="0" calcext:value-type="float">
            <text:p>0</text:p>
          </table:table-cell>
          <table:table-cell table:style-name="ce90" table:formula="of:=SUMIF([.$J7:.$J406];[.$J408];[.AZ$5:.AZ$404])" office:value-type="float" office:value="0" calcext:value-type="float">
            <text:p>0</text:p>
          </table:table-cell>
          <table:table-cell table:style-name="ce90" table:formula="of:=SUMIF([.$J7:.$J406];[.$J408];[.BA$5:.BA$404])" office:value-type="float" office:value="0" calcext:value-type="float">
            <text:p>0</text:p>
          </table:table-cell>
          <table:table-cell table:style-name="ce90" table:formula="of:=SUMIF([.$J7:.$J406];[.$J408];[.BB$5:.BB$404])" office:value-type="float" office:value="0" calcext:value-type="float">
            <text:p>0</text:p>
          </table:table-cell>
          <table:table-cell table:style-name="ce90" table:formula="of:=SUMIF([.$J7:.$J406];[.$J408];[.BC$5:.BC$404])" office:value-type="float" office:value="0" calcext:value-type="float">
            <text:p>0</text:p>
          </table:table-cell>
          <table:table-cell table:style-name="ce90" table:formula="of:=SUMIF([.$J7:.$J406];[.$J408];[.BD$5:.BD$404])" office:value-type="float" office:value="0" calcext:value-type="float">
            <text:p>0</text:p>
          </table:table-cell>
          <table:table-cell table:style-name="ce90" table:formula="of:=SUMIF([.$J7:.$J406];[.$J408];[.BE$5:.BE$404])" office:value-type="float" office:value="0" calcext:value-type="float">
            <text:p>0</text:p>
          </table:table-cell>
          <table:table-cell table:style-name="ce90" table:formula="of:=SUMIF([.$J7:.$J406];[.$J408];[.BF$5:.BF$404])" office:value-type="float" office:value="0" calcext:value-type="float">
            <text:p>0</text:p>
          </table:table-cell>
          <table:table-cell table:style-name="ce90" table:formula="of:=SUMIF([.$J7:.$J406];[.$J408];[.BG$5:.BG$404])" office:value-type="float" office:value="0" calcext:value-type="float">
            <text:p>0</text:p>
          </table:table-cell>
          <table:table-cell table:style-name="ce90" table:formula="of:=SUMIF([.$J7:.$J406];[.$J408];[.BH$5:.BH$404])" office:value-type="float" office:value="0" calcext:value-type="float">
            <text:p>0</text:p>
          </table:table-cell>
          <table:table-cell table:style-name="ce90" table:formula="of:=SUMIF([.$J7:.$J406];[.$J408];[.BI$5:.BI$404])" office:value-type="float" office:value="0" calcext:value-type="float">
            <text:p>0</text:p>
          </table:table-cell>
          <table:table-cell table:style-name="ce90" table:formula="of:=SUMIF([.$J7:.$J406];[.$J408];[.BJ$5:.BJ$404])" office:value-type="float" office:value="0" calcext:value-type="float">
            <text:p>0</text:p>
          </table:table-cell>
          <table:table-cell table:style-name="ce90" table:formula="of:=SUMIF([.$J7:.$J406];[.$J408];[.BK$5:.BK$404])" office:value-type="float" office:value="0" calcext:value-type="float">
            <text:p>0</text:p>
          </table:table-cell>
          <table:table-cell table:style-name="ce90" table:formula="of:=SUMIF([.$J7:.$J406];[.$J408];[.BL$5:.BL$404])" office:value-type="float" office:value="0" calcext:value-type="float">
            <text:p>0</text:p>
          </table:table-cell>
          <table:table-cell table:style-name="ce90" table:formula="of:=SUMIF([.$J7:.$J406];[.$J408];[.BM$5:.BM$404])" office:value-type="float" office:value="0" calcext:value-type="float">
            <text:p>0</text:p>
          </table:table-cell>
          <table:table-cell table:style-name="ce90" table:formula="of:=SUMIF([.$J7:.$J406];[.$J408];[.BN$5:.BN$404])" office:value-type="float" office:value="0" calcext:value-type="float">
            <text:p>0</text:p>
          </table:table-cell>
          <table:table-cell table:style-name="ce90" table:formula="of:=SUMIF([.$J7:.$J406];[.$J408];[.BO$5:.BO$404])" office:value-type="float" office:value="0" calcext:value-type="float">
            <text:p>0</text:p>
          </table:table-cell>
          <table:table-cell table:style-name="ce90" table:formula="of:=SUMIF([.$J7:.$J406];[.$J408];[.BP$5:.BP$404])" office:value-type="float" office:value="0" calcext:value-type="float">
            <text:p>0</text:p>
          </table:table-cell>
          <table:table-cell table:style-name="ce90" table:formula="of:=SUMIF([.$J7:.$J406];[.$J408];[.BQ$5:.BQ$404])" office:value-type="float" office:value="0" calcext:value-type="float">
            <text:p>0</text:p>
          </table:table-cell>
          <table:table-cell table:style-name="ce90" table:formula="of:=SUMIF([.$J7:.$J406];[.$J408];[.BR$5:.BR$404])" office:value-type="float" office:value="0" calcext:value-type="float">
            <text:p>0</text:p>
          </table:table-cell>
          <table:table-cell table:style-name="ce90" table:formula="of:=SUMIF([.$J7:.$J406];[.$J408];[.BS$5:.BS$404])" office:value-type="float" office:value="0" calcext:value-type="float">
            <text:p>0</text:p>
          </table:table-cell>
          <table:table-cell table:style-name="ce90" table:formula="of:=SUMIF([.$J7:.$J406];[.$J408];[.BT$5:.BT$404])" office:value-type="float" office:value="0" calcext:value-type="float">
            <text:p>0</text:p>
          </table:table-cell>
          <table:table-cell table:style-name="ce90" table:formula="of:=SUMIF([.$J7:.$J406];[.$J408];[.BU$5:.BU$404])" office:value-type="float" office:value="0" calcext:value-type="float">
            <text:p>0</text:p>
          </table:table-cell>
          <table:table-cell table:style-name="ce90" table:formula="of:=SUMIF([.$J7:.$J406];[.$J408];[.BV$5:.BV$404])" office:value-type="float" office:value="0" calcext:value-type="float">
            <text:p>0</text:p>
          </table:table-cell>
          <table:table-cell table:style-name="ce90" table:formula="of:=SUMIF([.$J7:.$J406];[.$J408];[.BW$5:.BW$404])" office:value-type="float" office:value="0" calcext:value-type="float">
            <text:p>0</text:p>
          </table:table-cell>
          <table:table-cell table:style-name="ce90" table:formula="of:=SUMIF([.$J7:.$J406];[.$J408];[.BX$5:.BX$404])" office:value-type="float" office:value="0" calcext:value-type="float">
            <text:p>0</text:p>
          </table:table-cell>
          <table:table-cell table:style-name="ce90" table:formula="of:=SUMIF([.$J7:.$J406];[.$J408];[.BY$5:.BY$404])" office:value-type="float" office:value="0" calcext:value-type="float">
            <text:p>0</text:p>
          </table:table-cell>
          <table:table-cell table:style-name="ce90" table:formula="of:=SUMIF([.$J7:.$J406];[.$J408];[.BZ$5:.BZ$404])" office:value-type="float" office:value="0" calcext:value-type="float">
            <text:p>0</text:p>
          </table:table-cell>
          <table:table-cell table:style-name="ce90" table:formula="of:=SUMIF([.$J7:.$J406];[.$J408];[.CA$5:.CA$404])" office:value-type="float" office:value="0" calcext:value-type="float">
            <text:p>0</text:p>
          </table:table-cell>
          <table:table-cell table:style-name="ce90" table:formula="of:=SUMIF([.$J7:.$J406];[.$J408];[.CB$5:.CB$404])" office:value-type="float" office:value="0" calcext:value-type="float">
            <text:p>0</text:p>
          </table:table-cell>
          <table:table-cell table:style-name="ce90" table:formula="of:=SUMIF([.$J7:.$J406];[.$J408];[.CC$5:.CC$404])" office:value-type="float" office:value="0" calcext:value-type="float">
            <text:p>0</text:p>
          </table:table-cell>
          <table:table-cell table:style-name="ce90" table:formula="of:=SUMIF([.$J7:.$J406];[.$J408];[.CD$5:.CD$404])" office:value-type="float" office:value="0" calcext:value-type="float">
            <text:p>0</text:p>
          </table:table-cell>
          <table:table-cell table:style-name="ce90" table:formula="of:=SUMIF([.$J7:.$J406];[.$J408];[.CE$5:.CE$404])" office:value-type="float" office:value="0" calcext:value-type="float">
            <text:p>0</text:p>
          </table:table-cell>
          <table:table-cell table:style-name="ce90" table:formula="of:=SUMIF([.$J7:.$J406];[.$J408];[.CF$5:.CF$404])" office:value-type="float" office:value="0" calcext:value-type="float">
            <text:p>0</text:p>
          </table:table-cell>
          <table:table-cell table:style-name="ce90" table:formula="of:=SUMIF([.$J7:.$J406];[.$J408];[.CG$5:.CG$404])" office:value-type="float" office:value="0" calcext:value-type="float">
            <text:p>0</text:p>
          </table:table-cell>
          <table:table-cell table:style-name="ce90" table:formula="of:=SUMIF([.$J7:.$J406];[.$J408];[.CH$5:.CH$404])" office:value-type="float" office:value="0" calcext:value-type="float">
            <text:p>0</text:p>
          </table:table-cell>
          <table:table-cell table:style-name="ce90" table:formula="of:=SUMIF([.$J7:.$J406];[.$J408];[.CI$5:.CI$404])" office:value-type="float" office:value="0" calcext:value-type="float">
            <text:p>0</text:p>
          </table:table-cell>
          <table:table-cell table:style-name="ce90" table:formula="of:=SUMIF([.$J7:.$J406];[.$J408];[.CJ$5:.CJ$404])" office:value-type="float" office:value="0" calcext:value-type="float">
            <text:p>0</text:p>
          </table:table-cell>
          <table:table-cell table:style-name="ce90" table:formula="of:=SUMIF([.$J7:.$J406];[.$J408];[.CK$5:.CK$404])" office:value-type="float" office:value="0" calcext:value-type="float">
            <text:p>0</text:p>
          </table:table-cell>
          <table:table-cell table:style-name="ce90" table:formula="of:=SUMIF([.$J7:.$J406];[.$J408];[.CL$5:.CL$404])" office:value-type="float" office:value="0" calcext:value-type="float">
            <text:p>0</text:p>
          </table:table-cell>
          <table:table-cell table:style-name="ce90" table:formula="of:=SUMIF([.$J7:.$J406];[.$J408];[.CM$5:.CM$404])" office:value-type="float" office:value="0" calcext:value-type="float">
            <text:p>0</text:p>
          </table:table-cell>
          <table:table-cell table:style-name="ce90" table:formula="of:=SUMIF([.$J7:.$J406];[.$J408];[.CN$5:.CN$404])" office:value-type="float" office:value="0" calcext:value-type="float">
            <text:p>0</text:p>
          </table:table-cell>
          <table:table-cell table:style-name="ce90" table:formula="of:=SUMIF([.$J7:.$J406];[.$J408];[.CO$5:.CO$404])" office:value-type="float" office:value="0" calcext:value-type="float">
            <text:p>0</text:p>
          </table:table-cell>
          <table:table-cell table:style-name="ce90" table:formula="of:=SUMIF([.$J7:.$J406];[.$J408];[.CP$5:.CP$404])" office:value-type="float" office:value="0" calcext:value-type="float">
            <text:p>0</text:p>
          </table:table-cell>
          <table:table-cell table:style-name="ce90" table:formula="of:=SUMIF([.$J7:.$J406];[.$J408];[.CQ$5:.CQ$404])" office:value-type="float" office:value="0" calcext:value-type="float">
            <text:p>0</text:p>
          </table:table-cell>
          <table:table-cell table:style-name="ce90" table:formula="of:=SUMIF([.$J7:.$J406];[.$J408];[.CR$5:.CR$404])" office:value-type="float" office:value="0" calcext:value-type="float">
            <text:p>0</text:p>
          </table:table-cell>
          <table:table-cell table:style-name="ce90" table:formula="of:=SUMIF([.$J7:.$J406];[.$J408];[.CS$5:.CS$404])" office:value-type="float" office:value="0" calcext:value-type="float">
            <text:p>0</text:p>
          </table:table-cell>
          <table:table-cell table:style-name="ce90" table:formula="of:=SUMIF([.$J7:.$J406];[.$J408];[.CT$5:.CT$404])" office:value-type="float" office:value="0" calcext:value-type="float">
            <text:p>0</text:p>
          </table:table-cell>
          <table:table-cell table:style-name="ce90" table:formula="of:=SUMIF([.$J7:.$J406];[.$J408];[.CU$5:.CU$404])" office:value-type="float" office:value="0" calcext:value-type="float">
            <text:p>0</text:p>
          </table:table-cell>
          <table:table-cell table:style-name="ce90" table:formula="of:=SUMIF([.$J7:.$J406];[.$J408];[.CV$5:.CV$404])" office:value-type="float" office:value="0" calcext:value-type="float">
            <text:p>0</text:p>
          </table:table-cell>
          <table:table-cell table:style-name="ce90" table:formula="of:=SUMIF([.$J7:.$J406];[.$J408];[.CW$5:.CW$404])" office:value-type="float" office:value="0" calcext:value-type="float">
            <text:p>0</text:p>
          </table:table-cell>
          <table:table-cell table:style-name="ce90" table:formula="of:=SUMIF([.$J7:.$J406];[.$J408];[.CX$5:.CX$404])" office:value-type="float" office:value="0" calcext:value-type="float">
            <text:p>0</text:p>
          </table:table-cell>
          <table:table-cell table:style-name="ce90" table:formula="of:=SUMIF([.$J7:.$J406];[.$J408];[.CY$5:.CY$404])" office:value-type="float" office:value="0" calcext:value-type="float">
            <text:p>0</text:p>
          </table:table-cell>
          <table:table-cell table:style-name="ce90" table:formula="of:=SUMIF([.$J7:.$J406];[.$J408];[.CZ$5:.CZ$404])" office:value-type="float" office:value="0" calcext:value-type="float">
            <text:p>0</text:p>
          </table:table-cell>
          <table:table-cell table:style-name="ce90" table:formula="of:=SUMIF([.$J7:.$J406];[.$J408];[.DA$5:.DA$404])" office:value-type="float" office:value="0" calcext:value-type="float">
            <text:p>0</text:p>
          </table:table-cell>
          <table:table-cell table:style-name="ce90" table:formula="of:=SUMIF([.$J7:.$J406];[.$J408];[.DB$5:.DB$404])" office:value-type="float" office:value="0" calcext:value-type="float">
            <text:p>0</text:p>
          </table:table-cell>
          <table:table-cell table:style-name="ce90" table:formula="of:=SUMIF([.$J7:.$J406];[.$J408];[.DC$5:.DC$404])" office:value-type="float" office:value="0" calcext:value-type="float">
            <text:p>0</text:p>
          </table:table-cell>
          <table:table-cell table:style-name="ce90" table:formula="of:=SUMIF([.$J7:.$J406];[.$J408];[.DD$5:.DD$404])" office:value-type="float" office:value="0" calcext:value-type="float">
            <text:p>0</text:p>
          </table:table-cell>
          <table:table-cell table:style-name="ce90" table:formula="of:=SUMIF([.$J7:.$J406];[.$J408];[.DE$5:.DE$404])" office:value-type="float" office:value="0" calcext:value-type="float">
            <text:p>0</text:p>
          </table:table-cell>
          <table:table-cell table:style-name="ce90" table:formula="of:=SUMIF([.$J7:.$J406];[.$J408];[.DF$5:.DF$404])" office:value-type="float" office:value="0" calcext:value-type="float">
            <text:p>0</text:p>
          </table:table-cell>
          <table:table-cell table:style-name="ce90" table:formula="of:=SUMIF([.$J7:.$J406];[.$J408];[.DG$5:.DG$404])" office:value-type="float" office:value="0" calcext:value-type="float">
            <text:p>0</text:p>
          </table:table-cell>
          <table:table-cell table:style-name="ce90" table:formula="of:=SUMIF([.$J7:.$J406];[.$J408];[.DH$5:.DH$404])" office:value-type="float" office:value="0" calcext:value-type="float">
            <text:p>0</text:p>
          </table:table-cell>
          <table:table-cell table:style-name="ce90" table:formula="of:=SUMIF([.$J7:.$J406];[.$J408];[.DI$5:.DI$404])" office:value-type="float" office:value="0" calcext:value-type="float">
            <text:p>0</text:p>
          </table:table-cell>
          <table:table-cell table:style-name="ce90" table:formula="of:=SUMIF([.$J7:.$J406];[.$J408];[.DJ$5:.DJ$404])" office:value-type="float" office:value="0" calcext:value-type="float">
            <text:p>0</text:p>
          </table:table-cell>
          <table:table-cell table:style-name="ce90" table:formula="of:=SUMIF([.$J7:.$J406];[.$J408];[.DK$5:.DK$404])" office:value-type="float" office:value="0" calcext:value-type="float">
            <text:p>0</text:p>
          </table:table-cell>
          <table:table-cell table:style-name="ce90" table:formula="of:=SUMIF([.$J7:.$J406];[.$J408];[.DL$5:.DL$404])" office:value-type="float" office:value="0" calcext:value-type="float">
            <text:p>0</text:p>
          </table:table-cell>
          <table:table-cell table:style-name="ce90" table:formula="of:=SUMIF([.$J7:.$J406];[.$J408];[.DM$5:.DM$404])" office:value-type="float" office:value="0" calcext:value-type="float">
            <text:p>0</text:p>
          </table:table-cell>
          <table:table-cell table:style-name="ce90" table:formula="of:=SUMIF([.$J7:.$J406];[.$J408];[.DN$5:.DN$404])" office:value-type="float" office:value="0" calcext:value-type="float">
            <text:p>0</text:p>
          </table:table-cell>
          <table:table-cell table:style-name="ce90" table:formula="of:=SUMIF([.$J7:.$J406];[.$J408];[.DO$5:.DO$404])" office:value-type="float" office:value="0" calcext:value-type="float">
            <text:p>0</text:p>
          </table:table-cell>
          <table:table-cell table:style-name="ce90" table:formula="of:=SUMIF([.$J7:.$J406];[.$J408];[.DP$5:.DP$404])" office:value-type="float" office:value="0" calcext:value-type="float">
            <text:p>0</text:p>
          </table:table-cell>
          <table:table-cell table:style-name="ce90" table:formula="of:=SUMIF([.$J7:.$J406];[.$J408];[.DQ$5:.DQ$404])" office:value-type="float" office:value="0" calcext:value-type="float">
            <text:p>0</text:p>
          </table:table-cell>
          <table:table-cell table:style-name="ce90" table:formula="of:=SUMIF([.$J7:.$J406];[.$J408];[.DR$5:.DR$404])" office:value-type="float" office:value="0" calcext:value-type="float">
            <text:p>0</text:p>
          </table:table-cell>
          <table:table-cell table:style-name="ce90" table:formula="of:=SUMIF([.$J7:.$J406];[.$J408];[.DS$5:.DS$404])" office:value-type="float" office:value="0" calcext:value-type="float">
            <text:p>0</text:p>
          </table:table-cell>
          <table:table-cell table:style-name="ce90" table:formula="of:=SUMIF([.$J7:.$J406];[.$J408];[.DT$5:.DT$404])" office:value-type="float" office:value="0" calcext:value-type="float">
            <text:p>0</text:p>
          </table:table-cell>
          <table:table-cell table:style-name="ce90" table:formula="of:=SUMIF([.$J7:.$J406];[.$J408];[.DU$5:.DU$404])" office:value-type="float" office:value="0" calcext:value-type="float">
            <text:p>0</text:p>
          </table:table-cell>
          <table:table-cell table:style-name="ce90" table:formula="of:=SUMIF([.$J7:.$J406];[.$J408];[.DV$5:.DV$404])" office:value-type="float" office:value="0" calcext:value-type="float">
            <text:p>0</text:p>
          </table:table-cell>
          <table:table-cell table:style-name="ce90" table:formula="of:=SUMIF([.$J7:.$J406];[.$J408];[.DW$5:.DW$404])" office:value-type="float" office:value="0" calcext:value-type="float">
            <text:p>0</text:p>
          </table:table-cell>
          <table:table-cell table:style-name="ce90" table:formula="of:=SUMIF([.$J7:.$J406];[.$J408];[.DX$5:.DX$404])" office:value-type="float" office:value="0" calcext:value-type="float">
            <text:p>0</text:p>
          </table:table-cell>
          <table:table-cell table:style-name="ce90" table:formula="of:=SUMIF([.$J7:.$J406];[.$J408];[.DY$5:.DY$404])" office:value-type="float" office:value="0" calcext:value-type="float">
            <text:p>0</text:p>
          </table:table-cell>
          <table:table-cell table:style-name="ce90" table:formula="of:=SUMIF([.$J7:.$J406];[.$J408];[.DZ$5:.DZ$404])" office:value-type="float" office:value="0" calcext:value-type="float">
            <text:p>0</text:p>
          </table:table-cell>
          <table:table-cell table:style-name="ce90" table:formula="of:=SUMIF([.$J7:.$J406];[.$J408];[.EA$5:.EA$404])" office:value-type="float" office:value="0" calcext:value-type="float">
            <text:p>0</text:p>
          </table:table-cell>
          <table:table-cell table:style-name="ce90" table:formula="of:=SUMIF([.$J7:.$J406];[.$J408];[.EB$5:.EB$404])" office:value-type="float" office:value="0" calcext:value-type="float">
            <text:p>0</text:p>
          </table:table-cell>
          <table:table-cell table:style-name="ce90" table:formula="of:=SUMIF([.$J7:.$J406];[.$J408];[.EC$5:.EC$404])" office:value-type="float" office:value="0" calcext:value-type="float">
            <text:p>0</text:p>
          </table:table-cell>
          <table:table-cell table:style-name="ce90" table:formula="of:=SUMIF([.$J7:.$J406];[.$J408];[.ED$5:.ED$404])" office:value-type="float" office:value="0" calcext:value-type="float">
            <text:p>0</text:p>
          </table:table-cell>
          <table:table-cell table:style-name="ce90" table:formula="of:=SUMIF([.$J7:.$J406];[.$J408];[.EE$5:.EE$404])" office:value-type="float" office:value="0" calcext:value-type="float">
            <text:p>0</text:p>
          </table:table-cell>
          <table:table-cell table:style-name="ce90" table:formula="of:=SUMIF([.$J7:.$J406];[.$J408];[.EF$5:.EF$404])" office:value-type="float" office:value="0" calcext:value-type="float">
            <text:p>0</text:p>
          </table:table-cell>
          <table:table-cell table:style-name="ce90" table:formula="of:=SUMIF([.$J7:.$J406];[.$J408];[.EG$5:.EG$404])" office:value-type="float" office:value="0" calcext:value-type="float">
            <text:p>0</text:p>
          </table:table-cell>
          <table:table-cell table:style-name="ce90" table:formula="of:=SUMIF([.$J7:.$J406];[.$J408];[.EH$5:.EH$404])" office:value-type="float" office:value="0" calcext:value-type="float">
            <text:p>0</text:p>
          </table:table-cell>
          <table:table-cell table:style-name="ce90" table:formula="of:=SUMIF([.$J7:.$J406];[.$J408];[.EI$5:.EI$404])" office:value-type="float" office:value="0" calcext:value-type="float">
            <text:p>0</text:p>
          </table:table-cell>
          <table:table-cell table:style-name="ce90" table:formula="of:=SUMIF([.$J7:.$J406];[.$J408];[.EJ$5:.EJ$404])" office:value-type="float" office:value="0" calcext:value-type="float">
            <text:p>0</text:p>
          </table:table-cell>
          <table:table-cell table:style-name="ce90" table:formula="of:=SUMIF([.$J7:.$J406];[.$J408];[.EK$5:.EK$404])" office:value-type="float" office:value="0" calcext:value-type="float">
            <text:p>0</text:p>
          </table:table-cell>
          <table:table-cell table:style-name="ce90" table:formula="of:=SUMIF([.$J7:.$J406];[.$J408];[.EL$5:.EL$404])" office:value-type="float" office:value="0" calcext:value-type="float">
            <text:p>0</text:p>
          </table:table-cell>
          <table:table-cell table:style-name="ce90" table:formula="of:=SUMIF([.$J7:.$J406];[.$J408];[.EM$5:.EM$404])" office:value-type="float" office:value="0" calcext:value-type="float">
            <text:p>0</text:p>
          </table:table-cell>
          <table:table-cell table:style-name="ce90" table:formula="of:=SUMIF([.$J7:.$J406];[.$J408];[.EN$5:.EN$404])" office:value-type="float" office:value="0" calcext:value-type="float">
            <text:p>0</text:p>
          </table:table-cell>
          <table:table-cell table:style-name="ce90" table:formula="of:=SUMIF([.$J7:.$J406];[.$J408];[.EO$5:.EO$404])" office:value-type="float" office:value="0" calcext:value-type="float">
            <text:p>0</text:p>
          </table:table-cell>
          <table:table-cell table:style-name="ce90" table:formula="of:=SUMIF([.$J7:.$J406];[.$J408];[.EP$5:.EP$404])" office:value-type="float" office:value="0" calcext:value-type="float">
            <text:p>0</text:p>
          </table:table-cell>
          <table:table-cell table:style-name="ce90" table:formula="of:=SUMIF([.$J7:.$J406];[.$J408];[.EQ$5:.EQ$404])" office:value-type="float" office:value="0" calcext:value-type="float">
            <text:p>0</text:p>
          </table:table-cell>
          <table:table-cell table:style-name="ce90" table:formula="of:=SUMIF([.$J7:.$J406];[.$J408];[.ER$5:.ER$404])" office:value-type="float" office:value="0" calcext:value-type="float">
            <text:p>0</text:p>
          </table:table-cell>
          <table:table-cell table:style-name="ce90" table:formula="of:=SUMIF([.$J7:.$J406];[.$J408];[.ES$5:.ES$404])" office:value-type="float" office:value="0" calcext:value-type="float">
            <text:p>0</text:p>
          </table:table-cell>
          <table:table-cell table:style-name="ce90" table:formula="of:=SUMIF([.$J7:.$J406];[.$J408];[.ET$5:.ET$404])" office:value-type="float" office:value="0" calcext:value-type="float">
            <text:p>0</text:p>
          </table:table-cell>
          <table:table-cell table:style-name="ce90" table:formula="of:=SUMIF([.$J7:.$J406];[.$J408];[.EU$5:.EU$404])" office:value-type="float" office:value="0" calcext:value-type="float">
            <text:p>0</text:p>
          </table:table-cell>
          <table:table-cell table:style-name="ce90" table:formula="of:=SUMIF([.$J7:.$J406];[.$J408];[.EV$5:.EV$404])" office:value-type="float" office:value="0" calcext:value-type="float">
            <text:p>0</text:p>
          </table:table-cell>
          <table:table-cell table:style-name="ce90" table:formula="of:=SUMIF([.$J7:.$J406];[.$J408];[.EW$5:.EW$404])" office:value-type="float" office:value="0" calcext:value-type="float">
            <text:p>0</text:p>
          </table:table-cell>
          <table:table-cell table:style-name="ce90" table:formula="of:=SUMIF([.$J7:.$J406];[.$J408];[.EX$5:.EX$404])" office:value-type="float" office:value="0" calcext:value-type="float">
            <text:p>0</text:p>
          </table:table-cell>
          <table:table-cell table:style-name="ce90" table:formula="of:=SUMIF([.$J7:.$J406];[.$J408];[.EY$5:.EY$404])" office:value-type="float" office:value="0" calcext:value-type="float">
            <text:p>0</text:p>
          </table:table-cell>
          <table:table-cell table:style-name="ce90" table:formula="of:=SUMIF([.$J7:.$J406];[.$J408];[.EZ$5:.EZ$404])" office:value-type="float" office:value="0" calcext:value-type="float">
            <text:p>0</text:p>
          </table:table-cell>
          <table:table-cell table:style-name="ce90" table:formula="of:=SUMIF([.$J7:.$J406];[.$J408];[.FA$5:.FA$404])" office:value-type="float" office:value="0" calcext:value-type="float">
            <text:p>0</text:p>
          </table:table-cell>
          <table:table-cell table:style-name="ce90" table:formula="of:=SUMIF([.$J7:.$J406];[.$J408];[.FB$5:.FB$404])" office:value-type="float" office:value="0" calcext:value-type="float">
            <text:p>0</text:p>
          </table:table-cell>
          <table:table-cell table:style-name="ce90" table:formula="of:=SUMIF([.$J7:.$J406];[.$J408];[.FC$5:.FC$404])" office:value-type="float" office:value="0" calcext:value-type="float">
            <text:p>0</text:p>
          </table:table-cell>
          <table:table-cell table:style-name="ce90" table:formula="of:=SUMIF([.$J7:.$J406];[.$J408];[.FD$5:.FD$404])" office:value-type="float" office:value="0" calcext:value-type="float">
            <text:p>0</text:p>
          </table:table-cell>
          <table:table-cell table:style-name="ce90" table:formula="of:=SUMIF([.$J7:.$J406];[.$J408];[.FE$5:.FE$404])" office:value-type="float" office:value="0" calcext:value-type="float">
            <text:p>0</text:p>
          </table:table-cell>
          <table:table-cell table:style-name="ce90" table:formula="of:=SUMIF([.$J7:.$J406];[.$J408];[.FF$5:.FF$404])" office:value-type="float" office:value="0" calcext:value-type="float">
            <text:p>0</text:p>
          </table:table-cell>
          <table:table-cell table:style-name="ce90" table:formula="of:=SUMIF([.$J7:.$J406];[.$J408];[.FG$5:.FG$404])" office:value-type="float" office:value="0" calcext:value-type="float">
            <text:p>0</text:p>
          </table:table-cell>
          <table:table-cell table:style-name="ce90" table:formula="of:=SUMIF([.$J7:.$J406];[.$J408];[.FH$5:.FH$404])" office:value-type="float" office:value="0" calcext:value-type="float">
            <text:p>0</text:p>
          </table:table-cell>
          <table:table-cell table:style-name="ce90" table:formula="of:=SUMIF([.$J7:.$J406];[.$J408];[.FI$5:.FI$404])" office:value-type="float" office:value="0" calcext:value-type="float">
            <text:p>0</text:p>
          </table:table-cell>
          <table:table-cell table:style-name="ce90" table:formula="of:=SUMIF([.$J7:.$J406];[.$J408];[.FJ$5:.FJ$404])" office:value-type="float" office:value="0" calcext:value-type="float">
            <text:p>0</text:p>
          </table:table-cell>
          <table:table-cell table:style-name="ce90" table:formula="of:=SUMIF([.$J7:.$J406];[.$J408];[.FK$5:.FK$404])" office:value-type="float" office:value="0" calcext:value-type="float">
            <text:p>0</text:p>
          </table:table-cell>
          <table:table-cell table:style-name="ce90" table:formula="of:=SUMIF([.$J7:.$J406];[.$J408];[.FL$5:.FL$404])" office:value-type="float" office:value="0" calcext:value-type="float">
            <text:p>0</text:p>
          </table:table-cell>
          <table:table-cell table:style-name="ce90" table:formula="of:=SUMIF([.$J7:.$J406];[.$J408];[.FM$5:.FM$404])" office:value-type="float" office:value="0" calcext:value-type="float">
            <text:p>0</text:p>
          </table:table-cell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9]&lt;&gt;&quot;&quot;;NETWORKDAYS([.$L409];[.$M409];[$休日.$B$4:.$B$304]);&quot;&quot;)">
            <text:p/>
          </table:table-cell>
          <table:table-cell table:style-name="ce61"/>
          <table:table-cell table:style-name="ce63" table:formula="of:=IF(OR(AND([.$N409]=&quot;&quot;;[.$L409]&lt;&gt;&quot;&quot;;[.$L409]&lt;=[.$U$1]);AND([.$M409]&lt;&gt;&quot;&quot;;[.Q409]&lt;100;[.$M409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407];[.$J409];[.V$5:.V$404])" office:value-type="float" office:value="0" calcext:value-type="float">
            <text:p>0</text:p>
          </table:table-cell>
          <table:table-cell table:style-name="ce90" table:formula="of:=SUMIF([.$J8:.$J407];[.$J409];[.W$5:.W$404])" office:value-type="float" office:value="0" calcext:value-type="float">
            <text:p>0</text:p>
          </table:table-cell>
          <table:table-cell table:style-name="ce90" table:formula="of:=SUMIF([.$J8:.$J407];[.$J409];[.X$5:.X$404])" office:value-type="float" office:value="0" calcext:value-type="float">
            <text:p>0</text:p>
          </table:table-cell>
          <table:table-cell table:style-name="ce114" table:formula="of:=SUMIF([.$J8:.$J407];[.$J409];[.Y$5:.Y$404])" office:value-type="float" office:value="0" calcext:value-type="float">
            <text:p>0</text:p>
          </table:table-cell>
          <table:table-cell table:style-name="ce114" table:formula="of:=SUMIF([.$J8:.$J407];[.$J409];[.Z$5:.Z$404])" office:value-type="float" office:value="0" calcext:value-type="float">
            <text:p>0</text:p>
          </table:table-cell>
          <table:table-cell table:style-name="ce90" table:formula="of:=SUMIF([.$J8:.$J407];[.$J409];[.AA$5:.AA$404])" office:value-type="float" office:value="0" calcext:value-type="float">
            <text:p>0</text:p>
          </table:table-cell>
          <table:table-cell table:style-name="ce90" table:formula="of:=SUMIF([.$J8:.$J407];[.$J409];[.AB$5:.AB$404])" office:value-type="float" office:value="0" calcext:value-type="float">
            <text:p>0</text:p>
          </table:table-cell>
          <table:table-cell table:style-name="ce90" table:formula="of:=SUMIF([.$J8:.$J407];[.$J409];[.AC$5:.AC$404])" office:value-type="float" office:value="0" calcext:value-type="float">
            <text:p>0</text:p>
          </table:table-cell>
          <table:table-cell table:style-name="ce90" table:formula="of:=SUMIF([.$J8:.$J407];[.$J409];[.AD$5:.AD$404])" office:value-type="float" office:value="0" calcext:value-type="float">
            <text:p>0</text:p>
          </table:table-cell>
          <table:table-cell table:style-name="ce90" table:formula="of:=SUMIF([.$J8:.$J407];[.$J409];[.AE$5:.AE$404])" office:value-type="float" office:value="0" calcext:value-type="float">
            <text:p>0</text:p>
          </table:table-cell>
          <table:table-cell table:style-name="ce114" table:formula="of:=SUMIF([.$J8:.$J407];[.$J409];[.AF$5:.AF$404])" office:value-type="float" office:value="0" calcext:value-type="float">
            <text:p>0</text:p>
          </table:table-cell>
          <table:table-cell table:style-name="ce114" table:formula="of:=SUMIF([.$J8:.$J407];[.$J409];[.AG$5:.AG$404])" office:value-type="float" office:value="0" calcext:value-type="float">
            <text:p>0</text:p>
          </table:table-cell>
          <table:table-cell table:style-name="ce90" table:formula="of:=SUMIF([.$J8:.$J407];[.$J409];[.AH$5:.AH$404])" office:value-type="float" office:value="0" calcext:value-type="float">
            <text:p>0</text:p>
          </table:table-cell>
          <table:table-cell table:style-name="ce90" table:formula="of:=SUMIF([.$J8:.$J407];[.$J409];[.AI$5:.AI$404])" office:value-type="float" office:value="0" calcext:value-type="float">
            <text:p>0</text:p>
          </table:table-cell>
          <table:table-cell table:style-name="ce90" table:formula="of:=SUMIF([.$J8:.$J407];[.$J409];[.AJ$5:.AJ$404])" office:value-type="float" office:value="0" calcext:value-type="float">
            <text:p>0</text:p>
          </table:table-cell>
          <table:table-cell table:style-name="ce90" table:formula="of:=SUMIF([.$J8:.$J407];[.$J409];[.AK$5:.AK$404])" office:value-type="float" office:value="0" calcext:value-type="float">
            <text:p>0</text:p>
          </table:table-cell>
          <table:table-cell table:style-name="ce90" table:formula="of:=SUMIF([.$J8:.$J407];[.$J409];[.AL$5:.AL$404])" office:value-type="float" office:value="0" calcext:value-type="float">
            <text:p>0</text:p>
          </table:table-cell>
          <table:table-cell table:style-name="ce114" table:formula="of:=SUMIF([.$J8:.$J407];[.$J409];[.AM$5:.AM$404])" office:value-type="float" office:value="0" calcext:value-type="float">
            <text:p>0</text:p>
          </table:table-cell>
          <table:table-cell table:style-name="ce114" table:formula="of:=SUMIF([.$J8:.$J407];[.$J409];[.AN$5:.AN$404])" office:value-type="float" office:value="0" calcext:value-type="float">
            <text:p>0</text:p>
          </table:table-cell>
          <table:table-cell table:style-name="ce90" table:formula="of:=SUMIF([.$J8:.$J407];[.$J409];[.AO$5:.AO$404])" office:value-type="float" office:value="0" calcext:value-type="float">
            <text:p>0</text:p>
          </table:table-cell>
          <table:table-cell table:style-name="ce90" table:formula="of:=SUMIF([.$J8:.$J407];[.$J409];[.AP$5:.AP$404])" office:value-type="float" office:value="0" calcext:value-type="float">
            <text:p>0</text:p>
          </table:table-cell>
          <table:table-cell table:style-name="ce90" table:formula="of:=SUMIF([.$J8:.$J407];[.$J409];[.AQ$5:.AQ$404])" office:value-type="float" office:value="0" calcext:value-type="float">
            <text:p>0</text:p>
          </table:table-cell>
          <table:table-cell table:style-name="ce90" table:formula="of:=SUMIF([.$J8:.$J407];[.$J409];[.AR$5:.AR$404])" office:value-type="float" office:value="0" calcext:value-type="float">
            <text:p>0</text:p>
          </table:table-cell>
          <table:table-cell table:style-name="ce143" table:formula="of:=SUMIF([.$J8:.$J407];[.$J409];[.AS$5:.AS$404])" office:value-type="float" office:value="0" calcext:value-type="float">
            <text:p>0</text:p>
          </table:table-cell>
          <table:table-cell table:style-name="ce114" table:formula="of:=SUMIF([.$J8:.$J407];[.$J409];[.AT$5:.AT$404])" office:value-type="float" office:value="0" calcext:value-type="float">
            <text:p>0</text:p>
          </table:table-cell>
          <table:table-cell table:style-name="ce114" table:formula="of:=SUMIF([.$J8:.$J407];[.$J409];[.AU$5:.AU$404])" office:value-type="float" office:value="0" calcext:value-type="float">
            <text:p>0</text:p>
          </table:table-cell>
          <table:table-cell table:style-name="ce157" table:formula="of:=SUMIF([.$J8:.$J407];[.$J409];[.AV$5:.AV$404])" office:value-type="float" office:value="0" calcext:value-type="float">
            <text:p>0</text:p>
          </table:table-cell>
          <table:table-cell table:style-name="ce90" table:formula="of:=SUMIF([.$J8:.$J407];[.$J409];[.AW$5:.AW$404])" office:value-type="float" office:value="0" calcext:value-type="float">
            <text:p>0</text:p>
          </table:table-cell>
          <table:table-cell table:style-name="ce90" table:formula="of:=SUMIF([.$J8:.$J407];[.$J409];[.AX$5:.AX$404])" office:value-type="float" office:value="0" calcext:value-type="float">
            <text:p>0</text:p>
          </table:table-cell>
          <table:table-cell table:style-name="ce90" table:formula="of:=SUMIF([.$J8:.$J407];[.$J409];[.AY$5:.AY$404])" office:value-type="float" office:value="0" calcext:value-type="float">
            <text:p>0</text:p>
          </table:table-cell>
          <table:table-cell table:style-name="ce90" table:formula="of:=SUMIF([.$J8:.$J407];[.$J409];[.AZ$5:.AZ$404])" office:value-type="float" office:value="0" calcext:value-type="float">
            <text:p>0</text:p>
          </table:table-cell>
          <table:table-cell table:style-name="ce90" table:formula="of:=SUMIF([.$J8:.$J407];[.$J409];[.BA$5:.BA$404])" office:value-type="float" office:value="0" calcext:value-type="float">
            <text:p>0</text:p>
          </table:table-cell>
          <table:table-cell table:style-name="ce90" table:formula="of:=SUMIF([.$J8:.$J407];[.$J409];[.BB$5:.BB$404])" office:value-type="float" office:value="0" calcext:value-type="float">
            <text:p>0</text:p>
          </table:table-cell>
          <table:table-cell table:style-name="ce90" table:formula="of:=SUMIF([.$J8:.$J407];[.$J409];[.BC$5:.BC$404])" office:value-type="float" office:value="0" calcext:value-type="float">
            <text:p>0</text:p>
          </table:table-cell>
          <table:table-cell table:style-name="ce90" table:formula="of:=SUMIF([.$J8:.$J407];[.$J409];[.BD$5:.BD$404])" office:value-type="float" office:value="0" calcext:value-type="float">
            <text:p>0</text:p>
          </table:table-cell>
          <table:table-cell table:style-name="ce90" table:formula="of:=SUMIF([.$J8:.$J407];[.$J409];[.BE$5:.BE$404])" office:value-type="float" office:value="0" calcext:value-type="float">
            <text:p>0</text:p>
          </table:table-cell>
          <table:table-cell table:style-name="ce90" table:formula="of:=SUMIF([.$J8:.$J407];[.$J409];[.BF$5:.BF$404])" office:value-type="float" office:value="0" calcext:value-type="float">
            <text:p>0</text:p>
          </table:table-cell>
          <table:table-cell table:style-name="ce90" table:formula="of:=SUMIF([.$J8:.$J407];[.$J409];[.BG$5:.BG$404])" office:value-type="float" office:value="0" calcext:value-type="float">
            <text:p>0</text:p>
          </table:table-cell>
          <table:table-cell table:style-name="ce90" table:formula="of:=SUMIF([.$J8:.$J407];[.$J409];[.BH$5:.BH$404])" office:value-type="float" office:value="0" calcext:value-type="float">
            <text:p>0</text:p>
          </table:table-cell>
          <table:table-cell table:style-name="ce90" table:formula="of:=SUMIF([.$J8:.$J407];[.$J409];[.BI$5:.BI$404])" office:value-type="float" office:value="0" calcext:value-type="float">
            <text:p>0</text:p>
          </table:table-cell>
          <table:table-cell table:style-name="ce90" table:formula="of:=SUMIF([.$J8:.$J407];[.$J409];[.BJ$5:.BJ$404])" office:value-type="float" office:value="0" calcext:value-type="float">
            <text:p>0</text:p>
          </table:table-cell>
          <table:table-cell table:style-name="ce90" table:formula="of:=SUMIF([.$J8:.$J407];[.$J409];[.BK$5:.BK$404])" office:value-type="float" office:value="0" calcext:value-type="float">
            <text:p>0</text:p>
          </table:table-cell>
          <table:table-cell table:style-name="ce90" table:formula="of:=SUMIF([.$J8:.$J407];[.$J409];[.BL$5:.BL$404])" office:value-type="float" office:value="0" calcext:value-type="float">
            <text:p>0</text:p>
          </table:table-cell>
          <table:table-cell table:style-name="ce90" table:formula="of:=SUMIF([.$J8:.$J407];[.$J409];[.BM$5:.BM$404])" office:value-type="float" office:value="0" calcext:value-type="float">
            <text:p>0</text:p>
          </table:table-cell>
          <table:table-cell table:style-name="ce90" table:formula="of:=SUMIF([.$J8:.$J407];[.$J409];[.BN$5:.BN$404])" office:value-type="float" office:value="0" calcext:value-type="float">
            <text:p>0</text:p>
          </table:table-cell>
          <table:table-cell table:style-name="ce90" table:formula="of:=SUMIF([.$J8:.$J407];[.$J409];[.BO$5:.BO$404])" office:value-type="float" office:value="0" calcext:value-type="float">
            <text:p>0</text:p>
          </table:table-cell>
          <table:table-cell table:style-name="ce90" table:formula="of:=SUMIF([.$J8:.$J407];[.$J409];[.BP$5:.BP$404])" office:value-type="float" office:value="0" calcext:value-type="float">
            <text:p>0</text:p>
          </table:table-cell>
          <table:table-cell table:style-name="ce90" table:formula="of:=SUMIF([.$J8:.$J407];[.$J409];[.BQ$5:.BQ$404])" office:value-type="float" office:value="0" calcext:value-type="float">
            <text:p>0</text:p>
          </table:table-cell>
          <table:table-cell table:style-name="ce90" table:formula="of:=SUMIF([.$J8:.$J407];[.$J409];[.BR$5:.BR$404])" office:value-type="float" office:value="0" calcext:value-type="float">
            <text:p>0</text:p>
          </table:table-cell>
          <table:table-cell table:style-name="ce90" table:formula="of:=SUMIF([.$J8:.$J407];[.$J409];[.BS$5:.BS$404])" office:value-type="float" office:value="0" calcext:value-type="float">
            <text:p>0</text:p>
          </table:table-cell>
          <table:table-cell table:style-name="ce90" table:formula="of:=SUMIF([.$J8:.$J407];[.$J409];[.BT$5:.BT$404])" office:value-type="float" office:value="0" calcext:value-type="float">
            <text:p>0</text:p>
          </table:table-cell>
          <table:table-cell table:style-name="ce90" table:formula="of:=SUMIF([.$J8:.$J407];[.$J409];[.BU$5:.BU$404])" office:value-type="float" office:value="0" calcext:value-type="float">
            <text:p>0</text:p>
          </table:table-cell>
          <table:table-cell table:style-name="ce90" table:formula="of:=SUMIF([.$J8:.$J407];[.$J409];[.BV$5:.BV$404])" office:value-type="float" office:value="0" calcext:value-type="float">
            <text:p>0</text:p>
          </table:table-cell>
          <table:table-cell table:style-name="ce90" table:formula="of:=SUMIF([.$J8:.$J407];[.$J409];[.BW$5:.BW$404])" office:value-type="float" office:value="0" calcext:value-type="float">
            <text:p>0</text:p>
          </table:table-cell>
          <table:table-cell table:style-name="ce90" table:formula="of:=SUMIF([.$J8:.$J407];[.$J409];[.BX$5:.BX$404])" office:value-type="float" office:value="0" calcext:value-type="float">
            <text:p>0</text:p>
          </table:table-cell>
          <table:table-cell table:style-name="ce90" table:formula="of:=SUMIF([.$J8:.$J407];[.$J409];[.BY$5:.BY$404])" office:value-type="float" office:value="0" calcext:value-type="float">
            <text:p>0</text:p>
          </table:table-cell>
          <table:table-cell table:style-name="ce90" table:formula="of:=SUMIF([.$J8:.$J407];[.$J409];[.BZ$5:.BZ$404])" office:value-type="float" office:value="0" calcext:value-type="float">
            <text:p>0</text:p>
          </table:table-cell>
          <table:table-cell table:style-name="ce90" table:formula="of:=SUMIF([.$J8:.$J407];[.$J409];[.CA$5:.CA$404])" office:value-type="float" office:value="0" calcext:value-type="float">
            <text:p>0</text:p>
          </table:table-cell>
          <table:table-cell table:style-name="ce90" table:formula="of:=SUMIF([.$J8:.$J407];[.$J409];[.CB$5:.CB$404])" office:value-type="float" office:value="0" calcext:value-type="float">
            <text:p>0</text:p>
          </table:table-cell>
          <table:table-cell table:style-name="ce90" table:formula="of:=SUMIF([.$J8:.$J407];[.$J409];[.CC$5:.CC$404])" office:value-type="float" office:value="0" calcext:value-type="float">
            <text:p>0</text:p>
          </table:table-cell>
          <table:table-cell table:style-name="ce90" table:formula="of:=SUMIF([.$J8:.$J407];[.$J409];[.CD$5:.CD$404])" office:value-type="float" office:value="0" calcext:value-type="float">
            <text:p>0</text:p>
          </table:table-cell>
          <table:table-cell table:style-name="ce90" table:formula="of:=SUMIF([.$J8:.$J407];[.$J409];[.CE$5:.CE$404])" office:value-type="float" office:value="0" calcext:value-type="float">
            <text:p>0</text:p>
          </table:table-cell>
          <table:table-cell table:style-name="ce90" table:formula="of:=SUMIF([.$J8:.$J407];[.$J409];[.CF$5:.CF$404])" office:value-type="float" office:value="0" calcext:value-type="float">
            <text:p>0</text:p>
          </table:table-cell>
          <table:table-cell table:style-name="ce90" table:formula="of:=SUMIF([.$J8:.$J407];[.$J409];[.CG$5:.CG$404])" office:value-type="float" office:value="0" calcext:value-type="float">
            <text:p>0</text:p>
          </table:table-cell>
          <table:table-cell table:style-name="ce90" table:formula="of:=SUMIF([.$J8:.$J407];[.$J409];[.CH$5:.CH$404])" office:value-type="float" office:value="0" calcext:value-type="float">
            <text:p>0</text:p>
          </table:table-cell>
          <table:table-cell table:style-name="ce90" table:formula="of:=SUMIF([.$J8:.$J407];[.$J409];[.CI$5:.CI$404])" office:value-type="float" office:value="0" calcext:value-type="float">
            <text:p>0</text:p>
          </table:table-cell>
          <table:table-cell table:style-name="ce90" table:formula="of:=SUMIF([.$J8:.$J407];[.$J409];[.CJ$5:.CJ$404])" office:value-type="float" office:value="0" calcext:value-type="float">
            <text:p>0</text:p>
          </table:table-cell>
          <table:table-cell table:style-name="ce90" table:formula="of:=SUMIF([.$J8:.$J407];[.$J409];[.CK$5:.CK$404])" office:value-type="float" office:value="0" calcext:value-type="float">
            <text:p>0</text:p>
          </table:table-cell>
          <table:table-cell table:style-name="ce90" table:formula="of:=SUMIF([.$J8:.$J407];[.$J409];[.CL$5:.CL$404])" office:value-type="float" office:value="0" calcext:value-type="float">
            <text:p>0</text:p>
          </table:table-cell>
          <table:table-cell table:style-name="ce90" table:formula="of:=SUMIF([.$J8:.$J407];[.$J409];[.CM$5:.CM$404])" office:value-type="float" office:value="0" calcext:value-type="float">
            <text:p>0</text:p>
          </table:table-cell>
          <table:table-cell table:style-name="ce90" table:formula="of:=SUMIF([.$J8:.$J407];[.$J409];[.CN$5:.CN$404])" office:value-type="float" office:value="0" calcext:value-type="float">
            <text:p>0</text:p>
          </table:table-cell>
          <table:table-cell table:style-name="ce90" table:formula="of:=SUMIF([.$J8:.$J407];[.$J409];[.CO$5:.CO$404])" office:value-type="float" office:value="0" calcext:value-type="float">
            <text:p>0</text:p>
          </table:table-cell>
          <table:table-cell table:style-name="ce90" table:formula="of:=SUMIF([.$J8:.$J407];[.$J409];[.CP$5:.CP$404])" office:value-type="float" office:value="0" calcext:value-type="float">
            <text:p>0</text:p>
          </table:table-cell>
          <table:table-cell table:style-name="ce90" table:formula="of:=SUMIF([.$J8:.$J407];[.$J409];[.CQ$5:.CQ$404])" office:value-type="float" office:value="0" calcext:value-type="float">
            <text:p>0</text:p>
          </table:table-cell>
          <table:table-cell table:style-name="ce90" table:formula="of:=SUMIF([.$J8:.$J407];[.$J409];[.CR$5:.CR$404])" office:value-type="float" office:value="0" calcext:value-type="float">
            <text:p>0</text:p>
          </table:table-cell>
          <table:table-cell table:style-name="ce90" table:formula="of:=SUMIF([.$J8:.$J407];[.$J409];[.CS$5:.CS$404])" office:value-type="float" office:value="0" calcext:value-type="float">
            <text:p>0</text:p>
          </table:table-cell>
          <table:table-cell table:style-name="ce90" table:formula="of:=SUMIF([.$J8:.$J407];[.$J409];[.CT$5:.CT$404])" office:value-type="float" office:value="0" calcext:value-type="float">
            <text:p>0</text:p>
          </table:table-cell>
          <table:table-cell table:style-name="ce90" table:formula="of:=SUMIF([.$J8:.$J407];[.$J409];[.CU$5:.CU$404])" office:value-type="float" office:value="0" calcext:value-type="float">
            <text:p>0</text:p>
          </table:table-cell>
          <table:table-cell table:style-name="ce90" table:formula="of:=SUMIF([.$J8:.$J407];[.$J409];[.CV$5:.CV$404])" office:value-type="float" office:value="0" calcext:value-type="float">
            <text:p>0</text:p>
          </table:table-cell>
          <table:table-cell table:style-name="ce90" table:formula="of:=SUMIF([.$J8:.$J407];[.$J409];[.CW$5:.CW$404])" office:value-type="float" office:value="0" calcext:value-type="float">
            <text:p>0</text:p>
          </table:table-cell>
          <table:table-cell table:style-name="ce90" table:formula="of:=SUMIF([.$J8:.$J407];[.$J409];[.CX$5:.CX$404])" office:value-type="float" office:value="0" calcext:value-type="float">
            <text:p>0</text:p>
          </table:table-cell>
          <table:table-cell table:style-name="ce90" table:formula="of:=SUMIF([.$J8:.$J407];[.$J409];[.CY$5:.CY$404])" office:value-type="float" office:value="0" calcext:value-type="float">
            <text:p>0</text:p>
          </table:table-cell>
          <table:table-cell table:style-name="ce90" table:formula="of:=SUMIF([.$J8:.$J407];[.$J409];[.CZ$5:.CZ$404])" office:value-type="float" office:value="0" calcext:value-type="float">
            <text:p>0</text:p>
          </table:table-cell>
          <table:table-cell table:style-name="ce90" table:formula="of:=SUMIF([.$J8:.$J407];[.$J409];[.DA$5:.DA$404])" office:value-type="float" office:value="0" calcext:value-type="float">
            <text:p>0</text:p>
          </table:table-cell>
          <table:table-cell table:style-name="ce90" table:formula="of:=SUMIF([.$J8:.$J407];[.$J409];[.DB$5:.DB$404])" office:value-type="float" office:value="0" calcext:value-type="float">
            <text:p>0</text:p>
          </table:table-cell>
          <table:table-cell table:style-name="ce90" table:formula="of:=SUMIF([.$J8:.$J407];[.$J409];[.DC$5:.DC$404])" office:value-type="float" office:value="0" calcext:value-type="float">
            <text:p>0</text:p>
          </table:table-cell>
          <table:table-cell table:style-name="ce90" table:formula="of:=SUMIF([.$J8:.$J407];[.$J409];[.DD$5:.DD$404])" office:value-type="float" office:value="0" calcext:value-type="float">
            <text:p>0</text:p>
          </table:table-cell>
          <table:table-cell table:style-name="ce90" table:formula="of:=SUMIF([.$J8:.$J407];[.$J409];[.DE$5:.DE$404])" office:value-type="float" office:value="0" calcext:value-type="float">
            <text:p>0</text:p>
          </table:table-cell>
          <table:table-cell table:style-name="ce90" table:formula="of:=SUMIF([.$J8:.$J407];[.$J409];[.DF$5:.DF$404])" office:value-type="float" office:value="0" calcext:value-type="float">
            <text:p>0</text:p>
          </table:table-cell>
          <table:table-cell table:style-name="ce90" table:formula="of:=SUMIF([.$J8:.$J407];[.$J409];[.DG$5:.DG$404])" office:value-type="float" office:value="0" calcext:value-type="float">
            <text:p>0</text:p>
          </table:table-cell>
          <table:table-cell table:style-name="ce90" table:formula="of:=SUMIF([.$J8:.$J407];[.$J409];[.DH$5:.DH$404])" office:value-type="float" office:value="0" calcext:value-type="float">
            <text:p>0</text:p>
          </table:table-cell>
          <table:table-cell table:style-name="ce90" table:formula="of:=SUMIF([.$J8:.$J407];[.$J409];[.DI$5:.DI$404])" office:value-type="float" office:value="0" calcext:value-type="float">
            <text:p>0</text:p>
          </table:table-cell>
          <table:table-cell table:style-name="ce90" table:formula="of:=SUMIF([.$J8:.$J407];[.$J409];[.DJ$5:.DJ$404])" office:value-type="float" office:value="0" calcext:value-type="float">
            <text:p>0</text:p>
          </table:table-cell>
          <table:table-cell table:style-name="ce90" table:formula="of:=SUMIF([.$J8:.$J407];[.$J409];[.DK$5:.DK$404])" office:value-type="float" office:value="0" calcext:value-type="float">
            <text:p>0</text:p>
          </table:table-cell>
          <table:table-cell table:style-name="ce90" table:formula="of:=SUMIF([.$J8:.$J407];[.$J409];[.DL$5:.DL$404])" office:value-type="float" office:value="0" calcext:value-type="float">
            <text:p>0</text:p>
          </table:table-cell>
          <table:table-cell table:style-name="ce90" table:formula="of:=SUMIF([.$J8:.$J407];[.$J409];[.DM$5:.DM$404])" office:value-type="float" office:value="0" calcext:value-type="float">
            <text:p>0</text:p>
          </table:table-cell>
          <table:table-cell table:style-name="ce90" table:formula="of:=SUMIF([.$J8:.$J407];[.$J409];[.DN$5:.DN$404])" office:value-type="float" office:value="0" calcext:value-type="float">
            <text:p>0</text:p>
          </table:table-cell>
          <table:table-cell table:style-name="ce90" table:formula="of:=SUMIF([.$J8:.$J407];[.$J409];[.DO$5:.DO$404])" office:value-type="float" office:value="0" calcext:value-type="float">
            <text:p>0</text:p>
          </table:table-cell>
          <table:table-cell table:style-name="ce90" table:formula="of:=SUMIF([.$J8:.$J407];[.$J409];[.DP$5:.DP$404])" office:value-type="float" office:value="0" calcext:value-type="float">
            <text:p>0</text:p>
          </table:table-cell>
          <table:table-cell table:style-name="ce90" table:formula="of:=SUMIF([.$J8:.$J407];[.$J409];[.DQ$5:.DQ$404])" office:value-type="float" office:value="0" calcext:value-type="float">
            <text:p>0</text:p>
          </table:table-cell>
          <table:table-cell table:style-name="ce90" table:formula="of:=SUMIF([.$J8:.$J407];[.$J409];[.DR$5:.DR$404])" office:value-type="float" office:value="0" calcext:value-type="float">
            <text:p>0</text:p>
          </table:table-cell>
          <table:table-cell table:style-name="ce90" table:formula="of:=SUMIF([.$J8:.$J407];[.$J409];[.DS$5:.DS$404])" office:value-type="float" office:value="0" calcext:value-type="float">
            <text:p>0</text:p>
          </table:table-cell>
          <table:table-cell table:style-name="ce90" table:formula="of:=SUMIF([.$J8:.$J407];[.$J409];[.DT$5:.DT$404])" office:value-type="float" office:value="0" calcext:value-type="float">
            <text:p>0</text:p>
          </table:table-cell>
          <table:table-cell table:style-name="ce90" table:formula="of:=SUMIF([.$J8:.$J407];[.$J409];[.DU$5:.DU$404])" office:value-type="float" office:value="0" calcext:value-type="float">
            <text:p>0</text:p>
          </table:table-cell>
          <table:table-cell table:style-name="ce90" table:formula="of:=SUMIF([.$J8:.$J407];[.$J409];[.DV$5:.DV$404])" office:value-type="float" office:value="0" calcext:value-type="float">
            <text:p>0</text:p>
          </table:table-cell>
          <table:table-cell table:style-name="ce90" table:formula="of:=SUMIF([.$J8:.$J407];[.$J409];[.DW$5:.DW$404])" office:value-type="float" office:value="0" calcext:value-type="float">
            <text:p>0</text:p>
          </table:table-cell>
          <table:table-cell table:style-name="ce90" table:formula="of:=SUMIF([.$J8:.$J407];[.$J409];[.DX$5:.DX$404])" office:value-type="float" office:value="0" calcext:value-type="float">
            <text:p>0</text:p>
          </table:table-cell>
          <table:table-cell table:style-name="ce90" table:formula="of:=SUMIF([.$J8:.$J407];[.$J409];[.DY$5:.DY$404])" office:value-type="float" office:value="0" calcext:value-type="float">
            <text:p>0</text:p>
          </table:table-cell>
          <table:table-cell table:style-name="ce90" table:formula="of:=SUMIF([.$J8:.$J407];[.$J409];[.DZ$5:.DZ$404])" office:value-type="float" office:value="0" calcext:value-type="float">
            <text:p>0</text:p>
          </table:table-cell>
          <table:table-cell table:style-name="ce90" table:formula="of:=SUMIF([.$J8:.$J407];[.$J409];[.EA$5:.EA$404])" office:value-type="float" office:value="0" calcext:value-type="float">
            <text:p>0</text:p>
          </table:table-cell>
          <table:table-cell table:style-name="ce90" table:formula="of:=SUMIF([.$J8:.$J407];[.$J409];[.EB$5:.EB$404])" office:value-type="float" office:value="0" calcext:value-type="float">
            <text:p>0</text:p>
          </table:table-cell>
          <table:table-cell table:style-name="ce90" table:formula="of:=SUMIF([.$J8:.$J407];[.$J409];[.EC$5:.EC$404])" office:value-type="float" office:value="0" calcext:value-type="float">
            <text:p>0</text:p>
          </table:table-cell>
          <table:table-cell table:style-name="ce90" table:formula="of:=SUMIF([.$J8:.$J407];[.$J409];[.ED$5:.ED$404])" office:value-type="float" office:value="0" calcext:value-type="float">
            <text:p>0</text:p>
          </table:table-cell>
          <table:table-cell table:style-name="ce90" table:formula="of:=SUMIF([.$J8:.$J407];[.$J409];[.EE$5:.EE$404])" office:value-type="float" office:value="0" calcext:value-type="float">
            <text:p>0</text:p>
          </table:table-cell>
          <table:table-cell table:style-name="ce90" table:formula="of:=SUMIF([.$J8:.$J407];[.$J409];[.EF$5:.EF$404])" office:value-type="float" office:value="0" calcext:value-type="float">
            <text:p>0</text:p>
          </table:table-cell>
          <table:table-cell table:style-name="ce90" table:formula="of:=SUMIF([.$J8:.$J407];[.$J409];[.EG$5:.EG$404])" office:value-type="float" office:value="0" calcext:value-type="float">
            <text:p>0</text:p>
          </table:table-cell>
          <table:table-cell table:style-name="ce90" table:formula="of:=SUMIF([.$J8:.$J407];[.$J409];[.EH$5:.EH$404])" office:value-type="float" office:value="0" calcext:value-type="float">
            <text:p>0</text:p>
          </table:table-cell>
          <table:table-cell table:style-name="ce90" table:formula="of:=SUMIF([.$J8:.$J407];[.$J409];[.EI$5:.EI$404])" office:value-type="float" office:value="0" calcext:value-type="float">
            <text:p>0</text:p>
          </table:table-cell>
          <table:table-cell table:style-name="ce90" table:formula="of:=SUMIF([.$J8:.$J407];[.$J409];[.EJ$5:.EJ$404])" office:value-type="float" office:value="0" calcext:value-type="float">
            <text:p>0</text:p>
          </table:table-cell>
          <table:table-cell table:style-name="ce90" table:formula="of:=SUMIF([.$J8:.$J407];[.$J409];[.EK$5:.EK$404])" office:value-type="float" office:value="0" calcext:value-type="float">
            <text:p>0</text:p>
          </table:table-cell>
          <table:table-cell table:style-name="ce90" table:formula="of:=SUMIF([.$J8:.$J407];[.$J409];[.EL$5:.EL$404])" office:value-type="float" office:value="0" calcext:value-type="float">
            <text:p>0</text:p>
          </table:table-cell>
          <table:table-cell table:style-name="ce90" table:formula="of:=SUMIF([.$J8:.$J407];[.$J409];[.EM$5:.EM$404])" office:value-type="float" office:value="0" calcext:value-type="float">
            <text:p>0</text:p>
          </table:table-cell>
          <table:table-cell table:style-name="ce90" table:formula="of:=SUMIF([.$J8:.$J407];[.$J409];[.EN$5:.EN$404])" office:value-type="float" office:value="0" calcext:value-type="float">
            <text:p>0</text:p>
          </table:table-cell>
          <table:table-cell table:style-name="ce90" table:formula="of:=SUMIF([.$J8:.$J407];[.$J409];[.EO$5:.EO$404])" office:value-type="float" office:value="0" calcext:value-type="float">
            <text:p>0</text:p>
          </table:table-cell>
          <table:table-cell table:style-name="ce90" table:formula="of:=SUMIF([.$J8:.$J407];[.$J409];[.EP$5:.EP$404])" office:value-type="float" office:value="0" calcext:value-type="float">
            <text:p>0</text:p>
          </table:table-cell>
          <table:table-cell table:style-name="ce90" table:formula="of:=SUMIF([.$J8:.$J407];[.$J409];[.EQ$5:.EQ$404])" office:value-type="float" office:value="0" calcext:value-type="float">
            <text:p>0</text:p>
          </table:table-cell>
          <table:table-cell table:style-name="ce90" table:formula="of:=SUMIF([.$J8:.$J407];[.$J409];[.ER$5:.ER$404])" office:value-type="float" office:value="0" calcext:value-type="float">
            <text:p>0</text:p>
          </table:table-cell>
          <table:table-cell table:style-name="ce90" table:formula="of:=SUMIF([.$J8:.$J407];[.$J409];[.ES$5:.ES$404])" office:value-type="float" office:value="0" calcext:value-type="float">
            <text:p>0</text:p>
          </table:table-cell>
          <table:table-cell table:style-name="ce90" table:formula="of:=SUMIF([.$J8:.$J407];[.$J409];[.ET$5:.ET$404])" office:value-type="float" office:value="0" calcext:value-type="float">
            <text:p>0</text:p>
          </table:table-cell>
          <table:table-cell table:style-name="ce90" table:formula="of:=SUMIF([.$J8:.$J407];[.$J409];[.EU$5:.EU$404])" office:value-type="float" office:value="0" calcext:value-type="float">
            <text:p>0</text:p>
          </table:table-cell>
          <table:table-cell table:style-name="ce90" table:formula="of:=SUMIF([.$J8:.$J407];[.$J409];[.EV$5:.EV$404])" office:value-type="float" office:value="0" calcext:value-type="float">
            <text:p>0</text:p>
          </table:table-cell>
          <table:table-cell table:style-name="ce90" table:formula="of:=SUMIF([.$J8:.$J407];[.$J409];[.EW$5:.EW$404])" office:value-type="float" office:value="0" calcext:value-type="float">
            <text:p>0</text:p>
          </table:table-cell>
          <table:table-cell table:style-name="ce90" table:formula="of:=SUMIF([.$J8:.$J407];[.$J409];[.EX$5:.EX$404])" office:value-type="float" office:value="0" calcext:value-type="float">
            <text:p>0</text:p>
          </table:table-cell>
          <table:table-cell table:style-name="ce90" table:formula="of:=SUMIF([.$J8:.$J407];[.$J409];[.EY$5:.EY$404])" office:value-type="float" office:value="0" calcext:value-type="float">
            <text:p>0</text:p>
          </table:table-cell>
          <table:table-cell table:style-name="ce90" table:formula="of:=SUMIF([.$J8:.$J407];[.$J409];[.EZ$5:.EZ$404])" office:value-type="float" office:value="0" calcext:value-type="float">
            <text:p>0</text:p>
          </table:table-cell>
          <table:table-cell table:style-name="ce90" table:formula="of:=SUMIF([.$J8:.$J407];[.$J409];[.FA$5:.FA$404])" office:value-type="float" office:value="0" calcext:value-type="float">
            <text:p>0</text:p>
          </table:table-cell>
          <table:table-cell table:style-name="ce90" table:formula="of:=SUMIF([.$J8:.$J407];[.$J409];[.FB$5:.FB$404])" office:value-type="float" office:value="0" calcext:value-type="float">
            <text:p>0</text:p>
          </table:table-cell>
          <table:table-cell table:style-name="ce90" table:formula="of:=SUMIF([.$J8:.$J407];[.$J409];[.FC$5:.FC$404])" office:value-type="float" office:value="0" calcext:value-type="float">
            <text:p>0</text:p>
          </table:table-cell>
          <table:table-cell table:style-name="ce90" table:formula="of:=SUMIF([.$J8:.$J407];[.$J409];[.FD$5:.FD$404])" office:value-type="float" office:value="0" calcext:value-type="float">
            <text:p>0</text:p>
          </table:table-cell>
          <table:table-cell table:style-name="ce90" table:formula="of:=SUMIF([.$J8:.$J407];[.$J409];[.FE$5:.FE$404])" office:value-type="float" office:value="0" calcext:value-type="float">
            <text:p>0</text:p>
          </table:table-cell>
          <table:table-cell table:style-name="ce90" table:formula="of:=SUMIF([.$J8:.$J407];[.$J409];[.FF$5:.FF$404])" office:value-type="float" office:value="0" calcext:value-type="float">
            <text:p>0</text:p>
          </table:table-cell>
          <table:table-cell table:style-name="ce90" table:formula="of:=SUMIF([.$J8:.$J407];[.$J409];[.FG$5:.FG$404])" office:value-type="float" office:value="0" calcext:value-type="float">
            <text:p>0</text:p>
          </table:table-cell>
          <table:table-cell table:style-name="ce90" table:formula="of:=SUMIF([.$J8:.$J407];[.$J409];[.FH$5:.FH$404])" office:value-type="float" office:value="0" calcext:value-type="float">
            <text:p>0</text:p>
          </table:table-cell>
          <table:table-cell table:style-name="ce90" table:formula="of:=SUMIF([.$J8:.$J407];[.$J409];[.FI$5:.FI$404])" office:value-type="float" office:value="0" calcext:value-type="float">
            <text:p>0</text:p>
          </table:table-cell>
          <table:table-cell table:style-name="ce90" table:formula="of:=SUMIF([.$J8:.$J407];[.$J409];[.FJ$5:.FJ$404])" office:value-type="float" office:value="0" calcext:value-type="float">
            <text:p>0</text:p>
          </table:table-cell>
          <table:table-cell table:style-name="ce90" table:formula="of:=SUMIF([.$J8:.$J407];[.$J409];[.FK$5:.FK$404])" office:value-type="float" office:value="0" calcext:value-type="float">
            <text:p>0</text:p>
          </table:table-cell>
          <table:table-cell table:style-name="ce90" table:formula="of:=SUMIF([.$J8:.$J407];[.$J409];[.FL$5:.FL$404])" office:value-type="float" office:value="0" calcext:value-type="float">
            <text:p>0</text:p>
          </table:table-cell>
          <table:table-cell table:style-name="ce90" table:formula="of:=SUMIF([.$J8:.$J407];[.$J409];[.FM$5:.FM$404])" office:value-type="float" office:value="0" calcext:value-type="float">
            <text:p>0</text:p>
          </table:table-cell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10]&lt;&gt;&quot;&quot;;NETWORKDAYS([.$L410];[.$M410];[$休日.$B$4:.$B$304]);&quot;&quot;)">
            <text:p/>
          </table:table-cell>
          <table:table-cell table:style-name="ce61"/>
          <table:table-cell table:style-name="ce63" table:formula="of:=IF(OR(AND([.$N410]=&quot;&quot;;[.$L410]&lt;&gt;&quot;&quot;;[.$L410]&lt;=[.$U$1]);AND([.$M410]&lt;&gt;&quot;&quot;;[.Q410]&lt;100;[.$M410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408];[.$J410];[.V$5:.V$404])" office:value-type="float" office:value="0" calcext:value-type="float">
            <text:p>0</text:p>
          </table:table-cell>
          <table:table-cell table:style-name="ce90" table:formula="of:=SUMIF([.$J10:.$J408];[.$J410];[.W$5:.W$404])" office:value-type="float" office:value="0" calcext:value-type="float">
            <text:p>0</text:p>
          </table:table-cell>
          <table:table-cell table:style-name="ce90" table:formula="of:=SUMIF([.$J10:.$J408];[.$J410];[.X$5:.X$404])" office:value-type="float" office:value="0" calcext:value-type="float">
            <text:p>0</text:p>
          </table:table-cell>
          <table:table-cell table:style-name="ce114" table:formula="of:=SUMIF([.$J10:.$J408];[.$J410];[.Y$5:.Y$404])" office:value-type="float" office:value="0" calcext:value-type="float">
            <text:p>0</text:p>
          </table:table-cell>
          <table:table-cell table:style-name="ce114" table:formula="of:=SUMIF([.$J10:.$J408];[.$J410];[.Z$5:.Z$404])" office:value-type="float" office:value="0" calcext:value-type="float">
            <text:p>0</text:p>
          </table:table-cell>
          <table:table-cell table:style-name="ce90" table:formula="of:=SUMIF([.$J10:.$J408];[.$J410];[.AA$5:.AA$404])" office:value-type="float" office:value="0" calcext:value-type="float">
            <text:p>0</text:p>
          </table:table-cell>
          <table:table-cell table:style-name="ce90" table:formula="of:=SUMIF([.$J10:.$J408];[.$J410];[.AB$5:.AB$404])" office:value-type="float" office:value="0" calcext:value-type="float">
            <text:p>0</text:p>
          </table:table-cell>
          <table:table-cell table:style-name="ce90" table:formula="of:=SUMIF([.$J10:.$J408];[.$J410];[.AC$5:.AC$404])" office:value-type="float" office:value="0" calcext:value-type="float">
            <text:p>0</text:p>
          </table:table-cell>
          <table:table-cell table:style-name="ce90" table:formula="of:=SUMIF([.$J10:.$J408];[.$J410];[.AD$5:.AD$404])" office:value-type="float" office:value="0" calcext:value-type="float">
            <text:p>0</text:p>
          </table:table-cell>
          <table:table-cell table:style-name="ce90" table:formula="of:=SUMIF([.$J10:.$J408];[.$J410];[.AE$5:.AE$404])" office:value-type="float" office:value="0" calcext:value-type="float">
            <text:p>0</text:p>
          </table:table-cell>
          <table:table-cell table:style-name="ce114" table:formula="of:=SUMIF([.$J10:.$J408];[.$J410];[.AF$5:.AF$404])" office:value-type="float" office:value="0" calcext:value-type="float">
            <text:p>0</text:p>
          </table:table-cell>
          <table:table-cell table:style-name="ce114" table:formula="of:=SUMIF([.$J10:.$J408];[.$J410];[.AG$5:.AG$404])" office:value-type="float" office:value="0" calcext:value-type="float">
            <text:p>0</text:p>
          </table:table-cell>
          <table:table-cell table:style-name="ce90" table:formula="of:=SUMIF([.$J10:.$J408];[.$J410];[.AH$5:.AH$404])" office:value-type="float" office:value="0" calcext:value-type="float">
            <text:p>0</text:p>
          </table:table-cell>
          <table:table-cell table:style-name="ce90" table:formula="of:=SUMIF([.$J10:.$J408];[.$J410];[.AI$5:.AI$404])" office:value-type="float" office:value="0" calcext:value-type="float">
            <text:p>0</text:p>
          </table:table-cell>
          <table:table-cell table:style-name="ce90" table:formula="of:=SUMIF([.$J10:.$J408];[.$J410];[.AJ$5:.AJ$404])" office:value-type="float" office:value="0" calcext:value-type="float">
            <text:p>0</text:p>
          </table:table-cell>
          <table:table-cell table:style-name="ce90" table:formula="of:=SUMIF([.$J10:.$J408];[.$J410];[.AK$5:.AK$404])" office:value-type="float" office:value="0" calcext:value-type="float">
            <text:p>0</text:p>
          </table:table-cell>
          <table:table-cell table:style-name="ce90" table:formula="of:=SUMIF([.$J10:.$J408];[.$J410];[.AL$5:.AL$404])" office:value-type="float" office:value="0" calcext:value-type="float">
            <text:p>0</text:p>
          </table:table-cell>
          <table:table-cell table:style-name="ce114" table:formula="of:=SUMIF([.$J10:.$J408];[.$J410];[.AM$5:.AM$404])" office:value-type="float" office:value="0" calcext:value-type="float">
            <text:p>0</text:p>
          </table:table-cell>
          <table:table-cell table:style-name="ce114" table:formula="of:=SUMIF([.$J10:.$J408];[.$J410];[.AN$5:.AN$404])" office:value-type="float" office:value="0" calcext:value-type="float">
            <text:p>0</text:p>
          </table:table-cell>
          <table:table-cell table:style-name="ce90" table:formula="of:=SUMIF([.$J10:.$J408];[.$J410];[.AO$5:.AO$404])" office:value-type="float" office:value="0" calcext:value-type="float">
            <text:p>0</text:p>
          </table:table-cell>
          <table:table-cell table:style-name="ce90" table:formula="of:=SUMIF([.$J10:.$J408];[.$J410];[.AP$5:.AP$404])" office:value-type="float" office:value="0" calcext:value-type="float">
            <text:p>0</text:p>
          </table:table-cell>
          <table:table-cell table:style-name="ce90" table:formula="of:=SUMIF([.$J10:.$J408];[.$J410];[.AQ$5:.AQ$404])" office:value-type="float" office:value="0" calcext:value-type="float">
            <text:p>0</text:p>
          </table:table-cell>
          <table:table-cell table:style-name="ce90" table:formula="of:=SUMIF([.$J10:.$J408];[.$J410];[.AR$5:.AR$404])" office:value-type="float" office:value="0" calcext:value-type="float">
            <text:p>0</text:p>
          </table:table-cell>
          <table:table-cell table:style-name="ce143" table:formula="of:=SUMIF([.$J10:.$J408];[.$J410];[.AS$5:.AS$404])" office:value-type="float" office:value="0" calcext:value-type="float">
            <text:p>0</text:p>
          </table:table-cell>
          <table:table-cell table:style-name="ce114" table:formula="of:=SUMIF([.$J10:.$J408];[.$J410];[.AT$5:.AT$404])" office:value-type="float" office:value="0" calcext:value-type="float">
            <text:p>0</text:p>
          </table:table-cell>
          <table:table-cell table:style-name="ce114" table:formula="of:=SUMIF([.$J10:.$J408];[.$J410];[.AU$5:.AU$404])" office:value-type="float" office:value="0" calcext:value-type="float">
            <text:p>0</text:p>
          </table:table-cell>
          <table:table-cell table:style-name="ce157" table:formula="of:=SUMIF([.$J10:.$J408];[.$J410];[.AV$5:.AV$404])" office:value-type="float" office:value="0" calcext:value-type="float">
            <text:p>0</text:p>
          </table:table-cell>
          <table:table-cell table:style-name="ce90" table:formula="of:=SUMIF([.$J10:.$J408];[.$J410];[.AW$5:.AW$404])" office:value-type="float" office:value="0" calcext:value-type="float">
            <text:p>0</text:p>
          </table:table-cell>
          <table:table-cell table:style-name="ce90" table:formula="of:=SUMIF([.$J10:.$J408];[.$J410];[.AX$5:.AX$404])" office:value-type="float" office:value="0" calcext:value-type="float">
            <text:p>0</text:p>
          </table:table-cell>
          <table:table-cell table:style-name="ce90" table:formula="of:=SUMIF([.$J10:.$J408];[.$J410];[.AY$5:.AY$404])" office:value-type="float" office:value="0" calcext:value-type="float">
            <text:p>0</text:p>
          </table:table-cell>
          <table:table-cell table:style-name="ce90" table:formula="of:=SUMIF([.$J10:.$J408];[.$J410];[.AZ$5:.AZ$404])" office:value-type="float" office:value="0" calcext:value-type="float">
            <text:p>0</text:p>
          </table:table-cell>
          <table:table-cell table:style-name="ce90" table:formula="of:=SUMIF([.$J10:.$J408];[.$J410];[.BA$5:.BA$404])" office:value-type="float" office:value="0" calcext:value-type="float">
            <text:p>0</text:p>
          </table:table-cell>
          <table:table-cell table:style-name="ce90" table:formula="of:=SUMIF([.$J10:.$J408];[.$J410];[.BB$5:.BB$404])" office:value-type="float" office:value="0" calcext:value-type="float">
            <text:p>0</text:p>
          </table:table-cell>
          <table:table-cell table:style-name="ce90" table:formula="of:=SUMIF([.$J10:.$J408];[.$J410];[.BC$5:.BC$404])" office:value-type="float" office:value="0" calcext:value-type="float">
            <text:p>0</text:p>
          </table:table-cell>
          <table:table-cell table:style-name="ce90" table:formula="of:=SUMIF([.$J10:.$J408];[.$J410];[.BD$5:.BD$404])" office:value-type="float" office:value="0" calcext:value-type="float">
            <text:p>0</text:p>
          </table:table-cell>
          <table:table-cell table:style-name="ce90" table:formula="of:=SUMIF([.$J10:.$J408];[.$J410];[.BE$5:.BE$404])" office:value-type="float" office:value="0" calcext:value-type="float">
            <text:p>0</text:p>
          </table:table-cell>
          <table:table-cell table:style-name="ce90" table:formula="of:=SUMIF([.$J10:.$J408];[.$J410];[.BF$5:.BF$404])" office:value-type="float" office:value="0" calcext:value-type="float">
            <text:p>0</text:p>
          </table:table-cell>
          <table:table-cell table:style-name="ce90" table:formula="of:=SUMIF([.$J10:.$J408];[.$J410];[.BG$5:.BG$404])" office:value-type="float" office:value="0" calcext:value-type="float">
            <text:p>0</text:p>
          </table:table-cell>
          <table:table-cell table:style-name="ce90" table:formula="of:=SUMIF([.$J10:.$J408];[.$J410];[.BH$5:.BH$404])" office:value-type="float" office:value="0" calcext:value-type="float">
            <text:p>0</text:p>
          </table:table-cell>
          <table:table-cell table:style-name="ce90" table:formula="of:=SUMIF([.$J10:.$J408];[.$J410];[.BI$5:.BI$404])" office:value-type="float" office:value="0" calcext:value-type="float">
            <text:p>0</text:p>
          </table:table-cell>
          <table:table-cell table:style-name="ce90" table:formula="of:=SUMIF([.$J10:.$J408];[.$J410];[.BJ$5:.BJ$404])" office:value-type="float" office:value="0" calcext:value-type="float">
            <text:p>0</text:p>
          </table:table-cell>
          <table:table-cell table:style-name="ce90" table:formula="of:=SUMIF([.$J10:.$J408];[.$J410];[.BK$5:.BK$404])" office:value-type="float" office:value="0" calcext:value-type="float">
            <text:p>0</text:p>
          </table:table-cell>
          <table:table-cell table:style-name="ce90" table:formula="of:=SUMIF([.$J10:.$J408];[.$J410];[.BL$5:.BL$404])" office:value-type="float" office:value="0" calcext:value-type="float">
            <text:p>0</text:p>
          </table:table-cell>
          <table:table-cell table:style-name="ce90" table:formula="of:=SUMIF([.$J10:.$J408];[.$J410];[.BM$5:.BM$404])" office:value-type="float" office:value="0" calcext:value-type="float">
            <text:p>0</text:p>
          </table:table-cell>
          <table:table-cell table:style-name="ce90" table:formula="of:=SUMIF([.$J10:.$J408];[.$J410];[.BN$5:.BN$404])" office:value-type="float" office:value="0" calcext:value-type="float">
            <text:p>0</text:p>
          </table:table-cell>
          <table:table-cell table:style-name="ce90" table:formula="of:=SUMIF([.$J10:.$J408];[.$J410];[.BO$5:.BO$404])" office:value-type="float" office:value="0" calcext:value-type="float">
            <text:p>0</text:p>
          </table:table-cell>
          <table:table-cell table:style-name="ce90" table:formula="of:=SUMIF([.$J10:.$J408];[.$J410];[.BP$5:.BP$404])" office:value-type="float" office:value="0" calcext:value-type="float">
            <text:p>0</text:p>
          </table:table-cell>
          <table:table-cell table:style-name="ce90" table:formula="of:=SUMIF([.$J10:.$J408];[.$J410];[.BQ$5:.BQ$404])" office:value-type="float" office:value="0" calcext:value-type="float">
            <text:p>0</text:p>
          </table:table-cell>
          <table:table-cell table:style-name="ce90" table:formula="of:=SUMIF([.$J10:.$J408];[.$J410];[.BR$5:.BR$404])" office:value-type="float" office:value="0" calcext:value-type="float">
            <text:p>0</text:p>
          </table:table-cell>
          <table:table-cell table:style-name="ce90" table:formula="of:=SUMIF([.$J10:.$J408];[.$J410];[.BS$5:.BS$404])" office:value-type="float" office:value="0" calcext:value-type="float">
            <text:p>0</text:p>
          </table:table-cell>
          <table:table-cell table:style-name="ce90" table:formula="of:=SUMIF([.$J10:.$J408];[.$J410];[.BT$5:.BT$404])" office:value-type="float" office:value="0" calcext:value-type="float">
            <text:p>0</text:p>
          </table:table-cell>
          <table:table-cell table:style-name="ce90" table:formula="of:=SUMIF([.$J10:.$J408];[.$J410];[.BU$5:.BU$404])" office:value-type="float" office:value="0" calcext:value-type="float">
            <text:p>0</text:p>
          </table:table-cell>
          <table:table-cell table:style-name="ce90" table:formula="of:=SUMIF([.$J10:.$J408];[.$J410];[.BV$5:.BV$404])" office:value-type="float" office:value="0" calcext:value-type="float">
            <text:p>0</text:p>
          </table:table-cell>
          <table:table-cell table:style-name="ce90" table:formula="of:=SUMIF([.$J10:.$J408];[.$J410];[.BW$5:.BW$404])" office:value-type="float" office:value="0" calcext:value-type="float">
            <text:p>0</text:p>
          </table:table-cell>
          <table:table-cell table:style-name="ce90" table:formula="of:=SUMIF([.$J10:.$J408];[.$J410];[.BX$5:.BX$404])" office:value-type="float" office:value="0" calcext:value-type="float">
            <text:p>0</text:p>
          </table:table-cell>
          <table:table-cell table:style-name="ce90" table:formula="of:=SUMIF([.$J10:.$J408];[.$J410];[.BY$5:.BY$404])" office:value-type="float" office:value="0" calcext:value-type="float">
            <text:p>0</text:p>
          </table:table-cell>
          <table:table-cell table:style-name="ce90" table:formula="of:=SUMIF([.$J10:.$J408];[.$J410];[.BZ$5:.BZ$404])" office:value-type="float" office:value="0" calcext:value-type="float">
            <text:p>0</text:p>
          </table:table-cell>
          <table:table-cell table:style-name="ce90" table:formula="of:=SUMIF([.$J10:.$J408];[.$J410];[.CA$5:.CA$404])" office:value-type="float" office:value="0" calcext:value-type="float">
            <text:p>0</text:p>
          </table:table-cell>
          <table:table-cell table:style-name="ce90" table:formula="of:=SUMIF([.$J10:.$J408];[.$J410];[.CB$5:.CB$404])" office:value-type="float" office:value="0" calcext:value-type="float">
            <text:p>0</text:p>
          </table:table-cell>
          <table:table-cell table:style-name="ce90" table:formula="of:=SUMIF([.$J10:.$J408];[.$J410];[.CC$5:.CC$404])" office:value-type="float" office:value="0" calcext:value-type="float">
            <text:p>0</text:p>
          </table:table-cell>
          <table:table-cell table:style-name="ce90" table:formula="of:=SUMIF([.$J10:.$J408];[.$J410];[.CD$5:.CD$404])" office:value-type="float" office:value="0" calcext:value-type="float">
            <text:p>0</text:p>
          </table:table-cell>
          <table:table-cell table:style-name="ce90" table:formula="of:=SUMIF([.$J10:.$J408];[.$J410];[.CE$5:.CE$404])" office:value-type="float" office:value="0" calcext:value-type="float">
            <text:p>0</text:p>
          </table:table-cell>
          <table:table-cell table:style-name="ce90" table:formula="of:=SUMIF([.$J10:.$J408];[.$J410];[.CF$5:.CF$404])" office:value-type="float" office:value="0" calcext:value-type="float">
            <text:p>0</text:p>
          </table:table-cell>
          <table:table-cell table:style-name="ce90" table:formula="of:=SUMIF([.$J10:.$J408];[.$J410];[.CG$5:.CG$404])" office:value-type="float" office:value="0" calcext:value-type="float">
            <text:p>0</text:p>
          </table:table-cell>
          <table:table-cell table:style-name="ce90" table:formula="of:=SUMIF([.$J10:.$J408];[.$J410];[.CH$5:.CH$404])" office:value-type="float" office:value="0" calcext:value-type="float">
            <text:p>0</text:p>
          </table:table-cell>
          <table:table-cell table:style-name="ce90" table:formula="of:=SUMIF([.$J10:.$J408];[.$J410];[.CI$5:.CI$404])" office:value-type="float" office:value="0" calcext:value-type="float">
            <text:p>0</text:p>
          </table:table-cell>
          <table:table-cell table:style-name="ce90" table:formula="of:=SUMIF([.$J10:.$J408];[.$J410];[.CJ$5:.CJ$404])" office:value-type="float" office:value="0" calcext:value-type="float">
            <text:p>0</text:p>
          </table:table-cell>
          <table:table-cell table:style-name="ce90" table:formula="of:=SUMIF([.$J10:.$J408];[.$J410];[.CK$5:.CK$404])" office:value-type="float" office:value="0" calcext:value-type="float">
            <text:p>0</text:p>
          </table:table-cell>
          <table:table-cell table:style-name="ce90" table:formula="of:=SUMIF([.$J10:.$J408];[.$J410];[.CL$5:.CL$404])" office:value-type="float" office:value="0" calcext:value-type="float">
            <text:p>0</text:p>
          </table:table-cell>
          <table:table-cell table:style-name="ce90" table:formula="of:=SUMIF([.$J10:.$J408];[.$J410];[.CM$5:.CM$404])" office:value-type="float" office:value="0" calcext:value-type="float">
            <text:p>0</text:p>
          </table:table-cell>
          <table:table-cell table:style-name="ce90" table:formula="of:=SUMIF([.$J10:.$J408];[.$J410];[.CN$5:.CN$404])" office:value-type="float" office:value="0" calcext:value-type="float">
            <text:p>0</text:p>
          </table:table-cell>
          <table:table-cell table:style-name="ce90" table:formula="of:=SUMIF([.$J10:.$J408];[.$J410];[.CO$5:.CO$404])" office:value-type="float" office:value="0" calcext:value-type="float">
            <text:p>0</text:p>
          </table:table-cell>
          <table:table-cell table:style-name="ce90" table:formula="of:=SUMIF([.$J10:.$J408];[.$J410];[.CP$5:.CP$404])" office:value-type="float" office:value="0" calcext:value-type="float">
            <text:p>0</text:p>
          </table:table-cell>
          <table:table-cell table:style-name="ce90" table:formula="of:=SUMIF([.$J10:.$J408];[.$J410];[.CQ$5:.CQ$404])" office:value-type="float" office:value="0" calcext:value-type="float">
            <text:p>0</text:p>
          </table:table-cell>
          <table:table-cell table:style-name="ce90" table:formula="of:=SUMIF([.$J10:.$J408];[.$J410];[.CR$5:.CR$404])" office:value-type="float" office:value="0" calcext:value-type="float">
            <text:p>0</text:p>
          </table:table-cell>
          <table:table-cell table:style-name="ce90" table:formula="of:=SUMIF([.$J10:.$J408];[.$J410];[.CS$5:.CS$404])" office:value-type="float" office:value="0" calcext:value-type="float">
            <text:p>0</text:p>
          </table:table-cell>
          <table:table-cell table:style-name="ce90" table:formula="of:=SUMIF([.$J10:.$J408];[.$J410];[.CT$5:.CT$404])" office:value-type="float" office:value="0" calcext:value-type="float">
            <text:p>0</text:p>
          </table:table-cell>
          <table:table-cell table:style-name="ce90" table:formula="of:=SUMIF([.$J10:.$J408];[.$J410];[.CU$5:.CU$404])" office:value-type="float" office:value="0" calcext:value-type="float">
            <text:p>0</text:p>
          </table:table-cell>
          <table:table-cell table:style-name="ce90" table:formula="of:=SUMIF([.$J10:.$J408];[.$J410];[.CV$5:.CV$404])" office:value-type="float" office:value="0" calcext:value-type="float">
            <text:p>0</text:p>
          </table:table-cell>
          <table:table-cell table:style-name="ce90" table:formula="of:=SUMIF([.$J10:.$J408];[.$J410];[.CW$5:.CW$404])" office:value-type="float" office:value="0" calcext:value-type="float">
            <text:p>0</text:p>
          </table:table-cell>
          <table:table-cell table:style-name="ce90" table:formula="of:=SUMIF([.$J10:.$J408];[.$J410];[.CX$5:.CX$404])" office:value-type="float" office:value="0" calcext:value-type="float">
            <text:p>0</text:p>
          </table:table-cell>
          <table:table-cell table:style-name="ce90" table:formula="of:=SUMIF([.$J10:.$J408];[.$J410];[.CY$5:.CY$404])" office:value-type="float" office:value="0" calcext:value-type="float">
            <text:p>0</text:p>
          </table:table-cell>
          <table:table-cell table:style-name="ce90" table:formula="of:=SUMIF([.$J10:.$J408];[.$J410];[.CZ$5:.CZ$404])" office:value-type="float" office:value="0" calcext:value-type="float">
            <text:p>0</text:p>
          </table:table-cell>
          <table:table-cell table:style-name="ce90" table:formula="of:=SUMIF([.$J10:.$J408];[.$J410];[.DA$5:.DA$404])" office:value-type="float" office:value="0" calcext:value-type="float">
            <text:p>0</text:p>
          </table:table-cell>
          <table:table-cell table:style-name="ce90" table:formula="of:=SUMIF([.$J10:.$J408];[.$J410];[.DB$5:.DB$404])" office:value-type="float" office:value="0" calcext:value-type="float">
            <text:p>0</text:p>
          </table:table-cell>
          <table:table-cell table:style-name="ce90" table:formula="of:=SUMIF([.$J10:.$J408];[.$J410];[.DC$5:.DC$404])" office:value-type="float" office:value="0" calcext:value-type="float">
            <text:p>0</text:p>
          </table:table-cell>
          <table:table-cell table:style-name="ce90" table:formula="of:=SUMIF([.$J10:.$J408];[.$J410];[.DD$5:.DD$404])" office:value-type="float" office:value="0" calcext:value-type="float">
            <text:p>0</text:p>
          </table:table-cell>
          <table:table-cell table:style-name="ce90" table:formula="of:=SUMIF([.$J10:.$J408];[.$J410];[.DE$5:.DE$404])" office:value-type="float" office:value="0" calcext:value-type="float">
            <text:p>0</text:p>
          </table:table-cell>
          <table:table-cell table:style-name="ce90" table:formula="of:=SUMIF([.$J10:.$J408];[.$J410];[.DF$5:.DF$404])" office:value-type="float" office:value="0" calcext:value-type="float">
            <text:p>0</text:p>
          </table:table-cell>
          <table:table-cell table:style-name="ce90" table:formula="of:=SUMIF([.$J10:.$J408];[.$J410];[.DG$5:.DG$404])" office:value-type="float" office:value="0" calcext:value-type="float">
            <text:p>0</text:p>
          </table:table-cell>
          <table:table-cell table:style-name="ce90" table:formula="of:=SUMIF([.$J10:.$J408];[.$J410];[.DH$5:.DH$404])" office:value-type="float" office:value="0" calcext:value-type="float">
            <text:p>0</text:p>
          </table:table-cell>
          <table:table-cell table:style-name="ce90" table:formula="of:=SUMIF([.$J10:.$J408];[.$J410];[.DI$5:.DI$404])" office:value-type="float" office:value="0" calcext:value-type="float">
            <text:p>0</text:p>
          </table:table-cell>
          <table:table-cell table:style-name="ce90" table:formula="of:=SUMIF([.$J10:.$J408];[.$J410];[.DJ$5:.DJ$404])" office:value-type="float" office:value="0" calcext:value-type="float">
            <text:p>0</text:p>
          </table:table-cell>
          <table:table-cell table:style-name="ce90" table:formula="of:=SUMIF([.$J10:.$J408];[.$J410];[.DK$5:.DK$404])" office:value-type="float" office:value="0" calcext:value-type="float">
            <text:p>0</text:p>
          </table:table-cell>
          <table:table-cell table:style-name="ce90" table:formula="of:=SUMIF([.$J10:.$J408];[.$J410];[.DL$5:.DL$404])" office:value-type="float" office:value="0" calcext:value-type="float">
            <text:p>0</text:p>
          </table:table-cell>
          <table:table-cell table:style-name="ce90" table:formula="of:=SUMIF([.$J10:.$J408];[.$J410];[.DM$5:.DM$404])" office:value-type="float" office:value="0" calcext:value-type="float">
            <text:p>0</text:p>
          </table:table-cell>
          <table:table-cell table:style-name="ce90" table:formula="of:=SUMIF([.$J10:.$J408];[.$J410];[.DN$5:.DN$404])" office:value-type="float" office:value="0" calcext:value-type="float">
            <text:p>0</text:p>
          </table:table-cell>
          <table:table-cell table:style-name="ce90" table:formula="of:=SUMIF([.$J10:.$J408];[.$J410];[.DO$5:.DO$404])" office:value-type="float" office:value="0" calcext:value-type="float">
            <text:p>0</text:p>
          </table:table-cell>
          <table:table-cell table:style-name="ce90" table:formula="of:=SUMIF([.$J10:.$J408];[.$J410];[.DP$5:.DP$404])" office:value-type="float" office:value="0" calcext:value-type="float">
            <text:p>0</text:p>
          </table:table-cell>
          <table:table-cell table:style-name="ce90" table:formula="of:=SUMIF([.$J10:.$J408];[.$J410];[.DQ$5:.DQ$404])" office:value-type="float" office:value="0" calcext:value-type="float">
            <text:p>0</text:p>
          </table:table-cell>
          <table:table-cell table:style-name="ce90" table:formula="of:=SUMIF([.$J10:.$J408];[.$J410];[.DR$5:.DR$404])" office:value-type="float" office:value="0" calcext:value-type="float">
            <text:p>0</text:p>
          </table:table-cell>
          <table:table-cell table:style-name="ce90" table:formula="of:=SUMIF([.$J10:.$J408];[.$J410];[.DS$5:.DS$404])" office:value-type="float" office:value="0" calcext:value-type="float">
            <text:p>0</text:p>
          </table:table-cell>
          <table:table-cell table:style-name="ce90" table:formula="of:=SUMIF([.$J10:.$J408];[.$J410];[.DT$5:.DT$404])" office:value-type="float" office:value="0" calcext:value-type="float">
            <text:p>0</text:p>
          </table:table-cell>
          <table:table-cell table:style-name="ce90" table:formula="of:=SUMIF([.$J10:.$J408];[.$J410];[.DU$5:.DU$404])" office:value-type="float" office:value="0" calcext:value-type="float">
            <text:p>0</text:p>
          </table:table-cell>
          <table:table-cell table:style-name="ce90" table:formula="of:=SUMIF([.$J10:.$J408];[.$J410];[.DV$5:.DV$404])" office:value-type="float" office:value="0" calcext:value-type="float">
            <text:p>0</text:p>
          </table:table-cell>
          <table:table-cell table:style-name="ce90" table:formula="of:=SUMIF([.$J10:.$J408];[.$J410];[.DW$5:.DW$404])" office:value-type="float" office:value="0" calcext:value-type="float">
            <text:p>0</text:p>
          </table:table-cell>
          <table:table-cell table:style-name="ce90" table:formula="of:=SUMIF([.$J10:.$J408];[.$J410];[.DX$5:.DX$404])" office:value-type="float" office:value="0" calcext:value-type="float">
            <text:p>0</text:p>
          </table:table-cell>
          <table:table-cell table:style-name="ce90" table:formula="of:=SUMIF([.$J10:.$J408];[.$J410];[.DY$5:.DY$404])" office:value-type="float" office:value="0" calcext:value-type="float">
            <text:p>0</text:p>
          </table:table-cell>
          <table:table-cell table:style-name="ce90" table:formula="of:=SUMIF([.$J10:.$J408];[.$J410];[.DZ$5:.DZ$404])" office:value-type="float" office:value="0" calcext:value-type="float">
            <text:p>0</text:p>
          </table:table-cell>
          <table:table-cell table:style-name="ce90" table:formula="of:=SUMIF([.$J10:.$J408];[.$J410];[.EA$5:.EA$404])" office:value-type="float" office:value="0" calcext:value-type="float">
            <text:p>0</text:p>
          </table:table-cell>
          <table:table-cell table:style-name="ce90" table:formula="of:=SUMIF([.$J10:.$J408];[.$J410];[.EB$5:.EB$404])" office:value-type="float" office:value="0" calcext:value-type="float">
            <text:p>0</text:p>
          </table:table-cell>
          <table:table-cell table:style-name="ce90" table:formula="of:=SUMIF([.$J10:.$J408];[.$J410];[.EC$5:.EC$404])" office:value-type="float" office:value="0" calcext:value-type="float">
            <text:p>0</text:p>
          </table:table-cell>
          <table:table-cell table:style-name="ce90" table:formula="of:=SUMIF([.$J10:.$J408];[.$J410];[.ED$5:.ED$404])" office:value-type="float" office:value="0" calcext:value-type="float">
            <text:p>0</text:p>
          </table:table-cell>
          <table:table-cell table:style-name="ce90" table:formula="of:=SUMIF([.$J10:.$J408];[.$J410];[.EE$5:.EE$404])" office:value-type="float" office:value="0" calcext:value-type="float">
            <text:p>0</text:p>
          </table:table-cell>
          <table:table-cell table:style-name="ce90" table:formula="of:=SUMIF([.$J10:.$J408];[.$J410];[.EF$5:.EF$404])" office:value-type="float" office:value="0" calcext:value-type="float">
            <text:p>0</text:p>
          </table:table-cell>
          <table:table-cell table:style-name="ce90" table:formula="of:=SUMIF([.$J10:.$J408];[.$J410];[.EG$5:.EG$404])" office:value-type="float" office:value="0" calcext:value-type="float">
            <text:p>0</text:p>
          </table:table-cell>
          <table:table-cell table:style-name="ce90" table:formula="of:=SUMIF([.$J10:.$J408];[.$J410];[.EH$5:.EH$404])" office:value-type="float" office:value="0" calcext:value-type="float">
            <text:p>0</text:p>
          </table:table-cell>
          <table:table-cell table:style-name="ce90" table:formula="of:=SUMIF([.$J10:.$J408];[.$J410];[.EI$5:.EI$404])" office:value-type="float" office:value="0" calcext:value-type="float">
            <text:p>0</text:p>
          </table:table-cell>
          <table:table-cell table:style-name="ce90" table:formula="of:=SUMIF([.$J10:.$J408];[.$J410];[.EJ$5:.EJ$404])" office:value-type="float" office:value="0" calcext:value-type="float">
            <text:p>0</text:p>
          </table:table-cell>
          <table:table-cell table:style-name="ce90" table:formula="of:=SUMIF([.$J10:.$J408];[.$J410];[.EK$5:.EK$404])" office:value-type="float" office:value="0" calcext:value-type="float">
            <text:p>0</text:p>
          </table:table-cell>
          <table:table-cell table:style-name="ce90" table:formula="of:=SUMIF([.$J10:.$J408];[.$J410];[.EL$5:.EL$404])" office:value-type="float" office:value="0" calcext:value-type="float">
            <text:p>0</text:p>
          </table:table-cell>
          <table:table-cell table:style-name="ce90" table:formula="of:=SUMIF([.$J10:.$J408];[.$J410];[.EM$5:.EM$404])" office:value-type="float" office:value="0" calcext:value-type="float">
            <text:p>0</text:p>
          </table:table-cell>
          <table:table-cell table:style-name="ce90" table:formula="of:=SUMIF([.$J10:.$J408];[.$J410];[.EN$5:.EN$404])" office:value-type="float" office:value="0" calcext:value-type="float">
            <text:p>0</text:p>
          </table:table-cell>
          <table:table-cell table:style-name="ce90" table:formula="of:=SUMIF([.$J10:.$J408];[.$J410];[.EO$5:.EO$404])" office:value-type="float" office:value="0" calcext:value-type="float">
            <text:p>0</text:p>
          </table:table-cell>
          <table:table-cell table:style-name="ce90" table:formula="of:=SUMIF([.$J10:.$J408];[.$J410];[.EP$5:.EP$404])" office:value-type="float" office:value="0" calcext:value-type="float">
            <text:p>0</text:p>
          </table:table-cell>
          <table:table-cell table:style-name="ce90" table:formula="of:=SUMIF([.$J10:.$J408];[.$J410];[.EQ$5:.EQ$404])" office:value-type="float" office:value="0" calcext:value-type="float">
            <text:p>0</text:p>
          </table:table-cell>
          <table:table-cell table:style-name="ce90" table:formula="of:=SUMIF([.$J10:.$J408];[.$J410];[.ER$5:.ER$404])" office:value-type="float" office:value="0" calcext:value-type="float">
            <text:p>0</text:p>
          </table:table-cell>
          <table:table-cell table:style-name="ce90" table:formula="of:=SUMIF([.$J10:.$J408];[.$J410];[.ES$5:.ES$404])" office:value-type="float" office:value="0" calcext:value-type="float">
            <text:p>0</text:p>
          </table:table-cell>
          <table:table-cell table:style-name="ce90" table:formula="of:=SUMIF([.$J10:.$J408];[.$J410];[.ET$5:.ET$404])" office:value-type="float" office:value="0" calcext:value-type="float">
            <text:p>0</text:p>
          </table:table-cell>
          <table:table-cell table:style-name="ce90" table:formula="of:=SUMIF([.$J10:.$J408];[.$J410];[.EU$5:.EU$404])" office:value-type="float" office:value="0" calcext:value-type="float">
            <text:p>0</text:p>
          </table:table-cell>
          <table:table-cell table:style-name="ce90" table:formula="of:=SUMIF([.$J10:.$J408];[.$J410];[.EV$5:.EV$404])" office:value-type="float" office:value="0" calcext:value-type="float">
            <text:p>0</text:p>
          </table:table-cell>
          <table:table-cell table:style-name="ce90" table:formula="of:=SUMIF([.$J10:.$J408];[.$J410];[.EW$5:.EW$404])" office:value-type="float" office:value="0" calcext:value-type="float">
            <text:p>0</text:p>
          </table:table-cell>
          <table:table-cell table:style-name="ce90" table:formula="of:=SUMIF([.$J10:.$J408];[.$J410];[.EX$5:.EX$404])" office:value-type="float" office:value="0" calcext:value-type="float">
            <text:p>0</text:p>
          </table:table-cell>
          <table:table-cell table:style-name="ce90" table:formula="of:=SUMIF([.$J10:.$J408];[.$J410];[.EY$5:.EY$404])" office:value-type="float" office:value="0" calcext:value-type="float">
            <text:p>0</text:p>
          </table:table-cell>
          <table:table-cell table:style-name="ce90" table:formula="of:=SUMIF([.$J10:.$J408];[.$J410];[.EZ$5:.EZ$404])" office:value-type="float" office:value="0" calcext:value-type="float">
            <text:p>0</text:p>
          </table:table-cell>
          <table:table-cell table:style-name="ce90" table:formula="of:=SUMIF([.$J10:.$J408];[.$J410];[.FA$5:.FA$404])" office:value-type="float" office:value="0" calcext:value-type="float">
            <text:p>0</text:p>
          </table:table-cell>
          <table:table-cell table:style-name="ce90" table:formula="of:=SUMIF([.$J10:.$J408];[.$J410];[.FB$5:.FB$404])" office:value-type="float" office:value="0" calcext:value-type="float">
            <text:p>0</text:p>
          </table:table-cell>
          <table:table-cell table:style-name="ce90" table:formula="of:=SUMIF([.$J10:.$J408];[.$J410];[.FC$5:.FC$404])" office:value-type="float" office:value="0" calcext:value-type="float">
            <text:p>0</text:p>
          </table:table-cell>
          <table:table-cell table:style-name="ce90" table:formula="of:=SUMIF([.$J10:.$J408];[.$J410];[.FD$5:.FD$404])" office:value-type="float" office:value="0" calcext:value-type="float">
            <text:p>0</text:p>
          </table:table-cell>
          <table:table-cell table:style-name="ce90" table:formula="of:=SUMIF([.$J10:.$J408];[.$J410];[.FE$5:.FE$404])" office:value-type="float" office:value="0" calcext:value-type="float">
            <text:p>0</text:p>
          </table:table-cell>
          <table:table-cell table:style-name="ce90" table:formula="of:=SUMIF([.$J10:.$J408];[.$J410];[.FF$5:.FF$404])" office:value-type="float" office:value="0" calcext:value-type="float">
            <text:p>0</text:p>
          </table:table-cell>
          <table:table-cell table:style-name="ce90" table:formula="of:=SUMIF([.$J10:.$J408];[.$J410];[.FG$5:.FG$404])" office:value-type="float" office:value="0" calcext:value-type="float">
            <text:p>0</text:p>
          </table:table-cell>
          <table:table-cell table:style-name="ce90" table:formula="of:=SUMIF([.$J10:.$J408];[.$J410];[.FH$5:.FH$404])" office:value-type="float" office:value="0" calcext:value-type="float">
            <text:p>0</text:p>
          </table:table-cell>
          <table:table-cell table:style-name="ce90" table:formula="of:=SUMIF([.$J10:.$J408];[.$J410];[.FI$5:.FI$404])" office:value-type="float" office:value="0" calcext:value-type="float">
            <text:p>0</text:p>
          </table:table-cell>
          <table:table-cell table:style-name="ce90" table:formula="of:=SUMIF([.$J10:.$J408];[.$J410];[.FJ$5:.FJ$404])" office:value-type="float" office:value="0" calcext:value-type="float">
            <text:p>0</text:p>
          </table:table-cell>
          <table:table-cell table:style-name="ce90" table:formula="of:=SUMIF([.$J10:.$J408];[.$J410];[.FK$5:.FK$404])" office:value-type="float" office:value="0" calcext:value-type="float">
            <text:p>0</text:p>
          </table:table-cell>
          <table:table-cell table:style-name="ce90" table:formula="of:=SUMIF([.$J10:.$J408];[.$J410];[.FL$5:.FL$404])" office:value-type="float" office:value="0" calcext:value-type="float">
            <text:p>0</text:p>
          </table:table-cell>
          <table:table-cell table:style-name="ce90" table:formula="of:=SUMIF([.$J10:.$J408];[.$J410];[.FM$5:.FM$404])" office:value-type="float" office:value="0" calcext:value-type="float">
            <text:p>0</text:p>
          </table:table-cell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11]&lt;&gt;&quot;&quot;;NETWORKDAYS([.$L411];[.$M411];[$休日.$B$4:.$B$304]);&quot;&quot;)">
            <text:p/>
          </table:table-cell>
          <table:table-cell table:style-name="ce61"/>
          <table:table-cell table:style-name="ce63" table:formula="of:=IF(OR(AND([.$N411]=&quot;&quot;;[.$L411]&lt;&gt;&quot;&quot;;[.$L411]&lt;=[.$U$1]);AND([.$M411]&lt;&gt;&quot;&quot;;[.Q411]&lt;100;[.$M411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409];[.$J411];[.V$5:.V$404])" office:value-type="float" office:value="0" calcext:value-type="float">
            <text:p>0</text:p>
          </table:table-cell>
          <table:table-cell table:style-name="ce90" table:formula="of:=SUMIF([.$J11:.$J409];[.$J411];[.W$5:.W$404])" office:value-type="float" office:value="0" calcext:value-type="float">
            <text:p>0</text:p>
          </table:table-cell>
          <table:table-cell table:style-name="ce90" table:formula="of:=SUMIF([.$J11:.$J409];[.$J411];[.X$5:.X$404])" office:value-type="float" office:value="0" calcext:value-type="float">
            <text:p>0</text:p>
          </table:table-cell>
          <table:table-cell table:style-name="ce114" table:formula="of:=SUMIF([.$J11:.$J409];[.$J411];[.Y$5:.Y$404])" office:value-type="float" office:value="0" calcext:value-type="float">
            <text:p>0</text:p>
          </table:table-cell>
          <table:table-cell table:style-name="ce114" table:formula="of:=SUMIF([.$J11:.$J409];[.$J411];[.Z$5:.Z$404])" office:value-type="float" office:value="0" calcext:value-type="float">
            <text:p>0</text:p>
          </table:table-cell>
          <table:table-cell table:style-name="ce90" table:formula="of:=SUMIF([.$J11:.$J409];[.$J411];[.AA$5:.AA$404])" office:value-type="float" office:value="0" calcext:value-type="float">
            <text:p>0</text:p>
          </table:table-cell>
          <table:table-cell table:style-name="ce90" table:formula="of:=SUMIF([.$J11:.$J409];[.$J411];[.AB$5:.AB$404])" office:value-type="float" office:value="0" calcext:value-type="float">
            <text:p>0</text:p>
          </table:table-cell>
          <table:table-cell table:style-name="ce90" table:formula="of:=SUMIF([.$J11:.$J409];[.$J411];[.AC$5:.AC$404])" office:value-type="float" office:value="0" calcext:value-type="float">
            <text:p>0</text:p>
          </table:table-cell>
          <table:table-cell table:style-name="ce90" table:formula="of:=SUMIF([.$J11:.$J409];[.$J411];[.AD$5:.AD$404])" office:value-type="float" office:value="0" calcext:value-type="float">
            <text:p>0</text:p>
          </table:table-cell>
          <table:table-cell table:style-name="ce90" table:formula="of:=SUMIF([.$J11:.$J409];[.$J411];[.AE$5:.AE$404])" office:value-type="float" office:value="0" calcext:value-type="float">
            <text:p>0</text:p>
          </table:table-cell>
          <table:table-cell table:style-name="ce114" table:formula="of:=SUMIF([.$J11:.$J409];[.$J411];[.AF$5:.AF$404])" office:value-type="float" office:value="0" calcext:value-type="float">
            <text:p>0</text:p>
          </table:table-cell>
          <table:table-cell table:style-name="ce114" table:formula="of:=SUMIF([.$J11:.$J409];[.$J411];[.AG$5:.AG$404])" office:value-type="float" office:value="0" calcext:value-type="float">
            <text:p>0</text:p>
          </table:table-cell>
          <table:table-cell table:style-name="ce90" table:formula="of:=SUMIF([.$J11:.$J409];[.$J411];[.AH$5:.AH$404])" office:value-type="float" office:value="0" calcext:value-type="float">
            <text:p>0</text:p>
          </table:table-cell>
          <table:table-cell table:style-name="ce90" table:formula="of:=SUMIF([.$J11:.$J409];[.$J411];[.AI$5:.AI$404])" office:value-type="float" office:value="0" calcext:value-type="float">
            <text:p>0</text:p>
          </table:table-cell>
          <table:table-cell table:style-name="ce90" table:formula="of:=SUMIF([.$J11:.$J409];[.$J411];[.AJ$5:.AJ$404])" office:value-type="float" office:value="0" calcext:value-type="float">
            <text:p>0</text:p>
          </table:table-cell>
          <table:table-cell table:style-name="ce90" table:formula="of:=SUMIF([.$J11:.$J409];[.$J411];[.AK$5:.AK$404])" office:value-type="float" office:value="0" calcext:value-type="float">
            <text:p>0</text:p>
          </table:table-cell>
          <table:table-cell table:style-name="ce90" table:formula="of:=SUMIF([.$J11:.$J409];[.$J411];[.AL$5:.AL$404])" office:value-type="float" office:value="0" calcext:value-type="float">
            <text:p>0</text:p>
          </table:table-cell>
          <table:table-cell table:style-name="ce114" table:formula="of:=SUMIF([.$J11:.$J409];[.$J411];[.AM$5:.AM$404])" office:value-type="float" office:value="0" calcext:value-type="float">
            <text:p>0</text:p>
          </table:table-cell>
          <table:table-cell table:style-name="ce114" table:formula="of:=SUMIF([.$J11:.$J409];[.$J411];[.AN$5:.AN$404])" office:value-type="float" office:value="0" calcext:value-type="float">
            <text:p>0</text:p>
          </table:table-cell>
          <table:table-cell table:style-name="ce90" table:formula="of:=SUMIF([.$J11:.$J409];[.$J411];[.AO$5:.AO$404])" office:value-type="float" office:value="0" calcext:value-type="float">
            <text:p>0</text:p>
          </table:table-cell>
          <table:table-cell table:style-name="ce90" table:formula="of:=SUMIF([.$J11:.$J409];[.$J411];[.AP$5:.AP$404])" office:value-type="float" office:value="0" calcext:value-type="float">
            <text:p>0</text:p>
          </table:table-cell>
          <table:table-cell table:style-name="ce90" table:formula="of:=SUMIF([.$J11:.$J409];[.$J411];[.AQ$5:.AQ$404])" office:value-type="float" office:value="0" calcext:value-type="float">
            <text:p>0</text:p>
          </table:table-cell>
          <table:table-cell table:style-name="ce90" table:formula="of:=SUMIF([.$J11:.$J409];[.$J411];[.AR$5:.AR$404])" office:value-type="float" office:value="0" calcext:value-type="float">
            <text:p>0</text:p>
          </table:table-cell>
          <table:table-cell table:style-name="ce143" table:formula="of:=SUMIF([.$J11:.$J409];[.$J411];[.AS$5:.AS$404])" office:value-type="float" office:value="0" calcext:value-type="float">
            <text:p>0</text:p>
          </table:table-cell>
          <table:table-cell table:style-name="ce114" table:formula="of:=SUMIF([.$J11:.$J409];[.$J411];[.AT$5:.AT$404])" office:value-type="float" office:value="0" calcext:value-type="float">
            <text:p>0</text:p>
          </table:table-cell>
          <table:table-cell table:style-name="ce114" table:formula="of:=SUMIF([.$J11:.$J409];[.$J411];[.AU$5:.AU$404])" office:value-type="float" office:value="0" calcext:value-type="float">
            <text:p>0</text:p>
          </table:table-cell>
          <table:table-cell table:style-name="ce157" table:formula="of:=SUMIF([.$J11:.$J409];[.$J411];[.AV$5:.AV$404])" office:value-type="float" office:value="0" calcext:value-type="float">
            <text:p>0</text:p>
          </table:table-cell>
          <table:table-cell table:style-name="ce90" table:formula="of:=SUMIF([.$J11:.$J409];[.$J411];[.AW$5:.AW$404])" office:value-type="float" office:value="0" calcext:value-type="float">
            <text:p>0</text:p>
          </table:table-cell>
          <table:table-cell table:style-name="ce90" table:formula="of:=SUMIF([.$J11:.$J409];[.$J411];[.AX$5:.AX$404])" office:value-type="float" office:value="0" calcext:value-type="float">
            <text:p>0</text:p>
          </table:table-cell>
          <table:table-cell table:style-name="ce90" table:formula="of:=SUMIF([.$J11:.$J409];[.$J411];[.AY$5:.AY$404])" office:value-type="float" office:value="0" calcext:value-type="float">
            <text:p>0</text:p>
          </table:table-cell>
          <table:table-cell table:style-name="ce90" table:formula="of:=SUMIF([.$J11:.$J409];[.$J411];[.AZ$5:.AZ$404])" office:value-type="float" office:value="0" calcext:value-type="float">
            <text:p>0</text:p>
          </table:table-cell>
          <table:table-cell table:style-name="ce90" table:formula="of:=SUMIF([.$J11:.$J409];[.$J411];[.BA$5:.BA$404])" office:value-type="float" office:value="0" calcext:value-type="float">
            <text:p>0</text:p>
          </table:table-cell>
          <table:table-cell table:style-name="ce90" table:formula="of:=SUMIF([.$J11:.$J409];[.$J411];[.BB$5:.BB$404])" office:value-type="float" office:value="0" calcext:value-type="float">
            <text:p>0</text:p>
          </table:table-cell>
          <table:table-cell table:style-name="ce90" table:formula="of:=SUMIF([.$J11:.$J409];[.$J411];[.BC$5:.BC$404])" office:value-type="float" office:value="0" calcext:value-type="float">
            <text:p>0</text:p>
          </table:table-cell>
          <table:table-cell table:style-name="ce90" table:formula="of:=SUMIF([.$J11:.$J409];[.$J411];[.BD$5:.BD$404])" office:value-type="float" office:value="0" calcext:value-type="float">
            <text:p>0</text:p>
          </table:table-cell>
          <table:table-cell table:style-name="ce90" table:formula="of:=SUMIF([.$J11:.$J409];[.$J411];[.BE$5:.BE$404])" office:value-type="float" office:value="0" calcext:value-type="float">
            <text:p>0</text:p>
          </table:table-cell>
          <table:table-cell table:style-name="ce90" table:formula="of:=SUMIF([.$J11:.$J409];[.$J411];[.BF$5:.BF$404])" office:value-type="float" office:value="0" calcext:value-type="float">
            <text:p>0</text:p>
          </table:table-cell>
          <table:table-cell table:style-name="ce90" table:formula="of:=SUMIF([.$J11:.$J409];[.$J411];[.BG$5:.BG$404])" office:value-type="float" office:value="0" calcext:value-type="float">
            <text:p>0</text:p>
          </table:table-cell>
          <table:table-cell table:style-name="ce90" table:formula="of:=SUMIF([.$J11:.$J409];[.$J411];[.BH$5:.BH$404])" office:value-type="float" office:value="0" calcext:value-type="float">
            <text:p>0</text:p>
          </table:table-cell>
          <table:table-cell table:style-name="ce90" table:formula="of:=SUMIF([.$J11:.$J409];[.$J411];[.BI$5:.BI$404])" office:value-type="float" office:value="0" calcext:value-type="float">
            <text:p>0</text:p>
          </table:table-cell>
          <table:table-cell table:style-name="ce90" table:formula="of:=SUMIF([.$J11:.$J409];[.$J411];[.BJ$5:.BJ$404])" office:value-type="float" office:value="0" calcext:value-type="float">
            <text:p>0</text:p>
          </table:table-cell>
          <table:table-cell table:style-name="ce90" table:formula="of:=SUMIF([.$J11:.$J409];[.$J411];[.BK$5:.BK$404])" office:value-type="float" office:value="0" calcext:value-type="float">
            <text:p>0</text:p>
          </table:table-cell>
          <table:table-cell table:style-name="ce90" table:formula="of:=SUMIF([.$J11:.$J409];[.$J411];[.BL$5:.BL$404])" office:value-type="float" office:value="0" calcext:value-type="float">
            <text:p>0</text:p>
          </table:table-cell>
          <table:table-cell table:style-name="ce90" table:formula="of:=SUMIF([.$J11:.$J409];[.$J411];[.BM$5:.BM$404])" office:value-type="float" office:value="0" calcext:value-type="float">
            <text:p>0</text:p>
          </table:table-cell>
          <table:table-cell table:style-name="ce90" table:formula="of:=SUMIF([.$J11:.$J409];[.$J411];[.BN$5:.BN$404])" office:value-type="float" office:value="0" calcext:value-type="float">
            <text:p>0</text:p>
          </table:table-cell>
          <table:table-cell table:style-name="ce90" table:formula="of:=SUMIF([.$J11:.$J409];[.$J411];[.BO$5:.BO$404])" office:value-type="float" office:value="0" calcext:value-type="float">
            <text:p>0</text:p>
          </table:table-cell>
          <table:table-cell table:style-name="ce90" table:formula="of:=SUMIF([.$J11:.$J409];[.$J411];[.BP$5:.BP$404])" office:value-type="float" office:value="0" calcext:value-type="float">
            <text:p>0</text:p>
          </table:table-cell>
          <table:table-cell table:style-name="ce90" table:formula="of:=SUMIF([.$J11:.$J409];[.$J411];[.BQ$5:.BQ$404])" office:value-type="float" office:value="0" calcext:value-type="float">
            <text:p>0</text:p>
          </table:table-cell>
          <table:table-cell table:style-name="ce90" table:formula="of:=SUMIF([.$J11:.$J409];[.$J411];[.BR$5:.BR$404])" office:value-type="float" office:value="0" calcext:value-type="float">
            <text:p>0</text:p>
          </table:table-cell>
          <table:table-cell table:style-name="ce90" table:formula="of:=SUMIF([.$J11:.$J409];[.$J411];[.BS$5:.BS$404])" office:value-type="float" office:value="0" calcext:value-type="float">
            <text:p>0</text:p>
          </table:table-cell>
          <table:table-cell table:style-name="ce90" table:formula="of:=SUMIF([.$J11:.$J409];[.$J411];[.BT$5:.BT$404])" office:value-type="float" office:value="0" calcext:value-type="float">
            <text:p>0</text:p>
          </table:table-cell>
          <table:table-cell table:style-name="ce90" table:formula="of:=SUMIF([.$J11:.$J409];[.$J411];[.BU$5:.BU$404])" office:value-type="float" office:value="0" calcext:value-type="float">
            <text:p>0</text:p>
          </table:table-cell>
          <table:table-cell table:style-name="ce90" table:formula="of:=SUMIF([.$J11:.$J409];[.$J411];[.BV$5:.BV$404])" office:value-type="float" office:value="0" calcext:value-type="float">
            <text:p>0</text:p>
          </table:table-cell>
          <table:table-cell table:style-name="ce90" table:formula="of:=SUMIF([.$J11:.$J409];[.$J411];[.BW$5:.BW$404])" office:value-type="float" office:value="0" calcext:value-type="float">
            <text:p>0</text:p>
          </table:table-cell>
          <table:table-cell table:style-name="ce90" table:formula="of:=SUMIF([.$J11:.$J409];[.$J411];[.BX$5:.BX$404])" office:value-type="float" office:value="0" calcext:value-type="float">
            <text:p>0</text:p>
          </table:table-cell>
          <table:table-cell table:style-name="ce90" table:formula="of:=SUMIF([.$J11:.$J409];[.$J411];[.BY$5:.BY$404])" office:value-type="float" office:value="0" calcext:value-type="float">
            <text:p>0</text:p>
          </table:table-cell>
          <table:table-cell table:style-name="ce90" table:formula="of:=SUMIF([.$J11:.$J409];[.$J411];[.BZ$5:.BZ$404])" office:value-type="float" office:value="0" calcext:value-type="float">
            <text:p>0</text:p>
          </table:table-cell>
          <table:table-cell table:style-name="ce90" table:formula="of:=SUMIF([.$J11:.$J409];[.$J411];[.CA$5:.CA$404])" office:value-type="float" office:value="0" calcext:value-type="float">
            <text:p>0</text:p>
          </table:table-cell>
          <table:table-cell table:style-name="ce90" table:formula="of:=SUMIF([.$J11:.$J409];[.$J411];[.CB$5:.CB$404])" office:value-type="float" office:value="0" calcext:value-type="float">
            <text:p>0</text:p>
          </table:table-cell>
          <table:table-cell table:style-name="ce90" table:formula="of:=SUMIF([.$J11:.$J409];[.$J411];[.CC$5:.CC$404])" office:value-type="float" office:value="0" calcext:value-type="float">
            <text:p>0</text:p>
          </table:table-cell>
          <table:table-cell table:style-name="ce90" table:formula="of:=SUMIF([.$J11:.$J409];[.$J411];[.CD$5:.CD$404])" office:value-type="float" office:value="0" calcext:value-type="float">
            <text:p>0</text:p>
          </table:table-cell>
          <table:table-cell table:style-name="ce90" table:formula="of:=SUMIF([.$J11:.$J409];[.$J411];[.CE$5:.CE$404])" office:value-type="float" office:value="0" calcext:value-type="float">
            <text:p>0</text:p>
          </table:table-cell>
          <table:table-cell table:style-name="ce90" table:formula="of:=SUMIF([.$J11:.$J409];[.$J411];[.CF$5:.CF$404])" office:value-type="float" office:value="0" calcext:value-type="float">
            <text:p>0</text:p>
          </table:table-cell>
          <table:table-cell table:style-name="ce90" table:formula="of:=SUMIF([.$J11:.$J409];[.$J411];[.CG$5:.CG$404])" office:value-type="float" office:value="0" calcext:value-type="float">
            <text:p>0</text:p>
          </table:table-cell>
          <table:table-cell table:style-name="ce90" table:formula="of:=SUMIF([.$J11:.$J409];[.$J411];[.CH$5:.CH$404])" office:value-type="float" office:value="0" calcext:value-type="float">
            <text:p>0</text:p>
          </table:table-cell>
          <table:table-cell table:style-name="ce90" table:formula="of:=SUMIF([.$J11:.$J409];[.$J411];[.CI$5:.CI$404])" office:value-type="float" office:value="0" calcext:value-type="float">
            <text:p>0</text:p>
          </table:table-cell>
          <table:table-cell table:style-name="ce90" table:formula="of:=SUMIF([.$J11:.$J409];[.$J411];[.CJ$5:.CJ$404])" office:value-type="float" office:value="0" calcext:value-type="float">
            <text:p>0</text:p>
          </table:table-cell>
          <table:table-cell table:style-name="ce90" table:formula="of:=SUMIF([.$J11:.$J409];[.$J411];[.CK$5:.CK$404])" office:value-type="float" office:value="0" calcext:value-type="float">
            <text:p>0</text:p>
          </table:table-cell>
          <table:table-cell table:style-name="ce90" table:formula="of:=SUMIF([.$J11:.$J409];[.$J411];[.CL$5:.CL$404])" office:value-type="float" office:value="0" calcext:value-type="float">
            <text:p>0</text:p>
          </table:table-cell>
          <table:table-cell table:style-name="ce90" table:formula="of:=SUMIF([.$J11:.$J409];[.$J411];[.CM$5:.CM$404])" office:value-type="float" office:value="0" calcext:value-type="float">
            <text:p>0</text:p>
          </table:table-cell>
          <table:table-cell table:style-name="ce90" table:formula="of:=SUMIF([.$J11:.$J409];[.$J411];[.CN$5:.CN$404])" office:value-type="float" office:value="0" calcext:value-type="float">
            <text:p>0</text:p>
          </table:table-cell>
          <table:table-cell table:style-name="ce90" table:formula="of:=SUMIF([.$J11:.$J409];[.$J411];[.CO$5:.CO$404])" office:value-type="float" office:value="0" calcext:value-type="float">
            <text:p>0</text:p>
          </table:table-cell>
          <table:table-cell table:style-name="ce90" table:formula="of:=SUMIF([.$J11:.$J409];[.$J411];[.CP$5:.CP$404])" office:value-type="float" office:value="0" calcext:value-type="float">
            <text:p>0</text:p>
          </table:table-cell>
          <table:table-cell table:style-name="ce90" table:formula="of:=SUMIF([.$J11:.$J409];[.$J411];[.CQ$5:.CQ$404])" office:value-type="float" office:value="0" calcext:value-type="float">
            <text:p>0</text:p>
          </table:table-cell>
          <table:table-cell table:style-name="ce90" table:formula="of:=SUMIF([.$J11:.$J409];[.$J411];[.CR$5:.CR$404])" office:value-type="float" office:value="0" calcext:value-type="float">
            <text:p>0</text:p>
          </table:table-cell>
          <table:table-cell table:style-name="ce90" table:formula="of:=SUMIF([.$J11:.$J409];[.$J411];[.CS$5:.CS$404])" office:value-type="float" office:value="0" calcext:value-type="float">
            <text:p>0</text:p>
          </table:table-cell>
          <table:table-cell table:style-name="ce90" table:formula="of:=SUMIF([.$J11:.$J409];[.$J411];[.CT$5:.CT$404])" office:value-type="float" office:value="0" calcext:value-type="float">
            <text:p>0</text:p>
          </table:table-cell>
          <table:table-cell table:style-name="ce90" table:formula="of:=SUMIF([.$J11:.$J409];[.$J411];[.CU$5:.CU$404])" office:value-type="float" office:value="0" calcext:value-type="float">
            <text:p>0</text:p>
          </table:table-cell>
          <table:table-cell table:style-name="ce90" table:formula="of:=SUMIF([.$J11:.$J409];[.$J411];[.CV$5:.CV$404])" office:value-type="float" office:value="0" calcext:value-type="float">
            <text:p>0</text:p>
          </table:table-cell>
          <table:table-cell table:style-name="ce90" table:formula="of:=SUMIF([.$J11:.$J409];[.$J411];[.CW$5:.CW$404])" office:value-type="float" office:value="0" calcext:value-type="float">
            <text:p>0</text:p>
          </table:table-cell>
          <table:table-cell table:style-name="ce90" table:formula="of:=SUMIF([.$J11:.$J409];[.$J411];[.CX$5:.CX$404])" office:value-type="float" office:value="0" calcext:value-type="float">
            <text:p>0</text:p>
          </table:table-cell>
          <table:table-cell table:style-name="ce90" table:formula="of:=SUMIF([.$J11:.$J409];[.$J411];[.CY$5:.CY$404])" office:value-type="float" office:value="0" calcext:value-type="float">
            <text:p>0</text:p>
          </table:table-cell>
          <table:table-cell table:style-name="ce90" table:formula="of:=SUMIF([.$J11:.$J409];[.$J411];[.CZ$5:.CZ$404])" office:value-type="float" office:value="0" calcext:value-type="float">
            <text:p>0</text:p>
          </table:table-cell>
          <table:table-cell table:style-name="ce90" table:formula="of:=SUMIF([.$J11:.$J409];[.$J411];[.DA$5:.DA$404])" office:value-type="float" office:value="0" calcext:value-type="float">
            <text:p>0</text:p>
          </table:table-cell>
          <table:table-cell table:style-name="ce90" table:formula="of:=SUMIF([.$J11:.$J409];[.$J411];[.DB$5:.DB$404])" office:value-type="float" office:value="0" calcext:value-type="float">
            <text:p>0</text:p>
          </table:table-cell>
          <table:table-cell table:style-name="ce90" table:formula="of:=SUMIF([.$J11:.$J409];[.$J411];[.DC$5:.DC$404])" office:value-type="float" office:value="0" calcext:value-type="float">
            <text:p>0</text:p>
          </table:table-cell>
          <table:table-cell table:style-name="ce90" table:formula="of:=SUMIF([.$J11:.$J409];[.$J411];[.DD$5:.DD$404])" office:value-type="float" office:value="0" calcext:value-type="float">
            <text:p>0</text:p>
          </table:table-cell>
          <table:table-cell table:style-name="ce90" table:formula="of:=SUMIF([.$J11:.$J409];[.$J411];[.DE$5:.DE$404])" office:value-type="float" office:value="0" calcext:value-type="float">
            <text:p>0</text:p>
          </table:table-cell>
          <table:table-cell table:style-name="ce90" table:formula="of:=SUMIF([.$J11:.$J409];[.$J411];[.DF$5:.DF$404])" office:value-type="float" office:value="0" calcext:value-type="float">
            <text:p>0</text:p>
          </table:table-cell>
          <table:table-cell table:style-name="ce90" table:formula="of:=SUMIF([.$J11:.$J409];[.$J411];[.DG$5:.DG$404])" office:value-type="float" office:value="0" calcext:value-type="float">
            <text:p>0</text:p>
          </table:table-cell>
          <table:table-cell table:style-name="ce90" table:formula="of:=SUMIF([.$J11:.$J409];[.$J411];[.DH$5:.DH$404])" office:value-type="float" office:value="0" calcext:value-type="float">
            <text:p>0</text:p>
          </table:table-cell>
          <table:table-cell table:style-name="ce90" table:formula="of:=SUMIF([.$J11:.$J409];[.$J411];[.DI$5:.DI$404])" office:value-type="float" office:value="0" calcext:value-type="float">
            <text:p>0</text:p>
          </table:table-cell>
          <table:table-cell table:style-name="ce90" table:formula="of:=SUMIF([.$J11:.$J409];[.$J411];[.DJ$5:.DJ$404])" office:value-type="float" office:value="0" calcext:value-type="float">
            <text:p>0</text:p>
          </table:table-cell>
          <table:table-cell table:style-name="ce90" table:formula="of:=SUMIF([.$J11:.$J409];[.$J411];[.DK$5:.DK$404])" office:value-type="float" office:value="0" calcext:value-type="float">
            <text:p>0</text:p>
          </table:table-cell>
          <table:table-cell table:style-name="ce90" table:formula="of:=SUMIF([.$J11:.$J409];[.$J411];[.DL$5:.DL$404])" office:value-type="float" office:value="0" calcext:value-type="float">
            <text:p>0</text:p>
          </table:table-cell>
          <table:table-cell table:style-name="ce90" table:formula="of:=SUMIF([.$J11:.$J409];[.$J411];[.DM$5:.DM$404])" office:value-type="float" office:value="0" calcext:value-type="float">
            <text:p>0</text:p>
          </table:table-cell>
          <table:table-cell table:style-name="ce90" table:formula="of:=SUMIF([.$J11:.$J409];[.$J411];[.DN$5:.DN$404])" office:value-type="float" office:value="0" calcext:value-type="float">
            <text:p>0</text:p>
          </table:table-cell>
          <table:table-cell table:style-name="ce90" table:formula="of:=SUMIF([.$J11:.$J409];[.$J411];[.DO$5:.DO$404])" office:value-type="float" office:value="0" calcext:value-type="float">
            <text:p>0</text:p>
          </table:table-cell>
          <table:table-cell table:style-name="ce90" table:formula="of:=SUMIF([.$J11:.$J409];[.$J411];[.DP$5:.DP$404])" office:value-type="float" office:value="0" calcext:value-type="float">
            <text:p>0</text:p>
          </table:table-cell>
          <table:table-cell table:style-name="ce90" table:formula="of:=SUMIF([.$J11:.$J409];[.$J411];[.DQ$5:.DQ$404])" office:value-type="float" office:value="0" calcext:value-type="float">
            <text:p>0</text:p>
          </table:table-cell>
          <table:table-cell table:style-name="ce90" table:formula="of:=SUMIF([.$J11:.$J409];[.$J411];[.DR$5:.DR$404])" office:value-type="float" office:value="0" calcext:value-type="float">
            <text:p>0</text:p>
          </table:table-cell>
          <table:table-cell table:style-name="ce90" table:formula="of:=SUMIF([.$J11:.$J409];[.$J411];[.DS$5:.DS$404])" office:value-type="float" office:value="0" calcext:value-type="float">
            <text:p>0</text:p>
          </table:table-cell>
          <table:table-cell table:style-name="ce90" table:formula="of:=SUMIF([.$J11:.$J409];[.$J411];[.DT$5:.DT$404])" office:value-type="float" office:value="0" calcext:value-type="float">
            <text:p>0</text:p>
          </table:table-cell>
          <table:table-cell table:style-name="ce90" table:formula="of:=SUMIF([.$J11:.$J409];[.$J411];[.DU$5:.DU$404])" office:value-type="float" office:value="0" calcext:value-type="float">
            <text:p>0</text:p>
          </table:table-cell>
          <table:table-cell table:style-name="ce90" table:formula="of:=SUMIF([.$J11:.$J409];[.$J411];[.DV$5:.DV$404])" office:value-type="float" office:value="0" calcext:value-type="float">
            <text:p>0</text:p>
          </table:table-cell>
          <table:table-cell table:style-name="ce90" table:formula="of:=SUMIF([.$J11:.$J409];[.$J411];[.DW$5:.DW$404])" office:value-type="float" office:value="0" calcext:value-type="float">
            <text:p>0</text:p>
          </table:table-cell>
          <table:table-cell table:style-name="ce90" table:formula="of:=SUMIF([.$J11:.$J409];[.$J411];[.DX$5:.DX$404])" office:value-type="float" office:value="0" calcext:value-type="float">
            <text:p>0</text:p>
          </table:table-cell>
          <table:table-cell table:style-name="ce90" table:formula="of:=SUMIF([.$J11:.$J409];[.$J411];[.DY$5:.DY$404])" office:value-type="float" office:value="0" calcext:value-type="float">
            <text:p>0</text:p>
          </table:table-cell>
          <table:table-cell table:style-name="ce90" table:formula="of:=SUMIF([.$J11:.$J409];[.$J411];[.DZ$5:.DZ$404])" office:value-type="float" office:value="0" calcext:value-type="float">
            <text:p>0</text:p>
          </table:table-cell>
          <table:table-cell table:style-name="ce90" table:formula="of:=SUMIF([.$J11:.$J409];[.$J411];[.EA$5:.EA$404])" office:value-type="float" office:value="0" calcext:value-type="float">
            <text:p>0</text:p>
          </table:table-cell>
          <table:table-cell table:style-name="ce90" table:formula="of:=SUMIF([.$J11:.$J409];[.$J411];[.EB$5:.EB$404])" office:value-type="float" office:value="0" calcext:value-type="float">
            <text:p>0</text:p>
          </table:table-cell>
          <table:table-cell table:style-name="ce90" table:formula="of:=SUMIF([.$J11:.$J409];[.$J411];[.EC$5:.EC$404])" office:value-type="float" office:value="0" calcext:value-type="float">
            <text:p>0</text:p>
          </table:table-cell>
          <table:table-cell table:style-name="ce90" table:formula="of:=SUMIF([.$J11:.$J409];[.$J411];[.ED$5:.ED$404])" office:value-type="float" office:value="0" calcext:value-type="float">
            <text:p>0</text:p>
          </table:table-cell>
          <table:table-cell table:style-name="ce90" table:formula="of:=SUMIF([.$J11:.$J409];[.$J411];[.EE$5:.EE$404])" office:value-type="float" office:value="0" calcext:value-type="float">
            <text:p>0</text:p>
          </table:table-cell>
          <table:table-cell table:style-name="ce90" table:formula="of:=SUMIF([.$J11:.$J409];[.$J411];[.EF$5:.EF$404])" office:value-type="float" office:value="0" calcext:value-type="float">
            <text:p>0</text:p>
          </table:table-cell>
          <table:table-cell table:style-name="ce90" table:formula="of:=SUMIF([.$J11:.$J409];[.$J411];[.EG$5:.EG$404])" office:value-type="float" office:value="0" calcext:value-type="float">
            <text:p>0</text:p>
          </table:table-cell>
          <table:table-cell table:style-name="ce90" table:formula="of:=SUMIF([.$J11:.$J409];[.$J411];[.EH$5:.EH$404])" office:value-type="float" office:value="0" calcext:value-type="float">
            <text:p>0</text:p>
          </table:table-cell>
          <table:table-cell table:style-name="ce90" table:formula="of:=SUMIF([.$J11:.$J409];[.$J411];[.EI$5:.EI$404])" office:value-type="float" office:value="0" calcext:value-type="float">
            <text:p>0</text:p>
          </table:table-cell>
          <table:table-cell table:style-name="ce90" table:formula="of:=SUMIF([.$J11:.$J409];[.$J411];[.EJ$5:.EJ$404])" office:value-type="float" office:value="0" calcext:value-type="float">
            <text:p>0</text:p>
          </table:table-cell>
          <table:table-cell table:style-name="ce90" table:formula="of:=SUMIF([.$J11:.$J409];[.$J411];[.EK$5:.EK$404])" office:value-type="float" office:value="0" calcext:value-type="float">
            <text:p>0</text:p>
          </table:table-cell>
          <table:table-cell table:style-name="ce90" table:formula="of:=SUMIF([.$J11:.$J409];[.$J411];[.EL$5:.EL$404])" office:value-type="float" office:value="0" calcext:value-type="float">
            <text:p>0</text:p>
          </table:table-cell>
          <table:table-cell table:style-name="ce90" table:formula="of:=SUMIF([.$J11:.$J409];[.$J411];[.EM$5:.EM$404])" office:value-type="float" office:value="0" calcext:value-type="float">
            <text:p>0</text:p>
          </table:table-cell>
          <table:table-cell table:style-name="ce90" table:formula="of:=SUMIF([.$J11:.$J409];[.$J411];[.EN$5:.EN$404])" office:value-type="float" office:value="0" calcext:value-type="float">
            <text:p>0</text:p>
          </table:table-cell>
          <table:table-cell table:style-name="ce90" table:formula="of:=SUMIF([.$J11:.$J409];[.$J411];[.EO$5:.EO$404])" office:value-type="float" office:value="0" calcext:value-type="float">
            <text:p>0</text:p>
          </table:table-cell>
          <table:table-cell table:style-name="ce90" table:formula="of:=SUMIF([.$J11:.$J409];[.$J411];[.EP$5:.EP$404])" office:value-type="float" office:value="0" calcext:value-type="float">
            <text:p>0</text:p>
          </table:table-cell>
          <table:table-cell table:style-name="ce90" table:formula="of:=SUMIF([.$J11:.$J409];[.$J411];[.EQ$5:.EQ$404])" office:value-type="float" office:value="0" calcext:value-type="float">
            <text:p>0</text:p>
          </table:table-cell>
          <table:table-cell table:style-name="ce90" table:formula="of:=SUMIF([.$J11:.$J409];[.$J411];[.ER$5:.ER$404])" office:value-type="float" office:value="0" calcext:value-type="float">
            <text:p>0</text:p>
          </table:table-cell>
          <table:table-cell table:style-name="ce90" table:formula="of:=SUMIF([.$J11:.$J409];[.$J411];[.ES$5:.ES$404])" office:value-type="float" office:value="0" calcext:value-type="float">
            <text:p>0</text:p>
          </table:table-cell>
          <table:table-cell table:style-name="ce90" table:formula="of:=SUMIF([.$J11:.$J409];[.$J411];[.ET$5:.ET$404])" office:value-type="float" office:value="0" calcext:value-type="float">
            <text:p>0</text:p>
          </table:table-cell>
          <table:table-cell table:style-name="ce90" table:formula="of:=SUMIF([.$J11:.$J409];[.$J411];[.EU$5:.EU$404])" office:value-type="float" office:value="0" calcext:value-type="float">
            <text:p>0</text:p>
          </table:table-cell>
          <table:table-cell table:style-name="ce90" table:formula="of:=SUMIF([.$J11:.$J409];[.$J411];[.EV$5:.EV$404])" office:value-type="float" office:value="0" calcext:value-type="float">
            <text:p>0</text:p>
          </table:table-cell>
          <table:table-cell table:style-name="ce90" table:formula="of:=SUMIF([.$J11:.$J409];[.$J411];[.EW$5:.EW$404])" office:value-type="float" office:value="0" calcext:value-type="float">
            <text:p>0</text:p>
          </table:table-cell>
          <table:table-cell table:style-name="ce90" table:formula="of:=SUMIF([.$J11:.$J409];[.$J411];[.EX$5:.EX$404])" office:value-type="float" office:value="0" calcext:value-type="float">
            <text:p>0</text:p>
          </table:table-cell>
          <table:table-cell table:style-name="ce90" table:formula="of:=SUMIF([.$J11:.$J409];[.$J411];[.EY$5:.EY$404])" office:value-type="float" office:value="0" calcext:value-type="float">
            <text:p>0</text:p>
          </table:table-cell>
          <table:table-cell table:style-name="ce90" table:formula="of:=SUMIF([.$J11:.$J409];[.$J411];[.EZ$5:.EZ$404])" office:value-type="float" office:value="0" calcext:value-type="float">
            <text:p>0</text:p>
          </table:table-cell>
          <table:table-cell table:style-name="ce90" table:formula="of:=SUMIF([.$J11:.$J409];[.$J411];[.FA$5:.FA$404])" office:value-type="float" office:value="0" calcext:value-type="float">
            <text:p>0</text:p>
          </table:table-cell>
          <table:table-cell table:style-name="ce90" table:formula="of:=SUMIF([.$J11:.$J409];[.$J411];[.FB$5:.FB$404])" office:value-type="float" office:value="0" calcext:value-type="float">
            <text:p>0</text:p>
          </table:table-cell>
          <table:table-cell table:style-name="ce90" table:formula="of:=SUMIF([.$J11:.$J409];[.$J411];[.FC$5:.FC$404])" office:value-type="float" office:value="0" calcext:value-type="float">
            <text:p>0</text:p>
          </table:table-cell>
          <table:table-cell table:style-name="ce90" table:formula="of:=SUMIF([.$J11:.$J409];[.$J411];[.FD$5:.FD$404])" office:value-type="float" office:value="0" calcext:value-type="float">
            <text:p>0</text:p>
          </table:table-cell>
          <table:table-cell table:style-name="ce90" table:formula="of:=SUMIF([.$J11:.$J409];[.$J411];[.FE$5:.FE$404])" office:value-type="float" office:value="0" calcext:value-type="float">
            <text:p>0</text:p>
          </table:table-cell>
          <table:table-cell table:style-name="ce90" table:formula="of:=SUMIF([.$J11:.$J409];[.$J411];[.FF$5:.FF$404])" office:value-type="float" office:value="0" calcext:value-type="float">
            <text:p>0</text:p>
          </table:table-cell>
          <table:table-cell table:style-name="ce90" table:formula="of:=SUMIF([.$J11:.$J409];[.$J411];[.FG$5:.FG$404])" office:value-type="float" office:value="0" calcext:value-type="float">
            <text:p>0</text:p>
          </table:table-cell>
          <table:table-cell table:style-name="ce90" table:formula="of:=SUMIF([.$J11:.$J409];[.$J411];[.FH$5:.FH$404])" office:value-type="float" office:value="0" calcext:value-type="float">
            <text:p>0</text:p>
          </table:table-cell>
          <table:table-cell table:style-name="ce90" table:formula="of:=SUMIF([.$J11:.$J409];[.$J411];[.FI$5:.FI$404])" office:value-type="float" office:value="0" calcext:value-type="float">
            <text:p>0</text:p>
          </table:table-cell>
          <table:table-cell table:style-name="ce90" table:formula="of:=SUMIF([.$J11:.$J409];[.$J411];[.FJ$5:.FJ$404])" office:value-type="float" office:value="0" calcext:value-type="float">
            <text:p>0</text:p>
          </table:table-cell>
          <table:table-cell table:style-name="ce90" table:formula="of:=SUMIF([.$J11:.$J409];[.$J411];[.FK$5:.FK$404])" office:value-type="float" office:value="0" calcext:value-type="float">
            <text:p>0</text:p>
          </table:table-cell>
          <table:table-cell table:style-name="ce90" table:formula="of:=SUMIF([.$J11:.$J409];[.$J411];[.FL$5:.FL$404])" office:value-type="float" office:value="0" calcext:value-type="float">
            <text:p>0</text:p>
          </table:table-cell>
          <table:table-cell table:style-name="ce90" table:formula="of:=SUMIF([.$J11:.$J409];[.$J411];[.FM$5:.FM$404])" office:value-type="float" office:value="0" calcext:value-type="float">
            <text:p>0</text:p>
          </table:table-cell>
          <table:table-cell table:number-columns-repeated="16215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16215"/>
        </table:table-row>
        <table:table-row table:style-name="ro3" table:number-rows-repeated="1047271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406:WBS.FM411">
            <calcext:condition calcext:apply-style-name="ConditionalStyle_3" calcext:value="&gt;8" calcext:base-cell-address="WBS.V406"/>
            <calcext:condition calcext:apply-style-name="ConditionalStyle_2" calcext:value="formula-is(AND([.V406]&lt;&gt;0;[.V406]&lt;8))" calcext:base-cell-address="WBS.V406"/>
          </calcext:conditional-format>
          <calcext:conditional-format calcext:target-range-address="WBS.V27:WBS.W27 WBS.X27:WBS.FM91 WBS.V30:WBS.W91 WBS.V93:WBS.FM115 WBS.V167:WBS.FM404 WBS.V119:WBS.FM122 WBS.V5:WBS.FM7 WBS.V10:WBS.FM26 WBS.V124:WBS.FM135 WBS.V138:WBS.FM165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1:WBS.Q21 WBS.Q13:WBS.Q14 WBS.Q25:WBS.Q26 WBS.Q42:WBS.Q43 WBS.Q72:WBS.Q73 WBS.Q112:WBS.Q113 WBS.Q179:WBS.Q180 WBS.Q83:WBS.Q83 WBS.Q139:WBS.Q140 WBS.Q102:WBS.Q106 WBS.Q147:WBS.Q152 WBS.Q167:WBS.Q167 WBS.Q61:WBS.Q67 WBS.Q59:WBS.Q59 WBS.Q50:WBS.Q53 WBS.Q91:WBS.Q94 WBS.Q127:WBS.Q133 WBS.Q227:WBS.Q227 WBS.Q183:WBS.Q195 WBS.Q197:WBS.Q213 WBS.Q245:WBS.Q248 WBS.Q262:WBS.Q262 WBS.Q405:WBS.Q411 WBS.Q275:WBS.Q276 WBS.Q267:WBS.Q267 WBS.Q282:WBS.Q297 WBS.Q300:WBS.Q316 WBS.Q319:WBS.Q352 WBS.Q360:WBS.Q360 WBS.Q370:WBS.Q370 WBS.Q377:WBS.Q377 WBS.Q379:WBS.Q391 WBS.Q10:WBS.Q10 WBS.Q5:WBS.Q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2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3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2:WBS.FM92">
            <calcext:condition calcext:apply-style-name="ConditionalStyle_6" calcext:value="formula-is(AND([.$D92]=&quot;○&quot;;[.$L92]&lt;=[.V$1];[.V$1]&lt;=[.$M92]))" calcext:base-cell-address="WBS.V92"/>
            <calcext:condition calcext:apply-style-name="ConditionalStyle_5" calcext:value="formula-is(AND([.$D92]&lt;&gt;&quot;○&quot;;[.$L92]&lt;=[.V$1];[.V$1]&lt;=[.$M92]))" calcext:base-cell-address="WBS.V92"/>
          </calcext:conditional-format>
          <calcext:conditional-format calcext:target-range-address="WBS.Q28:WBS.Q3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2:WBS.Q82 WBS.Q75:WBS.Q7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V116:WBS.FM116">
            <calcext:condition calcext:apply-style-name="ConditionalStyle_6" calcext:value="formula-is(AND([.$D116]=&quot;○&quot;;[.$L116]&lt;=[.V$1];[.V$1]&lt;=[.$M116]))" calcext:base-cell-address="WBS.V116"/>
            <calcext:condition calcext:apply-style-name="ConditionalStyle_5" calcext:value="formula-is(AND([.$D116]&lt;&gt;&quot;○&quot;;[.$L116]&lt;=[.V$1];[.V$1]&lt;=[.$M116]))" calcext:base-cell-address="WBS.V116"/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V123:WBS.FM123">
            <calcext:condition calcext:apply-style-name="ConditionalStyle_6" calcext:value="formula-is(AND([.$D123]=&quot;○&quot;;[.$L123]&lt;=[.V$1];[.V$1]&lt;=[.$M123]))" calcext:base-cell-address="WBS.V123"/>
            <calcext:condition calcext:apply-style-name="ConditionalStyle_5" calcext:value="formula-is(AND([.$D123]&lt;&gt;&quot;○&quot;;[.$L123]&lt;=[.V$1];[.V$1]&lt;=[.$M123]))" calcext:base-cell-address="WBS.V123"/>
          </calcext:conditional-format>
          <calcext:conditional-format calcext:target-range-address="WBS.Q114:WBS.Q12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43:WBS.Q243 WBS.Q229:WBS.Q23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3:WBS.Q3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8:WBS.Q4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1:WBS.Q4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4:WBS.Q4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54:WBS.Q5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0:WBS.Q6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8:WBS.Q7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4:WBS.Q7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9:WBS.Q8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4:WBS.Q8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0:WBS.Q9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5:WBS.Q10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7:WBS.Q11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4:WBS.Q13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8:WBS.Q13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1:WBS.Q14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3:WBS.Q16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8:WBS.Q17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81:WBS.Q18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96:WBS.Q19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4:WBS.Q22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8:WBS.Q22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36:WBS.Q24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44:WBS.Q24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49:WBS.Q2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63:WBS.Q26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68:WBS.Q27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77:WBS.Q27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79:WBS.Q2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8:WBS.FM9">
            <calcext:condition calcext:apply-style-name="ConditionalStyle_6" calcext:value="formula-is(AND([.$D8]=&quot;○&quot;;[.$L8]&lt;=[.V$1];[.V$1]&lt;=[.$M8]))" calcext:base-cell-address="WBS.V8"/>
            <calcext:condition calcext:apply-style-name="ConditionalStyle_5" calcext:value="formula-is(AND([.$D8]&lt;&gt;&quot;○&quot;;[.$L8]&lt;=[.V$1];[.V$1]&lt;=[.$M8]))" calcext:base-cell-address="WBS.V8"/>
          </calcext:conditional-format>
          <calcext:conditional-format calcext:target-range-address="WBS.Q8:WBS.Q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36:WBS.FM136">
            <calcext:condition calcext:apply-style-name="ConditionalStyle_6" calcext:value="formula-is(AND([.$D136]=&quot;○&quot;;[.$L136]&lt;=[.V$1];[.V$1]&lt;=[.$M136]))" calcext:base-cell-address="WBS.V136"/>
            <calcext:condition calcext:apply-style-name="ConditionalStyle_5" calcext:value="formula-is(AND([.$D136]&lt;&gt;&quot;○&quot;;[.$L136]&lt;=[.V$1];[.V$1]&lt;=[.$M136]))" calcext:base-cell-address="WBS.V136"/>
          </calcext:conditional-format>
          <calcext:conditional-format calcext:target-range-address="WBS.Q136:WBS.Q1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37:WBS.FM137">
            <calcext:condition calcext:apply-style-name="ConditionalStyle_6" calcext:value="formula-is(AND([.$D137]=&quot;○&quot;;[.$L137]&lt;=[.V$1];[.V$1]&lt;=[.$M137]))" calcext:base-cell-address="WBS.V137"/>
            <calcext:condition calcext:apply-style-name="ConditionalStyle_5" calcext:value="formula-is(AND([.$D137]&lt;&gt;&quot;○&quot;;[.$L137]&lt;=[.V$1];[.V$1]&lt;=[.$M137]))" calcext:base-cell-address="WBS.V137"/>
          </calcext:conditional-format>
          <calcext:conditional-format calcext:target-range-address="WBS.Q137:WBS.Q13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66:WBS.FM166">
            <calcext:condition calcext:apply-style-name="ConditionalStyle_6" calcext:value="formula-is(AND([.$D166]=&quot;○&quot;;[.$L166]&lt;=[.V$1];[.V$1]&lt;=[.$M166]))" calcext:base-cell-address="WBS.V166"/>
            <calcext:condition calcext:apply-style-name="ConditionalStyle_5" calcext:value="formula-is(AND([.$D166]&lt;&gt;&quot;○&quot;;[.$L166]&lt;=[.V$1];[.V$1]&lt;=[.$M166]))" calcext:base-cell-address="WBS.V166"/>
          </calcext:conditional-format>
          <calcext:conditional-format calcext:target-range-address="WBS.Q166:WBS.Q16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default-cell-style-name="ce424"/>
        <table:table-column table:style-name="co16" table:number-columns-repeated="21"/>
        <table:table-column table:style-name="co15" table:number-columns-repeated="16358"/>
        <table:table-row table:style-name="ro1">
          <table:table-cell table:style-name="ce420" office:value-type="string" calcext:value-type="string">
            <text:p><text:span text:style-name="T25">2020/7/7</text:span><text:span text:style-name="T26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421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421" office:value-type="string" calcext:value-type="string">
            <text:p>日付</text:p>
          </table:table-cell>
          <table:table-cell table:style-name="ce421" office:value-type="string" calcext:value-type="string">
            <text:p>曜日</text:p>
          </table:table-cell>
          <table:table-cell table:style-name="ce421" office:value-type="string" calcext:value-type="string">
            <text:p>名前</text:p>
          </table:table-cell>
          <table:table-cell table:style-name="ce427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1-01" calcext:value-type="date">
            <text:p>2023/01/01</text:p>
          </table:table-cell>
          <table:table-cell table:style-name="ce423" table:formula="of:=WEEKDAY([.B4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1-07" calcext:value-type="date">
            <text:p>2023/01/07</text:p>
          </table:table-cell>
          <table:table-cell table:style-name="ce423" table:formula="of:=WEEKDAY([.B5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2-11" calcext:value-type="date">
            <text:p>2023/02/11</text:p>
          </table:table-cell>
          <table:table-cell table:style-name="ce423" table:formula="of:=WEEKDAY([.B6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2-23" calcext:value-type="date">
            <text:p>2023/02/23</text:p>
          </table:table-cell>
          <table:table-cell table:style-name="ce423" table:formula="of:=WEEKDAY([.B7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3-21" calcext:value-type="date">
            <text:p>2023/03/21</text:p>
          </table:table-cell>
          <table:table-cell table:style-name="ce423" table:formula="of:=WEEKDAY([.B8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4-29" calcext:value-type="date">
            <text:p>2023/04/29</text:p>
          </table:table-cell>
          <table:table-cell table:style-name="ce423" table:formula="of:=WEEKDAY([.B9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5-03" calcext:value-type="date">
            <text:p>2023/05/03</text:p>
          </table:table-cell>
          <table:table-cell table:style-name="ce423" table:formula="of:=WEEKDAY([.B10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5-04" calcext:value-type="date">
            <text:p>2023/05/04</text:p>
          </table:table-cell>
          <table:table-cell table:style-name="ce423" table:formula="of:=WEEKDAY([.B11])" office:value-type="date" office:date-value="1900-01-04" calcext:value-type="date">
            <text:p>木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5-05" calcext:value-type="date">
            <text:p>2023/05/05</text:p>
          </table:table-cell>
          <table:table-cell table:style-name="ce423" table:formula="of:=WEEKDAY([.B12])" office:value-type="date" office:date-value="1900-01-05" calcext:value-type="date">
            <text:p>金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7-17" calcext:value-type="date">
            <text:p>2023/07/17</text:p>
          </table:table-cell>
          <table:table-cell table:style-name="ce423" table:formula="of:=WEEKDAY([.B1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8-11" calcext:value-type="date">
            <text:p>2023/08/11</text:p>
          </table:table-cell>
          <table:table-cell table:style-name="ce423" table:formula="of:=WEEKDAY([.B14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9-18" calcext:value-type="date">
            <text:p>2023/09/18</text:p>
          </table:table-cell>
          <table:table-cell table:style-name="ce423" table:formula="of:=WEEKDAY([.B1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9-23" calcext:value-type="date">
            <text:p>2023/09/23</text:p>
          </table:table-cell>
          <table:table-cell table:style-name="ce423" table:formula="of:=WEEKDAY([.B16])" office:value-type="date" office:date-value="1900-01-06" calcext:value-type="date">
            <text:p>土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9-23" calcext:value-type="date">
            <text:p>2023/09/23</text:p>
          </table:table-cell>
          <table:table-cell table:style-name="ce423" table:formula="of:=WEEKDAY([.B17])" office:value-type="date" office:date-value="1900-01-06" calcext:value-type="date">
            <text:p>土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0-11-03" calcext:value-type="date">
            <text:p>2020/11/03</text:p>
          </table:table-cell>
          <table:table-cell table:style-name="ce423" table:formula="of:=WEEKDAY([.B18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0-11-23" calcext:value-type="date">
            <text:p>2020/11/23</text:p>
          </table:table-cell>
          <table:table-cell table:style-name="ce423" table:formula="of:=WEEKDAY([.B1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1-01" calcext:value-type="date">
            <text:p>2021/01/01</text:p>
          </table:table-cell>
          <table:table-cell table:style-name="ce423" table:formula="of:=WEEKDAY([.B20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1-11" calcext:value-type="date">
            <text:p>2021/01/11</text:p>
          </table:table-cell>
          <table:table-cell table:style-name="ce423" table:formula="of:=WEEKDAY([.B2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2-11" calcext:value-type="date">
            <text:p>2021/02/11</text:p>
          </table:table-cell>
          <table:table-cell table:style-name="ce423" table:formula="of:=WEEKDAY([.B22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2-23" calcext:value-type="date">
            <text:p>2021/02/23</text:p>
          </table:table-cell>
          <table:table-cell table:style-name="ce423" table:formula="of:=WEEKDAY([.B23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3-20" calcext:value-type="date">
            <text:p>2021/03/20</text:p>
          </table:table-cell>
          <table:table-cell table:style-name="ce423" table:formula="of:=WEEKDAY([.B24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4-29" calcext:value-type="date">
            <text:p>2021/04/29</text:p>
          </table:table-cell>
          <table:table-cell table:style-name="ce423" table:formula="of:=WEEKDAY([.B25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5-03" calcext:value-type="date">
            <text:p>2021/05/03</text:p>
          </table:table-cell>
          <table:table-cell table:style-name="ce423" table:formula="of:=WEEKDAY([.B2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5-04" calcext:value-type="date">
            <text:p>2021/05/04</text:p>
          </table:table-cell>
          <table:table-cell table:style-name="ce423" table:formula="of:=WEEKDAY([.B27])" office:value-type="date" office:date-value="1900-01-02" calcext:value-type="date">
            <text:p>火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5-05" calcext:value-type="date">
            <text:p>2021/05/05</text:p>
          </table:table-cell>
          <table:table-cell table:style-name="ce423" table:formula="of:=WEEKDAY([.B28])" office:value-type="date" office:date-value="1900-01-03" calcext:value-type="date">
            <text:p>水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7-19" calcext:value-type="date">
            <text:p>2021/07/19</text:p>
          </table:table-cell>
          <table:table-cell table:style-name="ce423" table:formula="of:=WEEKDAY([.B2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8-11" calcext:value-type="date">
            <text:p>2021/08/11</text:p>
          </table:table-cell>
          <table:table-cell table:style-name="ce423" table:formula="of:=WEEKDAY([.B30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9-20" calcext:value-type="date">
            <text:p>2021/09/20</text:p>
          </table:table-cell>
          <table:table-cell table:style-name="ce423" table:formula="of:=WEEKDAY([.B3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9-23" calcext:value-type="date">
            <text:p>2021/09/23</text:p>
          </table:table-cell>
          <table:table-cell table:style-name="ce423" table:formula="of:=WEEKDAY([.B32])" office:value-type="date" office:date-value="1900-01-04" calcext:value-type="date">
            <text:p>木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10-11" calcext:value-type="date">
            <text:p>2021/10/11</text:p>
          </table:table-cell>
          <table:table-cell table:style-name="ce423" table:formula="of:=WEEKDAY([.B3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11-03" calcext:value-type="date">
            <text:p>2021/11/03</text:p>
          </table:table-cell>
          <table:table-cell table:style-name="ce423" table:formula="of:=WEEKDAY([.B34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11-23" calcext:value-type="date">
            <text:p>2021/11/23</text:p>
          </table:table-cell>
          <table:table-cell table:style-name="ce423" table:formula="of:=WEEKDAY([.B35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1-01" calcext:value-type="date">
            <text:p>2022/01/01</text:p>
          </table:table-cell>
          <table:table-cell table:style-name="ce423" table:formula="of:=WEEKDAY([.B36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1-10" calcext:value-type="date">
            <text:p>2022/01/10</text:p>
          </table:table-cell>
          <table:table-cell table:style-name="ce423" table:formula="of:=WEEKDAY([.B37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2-11" calcext:value-type="date">
            <text:p>2022/02/11</text:p>
          </table:table-cell>
          <table:table-cell table:style-name="ce423" table:formula="of:=WEEKDAY([.B38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2-23" calcext:value-type="date">
            <text:p>2022/02/23</text:p>
          </table:table-cell>
          <table:table-cell table:style-name="ce423" table:formula="of:=WEEKDAY([.B39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3-21" calcext:value-type="date">
            <text:p>2022/03/21</text:p>
          </table:table-cell>
          <table:table-cell table:style-name="ce423" table:formula="of:=WEEKDAY([.B4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4-29" calcext:value-type="date">
            <text:p>2022/04/29</text:p>
          </table:table-cell>
          <table:table-cell table:style-name="ce423" table:formula="of:=WEEKDAY([.B41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5-03" calcext:value-type="date">
            <text:p>2022/05/03</text:p>
          </table:table-cell>
          <table:table-cell table:style-name="ce423" table:formula="of:=WEEKDAY([.B42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5-04" calcext:value-type="date">
            <text:p>2022/05/04</text:p>
          </table:table-cell>
          <table:table-cell table:style-name="ce423" table:formula="of:=WEEKDAY([.B43])" office:value-type="date" office:date-value="1900-01-03" calcext:value-type="date">
            <text:p>水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5-05" calcext:value-type="date">
            <text:p>2022/05/05</text:p>
          </table:table-cell>
          <table:table-cell table:style-name="ce423" table:formula="of:=WEEKDAY([.B44])" office:value-type="date" office:date-value="1900-01-04" calcext:value-type="date">
            <text:p>木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7-18" calcext:value-type="date">
            <text:p>2022/07/18</text:p>
          </table:table-cell>
          <table:table-cell table:style-name="ce423" table:formula="of:=WEEKDAY([.B4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8-11" calcext:value-type="date">
            <text:p>2022/08/11</text:p>
          </table:table-cell>
          <table:table-cell table:style-name="ce423" table:formula="of:=WEEKDAY([.B46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9-19" calcext:value-type="date">
            <text:p>2022/09/19</text:p>
          </table:table-cell>
          <table:table-cell table:style-name="ce423" table:formula="of:=WEEKDAY([.B47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9-23" calcext:value-type="date">
            <text:p>2022/09/23</text:p>
          </table:table-cell>
          <table:table-cell table:style-name="ce423" table:formula="of:=WEEKDAY([.B48])" office:value-type="date" office:date-value="1900-01-05" calcext:value-type="date">
            <text:p>金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10-10" calcext:value-type="date">
            <text:p>2022/10/10</text:p>
          </table:table-cell>
          <table:table-cell table:style-name="ce423" table:formula="of:=WEEKDAY([.B4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11-03" calcext:value-type="date">
            <text:p>2022/11/03</text:p>
          </table:table-cell>
          <table:table-cell table:style-name="ce423" table:formula="of:=WEEKDAY([.B50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11-23" calcext:value-type="date">
            <text:p>2022/11/23</text:p>
          </table:table-cell>
          <table:table-cell table:style-name="ce423" table:formula="of:=WEEKDAY([.B51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1-01" calcext:value-type="date">
            <text:p>2023/01/01</text:p>
          </table:table-cell>
          <table:table-cell table:style-name="ce423" table:formula="of:=WEEKDAY([.B52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1-02" calcext:value-type="date">
            <text:p>2023/01/02</text:p>
          </table:table-cell>
          <table:table-cell table:style-name="ce423" table:formula="of:=WEEKDAY([.B5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1-09" calcext:value-type="date">
            <text:p>2023/01/09</text:p>
          </table:table-cell>
          <table:table-cell table:style-name="ce423" table:formula="of:=WEEKDAY([.B5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2-11" calcext:value-type="date">
            <text:p>2023/02/11</text:p>
          </table:table-cell>
          <table:table-cell table:style-name="ce423" table:formula="of:=WEEKDAY([.B55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2-23" calcext:value-type="date">
            <text:p>2023/02/23</text:p>
          </table:table-cell>
          <table:table-cell table:style-name="ce423" table:formula="of:=WEEKDAY([.B56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3-21" calcext:value-type="date">
            <text:p>2023/03/21</text:p>
          </table:table-cell>
          <table:table-cell table:style-name="ce423" table:formula="of:=WEEKDAY([.B57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4-29" calcext:value-type="date">
            <text:p>2023/04/29</text:p>
          </table:table-cell>
          <table:table-cell table:style-name="ce423" table:formula="of:=WEEKDAY([.B58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5-03" calcext:value-type="date">
            <text:p>2023/05/03</text:p>
          </table:table-cell>
          <table:table-cell table:style-name="ce423" table:formula="of:=WEEKDAY([.B59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5-04" calcext:value-type="date">
            <text:p>2023/05/04</text:p>
          </table:table-cell>
          <table:table-cell table:style-name="ce423" table:formula="of:=WEEKDAY([.B60])" office:value-type="date" office:date-value="1900-01-04" calcext:value-type="date">
            <text:p>木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5-05" calcext:value-type="date">
            <text:p>2023/05/05</text:p>
          </table:table-cell>
          <table:table-cell table:style-name="ce423" table:formula="of:=WEEKDAY([.B61])" office:value-type="date" office:date-value="1900-01-05" calcext:value-type="date">
            <text:p>金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7-17" calcext:value-type="date">
            <text:p>2023/07/17</text:p>
          </table:table-cell>
          <table:table-cell table:style-name="ce423" table:formula="of:=WEEKDAY([.B6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8-11" calcext:value-type="date">
            <text:p>2023/08/11</text:p>
          </table:table-cell>
          <table:table-cell table:style-name="ce423" table:formula="of:=WEEKDAY([.B63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9-18" calcext:value-type="date">
            <text:p>2023/09/18</text:p>
          </table:table-cell>
          <table:table-cell table:style-name="ce423" table:formula="of:=WEEKDAY([.B6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9-23" calcext:value-type="date">
            <text:p>2023/09/23</text:p>
          </table:table-cell>
          <table:table-cell table:style-name="ce423" table:formula="of:=WEEKDAY([.B65])" office:value-type="date" office:date-value="1900-01-06" calcext:value-type="date">
            <text:p>土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10-09" calcext:value-type="date">
            <text:p>2023/10/09</text:p>
          </table:table-cell>
          <table:table-cell table:style-name="ce423" table:formula="of:=WEEKDAY([.B6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11-03" calcext:value-type="date">
            <text:p>2023/11/03</text:p>
          </table:table-cell>
          <table:table-cell table:style-name="ce423" table:formula="of:=WEEKDAY([.B67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11-23" calcext:value-type="date">
            <text:p>2023/11/23</text:p>
          </table:table-cell>
          <table:table-cell table:style-name="ce423" table:formula="of:=WEEKDAY([.B68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1-01" calcext:value-type="date">
            <text:p>2024/01/01</text:p>
          </table:table-cell>
          <table:table-cell table:style-name="ce423" table:formula="of:=WEEKDAY([.B6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1-08" calcext:value-type="date">
            <text:p>2024/01/08</text:p>
          </table:table-cell>
          <table:table-cell table:style-name="ce423" table:formula="of:=WEEKDAY([.B7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2-11" calcext:value-type="date">
            <text:p>2024/02/11</text:p>
          </table:table-cell>
          <table:table-cell table:style-name="ce423" table:formula="of:=WEEKDAY([.B71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2-12" calcext:value-type="date">
            <text:p>2024/02/12</text:p>
          </table:table-cell>
          <table:table-cell table:style-name="ce423" table:formula="of:=WEEKDAY([.B7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2-23" calcext:value-type="date">
            <text:p>2024/02/23</text:p>
          </table:table-cell>
          <table:table-cell table:style-name="ce423" table:formula="of:=WEEKDAY([.B73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3-20" calcext:value-type="date">
            <text:p>2024/03/20</text:p>
          </table:table-cell>
          <table:table-cell table:style-name="ce423" table:formula="of:=WEEKDAY([.B74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4-29" calcext:value-type="date">
            <text:p>2024/04/29</text:p>
          </table:table-cell>
          <table:table-cell table:style-name="ce423" table:formula="of:=WEEKDAY([.B7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5-03" calcext:value-type="date">
            <text:p>2024/05/03</text:p>
          </table:table-cell>
          <table:table-cell table:style-name="ce423" table:formula="of:=WEEKDAY([.B76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5-04" calcext:value-type="date">
            <text:p>2024/05/04</text:p>
          </table:table-cell>
          <table:table-cell table:style-name="ce423" table:formula="of:=WEEKDAY([.B77])" office:value-type="date" office:date-value="1900-01-06" calcext:value-type="date">
            <text:p>土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5-05" calcext:value-type="date">
            <text:p>2024/05/05</text:p>
          </table:table-cell>
          <table:table-cell table:style-name="ce423" table:formula="of:=WEEKDAY([.B78])" office:value-type="date" office:date-value="1899-12-31" calcext:value-type="date">
            <text:p>日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5-06" calcext:value-type="date">
            <text:p>2024/05/06</text:p>
          </table:table-cell>
          <table:table-cell table:style-name="ce423" table:formula="of:=WEEKDAY([.B7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7-15" calcext:value-type="date">
            <text:p>2024/07/15</text:p>
          </table:table-cell>
          <table:table-cell table:style-name="ce423" table:formula="of:=WEEKDAY([.B8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8-11" calcext:value-type="date">
            <text:p>2024/08/11</text:p>
          </table:table-cell>
          <table:table-cell table:style-name="ce423" table:formula="of:=WEEKDAY([.B81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8-12" calcext:value-type="date">
            <text:p>2024/08/12</text:p>
          </table:table-cell>
          <table:table-cell table:style-name="ce423" table:formula="of:=WEEKDAY([.B8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9-16" calcext:value-type="date">
            <text:p>2024/09/16</text:p>
          </table:table-cell>
          <table:table-cell table:style-name="ce423" table:formula="of:=WEEKDAY([.B8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9-22" calcext:value-type="date">
            <text:p>2024/09/22</text:p>
          </table:table-cell>
          <table:table-cell table:style-name="ce423" table:formula="of:=WEEKDAY([.B84])" office:value-type="date" office:date-value="1899-12-31" calcext:value-type="date">
            <text:p>日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9-23" calcext:value-type="date">
            <text:p>2024/09/23</text:p>
          </table:table-cell>
          <table:table-cell table:style-name="ce423" table:formula="of:=WEEKDAY([.B8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10-14" calcext:value-type="date">
            <text:p>2024/10/14</text:p>
          </table:table-cell>
          <table:table-cell table:style-name="ce423" table:formula="of:=WEEKDAY([.B8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11-03" calcext:value-type="date">
            <text:p>2024/11/03</text:p>
          </table:table-cell>
          <table:table-cell table:style-name="ce423" table:formula="of:=WEEKDAY([.B87])" office:value-type="date" office:date-value="1899-12-31" calcext:value-type="date">
            <text:p>日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11-04" calcext:value-type="date">
            <text:p>2024/11/04</text:p>
          </table:table-cell>
          <table:table-cell table:style-name="ce423" table:formula="of:=WEEKDAY([.B8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11-23" calcext:value-type="date">
            <text:p>2024/11/23</text:p>
          </table:table-cell>
          <table:table-cell table:style-name="ce423" table:formula="of:=WEEKDAY([.B89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1-01" calcext:value-type="date">
            <text:p>2025/01/01</text:p>
          </table:table-cell>
          <table:table-cell table:style-name="ce423" table:formula="of:=WEEKDAY([.B90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1-13" calcext:value-type="date">
            <text:p>2025/01/13</text:p>
          </table:table-cell>
          <table:table-cell table:style-name="ce423" table:formula="of:=WEEKDAY([.B9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2-11" calcext:value-type="date">
            <text:p>2025/02/11</text:p>
          </table:table-cell>
          <table:table-cell table:style-name="ce423" table:formula="of:=WEEKDAY([.B92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2-23" calcext:value-type="date">
            <text:p>2025/02/23</text:p>
          </table:table-cell>
          <table:table-cell table:style-name="ce423" table:formula="of:=WEEKDAY([.B93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2-24" calcext:value-type="date">
            <text:p>2025/02/24</text:p>
          </table:table-cell>
          <table:table-cell table:style-name="ce423" table:formula="of:=WEEKDAY([.B9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3-20" calcext:value-type="date">
            <text:p>2025/03/20</text:p>
          </table:table-cell>
          <table:table-cell table:style-name="ce423" table:formula="of:=WEEKDAY([.B95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4-29" calcext:value-type="date">
            <text:p>2025/04/29</text:p>
          </table:table-cell>
          <table:table-cell table:style-name="ce423" table:formula="of:=WEEKDAY([.B96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5-03" calcext:value-type="date">
            <text:p>2025/05/03</text:p>
          </table:table-cell>
          <table:table-cell table:style-name="ce423" table:formula="of:=WEEKDAY([.B97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5-04" calcext:value-type="date">
            <text:p>2025/05/04</text:p>
          </table:table-cell>
          <table:table-cell table:style-name="ce423" table:formula="of:=WEEKDAY([.B98])" office:value-type="date" office:date-value="1899-12-31" calcext:value-type="date">
            <text:p>日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5-05" calcext:value-type="date">
            <text:p>2025/05/05</text:p>
          </table:table-cell>
          <table:table-cell table:style-name="ce423" table:formula="of:=WEEKDAY([.B9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5-06" calcext:value-type="date">
            <text:p>2025/05/06</text:p>
          </table:table-cell>
          <table:table-cell table:style-name="ce423" table:formula="of:=WEEKDAY([.B100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7-21" calcext:value-type="date">
            <text:p>2025/07/21</text:p>
          </table:table-cell>
          <table:table-cell table:style-name="ce423" table:formula="of:=WEEKDAY([.B10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8-11" calcext:value-type="date">
            <text:p>2025/08/11</text:p>
          </table:table-cell>
          <table:table-cell table:style-name="ce423" table:formula="of:=WEEKDAY([.B10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9-15" calcext:value-type="date">
            <text:p>2025/09/15</text:p>
          </table:table-cell>
          <table:table-cell table:style-name="ce423" table:formula="of:=WEEKDAY([.B10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9-23" calcext:value-type="date">
            <text:p>2025/09/23</text:p>
          </table:table-cell>
          <table:table-cell table:style-name="ce423" table:formula="of:=WEEKDAY([.B104])" office:value-type="date" office:date-value="1900-01-02" calcext:value-type="date">
            <text:p>火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10-13" calcext:value-type="date">
            <text:p>2025/10/13</text:p>
          </table:table-cell>
          <table:table-cell table:style-name="ce423" table:formula="of:=WEEKDAY([.B10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11-03" calcext:value-type="date">
            <text:p>2025/11/03</text:p>
          </table:table-cell>
          <table:table-cell table:style-name="ce423" table:formula="of:=WEEKDAY([.B10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11-23" calcext:value-type="date">
            <text:p>2025/11/23</text:p>
          </table:table-cell>
          <table:table-cell table:style-name="ce423" table:formula="of:=WEEKDAY([.B107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11-24" calcext:value-type="date">
            <text:p>2025/11/24</text:p>
          </table:table-cell>
          <table:table-cell table:style-name="ce423" table:formula="of:=WEEKDAY([.B10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1-01" calcext:value-type="date">
            <text:p>2026/01/01</text:p>
          </table:table-cell>
          <table:table-cell table:style-name="ce423" table:formula="of:=WEEKDAY([.B109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1-12" calcext:value-type="date">
            <text:p>2026/01/12</text:p>
          </table:table-cell>
          <table:table-cell table:style-name="ce423" table:formula="of:=WEEKDAY([.B11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2-11" calcext:value-type="date">
            <text:p>2026/02/11</text:p>
          </table:table-cell>
          <table:table-cell table:style-name="ce423" table:formula="of:=WEEKDAY([.B111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2-23" calcext:value-type="date">
            <text:p>2026/02/23</text:p>
          </table:table-cell>
          <table:table-cell table:style-name="ce423" table:formula="of:=WEEKDAY([.B11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3-20" calcext:value-type="date">
            <text:p>2026/03/20</text:p>
          </table:table-cell>
          <table:table-cell table:style-name="ce423" table:formula="of:=WEEKDAY([.B113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4-29" calcext:value-type="date">
            <text:p>2026/04/29</text:p>
          </table:table-cell>
          <table:table-cell table:style-name="ce423" table:formula="of:=WEEKDAY([.B114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5-03" calcext:value-type="date">
            <text:p>2026/05/03</text:p>
          </table:table-cell>
          <table:table-cell table:style-name="ce423" table:formula="of:=WEEKDAY([.B115])" office:value-type="date" office:date-value="1899-12-31" calcext:value-type="date">
            <text:p>日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5-04" calcext:value-type="date">
            <text:p>2026/05/04</text:p>
          </table:table-cell>
          <table:table-cell table:style-name="ce423" table:formula="of:=WEEKDAY([.B11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5-05" calcext:value-type="date">
            <text:p>2026/05/05</text:p>
          </table:table-cell>
          <table:table-cell table:style-name="ce423" table:formula="of:=WEEKDAY([.B117])" office:value-type="date" office:date-value="1900-01-02" calcext:value-type="date">
            <text:p>火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5-06" calcext:value-type="date">
            <text:p>2026/05/06</text:p>
          </table:table-cell>
          <table:table-cell table:style-name="ce423" table:formula="of:=WEEKDAY([.B118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7-20" calcext:value-type="date">
            <text:p>2026/07/20</text:p>
          </table:table-cell>
          <table:table-cell table:style-name="ce423" table:formula="of:=WEEKDAY([.B11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8-11" calcext:value-type="date">
            <text:p>2026/08/11</text:p>
          </table:table-cell>
          <table:table-cell table:style-name="ce423" table:formula="of:=WEEKDAY([.B120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9-21" calcext:value-type="date">
            <text:p>2026/09/21</text:p>
          </table:table-cell>
          <table:table-cell table:style-name="ce423" table:formula="of:=WEEKDAY([.B12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9-22" calcext:value-type="date">
            <text:p>2026/09/22</text:p>
          </table:table-cell>
          <table:table-cell table:style-name="ce423" table:formula="of:=WEEKDAY([.B122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9-23" calcext:value-type="date">
            <text:p>2026/09/23</text:p>
          </table:table-cell>
          <table:table-cell table:style-name="ce423" table:formula="of:=WEEKDAY([.B123])" office:value-type="date" office:date-value="1900-01-03" calcext:value-type="date">
            <text:p>水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10-12" calcext:value-type="date">
            <text:p>2026/10/12</text:p>
          </table:table-cell>
          <table:table-cell table:style-name="ce423" table:formula="of:=WEEKDAY([.B12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11-03" calcext:value-type="date">
            <text:p>2026/11/03</text:p>
          </table:table-cell>
          <table:table-cell table:style-name="ce423" table:formula="of:=WEEKDAY([.B125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11-23" calcext:value-type="date">
            <text:p>2026/11/23</text:p>
          </table:table-cell>
          <table:table-cell table:style-name="ce423" table:formula="of:=WEEKDAY([.B12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1-01" calcext:value-type="date">
            <text:p>2027/01/01</text:p>
          </table:table-cell>
          <table:table-cell table:style-name="ce423" table:formula="of:=WEEKDAY([.B127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1-11" calcext:value-type="date">
            <text:p>2027/01/11</text:p>
          </table:table-cell>
          <table:table-cell table:style-name="ce423" table:formula="of:=WEEKDAY([.B12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2-11" calcext:value-type="date">
            <text:p>2027/02/11</text:p>
          </table:table-cell>
          <table:table-cell table:style-name="ce423" table:formula="of:=WEEKDAY([.B129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2-23" calcext:value-type="date">
            <text:p>2027/02/23</text:p>
          </table:table-cell>
          <table:table-cell table:style-name="ce423" table:formula="of:=WEEKDAY([.B130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3-21" calcext:value-type="date">
            <text:p>2027/03/21</text:p>
          </table:table-cell>
          <table:table-cell table:style-name="ce423" table:formula="of:=WEEKDAY([.B131])" office:value-type="date" office:date-value="1899-12-31" calcext:value-type="date">
            <text:p>日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3-22" calcext:value-type="date">
            <text:p>2027/03/22</text:p>
          </table:table-cell>
          <table:table-cell table:style-name="ce423" table:formula="of:=WEEKDAY([.B13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4-29" calcext:value-type="date">
            <text:p>2027/04/29</text:p>
          </table:table-cell>
          <table:table-cell table:style-name="ce423" table:formula="of:=WEEKDAY([.B133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5-03" calcext:value-type="date">
            <text:p>2027/05/03</text:p>
          </table:table-cell>
          <table:table-cell table:style-name="ce423" table:formula="of:=WEEKDAY([.B13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5-04" calcext:value-type="date">
            <text:p>2027/05/04</text:p>
          </table:table-cell>
          <table:table-cell table:style-name="ce423" table:formula="of:=WEEKDAY([.B135])" office:value-type="date" office:date-value="1900-01-02" calcext:value-type="date">
            <text:p>火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5-05" calcext:value-type="date">
            <text:p>2027/05/05</text:p>
          </table:table-cell>
          <table:table-cell table:style-name="ce423" table:formula="of:=WEEKDAY([.B136])" office:value-type="date" office:date-value="1900-01-03" calcext:value-type="date">
            <text:p>水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7-19" calcext:value-type="date">
            <text:p>2027/07/19</text:p>
          </table:table-cell>
          <table:table-cell table:style-name="ce423" table:formula="of:=WEEKDAY([.B137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8-11" calcext:value-type="date">
            <text:p>2027/08/11</text:p>
          </table:table-cell>
          <table:table-cell table:style-name="ce423" table:formula="of:=WEEKDAY([.B138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9-20" calcext:value-type="date">
            <text:p>2027/09/20</text:p>
          </table:table-cell>
          <table:table-cell table:style-name="ce423" table:formula="of:=WEEKDAY([.B13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9-23" calcext:value-type="date">
            <text:p>2027/09/23</text:p>
          </table:table-cell>
          <table:table-cell table:style-name="ce423" table:formula="of:=WEEKDAY([.B140])" office:value-type="date" office:date-value="1900-01-04" calcext:value-type="date">
            <text:p>木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10-11" calcext:value-type="date">
            <text:p>2027/10/11</text:p>
          </table:table-cell>
          <table:table-cell table:style-name="ce423" table:formula="of:=WEEKDAY([.B14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11-03" calcext:value-type="date">
            <text:p>2027/11/03</text:p>
          </table:table-cell>
          <table:table-cell table:style-name="ce423" table:formula="of:=WEEKDAY([.B142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11-23" calcext:value-type="date">
            <text:p>2027/11/23</text:p>
          </table:table-cell>
          <table:table-cell table:style-name="ce423" table:formula="of:=WEEKDAY([.B143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1-01" calcext:value-type="date">
            <text:p>2028/01/01</text:p>
          </table:table-cell>
          <table:table-cell table:style-name="ce423" table:formula="of:=WEEKDAY([.B144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1-10" calcext:value-type="date">
            <text:p>2028/01/10</text:p>
          </table:table-cell>
          <table:table-cell table:style-name="ce423" table:formula="of:=WEEKDAY([.B14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2-11" calcext:value-type="date">
            <text:p>2028/02/11</text:p>
          </table:table-cell>
          <table:table-cell table:style-name="ce423" table:formula="of:=WEEKDAY([.B146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2-23" calcext:value-type="date">
            <text:p>2028/02/23</text:p>
          </table:table-cell>
          <table:table-cell table:style-name="ce423" table:formula="of:=WEEKDAY([.B147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3-20" calcext:value-type="date">
            <text:p>2028/03/20</text:p>
          </table:table-cell>
          <table:table-cell table:style-name="ce423" table:formula="of:=WEEKDAY([.B14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4-29" calcext:value-type="date">
            <text:p>2028/04/29</text:p>
          </table:table-cell>
          <table:table-cell table:style-name="ce423" table:formula="of:=WEEKDAY([.B149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5-03" calcext:value-type="date">
            <text:p>2028/05/03</text:p>
          </table:table-cell>
          <table:table-cell table:style-name="ce423" table:formula="of:=WEEKDAY([.B150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5-04" calcext:value-type="date">
            <text:p>2028/05/04</text:p>
          </table:table-cell>
          <table:table-cell table:style-name="ce423" table:formula="of:=WEEKDAY([.B151])" office:value-type="date" office:date-value="1900-01-04" calcext:value-type="date">
            <text:p>木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5-05" calcext:value-type="date">
            <text:p>2028/05/05</text:p>
          </table:table-cell>
          <table:table-cell table:style-name="ce423" table:formula="of:=WEEKDAY([.B152])" office:value-type="date" office:date-value="1900-01-05" calcext:value-type="date">
            <text:p>金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7-17" calcext:value-type="date">
            <text:p>2028/07/17</text:p>
          </table:table-cell>
          <table:table-cell table:style-name="ce423" table:formula="of:=WEEKDAY([.B15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8-11" calcext:value-type="date">
            <text:p>2028/08/11</text:p>
          </table:table-cell>
          <table:table-cell table:style-name="ce423" table:formula="of:=WEEKDAY([.B154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9-18" calcext:value-type="date">
            <text:p>2028/09/18</text:p>
          </table:table-cell>
          <table:table-cell table:style-name="ce423" table:formula="of:=WEEKDAY([.B15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9-22" calcext:value-type="date">
            <text:p>2028/09/22</text:p>
          </table:table-cell>
          <table:table-cell table:style-name="ce423" table:formula="of:=WEEKDAY([.B156])" office:value-type="date" office:date-value="1900-01-05" calcext:value-type="date">
            <text:p>金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10-09" calcext:value-type="date">
            <text:p>2028/10/09</text:p>
          </table:table-cell>
          <table:table-cell table:style-name="ce423" table:formula="of:=WEEKDAY([.B157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11-03" calcext:value-type="date">
            <text:p>2028/11/03</text:p>
          </table:table-cell>
          <table:table-cell table:style-name="ce423" table:formula="of:=WEEKDAY([.B158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11-23" calcext:value-type="date">
            <text:p>2028/11/23</text:p>
          </table:table-cell>
          <table:table-cell table:style-name="ce423" table:formula="of:=WEEKDAY([.B159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1-01" calcext:value-type="date">
            <text:p>2029/01/01</text:p>
          </table:table-cell>
          <table:table-cell table:style-name="ce423" table:formula="of:=WEEKDAY([.B16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1-08" calcext:value-type="date">
            <text:p>2029/01/08</text:p>
          </table:table-cell>
          <table:table-cell table:style-name="ce423" table:formula="of:=WEEKDAY([.B16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2-11" calcext:value-type="date">
            <text:p>2029/02/11</text:p>
          </table:table-cell>
          <table:table-cell table:style-name="ce423" table:formula="of:=WEEKDAY([.B162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2-12" calcext:value-type="date">
            <text:p>2029/02/12</text:p>
          </table:table-cell>
          <table:table-cell table:style-name="ce423" table:formula="of:=WEEKDAY([.B16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2-23" calcext:value-type="date">
            <text:p>2029/02/23</text:p>
          </table:table-cell>
          <table:table-cell table:style-name="ce423" table:formula="of:=WEEKDAY([.B164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3-20" calcext:value-type="date">
            <text:p>2029/03/20</text:p>
          </table:table-cell>
          <table:table-cell table:style-name="ce423" table:formula="of:=WEEKDAY([.B165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4-29" calcext:value-type="date">
            <text:p>2029/04/29</text:p>
          </table:table-cell>
          <table:table-cell table:style-name="ce423" table:formula="of:=WEEKDAY([.B166])" office:value-type="date" office:date-value="1899-12-31" calcext:value-type="date">
            <text:p>日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4-30" calcext:value-type="date">
            <text:p>2029/04/30</text:p>
          </table:table-cell>
          <table:table-cell table:style-name="ce423" table:formula="of:=WEEKDAY([.B167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5-03" calcext:value-type="date">
            <text:p>2029/05/03</text:p>
          </table:table-cell>
          <table:table-cell table:style-name="ce423" table:formula="of:=WEEKDAY([.B168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5-04" calcext:value-type="date">
            <text:p>2029/05/04</text:p>
          </table:table-cell>
          <table:table-cell table:style-name="ce423" table:formula="of:=WEEKDAY([.B169])" office:value-type="date" office:date-value="1900-01-05" calcext:value-type="date">
            <text:p>金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5-05" calcext:value-type="date">
            <text:p>2029/05/05</text:p>
          </table:table-cell>
          <table:table-cell table:style-name="ce423" table:formula="of:=WEEKDAY([.B170])" office:value-type="date" office:date-value="1900-01-06" calcext:value-type="date">
            <text:p>土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7-16" calcext:value-type="date">
            <text:p>2029/07/16</text:p>
          </table:table-cell>
          <table:table-cell table:style-name="ce423" table:formula="of:=WEEKDAY([.B17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8-11" calcext:value-type="date">
            <text:p>2029/08/11</text:p>
          </table:table-cell>
          <table:table-cell table:style-name="ce423" table:formula="of:=WEEKDAY([.B172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9-17" calcext:value-type="date">
            <text:p>2029/09/17</text:p>
          </table:table-cell>
          <table:table-cell table:style-name="ce423" table:formula="of:=WEEKDAY([.B17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9-23" calcext:value-type="date">
            <text:p>2029/09/23</text:p>
          </table:table-cell>
          <table:table-cell table:style-name="ce423" table:formula="of:=WEEKDAY([.B174])" office:value-type="date" office:date-value="1899-12-31" calcext:value-type="date">
            <text:p>日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9-24" calcext:value-type="date">
            <text:p>2029/09/24</text:p>
          </table:table-cell>
          <table:table-cell table:style-name="ce423" table:formula="of:=WEEKDAY([.B17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10-08" calcext:value-type="date">
            <text:p>2029/10/08</text:p>
          </table:table-cell>
          <table:table-cell table:style-name="ce423" table:formula="of:=WEEKDAY([.B17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11-03" calcext:value-type="date">
            <text:p>2029/11/03</text:p>
          </table:table-cell>
          <table:table-cell table:style-name="ce423" table:formula="of:=WEEKDAY([.B177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11-23" calcext:value-type="date">
            <text:p>2029/11/23</text:p>
          </table:table-cell>
          <table:table-cell table:style-name="ce423" table:formula="of:=WEEKDAY([.B178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1-01" calcext:value-type="date">
            <text:p>2030/01/01</text:p>
          </table:table-cell>
          <table:table-cell table:style-name="ce423" table:formula="of:=WEEKDAY([.B179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1-14" calcext:value-type="date">
            <text:p>2030/01/14</text:p>
          </table:table-cell>
          <table:table-cell table:style-name="ce423" table:formula="of:=WEEKDAY([.B18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2-11" calcext:value-type="date">
            <text:p>2030/02/11</text:p>
          </table:table-cell>
          <table:table-cell table:style-name="ce423" table:formula="of:=WEEKDAY([.B18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2-23" calcext:value-type="date">
            <text:p>2030/02/23</text:p>
          </table:table-cell>
          <table:table-cell table:style-name="ce423" table:formula="of:=WEEKDAY([.B182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3-20" calcext:value-type="date">
            <text:p>2030/03/20</text:p>
          </table:table-cell>
          <table:table-cell table:style-name="ce423" table:formula="of:=WEEKDAY([.B183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4-29" calcext:value-type="date">
            <text:p>2030/04/29</text:p>
          </table:table-cell>
          <table:table-cell table:style-name="ce423" table:formula="of:=WEEKDAY([.B18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5-03" calcext:value-type="date">
            <text:p>2030/05/03</text:p>
          </table:table-cell>
          <table:table-cell table:style-name="ce423" table:formula="of:=WEEKDAY([.B185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5-04" calcext:value-type="date">
            <text:p>2030/05/04</text:p>
          </table:table-cell>
          <table:table-cell table:style-name="ce423" table:formula="of:=WEEKDAY([.B186])" office:value-type="date" office:date-value="1900-01-06" calcext:value-type="date">
            <text:p>土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5-05" calcext:value-type="date">
            <text:p>2030/05/05</text:p>
          </table:table-cell>
          <table:table-cell table:style-name="ce423" table:formula="of:=WEEKDAY([.B187])" office:value-type="date" office:date-value="1899-12-31" calcext:value-type="date">
            <text:p>日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5-06" calcext:value-type="date">
            <text:p>2030/05/06</text:p>
          </table:table-cell>
          <table:table-cell table:style-name="ce423" table:formula="of:=WEEKDAY([.B18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7-15" calcext:value-type="date">
            <text:p>2030/07/15</text:p>
          </table:table-cell>
          <table:table-cell table:style-name="ce423" table:formula="of:=WEEKDAY([.B18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8-11" calcext:value-type="date">
            <text:p>2030/08/11</text:p>
          </table:table-cell>
          <table:table-cell table:style-name="ce423" table:formula="of:=WEEKDAY([.B190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8-12" calcext:value-type="date">
            <text:p>2030/08/12</text:p>
          </table:table-cell>
          <table:table-cell table:style-name="ce423" table:formula="of:=WEEKDAY([.B19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9-16" calcext:value-type="date">
            <text:p>2030/09/16</text:p>
          </table:table-cell>
          <table:table-cell table:style-name="ce423" table:formula="of:=WEEKDAY([.B19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9-23" calcext:value-type="date">
            <text:p>2030/09/23</text:p>
          </table:table-cell>
          <table:table-cell table:style-name="ce423" table:formula="of:=WEEKDAY([.B19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10-14" calcext:value-type="date">
            <text:p>2030/10/14</text:p>
          </table:table-cell>
          <table:table-cell table:style-name="ce423" table:formula="of:=WEEKDAY([.B19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11-03" calcext:value-type="date">
            <text:p>2030/11/03</text:p>
          </table:table-cell>
          <table:table-cell table:style-name="ce423" table:formula="of:=WEEKDAY([.B195])" office:value-type="date" office:date-value="1899-12-31" calcext:value-type="date">
            <text:p>日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11-04" calcext:value-type="date">
            <text:p>2030/11/04</text:p>
          </table:table-cell>
          <table:table-cell table:style-name="ce423" table:formula="of:=WEEKDAY([.B19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11-23" calcext:value-type="date">
            <text:p>2030/11/23</text:p>
          </table:table-cell>
          <table:table-cell table:style-name="ce423" table:formula="of:=WEEKDAY([.B197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1-01" calcext:value-type="date">
            <text:p>2031/01/01</text:p>
          </table:table-cell>
          <table:table-cell table:style-name="ce423" table:formula="of:=WEEKDAY([.B198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1-13" calcext:value-type="date">
            <text:p>2031/01/13</text:p>
          </table:table-cell>
          <table:table-cell table:style-name="ce423" table:formula="of:=WEEKDAY([.B19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2-11" calcext:value-type="date">
            <text:p>2031/02/11</text:p>
          </table:table-cell>
          <table:table-cell table:style-name="ce423" table:formula="of:=WEEKDAY([.B200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2-23" calcext:value-type="date">
            <text:p>2031/02/23</text:p>
          </table:table-cell>
          <table:table-cell table:style-name="ce423" table:formula="of:=WEEKDAY([.B201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2-24" calcext:value-type="date">
            <text:p>2031/02/24</text:p>
          </table:table-cell>
          <table:table-cell table:style-name="ce423" table:formula="of:=WEEKDAY([.B20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3-21" calcext:value-type="date">
            <text:p>2031/03/21</text:p>
          </table:table-cell>
          <table:table-cell table:style-name="ce423" table:formula="of:=WEEKDAY([.B203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4-29" calcext:value-type="date">
            <text:p>2031/04/29</text:p>
          </table:table-cell>
          <table:table-cell table:style-name="ce423" table:formula="of:=WEEKDAY([.B204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5-03" calcext:value-type="date">
            <text:p>2031/05/03</text:p>
          </table:table-cell>
          <table:table-cell table:style-name="ce423" table:formula="of:=WEEKDAY([.B205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5-04" calcext:value-type="date">
            <text:p>2031/05/04</text:p>
          </table:table-cell>
          <table:table-cell table:style-name="ce423" table:formula="of:=WEEKDAY([.B206])" office:value-type="date" office:date-value="1899-12-31" calcext:value-type="date">
            <text:p>日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5-05" calcext:value-type="date">
            <text:p>2031/05/05</text:p>
          </table:table-cell>
          <table:table-cell table:style-name="ce423" table:formula="of:=WEEKDAY([.B207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5-06" calcext:value-type="date">
            <text:p>2031/05/06</text:p>
          </table:table-cell>
          <table:table-cell table:style-name="ce423" table:formula="of:=WEEKDAY([.B208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7-21" calcext:value-type="date">
            <text:p>2031/07/21</text:p>
          </table:table-cell>
          <table:table-cell table:style-name="ce423" table:formula="of:=WEEKDAY([.B20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8-11" calcext:value-type="date">
            <text:p>2031/08/11</text:p>
          </table:table-cell>
          <table:table-cell table:style-name="ce423" table:formula="of:=WEEKDAY([.B21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9-15" calcext:value-type="date">
            <text:p>2031/09/15</text:p>
          </table:table-cell>
          <table:table-cell table:style-name="ce423" table:formula="of:=WEEKDAY([.B21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9-23" calcext:value-type="date">
            <text:p>2031/09/23</text:p>
          </table:table-cell>
          <table:table-cell table:style-name="ce423" table:formula="of:=WEEKDAY([.B212])" office:value-type="date" office:date-value="1900-01-02" calcext:value-type="date">
            <text:p>火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10-13" calcext:value-type="date">
            <text:p>2031/10/13</text:p>
          </table:table-cell>
          <table:table-cell table:style-name="ce423" table:formula="of:=WEEKDAY([.B21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11-03" calcext:value-type="date">
            <text:p>2031/11/03</text:p>
          </table:table-cell>
          <table:table-cell table:style-name="ce423" table:formula="of:=WEEKDAY([.B21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11-23" calcext:value-type="date">
            <text:p>2031/11/23</text:p>
          </table:table-cell>
          <table:table-cell table:style-name="ce423" table:formula="of:=WEEKDAY([.B215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11-24" calcext:value-type="date">
            <text:p>2031/11/24</text:p>
          </table:table-cell>
          <table:table-cell table:style-name="ce423" table:formula="of:=WEEKDAY([.B21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1-01" calcext:value-type="date">
            <text:p>2032/01/01</text:p>
          </table:table-cell>
          <table:table-cell table:style-name="ce423" table:formula="of:=WEEKDAY([.B217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1-12" calcext:value-type="date">
            <text:p>2032/01/12</text:p>
          </table:table-cell>
          <table:table-cell table:style-name="ce423" table:formula="of:=WEEKDAY([.B21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2-11" calcext:value-type="date">
            <text:p>2032/02/11</text:p>
          </table:table-cell>
          <table:table-cell table:style-name="ce423" table:formula="of:=WEEKDAY([.B219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2-23" calcext:value-type="date">
            <text:p>2032/02/23</text:p>
          </table:table-cell>
          <table:table-cell table:style-name="ce423" table:formula="of:=WEEKDAY([.B22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3-20" calcext:value-type="date">
            <text:p>2032/03/20</text:p>
          </table:table-cell>
          <table:table-cell table:style-name="ce423" table:formula="of:=WEEKDAY([.B221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4-29" calcext:value-type="date">
            <text:p>2032/04/29</text:p>
          </table:table-cell>
          <table:table-cell table:style-name="ce423" table:formula="of:=WEEKDAY([.B222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5-03" calcext:value-type="date">
            <text:p>2032/05/03</text:p>
          </table:table-cell>
          <table:table-cell table:style-name="ce423" table:formula="of:=WEEKDAY([.B22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5-04" calcext:value-type="date">
            <text:p>2032/05/04</text:p>
          </table:table-cell>
          <table:table-cell table:style-name="ce423" table:formula="of:=WEEKDAY([.B224])" office:value-type="date" office:date-value="1900-01-02" calcext:value-type="date">
            <text:p>火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5-05" calcext:value-type="date">
            <text:p>2032/05/05</text:p>
          </table:table-cell>
          <table:table-cell table:style-name="ce423" table:formula="of:=WEEKDAY([.B225])" office:value-type="date" office:date-value="1900-01-03" calcext:value-type="date">
            <text:p>水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7-19" calcext:value-type="date">
            <text:p>2032/07/19</text:p>
          </table:table-cell>
          <table:table-cell table:style-name="ce423" table:formula="of:=WEEKDAY([.B22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8-11" calcext:value-type="date">
            <text:p>2032/08/11</text:p>
          </table:table-cell>
          <table:table-cell table:style-name="ce423" table:formula="of:=WEEKDAY([.B227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9-20" calcext:value-type="date">
            <text:p>2032/09/20</text:p>
          </table:table-cell>
          <table:table-cell table:style-name="ce423" table:formula="of:=WEEKDAY([.B22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9-21" calcext:value-type="date">
            <text:p>2032/09/21</text:p>
          </table:table-cell>
          <table:table-cell table:style-name="ce423" table:formula="of:=WEEKDAY([.B229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9-22" calcext:value-type="date">
            <text:p>2032/09/22</text:p>
          </table:table-cell>
          <table:table-cell table:style-name="ce423" table:formula="of:=WEEKDAY([.B230])" office:value-type="date" office:date-value="1900-01-03" calcext:value-type="date">
            <text:p>水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10-11" calcext:value-type="date">
            <text:p>2032/10/11</text:p>
          </table:table-cell>
          <table:table-cell table:style-name="ce423" table:formula="of:=WEEKDAY([.B23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11-03" calcext:value-type="date">
            <text:p>2032/11/03</text:p>
          </table:table-cell>
          <table:table-cell table:style-name="ce423" table:formula="of:=WEEKDAY([.B232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11-23" calcext:value-type="date">
            <text:p>2032/11/23</text:p>
          </table:table-cell>
          <table:table-cell table:style-name="ce423" table:formula="of:=WEEKDAY([.B233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1-01" calcext:value-type="date">
            <text:p>2033/01/01</text:p>
          </table:table-cell>
          <table:table-cell table:style-name="ce423" table:formula="of:=WEEKDAY([.B234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1-10" calcext:value-type="date">
            <text:p>2033/01/10</text:p>
          </table:table-cell>
          <table:table-cell table:style-name="ce423" table:formula="of:=WEEKDAY([.B23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2-11" calcext:value-type="date">
            <text:p>2033/02/11</text:p>
          </table:table-cell>
          <table:table-cell table:style-name="ce423" table:formula="of:=WEEKDAY([.B236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2-23" calcext:value-type="date">
            <text:p>2033/02/23</text:p>
          </table:table-cell>
          <table:table-cell table:style-name="ce423" table:formula="of:=WEEKDAY([.B237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3-20" calcext:value-type="date">
            <text:p>2033/03/20</text:p>
          </table:table-cell>
          <table:table-cell table:style-name="ce423" table:formula="of:=WEEKDAY([.B238])" office:value-type="date" office:date-value="1899-12-31" calcext:value-type="date">
            <text:p>日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3-21" calcext:value-type="date">
            <text:p>2033/03/21</text:p>
          </table:table-cell>
          <table:table-cell table:style-name="ce423" table:formula="of:=WEEKDAY([.B23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4-29" calcext:value-type="date">
            <text:p>2033/04/29</text:p>
          </table:table-cell>
          <table:table-cell table:style-name="ce423" table:formula="of:=WEEKDAY([.B240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5-03" calcext:value-type="date">
            <text:p>2033/05/03</text:p>
          </table:table-cell>
          <table:table-cell table:style-name="ce423" table:formula="of:=WEEKDAY([.B241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5-04" calcext:value-type="date">
            <text:p>2033/05/04</text:p>
          </table:table-cell>
          <table:table-cell table:style-name="ce423" table:formula="of:=WEEKDAY([.B242])" office:value-type="date" office:date-value="1900-01-03" calcext:value-type="date">
            <text:p>水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5-05" calcext:value-type="date">
            <text:p>2033/05/05</text:p>
          </table:table-cell>
          <table:table-cell table:style-name="ce423" table:formula="of:=WEEKDAY([.B243])" office:value-type="date" office:date-value="1900-01-04" calcext:value-type="date">
            <text:p>木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7-18" calcext:value-type="date">
            <text:p>2033/07/18</text:p>
          </table:table-cell>
          <table:table-cell table:style-name="ce423" table:formula="of:=WEEKDAY([.B24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8-11" calcext:value-type="date">
            <text:p>2033/08/11</text:p>
          </table:table-cell>
          <table:table-cell table:style-name="ce423" table:formula="of:=WEEKDAY([.B245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9-19" calcext:value-type="date">
            <text:p>2033/09/19</text:p>
          </table:table-cell>
          <table:table-cell table:style-name="ce423" table:formula="of:=WEEKDAY([.B24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9-23" calcext:value-type="date">
            <text:p>2033/09/23</text:p>
          </table:table-cell>
          <table:table-cell table:style-name="ce423" table:formula="of:=WEEKDAY([.B247])" office:value-type="date" office:date-value="1900-01-05" calcext:value-type="date">
            <text:p>金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10-10" calcext:value-type="date">
            <text:p>2033/10/10</text:p>
          </table:table-cell>
          <table:table-cell table:style-name="ce423" table:formula="of:=WEEKDAY([.B24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11-03" calcext:value-type="date">
            <text:p>2033/11/03</text:p>
          </table:table-cell>
          <table:table-cell table:style-name="ce423" table:formula="of:=WEEKDAY([.B249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11-23" calcext:value-type="date">
            <text:p>2033/11/23</text:p>
          </table:table-cell>
          <table:table-cell table:style-name="ce423" table:formula="of:=WEEKDAY([.B250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1-01" calcext:value-type="date">
            <text:p>2034/01/01</text:p>
          </table:table-cell>
          <table:table-cell table:style-name="ce423" table:formula="of:=WEEKDAY([.B251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1-02" calcext:value-type="date">
            <text:p>2034/01/02</text:p>
          </table:table-cell>
          <table:table-cell table:style-name="ce423" table:formula="of:=WEEKDAY([.B25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1-09" calcext:value-type="date">
            <text:p>2034/01/09</text:p>
          </table:table-cell>
          <table:table-cell table:style-name="ce423" table:formula="of:=WEEKDAY([.B25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2-11" calcext:value-type="date">
            <text:p>2034/02/11</text:p>
          </table:table-cell>
          <table:table-cell table:style-name="ce423" table:formula="of:=WEEKDAY([.B254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2-23" calcext:value-type="date">
            <text:p>2034/02/23</text:p>
          </table:table-cell>
          <table:table-cell table:style-name="ce423" table:formula="of:=WEEKDAY([.B255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3-20" calcext:value-type="date">
            <text:p>2034/03/20</text:p>
          </table:table-cell>
          <table:table-cell table:style-name="ce423" table:formula="of:=WEEKDAY([.B25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4-29" calcext:value-type="date">
            <text:p>2034/04/29</text:p>
          </table:table-cell>
          <table:table-cell table:style-name="ce423" table:formula="of:=WEEKDAY([.B257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5-03" calcext:value-type="date">
            <text:p>2034/05/03</text:p>
          </table:table-cell>
          <table:table-cell table:style-name="ce423" table:formula="of:=WEEKDAY([.B258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5-04" calcext:value-type="date">
            <text:p>2034/05/04</text:p>
          </table:table-cell>
          <table:table-cell table:style-name="ce423" table:formula="of:=WEEKDAY([.B259])" office:value-type="date" office:date-value="1900-01-04" calcext:value-type="date">
            <text:p>木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5-05" calcext:value-type="date">
            <text:p>2034/05/05</text:p>
          </table:table-cell>
          <table:table-cell table:style-name="ce423" table:formula="of:=WEEKDAY([.B260])" office:value-type="date" office:date-value="1900-01-05" calcext:value-type="date">
            <text:p>金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7-17" calcext:value-type="date">
            <text:p>2034/07/17</text:p>
          </table:table-cell>
          <table:table-cell table:style-name="ce423" table:formula="of:=WEEKDAY([.B26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8-11" calcext:value-type="date">
            <text:p>2034/08/11</text:p>
          </table:table-cell>
          <table:table-cell table:style-name="ce423" table:formula="of:=WEEKDAY([.B262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9-18" calcext:value-type="date">
            <text:p>2034/09/18</text:p>
          </table:table-cell>
          <table:table-cell table:style-name="ce423" table:formula="of:=WEEKDAY([.B26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9-23" calcext:value-type="date">
            <text:p>2034/09/23</text:p>
          </table:table-cell>
          <table:table-cell table:style-name="ce423" table:formula="of:=WEEKDAY([.B264])" office:value-type="date" office:date-value="1900-01-06" calcext:value-type="date">
            <text:p>土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10-09" calcext:value-type="date">
            <text:p>2034/10/09</text:p>
          </table:table-cell>
          <table:table-cell table:style-name="ce423" table:formula="of:=WEEKDAY([.B26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11-03" calcext:value-type="date">
            <text:p>2034/11/03</text:p>
          </table:table-cell>
          <table:table-cell table:style-name="ce423" table:formula="of:=WEEKDAY([.B266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11-23" calcext:value-type="date">
            <text:p>2034/11/23</text:p>
          </table:table-cell>
          <table:table-cell table:style-name="ce423" table:formula="of:=WEEKDAY([.B267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1-01" calcext:value-type="date">
            <text:p>2035/01/01</text:p>
          </table:table-cell>
          <table:table-cell table:style-name="ce423" table:formula="of:=WEEKDAY([.B26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1-08" calcext:value-type="date">
            <text:p>2035/01/08</text:p>
          </table:table-cell>
          <table:table-cell table:style-name="ce423" table:formula="of:=WEEKDAY([.B26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2-11" calcext:value-type="date">
            <text:p>2035/02/11</text:p>
          </table:table-cell>
          <table:table-cell table:style-name="ce423" table:formula="of:=WEEKDAY([.B270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2-12" calcext:value-type="date">
            <text:p>2035/02/12</text:p>
          </table:table-cell>
          <table:table-cell table:style-name="ce423" table:formula="of:=WEEKDAY([.B27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2-23" calcext:value-type="date">
            <text:p>2035/02/23</text:p>
          </table:table-cell>
          <table:table-cell table:style-name="ce423" table:formula="of:=WEEKDAY([.B272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3-21" calcext:value-type="date">
            <text:p>2035/03/21</text:p>
          </table:table-cell>
          <table:table-cell table:style-name="ce423" table:formula="of:=WEEKDAY([.B273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4-29" calcext:value-type="date">
            <text:p>2035/04/29</text:p>
          </table:table-cell>
          <table:table-cell table:style-name="ce423" table:formula="of:=WEEKDAY([.B274])" office:value-type="date" office:date-value="1899-12-31" calcext:value-type="date">
            <text:p>日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4-30" calcext:value-type="date">
            <text:p>2035/04/30</text:p>
          </table:table-cell>
          <table:table-cell table:style-name="ce423" table:formula="of:=WEEKDAY([.B27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5-03" calcext:value-type="date">
            <text:p>2035/05/03</text:p>
          </table:table-cell>
          <table:table-cell table:style-name="ce423" table:formula="of:=WEEKDAY([.B276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5-04" calcext:value-type="date">
            <text:p>2035/05/04</text:p>
          </table:table-cell>
          <table:table-cell table:style-name="ce423" table:formula="of:=WEEKDAY([.B277])" office:value-type="date" office:date-value="1900-01-05" calcext:value-type="date">
            <text:p>金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5-05" calcext:value-type="date">
            <text:p>2035/05/05</text:p>
          </table:table-cell>
          <table:table-cell table:style-name="ce423" table:formula="of:=WEEKDAY([.B278])" office:value-type="date" office:date-value="1900-01-06" calcext:value-type="date">
            <text:p>土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7-16" calcext:value-type="date">
            <text:p>2035/07/16</text:p>
          </table:table-cell>
          <table:table-cell table:style-name="ce423" table:formula="of:=WEEKDAY([.B27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8-11" calcext:value-type="date">
            <text:p>2035/08/11</text:p>
          </table:table-cell>
          <table:table-cell table:style-name="ce423" table:formula="of:=WEEKDAY([.B280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9-17" calcext:value-type="date">
            <text:p>2035/09/17</text:p>
          </table:table-cell>
          <table:table-cell table:style-name="ce423" table:formula="of:=WEEKDAY([.B28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9-23" calcext:value-type="date">
            <text:p>2035/09/23</text:p>
          </table:table-cell>
          <table:table-cell table:style-name="ce423" table:formula="of:=WEEKDAY([.B282])" office:value-type="date" office:date-value="1899-12-31" calcext:value-type="date">
            <text:p>日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9-24" calcext:value-type="date">
            <text:p>2035/09/24</text:p>
          </table:table-cell>
          <table:table-cell table:style-name="ce423" table:formula="of:=WEEKDAY([.B28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10-08" calcext:value-type="date">
            <text:p>2035/10/08</text:p>
          </table:table-cell>
          <table:table-cell table:style-name="ce423" table:formula="of:=WEEKDAY([.B28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11-03" calcext:value-type="date">
            <text:p>2035/11/03</text:p>
          </table:table-cell>
          <table:table-cell table:style-name="ce423" table:formula="of:=WEEKDAY([.B285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11-23" calcext:value-type="date">
            <text:p>2035/11/23</text:p>
          </table:table-cell>
          <table:table-cell table:style-name="ce423" table:formula="of:=WEEKDAY([.B286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1-01" calcext:value-type="date">
            <text:p>2036/01/01</text:p>
          </table:table-cell>
          <table:table-cell table:style-name="ce423" table:formula="of:=WEEKDAY([.B287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1-14" calcext:value-type="date">
            <text:p>2036/01/14</text:p>
          </table:table-cell>
          <table:table-cell table:style-name="ce423" table:formula="of:=WEEKDAY([.B28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2-11" calcext:value-type="date">
            <text:p>2036/02/11</text:p>
          </table:table-cell>
          <table:table-cell table:style-name="ce423" table:formula="of:=WEEKDAY([.B28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2-23" calcext:value-type="date">
            <text:p>2036/02/23</text:p>
          </table:table-cell>
          <table:table-cell table:style-name="ce423" table:formula="of:=WEEKDAY([.B290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3-20" calcext:value-type="date">
            <text:p>2036/03/20</text:p>
          </table:table-cell>
          <table:table-cell table:style-name="ce423" table:formula="of:=WEEKDAY([.B291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4-29" calcext:value-type="date">
            <text:p>2036/04/29</text:p>
          </table:table-cell>
          <table:table-cell table:style-name="ce423" table:formula="of:=WEEKDAY([.B292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5-03" calcext:value-type="date">
            <text:p>2036/05/03</text:p>
          </table:table-cell>
          <table:table-cell table:style-name="ce423" table:formula="of:=WEEKDAY([.B293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5-04" calcext:value-type="date">
            <text:p>2036/05/04</text:p>
          </table:table-cell>
          <table:table-cell table:style-name="ce423" table:formula="of:=WEEKDAY([.B294])" office:value-type="date" office:date-value="1899-12-31" calcext:value-type="date">
            <text:p>日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5-05" calcext:value-type="date">
            <text:p>2036/05/05</text:p>
          </table:table-cell>
          <table:table-cell table:style-name="ce423" table:formula="of:=WEEKDAY([.B29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5-06" calcext:value-type="date">
            <text:p>2036/05/06</text:p>
          </table:table-cell>
          <table:table-cell table:style-name="ce423" table:formula="of:=WEEKDAY([.B296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7-21" calcext:value-type="date">
            <text:p>2036/07/21</text:p>
          </table:table-cell>
          <table:table-cell table:style-name="ce423" table:formula="of:=WEEKDAY([.B297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8-11" calcext:value-type="date">
            <text:p>2036/08/11</text:p>
          </table:table-cell>
          <table:table-cell table:style-name="ce423" table:formula="of:=WEEKDAY([.B29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9-15" calcext:value-type="date">
            <text:p>2036/09/15</text:p>
          </table:table-cell>
          <table:table-cell table:style-name="ce423" table:formula="of:=WEEKDAY([.B29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9-22" calcext:value-type="date">
            <text:p>2036/09/22</text:p>
          </table:table-cell>
          <table:table-cell table:style-name="ce423" table:formula="of:=WEEKDAY([.B30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10-13" calcext:value-type="date">
            <text:p>2036/10/13</text:p>
          </table:table-cell>
          <table:table-cell table:style-name="ce423" table:formula="of:=WEEKDAY([.B30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11-03" calcext:value-type="date">
            <text:p>2036/11/03</text:p>
          </table:table-cell>
          <table:table-cell table:style-name="ce423" table:formula="of:=WEEKDAY([.B30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11-23" calcext:value-type="date">
            <text:p>2036/11/23</text:p>
          </table:table-cell>
          <table:table-cell table:style-name="ce423" table:formula="of:=WEEKDAY([.B303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11-24" calcext:value-type="date">
            <text:p>2036/11/24</text:p>
          </table:table-cell>
          <table:table-cell table:style-name="ce423" table:formula="of:=WEEKDAY([.B30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423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421" office:value-type="string" calcext:value-type="string">
            <text:p>土日一覧</text:p>
          </table:table-cell>
          <table:table-cell table:style-name="ce423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0-01-04" calcext:value-type="date">
            <text:p>2020/01/04</text:p>
          </table:table-cell>
          <table:table-cell table:style-name="ce423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07]+1" office:value-type="date" office:date-value="2020-01-05" calcext:value-type="date">
            <text:p>2020/01/05</text:p>
          </table:table-cell>
          <table:table-cell table:style-name="ce423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08]+6" office:value-type="date" office:date-value="2020-01-11" calcext:value-type="date">
            <text:p>2020/01/11</text:p>
          </table:table-cell>
          <table:table-cell table:style-name="ce423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09]+1" office:value-type="date" office:date-value="2020-01-12" calcext:value-type="date">
            <text:p>2020/01/12</text:p>
          </table:table-cell>
          <table:table-cell table:style-name="ce423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0]+6" office:value-type="date" office:date-value="2020-01-18" calcext:value-type="date">
            <text:p>2020/01/18</text:p>
          </table:table-cell>
          <table:table-cell table:style-name="ce423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1]+1" office:value-type="date" office:date-value="2020-01-19" calcext:value-type="date">
            <text:p>2020/01/19</text:p>
          </table:table-cell>
          <table:table-cell table:style-name="ce423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2]+6" office:value-type="date" office:date-value="2020-01-25" calcext:value-type="date">
            <text:p>2020/01/25</text:p>
          </table:table-cell>
          <table:table-cell table:style-name="ce423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3]+1" office:value-type="date" office:date-value="2020-01-26" calcext:value-type="date">
            <text:p>2020/01/26</text:p>
          </table:table-cell>
          <table:table-cell table:style-name="ce423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4]+6" office:value-type="date" office:date-value="2020-02-01" calcext:value-type="date">
            <text:p>2020/02/01</text:p>
          </table:table-cell>
          <table:table-cell table:style-name="ce423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5]+1" office:value-type="date" office:date-value="2020-02-02" calcext:value-type="date">
            <text:p>2020/02/02</text:p>
          </table:table-cell>
          <table:table-cell table:style-name="ce423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6]+6" office:value-type="date" office:date-value="2020-02-08" calcext:value-type="date">
            <text:p>2020/02/08</text:p>
          </table:table-cell>
          <table:table-cell table:style-name="ce423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7]+1" office:value-type="date" office:date-value="2020-02-09" calcext:value-type="date">
            <text:p>2020/02/09</text:p>
          </table:table-cell>
          <table:table-cell table:style-name="ce423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8]+6" office:value-type="date" office:date-value="2020-02-15" calcext:value-type="date">
            <text:p>2020/02/15</text:p>
          </table:table-cell>
          <table:table-cell table:style-name="ce423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9]+1" office:value-type="date" office:date-value="2020-02-16" calcext:value-type="date">
            <text:p>2020/02/16</text:p>
          </table:table-cell>
          <table:table-cell table:style-name="ce423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0]+6" office:value-type="date" office:date-value="2020-02-22" calcext:value-type="date">
            <text:p>2020/02/22</text:p>
          </table:table-cell>
          <table:table-cell table:style-name="ce423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1]+1" office:value-type="date" office:date-value="2020-02-23" calcext:value-type="date">
            <text:p>2020/02/23</text:p>
          </table:table-cell>
          <table:table-cell table:style-name="ce423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2]+6" office:value-type="date" office:date-value="2020-02-29" calcext:value-type="date">
            <text:p>2020/02/29</text:p>
          </table:table-cell>
          <table:table-cell table:style-name="ce423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3]+1" office:value-type="date" office:date-value="2020-03-01" calcext:value-type="date">
            <text:p>2020/03/01</text:p>
          </table:table-cell>
          <table:table-cell table:style-name="ce423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4]+6" office:value-type="date" office:date-value="2020-03-07" calcext:value-type="date">
            <text:p>2020/03/07</text:p>
          </table:table-cell>
          <table:table-cell table:style-name="ce423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5]+1" office:value-type="date" office:date-value="2020-03-08" calcext:value-type="date">
            <text:p>2020/03/08</text:p>
          </table:table-cell>
          <table:table-cell table:style-name="ce423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6]+6" office:value-type="date" office:date-value="2020-03-14" calcext:value-type="date">
            <text:p>2020/03/14</text:p>
          </table:table-cell>
          <table:table-cell table:style-name="ce423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7]+1" office:value-type="date" office:date-value="2020-03-15" calcext:value-type="date">
            <text:p>2020/03/15</text:p>
          </table:table-cell>
          <table:table-cell table:style-name="ce423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8]+6" office:value-type="date" office:date-value="2020-03-21" calcext:value-type="date">
            <text:p>2020/03/21</text:p>
          </table:table-cell>
          <table:table-cell table:style-name="ce423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9]+1" office:value-type="date" office:date-value="2020-03-22" calcext:value-type="date">
            <text:p>2020/03/22</text:p>
          </table:table-cell>
          <table:table-cell table:style-name="ce423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0]+6" office:value-type="date" office:date-value="2020-03-28" calcext:value-type="date">
            <text:p>2020/03/28</text:p>
          </table:table-cell>
          <table:table-cell table:style-name="ce423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1]+1" office:value-type="date" office:date-value="2020-03-29" calcext:value-type="date">
            <text:p>2020/03/29</text:p>
          </table:table-cell>
          <table:table-cell table:style-name="ce423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2]+6" office:value-type="date" office:date-value="2020-04-04" calcext:value-type="date">
            <text:p>2020/04/04</text:p>
          </table:table-cell>
          <table:table-cell table:style-name="ce423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3]+1" office:value-type="date" office:date-value="2020-04-05" calcext:value-type="date">
            <text:p>2020/04/05</text:p>
          </table:table-cell>
          <table:table-cell table:style-name="ce423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4]+6" office:value-type="date" office:date-value="2020-04-11" calcext:value-type="date">
            <text:p>2020/04/11</text:p>
          </table:table-cell>
          <table:table-cell table:style-name="ce423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5]+1" office:value-type="date" office:date-value="2020-04-12" calcext:value-type="date">
            <text:p>2020/04/12</text:p>
          </table:table-cell>
          <table:table-cell table:style-name="ce423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6]+6" office:value-type="date" office:date-value="2020-04-18" calcext:value-type="date">
            <text:p>2020/04/18</text:p>
          </table:table-cell>
          <table:table-cell table:style-name="ce423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7]+1" office:value-type="date" office:date-value="2020-04-19" calcext:value-type="date">
            <text:p>2020/04/19</text:p>
          </table:table-cell>
          <table:table-cell table:style-name="ce423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8]+6" office:value-type="date" office:date-value="2020-04-25" calcext:value-type="date">
            <text:p>2020/04/25</text:p>
          </table:table-cell>
          <table:table-cell table:style-name="ce423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9]+1" office:value-type="date" office:date-value="2020-04-26" calcext:value-type="date">
            <text:p>2020/04/26</text:p>
          </table:table-cell>
          <table:table-cell table:style-name="ce423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0]+6" office:value-type="date" office:date-value="2020-05-02" calcext:value-type="date">
            <text:p>2020/05/02</text:p>
          </table:table-cell>
          <table:table-cell table:style-name="ce423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1]+1" office:value-type="date" office:date-value="2020-05-03" calcext:value-type="date">
            <text:p>2020/05/03</text:p>
          </table:table-cell>
          <table:table-cell table:style-name="ce423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2]+6" office:value-type="date" office:date-value="2020-05-09" calcext:value-type="date">
            <text:p>2020/05/09</text:p>
          </table:table-cell>
          <table:table-cell table:style-name="ce423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3]+1" office:value-type="date" office:date-value="2020-05-10" calcext:value-type="date">
            <text:p>2020/05/10</text:p>
          </table:table-cell>
          <table:table-cell table:style-name="ce423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4]+6" office:value-type="date" office:date-value="2020-05-16" calcext:value-type="date">
            <text:p>2020/05/16</text:p>
          </table:table-cell>
          <table:table-cell table:style-name="ce423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5]+1" office:value-type="date" office:date-value="2020-05-17" calcext:value-type="date">
            <text:p>2020/05/17</text:p>
          </table:table-cell>
          <table:table-cell table:style-name="ce423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6]+6" office:value-type="date" office:date-value="2020-05-23" calcext:value-type="date">
            <text:p>2020/05/23</text:p>
          </table:table-cell>
          <table:table-cell table:style-name="ce423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7]+1" office:value-type="date" office:date-value="2020-05-24" calcext:value-type="date">
            <text:p>2020/05/24</text:p>
          </table:table-cell>
          <table:table-cell table:style-name="ce423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8]+6" office:value-type="date" office:date-value="2020-05-30" calcext:value-type="date">
            <text:p>2020/05/30</text:p>
          </table:table-cell>
          <table:table-cell table:style-name="ce423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9]+1" office:value-type="date" office:date-value="2020-05-31" calcext:value-type="date">
            <text:p>2020/05/31</text:p>
          </table:table-cell>
          <table:table-cell table:style-name="ce423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0]+6" office:value-type="date" office:date-value="2020-06-06" calcext:value-type="date">
            <text:p>2020/06/06</text:p>
          </table:table-cell>
          <table:table-cell table:style-name="ce423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1]+1" office:value-type="date" office:date-value="2020-06-07" calcext:value-type="date">
            <text:p>2020/06/07</text:p>
          </table:table-cell>
          <table:table-cell table:style-name="ce423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2]+6" office:value-type="date" office:date-value="2020-06-13" calcext:value-type="date">
            <text:p>2020/06/13</text:p>
          </table:table-cell>
          <table:table-cell table:style-name="ce423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3]+1" office:value-type="date" office:date-value="2020-06-14" calcext:value-type="date">
            <text:p>2020/06/14</text:p>
          </table:table-cell>
          <table:table-cell table:style-name="ce423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4]+6" office:value-type="date" office:date-value="2020-06-20" calcext:value-type="date">
            <text:p>2020/06/20</text:p>
          </table:table-cell>
          <table:table-cell table:style-name="ce423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5]+1" office:value-type="date" office:date-value="2020-06-21" calcext:value-type="date">
            <text:p>2020/06/21</text:p>
          </table:table-cell>
          <table:table-cell table:style-name="ce423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6]+6" office:value-type="date" office:date-value="2020-06-27" calcext:value-type="date">
            <text:p>2020/06/27</text:p>
          </table:table-cell>
          <table:table-cell table:style-name="ce423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7]+1" office:value-type="date" office:date-value="2020-06-28" calcext:value-type="date">
            <text:p>2020/06/28</text:p>
          </table:table-cell>
          <table:table-cell table:style-name="ce423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8]+6" office:value-type="date" office:date-value="2020-07-04" calcext:value-type="date">
            <text:p>2020/07/04</text:p>
          </table:table-cell>
          <table:table-cell table:style-name="ce423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9]+1" office:value-type="date" office:date-value="2020-07-05" calcext:value-type="date">
            <text:p>2020/07/05</text:p>
          </table:table-cell>
          <table:table-cell table:style-name="ce423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0]+6" office:value-type="date" office:date-value="2020-07-11" calcext:value-type="date">
            <text:p>2020/07/11</text:p>
          </table:table-cell>
          <table:table-cell table:style-name="ce423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1]+1" office:value-type="date" office:date-value="2020-07-12" calcext:value-type="date">
            <text:p>2020/07/12</text:p>
          </table:table-cell>
          <table:table-cell table:style-name="ce423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2]+6" office:value-type="date" office:date-value="2020-07-18" calcext:value-type="date">
            <text:p>2020/07/18</text:p>
          </table:table-cell>
          <table:table-cell table:style-name="ce423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3]+1" office:value-type="date" office:date-value="2020-07-19" calcext:value-type="date">
            <text:p>2020/07/19</text:p>
          </table:table-cell>
          <table:table-cell table:style-name="ce423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4]+6" office:value-type="date" office:date-value="2020-07-25" calcext:value-type="date">
            <text:p>2020/07/25</text:p>
          </table:table-cell>
          <table:table-cell table:style-name="ce423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5]+1" office:value-type="date" office:date-value="2020-07-26" calcext:value-type="date">
            <text:p>2020/07/26</text:p>
          </table:table-cell>
          <table:table-cell table:style-name="ce423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6]+6" office:value-type="date" office:date-value="2020-08-01" calcext:value-type="date">
            <text:p>2020/08/01</text:p>
          </table:table-cell>
          <table:table-cell table:style-name="ce423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7]+1" office:value-type="date" office:date-value="2020-08-02" calcext:value-type="date">
            <text:p>2020/08/02</text:p>
          </table:table-cell>
          <table:table-cell table:style-name="ce423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8]+6" office:value-type="date" office:date-value="2020-08-08" calcext:value-type="date">
            <text:p>2020/08/08</text:p>
          </table:table-cell>
          <table:table-cell table:style-name="ce423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9]+1" office:value-type="date" office:date-value="2020-08-09" calcext:value-type="date">
            <text:p>2020/08/09</text:p>
          </table:table-cell>
          <table:table-cell table:style-name="ce423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0]+6" office:value-type="date" office:date-value="2020-08-15" calcext:value-type="date">
            <text:p>2020/08/15</text:p>
          </table:table-cell>
          <table:table-cell table:style-name="ce423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1]+1" office:value-type="date" office:date-value="2020-08-16" calcext:value-type="date">
            <text:p>2020/08/16</text:p>
          </table:table-cell>
          <table:table-cell table:style-name="ce423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2]+6" office:value-type="date" office:date-value="2020-08-22" calcext:value-type="date">
            <text:p>2020/08/22</text:p>
          </table:table-cell>
          <table:table-cell table:style-name="ce423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3]+1" office:value-type="date" office:date-value="2020-08-23" calcext:value-type="date">
            <text:p>2020/08/23</text:p>
          </table:table-cell>
          <table:table-cell table:style-name="ce423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4]+6" office:value-type="date" office:date-value="2020-08-29" calcext:value-type="date">
            <text:p>2020/08/29</text:p>
          </table:table-cell>
          <table:table-cell table:style-name="ce423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5]+1" office:value-type="date" office:date-value="2020-08-30" calcext:value-type="date">
            <text:p>2020/08/30</text:p>
          </table:table-cell>
          <table:table-cell table:style-name="ce423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6]+6" office:value-type="date" office:date-value="2020-09-05" calcext:value-type="date">
            <text:p>2020/09/05</text:p>
          </table:table-cell>
          <table:table-cell table:style-name="ce423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7]+1" office:value-type="date" office:date-value="2020-09-06" calcext:value-type="date">
            <text:p>2020/09/06</text:p>
          </table:table-cell>
          <table:table-cell table:style-name="ce423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8]+6" office:value-type="date" office:date-value="2020-09-12" calcext:value-type="date">
            <text:p>2020/09/12</text:p>
          </table:table-cell>
          <table:table-cell table:style-name="ce423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9]+1" office:value-type="date" office:date-value="2020-09-13" calcext:value-type="date">
            <text:p>2020/09/13</text:p>
          </table:table-cell>
          <table:table-cell table:style-name="ce423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0]+6" office:value-type="date" office:date-value="2020-09-19" calcext:value-type="date">
            <text:p>2020/09/19</text:p>
          </table:table-cell>
          <table:table-cell table:style-name="ce423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1]+1" office:value-type="date" office:date-value="2020-09-20" calcext:value-type="date">
            <text:p>2020/09/20</text:p>
          </table:table-cell>
          <table:table-cell table:style-name="ce423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2]+6" office:value-type="date" office:date-value="2020-09-26" calcext:value-type="date">
            <text:p>2020/09/26</text:p>
          </table:table-cell>
          <table:table-cell table:style-name="ce423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3]+1" office:value-type="date" office:date-value="2020-09-27" calcext:value-type="date">
            <text:p>2020/09/27</text:p>
          </table:table-cell>
          <table:table-cell table:style-name="ce423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4]+6" office:value-type="date" office:date-value="2020-10-03" calcext:value-type="date">
            <text:p>2020/10/03</text:p>
          </table:table-cell>
          <table:table-cell table:style-name="ce423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5]+1" office:value-type="date" office:date-value="2020-10-04" calcext:value-type="date">
            <text:p>2020/10/04</text:p>
          </table:table-cell>
          <table:table-cell table:style-name="ce423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6]+6" office:value-type="date" office:date-value="2020-10-10" calcext:value-type="date">
            <text:p>2020/10/10</text:p>
          </table:table-cell>
          <table:table-cell table:style-name="ce423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7]+1" office:value-type="date" office:date-value="2020-10-11" calcext:value-type="date">
            <text:p>2020/10/11</text:p>
          </table:table-cell>
          <table:table-cell table:style-name="ce423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8]+6" office:value-type="date" office:date-value="2020-10-17" calcext:value-type="date">
            <text:p>2020/10/17</text:p>
          </table:table-cell>
          <table:table-cell table:style-name="ce423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9]+1" office:value-type="date" office:date-value="2020-10-18" calcext:value-type="date">
            <text:p>2020/10/18</text:p>
          </table:table-cell>
          <table:table-cell table:style-name="ce423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0]+6" office:value-type="date" office:date-value="2020-10-24" calcext:value-type="date">
            <text:p>2020/10/24</text:p>
          </table:table-cell>
          <table:table-cell table:style-name="ce423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1]+1" office:value-type="date" office:date-value="2020-10-25" calcext:value-type="date">
            <text:p>2020/10/25</text:p>
          </table:table-cell>
          <table:table-cell table:style-name="ce423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2]+6" office:value-type="date" office:date-value="2020-10-31" calcext:value-type="date">
            <text:p>2020/10/31</text:p>
          </table:table-cell>
          <table:table-cell table:style-name="ce423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3]+1" office:value-type="date" office:date-value="2020-11-01" calcext:value-type="date">
            <text:p>2020/11/01</text:p>
          </table:table-cell>
          <table:table-cell table:style-name="ce423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4]+6" office:value-type="date" office:date-value="2020-11-07" calcext:value-type="date">
            <text:p>2020/11/07</text:p>
          </table:table-cell>
          <table:table-cell table:style-name="ce423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5]+1" office:value-type="date" office:date-value="2020-11-08" calcext:value-type="date">
            <text:p>2020/11/08</text:p>
          </table:table-cell>
          <table:table-cell table:style-name="ce423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6]+6" office:value-type="date" office:date-value="2020-11-14" calcext:value-type="date">
            <text:p>2020/11/14</text:p>
          </table:table-cell>
          <table:table-cell table:style-name="ce423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7]+1" office:value-type="date" office:date-value="2020-11-15" calcext:value-type="date">
            <text:p>2020/11/15</text:p>
          </table:table-cell>
          <table:table-cell table:style-name="ce423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8]+6" office:value-type="date" office:date-value="2020-11-21" calcext:value-type="date">
            <text:p>2020/11/21</text:p>
          </table:table-cell>
          <table:table-cell table:style-name="ce423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9]+1" office:value-type="date" office:date-value="2020-11-22" calcext:value-type="date">
            <text:p>2020/11/22</text:p>
          </table:table-cell>
          <table:table-cell table:style-name="ce423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0]+6" office:value-type="date" office:date-value="2020-11-28" calcext:value-type="date">
            <text:p>2020/11/28</text:p>
          </table:table-cell>
          <table:table-cell table:style-name="ce423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1]+1" office:value-type="date" office:date-value="2020-11-29" calcext:value-type="date">
            <text:p>2020/11/29</text:p>
          </table:table-cell>
          <table:table-cell table:style-name="ce423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2]+6" office:value-type="date" office:date-value="2020-12-05" calcext:value-type="date">
            <text:p>2020/12/05</text:p>
          </table:table-cell>
          <table:table-cell table:style-name="ce423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3]+1" office:value-type="date" office:date-value="2020-12-06" calcext:value-type="date">
            <text:p>2020/12/06</text:p>
          </table:table-cell>
          <table:table-cell table:style-name="ce423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4]+6" office:value-type="date" office:date-value="2020-12-12" calcext:value-type="date">
            <text:p>2020/12/12</text:p>
          </table:table-cell>
          <table:table-cell table:style-name="ce423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5]+1" office:value-type="date" office:date-value="2020-12-13" calcext:value-type="date">
            <text:p>2020/12/13</text:p>
          </table:table-cell>
          <table:table-cell table:style-name="ce423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6]+6" office:value-type="date" office:date-value="2020-12-19" calcext:value-type="date">
            <text:p>2020/12/19</text:p>
          </table:table-cell>
          <table:table-cell table:style-name="ce423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7]+1" office:value-type="date" office:date-value="2020-12-20" calcext:value-type="date">
            <text:p>2020/12/20</text:p>
          </table:table-cell>
          <table:table-cell table:style-name="ce423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8]+6" office:value-type="date" office:date-value="2020-12-26" calcext:value-type="date">
            <text:p>2020/12/26</text:p>
          </table:table-cell>
          <table:table-cell table:style-name="ce423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9]+1" office:value-type="date" office:date-value="2020-12-27" calcext:value-type="date">
            <text:p>2020/12/27</text:p>
          </table:table-cell>
          <table:table-cell table:style-name="ce423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0]+6" office:value-type="date" office:date-value="2021-01-02" calcext:value-type="date">
            <text:p>2021/01/02</text:p>
          </table:table-cell>
          <table:table-cell table:style-name="ce423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1]+1" office:value-type="date" office:date-value="2021-01-03" calcext:value-type="date">
            <text:p>2021/01/03</text:p>
          </table:table-cell>
          <table:table-cell table:style-name="ce423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2]+6" office:value-type="date" office:date-value="2021-01-09" calcext:value-type="date">
            <text:p>2021/01/09</text:p>
          </table:table-cell>
          <table:table-cell table:style-name="ce423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3]+1" office:value-type="date" office:date-value="2021-01-10" calcext:value-type="date">
            <text:p>2021/01/10</text:p>
          </table:table-cell>
          <table:table-cell table:style-name="ce423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4]+6" office:value-type="date" office:date-value="2021-01-16" calcext:value-type="date">
            <text:p>2021/01/16</text:p>
          </table:table-cell>
          <table:table-cell table:style-name="ce423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5]+1" office:value-type="date" office:date-value="2021-01-17" calcext:value-type="date">
            <text:p>2021/01/17</text:p>
          </table:table-cell>
          <table:table-cell table:style-name="ce423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6]+6" office:value-type="date" office:date-value="2021-01-23" calcext:value-type="date">
            <text:p>2021/01/23</text:p>
          </table:table-cell>
          <table:table-cell table:style-name="ce423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7]+1" office:value-type="date" office:date-value="2021-01-24" calcext:value-type="date">
            <text:p>2021/01/24</text:p>
          </table:table-cell>
          <table:table-cell table:style-name="ce423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8]+6" office:value-type="date" office:date-value="2021-01-30" calcext:value-type="date">
            <text:p>2021/01/30</text:p>
          </table:table-cell>
          <table:table-cell table:style-name="ce423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9]+1" office:value-type="date" office:date-value="2021-01-31" calcext:value-type="date">
            <text:p>2021/01/31</text:p>
          </table:table-cell>
          <table:table-cell table:style-name="ce423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0]+6" office:value-type="date" office:date-value="2021-02-06" calcext:value-type="date">
            <text:p>2021/02/06</text:p>
          </table:table-cell>
          <table:table-cell table:style-name="ce423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1]+1" office:value-type="date" office:date-value="2021-02-07" calcext:value-type="date">
            <text:p>2021/02/07</text:p>
          </table:table-cell>
          <table:table-cell table:style-name="ce423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2]+6" office:value-type="date" office:date-value="2021-02-13" calcext:value-type="date">
            <text:p>2021/02/13</text:p>
          </table:table-cell>
          <table:table-cell table:style-name="ce423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3]+1" office:value-type="date" office:date-value="2021-02-14" calcext:value-type="date">
            <text:p>2021/02/14</text:p>
          </table:table-cell>
          <table:table-cell table:style-name="ce423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4]+6" office:value-type="date" office:date-value="2021-02-20" calcext:value-type="date">
            <text:p>2021/02/20</text:p>
          </table:table-cell>
          <table:table-cell table:style-name="ce423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5]+1" office:value-type="date" office:date-value="2021-02-21" calcext:value-type="date">
            <text:p>2021/02/21</text:p>
          </table:table-cell>
          <table:table-cell table:style-name="ce423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6]+6" office:value-type="date" office:date-value="2021-02-27" calcext:value-type="date">
            <text:p>2021/02/27</text:p>
          </table:table-cell>
          <table:table-cell table:style-name="ce423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7]+1" office:value-type="date" office:date-value="2021-02-28" calcext:value-type="date">
            <text:p>2021/02/28</text:p>
          </table:table-cell>
          <table:table-cell table:style-name="ce423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8]+6" office:value-type="date" office:date-value="2021-03-06" calcext:value-type="date">
            <text:p>2021/03/06</text:p>
          </table:table-cell>
          <table:table-cell table:style-name="ce423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9]+1" office:value-type="date" office:date-value="2021-03-07" calcext:value-type="date">
            <text:p>2021/03/07</text:p>
          </table:table-cell>
          <table:table-cell table:style-name="ce423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0]+6" office:value-type="date" office:date-value="2021-03-13" calcext:value-type="date">
            <text:p>2021/03/13</text:p>
          </table:table-cell>
          <table:table-cell table:style-name="ce423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1]+1" office:value-type="date" office:date-value="2021-03-14" calcext:value-type="date">
            <text:p>2021/03/14</text:p>
          </table:table-cell>
          <table:table-cell table:style-name="ce423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2]+6" office:value-type="date" office:date-value="2021-03-20" calcext:value-type="date">
            <text:p>2021/03/20</text:p>
          </table:table-cell>
          <table:table-cell table:style-name="ce423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3]+1" office:value-type="date" office:date-value="2021-03-21" calcext:value-type="date">
            <text:p>2021/03/21</text:p>
          </table:table-cell>
          <table:table-cell table:style-name="ce423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4]+6" office:value-type="date" office:date-value="2021-03-27" calcext:value-type="date">
            <text:p>2021/03/27</text:p>
          </table:table-cell>
          <table:table-cell table:style-name="ce423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5]+1" office:value-type="date" office:date-value="2021-03-28" calcext:value-type="date">
            <text:p>2021/03/28</text:p>
          </table:table-cell>
          <table:table-cell table:style-name="ce423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6]+6" office:value-type="date" office:date-value="2021-04-03" calcext:value-type="date">
            <text:p>2021/04/03</text:p>
          </table:table-cell>
          <table:table-cell table:style-name="ce423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7]+1" office:value-type="date" office:date-value="2021-04-04" calcext:value-type="date">
            <text:p>2021/04/04</text:p>
          </table:table-cell>
          <table:table-cell table:style-name="ce423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8]+6" office:value-type="date" office:date-value="2021-04-10" calcext:value-type="date">
            <text:p>2021/04/10</text:p>
          </table:table-cell>
          <table:table-cell table:style-name="ce423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9]+1" office:value-type="date" office:date-value="2021-04-11" calcext:value-type="date">
            <text:p>2021/04/11</text:p>
          </table:table-cell>
          <table:table-cell table:style-name="ce423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0]+6" office:value-type="date" office:date-value="2021-04-17" calcext:value-type="date">
            <text:p>2021/04/17</text:p>
          </table:table-cell>
          <table:table-cell table:style-name="ce423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1]+1" office:value-type="date" office:date-value="2021-04-18" calcext:value-type="date">
            <text:p>2021/04/18</text:p>
          </table:table-cell>
          <table:table-cell table:style-name="ce423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2]+6" office:value-type="date" office:date-value="2021-04-24" calcext:value-type="date">
            <text:p>2021/04/24</text:p>
          </table:table-cell>
          <table:table-cell table:style-name="ce423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3]+1" office:value-type="date" office:date-value="2021-04-25" calcext:value-type="date">
            <text:p>2021/04/25</text:p>
          </table:table-cell>
          <table:table-cell table:style-name="ce423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4]+6" office:value-type="date" office:date-value="2021-05-01" calcext:value-type="date">
            <text:p>2021/05/01</text:p>
          </table:table-cell>
          <table:table-cell table:style-name="ce423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5]+1" office:value-type="date" office:date-value="2021-05-02" calcext:value-type="date">
            <text:p>2021/05/02</text:p>
          </table:table-cell>
          <table:table-cell table:style-name="ce423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6]+6" office:value-type="date" office:date-value="2021-05-08" calcext:value-type="date">
            <text:p>2021/05/08</text:p>
          </table:table-cell>
          <table:table-cell table:style-name="ce423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7]+1" office:value-type="date" office:date-value="2021-05-09" calcext:value-type="date">
            <text:p>2021/05/09</text:p>
          </table:table-cell>
          <table:table-cell table:style-name="ce423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8]+6" office:value-type="date" office:date-value="2021-05-15" calcext:value-type="date">
            <text:p>2021/05/15</text:p>
          </table:table-cell>
          <table:table-cell table:style-name="ce423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9]+1" office:value-type="date" office:date-value="2021-05-16" calcext:value-type="date">
            <text:p>2021/05/16</text:p>
          </table:table-cell>
          <table:table-cell table:style-name="ce423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0]+6" office:value-type="date" office:date-value="2021-05-22" calcext:value-type="date">
            <text:p>2021/05/22</text:p>
          </table:table-cell>
          <table:table-cell table:style-name="ce423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1]+1" office:value-type="date" office:date-value="2021-05-23" calcext:value-type="date">
            <text:p>2021/05/23</text:p>
          </table:table-cell>
          <table:table-cell table:style-name="ce423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2]+6" office:value-type="date" office:date-value="2021-05-29" calcext:value-type="date">
            <text:p>2021/05/29</text:p>
          </table:table-cell>
          <table:table-cell table:style-name="ce423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3]+1" office:value-type="date" office:date-value="2021-05-30" calcext:value-type="date">
            <text:p>2021/05/30</text:p>
          </table:table-cell>
          <table:table-cell table:style-name="ce423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4]+6" office:value-type="date" office:date-value="2021-06-05" calcext:value-type="date">
            <text:p>2021/06/05</text:p>
          </table:table-cell>
          <table:table-cell table:style-name="ce423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5]+1" office:value-type="date" office:date-value="2021-06-06" calcext:value-type="date">
            <text:p>2021/06/06</text:p>
          </table:table-cell>
          <table:table-cell table:style-name="ce423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6]+6" office:value-type="date" office:date-value="2021-06-12" calcext:value-type="date">
            <text:p>2021/06/12</text:p>
          </table:table-cell>
          <table:table-cell table:style-name="ce423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7]+1" office:value-type="date" office:date-value="2021-06-13" calcext:value-type="date">
            <text:p>2021/06/13</text:p>
          </table:table-cell>
          <table:table-cell table:style-name="ce423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8]+6" office:value-type="date" office:date-value="2021-06-19" calcext:value-type="date">
            <text:p>2021/06/19</text:p>
          </table:table-cell>
          <table:table-cell table:style-name="ce423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9]+1" office:value-type="date" office:date-value="2021-06-20" calcext:value-type="date">
            <text:p>2021/06/20</text:p>
          </table:table-cell>
          <table:table-cell table:style-name="ce423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0]+6" office:value-type="date" office:date-value="2021-06-26" calcext:value-type="date">
            <text:p>2021/06/26</text:p>
          </table:table-cell>
          <table:table-cell table:style-name="ce423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1]+1" office:value-type="date" office:date-value="2021-06-27" calcext:value-type="date">
            <text:p>2021/06/27</text:p>
          </table:table-cell>
          <table:table-cell table:style-name="ce423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2]+6" office:value-type="date" office:date-value="2021-07-03" calcext:value-type="date">
            <text:p>2021/07/03</text:p>
          </table:table-cell>
          <table:table-cell table:style-name="ce423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3]+1" office:value-type="date" office:date-value="2021-07-04" calcext:value-type="date">
            <text:p>2021/07/04</text:p>
          </table:table-cell>
          <table:table-cell table:style-name="ce423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4]+6" office:value-type="date" office:date-value="2021-07-10" calcext:value-type="date">
            <text:p>2021/07/10</text:p>
          </table:table-cell>
          <table:table-cell table:style-name="ce423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5]+1" office:value-type="date" office:date-value="2021-07-11" calcext:value-type="date">
            <text:p>2021/07/11</text:p>
          </table:table-cell>
          <table:table-cell table:style-name="ce423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6]+6" office:value-type="date" office:date-value="2021-07-17" calcext:value-type="date">
            <text:p>2021/07/17</text:p>
          </table:table-cell>
          <table:table-cell table:style-name="ce423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7]+1" office:value-type="date" office:date-value="2021-07-18" calcext:value-type="date">
            <text:p>2021/07/18</text:p>
          </table:table-cell>
          <table:table-cell table:style-name="ce423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8]+6" office:value-type="date" office:date-value="2021-07-24" calcext:value-type="date">
            <text:p>2021/07/24</text:p>
          </table:table-cell>
          <table:table-cell table:style-name="ce423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9]+1" office:value-type="date" office:date-value="2021-07-25" calcext:value-type="date">
            <text:p>2021/07/25</text:p>
          </table:table-cell>
          <table:table-cell table:style-name="ce423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0]+6" office:value-type="date" office:date-value="2021-07-31" calcext:value-type="date">
            <text:p>2021/07/31</text:p>
          </table:table-cell>
          <table:table-cell table:style-name="ce423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1]+1" office:value-type="date" office:date-value="2021-08-01" calcext:value-type="date">
            <text:p>2021/08/01</text:p>
          </table:table-cell>
          <table:table-cell table:style-name="ce423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2]+6" office:value-type="date" office:date-value="2021-08-07" calcext:value-type="date">
            <text:p>2021/08/07</text:p>
          </table:table-cell>
          <table:table-cell table:style-name="ce423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3]+1" office:value-type="date" office:date-value="2021-08-08" calcext:value-type="date">
            <text:p>2021/08/08</text:p>
          </table:table-cell>
          <table:table-cell table:style-name="ce423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4]+6" office:value-type="date" office:date-value="2021-08-14" calcext:value-type="date">
            <text:p>2021/08/14</text:p>
          </table:table-cell>
          <table:table-cell table:style-name="ce423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5]+1" office:value-type="date" office:date-value="2021-08-15" calcext:value-type="date">
            <text:p>2021/08/15</text:p>
          </table:table-cell>
          <table:table-cell table:style-name="ce423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6]+6" office:value-type="date" office:date-value="2021-08-21" calcext:value-type="date">
            <text:p>2021/08/21</text:p>
          </table:table-cell>
          <table:table-cell table:style-name="ce423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7]+1" office:value-type="date" office:date-value="2021-08-22" calcext:value-type="date">
            <text:p>2021/08/22</text:p>
          </table:table-cell>
          <table:table-cell table:style-name="ce423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8]+6" office:value-type="date" office:date-value="2021-08-28" calcext:value-type="date">
            <text:p>2021/08/28</text:p>
          </table:table-cell>
          <table:table-cell table:style-name="ce423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9]+1" office:value-type="date" office:date-value="2021-08-29" calcext:value-type="date">
            <text:p>2021/08/29</text:p>
          </table:table-cell>
          <table:table-cell table:style-name="ce423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0]+6" office:value-type="date" office:date-value="2021-09-04" calcext:value-type="date">
            <text:p>2021/09/04</text:p>
          </table:table-cell>
          <table:table-cell table:style-name="ce423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1]+1" office:value-type="date" office:date-value="2021-09-05" calcext:value-type="date">
            <text:p>2021/09/05</text:p>
          </table:table-cell>
          <table:table-cell table:style-name="ce423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2]+6" office:value-type="date" office:date-value="2021-09-11" calcext:value-type="date">
            <text:p>2021/09/11</text:p>
          </table:table-cell>
          <table:table-cell table:style-name="ce423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3]+1" office:value-type="date" office:date-value="2021-09-12" calcext:value-type="date">
            <text:p>2021/09/12</text:p>
          </table:table-cell>
          <table:table-cell table:style-name="ce423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4]+6" office:value-type="date" office:date-value="2021-09-18" calcext:value-type="date">
            <text:p>2021/09/18</text:p>
          </table:table-cell>
          <table:table-cell table:style-name="ce423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5]+1" office:value-type="date" office:date-value="2021-09-19" calcext:value-type="date">
            <text:p>2021/09/19</text:p>
          </table:table-cell>
          <table:table-cell table:style-name="ce423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6]+6" office:value-type="date" office:date-value="2021-09-25" calcext:value-type="date">
            <text:p>2021/09/25</text:p>
          </table:table-cell>
          <table:table-cell table:style-name="ce423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7]+1" office:value-type="date" office:date-value="2021-09-26" calcext:value-type="date">
            <text:p>2021/09/26</text:p>
          </table:table-cell>
          <table:table-cell table:style-name="ce423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8]+6" office:value-type="date" office:date-value="2021-10-02" calcext:value-type="date">
            <text:p>2021/10/02</text:p>
          </table:table-cell>
          <table:table-cell table:style-name="ce423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9]+1" office:value-type="date" office:date-value="2021-10-03" calcext:value-type="date">
            <text:p>2021/10/03</text:p>
          </table:table-cell>
          <table:table-cell table:style-name="ce423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0]+6" office:value-type="date" office:date-value="2021-10-09" calcext:value-type="date">
            <text:p>2021/10/09</text:p>
          </table:table-cell>
          <table:table-cell table:style-name="ce423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1]+1" office:value-type="date" office:date-value="2021-10-10" calcext:value-type="date">
            <text:p>2021/10/10</text:p>
          </table:table-cell>
          <table:table-cell table:style-name="ce423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2]+6" office:value-type="date" office:date-value="2021-10-16" calcext:value-type="date">
            <text:p>2021/10/16</text:p>
          </table:table-cell>
          <table:table-cell table:style-name="ce423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3]+1" office:value-type="date" office:date-value="2021-10-17" calcext:value-type="date">
            <text:p>2021/10/17</text:p>
          </table:table-cell>
          <table:table-cell table:style-name="ce423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4]+6" office:value-type="date" office:date-value="2021-10-23" calcext:value-type="date">
            <text:p>2021/10/23</text:p>
          </table:table-cell>
          <table:table-cell table:style-name="ce423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5]+1" office:value-type="date" office:date-value="2021-10-24" calcext:value-type="date">
            <text:p>2021/10/24</text:p>
          </table:table-cell>
          <table:table-cell table:style-name="ce423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6]+6" office:value-type="date" office:date-value="2021-10-30" calcext:value-type="date">
            <text:p>2021/10/30</text:p>
          </table:table-cell>
          <table:table-cell table:style-name="ce423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7]+1" office:value-type="date" office:date-value="2021-10-31" calcext:value-type="date">
            <text:p>2021/10/31</text:p>
          </table:table-cell>
          <table:table-cell table:style-name="ce423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8]+6" office:value-type="date" office:date-value="2021-11-06" calcext:value-type="date">
            <text:p>2021/11/06</text:p>
          </table:table-cell>
          <table:table-cell table:style-name="ce423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9]+1" office:value-type="date" office:date-value="2021-11-07" calcext:value-type="date">
            <text:p>2021/11/07</text:p>
          </table:table-cell>
          <table:table-cell table:style-name="ce423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0]+6" office:value-type="date" office:date-value="2021-11-13" calcext:value-type="date">
            <text:p>2021/11/13</text:p>
          </table:table-cell>
          <table:table-cell table:style-name="ce423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1]+1" office:value-type="date" office:date-value="2021-11-14" calcext:value-type="date">
            <text:p>2021/11/14</text:p>
          </table:table-cell>
          <table:table-cell table:style-name="ce423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2]+6" office:value-type="date" office:date-value="2021-11-20" calcext:value-type="date">
            <text:p>2021/11/20</text:p>
          </table:table-cell>
          <table:table-cell table:style-name="ce423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3]+1" office:value-type="date" office:date-value="2021-11-21" calcext:value-type="date">
            <text:p>2021/11/21</text:p>
          </table:table-cell>
          <table:table-cell table:style-name="ce423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4]+6" office:value-type="date" office:date-value="2021-11-27" calcext:value-type="date">
            <text:p>2021/11/27</text:p>
          </table:table-cell>
          <table:table-cell table:style-name="ce423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5]+1" office:value-type="date" office:date-value="2021-11-28" calcext:value-type="date">
            <text:p>2021/11/28</text:p>
          </table:table-cell>
          <table:table-cell table:style-name="ce423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6]+6" office:value-type="date" office:date-value="2021-12-04" calcext:value-type="date">
            <text:p>2021/12/04</text:p>
          </table:table-cell>
          <table:table-cell table:style-name="ce423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7]+1" office:value-type="date" office:date-value="2021-12-05" calcext:value-type="date">
            <text:p>2021/12/05</text:p>
          </table:table-cell>
          <table:table-cell table:style-name="ce423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8]+6" office:value-type="date" office:date-value="2021-12-11" calcext:value-type="date">
            <text:p>2021/12/11</text:p>
          </table:table-cell>
          <table:table-cell table:style-name="ce423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9]+1" office:value-type="date" office:date-value="2021-12-12" calcext:value-type="date">
            <text:p>2021/12/12</text:p>
          </table:table-cell>
          <table:table-cell table:style-name="ce423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0]+6" office:value-type="date" office:date-value="2021-12-18" calcext:value-type="date">
            <text:p>2021/12/18</text:p>
          </table:table-cell>
          <table:table-cell table:style-name="ce423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1]+1" office:value-type="date" office:date-value="2021-12-19" calcext:value-type="date">
            <text:p>2021/12/19</text:p>
          </table:table-cell>
          <table:table-cell table:style-name="ce423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2]+6" office:value-type="date" office:date-value="2021-12-25" calcext:value-type="date">
            <text:p>2021/12/25</text:p>
          </table:table-cell>
          <table:table-cell table:style-name="ce423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3]+1" office:value-type="date" office:date-value="2021-12-26" calcext:value-type="date">
            <text:p>2021/12/26</text:p>
          </table:table-cell>
          <table:table-cell table:style-name="ce423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4]+6" office:value-type="date" office:date-value="2022-01-01" calcext:value-type="date">
            <text:p>2022/01/01</text:p>
          </table:table-cell>
          <table:table-cell table:style-name="ce423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5]+1" office:value-type="date" office:date-value="2022-01-02" calcext:value-type="date">
            <text:p>2022/01/02</text:p>
          </table:table-cell>
          <table:table-cell table:style-name="ce423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6]+6" office:value-type="date" office:date-value="2022-01-08" calcext:value-type="date">
            <text:p>2022/01/08</text:p>
          </table:table-cell>
          <table:table-cell table:style-name="ce423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7]+1" office:value-type="date" office:date-value="2022-01-09" calcext:value-type="date">
            <text:p>2022/01/09</text:p>
          </table:table-cell>
          <table:table-cell table:style-name="ce423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8]+6" office:value-type="date" office:date-value="2022-01-15" calcext:value-type="date">
            <text:p>2022/01/15</text:p>
          </table:table-cell>
          <table:table-cell table:style-name="ce423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9]+1" office:value-type="date" office:date-value="2022-01-16" calcext:value-type="date">
            <text:p>2022/01/16</text:p>
          </table:table-cell>
          <table:table-cell table:style-name="ce423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0]+6" office:value-type="date" office:date-value="2022-01-22" calcext:value-type="date">
            <text:p>2022/01/22</text:p>
          </table:table-cell>
          <table:table-cell table:style-name="ce423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1]+1" office:value-type="date" office:date-value="2022-01-23" calcext:value-type="date">
            <text:p>2022/01/23</text:p>
          </table:table-cell>
          <table:table-cell table:style-name="ce423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2]+6" office:value-type="date" office:date-value="2022-01-29" calcext:value-type="date">
            <text:p>2022/01/29</text:p>
          </table:table-cell>
          <table:table-cell table:style-name="ce423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3]+1" office:value-type="date" office:date-value="2022-01-30" calcext:value-type="date">
            <text:p>2022/01/30</text:p>
          </table:table-cell>
          <table:table-cell table:style-name="ce423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4]+6" office:value-type="date" office:date-value="2022-02-05" calcext:value-type="date">
            <text:p>2022/02/05</text:p>
          </table:table-cell>
          <table:table-cell table:style-name="ce423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5]+1" office:value-type="date" office:date-value="2022-02-06" calcext:value-type="date">
            <text:p>2022/02/06</text:p>
          </table:table-cell>
          <table:table-cell table:style-name="ce423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6]+6" office:value-type="date" office:date-value="2022-02-12" calcext:value-type="date">
            <text:p>2022/02/12</text:p>
          </table:table-cell>
          <table:table-cell table:style-name="ce423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7]+1" office:value-type="date" office:date-value="2022-02-13" calcext:value-type="date">
            <text:p>2022/02/13</text:p>
          </table:table-cell>
          <table:table-cell table:style-name="ce423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8]+6" office:value-type="date" office:date-value="2022-02-19" calcext:value-type="date">
            <text:p>2022/02/19</text:p>
          </table:table-cell>
          <table:table-cell table:style-name="ce423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9]+1" office:value-type="date" office:date-value="2022-02-20" calcext:value-type="date">
            <text:p>2022/02/20</text:p>
          </table:table-cell>
          <table:table-cell table:style-name="ce423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0]+6" office:value-type="date" office:date-value="2022-02-26" calcext:value-type="date">
            <text:p>2022/02/26</text:p>
          </table:table-cell>
          <table:table-cell table:style-name="ce423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1]+1" office:value-type="date" office:date-value="2022-02-27" calcext:value-type="date">
            <text:p>2022/02/27</text:p>
          </table:table-cell>
          <table:table-cell table:style-name="ce423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2]+6" office:value-type="date" office:date-value="2022-03-05" calcext:value-type="date">
            <text:p>2022/03/05</text:p>
          </table:table-cell>
          <table:table-cell table:style-name="ce423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3]+1" office:value-type="date" office:date-value="2022-03-06" calcext:value-type="date">
            <text:p>2022/03/06</text:p>
          </table:table-cell>
          <table:table-cell table:style-name="ce423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4]+6" office:value-type="date" office:date-value="2022-03-12" calcext:value-type="date">
            <text:p>2022/03/12</text:p>
          </table:table-cell>
          <table:table-cell table:style-name="ce423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5]+1" office:value-type="date" office:date-value="2022-03-13" calcext:value-type="date">
            <text:p>2022/03/13</text:p>
          </table:table-cell>
          <table:table-cell table:style-name="ce423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6]+6" office:value-type="date" office:date-value="2022-03-19" calcext:value-type="date">
            <text:p>2022/03/19</text:p>
          </table:table-cell>
          <table:table-cell table:style-name="ce423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7]+1" office:value-type="date" office:date-value="2022-03-20" calcext:value-type="date">
            <text:p>2022/03/20</text:p>
          </table:table-cell>
          <table:table-cell table:style-name="ce423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8]+6" office:value-type="date" office:date-value="2022-03-26" calcext:value-type="date">
            <text:p>2022/03/26</text:p>
          </table:table-cell>
          <table:table-cell table:style-name="ce423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9]+1" office:value-type="date" office:date-value="2022-03-27" calcext:value-type="date">
            <text:p>2022/03/27</text:p>
          </table:table-cell>
          <table:table-cell table:style-name="ce423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0]+6" office:value-type="date" office:date-value="2022-04-02" calcext:value-type="date">
            <text:p>2022/04/02</text:p>
          </table:table-cell>
          <table:table-cell table:style-name="ce423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1]+1" office:value-type="date" office:date-value="2022-04-03" calcext:value-type="date">
            <text:p>2022/04/03</text:p>
          </table:table-cell>
          <table:table-cell table:style-name="ce423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2]+6" office:value-type="date" office:date-value="2022-04-09" calcext:value-type="date">
            <text:p>2022/04/09</text:p>
          </table:table-cell>
          <table:table-cell table:style-name="ce423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3]+1" office:value-type="date" office:date-value="2022-04-10" calcext:value-type="date">
            <text:p>2022/04/10</text:p>
          </table:table-cell>
          <table:table-cell table:style-name="ce423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4]+6" office:value-type="date" office:date-value="2022-04-16" calcext:value-type="date">
            <text:p>2022/04/16</text:p>
          </table:table-cell>
          <table:table-cell table:style-name="ce423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5]+1" office:value-type="date" office:date-value="2022-04-17" calcext:value-type="date">
            <text:p>2022/04/17</text:p>
          </table:table-cell>
          <table:table-cell table:style-name="ce423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6]+6" office:value-type="date" office:date-value="2022-04-23" calcext:value-type="date">
            <text:p>2022/04/23</text:p>
          </table:table-cell>
          <table:table-cell table:style-name="ce423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7]+1" office:value-type="date" office:date-value="2022-04-24" calcext:value-type="date">
            <text:p>2022/04/24</text:p>
          </table:table-cell>
          <table:table-cell table:style-name="ce423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8]+6" office:value-type="date" office:date-value="2022-04-30" calcext:value-type="date">
            <text:p>2022/04/30</text:p>
          </table:table-cell>
          <table:table-cell table:style-name="ce423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9]+1" office:value-type="date" office:date-value="2022-05-01" calcext:value-type="date">
            <text:p>2022/05/01</text:p>
          </table:table-cell>
          <table:table-cell table:style-name="ce423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0]+6" office:value-type="date" office:date-value="2022-05-07" calcext:value-type="date">
            <text:p>2022/05/07</text:p>
          </table:table-cell>
          <table:table-cell table:style-name="ce423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1]+1" office:value-type="date" office:date-value="2022-05-08" calcext:value-type="date">
            <text:p>2022/05/08</text:p>
          </table:table-cell>
          <table:table-cell table:style-name="ce423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2]+6" office:value-type="date" office:date-value="2022-05-14" calcext:value-type="date">
            <text:p>2022/05/14</text:p>
          </table:table-cell>
          <table:table-cell table:style-name="ce423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3]+1" office:value-type="date" office:date-value="2022-05-15" calcext:value-type="date">
            <text:p>2022/05/15</text:p>
          </table:table-cell>
          <table:table-cell table:style-name="ce423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4]+6" office:value-type="date" office:date-value="2022-05-21" calcext:value-type="date">
            <text:p>2022/05/21</text:p>
          </table:table-cell>
          <table:table-cell table:style-name="ce423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5]+1" office:value-type="date" office:date-value="2022-05-22" calcext:value-type="date">
            <text:p>2022/05/22</text:p>
          </table:table-cell>
          <table:table-cell table:style-name="ce423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6]+6" office:value-type="date" office:date-value="2022-05-28" calcext:value-type="date">
            <text:p>2022/05/28</text:p>
          </table:table-cell>
          <table:table-cell table:style-name="ce423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7]+1" office:value-type="date" office:date-value="2022-05-29" calcext:value-type="date">
            <text:p>2022/05/29</text:p>
          </table:table-cell>
          <table:table-cell table:style-name="ce423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8]+6" office:value-type="date" office:date-value="2022-06-04" calcext:value-type="date">
            <text:p>2022/06/04</text:p>
          </table:table-cell>
          <table:table-cell table:style-name="ce423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9]+1" office:value-type="date" office:date-value="2022-06-05" calcext:value-type="date">
            <text:p>2022/06/05</text:p>
          </table:table-cell>
          <table:table-cell table:style-name="ce423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0]+6" office:value-type="date" office:date-value="2022-06-11" calcext:value-type="date">
            <text:p>2022/06/11</text:p>
          </table:table-cell>
          <table:table-cell table:style-name="ce423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1]+1" office:value-type="date" office:date-value="2022-06-12" calcext:value-type="date">
            <text:p>2022/06/12</text:p>
          </table:table-cell>
          <table:table-cell table:style-name="ce423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2]+6" office:value-type="date" office:date-value="2022-06-18" calcext:value-type="date">
            <text:p>2022/06/18</text:p>
          </table:table-cell>
          <table:table-cell table:style-name="ce423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3]+1" office:value-type="date" office:date-value="2022-06-19" calcext:value-type="date">
            <text:p>2022/06/19</text:p>
          </table:table-cell>
          <table:table-cell table:style-name="ce423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4]+6" office:value-type="date" office:date-value="2022-06-25" calcext:value-type="date">
            <text:p>2022/06/25</text:p>
          </table:table-cell>
          <table:table-cell table:style-name="ce423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5]+1" office:value-type="date" office:date-value="2022-06-26" calcext:value-type="date">
            <text:p>2022/06/26</text:p>
          </table:table-cell>
          <table:table-cell table:style-name="ce423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6]+6" office:value-type="date" office:date-value="2022-07-02" calcext:value-type="date">
            <text:p>2022/07/02</text:p>
          </table:table-cell>
          <table:table-cell table:style-name="ce423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7]+1" office:value-type="date" office:date-value="2022-07-03" calcext:value-type="date">
            <text:p>2022/07/03</text:p>
          </table:table-cell>
          <table:table-cell table:style-name="ce423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8]+6" office:value-type="date" office:date-value="2022-07-09" calcext:value-type="date">
            <text:p>2022/07/09</text:p>
          </table:table-cell>
          <table:table-cell table:style-name="ce423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9]+1" office:value-type="date" office:date-value="2022-07-10" calcext:value-type="date">
            <text:p>2022/07/10</text:p>
          </table:table-cell>
          <table:table-cell table:style-name="ce423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0]+6" office:value-type="date" office:date-value="2022-07-16" calcext:value-type="date">
            <text:p>2022/07/16</text:p>
          </table:table-cell>
          <table:table-cell table:style-name="ce423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1]+1" office:value-type="date" office:date-value="2022-07-17" calcext:value-type="date">
            <text:p>2022/07/17</text:p>
          </table:table-cell>
          <table:table-cell table:style-name="ce423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2]+6" office:value-type="date" office:date-value="2022-07-23" calcext:value-type="date">
            <text:p>2022/07/23</text:p>
          </table:table-cell>
          <table:table-cell table:style-name="ce423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3]+1" office:value-type="date" office:date-value="2022-07-24" calcext:value-type="date">
            <text:p>2022/07/24</text:p>
          </table:table-cell>
          <table:table-cell table:style-name="ce423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4]+6" office:value-type="date" office:date-value="2022-07-30" calcext:value-type="date">
            <text:p>2022/07/30</text:p>
          </table:table-cell>
          <table:table-cell table:style-name="ce423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5]+1" office:value-type="date" office:date-value="2022-07-31" calcext:value-type="date">
            <text:p>2022/07/31</text:p>
          </table:table-cell>
          <table:table-cell table:style-name="ce423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6]+6" office:value-type="date" office:date-value="2022-08-06" calcext:value-type="date">
            <text:p>2022/08/06</text:p>
          </table:table-cell>
          <table:table-cell table:style-name="ce423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7]+1" office:value-type="date" office:date-value="2022-08-07" calcext:value-type="date">
            <text:p>2022/08/07</text:p>
          </table:table-cell>
          <table:table-cell table:style-name="ce423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8]+6" office:value-type="date" office:date-value="2022-08-13" calcext:value-type="date">
            <text:p>2022/08/13</text:p>
          </table:table-cell>
          <table:table-cell table:style-name="ce423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9]+1" office:value-type="date" office:date-value="2022-08-14" calcext:value-type="date">
            <text:p>2022/08/14</text:p>
          </table:table-cell>
          <table:table-cell table:style-name="ce423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0]+6" office:value-type="date" office:date-value="2022-08-20" calcext:value-type="date">
            <text:p>2022/08/20</text:p>
          </table:table-cell>
          <table:table-cell table:style-name="ce423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1]+1" office:value-type="date" office:date-value="2022-08-21" calcext:value-type="date">
            <text:p>2022/08/21</text:p>
          </table:table-cell>
          <table:table-cell table:style-name="ce423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2]+6" office:value-type="date" office:date-value="2022-08-27" calcext:value-type="date">
            <text:p>2022/08/27</text:p>
          </table:table-cell>
          <table:table-cell table:style-name="ce423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3]+1" office:value-type="date" office:date-value="2022-08-28" calcext:value-type="date">
            <text:p>2022/08/28</text:p>
          </table:table-cell>
          <table:table-cell table:style-name="ce423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4]+6" office:value-type="date" office:date-value="2022-09-03" calcext:value-type="date">
            <text:p>2022/09/03</text:p>
          </table:table-cell>
          <table:table-cell table:style-name="ce423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5]+1" office:value-type="date" office:date-value="2022-09-04" calcext:value-type="date">
            <text:p>2022/09/04</text:p>
          </table:table-cell>
          <table:table-cell table:style-name="ce423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6]+6" office:value-type="date" office:date-value="2022-09-10" calcext:value-type="date">
            <text:p>2022/09/10</text:p>
          </table:table-cell>
          <table:table-cell table:style-name="ce423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7]+1" office:value-type="date" office:date-value="2022-09-11" calcext:value-type="date">
            <text:p>2022/09/11</text:p>
          </table:table-cell>
          <table:table-cell table:style-name="ce423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8]+6" office:value-type="date" office:date-value="2022-09-17" calcext:value-type="date">
            <text:p>2022/09/17</text:p>
          </table:table-cell>
          <table:table-cell table:style-name="ce423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9]+1" office:value-type="date" office:date-value="2022-09-18" calcext:value-type="date">
            <text:p>2022/09/18</text:p>
          </table:table-cell>
          <table:table-cell table:style-name="ce423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0]+6" office:value-type="date" office:date-value="2022-09-24" calcext:value-type="date">
            <text:p>2022/09/24</text:p>
          </table:table-cell>
          <table:table-cell table:style-name="ce423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1]+1" office:value-type="date" office:date-value="2022-09-25" calcext:value-type="date">
            <text:p>2022/09/25</text:p>
          </table:table-cell>
          <table:table-cell table:style-name="ce423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2]+6" office:value-type="date" office:date-value="2022-10-01" calcext:value-type="date">
            <text:p>2022/10/01</text:p>
          </table:table-cell>
          <table:table-cell table:style-name="ce423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3]+1" office:value-type="date" office:date-value="2022-10-02" calcext:value-type="date">
            <text:p>2022/10/02</text:p>
          </table:table-cell>
          <table:table-cell table:style-name="ce423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4]+6" office:value-type="date" office:date-value="2022-10-08" calcext:value-type="date">
            <text:p>2022/10/08</text:p>
          </table:table-cell>
          <table:table-cell table:style-name="ce423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5]+1" office:value-type="date" office:date-value="2022-10-09" calcext:value-type="date">
            <text:p>2022/10/09</text:p>
          </table:table-cell>
          <table:table-cell table:style-name="ce423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6]+6" office:value-type="date" office:date-value="2022-10-15" calcext:value-type="date">
            <text:p>2022/10/15</text:p>
          </table:table-cell>
          <table:table-cell table:style-name="ce423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7]+1" office:value-type="date" office:date-value="2022-10-16" calcext:value-type="date">
            <text:p>2022/10/16</text:p>
          </table:table-cell>
          <table:table-cell table:style-name="ce423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8]+6" office:value-type="date" office:date-value="2022-10-22" calcext:value-type="date">
            <text:p>2022/10/22</text:p>
          </table:table-cell>
          <table:table-cell table:style-name="ce423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9]+1" office:value-type="date" office:date-value="2022-10-23" calcext:value-type="date">
            <text:p>2022/10/23</text:p>
          </table:table-cell>
          <table:table-cell table:style-name="ce423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0]+6" office:value-type="date" office:date-value="2022-10-29" calcext:value-type="date">
            <text:p>2022/10/29</text:p>
          </table:table-cell>
          <table:table-cell table:style-name="ce423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1]+1" office:value-type="date" office:date-value="2022-10-30" calcext:value-type="date">
            <text:p>2022/10/30</text:p>
          </table:table-cell>
          <table:table-cell table:style-name="ce423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2]+6" office:value-type="date" office:date-value="2022-11-05" calcext:value-type="date">
            <text:p>2022/11/05</text:p>
          </table:table-cell>
          <table:table-cell table:style-name="ce423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3]+1" office:value-type="date" office:date-value="2022-11-06" calcext:value-type="date">
            <text:p>2022/11/06</text:p>
          </table:table-cell>
          <table:table-cell table:style-name="ce423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4]+6" office:value-type="date" office:date-value="2022-11-12" calcext:value-type="date">
            <text:p>2022/11/12</text:p>
          </table:table-cell>
          <table:table-cell table:style-name="ce423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5]+1" office:value-type="date" office:date-value="2022-11-13" calcext:value-type="date">
            <text:p>2022/11/13</text:p>
          </table:table-cell>
          <table:table-cell table:style-name="ce423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6]+6" office:value-type="date" office:date-value="2022-11-19" calcext:value-type="date">
            <text:p>2022/11/19</text:p>
          </table:table-cell>
          <table:table-cell table:style-name="ce423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7]+1" office:value-type="date" office:date-value="2022-11-20" calcext:value-type="date">
            <text:p>2022/11/20</text:p>
          </table:table-cell>
          <table:table-cell table:style-name="ce423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8]+6" office:value-type="date" office:date-value="2022-11-26" calcext:value-type="date">
            <text:p>2022/11/26</text:p>
          </table:table-cell>
          <table:table-cell table:style-name="ce423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9]+1" office:value-type="date" office:date-value="2022-11-27" calcext:value-type="date">
            <text:p>2022/11/27</text:p>
          </table:table-cell>
          <table:table-cell table:style-name="ce423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0]+6" office:value-type="date" office:date-value="2022-12-03" calcext:value-type="date">
            <text:p>2022/12/03</text:p>
          </table:table-cell>
          <table:table-cell table:style-name="ce423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1]+1" office:value-type="date" office:date-value="2022-12-04" calcext:value-type="date">
            <text:p>2022/12/04</text:p>
          </table:table-cell>
          <table:table-cell table:style-name="ce423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2]+6" office:value-type="date" office:date-value="2022-12-10" calcext:value-type="date">
            <text:p>2022/12/10</text:p>
          </table:table-cell>
          <table:table-cell table:style-name="ce423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3]+1" office:value-type="date" office:date-value="2022-12-11" calcext:value-type="date">
            <text:p>2022/12/11</text:p>
          </table:table-cell>
          <table:table-cell table:style-name="ce423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4]+6" office:value-type="date" office:date-value="2022-12-17" calcext:value-type="date">
            <text:p>2022/12/17</text:p>
          </table:table-cell>
          <table:table-cell table:style-name="ce423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5]+1" office:value-type="date" office:date-value="2022-12-18" calcext:value-type="date">
            <text:p>2022/12/18</text:p>
          </table:table-cell>
          <table:table-cell table:style-name="ce423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6]+6" office:value-type="date" office:date-value="2022-12-24" calcext:value-type="date">
            <text:p>2022/12/24</text:p>
          </table:table-cell>
          <table:table-cell table:style-name="ce423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7]+1" office:value-type="date" office:date-value="2022-12-25" calcext:value-type="date">
            <text:p>2022/12/25</text:p>
          </table:table-cell>
          <table:table-cell table:style-name="ce423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8]+6" office:value-type="date" office:date-value="2022-12-31" calcext:value-type="date">
            <text:p>2022/12/31</text:p>
          </table:table-cell>
          <table:table-cell table:style-name="ce423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9]+1" office:value-type="date" office:date-value="2023-01-01" calcext:value-type="date">
            <text:p>2023/01/01</text:p>
          </table:table-cell>
          <table:table-cell table:style-name="ce423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0]+6" office:value-type="date" office:date-value="2023-01-07" calcext:value-type="date">
            <text:p>2023/01/07</text:p>
          </table:table-cell>
          <table:table-cell table:style-name="ce423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1]+1" office:value-type="date" office:date-value="2023-01-08" calcext:value-type="date">
            <text:p>2023/01/08</text:p>
          </table:table-cell>
          <table:table-cell table:style-name="ce423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2]+6" office:value-type="date" office:date-value="2023-01-14" calcext:value-type="date">
            <text:p>2023/01/14</text:p>
          </table:table-cell>
          <table:table-cell table:style-name="ce423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3]+1" office:value-type="date" office:date-value="2023-01-15" calcext:value-type="date">
            <text:p>2023/01/15</text:p>
          </table:table-cell>
          <table:table-cell table:style-name="ce423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4]+6" office:value-type="date" office:date-value="2023-01-21" calcext:value-type="date">
            <text:p>2023/01/21</text:p>
          </table:table-cell>
          <table:table-cell table:style-name="ce423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5]+1" office:value-type="date" office:date-value="2023-01-22" calcext:value-type="date">
            <text:p>2023/01/22</text:p>
          </table:table-cell>
          <table:table-cell table:style-name="ce423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6]+6" office:value-type="date" office:date-value="2023-01-28" calcext:value-type="date">
            <text:p>2023/01/28</text:p>
          </table:table-cell>
          <table:table-cell table:style-name="ce423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7]+1" office:value-type="date" office:date-value="2023-01-29" calcext:value-type="date">
            <text:p>2023/01/29</text:p>
          </table:table-cell>
          <table:table-cell table:style-name="ce423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8]+6" office:value-type="date" office:date-value="2023-02-04" calcext:value-type="date">
            <text:p>2023/02/04</text:p>
          </table:table-cell>
          <table:table-cell table:style-name="ce423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9]+1" office:value-type="date" office:date-value="2023-02-05" calcext:value-type="date">
            <text:p>2023/02/05</text:p>
          </table:table-cell>
          <table:table-cell table:style-name="ce423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0]+6" office:value-type="date" office:date-value="2023-02-11" calcext:value-type="date">
            <text:p>2023/02/11</text:p>
          </table:table-cell>
          <table:table-cell table:style-name="ce423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1]+1" office:value-type="date" office:date-value="2023-02-12" calcext:value-type="date">
            <text:p>2023/02/12</text:p>
          </table:table-cell>
          <table:table-cell table:style-name="ce423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2]+6" office:value-type="date" office:date-value="2023-02-18" calcext:value-type="date">
            <text:p>2023/02/18</text:p>
          </table:table-cell>
          <table:table-cell table:style-name="ce423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3]+1" office:value-type="date" office:date-value="2023-02-19" calcext:value-type="date">
            <text:p>2023/02/19</text:p>
          </table:table-cell>
          <table:table-cell table:style-name="ce423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4]+6" office:value-type="date" office:date-value="2023-02-25" calcext:value-type="date">
            <text:p>2023/02/25</text:p>
          </table:table-cell>
          <table:table-cell table:style-name="ce423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5]+1" office:value-type="date" office:date-value="2023-02-26" calcext:value-type="date">
            <text:p>2023/02/26</text:p>
          </table:table-cell>
          <table:table-cell table:style-name="ce423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6]+6" office:value-type="date" office:date-value="2023-03-04" calcext:value-type="date">
            <text:p>2023/03/04</text:p>
          </table:table-cell>
          <table:table-cell table:style-name="ce423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7]+1" office:value-type="date" office:date-value="2023-03-05" calcext:value-type="date">
            <text:p>2023/03/05</text:p>
          </table:table-cell>
          <table:table-cell table:style-name="ce423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8]+6" office:value-type="date" office:date-value="2023-03-11" calcext:value-type="date">
            <text:p>2023/03/11</text:p>
          </table:table-cell>
          <table:table-cell table:style-name="ce423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9]+1" office:value-type="date" office:date-value="2023-03-12" calcext:value-type="date">
            <text:p>2023/03/12</text:p>
          </table:table-cell>
          <table:table-cell table:style-name="ce423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0]+6" office:value-type="date" office:date-value="2023-03-18" calcext:value-type="date">
            <text:p>2023/03/18</text:p>
          </table:table-cell>
          <table:table-cell table:style-name="ce423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1]+1" office:value-type="date" office:date-value="2023-03-19" calcext:value-type="date">
            <text:p>2023/03/19</text:p>
          </table:table-cell>
          <table:table-cell table:style-name="ce423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2]+6" office:value-type="date" office:date-value="2023-03-25" calcext:value-type="date">
            <text:p>2023/03/25</text:p>
          </table:table-cell>
          <table:table-cell table:style-name="ce423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3]+1" office:value-type="date" office:date-value="2023-03-26" calcext:value-type="date">
            <text:p>2023/03/26</text:p>
          </table:table-cell>
          <table:table-cell table:style-name="ce423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4]+6" office:value-type="date" office:date-value="2023-04-01" calcext:value-type="date">
            <text:p>2023/04/01</text:p>
          </table:table-cell>
          <table:table-cell table:style-name="ce423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5]+1" office:value-type="date" office:date-value="2023-04-02" calcext:value-type="date">
            <text:p>2023/04/02</text:p>
          </table:table-cell>
          <table:table-cell table:style-name="ce423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6]+6" office:value-type="date" office:date-value="2023-04-08" calcext:value-type="date">
            <text:p>2023/04/08</text:p>
          </table:table-cell>
          <table:table-cell table:style-name="ce423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7]+1" office:value-type="date" office:date-value="2023-04-09" calcext:value-type="date">
            <text:p>2023/04/09</text:p>
          </table:table-cell>
          <table:table-cell table:style-name="ce423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8]+6" office:value-type="date" office:date-value="2023-04-15" calcext:value-type="date">
            <text:p>2023/04/15</text:p>
          </table:table-cell>
          <table:table-cell table:style-name="ce423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9]+1" office:value-type="date" office:date-value="2023-04-16" calcext:value-type="date">
            <text:p>2023/04/16</text:p>
          </table:table-cell>
          <table:table-cell table:style-name="ce423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0]+6" office:value-type="date" office:date-value="2023-04-22" calcext:value-type="date">
            <text:p>2023/04/22</text:p>
          </table:table-cell>
          <table:table-cell table:style-name="ce423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1]+1" office:value-type="date" office:date-value="2023-04-23" calcext:value-type="date">
            <text:p>2023/04/23</text:p>
          </table:table-cell>
          <table:table-cell table:style-name="ce423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2]+6" office:value-type="date" office:date-value="2023-04-29" calcext:value-type="date">
            <text:p>2023/04/29</text:p>
          </table:table-cell>
          <table:table-cell table:style-name="ce423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3]+1" office:value-type="date" office:date-value="2023-04-30" calcext:value-type="date">
            <text:p>2023/04/30</text:p>
          </table:table-cell>
          <table:table-cell table:style-name="ce423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4]+6" office:value-type="date" office:date-value="2023-05-06" calcext:value-type="date">
            <text:p>2023/05/06</text:p>
          </table:table-cell>
          <table:table-cell table:style-name="ce423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5]+1" office:value-type="date" office:date-value="2023-05-07" calcext:value-type="date">
            <text:p>2023/05/07</text:p>
          </table:table-cell>
          <table:table-cell table:style-name="ce423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6]+6" office:value-type="date" office:date-value="2023-05-13" calcext:value-type="date">
            <text:p>2023/05/13</text:p>
          </table:table-cell>
          <table:table-cell table:style-name="ce423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7]+1" office:value-type="date" office:date-value="2023-05-14" calcext:value-type="date">
            <text:p>2023/05/14</text:p>
          </table:table-cell>
          <table:table-cell table:style-name="ce423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8]+6" office:value-type="date" office:date-value="2023-05-20" calcext:value-type="date">
            <text:p>2023/05/20</text:p>
          </table:table-cell>
          <table:table-cell table:style-name="ce423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9]+1" office:value-type="date" office:date-value="2023-05-21" calcext:value-type="date">
            <text:p>2023/05/21</text:p>
          </table:table-cell>
          <table:table-cell table:style-name="ce423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0]+6" office:value-type="date" office:date-value="2023-05-27" calcext:value-type="date">
            <text:p>2023/05/27</text:p>
          </table:table-cell>
          <table:table-cell table:style-name="ce423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1]+1" office:value-type="date" office:date-value="2023-05-28" calcext:value-type="date">
            <text:p>2023/05/28</text:p>
          </table:table-cell>
          <table:table-cell table:style-name="ce423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2]+6" office:value-type="date" office:date-value="2023-06-03" calcext:value-type="date">
            <text:p>2023/06/03</text:p>
          </table:table-cell>
          <table:table-cell table:style-name="ce423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3]+1" office:value-type="date" office:date-value="2023-06-04" calcext:value-type="date">
            <text:p>2023/06/04</text:p>
          </table:table-cell>
          <table:table-cell table:style-name="ce423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4]+6" office:value-type="date" office:date-value="2023-06-10" calcext:value-type="date">
            <text:p>2023/06/10</text:p>
          </table:table-cell>
          <table:table-cell table:style-name="ce423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5]+1" office:value-type="date" office:date-value="2023-06-11" calcext:value-type="date">
            <text:p>2023/06/11</text:p>
          </table:table-cell>
          <table:table-cell table:style-name="ce423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6]+6" office:value-type="date" office:date-value="2023-06-17" calcext:value-type="date">
            <text:p>2023/06/17</text:p>
          </table:table-cell>
          <table:table-cell table:style-name="ce423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7]+1" office:value-type="date" office:date-value="2023-06-18" calcext:value-type="date">
            <text:p>2023/06/18</text:p>
          </table:table-cell>
          <table:table-cell table:style-name="ce423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8]+6" office:value-type="date" office:date-value="2023-06-24" calcext:value-type="date">
            <text:p>2023/06/24</text:p>
          </table:table-cell>
          <table:table-cell table:style-name="ce423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9]+1" office:value-type="date" office:date-value="2023-06-25" calcext:value-type="date">
            <text:p>2023/06/25</text:p>
          </table:table-cell>
          <table:table-cell table:style-name="ce423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0]+6" office:value-type="date" office:date-value="2023-07-01" calcext:value-type="date">
            <text:p>2023/07/01</text:p>
          </table:table-cell>
          <table:table-cell table:style-name="ce423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1]+1" office:value-type="date" office:date-value="2023-07-02" calcext:value-type="date">
            <text:p>2023/07/02</text:p>
          </table:table-cell>
          <table:table-cell table:style-name="ce423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2]+6" office:value-type="date" office:date-value="2023-07-08" calcext:value-type="date">
            <text:p>2023/07/08</text:p>
          </table:table-cell>
          <table:table-cell table:style-name="ce423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3]+1" office:value-type="date" office:date-value="2023-07-09" calcext:value-type="date">
            <text:p>2023/07/09</text:p>
          </table:table-cell>
          <table:table-cell table:style-name="ce423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4]+6" office:value-type="date" office:date-value="2023-07-15" calcext:value-type="date">
            <text:p>2023/07/15</text:p>
          </table:table-cell>
          <table:table-cell table:style-name="ce423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5]+1" office:value-type="date" office:date-value="2023-07-16" calcext:value-type="date">
            <text:p>2023/07/16</text:p>
          </table:table-cell>
          <table:table-cell table:style-name="ce423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6]+6" office:value-type="date" office:date-value="2023-07-22" calcext:value-type="date">
            <text:p>2023/07/22</text:p>
          </table:table-cell>
          <table:table-cell table:style-name="ce423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7]+1" office:value-type="date" office:date-value="2023-07-23" calcext:value-type="date">
            <text:p>2023/07/23</text:p>
          </table:table-cell>
          <table:table-cell table:style-name="ce423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8]+6" office:value-type="date" office:date-value="2023-07-29" calcext:value-type="date">
            <text:p>2023/07/29</text:p>
          </table:table-cell>
          <table:table-cell table:style-name="ce423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9]+1" office:value-type="date" office:date-value="2023-07-30" calcext:value-type="date">
            <text:p>2023/07/30</text:p>
          </table:table-cell>
          <table:table-cell table:style-name="ce423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0]+6" office:value-type="date" office:date-value="2023-08-05" calcext:value-type="date">
            <text:p>2023/08/05</text:p>
          </table:table-cell>
          <table:table-cell table:style-name="ce423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1]+1" office:value-type="date" office:date-value="2023-08-06" calcext:value-type="date">
            <text:p>2023/08/06</text:p>
          </table:table-cell>
          <table:table-cell table:style-name="ce423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2]+6" office:value-type="date" office:date-value="2023-08-12" calcext:value-type="date">
            <text:p>2023/08/12</text:p>
          </table:table-cell>
          <table:table-cell table:style-name="ce423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3]+1" office:value-type="date" office:date-value="2023-08-13" calcext:value-type="date">
            <text:p>2023/08/13</text:p>
          </table:table-cell>
          <table:table-cell table:style-name="ce423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4]+6" office:value-type="date" office:date-value="2023-08-19" calcext:value-type="date">
            <text:p>2023/08/19</text:p>
          </table:table-cell>
          <table:table-cell table:style-name="ce423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5]+1" office:value-type="date" office:date-value="2023-08-20" calcext:value-type="date">
            <text:p>2023/08/20</text:p>
          </table:table-cell>
          <table:table-cell table:style-name="ce423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6]+6" office:value-type="date" office:date-value="2023-08-26" calcext:value-type="date">
            <text:p>2023/08/26</text:p>
          </table:table-cell>
          <table:table-cell table:style-name="ce423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7]+1" office:value-type="date" office:date-value="2023-08-27" calcext:value-type="date">
            <text:p>2023/08/27</text:p>
          </table:table-cell>
          <table:table-cell table:style-name="ce423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8]+6" office:value-type="date" office:date-value="2023-09-02" calcext:value-type="date">
            <text:p>2023/09/02</text:p>
          </table:table-cell>
          <table:table-cell table:style-name="ce423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9]+1" office:value-type="date" office:date-value="2023-09-03" calcext:value-type="date">
            <text:p>2023/09/03</text:p>
          </table:table-cell>
          <table:table-cell table:style-name="ce423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0]+6" office:value-type="date" office:date-value="2023-09-09" calcext:value-type="date">
            <text:p>2023/09/09</text:p>
          </table:table-cell>
          <table:table-cell table:style-name="ce423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1]+1" office:value-type="date" office:date-value="2023-09-10" calcext:value-type="date">
            <text:p>2023/09/10</text:p>
          </table:table-cell>
          <table:table-cell table:style-name="ce423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2]+6" office:value-type="date" office:date-value="2023-09-16" calcext:value-type="date">
            <text:p>2023/09/16</text:p>
          </table:table-cell>
          <table:table-cell table:style-name="ce423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3]+1" office:value-type="date" office:date-value="2023-09-17" calcext:value-type="date">
            <text:p>2023/09/17</text:p>
          </table:table-cell>
          <table:table-cell table:style-name="ce423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4]+6" office:value-type="date" office:date-value="2023-09-23" calcext:value-type="date">
            <text:p>2023/09/23</text:p>
          </table:table-cell>
          <table:table-cell table:style-name="ce423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5]+1" office:value-type="date" office:date-value="2023-09-24" calcext:value-type="date">
            <text:p>2023/09/24</text:p>
          </table:table-cell>
          <table:table-cell table:style-name="ce423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6]+6" office:value-type="date" office:date-value="2023-09-30" calcext:value-type="date">
            <text:p>2023/09/30</text:p>
          </table:table-cell>
          <table:table-cell table:style-name="ce423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7]+1" office:value-type="date" office:date-value="2023-10-01" calcext:value-type="date">
            <text:p>2023/10/01</text:p>
          </table:table-cell>
          <table:table-cell table:style-name="ce423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8]+6" office:value-type="date" office:date-value="2023-10-07" calcext:value-type="date">
            <text:p>2023/10/07</text:p>
          </table:table-cell>
          <table:table-cell table:style-name="ce423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9]+1" office:value-type="date" office:date-value="2023-10-08" calcext:value-type="date">
            <text:p>2023/10/08</text:p>
          </table:table-cell>
          <table:table-cell table:style-name="ce423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0]+6" office:value-type="date" office:date-value="2023-10-14" calcext:value-type="date">
            <text:p>2023/10/14</text:p>
          </table:table-cell>
          <table:table-cell table:style-name="ce423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1]+1" office:value-type="date" office:date-value="2023-10-15" calcext:value-type="date">
            <text:p>2023/10/15</text:p>
          </table:table-cell>
          <table:table-cell table:style-name="ce423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2]+6" office:value-type="date" office:date-value="2023-10-21" calcext:value-type="date">
            <text:p>2023/10/21</text:p>
          </table:table-cell>
          <table:table-cell table:style-name="ce423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3]+1" office:value-type="date" office:date-value="2023-10-22" calcext:value-type="date">
            <text:p>2023/10/22</text:p>
          </table:table-cell>
          <table:table-cell table:style-name="ce423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4]+6" office:value-type="date" office:date-value="2023-10-28" calcext:value-type="date">
            <text:p>2023/10/28</text:p>
          </table:table-cell>
          <table:table-cell table:style-name="ce423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5]+1" office:value-type="date" office:date-value="2023-10-29" calcext:value-type="date">
            <text:p>2023/10/29</text:p>
          </table:table-cell>
          <table:table-cell table:style-name="ce423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6]+6" office:value-type="date" office:date-value="2023-11-04" calcext:value-type="date">
            <text:p>2023/11/04</text:p>
          </table:table-cell>
          <table:table-cell table:style-name="ce423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7]+1" office:value-type="date" office:date-value="2023-11-05" calcext:value-type="date">
            <text:p>2023/11/05</text:p>
          </table:table-cell>
          <table:table-cell table:style-name="ce423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8]+6" office:value-type="date" office:date-value="2023-11-11" calcext:value-type="date">
            <text:p>2023/11/11</text:p>
          </table:table-cell>
          <table:table-cell table:style-name="ce423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9]+1" office:value-type="date" office:date-value="2023-11-12" calcext:value-type="date">
            <text:p>2023/11/12</text:p>
          </table:table-cell>
          <table:table-cell table:style-name="ce423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0]+6" office:value-type="date" office:date-value="2023-11-18" calcext:value-type="date">
            <text:p>2023/11/18</text:p>
          </table:table-cell>
          <table:table-cell table:style-name="ce423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1]+1" office:value-type="date" office:date-value="2023-11-19" calcext:value-type="date">
            <text:p>2023/11/19</text:p>
          </table:table-cell>
          <table:table-cell table:style-name="ce423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2]+6" office:value-type="date" office:date-value="2023-11-25" calcext:value-type="date">
            <text:p>2023/11/25</text:p>
          </table:table-cell>
          <table:table-cell table:style-name="ce423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3]+1" office:value-type="date" office:date-value="2023-11-26" calcext:value-type="date">
            <text:p>2023/11/26</text:p>
          </table:table-cell>
          <table:table-cell table:style-name="ce423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4]+6" office:value-type="date" office:date-value="2023-12-02" calcext:value-type="date">
            <text:p>2023/12/02</text:p>
          </table:table-cell>
          <table:table-cell table:style-name="ce423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5]+1" office:value-type="date" office:date-value="2023-12-03" calcext:value-type="date">
            <text:p>2023/12/03</text:p>
          </table:table-cell>
          <table:table-cell table:style-name="ce423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6]+6" office:value-type="date" office:date-value="2023-12-09" calcext:value-type="date">
            <text:p>2023/12/09</text:p>
          </table:table-cell>
          <table:table-cell table:style-name="ce423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7]+1" office:value-type="date" office:date-value="2023-12-10" calcext:value-type="date">
            <text:p>2023/12/10</text:p>
          </table:table-cell>
          <table:table-cell table:style-name="ce423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8]+6" office:value-type="date" office:date-value="2023-12-16" calcext:value-type="date">
            <text:p>2023/12/16</text:p>
          </table:table-cell>
          <table:table-cell table:style-name="ce423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9]+1" office:value-type="date" office:date-value="2023-12-17" calcext:value-type="date">
            <text:p>2023/12/17</text:p>
          </table:table-cell>
          <table:table-cell table:style-name="ce423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0]+6" office:value-type="date" office:date-value="2023-12-23" calcext:value-type="date">
            <text:p>2023/12/23</text:p>
          </table:table-cell>
          <table:table-cell table:style-name="ce423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1]+1" office:value-type="date" office:date-value="2023-12-24" calcext:value-type="date">
            <text:p>2023/12/24</text:p>
          </table:table-cell>
          <table:table-cell table:style-name="ce423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2]+6" office:value-type="date" office:date-value="2023-12-30" calcext:value-type="date">
            <text:p>2023/12/30</text:p>
          </table:table-cell>
          <table:table-cell table:style-name="ce423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3]+1" office:value-type="date" office:date-value="2023-12-31" calcext:value-type="date">
            <text:p>2023/12/31</text:p>
          </table:table-cell>
          <table:table-cell table:style-name="ce423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4]+6" office:value-type="date" office:date-value="2024-01-06" calcext:value-type="date">
            <text:p>2024/01/06</text:p>
          </table:table-cell>
          <table:table-cell table:style-name="ce423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5]+1" office:value-type="date" office:date-value="2024-01-07" calcext:value-type="date">
            <text:p>2024/01/07</text:p>
          </table:table-cell>
          <table:table-cell table:style-name="ce423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6]+6" office:value-type="date" office:date-value="2024-01-13" calcext:value-type="date">
            <text:p>2024/01/13</text:p>
          </table:table-cell>
          <table:table-cell table:style-name="ce423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7]+1" office:value-type="date" office:date-value="2024-01-14" calcext:value-type="date">
            <text:p>2024/01/14</text:p>
          </table:table-cell>
          <table:table-cell table:style-name="ce423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8]+6" office:value-type="date" office:date-value="2024-01-20" calcext:value-type="date">
            <text:p>2024/01/20</text:p>
          </table:table-cell>
          <table:table-cell table:style-name="ce423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9]+1" office:value-type="date" office:date-value="2024-01-21" calcext:value-type="date">
            <text:p>2024/01/21</text:p>
          </table:table-cell>
          <table:table-cell table:style-name="ce423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0]+6" office:value-type="date" office:date-value="2024-01-27" calcext:value-type="date">
            <text:p>2024/01/27</text:p>
          </table:table-cell>
          <table:table-cell table:style-name="ce423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1]+1" office:value-type="date" office:date-value="2024-01-28" calcext:value-type="date">
            <text:p>2024/01/28</text:p>
          </table:table-cell>
          <table:table-cell table:style-name="ce423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2]+6" office:value-type="date" office:date-value="2024-02-03" calcext:value-type="date">
            <text:p>2024/02/03</text:p>
          </table:table-cell>
          <table:table-cell table:style-name="ce423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3]+1" office:value-type="date" office:date-value="2024-02-04" calcext:value-type="date">
            <text:p>2024/02/04</text:p>
          </table:table-cell>
          <table:table-cell table:style-name="ce423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4]+6" office:value-type="date" office:date-value="2024-02-10" calcext:value-type="date">
            <text:p>2024/02/10</text:p>
          </table:table-cell>
          <table:table-cell table:style-name="ce423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5]+1" office:value-type="date" office:date-value="2024-02-11" calcext:value-type="date">
            <text:p>2024/02/11</text:p>
          </table:table-cell>
          <table:table-cell table:style-name="ce423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6]+6" office:value-type="date" office:date-value="2024-02-17" calcext:value-type="date">
            <text:p>2024/02/17</text:p>
          </table:table-cell>
          <table:table-cell table:style-name="ce423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7]+1" office:value-type="date" office:date-value="2024-02-18" calcext:value-type="date">
            <text:p>2024/02/18</text:p>
          </table:table-cell>
          <table:table-cell table:style-name="ce423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8]+6" office:value-type="date" office:date-value="2024-02-24" calcext:value-type="date">
            <text:p>2024/02/24</text:p>
          </table:table-cell>
          <table:table-cell table:style-name="ce423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9]+1" office:value-type="date" office:date-value="2024-02-25" calcext:value-type="date">
            <text:p>2024/02/25</text:p>
          </table:table-cell>
          <table:table-cell table:style-name="ce423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0]+6" office:value-type="date" office:date-value="2024-03-02" calcext:value-type="date">
            <text:p>2024/03/02</text:p>
          </table:table-cell>
          <table:table-cell table:style-name="ce423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1]+1" office:value-type="date" office:date-value="2024-03-03" calcext:value-type="date">
            <text:p>2024/03/03</text:p>
          </table:table-cell>
          <table:table-cell table:style-name="ce423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2]+6" office:value-type="date" office:date-value="2024-03-09" calcext:value-type="date">
            <text:p>2024/03/09</text:p>
          </table:table-cell>
          <table:table-cell table:style-name="ce423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3]+1" office:value-type="date" office:date-value="2024-03-10" calcext:value-type="date">
            <text:p>2024/03/10</text:p>
          </table:table-cell>
          <table:table-cell table:style-name="ce423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4]+6" office:value-type="date" office:date-value="2024-03-16" calcext:value-type="date">
            <text:p>2024/03/16</text:p>
          </table:table-cell>
          <table:table-cell table:style-name="ce423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5]+1" office:value-type="date" office:date-value="2024-03-17" calcext:value-type="date">
            <text:p>2024/03/17</text:p>
          </table:table-cell>
          <table:table-cell table:style-name="ce423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6]+6" office:value-type="date" office:date-value="2024-03-23" calcext:value-type="date">
            <text:p>2024/03/23</text:p>
          </table:table-cell>
          <table:table-cell table:style-name="ce423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7]+1" office:value-type="date" office:date-value="2024-03-24" calcext:value-type="date">
            <text:p>2024/03/24</text:p>
          </table:table-cell>
          <table:table-cell table:style-name="ce423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8]+6" office:value-type="date" office:date-value="2024-03-30" calcext:value-type="date">
            <text:p>2024/03/30</text:p>
          </table:table-cell>
          <table:table-cell table:style-name="ce423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9]+1" office:value-type="date" office:date-value="2024-03-31" calcext:value-type="date">
            <text:p>2024/03/31</text:p>
          </table:table-cell>
          <table:table-cell table:style-name="ce423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0]+6" office:value-type="date" office:date-value="2024-04-06" calcext:value-type="date">
            <text:p>2024/04/06</text:p>
          </table:table-cell>
          <table:table-cell table:style-name="ce423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1]+1" office:value-type="date" office:date-value="2024-04-07" calcext:value-type="date">
            <text:p>2024/04/07</text:p>
          </table:table-cell>
          <table:table-cell table:style-name="ce423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2]+6" office:value-type="date" office:date-value="2024-04-13" calcext:value-type="date">
            <text:p>2024/04/13</text:p>
          </table:table-cell>
          <table:table-cell table:style-name="ce423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3]+1" office:value-type="date" office:date-value="2024-04-14" calcext:value-type="date">
            <text:p>2024/04/14</text:p>
          </table:table-cell>
          <table:table-cell table:style-name="ce423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4]+6" office:value-type="date" office:date-value="2024-04-20" calcext:value-type="date">
            <text:p>2024/04/20</text:p>
          </table:table-cell>
          <table:table-cell table:style-name="ce423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5]+1" office:value-type="date" office:date-value="2024-04-21" calcext:value-type="date">
            <text:p>2024/04/21</text:p>
          </table:table-cell>
          <table:table-cell table:style-name="ce423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6]+6" office:value-type="date" office:date-value="2024-04-27" calcext:value-type="date">
            <text:p>2024/04/27</text:p>
          </table:table-cell>
          <table:table-cell table:style-name="ce423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7]+1" office:value-type="date" office:date-value="2024-04-28" calcext:value-type="date">
            <text:p>2024/04/28</text:p>
          </table:table-cell>
          <table:table-cell table:style-name="ce423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8]+6" office:value-type="date" office:date-value="2024-05-04" calcext:value-type="date">
            <text:p>2024/05/04</text:p>
          </table:table-cell>
          <table:table-cell table:style-name="ce423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9]+1" office:value-type="date" office:date-value="2024-05-05" calcext:value-type="date">
            <text:p>2024/05/05</text:p>
          </table:table-cell>
          <table:table-cell table:style-name="ce423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0]+6" office:value-type="date" office:date-value="2024-05-11" calcext:value-type="date">
            <text:p>2024/05/11</text:p>
          </table:table-cell>
          <table:table-cell table:style-name="ce423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1]+1" office:value-type="date" office:date-value="2024-05-12" calcext:value-type="date">
            <text:p>2024/05/12</text:p>
          </table:table-cell>
          <table:table-cell table:style-name="ce423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2]+6" office:value-type="date" office:date-value="2024-05-18" calcext:value-type="date">
            <text:p>2024/05/18</text:p>
          </table:table-cell>
          <table:table-cell table:style-name="ce423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3]+1" office:value-type="date" office:date-value="2024-05-19" calcext:value-type="date">
            <text:p>2024/05/19</text:p>
          </table:table-cell>
          <table:table-cell table:style-name="ce423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4]+6" office:value-type="date" office:date-value="2024-05-25" calcext:value-type="date">
            <text:p>2024/05/25</text:p>
          </table:table-cell>
          <table:table-cell table:style-name="ce423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5]+1" office:value-type="date" office:date-value="2024-05-26" calcext:value-type="date">
            <text:p>2024/05/26</text:p>
          </table:table-cell>
          <table:table-cell table:style-name="ce423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6]+6" office:value-type="date" office:date-value="2024-06-01" calcext:value-type="date">
            <text:p>2024/06/01</text:p>
          </table:table-cell>
          <table:table-cell table:style-name="ce423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7]+1" office:value-type="date" office:date-value="2024-06-02" calcext:value-type="date">
            <text:p>2024/06/02</text:p>
          </table:table-cell>
          <table:table-cell table:style-name="ce423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8]+6" office:value-type="date" office:date-value="2024-06-08" calcext:value-type="date">
            <text:p>2024/06/08</text:p>
          </table:table-cell>
          <table:table-cell table:style-name="ce423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9]+1" office:value-type="date" office:date-value="2024-06-09" calcext:value-type="date">
            <text:p>2024/06/09</text:p>
          </table:table-cell>
          <table:table-cell table:style-name="ce423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0]+6" office:value-type="date" office:date-value="2024-06-15" calcext:value-type="date">
            <text:p>2024/06/15</text:p>
          </table:table-cell>
          <table:table-cell table:style-name="ce423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1]+1" office:value-type="date" office:date-value="2024-06-16" calcext:value-type="date">
            <text:p>2024/06/16</text:p>
          </table:table-cell>
          <table:table-cell table:style-name="ce423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2]+6" office:value-type="date" office:date-value="2024-06-22" calcext:value-type="date">
            <text:p>2024/06/22</text:p>
          </table:table-cell>
          <table:table-cell table:style-name="ce423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3]+1" office:value-type="date" office:date-value="2024-06-23" calcext:value-type="date">
            <text:p>2024/06/23</text:p>
          </table:table-cell>
          <table:table-cell table:style-name="ce423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4]+6" office:value-type="date" office:date-value="2024-06-29" calcext:value-type="date">
            <text:p>2024/06/29</text:p>
          </table:table-cell>
          <table:table-cell table:style-name="ce423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5]+1" office:value-type="date" office:date-value="2024-06-30" calcext:value-type="date">
            <text:p>2024/06/30</text:p>
          </table:table-cell>
          <table:table-cell table:style-name="ce423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6]+6" office:value-type="date" office:date-value="2024-07-06" calcext:value-type="date">
            <text:p>2024/07/06</text:p>
          </table:table-cell>
          <table:table-cell table:style-name="ce423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7]+1" office:value-type="date" office:date-value="2024-07-07" calcext:value-type="date">
            <text:p>2024/07/07</text:p>
          </table:table-cell>
          <table:table-cell table:style-name="ce423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8]+6" office:value-type="date" office:date-value="2024-07-13" calcext:value-type="date">
            <text:p>2024/07/13</text:p>
          </table:table-cell>
          <table:table-cell table:style-name="ce423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9]+1" office:value-type="date" office:date-value="2024-07-14" calcext:value-type="date">
            <text:p>2024/07/14</text:p>
          </table:table-cell>
          <table:table-cell table:style-name="ce423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0]+6" office:value-type="date" office:date-value="2024-07-20" calcext:value-type="date">
            <text:p>2024/07/20</text:p>
          </table:table-cell>
          <table:table-cell table:style-name="ce423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1]+1" office:value-type="date" office:date-value="2024-07-21" calcext:value-type="date">
            <text:p>2024/07/21</text:p>
          </table:table-cell>
          <table:table-cell table:style-name="ce423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2]+6" office:value-type="date" office:date-value="2024-07-27" calcext:value-type="date">
            <text:p>2024/07/27</text:p>
          </table:table-cell>
          <table:table-cell table:style-name="ce423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3]+1" office:value-type="date" office:date-value="2024-07-28" calcext:value-type="date">
            <text:p>2024/07/28</text:p>
          </table:table-cell>
          <table:table-cell table:style-name="ce423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4]+6" office:value-type="date" office:date-value="2024-08-03" calcext:value-type="date">
            <text:p>2024/08/03</text:p>
          </table:table-cell>
          <table:table-cell table:style-name="ce423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5]+1" office:value-type="date" office:date-value="2024-08-04" calcext:value-type="date">
            <text:p>2024/08/04</text:p>
          </table:table-cell>
          <table:table-cell table:style-name="ce423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6]+6" office:value-type="date" office:date-value="2024-08-10" calcext:value-type="date">
            <text:p>2024/08/10</text:p>
          </table:table-cell>
          <table:table-cell table:style-name="ce423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7]+1" office:value-type="date" office:date-value="2024-08-11" calcext:value-type="date">
            <text:p>2024/08/11</text:p>
          </table:table-cell>
          <table:table-cell table:style-name="ce423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8]+6" office:value-type="date" office:date-value="2024-08-17" calcext:value-type="date">
            <text:p>2024/08/17</text:p>
          </table:table-cell>
          <table:table-cell table:style-name="ce423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9]+1" office:value-type="date" office:date-value="2024-08-18" calcext:value-type="date">
            <text:p>2024/08/18</text:p>
          </table:table-cell>
          <table:table-cell table:style-name="ce423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0]+6" office:value-type="date" office:date-value="2024-08-24" calcext:value-type="date">
            <text:p>2024/08/24</text:p>
          </table:table-cell>
          <table:table-cell table:style-name="ce423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1]+1" office:value-type="date" office:date-value="2024-08-25" calcext:value-type="date">
            <text:p>2024/08/25</text:p>
          </table:table-cell>
          <table:table-cell table:style-name="ce423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2]+6" office:value-type="date" office:date-value="2024-08-31" calcext:value-type="date">
            <text:p>2024/08/31</text:p>
          </table:table-cell>
          <table:table-cell table:style-name="ce423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3]+1" office:value-type="date" office:date-value="2024-09-01" calcext:value-type="date">
            <text:p>2024/09/01</text:p>
          </table:table-cell>
          <table:table-cell table:style-name="ce423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4]+6" office:value-type="date" office:date-value="2024-09-07" calcext:value-type="date">
            <text:p>2024/09/07</text:p>
          </table:table-cell>
          <table:table-cell table:style-name="ce423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5]+1" office:value-type="date" office:date-value="2024-09-08" calcext:value-type="date">
            <text:p>2024/09/08</text:p>
          </table:table-cell>
          <table:table-cell table:style-name="ce423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6]+6" office:value-type="date" office:date-value="2024-09-14" calcext:value-type="date">
            <text:p>2024/09/14</text:p>
          </table:table-cell>
          <table:table-cell table:style-name="ce423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7]+1" office:value-type="date" office:date-value="2024-09-15" calcext:value-type="date">
            <text:p>2024/09/15</text:p>
          </table:table-cell>
          <table:table-cell table:style-name="ce423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8]+6" office:value-type="date" office:date-value="2024-09-21" calcext:value-type="date">
            <text:p>2024/09/21</text:p>
          </table:table-cell>
          <table:table-cell table:style-name="ce423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9]+1" office:value-type="date" office:date-value="2024-09-22" calcext:value-type="date">
            <text:p>2024/09/22</text:p>
          </table:table-cell>
          <table:table-cell table:style-name="ce423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0]+6" office:value-type="date" office:date-value="2024-09-28" calcext:value-type="date">
            <text:p>2024/09/28</text:p>
          </table:table-cell>
          <table:table-cell table:style-name="ce423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1]+1" office:value-type="date" office:date-value="2024-09-29" calcext:value-type="date">
            <text:p>2024/09/29</text:p>
          </table:table-cell>
          <table:table-cell table:style-name="ce423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2]+6" office:value-type="date" office:date-value="2024-10-05" calcext:value-type="date">
            <text:p>2024/10/05</text:p>
          </table:table-cell>
          <table:table-cell table:style-name="ce423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3]+1" office:value-type="date" office:date-value="2024-10-06" calcext:value-type="date">
            <text:p>2024/10/06</text:p>
          </table:table-cell>
          <table:table-cell table:style-name="ce423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4]+6" office:value-type="date" office:date-value="2024-10-12" calcext:value-type="date">
            <text:p>2024/10/12</text:p>
          </table:table-cell>
          <table:table-cell table:style-name="ce423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5]+1" office:value-type="date" office:date-value="2024-10-13" calcext:value-type="date">
            <text:p>2024/10/13</text:p>
          </table:table-cell>
          <table:table-cell table:style-name="ce423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6]+6" office:value-type="date" office:date-value="2024-10-19" calcext:value-type="date">
            <text:p>2024/10/19</text:p>
          </table:table-cell>
          <table:table-cell table:style-name="ce423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7]+1" office:value-type="date" office:date-value="2024-10-20" calcext:value-type="date">
            <text:p>2024/10/20</text:p>
          </table:table-cell>
          <table:table-cell table:style-name="ce423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8]+6" office:value-type="date" office:date-value="2024-10-26" calcext:value-type="date">
            <text:p>2024/10/26</text:p>
          </table:table-cell>
          <table:table-cell table:style-name="ce423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9]+1" office:value-type="date" office:date-value="2024-10-27" calcext:value-type="date">
            <text:p>2024/10/27</text:p>
          </table:table-cell>
          <table:table-cell table:style-name="ce423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0]+6" office:value-type="date" office:date-value="2024-11-02" calcext:value-type="date">
            <text:p>2024/11/02</text:p>
          </table:table-cell>
          <table:table-cell table:style-name="ce423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1]+1" office:value-type="date" office:date-value="2024-11-03" calcext:value-type="date">
            <text:p>2024/11/03</text:p>
          </table:table-cell>
          <table:table-cell table:style-name="ce423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2]+6" office:value-type="date" office:date-value="2024-11-09" calcext:value-type="date">
            <text:p>2024/11/09</text:p>
          </table:table-cell>
          <table:table-cell table:style-name="ce423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3]+1" office:value-type="date" office:date-value="2024-11-10" calcext:value-type="date">
            <text:p>2024/11/10</text:p>
          </table:table-cell>
          <table:table-cell table:style-name="ce423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4]+6" office:value-type="date" office:date-value="2024-11-16" calcext:value-type="date">
            <text:p>2024/11/16</text:p>
          </table:table-cell>
          <table:table-cell table:style-name="ce423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5]+1" office:value-type="date" office:date-value="2024-11-17" calcext:value-type="date">
            <text:p>2024/11/17</text:p>
          </table:table-cell>
          <table:table-cell table:style-name="ce423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6]+6" office:value-type="date" office:date-value="2024-11-23" calcext:value-type="date">
            <text:p>2024/11/23</text:p>
          </table:table-cell>
          <table:table-cell table:style-name="ce423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7]+1" office:value-type="date" office:date-value="2024-11-24" calcext:value-type="date">
            <text:p>2024/11/24</text:p>
          </table:table-cell>
          <table:table-cell table:style-name="ce423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8]+6" office:value-type="date" office:date-value="2024-11-30" calcext:value-type="date">
            <text:p>2024/11/30</text:p>
          </table:table-cell>
          <table:table-cell table:style-name="ce423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9]+1" office:value-type="date" office:date-value="2024-12-01" calcext:value-type="date">
            <text:p>2024/12/01</text:p>
          </table:table-cell>
          <table:table-cell table:style-name="ce423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0]+6" office:value-type="date" office:date-value="2024-12-07" calcext:value-type="date">
            <text:p>2024/12/07</text:p>
          </table:table-cell>
          <table:table-cell table:style-name="ce423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1]+1" office:value-type="date" office:date-value="2024-12-08" calcext:value-type="date">
            <text:p>2024/12/08</text:p>
          </table:table-cell>
          <table:table-cell table:style-name="ce423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2]+6" office:value-type="date" office:date-value="2024-12-14" calcext:value-type="date">
            <text:p>2024/12/14</text:p>
          </table:table-cell>
          <table:table-cell table:style-name="ce423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3]+1" office:value-type="date" office:date-value="2024-12-15" calcext:value-type="date">
            <text:p>2024/12/15</text:p>
          </table:table-cell>
          <table:table-cell table:style-name="ce423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4]+6" office:value-type="date" office:date-value="2024-12-21" calcext:value-type="date">
            <text:p>2024/12/21</text:p>
          </table:table-cell>
          <table:table-cell table:style-name="ce423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5]+1" office:value-type="date" office:date-value="2024-12-22" calcext:value-type="date">
            <text:p>2024/12/22</text:p>
          </table:table-cell>
          <table:table-cell table:style-name="ce423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6]+6" office:value-type="date" office:date-value="2024-12-28" calcext:value-type="date">
            <text:p>2024/12/28</text:p>
          </table:table-cell>
          <table:table-cell table:style-name="ce423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7]+1" office:value-type="date" office:date-value="2024-12-29" calcext:value-type="date">
            <text:p>2024/12/29</text:p>
          </table:table-cell>
          <table:table-cell table:style-name="ce423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8]+6" office:value-type="date" office:date-value="2025-01-04" calcext:value-type="date">
            <text:p>2025/01/04</text:p>
          </table:table-cell>
          <table:table-cell table:style-name="ce423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9]+1" office:value-type="date" office:date-value="2025-01-05" calcext:value-type="date">
            <text:p>2025/01/05</text:p>
          </table:table-cell>
          <table:table-cell table:style-name="ce423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30]+6" office:value-type="date" office:date-value="2025-01-11" calcext:value-type="date">
            <text:p>2025/01/11</text:p>
          </table:table-cell>
          <table:table-cell table:style-name="ce423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31]+1" office:value-type="date" office:date-value="2025-01-12" calcext:value-type="date">
            <text:p>2025/01/12</text:p>
          </table:table-cell>
          <table:table-cell table:style-name="ce423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32]+6" office:value-type="date" office:date-value="2025-01-18" calcext:value-type="date">
            <text:p>2025/01/18</text:p>
          </table:table-cell>
          <table:table-cell table:style-name="ce423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33]+1" office:value-type="date" office:date-value="2025-01-19" calcext:value-type="date">
            <text:p>2025/01/19</text:p>
          </table:table-cell>
          <table:table-cell table:style-name="ce423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34]+6" office:value-type="date" office:date-value="2025-01-25" calcext:value-type="date">
            <text:p>2025/01/25</text:p>
          </table:table-cell>
          <table:table-cell table:style-name="ce423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4" table:number-rows-repeated="1047576">
          <table:table-cell table:number-columns-repeated="5"/>
          <table:table-cell table:style-name="Default" table:number-columns-repeated="16379"/>
        </table:table-row>
        <table:table-row table:style-name="ro5">
          <table:table-cell table:number-columns-repeated="5"/>
          <table:table-cell table:style-name="Default" table:number-columns-repeated="16379"/>
        </table:table-row>
        <table:table-row table:style-name="ro5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4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00/00/00</text:date>, <text:time style:data-style-name="N2" text:time-value="16:35:46.8132759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32</meta:editing-cycles>
    <meta:creation-date>2020-07-07T01:18:25</meta:creation-date>
    <dc:date>2026-06-25T16:50:02.837035200</dc:date>
    <dc:language>ja-JP</dc:language>
    <meta:editing-duration>PT3H33M3S</meta:editing-duration>
    <meta:generator>LibreOffice/25.8.7.1$Windows_X86_64 LibreOffice_project/39c3b7ac021cfb9f4ca681457ad36828f90e2ce7</meta:generator>
    <meta:document-statistic meta:table-count="2" meta:cell-count="8763" meta:object-count="0"/>
    <meta:user-defined meta:name="AppVersion">16.0300</meta:user-defined>
    <meta:user-defined meta:name="ContentTypeId">0x010100B552E1E9D63E444D813A0265B822756D</meta:user-defined>
  </office:meta>
</office:document-meta>
</file>